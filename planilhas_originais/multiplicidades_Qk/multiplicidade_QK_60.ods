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8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6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16379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60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694444444444445" calcext:value-type="float">
            <text:p>0,00000694444444444445</text:p>
          </table:table-cell>
          <table:table-cell table:formula="of:=[.D3]-[.D2]" office:value-type="float" office:value="0.00000694444444444445" calcext:value-type="float">
            <text:p>0,00000694444444444445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60" office:value-type="float" office:value="120" calcext:value-type="float">
            <text:p>120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38888888888889" calcext:value-type="float">
            <text:p>0,00001388888888888890</text:p>
          </table:table-cell>
          <table:table-cell table:formula="of:=[.D4]-[.D3]" office:value-type="float" office:value="0.00000694444444444444" calcext:value-type="float">
            <text:p>0,00000694444444444444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60" office:value-type="float" office:value="180" calcext:value-type="float">
            <text:p>180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208333333333333" calcext:value-type="float">
            <text:p>0,00002083333333333330</text:p>
          </table:table-cell>
          <table:table-cell table:formula="of:=[.D5]-[.D4]" office:value-type="float" office:value="0.00000694444444444445" calcext:value-type="float">
            <text:p>0,00000694444444444445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60" office:value-type="float" office:value="240" calcext:value-type="float">
            <text:p>240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277777777777778" calcext:value-type="float">
            <text:p>0,00002777777777777780</text:p>
          </table:table-cell>
          <table:table-cell table:formula="of:=[.D6]-[.D5]" office:value-type="float" office:value="0.00000694444444444444" calcext:value-type="float">
            <text:p>0,00000694444444444444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60" office:value-type="float" office:value="300" calcext:value-type="float">
            <text:p>30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347222222222222" calcext:value-type="float">
            <text:p>0,00003472222222222220</text:p>
          </table:table-cell>
          <table:table-cell table:formula="of:=[.D7]-[.D6]" office:value-type="float" office:value="0.00000694444444444444" calcext:value-type="float">
            <text:p>0,00000694444444444444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60" office:value-type="float" office:value="360" calcext:value-type="float">
            <text:p>360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416666666666667" calcext:value-type="float">
            <text:p>0,00004166666666666670</text:p>
          </table:table-cell>
          <table:table-cell table:formula="of:=[.D8]-[.D7]" office:value-type="float" office:value="0.00000694444444444444" calcext:value-type="float">
            <text:p>0,00000694444444444444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60" office:value-type="float" office:value="420" calcext:value-type="float">
            <text:p>420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486111111111111" calcext:value-type="float">
            <text:p>0,00004861111111111110</text:p>
          </table:table-cell>
          <table:table-cell table:formula="of:=[.D9]-[.D8]" office:value-type="float" office:value="0.00000694444444444445" calcext:value-type="float">
            <text:p>0,00000694444444444445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60" office:value-type="float" office:value="480" calcext:value-type="float">
            <text:p>480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555555555555556" calcext:value-type="float">
            <text:p>0,00005555555555555560</text:p>
          </table:table-cell>
          <table:table-cell table:formula="of:=[.D10]-[.D9]" office:value-type="float" office:value="0.00000694444444444444" calcext:value-type="float">
            <text:p>0,00000694444444444444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60" office:value-type="float" office:value="540" calcext:value-type="float">
            <text:p>540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625" calcext:value-type="float">
            <text:p>0,00006250000000000000</text:p>
          </table:table-cell>
          <table:table-cell table:formula="of:=[.D11]-[.D10]" office:value-type="float" office:value="0.00000694444444444444" calcext:value-type="float">
            <text:p>0,00000694444444444444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60" office:value-type="float" office:value="600" calcext:value-type="float">
            <text:p>60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694444444444444" calcext:value-type="float">
            <text:p>0,00006944444444444440</text:p>
          </table:table-cell>
          <table:table-cell table:formula="of:=[.D12]-[.D11]" office:value-type="float" office:value="0.00000694444444444444" calcext:value-type="float">
            <text:p>0,00000694444444444444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60" office:value-type="float" office:value="660" calcext:value-type="float">
            <text:p>660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763888888888889" calcext:value-type="float">
            <text:p>0,00007638888888888890</text:p>
          </table:table-cell>
          <table:table-cell table:formula="of:=[.D13]-[.D12]" office:value-type="float" office:value="0.00000694444444444444" calcext:value-type="float">
            <text:p>0,00000694444444444444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60" office:value-type="float" office:value="720" calcext:value-type="float">
            <text:p>720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833333333333333" calcext:value-type="float">
            <text:p>0,00008333333333333330</text:p>
          </table:table-cell>
          <table:table-cell table:formula="of:=[.D14]-[.D13]" office:value-type="float" office:value="0.00000694444444444444" calcext:value-type="float">
            <text:p>0,00000694444444444444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60" office:value-type="float" office:value="780" calcext:value-type="float">
            <text:p>780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902777777777778" calcext:value-type="float">
            <text:p>0,00009027777777777780</text:p>
          </table:table-cell>
          <table:table-cell table:formula="of:=[.D15]-[.D14]" office:value-type="float" office:value="0.00000694444444444444" calcext:value-type="float">
            <text:p>0,00000694444444444444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60" office:value-type="float" office:value="840" calcext:value-type="float">
            <text:p>840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972222222222222" calcext:value-type="float">
            <text:p>0,00009722222222222220</text:p>
          </table:table-cell>
          <table:table-cell table:formula="of:=[.D16]-[.D15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60" office:value-type="float" office:value="900" calcext:value-type="float">
            <text:p>90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04166666666667" calcext:value-type="float">
            <text:p>0,00010416666666666700</text:p>
          </table:table-cell>
          <table:table-cell table:formula="of:=[.D17]-[.D16]" office:value-type="float" office:value="0.00000694444444444444" calcext:value-type="float">
            <text:p>0,00000694444444444444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60" office:value-type="float" office:value="960" calcext:value-type="float">
            <text:p>960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11111111111111" calcext:value-type="float">
            <text:p>0,00011111111111111100</text:p>
          </table:table-cell>
          <table:table-cell table:formula="of:=[.D18]-[.D17]" office:value-type="float" office:value="0.00000694444444444444" calcext:value-type="float">
            <text:p>0,00000694444444444444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60" office:value-type="float" office:value="1020" calcext:value-type="float">
            <text:p>1020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18055555555556" calcext:value-type="float">
            <text:p>0,00011805555555555600</text:p>
          </table:table-cell>
          <table:table-cell table:formula="of:=[.D19]-[.D18]" office:value-type="float" office:value="0.00000694444444444444" calcext:value-type="float">
            <text:p>0,00000694444444444444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60" office:value-type="float" office:value="1080" calcext:value-type="float">
            <text:p>1080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25" calcext:value-type="float">
            <text:p>0,00012500000000000000</text:p>
          </table:table-cell>
          <table:table-cell table:formula="of:=[.D20]-[.D19]" office:value-type="float" office:value="0.00000694444444444443" calcext:value-type="float">
            <text:p>0,00000694444444444443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60" office:value-type="float" office:value="1140" calcext:value-type="float">
            <text:p>1140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31944444444444" calcext:value-type="float">
            <text:p>0,00013194444444444400</text:p>
          </table:table-cell>
          <table:table-cell table:formula="of:=[.D21]-[.D20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60" office:value-type="float" office:value="1200" calcext:value-type="float">
            <text:p>120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38888888888889" calcext:value-type="float">
            <text:p>0,00013888888888888900</text:p>
          </table:table-cell>
          <table:table-cell table:formula="of:=[.D22]-[.D21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60" office:value-type="float" office:value="1260" calcext:value-type="float">
            <text:p>1260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45833333333333" calcext:value-type="float">
            <text:p>0,00014583333333333300</text:p>
          </table:table-cell>
          <table:table-cell table:formula="of:=[.D23]-[.D22]" office:value-type="float" office:value="0.00000694444444444443" calcext:value-type="float">
            <text:p>0,00000694444444444443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60" office:value-type="float" office:value="1320" calcext:value-type="float">
            <text:p>1320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52777777777778" calcext:value-type="float">
            <text:p>0,00015277777777777800</text:p>
          </table:table-cell>
          <table:table-cell table:formula="of:=[.D24]-[.D23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60" office:value-type="float" office:value="1380" calcext:value-type="float">
            <text:p>1380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59722222222222" calcext:value-type="float">
            <text:p>0,00015972222222222200</text:p>
          </table:table-cell>
          <table:table-cell table:formula="of:=[.D25]-[.D24]" office:value-type="float" office:value="0.00000694444444444443" calcext:value-type="float">
            <text:p>0,00000694444444444443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60" office:value-type="float" office:value="1440" calcext:value-type="float">
            <text:p>1440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66666666666667" calcext:value-type="float">
            <text:p>0,00016666666666666700</text:p>
          </table:table-cell>
          <table:table-cell table:formula="of:=[.D26]-[.D25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60" office:value-type="float" office:value="1500" calcext:value-type="float">
            <text:p>150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73611111111111" calcext:value-type="float">
            <text:p>0,00017361111111111100</text:p>
          </table:table-cell>
          <table:table-cell table:formula="of:=[.D27]-[.D26]" office:value-type="float" office:value="0.00000694444444444443" calcext:value-type="float">
            <text:p>0,00000694444444444443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60" office:value-type="float" office:value="1560" calcext:value-type="float">
            <text:p>1560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180555555555556" calcext:value-type="float">
            <text:p>0,00018055555555555600</text:p>
          </table:table-cell>
          <table:table-cell table:formula="of:=[.D28]-[.D27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60" office:value-type="float" office:value="1620" calcext:value-type="float">
            <text:p>1620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1875" calcext:value-type="float">
            <text:p>0,00018750000000000000</text:p>
          </table:table-cell>
          <table:table-cell table:formula="of:=[.D29]-[.D28]" office:value-type="float" office:value="0.00000694444444444443" calcext:value-type="float">
            <text:p>0,00000694444444444443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60" office:value-type="float" office:value="1680" calcext:value-type="float">
            <text:p>1680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194444444444444" calcext:value-type="float">
            <text:p>0,00019444444444444400</text:p>
          </table:table-cell>
          <table:table-cell table:formula="of:=[.D30]-[.D29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60" office:value-type="float" office:value="1740" calcext:value-type="float">
            <text:p>1740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201388888888889" calcext:value-type="float">
            <text:p>0,00020138888888888900</text:p>
          </table:table-cell>
          <table:table-cell table:formula="of:=[.D31]-[.D30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60" office:value-type="float" office:value="1800" calcext:value-type="float">
            <text:p>180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208333333333333" calcext:value-type="float">
            <text:p>0,00020833333333333300</text:p>
          </table:table-cell>
          <table:table-cell table:formula="of:=[.D32]-[.D31]" office:value-type="float" office:value="0.00000694444444444443" calcext:value-type="float">
            <text:p>0,00000694444444444443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60" office:value-type="float" office:value="1860" calcext:value-type="float">
            <text:p>1860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215277777777778" calcext:value-type="float">
            <text:p>0,00021527777777777800</text:p>
          </table:table-cell>
          <table:table-cell table:formula="of:=[.D33]-[.D32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60" office:value-type="float" office:value="1920" calcext:value-type="float">
            <text:p>1920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222222222222222" calcext:value-type="float">
            <text:p>0,00022222222222222200</text:p>
          </table:table-cell>
          <table:table-cell table:formula="of:=[.D34]-[.D33]" office:value-type="float" office:value="0.00000694444444444443" calcext:value-type="float">
            <text:p>0,00000694444444444443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60" office:value-type="float" office:value="1980" calcext:value-type="float">
            <text:p>1980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229166666666667" calcext:value-type="float">
            <text:p>0,00022916666666666700</text:p>
          </table:table-cell>
          <table:table-cell table:formula="of:=[.D35]-[.D34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60" office:value-type="float" office:value="2040" calcext:value-type="float">
            <text:p>2040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236111111111111" calcext:value-type="float">
            <text:p>0,00023611111111111100</text:p>
          </table:table-cell>
          <table:table-cell table:formula="of:=[.D36]-[.D35]" office:value-type="float" office:value="0.00000694444444444443" calcext:value-type="float">
            <text:p>0,00000694444444444443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60" office:value-type="float" office:value="2100" calcext:value-type="float">
            <text:p>210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243055555555556" calcext:value-type="float">
            <text:p>0,00024305555555555600</text:p>
          </table:table-cell>
          <table:table-cell table:formula="of:=[.D37]-[.D36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60" office:value-type="float" office:value="2160" calcext:value-type="float">
            <text:p>2160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25" calcext:value-type="float">
            <text:p>0,00025000000000000000</text:p>
          </table:table-cell>
          <table:table-cell table:formula="of:=[.D38]-[.D37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60" office:value-type="float" office:value="2220" calcext:value-type="float">
            <text:p>2220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256944444444444" calcext:value-type="float">
            <text:p>0,00025694444444444400</text:p>
          </table:table-cell>
          <table:table-cell table:formula="of:=[.D39]-[.D38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60" office:value-type="float" office:value="2280" calcext:value-type="float">
            <text:p>2280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263888888888889" calcext:value-type="float">
            <text:p>0,00026388888888888900</text:p>
          </table:table-cell>
          <table:table-cell table:formula="of:=[.D40]-[.D39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60" office:value-type="float" office:value="2340" calcext:value-type="float">
            <text:p>2340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270833333333333" calcext:value-type="float">
            <text:p>0,00027083333333333300</text:p>
          </table:table-cell>
          <table:table-cell table:formula="of:=[.D41]-[.D40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60" office:value-type="float" office:value="2400" calcext:value-type="float">
            <text:p>240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277777777777778" calcext:value-type="float">
            <text:p>0,00027777777777777800</text:p>
          </table:table-cell>
          <table:table-cell table:formula="of:=[.D42]-[.D41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60" office:value-type="float" office:value="2460" calcext:value-type="float">
            <text:p>2460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284722222222222" calcext:value-type="float">
            <text:p>0,00028472222222222200</text:p>
          </table:table-cell>
          <table:table-cell table:formula="of:=[.D43]-[.D42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60" office:value-type="float" office:value="2520" calcext:value-type="float">
            <text:p>2520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291666666666667" calcext:value-type="float">
            <text:p>0,00029166666666666700</text:p>
          </table:table-cell>
          <table:table-cell table:formula="of:=[.D44]-[.D43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60" office:value-type="float" office:value="2580" calcext:value-type="float">
            <text:p>2580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298611111111111" calcext:value-type="float">
            <text:p>0,00029861111111111100</text:p>
          </table:table-cell>
          <table:table-cell table:formula="of:=[.D45]-[.D44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60" office:value-type="float" office:value="2640" calcext:value-type="float">
            <text:p>2640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305555555555556" calcext:value-type="float">
            <text:p>0,00030555555555555600</text:p>
          </table:table-cell>
          <table:table-cell table:formula="of:=[.D46]-[.D45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60" office:value-type="float" office:value="2700" calcext:value-type="float">
            <text:p>270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3125" calcext:value-type="float">
            <text:p>0,00031250000000000000</text:p>
          </table:table-cell>
          <table:table-cell table:formula="of:=[.D47]-[.D46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60" office:value-type="float" office:value="2760" calcext:value-type="float">
            <text:p>2760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319444444444444" calcext:value-type="float">
            <text:p>0,00031944444444444400</text:p>
          </table:table-cell>
          <table:table-cell table:formula="of:=[.D48]-[.D47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60" office:value-type="float" office:value="2820" calcext:value-type="float">
            <text:p>2820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326388888888889" calcext:value-type="float">
            <text:p>0,00032638888888888900</text:p>
          </table:table-cell>
          <table:table-cell table:formula="of:=[.D49]-[.D48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60" office:value-type="float" office:value="2880" calcext:value-type="float">
            <text:p>2880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333333333333333" calcext:value-type="float">
            <text:p>0,00033333333333333300</text:p>
          </table:table-cell>
          <table:table-cell table:formula="of:=[.D50]-[.D49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60" office:value-type="float" office:value="2940" calcext:value-type="float">
            <text:p>2940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340277777777778" calcext:value-type="float">
            <text:p>0,00034027777777777800</text:p>
          </table:table-cell>
          <table:table-cell table:formula="of:=[.D51]-[.D50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60" office:value-type="float" office:value="3000" calcext:value-type="float">
            <text:p>30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347222222222222" calcext:value-type="float">
            <text:p>0,00034722222222222200</text:p>
          </table:table-cell>
          <table:table-cell table:formula="of:=[.D52]-[.D51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60" office:value-type="float" office:value="3060" calcext:value-type="float">
            <text:p>3060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354166666666667" calcext:value-type="float">
            <text:p>0,00035416666666666700</text:p>
          </table:table-cell>
          <table:table-cell table:formula="of:=[.D53]-[.D52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60" office:value-type="float" office:value="3120" calcext:value-type="float">
            <text:p>3120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361111111111111" calcext:value-type="float">
            <text:p>0,00036111111111111100</text:p>
          </table:table-cell>
          <table:table-cell table:formula="of:=[.D54]-[.D53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60" office:value-type="float" office:value="3180" calcext:value-type="float">
            <text:p>3180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368055555555556" calcext:value-type="float">
            <text:p>0,00036805555555555600</text:p>
          </table:table-cell>
          <table:table-cell table:formula="of:=[.D55]-[.D54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60" office:value-type="float" office:value="3240" calcext:value-type="float">
            <text:p>3240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375" calcext:value-type="float">
            <text:p>0,00037500000000000000</text:p>
          </table:table-cell>
          <table:table-cell table:formula="of:=[.D56]-[.D55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60" office:value-type="float" office:value="3300" calcext:value-type="float">
            <text:p>330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381944444444444" calcext:value-type="float">
            <text:p>0,00038194444444444400</text:p>
          </table:table-cell>
          <table:table-cell table:formula="of:=[.D57]-[.D56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60" office:value-type="float" office:value="3360" calcext:value-type="float">
            <text:p>3360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388888888888889" calcext:value-type="float">
            <text:p>0,00038888888888888900</text:p>
          </table:table-cell>
          <table:table-cell table:formula="of:=[.D58]-[.D57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60" office:value-type="float" office:value="3420" calcext:value-type="float">
            <text:p>3420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395833333333333" calcext:value-type="float">
            <text:p>0,00039583333333333300</text:p>
          </table:table-cell>
          <table:table-cell table:formula="of:=[.D59]-[.D58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60" office:value-type="float" office:value="3480" calcext:value-type="float">
            <text:p>3480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402777777777778" calcext:value-type="float">
            <text:p>0,00040277777777777800</text:p>
          </table:table-cell>
          <table:table-cell table:formula="of:=[.D60]-[.D59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60" office:value-type="float" office:value="3540" calcext:value-type="float">
            <text:p>3540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409722222222222" calcext:value-type="float">
            <text:p>0,00040972222222222200</text:p>
          </table:table-cell>
          <table:table-cell table:formula="of:=[.D61]-[.D60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60" office:value-type="float" office:value="3600" calcext:value-type="float">
            <text:p>360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416666666666667" calcext:value-type="float">
            <text:p>0,00041666666666666700</text:p>
          </table:table-cell>
          <table:table-cell table:formula="of:=[.D62]-[.D61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60" office:value-type="float" office:value="3660" calcext:value-type="float">
            <text:p>3660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423611111111111" calcext:value-type="float">
            <text:p>0,00042361111111111100</text:p>
          </table:table-cell>
          <table:table-cell table:formula="of:=[.D63]-[.D62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60" office:value-type="float" office:value="3720" calcext:value-type="float">
            <text:p>3720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430555555555556" calcext:value-type="float">
            <text:p>0,00043055555555555600</text:p>
          </table:table-cell>
          <table:table-cell table:formula="of:=[.D64]-[.D63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60" office:value-type="float" office:value="3780" calcext:value-type="float">
            <text:p>3780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4375" calcext:value-type="float">
            <text:p>0,00043750000000000000</text:p>
          </table:table-cell>
          <table:table-cell table:formula="of:=[.D65]-[.D64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60" office:value-type="float" office:value="3840" calcext:value-type="float">
            <text:p>3840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444444444444444" calcext:value-type="float">
            <text:p>0,00044444444444444400</text:p>
          </table:table-cell>
          <table:table-cell table:formula="of:=[.D66]-[.D65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60" office:value-type="float" office:value="3900" calcext:value-type="float">
            <text:p>390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451388888888889" calcext:value-type="float">
            <text:p>0,00045138888888888900</text:p>
          </table:table-cell>
          <table:table-cell table:formula="of:=[.D67]-[.D66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60" office:value-type="float" office:value="3960" calcext:value-type="float">
            <text:p>3960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458333333333333" calcext:value-type="float">
            <text:p>0,00045833333333333300</text:p>
          </table:table-cell>
          <table:table-cell table:formula="of:=[.D68]-[.D67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60" office:value-type="float" office:value="4020" calcext:value-type="float">
            <text:p>4020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465277777777778" calcext:value-type="float">
            <text:p>0,00046527777777777800</text:p>
          </table:table-cell>
          <table:table-cell table:formula="of:=[.D69]-[.D68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60" office:value-type="float" office:value="4080" calcext:value-type="float">
            <text:p>4080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472222222222222" calcext:value-type="float">
            <text:p>0,00047222222222222200</text:p>
          </table:table-cell>
          <table:table-cell table:formula="of:=[.D70]-[.D69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60" office:value-type="float" office:value="4140" calcext:value-type="float">
            <text:p>4140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479166666666667" calcext:value-type="float">
            <text:p>0,00047916666666666700</text:p>
          </table:table-cell>
          <table:table-cell table:formula="of:=[.D71]-[.D70]" office:value-type="float" office:value="0.00000694444444444446" calcext:value-type="float">
            <text:p>0,00000694444444444446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60" office:value-type="float" office:value="4200" calcext:value-type="float">
            <text:p>420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486111111111111" calcext:value-type="float">
            <text:p>0,00048611111111111100</text:p>
          </table:table-cell>
          <table:table-cell table:formula="of:=[.D72]-[.D71]" office:value-type="float" office:value="0.00000694444444444451" calcext:value-type="float">
            <text:p>0,00000694444444444451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60" office:value-type="float" office:value="4260" calcext:value-type="float">
            <text:p>4260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493055555555556" calcext:value-type="float">
            <text:p>0,00049305555555555600</text:p>
          </table:table-cell>
          <table:table-cell table:formula="of:=[.D73]-[.D72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60" office:value-type="float" office:value="4320" calcext:value-type="float">
            <text:p>4320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5" calcext:value-type="float">
            <text:p>0,00050000000000000000</text:p>
          </table:table-cell>
          <table:table-cell table:formula="of:=[.D74]-[.D73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60" office:value-type="float" office:value="4380" calcext:value-type="float">
            <text:p>4380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506944444444444" calcext:value-type="float">
            <text:p>0,00050694444444444400</text:p>
          </table:table-cell>
          <table:table-cell table:formula="of:=[.D75]-[.D74]" office:value-type="float" office:value="0.00000694444444444451" calcext:value-type="float">
            <text:p>0,00000694444444444451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60" office:value-type="float" office:value="4440" calcext:value-type="float">
            <text:p>4440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513888888888889" calcext:value-type="float">
            <text:p>0,00051388888888888900</text:p>
          </table:table-cell>
          <table:table-cell table:formula="of:=[.D76]-[.D75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60" office:value-type="float" office:value="4500" calcext:value-type="float">
            <text:p>450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520833333333333" calcext:value-type="float">
            <text:p>0,00052083333333333300</text:p>
          </table:table-cell>
          <table:table-cell table:formula="of:=[.D77]-[.D76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60" office:value-type="float" office:value="4560" calcext:value-type="float">
            <text:p>4560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527777777777778" calcext:value-type="float">
            <text:p>0,00052777777777777800</text:p>
          </table:table-cell>
          <table:table-cell table:formula="of:=[.D78]-[.D77]" office:value-type="float" office:value="0.00000694444444444451" calcext:value-type="float">
            <text:p>0,00000694444444444451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60" office:value-type="float" office:value="4620" calcext:value-type="float">
            <text:p>4620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534722222222222" calcext:value-type="float">
            <text:p>0,00053472222222222200</text:p>
          </table:table-cell>
          <table:table-cell table:formula="of:=[.D79]-[.D78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60" office:value-type="float" office:value="4680" calcext:value-type="float">
            <text:p>4680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541666666666667" calcext:value-type="float">
            <text:p>0,00054166666666666700</text:p>
          </table:table-cell>
          <table:table-cell table:formula="of:=[.D80]-[.D79]" office:value-type="float" office:value="0.00000694444444444451" calcext:value-type="float">
            <text:p>0,00000694444444444451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60" office:value-type="float" office:value="4740" calcext:value-type="float">
            <text:p>4740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548611111111111" calcext:value-type="float">
            <text:p>0,00054861111111111100</text:p>
          </table:table-cell>
          <table:table-cell table:formula="of:=[.D81]-[.D80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60" office:value-type="float" office:value="4800" calcext:value-type="float">
            <text:p>480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555555555555556" calcext:value-type="float">
            <text:p>0,00055555555555555600</text:p>
          </table:table-cell>
          <table:table-cell table:formula="of:=[.D82]-[.D81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60" office:value-type="float" office:value="4860" calcext:value-type="float">
            <text:p>4860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5625" calcext:value-type="float">
            <text:p>0,00056250000000000000</text:p>
          </table:table-cell>
          <table:table-cell table:formula="of:=[.D83]-[.D82]" office:value-type="float" office:value="0.00000694444444444451" calcext:value-type="float">
            <text:p>0,00000694444444444451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60" office:value-type="float" office:value="4920" calcext:value-type="float">
            <text:p>4920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569444444444445" calcext:value-type="float">
            <text:p>0,00056944444444444500</text:p>
          </table:table-cell>
          <table:table-cell table:formula="of:=[.D84]-[.D83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60" office:value-type="float" office:value="4980" calcext:value-type="float">
            <text:p>4980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576388888888889" calcext:value-type="float">
            <text:p>0,00057638888888888900</text:p>
          </table:table-cell>
          <table:table-cell table:formula="of:=[.D85]-[.D84]" office:value-type="float" office:value="0.00000694444444444451" calcext:value-type="float">
            <text:p>0,00000694444444444451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60" office:value-type="float" office:value="5040" calcext:value-type="float">
            <text:p>5040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583333333333333" calcext:value-type="float">
            <text:p>0,00058333333333333300</text:p>
          </table:table-cell>
          <table:table-cell table:formula="of:=[.D86]-[.D85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60" office:value-type="float" office:value="5100" calcext:value-type="float">
            <text:p>510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590277777777778" calcext:value-type="float">
            <text:p>0,00059027777777777800</text:p>
          </table:table-cell>
          <table:table-cell table:formula="of:=[.D87]-[.D86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60" office:value-type="float" office:value="5160" calcext:value-type="float">
            <text:p>5160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597222222222222" calcext:value-type="float">
            <text:p>0,00059722222222222200</text:p>
          </table:table-cell>
          <table:table-cell table:formula="of:=[.D88]-[.D87]" office:value-type="float" office:value="0.00000694444444444451" calcext:value-type="float">
            <text:p>0,00000694444444444451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60" office:value-type="float" office:value="5220" calcext:value-type="float">
            <text:p>5220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604166666666667" calcext:value-type="float">
            <text:p>0,00060416666666666700</text:p>
          </table:table-cell>
          <table:table-cell table:formula="of:=[.D89]-[.D88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60" office:value-type="float" office:value="5280" calcext:value-type="float">
            <text:p>5280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611111111111111" calcext:value-type="float">
            <text:p>0,00061111111111111100</text:p>
          </table:table-cell>
          <table:table-cell table:formula="of:=[.D90]-[.D89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60" office:value-type="float" office:value="5340" calcext:value-type="float">
            <text:p>5340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618055555555556" calcext:value-type="float">
            <text:p>0,00061805555555555600</text:p>
          </table:table-cell>
          <table:table-cell table:formula="of:=[.D91]-[.D90]" office:value-type="float" office:value="0.00000694444444444451" calcext:value-type="float">
            <text:p>0,00000694444444444451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60" office:value-type="float" office:value="5400" calcext:value-type="float">
            <text:p>540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625" calcext:value-type="float">
            <text:p>0,00062500000000000000</text:p>
          </table:table-cell>
          <table:table-cell table:formula="of:=[.D92]-[.D91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60" office:value-type="float" office:value="5460" calcext:value-type="float">
            <text:p>5460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631944444444444" calcext:value-type="float">
            <text:p>0,00063194444444444400</text:p>
          </table:table-cell>
          <table:table-cell table:formula="of:=[.D93]-[.D92]" office:value-type="float" office:value="0.00000694444444444451" calcext:value-type="float">
            <text:p>0,00000694444444444451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60" office:value-type="float" office:value="5520" calcext:value-type="float">
            <text:p>5520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638888888888889" calcext:value-type="float">
            <text:p>0,00063888888888888900</text:p>
          </table:table-cell>
          <table:table-cell table:formula="of:=[.D94]-[.D93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60" office:value-type="float" office:value="5580" calcext:value-type="float">
            <text:p>5580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645833333333333" calcext:value-type="float">
            <text:p>0,00064583333333333300</text:p>
          </table:table-cell>
          <table:table-cell table:formula="of:=[.D95]-[.D94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60" office:value-type="float" office:value="5640" calcext:value-type="float">
            <text:p>5640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652777777777778" calcext:value-type="float">
            <text:p>0,00065277777777777800</text:p>
          </table:table-cell>
          <table:table-cell table:formula="of:=[.D96]-[.D95]" office:value-type="float" office:value="0.00000694444444444451" calcext:value-type="float">
            <text:p>0,00000694444444444451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60" office:value-type="float" office:value="5700" calcext:value-type="float">
            <text:p>570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659722222222222" calcext:value-type="float">
            <text:p>0,00065972222222222200</text:p>
          </table:table-cell>
          <table:table-cell table:formula="of:=[.D97]-[.D96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60" office:value-type="float" office:value="5760" calcext:value-type="float">
            <text:p>5760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666666666666667" calcext:value-type="float">
            <text:p>0,00066666666666666700</text:p>
          </table:table-cell>
          <table:table-cell table:formula="of:=[.D98]-[.D97]" office:value-type="float" office:value="0.00000694444444444451" calcext:value-type="float">
            <text:p>0,00000694444444444451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60" office:value-type="float" office:value="5820" calcext:value-type="float">
            <text:p>5820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673611111111111" calcext:value-type="float">
            <text:p>0,00067361111111111100</text:p>
          </table:table-cell>
          <table:table-cell table:formula="of:=[.D99]-[.D98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60" office:value-type="float" office:value="5880" calcext:value-type="float">
            <text:p>5880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680555555555556" calcext:value-type="float">
            <text:p>0,00068055555555555600</text:p>
          </table:table-cell>
          <table:table-cell table:formula="of:=[.D100]-[.D99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60" office:value-type="float" office:value="5940" calcext:value-type="float">
            <text:p>5940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6875" calcext:value-type="float">
            <text:p>0,00068750000000000000</text:p>
          </table:table-cell>
          <table:table-cell table:formula="of:=[.D101]-[.D100]" office:value-type="float" office:value="0.00000694444444444451" calcext:value-type="float">
            <text:p>0,00000694444444444451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60" office:value-type="float" office:value="6000" calcext:value-type="float">
            <text:p>60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694444444444445" calcext:value-type="float">
            <text:p>0,00069444444444444500</text:p>
          </table:table-cell>
          <table:table-cell table:formula="of:=[.D102]-[.D101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60" office:value-type="float" office:value="6060" calcext:value-type="float">
            <text:p>6060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701388888888889" calcext:value-type="float">
            <text:p>0,00070138888888888900</text:p>
          </table:table-cell>
          <table:table-cell table:formula="of:=[.D103]-[.D102]" office:value-type="float" office:value="0.00000694444444444451" calcext:value-type="float">
            <text:p>0,00000694444444444451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60" office:value-type="float" office:value="6120" calcext:value-type="float">
            <text:p>6120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708333333333333" calcext:value-type="float">
            <text:p>0,00070833333333333300</text:p>
          </table:table-cell>
          <table:table-cell table:formula="of:=[.D104]-[.D103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60" office:value-type="float" office:value="6180" calcext:value-type="float">
            <text:p>6180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715277777777778" calcext:value-type="float">
            <text:p>0,00071527777777777800</text:p>
          </table:table-cell>
          <table:table-cell table:formula="of:=[.D105]-[.D104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60" office:value-type="float" office:value="6240" calcext:value-type="float">
            <text:p>6240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722222222222222" calcext:value-type="float">
            <text:p>0,00072222222222222200</text:p>
          </table:table-cell>
          <table:table-cell table:formula="of:=[.D106]-[.D105]" office:value-type="float" office:value="0.00000694444444444451" calcext:value-type="float">
            <text:p>0,00000694444444444451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60" office:value-type="float" office:value="6300" calcext:value-type="float">
            <text:p>630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729166666666667" calcext:value-type="float">
            <text:p>0,00072916666666666700</text:p>
          </table:table-cell>
          <table:table-cell table:formula="of:=[.D107]-[.D106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60" office:value-type="float" office:value="6360" calcext:value-type="float">
            <text:p>6360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736111111111111" calcext:value-type="float">
            <text:p>0,00073611111111111100</text:p>
          </table:table-cell>
          <table:table-cell table:formula="of:=[.D108]-[.D107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60" office:value-type="float" office:value="6420" calcext:value-type="float">
            <text:p>6420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743055555555556" calcext:value-type="float">
            <text:p>0,00074305555555555600</text:p>
          </table:table-cell>
          <table:table-cell table:formula="of:=[.D109]-[.D108]" office:value-type="float" office:value="0.00000694444444444451" calcext:value-type="float">
            <text:p>0,00000694444444444451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60" office:value-type="float" office:value="6480" calcext:value-type="float">
            <text:p>6480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75" calcext:value-type="float">
            <text:p>0,00075000000000000000</text:p>
          </table:table-cell>
          <table:table-cell table:formula="of:=[.D110]-[.D109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60" office:value-type="float" office:value="6540" calcext:value-type="float">
            <text:p>6540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756944444444444" calcext:value-type="float">
            <text:p>0,00075694444444444500</text:p>
          </table:table-cell>
          <table:table-cell table:formula="of:=[.D111]-[.D110]" office:value-type="float" office:value="0.00000694444444444451" calcext:value-type="float">
            <text:p>0,00000694444444444451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60" office:value-type="float" office:value="6600" calcext:value-type="float">
            <text:p>660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763888888888889" calcext:value-type="float">
            <text:p>0,00076388888888888900</text:p>
          </table:table-cell>
          <table:table-cell table:formula="of:=[.D112]-[.D111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60" office:value-type="float" office:value="6660" calcext:value-type="float">
            <text:p>6660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770833333333333" calcext:value-type="float">
            <text:p>0,00077083333333333300</text:p>
          </table:table-cell>
          <table:table-cell table:formula="of:=[.D113]-[.D112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60" office:value-type="float" office:value="6720" calcext:value-type="float">
            <text:p>6720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777777777777778" calcext:value-type="float">
            <text:p>0,00077777777777777800</text:p>
          </table:table-cell>
          <table:table-cell table:formula="of:=[.D114]-[.D113]" office:value-type="float" office:value="0.00000694444444444451" calcext:value-type="float">
            <text:p>0,00000694444444444451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60" office:value-type="float" office:value="6780" calcext:value-type="float">
            <text:p>6780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784722222222222" calcext:value-type="float">
            <text:p>0,00078472222222222200</text:p>
          </table:table-cell>
          <table:table-cell table:formula="of:=[.D115]-[.D114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60" office:value-type="float" office:value="6840" calcext:value-type="float">
            <text:p>6840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791666666666667" calcext:value-type="float">
            <text:p>0,00079166666666666700</text:p>
          </table:table-cell>
          <table:table-cell table:formula="of:=[.D116]-[.D115]" office:value-type="float" office:value="0.00000694444444444451" calcext:value-type="float">
            <text:p>0,00000694444444444451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60" office:value-type="float" office:value="6900" calcext:value-type="float">
            <text:p>690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798611111111111" calcext:value-type="float">
            <text:p>0,00079861111111111100</text:p>
          </table:table-cell>
          <table:table-cell table:formula="of:=[.D117]-[.D116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60" office:value-type="float" office:value="6960" calcext:value-type="float">
            <text:p>6960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805555555555556" calcext:value-type="float">
            <text:p>0,00080555555555555600</text:p>
          </table:table-cell>
          <table:table-cell table:formula="of:=[.D118]-[.D117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60" office:value-type="float" office:value="7020" calcext:value-type="float">
            <text:p>7020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8125" calcext:value-type="float">
            <text:p>0,00081250000000000000</text:p>
          </table:table-cell>
          <table:table-cell table:formula="of:=[.D119]-[.D118]" office:value-type="float" office:value="0.00000694444444444451" calcext:value-type="float">
            <text:p>0,00000694444444444451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60" office:value-type="float" office:value="7080" calcext:value-type="float">
            <text:p>7080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819444444444445" calcext:value-type="float">
            <text:p>0,00081944444444444500</text:p>
          </table:table-cell>
          <table:table-cell table:formula="of:=[.D120]-[.D119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60" office:value-type="float" office:value="7140" calcext:value-type="float">
            <text:p>7140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826388888888889" calcext:value-type="float">
            <text:p>0,00082638888888888900</text:p>
          </table:table-cell>
          <table:table-cell table:formula="of:=[.D121]-[.D120]" office:value-type="float" office:value="0.00000694444444444451" calcext:value-type="float">
            <text:p>0,00000694444444444451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60" office:value-type="float" office:value="7200" calcext:value-type="float">
            <text:p>720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833333333333333" calcext:value-type="float">
            <text:p>0,00083333333333333300</text:p>
          </table:table-cell>
          <table:table-cell table:formula="of:=[.D122]-[.D121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60" office:value-type="float" office:value="7260" calcext:value-type="float">
            <text:p>7260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840277777777778" calcext:value-type="float">
            <text:p>0,00084027777777777800</text:p>
          </table:table-cell>
          <table:table-cell table:formula="of:=[.D123]-[.D122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60" office:value-type="float" office:value="7320" calcext:value-type="float">
            <text:p>7320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847222222222222" calcext:value-type="float">
            <text:p>0,00084722222222222200</text:p>
          </table:table-cell>
          <table:table-cell table:formula="of:=[.D124]-[.D123]" office:value-type="float" office:value="0.00000694444444444451" calcext:value-type="float">
            <text:p>0,00000694444444444451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60" office:value-type="float" office:value="7380" calcext:value-type="float">
            <text:p>7380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854166666666667" calcext:value-type="float">
            <text:p>0,00085416666666666700</text:p>
          </table:table-cell>
          <table:table-cell table:formula="of:=[.D125]-[.D124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60" office:value-type="float" office:value="7440" calcext:value-type="float">
            <text:p>7440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861111111111111" calcext:value-type="float">
            <text:p>0,00086111111111111100</text:p>
          </table:table-cell>
          <table:table-cell table:formula="of:=[.D126]-[.D125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60" office:value-type="float" office:value="7500" calcext:value-type="float">
            <text:p>750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868055555555556" calcext:value-type="float">
            <text:p>0,00086805555555555600</text:p>
          </table:table-cell>
          <table:table-cell table:formula="of:=[.D127]-[.D126]" office:value-type="float" office:value="0.00000694444444444451" calcext:value-type="float">
            <text:p>0,00000694444444444451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60" office:value-type="float" office:value="7560" calcext:value-type="float">
            <text:p>7560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875" calcext:value-type="float">
            <text:p>0,00087500000000000000</text:p>
          </table:table-cell>
          <table:table-cell table:formula="of:=[.D128]-[.D127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60" office:value-type="float" office:value="7620" calcext:value-type="float">
            <text:p>7620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881944444444444" calcext:value-type="float">
            <text:p>0,00088194444444444500</text:p>
          </table:table-cell>
          <table:table-cell table:formula="of:=[.D129]-[.D128]" office:value-type="float" office:value="0.00000694444444444451" calcext:value-type="float">
            <text:p>0,00000694444444444451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60" office:value-type="float" office:value="7680" calcext:value-type="float">
            <text:p>7680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888888888888889" calcext:value-type="float">
            <text:p>0,00088888888888888900</text:p>
          </table:table-cell>
          <table:table-cell table:formula="of:=[.D130]-[.D129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60" office:value-type="float" office:value="7740" calcext:value-type="float">
            <text:p>7740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895833333333333" calcext:value-type="float">
            <text:p>0,00089583333333333300</text:p>
          </table:table-cell>
          <table:table-cell table:formula="of:=[.D131]-[.D130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60" office:value-type="float" office:value="7800" calcext:value-type="float">
            <text:p>780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902777777777778" calcext:value-type="float">
            <text:p>0,00090277777777777800</text:p>
          </table:table-cell>
          <table:table-cell table:formula="of:=[.D132]-[.D131]" office:value-type="float" office:value="0.00000694444444444451" calcext:value-type="float">
            <text:p>0,00000694444444444451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60" office:value-type="float" office:value="7860" calcext:value-type="float">
            <text:p>7860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909722222222222" calcext:value-type="float">
            <text:p>0,00090972222222222200</text:p>
          </table:table-cell>
          <table:table-cell table:formula="of:=[.D133]-[.D132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60" office:value-type="float" office:value="7920" calcext:value-type="float">
            <text:p>7920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916666666666667" calcext:value-type="float">
            <text:p>0,00091666666666666700</text:p>
          </table:table-cell>
          <table:table-cell table:formula="of:=[.D134]-[.D133]" office:value-type="float" office:value="0.00000694444444444451" calcext:value-type="float">
            <text:p>0,00000694444444444451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60" office:value-type="float" office:value="7980" calcext:value-type="float">
            <text:p>7980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923611111111111" calcext:value-type="float">
            <text:p>0,00092361111111111100</text:p>
          </table:table-cell>
          <table:table-cell table:formula="of:=[.D135]-[.D134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60" office:value-type="float" office:value="8040" calcext:value-type="float">
            <text:p>8040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930555555555556" calcext:value-type="float">
            <text:p>0,00093055555555555600</text:p>
          </table:table-cell>
          <table:table-cell table:formula="of:=[.D136]-[.D135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60" office:value-type="float" office:value="8100" calcext:value-type="float">
            <text:p>810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9375" calcext:value-type="float">
            <text:p>0,00093750000000000000</text:p>
          </table:table-cell>
          <table:table-cell table:formula="of:=[.D137]-[.D136]" office:value-type="float" office:value="0.00000694444444444451" calcext:value-type="float">
            <text:p>0,00000694444444444451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60" office:value-type="float" office:value="8160" calcext:value-type="float">
            <text:p>8160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944444444444445" calcext:value-type="float">
            <text:p>0,00094444444444444500</text:p>
          </table:table-cell>
          <table:table-cell table:formula="of:=[.D138]-[.D137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60" office:value-type="float" office:value="8220" calcext:value-type="float">
            <text:p>8220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951388888888889" calcext:value-type="float">
            <text:p>0,00095138888888888900</text:p>
          </table:table-cell>
          <table:table-cell table:formula="of:=[.D139]-[.D138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60" office:value-type="float" office:value="8280" calcext:value-type="float">
            <text:p>8280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958333333333333" calcext:value-type="float">
            <text:p>0,00095833333333333300</text:p>
          </table:table-cell>
          <table:table-cell table:formula="of:=[.D140]-[.D139]" office:value-type="float" office:value="0.00000694444444444451" calcext:value-type="float">
            <text:p>0,00000694444444444451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60" office:value-type="float" office:value="8340" calcext:value-type="float">
            <text:p>8340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965277777777778" calcext:value-type="float">
            <text:p>0,00096527777777777800</text:p>
          </table:table-cell>
          <table:table-cell table:formula="of:=[.D141]-[.D140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60" office:value-type="float" office:value="8400" calcext:value-type="float">
            <text:p>840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972222222222222" calcext:value-type="float">
            <text:p>0,00097222222222222200</text:p>
          </table:table-cell>
          <table:table-cell table:formula="of:=[.D142]-[.D141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60" office:value-type="float" office:value="8460" calcext:value-type="float">
            <text:p>8460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979166666666667" calcext:value-type="float">
            <text:p>0,00097916666666666700</text:p>
          </table:table-cell>
          <table:table-cell table:formula="of:=[.D143]-[.D142]" office:value-type="float" office:value="0.00000694444444444462" calcext:value-type="float">
            <text:p>0,00000694444444444462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60" office:value-type="float" office:value="8520" calcext:value-type="float">
            <text:p>8520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986111111111111" calcext:value-type="float">
            <text:p>0,00098611111111111100</text:p>
          </table:table-cell>
          <table:table-cell table:formula="of:=[.D144]-[.D143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60" office:value-type="float" office:value="8580" calcext:value-type="float">
            <text:p>8580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993055555555556" calcext:value-type="float">
            <text:p>0,00099305555555555600</text:p>
          </table:table-cell>
          <table:table-cell table:formula="of:=[.D145]-[.D144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60" office:value-type="float" office:value="8640" calcext:value-type="float">
            <text:p>8640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" calcext:value-type="float">
            <text:p>0,00100000000000000000</text:p>
          </table:table-cell>
          <table:table-cell table:formula="of:=[.D146]-[.D145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60" office:value-type="float" office:value="8700" calcext:value-type="float">
            <text:p>870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00694444444444" calcext:value-type="float">
            <text:p>0,00100694444444444000</text:p>
          </table:table-cell>
          <table:table-cell table:formula="of:=[.D147]-[.D146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60" office:value-type="float" office:value="8760" calcext:value-type="float">
            <text:p>8760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01388888888889" calcext:value-type="float">
            <text:p>0,00101388888888889000</text:p>
          </table:table-cell>
          <table:table-cell table:formula="of:=[.D148]-[.D147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60" office:value-type="float" office:value="8820" calcext:value-type="float">
            <text:p>8820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02083333333333" calcext:value-type="float">
            <text:p>0,00102083333333333000</text:p>
          </table:table-cell>
          <table:table-cell table:formula="of:=[.D149]-[.D148]" office:value-type="float" office:value="0.00000694444444444462" calcext:value-type="float">
            <text:p>0,00000694444444444462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60" office:value-type="float" office:value="8880" calcext:value-type="float">
            <text:p>8880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02777777777778" calcext:value-type="float">
            <text:p>0,00102777777777778000</text:p>
          </table:table-cell>
          <table:table-cell table:formula="of:=[.D150]-[.D149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60" office:value-type="float" office:value="8940" calcext:value-type="float">
            <text:p>8940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03472222222222" calcext:value-type="float">
            <text:p>0,00103472222222222000</text:p>
          </table:table-cell>
          <table:table-cell table:formula="of:=[.D151]-[.D150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60" office:value-type="float" office:value="9000" calcext:value-type="float">
            <text:p>90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04166666666667" calcext:value-type="float">
            <text:p>0,00104166666666667000</text:p>
          </table:table-cell>
          <table:table-cell table:formula="of:=[.D152]-[.D151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60" office:value-type="float" office:value="9060" calcext:value-type="float">
            <text:p>9060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04861111111111" calcext:value-type="float">
            <text:p>0,00104861111111111000</text:p>
          </table:table-cell>
          <table:table-cell table:formula="of:=[.D153]-[.D152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60" office:value-type="float" office:value="9120" calcext:value-type="float">
            <text:p>9120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05555555555556" calcext:value-type="float">
            <text:p>0,00105555555555556000</text:p>
          </table:table-cell>
          <table:table-cell table:formula="of:=[.D154]-[.D153]" office:value-type="float" office:value="0.00000694444444444462" calcext:value-type="float">
            <text:p>0,00000694444444444462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60" office:value-type="float" office:value="9180" calcext:value-type="float">
            <text:p>9180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0625" calcext:value-type="float">
            <text:p>0,00106250000000000000</text:p>
          </table:table-cell>
          <table:table-cell table:formula="of:=[.D155]-[.D154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60" office:value-type="float" office:value="9240" calcext:value-type="float">
            <text:p>9240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06944444444444" calcext:value-type="float">
            <text:p>0,00106944444444444000</text:p>
          </table:table-cell>
          <table:table-cell table:formula="of:=[.D156]-[.D155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60" office:value-type="float" office:value="9300" calcext:value-type="float">
            <text:p>930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07638888888889" calcext:value-type="float">
            <text:p>0,00107638888888889000</text:p>
          </table:table-cell>
          <table:table-cell table:formula="of:=[.D157]-[.D156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60" office:value-type="float" office:value="9360" calcext:value-type="float">
            <text:p>9360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08333333333333" calcext:value-type="float">
            <text:p>0,00108333333333333000</text:p>
          </table:table-cell>
          <table:table-cell table:formula="of:=[.D158]-[.D157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60" office:value-type="float" office:value="9420" calcext:value-type="float">
            <text:p>9420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09027777777778" calcext:value-type="float">
            <text:p>0,00109027777777778000</text:p>
          </table:table-cell>
          <table:table-cell table:formula="of:=[.D159]-[.D158]" office:value-type="float" office:value="0.00000694444444444462" calcext:value-type="float">
            <text:p>0,00000694444444444462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60" office:value-type="float" office:value="9480" calcext:value-type="float">
            <text:p>9480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09722222222222" calcext:value-type="float">
            <text:p>0,00109722222222222000</text:p>
          </table:table-cell>
          <table:table-cell table:formula="of:=[.D160]-[.D159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60" office:value-type="float" office:value="9540" calcext:value-type="float">
            <text:p>9540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10416666666667" calcext:value-type="float">
            <text:p>0,00110416666666667000</text:p>
          </table:table-cell>
          <table:table-cell table:formula="of:=[.D161]-[.D160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60" office:value-type="float" office:value="9600" calcext:value-type="float">
            <text:p>960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11111111111111" calcext:value-type="float">
            <text:p>0,00111111111111111000</text:p>
          </table:table-cell>
          <table:table-cell table:formula="of:=[.D162]-[.D161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60" office:value-type="float" office:value="9660" calcext:value-type="float">
            <text:p>9660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11805555555556" calcext:value-type="float">
            <text:p>0,00111805555555556000</text:p>
          </table:table-cell>
          <table:table-cell table:formula="of:=[.D163]-[.D162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60" office:value-type="float" office:value="9720" calcext:value-type="float">
            <text:p>9720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125" calcext:value-type="float">
            <text:p>0,00112500000000000000</text:p>
          </table:table-cell>
          <table:table-cell table:formula="of:=[.D164]-[.D163]" office:value-type="float" office:value="0.00000694444444444462" calcext:value-type="float">
            <text:p>0,00000694444444444462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60" office:value-type="float" office:value="9780" calcext:value-type="float">
            <text:p>9780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13194444444444" calcext:value-type="float">
            <text:p>0,00113194444444444000</text:p>
          </table:table-cell>
          <table:table-cell table:formula="of:=[.D165]-[.D164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60" office:value-type="float" office:value="9840" calcext:value-type="float">
            <text:p>9840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13888888888889" calcext:value-type="float">
            <text:p>0,00113888888888889000</text:p>
          </table:table-cell>
          <table:table-cell table:formula="of:=[.D166]-[.D165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60" office:value-type="float" office:value="9900" calcext:value-type="float">
            <text:p>990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14583333333333" calcext:value-type="float">
            <text:p>0,00114583333333333000</text:p>
          </table:table-cell>
          <table:table-cell table:formula="of:=[.D167]-[.D166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60" office:value-type="float" office:value="9960" calcext:value-type="float">
            <text:p>9960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15277777777778" calcext:value-type="float">
            <text:p>0,00115277777777778000</text:p>
          </table:table-cell>
          <table:table-cell table:formula="of:=[.D168]-[.D167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60" office:value-type="float" office:value="10020" calcext:value-type="float">
            <text:p>10020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15972222222222" calcext:value-type="float">
            <text:p>0,00115972222222222000</text:p>
          </table:table-cell>
          <table:table-cell table:formula="of:=[.D169]-[.D168]" office:value-type="float" office:value="0.00000694444444444462" calcext:value-type="float">
            <text:p>0,00000694444444444462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60" office:value-type="float" office:value="10080" calcext:value-type="float">
            <text:p>10080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16666666666667" calcext:value-type="float">
            <text:p>0,00116666666666667000</text:p>
          </table:table-cell>
          <table:table-cell table:formula="of:=[.D170]-[.D169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60" office:value-type="float" office:value="10140" calcext:value-type="float">
            <text:p>10140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17361111111111" calcext:value-type="float">
            <text:p>0,00117361111111111000</text:p>
          </table:table-cell>
          <table:table-cell table:formula="of:=[.D171]-[.D170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60" office:value-type="float" office:value="10200" calcext:value-type="float">
            <text:p>1020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18055555555556" calcext:value-type="float">
            <text:p>0,00118055555555556000</text:p>
          </table:table-cell>
          <table:table-cell table:formula="of:=[.D172]-[.D171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60" office:value-type="float" office:value="10260" calcext:value-type="float">
            <text:p>10260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1875" calcext:value-type="float">
            <text:p>0,00118750000000000000</text:p>
          </table:table-cell>
          <table:table-cell table:formula="of:=[.D173]-[.D172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60" office:value-type="float" office:value="10320" calcext:value-type="float">
            <text:p>10320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19444444444444" calcext:value-type="float">
            <text:p>0,00119444444444444000</text:p>
          </table:table-cell>
          <table:table-cell table:formula="of:=[.D174]-[.D173]" office:value-type="float" office:value="0.00000694444444444462" calcext:value-type="float">
            <text:p>0,00000694444444444462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60" office:value-type="float" office:value="10380" calcext:value-type="float">
            <text:p>10380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20138888888889" calcext:value-type="float">
            <text:p>0,00120138888888889000</text:p>
          </table:table-cell>
          <table:table-cell table:formula="of:=[.D175]-[.D174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60" office:value-type="float" office:value="10440" calcext:value-type="float">
            <text:p>10440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20833333333333" calcext:value-type="float">
            <text:p>0,00120833333333333000</text:p>
          </table:table-cell>
          <table:table-cell table:formula="of:=[.D176]-[.D175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60" office:value-type="float" office:value="10500" calcext:value-type="float">
            <text:p>1050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21527777777778" calcext:value-type="float">
            <text:p>0,00121527777777778000</text:p>
          </table:table-cell>
          <table:table-cell table:formula="of:=[.D177]-[.D176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60" office:value-type="float" office:value="10560" calcext:value-type="float">
            <text:p>10560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22222222222222" calcext:value-type="float">
            <text:p>0,00122222222222222000</text:p>
          </table:table-cell>
          <table:table-cell table:formula="of:=[.D178]-[.D177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60" office:value-type="float" office:value="10620" calcext:value-type="float">
            <text:p>10620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22916666666667" calcext:value-type="float">
            <text:p>0,00122916666666667000</text:p>
          </table:table-cell>
          <table:table-cell table:formula="of:=[.D179]-[.D178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60" office:value-type="float" office:value="10680" calcext:value-type="float">
            <text:p>10680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23611111111111" calcext:value-type="float">
            <text:p>0,00123611111111111000</text:p>
          </table:table-cell>
          <table:table-cell table:formula="of:=[.D180]-[.D179]" office:value-type="float" office:value="0.00000694444444444462" calcext:value-type="float">
            <text:p>0,00000694444444444462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60" office:value-type="float" office:value="10740" calcext:value-type="float">
            <text:p>10740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24305555555556" calcext:value-type="float">
            <text:p>0,00124305555555556000</text:p>
          </table:table-cell>
          <table:table-cell table:formula="of:=[.D181]-[.D180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60" office:value-type="float" office:value="10800" calcext:value-type="float">
            <text:p>1080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25" calcext:value-type="float">
            <text:p>0,00125000000000000000</text:p>
          </table:table-cell>
          <table:table-cell table:formula="of:=[.D182]-[.D181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60" office:value-type="float" office:value="10860" calcext:value-type="float">
            <text:p>10860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25694444444444" calcext:value-type="float">
            <text:p>0,00125694444444444000</text:p>
          </table:table-cell>
          <table:table-cell table:formula="of:=[.D183]-[.D182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60" office:value-type="float" office:value="10920" calcext:value-type="float">
            <text:p>10920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26388888888889" calcext:value-type="float">
            <text:p>0,00126388888888889000</text:p>
          </table:table-cell>
          <table:table-cell table:formula="of:=[.D184]-[.D183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60" office:value-type="float" office:value="10980" calcext:value-type="float">
            <text:p>10980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27083333333333" calcext:value-type="float">
            <text:p>0,00127083333333333000</text:p>
          </table:table-cell>
          <table:table-cell table:formula="of:=[.D185]-[.D184]" office:value-type="float" office:value="0.00000694444444444462" calcext:value-type="float">
            <text:p>0,00000694444444444462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60" office:value-type="float" office:value="11040" calcext:value-type="float">
            <text:p>11040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27777777777778" calcext:value-type="float">
            <text:p>0,00127777777777778000</text:p>
          </table:table-cell>
          <table:table-cell table:formula="of:=[.D186]-[.D185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60" office:value-type="float" office:value="11100" calcext:value-type="float">
            <text:p>1110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28472222222222" calcext:value-type="float">
            <text:p>0,00128472222222222000</text:p>
          </table:table-cell>
          <table:table-cell table:formula="of:=[.D187]-[.D186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60" office:value-type="float" office:value="11160" calcext:value-type="float">
            <text:p>11160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29166666666667" calcext:value-type="float">
            <text:p>0,00129166666666667000</text:p>
          </table:table-cell>
          <table:table-cell table:formula="of:=[.D188]-[.D187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60" office:value-type="float" office:value="11220" calcext:value-type="float">
            <text:p>11220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29861111111111" calcext:value-type="float">
            <text:p>0,00129861111111111000</text:p>
          </table:table-cell>
          <table:table-cell table:formula="of:=[.D189]-[.D188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60" office:value-type="float" office:value="11280" calcext:value-type="float">
            <text:p>11280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30555555555556" calcext:value-type="float">
            <text:p>0,00130555555555556000</text:p>
          </table:table-cell>
          <table:table-cell table:formula="of:=[.D190]-[.D189]" office:value-type="float" office:value="0.00000694444444444462" calcext:value-type="float">
            <text:p>0,00000694444444444462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60" office:value-type="float" office:value="11340" calcext:value-type="float">
            <text:p>11340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3125" calcext:value-type="float">
            <text:p>0,00131250000000000000</text:p>
          </table:table-cell>
          <table:table-cell table:formula="of:=[.D191]-[.D190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60" office:value-type="float" office:value="11400" calcext:value-type="float">
            <text:p>1140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31944444444444" calcext:value-type="float">
            <text:p>0,00131944444444444000</text:p>
          </table:table-cell>
          <table:table-cell table:formula="of:=[.D192]-[.D191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60" office:value-type="float" office:value="11460" calcext:value-type="float">
            <text:p>11460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32638888888889" calcext:value-type="float">
            <text:p>0,00132638888888889000</text:p>
          </table:table-cell>
          <table:table-cell table:formula="of:=[.D193]-[.D192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60" office:value-type="float" office:value="11520" calcext:value-type="float">
            <text:p>11520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33333333333333" calcext:value-type="float">
            <text:p>0,00133333333333333000</text:p>
          </table:table-cell>
          <table:table-cell table:formula="of:=[.D194]-[.D193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60" office:value-type="float" office:value="11580" calcext:value-type="float">
            <text:p>11580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34027777777778" calcext:value-type="float">
            <text:p>0,00134027777777778000</text:p>
          </table:table-cell>
          <table:table-cell table:formula="of:=[.D195]-[.D194]" office:value-type="float" office:value="0.00000694444444444462" calcext:value-type="float">
            <text:p>0,00000694444444444462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60" office:value-type="float" office:value="11640" calcext:value-type="float">
            <text:p>11640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34722222222222" calcext:value-type="float">
            <text:p>0,00134722222222222000</text:p>
          </table:table-cell>
          <table:table-cell table:formula="of:=[.D196]-[.D195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60" office:value-type="float" office:value="11700" calcext:value-type="float">
            <text:p>1170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35416666666667" calcext:value-type="float">
            <text:p>0,00135416666666667000</text:p>
          </table:table-cell>
          <table:table-cell table:formula="of:=[.D197]-[.D196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60" office:value-type="float" office:value="11760" calcext:value-type="float">
            <text:p>11760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36111111111111" calcext:value-type="float">
            <text:p>0,00136111111111111000</text:p>
          </table:table-cell>
          <table:table-cell table:formula="of:=[.D198]-[.D197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60" office:value-type="float" office:value="11820" calcext:value-type="float">
            <text:p>11820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36805555555556" calcext:value-type="float">
            <text:p>0,00136805555555556000</text:p>
          </table:table-cell>
          <table:table-cell table:formula="of:=[.D199]-[.D198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60" office:value-type="float" office:value="11880" calcext:value-type="float">
            <text:p>11880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375" calcext:value-type="float">
            <text:p>0,00137500000000000000</text:p>
          </table:table-cell>
          <table:table-cell table:formula="of:=[.D200]-[.D199]" office:value-type="float" office:value="0.00000694444444444462" calcext:value-type="float">
            <text:p>0,00000694444444444462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60" office:value-type="float" office:value="11940" calcext:value-type="float">
            <text:p>11940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38194444444444" calcext:value-type="float">
            <text:p>0,00138194444444444000</text:p>
          </table:table-cell>
          <table:table-cell table:formula="of:=[.D201]-[.D200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60" office:value-type="float" office:value="12000" calcext:value-type="float">
            <text:p>120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38888888888889" calcext:value-type="float">
            <text:p>0,00138888888888889000</text:p>
          </table:table-cell>
          <table:table-cell table:formula="of:=[.D202]-[.D201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60" office:value-type="float" office:value="12060" calcext:value-type="float">
            <text:p>12060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39583333333333" calcext:value-type="float">
            <text:p>0,00139583333333333000</text:p>
          </table:table-cell>
          <table:table-cell table:formula="of:=[.D203]-[.D202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60" office:value-type="float" office:value="12120" calcext:value-type="float">
            <text:p>12120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40277777777778" calcext:value-type="float">
            <text:p>0,00140277777777778000</text:p>
          </table:table-cell>
          <table:table-cell table:formula="of:=[.D204]-[.D203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60" office:value-type="float" office:value="12180" calcext:value-type="float">
            <text:p>12180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40972222222222" calcext:value-type="float">
            <text:p>0,00140972222222222000</text:p>
          </table:table-cell>
          <table:table-cell table:formula="of:=[.D205]-[.D204]" office:value-type="float" office:value="0.00000694444444444462" calcext:value-type="float">
            <text:p>0,00000694444444444462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60" office:value-type="float" office:value="12240" calcext:value-type="float">
            <text:p>12240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41666666666667" calcext:value-type="float">
            <text:p>0,00141666666666667000</text:p>
          </table:table-cell>
          <table:table-cell table:formula="of:=[.D206]-[.D205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60" office:value-type="float" office:value="12300" calcext:value-type="float">
            <text:p>1230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42361111111111" calcext:value-type="float">
            <text:p>0,00142361111111111000</text:p>
          </table:table-cell>
          <table:table-cell table:formula="of:=[.D207]-[.D206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60" office:value-type="float" office:value="12360" calcext:value-type="float">
            <text:p>12360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43055555555556" calcext:value-type="float">
            <text:p>0,00143055555555556000</text:p>
          </table:table-cell>
          <table:table-cell table:formula="of:=[.D208]-[.D207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60" office:value-type="float" office:value="12420" calcext:value-type="float">
            <text:p>12420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4375" calcext:value-type="float">
            <text:p>0,00143750000000000000</text:p>
          </table:table-cell>
          <table:table-cell table:formula="of:=[.D209]-[.D208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60" office:value-type="float" office:value="12480" calcext:value-type="float">
            <text:p>12480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44444444444444" calcext:value-type="float">
            <text:p>0,00144444444444444000</text:p>
          </table:table-cell>
          <table:table-cell table:formula="of:=[.D210]-[.D209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60" office:value-type="float" office:value="12540" calcext:value-type="float">
            <text:p>12540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45138888888889" calcext:value-type="float">
            <text:p>0,00145138888888889000</text:p>
          </table:table-cell>
          <table:table-cell table:formula="of:=[.D211]-[.D210]" office:value-type="float" office:value="0.00000694444444444462" calcext:value-type="float">
            <text:p>0,00000694444444444462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60" office:value-type="float" office:value="12600" calcext:value-type="float">
            <text:p>1260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45833333333333" calcext:value-type="float">
            <text:p>0,00145833333333333000</text:p>
          </table:table-cell>
          <table:table-cell table:formula="of:=[.D212]-[.D211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60" office:value-type="float" office:value="12660" calcext:value-type="float">
            <text:p>12660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46527777777778" calcext:value-type="float">
            <text:p>0,00146527777777778000</text:p>
          </table:table-cell>
          <table:table-cell table:formula="of:=[.D213]-[.D212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60" office:value-type="float" office:value="12720" calcext:value-type="float">
            <text:p>12720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47222222222222" calcext:value-type="float">
            <text:p>0,00147222222222222000</text:p>
          </table:table-cell>
          <table:table-cell table:formula="of:=[.D214]-[.D213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60" office:value-type="float" office:value="12780" calcext:value-type="float">
            <text:p>12780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47916666666667" calcext:value-type="float">
            <text:p>0,00147916666666667000</text:p>
          </table:table-cell>
          <table:table-cell table:formula="of:=[.D215]-[.D214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60" office:value-type="float" office:value="12840" calcext:value-type="float">
            <text:p>12840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48611111111111" calcext:value-type="float">
            <text:p>0,00148611111111111000</text:p>
          </table:table-cell>
          <table:table-cell table:formula="of:=[.D216]-[.D215]" office:value-type="float" office:value="0.00000694444444444462" calcext:value-type="float">
            <text:p>0,00000694444444444462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60" office:value-type="float" office:value="12900" calcext:value-type="float">
            <text:p>1290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49305555555556" calcext:value-type="float">
            <text:p>0,00149305555555556000</text:p>
          </table:table-cell>
          <table:table-cell table:formula="of:=[.D217]-[.D216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60" office:value-type="float" office:value="12960" calcext:value-type="float">
            <text:p>12960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5" calcext:value-type="float">
            <text:p>0,00150000000000000000</text:p>
          </table:table-cell>
          <table:table-cell table:formula="of:=[.D218]-[.D217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60" office:value-type="float" office:value="13020" calcext:value-type="float">
            <text:p>13020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50694444444444" calcext:value-type="float">
            <text:p>0,00150694444444444000</text:p>
          </table:table-cell>
          <table:table-cell table:formula="of:=[.D219]-[.D218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60" office:value-type="float" office:value="13080" calcext:value-type="float">
            <text:p>13080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51388888888889" calcext:value-type="float">
            <text:p>0,00151388888888889000</text:p>
          </table:table-cell>
          <table:table-cell table:formula="of:=[.D220]-[.D219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60" office:value-type="float" office:value="13140" calcext:value-type="float">
            <text:p>13140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52083333333333" calcext:value-type="float">
            <text:p>0,00152083333333333000</text:p>
          </table:table-cell>
          <table:table-cell table:formula="of:=[.D221]-[.D220]" office:value-type="float" office:value="0.00000694444444444462" calcext:value-type="float">
            <text:p>0,00000694444444444462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60" office:value-type="float" office:value="13200" calcext:value-type="float">
            <text:p>1320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52777777777778" calcext:value-type="float">
            <text:p>0,00152777777777778000</text:p>
          </table:table-cell>
          <table:table-cell table:formula="of:=[.D222]-[.D221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60" office:value-type="float" office:value="13260" calcext:value-type="float">
            <text:p>13260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53472222222222" calcext:value-type="float">
            <text:p>0,00153472222222222000</text:p>
          </table:table-cell>
          <table:table-cell table:formula="of:=[.D223]-[.D222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60" office:value-type="float" office:value="13320" calcext:value-type="float">
            <text:p>13320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54166666666667" calcext:value-type="float">
            <text:p>0,00154166666666667000</text:p>
          </table:table-cell>
          <table:table-cell table:formula="of:=[.D224]-[.D223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60" office:value-type="float" office:value="13380" calcext:value-type="float">
            <text:p>13380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54861111111111" calcext:value-type="float">
            <text:p>0,00154861111111111000</text:p>
          </table:table-cell>
          <table:table-cell table:formula="of:=[.D225]-[.D224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60" office:value-type="float" office:value="13440" calcext:value-type="float">
            <text:p>13440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55555555555556" calcext:value-type="float">
            <text:p>0,00155555555555556000</text:p>
          </table:table-cell>
          <table:table-cell table:formula="of:=[.D226]-[.D225]" office:value-type="float" office:value="0.00000694444444444462" calcext:value-type="float">
            <text:p>0,00000694444444444462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60" office:value-type="float" office:value="13500" calcext:value-type="float">
            <text:p>1350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5625" calcext:value-type="float">
            <text:p>0,00156250000000000000</text:p>
          </table:table-cell>
          <table:table-cell table:formula="of:=[.D227]-[.D226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60" office:value-type="float" office:value="13560" calcext:value-type="float">
            <text:p>13560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56944444444444" calcext:value-type="float">
            <text:p>0,00156944444444444000</text:p>
          </table:table-cell>
          <table:table-cell table:formula="of:=[.D228]-[.D227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60" office:value-type="float" office:value="13620" calcext:value-type="float">
            <text:p>13620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57638888888889" calcext:value-type="float">
            <text:p>0,00157638888888889000</text:p>
          </table:table-cell>
          <table:table-cell table:formula="of:=[.D229]-[.D228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60" office:value-type="float" office:value="13680" calcext:value-type="float">
            <text:p>13680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58333333333333" calcext:value-type="float">
            <text:p>0,00158333333333333000</text:p>
          </table:table-cell>
          <table:table-cell table:formula="of:=[.D230]-[.D229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60" office:value-type="float" office:value="13740" calcext:value-type="float">
            <text:p>13740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59027777777778" calcext:value-type="float">
            <text:p>0,00159027777777778000</text:p>
          </table:table-cell>
          <table:table-cell table:formula="of:=[.D231]-[.D230]" office:value-type="float" office:value="0.00000694444444444462" calcext:value-type="float">
            <text:p>0,00000694444444444462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60" office:value-type="float" office:value="13800" calcext:value-type="float">
            <text:p>1380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59722222222222" calcext:value-type="float">
            <text:p>0,00159722222222222000</text:p>
          </table:table-cell>
          <table:table-cell table:formula="of:=[.D232]-[.D231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60" office:value-type="float" office:value="13860" calcext:value-type="float">
            <text:p>13860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60416666666667" calcext:value-type="float">
            <text:p>0,00160416666666667000</text:p>
          </table:table-cell>
          <table:table-cell table:formula="of:=[.D233]-[.D232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60" office:value-type="float" office:value="13920" calcext:value-type="float">
            <text:p>13920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61111111111111" calcext:value-type="float">
            <text:p>0,00161111111111111000</text:p>
          </table:table-cell>
          <table:table-cell table:formula="of:=[.D234]-[.D233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60" office:value-type="float" office:value="13980" calcext:value-type="float">
            <text:p>13980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61805555555556" calcext:value-type="float">
            <text:p>0,00161805555555556000</text:p>
          </table:table-cell>
          <table:table-cell table:formula="of:=[.D235]-[.D234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60" office:value-type="float" office:value="14040" calcext:value-type="float">
            <text:p>14040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625" calcext:value-type="float">
            <text:p>0,00162500000000000000</text:p>
          </table:table-cell>
          <table:table-cell table:formula="of:=[.D236]-[.D235]" office:value-type="float" office:value="0.00000694444444444462" calcext:value-type="float">
            <text:p>0,00000694444444444462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60" office:value-type="float" office:value="14100" calcext:value-type="float">
            <text:p>1410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63194444444444" calcext:value-type="float">
            <text:p>0,00163194444444444000</text:p>
          </table:table-cell>
          <table:table-cell table:formula="of:=[.D237]-[.D236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60" office:value-type="float" office:value="14160" calcext:value-type="float">
            <text:p>14160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63888888888889" calcext:value-type="float">
            <text:p>0,00163888888888889000</text:p>
          </table:table-cell>
          <table:table-cell table:formula="of:=[.D238]-[.D237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60" office:value-type="float" office:value="14220" calcext:value-type="float">
            <text:p>14220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64583333333333" calcext:value-type="float">
            <text:p>0,00164583333333333000</text:p>
          </table:table-cell>
          <table:table-cell table:formula="of:=[.D239]-[.D238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60" office:value-type="float" office:value="14280" calcext:value-type="float">
            <text:p>14280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65277777777778" calcext:value-type="float">
            <text:p>0,00165277777777778000</text:p>
          </table:table-cell>
          <table:table-cell table:formula="of:=[.D240]-[.D239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60" office:value-type="float" office:value="14340" calcext:value-type="float">
            <text:p>14340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65972222222222" calcext:value-type="float">
            <text:p>0,00165972222222222000</text:p>
          </table:table-cell>
          <table:table-cell table:formula="of:=[.D241]-[.D240]" office:value-type="float" office:value="0.00000694444444444462" calcext:value-type="float">
            <text:p>0,00000694444444444462</text:p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60" office:value-type="float" office:value="14400" calcext:value-type="float">
            <text:p>1440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66666666666667" calcext:value-type="float">
            <text:p>0,00166666666666667000</text:p>
          </table:table-cell>
          <table:table-cell table:formula="of:=[.D242]-[.D241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60" office:value-type="float" office:value="14460" calcext:value-type="float">
            <text:p>14460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67361111111111" calcext:value-type="float">
            <text:p>0,00167361111111111000</text:p>
          </table:table-cell>
          <table:table-cell table:formula="of:=[.D243]-[.D242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60" office:value-type="float" office:value="14520" calcext:value-type="float">
            <text:p>14520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68055555555556" calcext:value-type="float">
            <text:p>0,00168055555555556000</text:p>
          </table:table-cell>
          <table:table-cell table:formula="of:=[.D244]-[.D243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60" office:value-type="float" office:value="14580" calcext:value-type="float">
            <text:p>14580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6875" calcext:value-type="float">
            <text:p>0,00168750000000000000</text:p>
          </table:table-cell>
          <table:table-cell table:formula="of:=[.D245]-[.D244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60" office:value-type="float" office:value="14640" calcext:value-type="float">
            <text:p>14640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69444444444444" calcext:value-type="float">
            <text:p>0,00169444444444444000</text:p>
          </table:table-cell>
          <table:table-cell table:formula="of:=[.D246]-[.D245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60" office:value-type="float" office:value="14700" calcext:value-type="float">
            <text:p>1470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70138888888889" calcext:value-type="float">
            <text:p>0,00170138888888889000</text:p>
          </table:table-cell>
          <table:table-cell table:formula="of:=[.D247]-[.D246]" office:value-type="float" office:value="0.00000694444444444462" calcext:value-type="float">
            <text:p>0,00000694444444444462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60" office:value-type="float" office:value="14760" calcext:value-type="float">
            <text:p>14760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70833333333333" calcext:value-type="float">
            <text:p>0,00170833333333333000</text:p>
          </table:table-cell>
          <table:table-cell table:formula="of:=[.D248]-[.D247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60" office:value-type="float" office:value="14820" calcext:value-type="float">
            <text:p>14820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71527777777778" calcext:value-type="float">
            <text:p>0,00171527777777778000</text:p>
          </table:table-cell>
          <table:table-cell table:formula="of:=[.D249]-[.D248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60" office:value-type="float" office:value="14880" calcext:value-type="float">
            <text:p>14880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72222222222222" calcext:value-type="float">
            <text:p>0,00172222222222222000</text:p>
          </table:table-cell>
          <table:table-cell table:formula="of:=[.D250]-[.D249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60" office:value-type="float" office:value="14940" calcext:value-type="float">
            <text:p>14940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72916666666667" calcext:value-type="float">
            <text:p>0,00172916666666667000</text:p>
          </table:table-cell>
          <table:table-cell table:formula="of:=[.D251]-[.D250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60" office:value-type="float" office:value="15000" calcext:value-type="float">
            <text:p>150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73611111111111" calcext:value-type="float">
            <text:p>0,00173611111111111000</text:p>
          </table:table-cell>
          <table:table-cell table:formula="of:=[.D252]-[.D251]" office:value-type="float" office:value="0.00000694444444444462" calcext:value-type="float">
            <text:p>0,00000694444444444462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60" office:value-type="float" office:value="15060" calcext:value-type="float">
            <text:p>15060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174305555555556" calcext:value-type="float">
            <text:p>0,00174305555555556000</text:p>
          </table:table-cell>
          <table:table-cell table:formula="of:=[.D253]-[.D252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60" office:value-type="float" office:value="15120" calcext:value-type="float">
            <text:p>15120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175" calcext:value-type="float">
            <text:p>0,00175000000000000000</text:p>
          </table:table-cell>
          <table:table-cell table:formula="of:=[.D254]-[.D253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60" office:value-type="float" office:value="15180" calcext:value-type="float">
            <text:p>15180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175694444444444" calcext:value-type="float">
            <text:p>0,00175694444444444000</text:p>
          </table:table-cell>
          <table:table-cell table:formula="of:=[.D255]-[.D254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60" office:value-type="float" office:value="15240" calcext:value-type="float">
            <text:p>15240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176388888888889" calcext:value-type="float">
            <text:p>0,00176388888888889000</text:p>
          </table:table-cell>
          <table:table-cell table:formula="of:=[.D256]-[.D255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60" office:value-type="float" office:value="15300" calcext:value-type="float">
            <text:p>1530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177083333333333" calcext:value-type="float">
            <text:p>0,00177083333333333000</text:p>
          </table:table-cell>
          <table:table-cell table:formula="of:=[.D257]-[.D256]" office:value-type="float" office:value="0.00000694444444444462" calcext:value-type="float">
            <text:p>0,00000694444444444462</text:p>
          </table:table-cell>
          <table:table-cell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60" office:value-type="float" office:value="15360" calcext:value-type="float">
            <text:p>15360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177777777777778" calcext:value-type="float">
            <text:p>0,00177777777777778000</text:p>
          </table:table-cell>
          <table:table-cell table:formula="of:=[.D258]-[.D257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60" office:value-type="float" office:value="15420" calcext:value-type="float">
            <text:p>15420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178472222222222" calcext:value-type="float">
            <text:p>0,00178472222222222000</text:p>
          </table:table-cell>
          <table:table-cell table:formula="of:=[.D259]-[.D258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60" office:value-type="float" office:value="15480" calcext:value-type="float">
            <text:p>15480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179166666666667" calcext:value-type="float">
            <text:p>0,00179166666666667000</text:p>
          </table:table-cell>
          <table:table-cell table:formula="of:=[.D260]-[.D259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60" office:value-type="float" office:value="15540" calcext:value-type="float">
            <text:p>15540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179861111111111" calcext:value-type="float">
            <text:p>0,00179861111111111000</text:p>
          </table:table-cell>
          <table:table-cell table:formula="of:=[.D261]-[.D260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60" office:value-type="float" office:value="15600" calcext:value-type="float">
            <text:p>1560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180555555555556" calcext:value-type="float">
            <text:p>0,00180555555555556000</text:p>
          </table:table-cell>
          <table:table-cell table:formula="of:=[.D262]-[.D261]" office:value-type="float" office:value="0.00000694444444444462" calcext:value-type="float">
            <text:p>0,00000694444444444462</text:p>
          </table:table-cell>
          <table:table-cell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60" office:value-type="float" office:value="15660" calcext:value-type="float">
            <text:p>15660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18125" calcext:value-type="float">
            <text:p>0,00181250000000000000</text:p>
          </table:table-cell>
          <table:table-cell table:formula="of:=[.D263]-[.D262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60" office:value-type="float" office:value="15720" calcext:value-type="float">
            <text:p>15720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181944444444444" calcext:value-type="float">
            <text:p>0,00181944444444444000</text:p>
          </table:table-cell>
          <table:table-cell table:formula="of:=[.D264]-[.D263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60" office:value-type="float" office:value="15780" calcext:value-type="float">
            <text:p>15780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182638888888889" calcext:value-type="float">
            <text:p>0,00182638888888889000</text:p>
          </table:table-cell>
          <table:table-cell table:formula="of:=[.D265]-[.D264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60" office:value-type="float" office:value="15840" calcext:value-type="float">
            <text:p>15840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183333333333333" calcext:value-type="float">
            <text:p>0,00183333333333333000</text:p>
          </table:table-cell>
          <table:table-cell table:formula="of:=[.D266]-[.D265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60" office:value-type="float" office:value="15900" calcext:value-type="float">
            <text:p>1590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184027777777778" calcext:value-type="float">
            <text:p>0,00184027777777778000</text:p>
          </table:table-cell>
          <table:table-cell table:formula="of:=[.D267]-[.D266]" office:value-type="float" office:value="0.00000694444444444462" calcext:value-type="float">
            <text:p>0,00000694444444444462</text:p>
          </table:table-cell>
          <table:table-cell table:number-columns-repeated="1637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60" office:value-type="float" office:value="15960" calcext:value-type="float">
            <text:p>15960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184722222222222" calcext:value-type="float">
            <text:p>0,00184722222222222000</text:p>
          </table:table-cell>
          <table:table-cell table:formula="of:=[.D268]-[.D267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60" office:value-type="float" office:value="16020" calcext:value-type="float">
            <text:p>16020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185416666666667" calcext:value-type="float">
            <text:p>0,00185416666666667000</text:p>
          </table:table-cell>
          <table:table-cell table:formula="of:=[.D269]-[.D268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60" office:value-type="float" office:value="16080" calcext:value-type="float">
            <text:p>16080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186111111111111" calcext:value-type="float">
            <text:p>0,00186111111111111000</text:p>
          </table:table-cell>
          <table:table-cell table:formula="of:=[.D270]-[.D269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60" office:value-type="float" office:value="16140" calcext:value-type="float">
            <text:p>16140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186805555555556" calcext:value-type="float">
            <text:p>0,00186805555555556000</text:p>
          </table:table-cell>
          <table:table-cell table:formula="of:=[.D271]-[.D270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60" office:value-type="float" office:value="16200" calcext:value-type="float">
            <text:p>1620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1875" calcext:value-type="float">
            <text:p>0,00187500000000000000</text:p>
          </table:table-cell>
          <table:table-cell table:formula="of:=[.D272]-[.D271]" office:value-type="float" office:value="0.00000694444444444462" calcext:value-type="float">
            <text:p>0,00000694444444444462</text:p>
          </table:table-cell>
          <table:table-cell table:number-columns-repeated="1637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60" office:value-type="float" office:value="16260" calcext:value-type="float">
            <text:p>16260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188194444444444" calcext:value-type="float">
            <text:p>0,00188194444444444000</text:p>
          </table:table-cell>
          <table:table-cell table:formula="of:=[.D273]-[.D272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60" office:value-type="float" office:value="16320" calcext:value-type="float">
            <text:p>16320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188888888888889" calcext:value-type="float">
            <text:p>0,00188888888888889000</text:p>
          </table:table-cell>
          <table:table-cell table:formula="of:=[.D274]-[.D273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60" office:value-type="float" office:value="16380" calcext:value-type="float">
            <text:p>16380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189583333333333" calcext:value-type="float">
            <text:p>0,00189583333333333000</text:p>
          </table:table-cell>
          <table:table-cell table:formula="of:=[.D275]-[.D274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60" office:value-type="float" office:value="16440" calcext:value-type="float">
            <text:p>16440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190277777777778" calcext:value-type="float">
            <text:p>0,00190277777777778000</text:p>
          </table:table-cell>
          <table:table-cell table:formula="of:=[.D276]-[.D275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60" office:value-type="float" office:value="16500" calcext:value-type="float">
            <text:p>1650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190972222222222" calcext:value-type="float">
            <text:p>0,00190972222222222000</text:p>
          </table:table-cell>
          <table:table-cell table:formula="of:=[.D277]-[.D276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60" office:value-type="float" office:value="16560" calcext:value-type="float">
            <text:p>16560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191666666666667" calcext:value-type="float">
            <text:p>0,00191666666666667000</text:p>
          </table:table-cell>
          <table:table-cell table:formula="of:=[.D278]-[.D277]" office:value-type="float" office:value="0.00000694444444444462" calcext:value-type="float">
            <text:p>0,00000694444444444462</text:p>
          </table:table-cell>
          <table:table-cell table:number-columns-repeated="1637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60" office:value-type="float" office:value="16620" calcext:value-type="float">
            <text:p>16620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192361111111111" calcext:value-type="float">
            <text:p>0,00192361111111111000</text:p>
          </table:table-cell>
          <table:table-cell table:formula="of:=[.D279]-[.D278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60" office:value-type="float" office:value="16680" calcext:value-type="float">
            <text:p>16680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193055555555556" calcext:value-type="float">
            <text:p>0,00193055555555556000</text:p>
          </table:table-cell>
          <table:table-cell table:formula="of:=[.D280]-[.D279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60" office:value-type="float" office:value="16740" calcext:value-type="float">
            <text:p>16740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19375" calcext:value-type="float">
            <text:p>0,00193750000000000000</text:p>
          </table:table-cell>
          <table:table-cell table:formula="of:=[.D281]-[.D280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60" office:value-type="float" office:value="16800" calcext:value-type="float">
            <text:p>1680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194444444444444" calcext:value-type="float">
            <text:p>0,00194444444444444000</text:p>
          </table:table-cell>
          <table:table-cell table:formula="of:=[.D282]-[.D281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60" office:value-type="float" office:value="16860" calcext:value-type="float">
            <text:p>16860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195138888888889" calcext:value-type="float">
            <text:p>0,00195138888888889000</text:p>
          </table:table-cell>
          <table:table-cell table:formula="of:=[.D283]-[.D282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60" office:value-type="float" office:value="16920" calcext:value-type="float">
            <text:p>16920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195833333333333" calcext:value-type="float">
            <text:p>0,00195833333333333000</text:p>
          </table:table-cell>
          <table:table-cell table:formula="of:=[.D284]-[.D283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60" office:value-type="float" office:value="16980" calcext:value-type="float">
            <text:p>16980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196527777777778" calcext:value-type="float">
            <text:p>0,00196527777777778000</text:p>
          </table:table-cell>
          <table:table-cell table:formula="of:=[.D285]-[.D284]" office:value-type="float" office:value="0.00000694444444444484" calcext:value-type="float">
            <text:p>0,00000694444444444484</text:p>
          </table:table-cell>
          <table:table-cell table:number-columns-repeated="1637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60" office:value-type="float" office:value="17040" calcext:value-type="float">
            <text:p>17040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197222222222222" calcext:value-type="float">
            <text:p>0,00197222222222222000</text:p>
          </table:table-cell>
          <table:table-cell table:formula="of:=[.D286]-[.D285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60" office:value-type="float" office:value="17100" calcext:value-type="float">
            <text:p>17100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197916666666667" calcext:value-type="float">
            <text:p>0,00197916666666667000</text:p>
          </table:table-cell>
          <table:table-cell table:formula="of:=[.D287]-[.D286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60" office:value-type="float" office:value="17160" calcext:value-type="float">
            <text:p>17160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198611111111111" calcext:value-type="float">
            <text:p>0,00198611111111111000</text:p>
          </table:table-cell>
          <table:table-cell table:formula="of:=[.D288]-[.D287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60" office:value-type="float" office:value="17220" calcext:value-type="float">
            <text:p>17220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199305555555556" calcext:value-type="float">
            <text:p>0,00199305555555556000</text:p>
          </table:table-cell>
          <table:table-cell table:formula="of:=[.D289]-[.D288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60" office:value-type="float" office:value="17280" calcext:value-type="float">
            <text:p>17280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2" calcext:value-type="float">
            <text:p>0,00200000000000000000</text:p>
          </table:table-cell>
          <table:table-cell table:formula="of:=[.D290]-[.D289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60" office:value-type="float" office:value="17340" calcext:value-type="float">
            <text:p>17340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200694444444444" calcext:value-type="float">
            <text:p>0,00200694444444444000</text:p>
          </table:table-cell>
          <table:table-cell table:formula="of:=[.D291]-[.D290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60" office:value-type="float" office:value="17400" calcext:value-type="float">
            <text:p>1740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201388888888889" calcext:value-type="float">
            <text:p>0,00201388888888889000</text:p>
          </table:table-cell>
          <table:table-cell table:formula="of:=[.D292]-[.D291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60" office:value-type="float" office:value="17460" calcext:value-type="float">
            <text:p>17460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202083333333333" calcext:value-type="float">
            <text:p>0,00202083333333333000</text:p>
          </table:table-cell>
          <table:table-cell table:formula="of:=[.D293]-[.D292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60" office:value-type="float" office:value="17520" calcext:value-type="float">
            <text:p>17520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202777777777778" calcext:value-type="float">
            <text:p>0,00202777777777778000</text:p>
          </table:table-cell>
          <table:table-cell table:formula="of:=[.D294]-[.D293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60" office:value-type="float" office:value="17580" calcext:value-type="float">
            <text:p>17580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203472222222222" calcext:value-type="float">
            <text:p>0,00203472222222222000</text:p>
          </table:table-cell>
          <table:table-cell table:formula="of:=[.D295]-[.D294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60" office:value-type="float" office:value="17640" calcext:value-type="float">
            <text:p>17640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204166666666667" calcext:value-type="float">
            <text:p>0,00204166666666667000</text:p>
          </table:table-cell>
          <table:table-cell table:formula="of:=[.D296]-[.D295]" office:value-type="float" office:value="0.00000694444444444484" calcext:value-type="float">
            <text:p>0,00000694444444444484</text:p>
          </table:table-cell>
          <table:table-cell table:number-columns-repeated="1637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60" office:value-type="float" office:value="17700" calcext:value-type="float">
            <text:p>17700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204861111111111" calcext:value-type="float">
            <text:p>0,00204861111111111000</text:p>
          </table:table-cell>
          <table:table-cell table:formula="of:=[.D297]-[.D296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60" office:value-type="float" office:value="17760" calcext:value-type="float">
            <text:p>17760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205555555555556" calcext:value-type="float">
            <text:p>0,00205555555555556000</text:p>
          </table:table-cell>
          <table:table-cell table:formula="of:=[.D298]-[.D297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60" office:value-type="float" office:value="17820" calcext:value-type="float">
            <text:p>17820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20625" calcext:value-type="float">
            <text:p>0,00206250000000000000</text:p>
          </table:table-cell>
          <table:table-cell table:formula="of:=[.D299]-[.D298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60" office:value-type="float" office:value="17880" calcext:value-type="float">
            <text:p>17880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206944444444444" calcext:value-type="float">
            <text:p>0,00206944444444444000</text:p>
          </table:table-cell>
          <table:table-cell table:formula="of:=[.D300]-[.D299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60" office:value-type="float" office:value="17940" calcext:value-type="float">
            <text:p>17940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207638888888889" calcext:value-type="float">
            <text:p>0,00207638888888889000</text:p>
          </table:table-cell>
          <table:table-cell table:formula="of:=[.D301]-[.D300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60" office:value-type="float" office:value="18000" calcext:value-type="float">
            <text:p>180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208333333333333" calcext:value-type="float">
            <text:p>0,00208333333333333000</text:p>
          </table:table-cell>
          <table:table-cell table:formula="of:=[.D302]-[.D301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60" office:value-type="float" office:value="18060" calcext:value-type="float">
            <text:p>18060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209027777777778" calcext:value-type="float">
            <text:p>0,00209027777777778000</text:p>
          </table:table-cell>
          <table:table-cell table:formula="of:=[.D303]-[.D302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60" office:value-type="float" office:value="18120" calcext:value-type="float">
            <text:p>18120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209722222222222" calcext:value-type="float">
            <text:p>0,00209722222222222000</text:p>
          </table:table-cell>
          <table:table-cell table:formula="of:=[.D304]-[.D303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60" office:value-type="float" office:value="18180" calcext:value-type="float">
            <text:p>18180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210416666666667" calcext:value-type="float">
            <text:p>0,00210416666666667000</text:p>
          </table:table-cell>
          <table:table-cell table:formula="of:=[.D305]-[.D304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60" office:value-type="float" office:value="18240" calcext:value-type="float">
            <text:p>18240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211111111111111" calcext:value-type="float">
            <text:p>0,00211111111111111000</text:p>
          </table:table-cell>
          <table:table-cell table:formula="of:=[.D306]-[.D305]" office:value-type="float" office:value="0.00000694444444444484" calcext:value-type="float">
            <text:p>0,00000694444444444484</text:p>
          </table:table-cell>
          <table:table-cell table:number-columns-repeated="1637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60" office:value-type="float" office:value="18300" calcext:value-type="float">
            <text:p>18300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211805555555556" calcext:value-type="float">
            <text:p>0,00211805555555556000</text:p>
          </table:table-cell>
          <table:table-cell table:formula="of:=[.D307]-[.D306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60" office:value-type="float" office:value="18360" calcext:value-type="float">
            <text:p>18360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2125" calcext:value-type="float">
            <text:p>0,00212500000000000000</text:p>
          </table:table-cell>
          <table:table-cell table:formula="of:=[.D308]-[.D307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60" office:value-type="float" office:value="18420" calcext:value-type="float">
            <text:p>18420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213194444444444" calcext:value-type="float">
            <text:p>0,00213194444444444000</text:p>
          </table:table-cell>
          <table:table-cell table:formula="of:=[.D309]-[.D308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60" office:value-type="float" office:value="18480" calcext:value-type="float">
            <text:p>18480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213888888888889" calcext:value-type="float">
            <text:p>0,00213888888888889000</text:p>
          </table:table-cell>
          <table:table-cell table:formula="of:=[.D310]-[.D309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60" office:value-type="float" office:value="18540" calcext:value-type="float">
            <text:p>18540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214583333333333" calcext:value-type="float">
            <text:p>0,00214583333333333000</text:p>
          </table:table-cell>
          <table:table-cell table:formula="of:=[.D311]-[.D310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60" office:value-type="float" office:value="18600" calcext:value-type="float">
            <text:p>1860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215277777777778" calcext:value-type="float">
            <text:p>0,00215277777777778000</text:p>
          </table:table-cell>
          <table:table-cell table:formula="of:=[.D312]-[.D311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60" office:value-type="float" office:value="18660" calcext:value-type="float">
            <text:p>18660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215972222222222" calcext:value-type="float">
            <text:p>0,00215972222222222000</text:p>
          </table:table-cell>
          <table:table-cell table:formula="of:=[.D313]-[.D312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60" office:value-type="float" office:value="18720" calcext:value-type="float">
            <text:p>18720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216666666666667" calcext:value-type="float">
            <text:p>0,00216666666666667000</text:p>
          </table:table-cell>
          <table:table-cell table:formula="of:=[.D314]-[.D313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60" office:value-type="float" office:value="18780" calcext:value-type="float">
            <text:p>18780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217361111111111" calcext:value-type="float">
            <text:p>0,00217361111111111000</text:p>
          </table:table-cell>
          <table:table-cell table:formula="of:=[.D315]-[.D314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60" office:value-type="float" office:value="18840" calcext:value-type="float">
            <text:p>18840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218055555555556" calcext:value-type="float">
            <text:p>0,00218055555555556000</text:p>
          </table:table-cell>
          <table:table-cell table:formula="of:=[.D316]-[.D315]" office:value-type="float" office:value="0.00000694444444444484" calcext:value-type="float">
            <text:p>0,00000694444444444484</text:p>
          </table:table-cell>
          <table:table-cell table:number-columns-repeated="1637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60" office:value-type="float" office:value="18900" calcext:value-type="float">
            <text:p>18900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21875" calcext:value-type="float">
            <text:p>0,00218750000000000000</text:p>
          </table:table-cell>
          <table:table-cell table:formula="of:=[.D317]-[.D316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60" office:value-type="float" office:value="18960" calcext:value-type="float">
            <text:p>18960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219444444444444" calcext:value-type="float">
            <text:p>0,00219444444444444000</text:p>
          </table:table-cell>
          <table:table-cell table:formula="of:=[.D318]-[.D317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60" office:value-type="float" office:value="19020" calcext:value-type="float">
            <text:p>19020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220138888888889" calcext:value-type="float">
            <text:p>0,00220138888888889000</text:p>
          </table:table-cell>
          <table:table-cell table:formula="of:=[.D319]-[.D318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60" office:value-type="float" office:value="19080" calcext:value-type="float">
            <text:p>19080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220833333333333" calcext:value-type="float">
            <text:p>0,00220833333333333000</text:p>
          </table:table-cell>
          <table:table-cell table:formula="of:=[.D320]-[.D319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60" office:value-type="float" office:value="19140" calcext:value-type="float">
            <text:p>19140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221527777777778" calcext:value-type="float">
            <text:p>0,00221527777777778000</text:p>
          </table:table-cell>
          <table:table-cell table:formula="of:=[.D321]-[.D320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60" office:value-type="float" office:value="19200" calcext:value-type="float">
            <text:p>1920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222222222222222" calcext:value-type="float">
            <text:p>0,00222222222222222000</text:p>
          </table:table-cell>
          <table:table-cell table:formula="of:=[.D322]-[.D321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60" office:value-type="float" office:value="19260" calcext:value-type="float">
            <text:p>19260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222916666666667" calcext:value-type="float">
            <text:p>0,00222916666666667000</text:p>
          </table:table-cell>
          <table:table-cell table:formula="of:=[.D323]-[.D322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60" office:value-type="float" office:value="19320" calcext:value-type="float">
            <text:p>19320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223611111111111" calcext:value-type="float">
            <text:p>0,00223611111111111000</text:p>
          </table:table-cell>
          <table:table-cell table:formula="of:=[.D324]-[.D323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60" office:value-type="float" office:value="19380" calcext:value-type="float">
            <text:p>19380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224305555555556" calcext:value-type="float">
            <text:p>0,00224305555555556000</text:p>
          </table:table-cell>
          <table:table-cell table:formula="of:=[.D325]-[.D324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60" office:value-type="float" office:value="19440" calcext:value-type="float">
            <text:p>19440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225" calcext:value-type="float">
            <text:p>0,00225000000000000000</text:p>
          </table:table-cell>
          <table:table-cell table:formula="of:=[.D326]-[.D325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60" office:value-type="float" office:value="19500" calcext:value-type="float">
            <text:p>19500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225694444444444" calcext:value-type="float">
            <text:p>0,00225694444444444000</text:p>
          </table:table-cell>
          <table:table-cell table:formula="of:=[.D327]-[.D326]" office:value-type="float" office:value="0.00000694444444444484" calcext:value-type="float">
            <text:p>0,00000694444444444484</text:p>
          </table:table-cell>
          <table:table-cell table:number-columns-repeated="16379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60" office:value-type="float" office:value="19560" calcext:value-type="float">
            <text:p>19560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226388888888889" calcext:value-type="float">
            <text:p>0,00226388888888889000</text:p>
          </table:table-cell>
          <table:table-cell table:formula="of:=[.D328]-[.D327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60" office:value-type="float" office:value="19620" calcext:value-type="float">
            <text:p>19620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227083333333333" calcext:value-type="float">
            <text:p>0,00227083333333333000</text:p>
          </table:table-cell>
          <table:table-cell table:formula="of:=[.D329]-[.D328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60" office:value-type="float" office:value="19680" calcext:value-type="float">
            <text:p>19680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227777777777778" calcext:value-type="float">
            <text:p>0,00227777777777778000</text:p>
          </table:table-cell>
          <table:table-cell table:formula="of:=[.D330]-[.D329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60" office:value-type="float" office:value="19740" calcext:value-type="float">
            <text:p>19740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228472222222222" calcext:value-type="float">
            <text:p>0,00228472222222222000</text:p>
          </table:table-cell>
          <table:table-cell table:formula="of:=[.D331]-[.D330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60" office:value-type="float" office:value="19800" calcext:value-type="float">
            <text:p>1980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229166666666667" calcext:value-type="float">
            <text:p>0,00229166666666667000</text:p>
          </table:table-cell>
          <table:table-cell table:formula="of:=[.D332]-[.D331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60" office:value-type="float" office:value="19860" calcext:value-type="float">
            <text:p>19860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229861111111111" calcext:value-type="float">
            <text:p>0,00229861111111111000</text:p>
          </table:table-cell>
          <table:table-cell table:formula="of:=[.D333]-[.D332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60" office:value-type="float" office:value="19920" calcext:value-type="float">
            <text:p>19920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230555555555556" calcext:value-type="float">
            <text:p>0,00230555555555556000</text:p>
          </table:table-cell>
          <table:table-cell table:formula="of:=[.D334]-[.D333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60" office:value-type="float" office:value="19980" calcext:value-type="float">
            <text:p>19980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23125" calcext:value-type="float">
            <text:p>0,00231250000000000000</text:p>
          </table:table-cell>
          <table:table-cell table:formula="of:=[.D335]-[.D334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60" office:value-type="float" office:value="20040" calcext:value-type="float">
            <text:p>20040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231944444444444" calcext:value-type="float">
            <text:p>0,00231944444444444000</text:p>
          </table:table-cell>
          <table:table-cell table:formula="of:=[.D336]-[.D335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60" office:value-type="float" office:value="20100" calcext:value-type="float">
            <text:p>20100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232638888888889" calcext:value-type="float">
            <text:p>0,00232638888888889000</text:p>
          </table:table-cell>
          <table:table-cell table:formula="of:=[.D337]-[.D336]" office:value-type="float" office:value="0.00000694444444444484" calcext:value-type="float">
            <text:p>0,00000694444444444484</text:p>
          </table:table-cell>
          <table:table-cell table:number-columns-repeated="16379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60" office:value-type="float" office:value="20160" calcext:value-type="float">
            <text:p>20160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233333333333333" calcext:value-type="float">
            <text:p>0,00233333333333333000</text:p>
          </table:table-cell>
          <table:table-cell table:formula="of:=[.D338]-[.D337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60" office:value-type="float" office:value="20220" calcext:value-type="float">
            <text:p>20220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234027777777778" calcext:value-type="float">
            <text:p>0,00234027777777778000</text:p>
          </table:table-cell>
          <table:table-cell table:formula="of:=[.D339]-[.D338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60" office:value-type="float" office:value="20280" calcext:value-type="float">
            <text:p>20280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234722222222222" calcext:value-type="float">
            <text:p>0,00234722222222222000</text:p>
          </table:table-cell>
          <table:table-cell table:formula="of:=[.D340]-[.D339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60" office:value-type="float" office:value="20340" calcext:value-type="float">
            <text:p>20340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235416666666667" calcext:value-type="float">
            <text:p>0,00235416666666667000</text:p>
          </table:table-cell>
          <table:table-cell table:formula="of:=[.D341]-[.D340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60" office:value-type="float" office:value="20400" calcext:value-type="float">
            <text:p>2040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236111111111111" calcext:value-type="float">
            <text:p>0,00236111111111111000</text:p>
          </table:table-cell>
          <table:table-cell table:formula="of:=[.D342]-[.D341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60" office:value-type="float" office:value="20460" calcext:value-type="float">
            <text:p>20460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236805555555556" calcext:value-type="float">
            <text:p>0,00236805555555556000</text:p>
          </table:table-cell>
          <table:table-cell table:formula="of:=[.D343]-[.D342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60" office:value-type="float" office:value="20520" calcext:value-type="float">
            <text:p>20520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2375" calcext:value-type="float">
            <text:p>0,00237500000000000000</text:p>
          </table:table-cell>
          <table:table-cell table:formula="of:=[.D344]-[.D343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60" office:value-type="float" office:value="20580" calcext:value-type="float">
            <text:p>20580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238194444444444" calcext:value-type="float">
            <text:p>0,00238194444444444000</text:p>
          </table:table-cell>
          <table:table-cell table:formula="of:=[.D345]-[.D344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60" office:value-type="float" office:value="20640" calcext:value-type="float">
            <text:p>20640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238888888888889" calcext:value-type="float">
            <text:p>0,00238888888888889000</text:p>
          </table:table-cell>
          <table:table-cell table:formula="of:=[.D346]-[.D345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60" office:value-type="float" office:value="20700" calcext:value-type="float">
            <text:p>20700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239583333333333" calcext:value-type="float">
            <text:p>0,00239583333333333000</text:p>
          </table:table-cell>
          <table:table-cell table:formula="of:=[.D347]-[.D346]" office:value-type="float" office:value="0.00000694444444444484" calcext:value-type="float">
            <text:p>0,00000694444444444484</text:p>
          </table:table-cell>
          <table:table-cell table:number-columns-repeated="16379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60" office:value-type="float" office:value="20760" calcext:value-type="float">
            <text:p>20760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240277777777778" calcext:value-type="float">
            <text:p>0,00240277777777778000</text:p>
          </table:table-cell>
          <table:table-cell table:formula="of:=[.D348]-[.D347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60" office:value-type="float" office:value="20820" calcext:value-type="float">
            <text:p>20820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240972222222222" calcext:value-type="float">
            <text:p>0,00240972222222222000</text:p>
          </table:table-cell>
          <table:table-cell table:formula="of:=[.D349]-[.D348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60" office:value-type="float" office:value="20880" calcext:value-type="float">
            <text:p>20880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241666666666667" calcext:value-type="float">
            <text:p>0,00241666666666667000</text:p>
          </table:table-cell>
          <table:table-cell table:formula="of:=[.D350]-[.D349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60" office:value-type="float" office:value="20940" calcext:value-type="float">
            <text:p>20940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242361111111111" calcext:value-type="float">
            <text:p>0,00242361111111111000</text:p>
          </table:table-cell>
          <table:table-cell table:formula="of:=[.D351]-[.D350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60" office:value-type="float" office:value="21000" calcext:value-type="float">
            <text:p>2100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243055555555556" calcext:value-type="float">
            <text:p>0,00243055555555556000</text:p>
          </table:table-cell>
          <table:table-cell table:formula="of:=[.D352]-[.D351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60" office:value-type="float" office:value="21060" calcext:value-type="float">
            <text:p>21060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24375" calcext:value-type="float">
            <text:p>0,00243750000000000000</text:p>
          </table:table-cell>
          <table:table-cell table:formula="of:=[.D353]-[.D352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60" office:value-type="float" office:value="21120" calcext:value-type="float">
            <text:p>21120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244444444444444" calcext:value-type="float">
            <text:p>0,00244444444444444000</text:p>
          </table:table-cell>
          <table:table-cell table:formula="of:=[.D354]-[.D353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60" office:value-type="float" office:value="21180" calcext:value-type="float">
            <text:p>21180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245138888888889" calcext:value-type="float">
            <text:p>0,00245138888888889000</text:p>
          </table:table-cell>
          <table:table-cell table:formula="of:=[.D355]-[.D354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60" office:value-type="float" office:value="21240" calcext:value-type="float">
            <text:p>21240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245833333333333" calcext:value-type="float">
            <text:p>0,00245833333333333000</text:p>
          </table:table-cell>
          <table:table-cell table:formula="of:=[.D356]-[.D355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60" office:value-type="float" office:value="21300" calcext:value-type="float">
            <text:p>21300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246527777777778" calcext:value-type="float">
            <text:p>0,00246527777777778000</text:p>
          </table:table-cell>
          <table:table-cell table:formula="of:=[.D357]-[.D356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60" office:value-type="float" office:value="21360" calcext:value-type="float">
            <text:p>21360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247222222222222" calcext:value-type="float">
            <text:p>0,00247222222222222000</text:p>
          </table:table-cell>
          <table:table-cell table:formula="of:=[.D358]-[.D357]" office:value-type="float" office:value="0.00000694444444444484" calcext:value-type="float">
            <text:p>0,00000694444444444484</text:p>
          </table:table-cell>
          <table:table-cell table:number-columns-repeated="16379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60" office:value-type="float" office:value="21420" calcext:value-type="float">
            <text:p>21420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247916666666667" calcext:value-type="float">
            <text:p>0,00247916666666667000</text:p>
          </table:table-cell>
          <table:table-cell table:formula="of:=[.D359]-[.D358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60" office:value-type="float" office:value="21480" calcext:value-type="float">
            <text:p>21480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248611111111111" calcext:value-type="float">
            <text:p>0,00248611111111111000</text:p>
          </table:table-cell>
          <table:table-cell table:formula="of:=[.D360]-[.D359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60" office:value-type="float" office:value="21540" calcext:value-type="float">
            <text:p>21540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249305555555556" calcext:value-type="float">
            <text:p>0,00249305555555556000</text:p>
          </table:table-cell>
          <table:table-cell table:formula="of:=[.D361]-[.D360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60" office:value-type="float" office:value="21600" calcext:value-type="float">
            <text:p>2160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25" calcext:value-type="float">
            <text:p>0,00250000000000000000</text:p>
          </table:table-cell>
          <table:table-cell table:formula="of:=[.D362]-[.D361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60" office:value-type="float" office:value="21660" calcext:value-type="float">
            <text:p>21660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250694444444444" calcext:value-type="float">
            <text:p>0,00250694444444444000</text:p>
          </table:table-cell>
          <table:table-cell table:formula="of:=[.D363]-[.D362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60" office:value-type="float" office:value="21720" calcext:value-type="float">
            <text:p>21720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251388888888889" calcext:value-type="float">
            <text:p>0,00251388888888889000</text:p>
          </table:table-cell>
          <table:table-cell table:formula="of:=[.D364]-[.D363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60" office:value-type="float" office:value="21780" calcext:value-type="float">
            <text:p>21780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252083333333333" calcext:value-type="float">
            <text:p>0,00252083333333333000</text:p>
          </table:table-cell>
          <table:table-cell table:formula="of:=[.D365]-[.D364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60" office:value-type="float" office:value="21840" calcext:value-type="float">
            <text:p>21840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252777777777778" calcext:value-type="float">
            <text:p>0,00252777777777778000</text:p>
          </table:table-cell>
          <table:table-cell table:formula="of:=[.D366]-[.D365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60" office:value-type="float" office:value="21900" calcext:value-type="float">
            <text:p>21900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253472222222222" calcext:value-type="float">
            <text:p>0,00253472222222222000</text:p>
          </table:table-cell>
          <table:table-cell table:formula="of:=[.D367]-[.D366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60" office:value-type="float" office:value="21960" calcext:value-type="float">
            <text:p>21960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254166666666667" calcext:value-type="float">
            <text:p>0,00254166666666667000</text:p>
          </table:table-cell>
          <table:table-cell table:formula="of:=[.D368]-[.D367]" office:value-type="float" office:value="0.00000694444444444484" calcext:value-type="float">
            <text:p>0,00000694444444444484</text:p>
          </table:table-cell>
          <table:table-cell table:number-columns-repeated="16379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60" office:value-type="float" office:value="22020" calcext:value-type="float">
            <text:p>22020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254861111111111" calcext:value-type="float">
            <text:p>0,00254861111111111000</text:p>
          </table:table-cell>
          <table:table-cell table:formula="of:=[.D369]-[.D368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60" office:value-type="float" office:value="22080" calcext:value-type="float">
            <text:p>22080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255555555555556" calcext:value-type="float">
            <text:p>0,00255555555555556000</text:p>
          </table:table-cell>
          <table:table-cell table:formula="of:=[.D370]-[.D369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60" office:value-type="float" office:value="22140" calcext:value-type="float">
            <text:p>22140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25625" calcext:value-type="float">
            <text:p>0,00256250000000000000</text:p>
          </table:table-cell>
          <table:table-cell table:formula="of:=[.D371]-[.D370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60" office:value-type="float" office:value="22200" calcext:value-type="float">
            <text:p>2220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256944444444444" calcext:value-type="float">
            <text:p>0,00256944444444444000</text:p>
          </table:table-cell>
          <table:table-cell table:formula="of:=[.D372]-[.D371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60" office:value-type="float" office:value="22260" calcext:value-type="float">
            <text:p>22260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257638888888889" calcext:value-type="float">
            <text:p>0,00257638888888889000</text:p>
          </table:table-cell>
          <table:table-cell table:formula="of:=[.D373]-[.D372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60" office:value-type="float" office:value="22320" calcext:value-type="float">
            <text:p>22320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258333333333333" calcext:value-type="float">
            <text:p>0,00258333333333333000</text:p>
          </table:table-cell>
          <table:table-cell table:formula="of:=[.D374]-[.D373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60" office:value-type="float" office:value="22380" calcext:value-type="float">
            <text:p>22380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259027777777778" calcext:value-type="float">
            <text:p>0,00259027777777778000</text:p>
          </table:table-cell>
          <table:table-cell table:formula="of:=[.D375]-[.D374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60" office:value-type="float" office:value="22440" calcext:value-type="float">
            <text:p>22440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259722222222222" calcext:value-type="float">
            <text:p>0,00259722222222222000</text:p>
          </table:table-cell>
          <table:table-cell table:formula="of:=[.D376]-[.D375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60" office:value-type="float" office:value="22500" calcext:value-type="float">
            <text:p>22500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260416666666667" calcext:value-type="float">
            <text:p>0,00260416666666667000</text:p>
          </table:table-cell>
          <table:table-cell table:formula="of:=[.D377]-[.D376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60" office:value-type="float" office:value="22560" calcext:value-type="float">
            <text:p>22560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261111111111111" calcext:value-type="float">
            <text:p>0,00261111111111111000</text:p>
          </table:table-cell>
          <table:table-cell table:formula="of:=[.D378]-[.D377]" office:value-type="float" office:value="0.00000694444444444484" calcext:value-type="float">
            <text:p>0,00000694444444444484</text:p>
          </table:table-cell>
          <table:table-cell table:number-columns-repeated="16379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60" office:value-type="float" office:value="22620" calcext:value-type="float">
            <text:p>22620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261805555555556" calcext:value-type="float">
            <text:p>0,00261805555555556000</text:p>
          </table:table-cell>
          <table:table-cell table:formula="of:=[.D379]-[.D378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60" office:value-type="float" office:value="22680" calcext:value-type="float">
            <text:p>22680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2625" calcext:value-type="float">
            <text:p>0,00262500000000000000</text:p>
          </table:table-cell>
          <table:table-cell table:formula="of:=[.D380]-[.D379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60" office:value-type="float" office:value="22740" calcext:value-type="float">
            <text:p>22740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263194444444444" calcext:value-type="float">
            <text:p>0,00263194444444444000</text:p>
          </table:table-cell>
          <table:table-cell table:formula="of:=[.D381]-[.D380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60" office:value-type="float" office:value="22800" calcext:value-type="float">
            <text:p>2280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263888888888889" calcext:value-type="float">
            <text:p>0,00263888888888889000</text:p>
          </table:table-cell>
          <table:table-cell table:formula="of:=[.D382]-[.D381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60" office:value-type="float" office:value="22860" calcext:value-type="float">
            <text:p>22860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264583333333333" calcext:value-type="float">
            <text:p>0,00264583333333333000</text:p>
          </table:table-cell>
          <table:table-cell table:formula="of:=[.D383]-[.D382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60" office:value-type="float" office:value="22920" calcext:value-type="float">
            <text:p>22920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265277777777778" calcext:value-type="float">
            <text:p>0,00265277777777778000</text:p>
          </table:table-cell>
          <table:table-cell table:formula="of:=[.D384]-[.D383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60" office:value-type="float" office:value="22980" calcext:value-type="float">
            <text:p>22980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265972222222222" calcext:value-type="float">
            <text:p>0,00265972222222222000</text:p>
          </table:table-cell>
          <table:table-cell table:formula="of:=[.D385]-[.D384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60" office:value-type="float" office:value="23040" calcext:value-type="float">
            <text:p>23040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266666666666667" calcext:value-type="float">
            <text:p>0,00266666666666667000</text:p>
          </table:table-cell>
          <table:table-cell table:formula="of:=[.D386]-[.D385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60" office:value-type="float" office:value="23100" calcext:value-type="float">
            <text:p>23100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267361111111111" calcext:value-type="float">
            <text:p>0,00267361111111111000</text:p>
          </table:table-cell>
          <table:table-cell table:formula="of:=[.D387]-[.D386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60" office:value-type="float" office:value="23160" calcext:value-type="float">
            <text:p>23160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268055555555556" calcext:value-type="float">
            <text:p>0,00268055555555556000</text:p>
          </table:table-cell>
          <table:table-cell table:formula="of:=[.D388]-[.D387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60" office:value-type="float" office:value="23220" calcext:value-type="float">
            <text:p>23220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26875" calcext:value-type="float">
            <text:p>0,00268750000000000000</text:p>
          </table:table-cell>
          <table:table-cell table:formula="of:=[.D389]-[.D388]" office:value-type="float" office:value="0.00000694444444444484" calcext:value-type="float">
            <text:p>0,00000694444444444484</text:p>
          </table:table-cell>
          <table:table-cell table:number-columns-repeated="16379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60" office:value-type="float" office:value="23280" calcext:value-type="float">
            <text:p>23280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269444444444444" calcext:value-type="float">
            <text:p>0,00269444444444444000</text:p>
          </table:table-cell>
          <table:table-cell table:formula="of:=[.D390]-[.D389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60" office:value-type="float" office:value="23340" calcext:value-type="float">
            <text:p>23340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270138888888889" calcext:value-type="float">
            <text:p>0,00270138888888889000</text:p>
          </table:table-cell>
          <table:table-cell table:formula="of:=[.D391]-[.D390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60" office:value-type="float" office:value="23400" calcext:value-type="float">
            <text:p>2340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270833333333333" calcext:value-type="float">
            <text:p>0,00270833333333333000</text:p>
          </table:table-cell>
          <table:table-cell table:formula="of:=[.D392]-[.D391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60" office:value-type="float" office:value="23460" calcext:value-type="float">
            <text:p>23460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271527777777778" calcext:value-type="float">
            <text:p>0,00271527777777778000</text:p>
          </table:table-cell>
          <table:table-cell table:formula="of:=[.D393]-[.D392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60" office:value-type="float" office:value="23520" calcext:value-type="float">
            <text:p>23520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272222222222222" calcext:value-type="float">
            <text:p>0,00272222222222222000</text:p>
          </table:table-cell>
          <table:table-cell table:formula="of:=[.D394]-[.D393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60" office:value-type="float" office:value="23580" calcext:value-type="float">
            <text:p>23580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272916666666667" calcext:value-type="float">
            <text:p>0,00272916666666667000</text:p>
          </table:table-cell>
          <table:table-cell table:formula="of:=[.D395]-[.D394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60" office:value-type="float" office:value="23640" calcext:value-type="float">
            <text:p>23640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273611111111111" calcext:value-type="float">
            <text:p>0,00273611111111111000</text:p>
          </table:table-cell>
          <table:table-cell table:formula="of:=[.D396]-[.D395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60" office:value-type="float" office:value="23700" calcext:value-type="float">
            <text:p>23700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274305555555556" calcext:value-type="float">
            <text:p>0,00274305555555556000</text:p>
          </table:table-cell>
          <table:table-cell table:formula="of:=[.D397]-[.D396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60" office:value-type="float" office:value="23760" calcext:value-type="float">
            <text:p>23760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275" calcext:value-type="float">
            <text:p>0,00275000000000000000</text:p>
          </table:table-cell>
          <table:table-cell table:formula="of:=[.D398]-[.D397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60" office:value-type="float" office:value="23820" calcext:value-type="float">
            <text:p>23820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275694444444444" calcext:value-type="float">
            <text:p>0,00275694444444444000</text:p>
          </table:table-cell>
          <table:table-cell table:formula="of:=[.D399]-[.D398]" office:value-type="float" office:value="0.00000694444444444484" calcext:value-type="float">
            <text:p>0,00000694444444444484</text:p>
          </table:table-cell>
          <table:table-cell table:number-columns-repeated="16379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60" office:value-type="float" office:value="23880" calcext:value-type="float">
            <text:p>23880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276388888888889" calcext:value-type="float">
            <text:p>0,00276388888888889000</text:p>
          </table:table-cell>
          <table:table-cell table:formula="of:=[.D400]-[.D399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60" office:value-type="float" office:value="23940" calcext:value-type="float">
            <text:p>23940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277083333333333" calcext:value-type="float">
            <text:p>0,00277083333333333000</text:p>
          </table:table-cell>
          <table:table-cell table:formula="of:=[.D401]-[.D400]" office:value-type="float" office:value="0.0000069444444444444" calcext:value-type="float">
            <text:p>0,00000694444444444440</text:p>
          </table:table-cell>
          <table:table-cell table:number-columns-repeated="16379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60" office:value-type="float" office:value="24000" calcext:value-type="float">
            <text:p>240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277777777777778" calcext:value-type="float">
            <text:p>0,00277777777777778000</text:p>
          </table:table-cell>
          <table:table-cell table:formula="of:=#REF!-[.D401]" office:value-type="string" office:string-value="" calcext:value-type="error">
            <text:p>#REF!</text:p>
          </table:table-cell>
          <table:table-cell table:number-columns-repeated="16379"/>
        </table:table-row>
        <table:table-row table:style-name="ro1" table:number-rows-repeated="104817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8:21:58.212754762</meta:creation-date>
    <dc:date>2026-05-17T18:22:08.219091090</dc:date>
    <meta:editing-duration>PT11S</meta:editing-duration>
    <meta:editing-cycles>1</meta:editing-cycles>
    <meta:document-statistic meta:table-count="1" meta:cell-count="2005" meta:object-count="0"/>
    <meta:generator>LibreOffice/24.2.7.2$Linux_X86_64 LibreOffice_project/420$Build-2</meta:generator>
  </office:meta>
</office:document-meta>
</file>