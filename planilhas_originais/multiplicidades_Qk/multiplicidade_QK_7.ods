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7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0810185185185185" calcext:value-type="float">
            <text:p>0,00000081018518518519</text:p>
          </table:table-cell>
          <table:table-cell table:formula="of:=[.D3]-[.D2]" office:value-type="float" office:value="0.000000810185185185185" calcext:value-type="float">
            <text:p>0,000000810185185185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7" office:value-type="float" office:value="14" calcext:value-type="float">
            <text:p>1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162037037037037" calcext:value-type="float">
            <text:p>0,00000162037037037037</text:p>
          </table:table-cell>
          <table:table-cell table:formula="of:=[.D4]-[.D3]" office:value-type="float" office:value="0.000000810185185185185" calcext:value-type="float">
            <text:p>0,000000810185185185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7" office:value-type="float" office:value="21" calcext:value-type="float">
            <text:p>21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243055555555556" calcext:value-type="float">
            <text:p>0,00000243055555555556</text:p>
          </table:table-cell>
          <table:table-cell table:formula="of:=[.D5]-[.D4]" office:value-type="float" office:value="0.000000810185185185185" calcext:value-type="float">
            <text:p>0,000000810185185185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7" office:value-type="float" office:value="28" calcext:value-type="float">
            <text:p>2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0324074074074074" calcext:value-type="float">
            <text:p>0,00000324074074074074</text:p>
          </table:table-cell>
          <table:table-cell table:formula="of:=[.D6]-[.D5]" office:value-type="float" office:value="0.000000810185185185185" calcext:value-type="float">
            <text:p>0,000000810185185185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7" office:value-type="float" office:value="35" calcext:value-type="float">
            <text:p>3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0405092592592593" calcext:value-type="float">
            <text:p>0,00000405092592592593</text:p>
          </table:table-cell>
          <table:table-cell table:formula="of:=[.D7]-[.D6]" office:value-type="float" office:value="0.000000810185185185185" calcext:value-type="float">
            <text:p>0,000000810185185185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7" office:value-type="float" office:value="42" calcext:value-type="float">
            <text:p>4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0486111111111111" calcext:value-type="float">
            <text:p>0,00000486111111111111</text:p>
          </table:table-cell>
          <table:table-cell table:formula="of:=[.D8]-[.D7]" office:value-type="float" office:value="0.000000810185185185185" calcext:value-type="float">
            <text:p>0,000000810185185185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7" office:value-type="float" office:value="49" calcext:value-type="float">
            <text:p>49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056712962962963" calcext:value-type="float">
            <text:p>0,00000567129629629630</text:p>
          </table:table-cell>
          <table:table-cell table:formula="of:=[.D9]-[.D8]" office:value-type="float" office:value="0.000000810185185185185" calcext:value-type="float">
            <text:p>0,000000810185185185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7" office:value-type="float" office:value="56" calcext:value-type="float">
            <text:p>5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0648148148148148" calcext:value-type="float">
            <text:p>0,00000648148148148148</text:p>
          </table:table-cell>
          <table:table-cell table:formula="of:=[.D10]-[.D9]" office:value-type="float" office:value="0.000000810185185185185" calcext:value-type="float">
            <text:p>0,000000810185185185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7" office:value-type="float" office:value="63" calcext:value-type="float">
            <text:p>63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0729166666666667" calcext:value-type="float">
            <text:p>0,00000729166666666667</text:p>
          </table:table-cell>
          <table:table-cell table:formula="of:=[.D11]-[.D10]" office:value-type="float" office:value="0.000000810185185185185" calcext:value-type="float">
            <text:p>0,000000810185185185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7" office:value-type="float" office:value="70" calcext:value-type="float">
            <text:p>7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0810185185185185" calcext:value-type="float">
            <text:p>0,00000810185185185185</text:p>
          </table:table-cell>
          <table:table-cell table:formula="of:=[.D12]-[.D11]" office:value-type="float" office:value="0.000000810185185185185" calcext:value-type="float">
            <text:p>0,000000810185185185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7" office:value-type="float" office:value="77" calcext:value-type="float">
            <text:p>77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0891203703703704" calcext:value-type="float">
            <text:p>0,00000891203703703704</text:p>
          </table:table-cell>
          <table:table-cell table:formula="of:=[.D13]-[.D12]" office:value-type="float" office:value="0.000000810185185185185" calcext:value-type="float">
            <text:p>0,000000810185185185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7" office:value-type="float" office:value="84" calcext:value-type="float">
            <text:p>8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0972222222222222" calcext:value-type="float">
            <text:p>0,00000972222222222222</text:p>
          </table:table-cell>
          <table:table-cell table:formula="of:=[.D14]-[.D13]" office:value-type="float" office:value="0.000000810185185185185" calcext:value-type="float">
            <text:p>0,000000810185185185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7" office:value-type="float" office:value="91" calcext:value-type="float">
            <text:p>91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105324074074074" calcext:value-type="float">
            <text:p>0,00001053240740740740</text:p>
          </table:table-cell>
          <table:table-cell table:formula="of:=[.D15]-[.D14]" office:value-type="float" office:value="0.000000810185185185185" calcext:value-type="float">
            <text:p>0,000000810185185185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7" office:value-type="float" office:value="98" calcext:value-type="float">
            <text:p>9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113425925925926" calcext:value-type="float">
            <text:p>0,00001134259259259260</text:p>
          </table:table-cell>
          <table:table-cell table:formula="of:=[.D16]-[.D15]" office:value-type="float" office:value="0.000000810185185185184" calcext:value-type="float">
            <text:p>0,000000810185185185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7" office:value-type="float" office:value="105" calcext:value-type="float">
            <text:p>10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121527777777778" calcext:value-type="float">
            <text:p>0,00001215277777777780</text:p>
          </table:table-cell>
          <table:table-cell table:formula="of:=[.D17]-[.D16]" office:value-type="float" office:value="0.000000810185185185185" calcext:value-type="float">
            <text:p>0,000000810185185185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7" office:value-type="float" office:value="112" calcext:value-type="float">
            <text:p>11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12962962962963" calcext:value-type="float">
            <text:p>0,00001296296296296300</text:p>
          </table:table-cell>
          <table:table-cell table:formula="of:=[.D18]-[.D17]" office:value-type="float" office:value="0.000000810185185185185" calcext:value-type="float">
            <text:p>0,000000810185185185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7" office:value-type="float" office:value="119" calcext:value-type="float">
            <text:p>119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137731481481481" calcext:value-type="float">
            <text:p>0,00001377314814814820</text:p>
          </table:table-cell>
          <table:table-cell table:formula="of:=[.D19]-[.D18]" office:value-type="float" office:value="0.000000810185185185185" calcext:value-type="float">
            <text:p>0,000000810185185185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7" office:value-type="float" office:value="126" calcext:value-type="float">
            <text:p>12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145833333333333" calcext:value-type="float">
            <text:p>0,00001458333333333330</text:p>
          </table:table-cell>
          <table:table-cell table:formula="of:=[.D20]-[.D19]" office:value-type="float" office:value="0.000000810185185185184" calcext:value-type="float">
            <text:p>0,000000810185185185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7" office:value-type="float" office:value="133" calcext:value-type="float">
            <text:p>133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153935185185185" calcext:value-type="float">
            <text:p>0,00001539351851851850</text:p>
          </table:table-cell>
          <table:table-cell table:formula="of:=[.D21]-[.D20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7" office:value-type="float" office:value="140" calcext:value-type="float">
            <text:p>1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162037037037037" calcext:value-type="float">
            <text:p>0,00001620370370370370</text:p>
          </table:table-cell>
          <table:table-cell table:formula="of:=[.D22]-[.D21]" office:value-type="float" office:value="0.000000810185185185184" calcext:value-type="float">
            <text:p>0,000000810185185185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7" office:value-type="float" office:value="147" calcext:value-type="float">
            <text:p>147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170138888888889" calcext:value-type="float">
            <text:p>0,00001701388888888890</text:p>
          </table:table-cell>
          <table:table-cell table:formula="of:=[.D23]-[.D22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7" office:value-type="float" office:value="154" calcext:value-type="float">
            <text:p>15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178240740740741" calcext:value-type="float">
            <text:p>0,00001782407407407410</text:p>
          </table:table-cell>
          <table:table-cell table:formula="of:=[.D24]-[.D23]" office:value-type="float" office:value="0.000000810185185185184" calcext:value-type="float">
            <text:p>0,000000810185185185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7" office:value-type="float" office:value="161" calcext:value-type="float">
            <text:p>161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186342592592593" calcext:value-type="float">
            <text:p>0,00001863425925925930</text:p>
          </table:table-cell>
          <table:table-cell table:formula="of:=[.D25]-[.D24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7" office:value-type="float" office:value="168" calcext:value-type="float">
            <text:p>16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194444444444444" calcext:value-type="float">
            <text:p>0,00001944444444444450</text:p>
          </table:table-cell>
          <table:table-cell table:formula="of:=[.D26]-[.D25]" office:value-type="float" office:value="0.000000810185185185184" calcext:value-type="float">
            <text:p>0,000000810185185185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7" office:value-type="float" office:value="175" calcext:value-type="float">
            <text:p>1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202546296296296" calcext:value-type="float">
            <text:p>0,00002025462962962960</text:p>
          </table:table-cell>
          <table:table-cell table:formula="of:=[.D27]-[.D26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7" office:value-type="float" office:value="182" calcext:value-type="float">
            <text:p>18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210648148148148" calcext:value-type="float">
            <text:p>0,00002106481481481480</text:p>
          </table:table-cell>
          <table:table-cell table:formula="of:=[.D28]-[.D27]" office:value-type="float" office:value="0.000000810185185185184" calcext:value-type="float">
            <text:p>0,000000810185185185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7" office:value-type="float" office:value="189" calcext:value-type="float">
            <text:p>189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21875" calcext:value-type="float">
            <text:p>0,00002187500000000000</text:p>
          </table:table-cell>
          <table:table-cell table:formula="of:=[.D29]-[.D28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7" office:value-type="float" office:value="196" calcext:value-type="float">
            <text:p>19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226851851851852" calcext:value-type="float">
            <text:p>0,00002268518518518520</text:p>
          </table:table-cell>
          <table:table-cell table:formula="of:=[.D30]-[.D29]" office:value-type="float" office:value="0.000000810185185185184" calcext:value-type="float">
            <text:p>0,000000810185185185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7" office:value-type="float" office:value="203" calcext:value-type="float">
            <text:p>203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234953703703704" calcext:value-type="float">
            <text:p>0,00002349537037037040</text:p>
          </table:table-cell>
          <table:table-cell table:formula="of:=[.D31]-[.D30]" office:value-type="float" office:value="0.000000810185185185184" calcext:value-type="float">
            <text:p>0,000000810185185185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7" office:value-type="float" office:value="210" calcext:value-type="float">
            <text:p>21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243055555555556" calcext:value-type="float">
            <text:p>0,00002430555555555560</text:p>
          </table:table-cell>
          <table:table-cell table:formula="of:=[.D32]-[.D31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7" office:value-type="float" office:value="217" calcext:value-type="float">
            <text:p>217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251157407407407" calcext:value-type="float">
            <text:p>0,00002511574074074070</text:p>
          </table:table-cell>
          <table:table-cell table:formula="of:=[.D33]-[.D32]" office:value-type="float" office:value="0.000000810185185185184" calcext:value-type="float">
            <text:p>0,000000810185185185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7" office:value-type="float" office:value="224" calcext:value-type="float">
            <text:p>22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259259259259259" calcext:value-type="float">
            <text:p>0,00002592592592592590</text:p>
          </table:table-cell>
          <table:table-cell table:formula="of:=[.D34]-[.D33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7" office:value-type="float" office:value="231" calcext:value-type="float">
            <text:p>231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267361111111111" calcext:value-type="float">
            <text:p>0,00002673611111111110</text:p>
          </table:table-cell>
          <table:table-cell table:formula="of:=[.D35]-[.D34]" office:value-type="float" office:value="0.000000810185185185184" calcext:value-type="float">
            <text:p>0,000000810185185185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7" office:value-type="float" office:value="238" calcext:value-type="float">
            <text:p>23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275462962962963" calcext:value-type="float">
            <text:p>0,00002754629629629630</text:p>
          </table:table-cell>
          <table:table-cell table:formula="of:=[.D36]-[.D35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7" office:value-type="float" office:value="245" calcext:value-type="float">
            <text:p>24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283564814814815" calcext:value-type="float">
            <text:p>0,00002835648148148150</text:p>
          </table:table-cell>
          <table:table-cell table:formula="of:=[.D37]-[.D36]" office:value-type="float" office:value="0.000000810185185185184" calcext:value-type="float">
            <text:p>0,000000810185185185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7" office:value-type="float" office:value="252" calcext:value-type="float">
            <text:p>25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0291666666666667" calcext:value-type="float">
            <text:p>0,00002916666666666670</text:p>
          </table:table-cell>
          <table:table-cell table:formula="of:=[.D38]-[.D37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7" office:value-type="float" office:value="259" calcext:value-type="float">
            <text:p>259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0299768518518519" calcext:value-type="float">
            <text:p>0,00002997685185185190</text:p>
          </table:table-cell>
          <table:table-cell table:formula="of:=[.D39]-[.D3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7" office:value-type="float" office:value="266" calcext:value-type="float">
            <text:p>26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030787037037037" calcext:value-type="float">
            <text:p>0,00003078703703703700</text:p>
          </table:table-cell>
          <table:table-cell table:formula="of:=[.D40]-[.D39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7" office:value-type="float" office:value="273" calcext:value-type="float">
            <text:p>273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0315972222222222" calcext:value-type="float">
            <text:p>0,00003159722222222220</text:p>
          </table:table-cell>
          <table:table-cell table:formula="of:=[.D41]-[.D40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7" office:value-type="float" office:value="280" calcext:value-type="float">
            <text:p>2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0324074074074074" calcext:value-type="float">
            <text:p>0,00003240740740740740</text:p>
          </table:table-cell>
          <table:table-cell table:formula="of:=[.D42]-[.D41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7" office:value-type="float" office:value="287" calcext:value-type="float">
            <text:p>287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0332175925925926" calcext:value-type="float">
            <text:p>0,00003321759259259260</text:p>
          </table:table-cell>
          <table:table-cell table:formula="of:=[.D43]-[.D4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7" office:value-type="float" office:value="294" calcext:value-type="float">
            <text:p>29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0340277777777778" calcext:value-type="float">
            <text:p>0,00003402777777777780</text:p>
          </table:table-cell>
          <table:table-cell table:formula="of:=[.D44]-[.D43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7" office:value-type="float" office:value="301" calcext:value-type="float">
            <text:p>301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034837962962963" calcext:value-type="float">
            <text:p>0,00003483796296296300</text:p>
          </table:table-cell>
          <table:table-cell table:formula="of:=[.D45]-[.D44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7" office:value-type="float" office:value="308" calcext:value-type="float">
            <text:p>30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0356481481481482" calcext:value-type="float">
            <text:p>0,00003564814814814820</text:p>
          </table:table-cell>
          <table:table-cell table:formula="of:=[.D46]-[.D45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7" office:value-type="float" office:value="315" calcext:value-type="float">
            <text:p>31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0364583333333333" calcext:value-type="float">
            <text:p>0,00003645833333333330</text:p>
          </table:table-cell>
          <table:table-cell table:formula="of:=[.D47]-[.D4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7" office:value-type="float" office:value="322" calcext:value-type="float">
            <text:p>32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0372685185185185" calcext:value-type="float">
            <text:p>0,00003726851851851850</text:p>
          </table:table-cell>
          <table:table-cell table:formula="of:=[.D48]-[.D47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7" office:value-type="float" office:value="329" calcext:value-type="float">
            <text:p>329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0380787037037037" calcext:value-type="float">
            <text:p>0,00003807870370370370</text:p>
          </table:table-cell>
          <table:table-cell table:formula="of:=[.D49]-[.D48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7" office:value-type="float" office:value="336" calcext:value-type="float">
            <text:p>33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0388888888888889" calcext:value-type="float">
            <text:p>0,00003888888888888890</text:p>
          </table:table-cell>
          <table:table-cell table:formula="of:=[.D50]-[.D4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7" office:value-type="float" office:value="343" calcext:value-type="float">
            <text:p>343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0396990740740741" calcext:value-type="float">
            <text:p>0,00003969907407407410</text:p>
          </table:table-cell>
          <table:table-cell table:formula="of:=[.D51]-[.D50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7" office:value-type="float" office:value="350" calcext:value-type="float">
            <text:p>3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0405092592592593" calcext:value-type="float">
            <text:p>0,00004050925925925930</text:p>
          </table:table-cell>
          <table:table-cell table:formula="of:=[.D52]-[.D51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7" office:value-type="float" office:value="357" calcext:value-type="float">
            <text:p>357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0413194444444444" calcext:value-type="float">
            <text:p>0,00004131944444444450</text:p>
          </table:table-cell>
          <table:table-cell table:formula="of:=[.D53]-[.D52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7" office:value-type="float" office:value="364" calcext:value-type="float">
            <text:p>36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0421296296296296" calcext:value-type="float">
            <text:p>0,00004212962962962960</text:p>
          </table:table-cell>
          <table:table-cell table:formula="of:=[.D54]-[.D5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7" office:value-type="float" office:value="371" calcext:value-type="float">
            <text:p>371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0429398148148148" calcext:value-type="float">
            <text:p>0,00004293981481481480</text:p>
          </table:table-cell>
          <table:table-cell table:formula="of:=[.D55]-[.D54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7" office:value-type="float" office:value="378" calcext:value-type="float">
            <text:p>37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04375" calcext:value-type="float">
            <text:p>0,00004375000000000000</text:p>
          </table:table-cell>
          <table:table-cell table:formula="of:=[.D56]-[.D55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7" office:value-type="float" office:value="385" calcext:value-type="float">
            <text:p>38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0445601851851852" calcext:value-type="float">
            <text:p>0,00004456018518518520</text:p>
          </table:table-cell>
          <table:table-cell table:formula="of:=[.D57]-[.D56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7" office:value-type="float" office:value="392" calcext:value-type="float">
            <text:p>39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0453703703703704" calcext:value-type="float">
            <text:p>0,00004537037037037040</text:p>
          </table:table-cell>
          <table:table-cell table:formula="of:=[.D58]-[.D5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7" office:value-type="float" office:value="399" calcext:value-type="float">
            <text:p>399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0461805555555556" calcext:value-type="float">
            <text:p>0,00004618055555555560</text:p>
          </table:table-cell>
          <table:table-cell table:formula="of:=[.D59]-[.D58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7" office:value-type="float" office:value="406" calcext:value-type="float">
            <text:p>40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0469907407407407" calcext:value-type="float">
            <text:p>0,00004699074074074070</text:p>
          </table:table-cell>
          <table:table-cell table:formula="of:=[.D60]-[.D59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7" office:value-type="float" office:value="413" calcext:value-type="float">
            <text:p>413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0478009259259259" calcext:value-type="float">
            <text:p>0,00004780092592592590</text:p>
          </table:table-cell>
          <table:table-cell table:formula="of:=[.D61]-[.D6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7" office:value-type="float" office:value="420" calcext:value-type="float">
            <text:p>4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0486111111111111" calcext:value-type="float">
            <text:p>0,00004861111111111110</text:p>
          </table:table-cell>
          <table:table-cell table:formula="of:=[.D62]-[.D61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7" office:value-type="float" office:value="427" calcext:value-type="float">
            <text:p>427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0494212962962963" calcext:value-type="float">
            <text:p>0,00004942129629629630</text:p>
          </table:table-cell>
          <table:table-cell table:formula="of:=[.D63]-[.D62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7" office:value-type="float" office:value="434" calcext:value-type="float">
            <text:p>43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0502314814814815" calcext:value-type="float">
            <text:p>0,00005023148148148150</text:p>
          </table:table-cell>
          <table:table-cell table:formula="of:=[.D64]-[.D63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7" office:value-type="float" office:value="441" calcext:value-type="float">
            <text:p>441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0510416666666667" calcext:value-type="float">
            <text:p>0,00005104166666666670</text:p>
          </table:table-cell>
          <table:table-cell table:formula="of:=[.D65]-[.D6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7" office:value-type="float" office:value="448" calcext:value-type="float">
            <text:p>44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0518518518518519" calcext:value-type="float">
            <text:p>0,00005185185185185190</text:p>
          </table:table-cell>
          <table:table-cell table:formula="of:=[.D66]-[.D65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7" office:value-type="float" office:value="455" calcext:value-type="float">
            <text:p>45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052662037037037" calcext:value-type="float">
            <text:p>0,00005266203703703700</text:p>
          </table:table-cell>
          <table:table-cell table:formula="of:=[.D67]-[.D66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7" office:value-type="float" office:value="462" calcext:value-type="float">
            <text:p>46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0534722222222222" calcext:value-type="float">
            <text:p>0,00005347222222222220</text:p>
          </table:table-cell>
          <table:table-cell table:formula="of:=[.D68]-[.D6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7" office:value-type="float" office:value="469" calcext:value-type="float">
            <text:p>469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0542824074074074" calcext:value-type="float">
            <text:p>0,00005428240740740740</text:p>
          </table:table-cell>
          <table:table-cell table:formula="of:=[.D69]-[.D68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7" office:value-type="float" office:value="476" calcext:value-type="float">
            <text:p>47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0550925925925926" calcext:value-type="float">
            <text:p>0,00005509259259259260</text:p>
          </table:table-cell>
          <table:table-cell table:formula="of:=[.D70]-[.D69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7" office:value-type="float" office:value="483" calcext:value-type="float">
            <text:p>483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0559027777777778" calcext:value-type="float">
            <text:p>0,00005590277777777780</text:p>
          </table:table-cell>
          <table:table-cell table:formula="of:=[.D71]-[.D70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7" office:value-type="float" office:value="490" calcext:value-type="float">
            <text:p>49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056712962962963" calcext:value-type="float">
            <text:p>0,00005671296296296300</text:p>
          </table:table-cell>
          <table:table-cell table:formula="of:=[.D72]-[.D7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7" office:value-type="float" office:value="497" calcext:value-type="float">
            <text:p>497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0575231481481481" calcext:value-type="float">
            <text:p>0,00005752314814814820</text:p>
          </table:table-cell>
          <table:table-cell table:formula="of:=[.D73]-[.D72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7" office:value-type="float" office:value="504" calcext:value-type="float">
            <text:p>50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0583333333333333" calcext:value-type="float">
            <text:p>0,00005833333333333330</text:p>
          </table:table-cell>
          <table:table-cell table:formula="of:=[.D74]-[.D73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7" office:value-type="float" office:value="511" calcext:value-type="float">
            <text:p>511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0591435185185185" calcext:value-type="float">
            <text:p>0,00005914351851851850</text:p>
          </table:table-cell>
          <table:table-cell table:formula="of:=[.D75]-[.D74]" office:value-type="float" office:value="0.000000810185185185187" calcext:value-type="float">
            <text:p>0,000000810185185185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7" office:value-type="float" office:value="518" calcext:value-type="float">
            <text:p>51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0599537037037037" calcext:value-type="float">
            <text:p>0,00005995370370370370</text:p>
          </table:table-cell>
          <table:table-cell table:formula="of:=[.D76]-[.D7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7" office:value-type="float" office:value="525" calcext:value-type="float">
            <text:p>5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0607638888888889" calcext:value-type="float">
            <text:p>0,00006076388888888890</text:p>
          </table:table-cell>
          <table:table-cell table:formula="of:=[.D77]-[.D7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7" office:value-type="float" office:value="532" calcext:value-type="float">
            <text:p>53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0615740740740741" calcext:value-type="float">
            <text:p>0,00006157407407407410</text:p>
          </table:table-cell>
          <table:table-cell table:formula="of:=[.D78]-[.D77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7" office:value-type="float" office:value="539" calcext:value-type="float">
            <text:p>539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0623842592592593" calcext:value-type="float">
            <text:p>0,00006238425925925930</text:p>
          </table:table-cell>
          <table:table-cell table:formula="of:=[.D79]-[.D7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7" office:value-type="float" office:value="546" calcext:value-type="float">
            <text:p>54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0631944444444444" calcext:value-type="float">
            <text:p>0,00006319444444444440</text:p>
          </table:table-cell>
          <table:table-cell table:formula="of:=[.D80]-[.D79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7" office:value-type="float" office:value="553" calcext:value-type="float">
            <text:p>553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0640046296296296" calcext:value-type="float">
            <text:p>0,00006400462962962960</text:p>
          </table:table-cell>
          <table:table-cell table:formula="of:=[.D81]-[.D8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7" office:value-type="float" office:value="560" calcext:value-type="float">
            <text:p>5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0648148148148148" calcext:value-type="float">
            <text:p>0,00006481481481481480</text:p>
          </table:table-cell>
          <table:table-cell table:formula="of:=[.D82]-[.D8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7" office:value-type="float" office:value="567" calcext:value-type="float">
            <text:p>567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065625" calcext:value-type="float">
            <text:p>0,00006562500000000000</text:p>
          </table:table-cell>
          <table:table-cell table:formula="of:=[.D83]-[.D82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7" office:value-type="float" office:value="574" calcext:value-type="float">
            <text:p>57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0664351851851852" calcext:value-type="float">
            <text:p>0,00006643518518518520</text:p>
          </table:table-cell>
          <table:table-cell table:formula="of:=[.D84]-[.D8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7" office:value-type="float" office:value="581" calcext:value-type="float">
            <text:p>581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0672453703703704" calcext:value-type="float">
            <text:p>0,00006724537037037040</text:p>
          </table:table-cell>
          <table:table-cell table:formula="of:=[.D85]-[.D8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7" office:value-type="float" office:value="588" calcext:value-type="float">
            <text:p>58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0680555555555556" calcext:value-type="float">
            <text:p>0,00006805555555555560</text:p>
          </table:table-cell>
          <table:table-cell table:formula="of:=[.D86]-[.D85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7" office:value-type="float" office:value="595" calcext:value-type="float">
            <text:p>59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0688657407407407" calcext:value-type="float">
            <text:p>0,00006886574074074070</text:p>
          </table:table-cell>
          <table:table-cell table:formula="of:=[.D87]-[.D8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7" office:value-type="float" office:value="602" calcext:value-type="float">
            <text:p>60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0696759259259259" calcext:value-type="float">
            <text:p>0,00006967592592592590</text:p>
          </table:table-cell>
          <table:table-cell table:formula="of:=[.D88]-[.D8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7" office:value-type="float" office:value="609" calcext:value-type="float">
            <text:p>609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0704861111111111" calcext:value-type="float">
            <text:p>0,00007048611111111110</text:p>
          </table:table-cell>
          <table:table-cell table:formula="of:=[.D89]-[.D88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7" office:value-type="float" office:value="616" calcext:value-type="float">
            <text:p>61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0712962962962963" calcext:value-type="float">
            <text:p>0,00007129629629629630</text:p>
          </table:table-cell>
          <table:table-cell table:formula="of:=[.D90]-[.D8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7" office:value-type="float" office:value="623" calcext:value-type="float">
            <text:p>623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0721064814814815" calcext:value-type="float">
            <text:p>0,00007210648148148150</text:p>
          </table:table-cell>
          <table:table-cell table:formula="of:=[.D91]-[.D90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7" office:value-type="float" office:value="630" calcext:value-type="float">
            <text:p>63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0729166666666667" calcext:value-type="float">
            <text:p>0,00007291666666666670</text:p>
          </table:table-cell>
          <table:table-cell table:formula="of:=[.D92]-[.D9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7" office:value-type="float" office:value="637" calcext:value-type="float">
            <text:p>637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0737268518518519" calcext:value-type="float">
            <text:p>0,00007372685185185190</text:p>
          </table:table-cell>
          <table:table-cell table:formula="of:=[.D93]-[.D9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7" office:value-type="float" office:value="644" calcext:value-type="float">
            <text:p>64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074537037037037" calcext:value-type="float">
            <text:p>0,00007453703703703700</text:p>
          </table:table-cell>
          <table:table-cell table:formula="of:=[.D94]-[.D93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7" office:value-type="float" office:value="651" calcext:value-type="float">
            <text:p>651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0753472222222222" calcext:value-type="float">
            <text:p>0,00007534722222222220</text:p>
          </table:table-cell>
          <table:table-cell table:formula="of:=[.D95]-[.D9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7" office:value-type="float" office:value="658" calcext:value-type="float">
            <text:p>65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0761574074074074" calcext:value-type="float">
            <text:p>0,00007615740740740740</text:p>
          </table:table-cell>
          <table:table-cell table:formula="of:=[.D96]-[.D9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7" office:value-type="float" office:value="665" calcext:value-type="float">
            <text:p>66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0769675925925926" calcext:value-type="float">
            <text:p>0,00007696759259259260</text:p>
          </table:table-cell>
          <table:table-cell table:formula="of:=[.D97]-[.D96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7" office:value-type="float" office:value="672" calcext:value-type="float">
            <text:p>67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0777777777777778" calcext:value-type="float">
            <text:p>0,00007777777777777780</text:p>
          </table:table-cell>
          <table:table-cell table:formula="of:=[.D98]-[.D9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7" office:value-type="float" office:value="679" calcext:value-type="float">
            <text:p>679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078587962962963" calcext:value-type="float">
            <text:p>0,00007858796296296300</text:p>
          </table:table-cell>
          <table:table-cell table:formula="of:=[.D99]-[.D9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7" office:value-type="float" office:value="686" calcext:value-type="float">
            <text:p>68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0793981481481481" calcext:value-type="float">
            <text:p>0,00007939814814814810</text:p>
          </table:table-cell>
          <table:table-cell table:formula="of:=[.D100]-[.D99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7" office:value-type="float" office:value="693" calcext:value-type="float">
            <text:p>693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0802083333333333" calcext:value-type="float">
            <text:p>0,00008020833333333330</text:p>
          </table:table-cell>
          <table:table-cell table:formula="of:=[.D101]-[.D10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7" office:value-type="float" office:value="700" calcext:value-type="float">
            <text:p>7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0810185185185185" calcext:value-type="float">
            <text:p>0,00008101851851851850</text:p>
          </table:table-cell>
          <table:table-cell table:formula="of:=[.D102]-[.D101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7" office:value-type="float" office:value="707" calcext:value-type="float">
            <text:p>707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0818287037037037" calcext:value-type="float">
            <text:p>0,00008182870370370370</text:p>
          </table:table-cell>
          <table:table-cell table:formula="of:=[.D103]-[.D10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7" office:value-type="float" office:value="714" calcext:value-type="float">
            <text:p>71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0826388888888889" calcext:value-type="float">
            <text:p>0,00008263888888888890</text:p>
          </table:table-cell>
          <table:table-cell table:formula="of:=[.D104]-[.D10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7" office:value-type="float" office:value="721" calcext:value-type="float">
            <text:p>721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0834490740740741" calcext:value-type="float">
            <text:p>0,00008344907407407410</text:p>
          </table:table-cell>
          <table:table-cell table:formula="of:=[.D105]-[.D104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7" office:value-type="float" office:value="728" calcext:value-type="float">
            <text:p>72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0842592592592593" calcext:value-type="float">
            <text:p>0,00008425925925925930</text:p>
          </table:table-cell>
          <table:table-cell table:formula="of:=[.D106]-[.D10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7" office:value-type="float" office:value="735" calcext:value-type="float">
            <text:p>73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0850694444444444" calcext:value-type="float">
            <text:p>0,00008506944444444440</text:p>
          </table:table-cell>
          <table:table-cell table:formula="of:=[.D107]-[.D10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7" office:value-type="float" office:value="742" calcext:value-type="float">
            <text:p>74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0858796296296296" calcext:value-type="float">
            <text:p>0,00008587962962962960</text:p>
          </table:table-cell>
          <table:table-cell table:formula="of:=[.D108]-[.D107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7" office:value-type="float" office:value="749" calcext:value-type="float">
            <text:p>749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0866898148148148" calcext:value-type="float">
            <text:p>0,00008668981481481480</text:p>
          </table:table-cell>
          <table:table-cell table:formula="of:=[.D109]-[.D10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7" office:value-type="float" office:value="756" calcext:value-type="float">
            <text:p>75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0875" calcext:value-type="float">
            <text:p>0,00008750000000000000</text:p>
          </table:table-cell>
          <table:table-cell table:formula="of:=[.D110]-[.D10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7" office:value-type="float" office:value="763" calcext:value-type="float">
            <text:p>763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0883101851851852" calcext:value-type="float">
            <text:p>0,00008831018518518520</text:p>
          </table:table-cell>
          <table:table-cell table:formula="of:=[.D111]-[.D110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7" office:value-type="float" office:value="770" calcext:value-type="float">
            <text:p>77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0891203703703704" calcext:value-type="float">
            <text:p>0,00008912037037037040</text:p>
          </table:table-cell>
          <table:table-cell table:formula="of:=[.D112]-[.D11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7" office:value-type="float" office:value="777" calcext:value-type="float">
            <text:p>777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0899305555555556" calcext:value-type="float">
            <text:p>0,00008993055555555560</text:p>
          </table:table-cell>
          <table:table-cell table:formula="of:=[.D113]-[.D112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7" office:value-type="float" office:value="784" calcext:value-type="float">
            <text:p>78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0907407407407408" calcext:value-type="float">
            <text:p>0,00009074074074074070</text:p>
          </table:table-cell>
          <table:table-cell table:formula="of:=[.D114]-[.D11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7" office:value-type="float" office:value="791" calcext:value-type="float">
            <text:p>791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0915509259259259" calcext:value-type="float">
            <text:p>0,00009155092592592590</text:p>
          </table:table-cell>
          <table:table-cell table:formula="of:=[.D115]-[.D11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7" office:value-type="float" office:value="798" calcext:value-type="float">
            <text:p>79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0923611111111111" calcext:value-type="float">
            <text:p>0,00009236111111111110</text:p>
          </table:table-cell>
          <table:table-cell table:formula="of:=[.D116]-[.D115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7" office:value-type="float" office:value="805" calcext:value-type="float">
            <text:p>80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0931712962962963" calcext:value-type="float">
            <text:p>0,00009317129629629630</text:p>
          </table:table-cell>
          <table:table-cell table:formula="of:=[.D117]-[.D11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7" office:value-type="float" office:value="812" calcext:value-type="float">
            <text:p>81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0939814814814815" calcext:value-type="float">
            <text:p>0,00009398148148148150</text:p>
          </table:table-cell>
          <table:table-cell table:formula="of:=[.D118]-[.D11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7" office:value-type="float" office:value="819" calcext:value-type="float">
            <text:p>819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0947916666666667" calcext:value-type="float">
            <text:p>0,00009479166666666670</text:p>
          </table:table-cell>
          <table:table-cell table:formula="of:=[.D119]-[.D118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7" office:value-type="float" office:value="826" calcext:value-type="float">
            <text:p>82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0956018518518519" calcext:value-type="float">
            <text:p>0,00009560185185185190</text:p>
          </table:table-cell>
          <table:table-cell table:formula="of:=[.D120]-[.D11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7" office:value-type="float" office:value="833" calcext:value-type="float">
            <text:p>833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096412037037037" calcext:value-type="float">
            <text:p>0,00009641203703703700</text:p>
          </table:table-cell>
          <table:table-cell table:formula="of:=[.D121]-[.D12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7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0972222222222222" calcext:value-type="float">
            <text:p>0,00009722222222222220</text:p>
          </table:table-cell>
          <table:table-cell table:formula="of:=[.D122]-[.D121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7" office:value-type="float" office:value="847" calcext:value-type="float">
            <text:p>847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0980324074074074" calcext:value-type="float">
            <text:p>0,00009803240740740740</text:p>
          </table:table-cell>
          <table:table-cell table:formula="of:=[.D123]-[.D12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7" office:value-type="float" office:value="854" calcext:value-type="float">
            <text:p>85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0988425925925926" calcext:value-type="float">
            <text:p>0,00009884259259259260</text:p>
          </table:table-cell>
          <table:table-cell table:formula="of:=[.D124]-[.D12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7" office:value-type="float" office:value="861" calcext:value-type="float">
            <text:p>861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0996527777777778" calcext:value-type="float">
            <text:p>0,00009965277777777780</text:p>
          </table:table-cell>
          <table:table-cell table:formula="of:=[.D125]-[.D124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7" office:value-type="float" office:value="868" calcext:value-type="float">
            <text:p>86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100462962962963" calcext:value-type="float">
            <text:p>0,00010046296296296300</text:p>
          </table:table-cell>
          <table:table-cell table:formula="of:=[.D126]-[.D12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7" office:value-type="float" office:value="875" calcext:value-type="float">
            <text:p>8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101273148148148" calcext:value-type="float">
            <text:p>0,00010127314814814800</text:p>
          </table:table-cell>
          <table:table-cell table:formula="of:=[.D127]-[.D126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7" office:value-type="float" office:value="882" calcext:value-type="float">
            <text:p>88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102083333333333" calcext:value-type="float">
            <text:p>0,00010208333333333300</text:p>
          </table:table-cell>
          <table:table-cell table:formula="of:=[.D128]-[.D12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7" office:value-type="float" office:value="889" calcext:value-type="float">
            <text:p>889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102893518518519" calcext:value-type="float">
            <text:p>0,00010289351851851900</text:p>
          </table:table-cell>
          <table:table-cell table:formula="of:=[.D129]-[.D12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7" office:value-type="float" office:value="896" calcext:value-type="float">
            <text:p>89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103703703703704" calcext:value-type="float">
            <text:p>0,00010370370370370400</text:p>
          </table:table-cell>
          <table:table-cell table:formula="of:=[.D130]-[.D129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7" office:value-type="float" office:value="903" calcext:value-type="float">
            <text:p>903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104513888888889" calcext:value-type="float">
            <text:p>0,00010451388888888900</text:p>
          </table:table-cell>
          <table:table-cell table:formula="of:=[.D131]-[.D13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7" office:value-type="float" office:value="910" calcext:value-type="float">
            <text:p>91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105324074074074" calcext:value-type="float">
            <text:p>0,00010532407407407400</text:p>
          </table:table-cell>
          <table:table-cell table:formula="of:=[.D132]-[.D13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7" office:value-type="float" office:value="917" calcext:value-type="float">
            <text:p>917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106134259259259" calcext:value-type="float">
            <text:p>0,00010613425925925900</text:p>
          </table:table-cell>
          <table:table-cell table:formula="of:=[.D133]-[.D132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7" office:value-type="float" office:value="924" calcext:value-type="float">
            <text:p>92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106944444444444" calcext:value-type="float">
            <text:p>0,00010694444444444400</text:p>
          </table:table-cell>
          <table:table-cell table:formula="of:=[.D134]-[.D13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7" office:value-type="float" office:value="931" calcext:value-type="float">
            <text:p>931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10775462962963" calcext:value-type="float">
            <text:p>0,00010775462962963000</text:p>
          </table:table-cell>
          <table:table-cell table:formula="of:=[.D135]-[.D13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7" office:value-type="float" office:value="938" calcext:value-type="float">
            <text:p>93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108564814814815" calcext:value-type="float">
            <text:p>0,00010856481481481500</text:p>
          </table:table-cell>
          <table:table-cell table:formula="of:=[.D136]-[.D135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7" office:value-type="float" office:value="945" calcext:value-type="float">
            <text:p>94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109375" calcext:value-type="float">
            <text:p>0,00010937500000000000</text:p>
          </table:table-cell>
          <table:table-cell table:formula="of:=[.D137]-[.D13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7" office:value-type="float" office:value="952" calcext:value-type="float">
            <text:p>95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110185185185185" calcext:value-type="float">
            <text:p>0,00011018518518518500</text:p>
          </table:table-cell>
          <table:table-cell table:formula="of:=[.D138]-[.D137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7" office:value-type="float" office:value="959" calcext:value-type="float">
            <text:p>959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11099537037037" calcext:value-type="float">
            <text:p>0,00011099537037037000</text:p>
          </table:table-cell>
          <table:table-cell table:formula="of:=[.D139]-[.D13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7" office:value-type="float" office:value="966" calcext:value-type="float">
            <text:p>96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111805555555556" calcext:value-type="float">
            <text:p>0,00011180555555555600</text:p>
          </table:table-cell>
          <table:table-cell table:formula="of:=[.D140]-[.D13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7" office:value-type="float" office:value="973" calcext:value-type="float">
            <text:p>973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112615740740741" calcext:value-type="float">
            <text:p>0,00011261574074074100</text:p>
          </table:table-cell>
          <table:table-cell table:formula="of:=[.D141]-[.D140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7" office:value-type="float" office:value="980" calcext:value-type="float">
            <text:p>9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113425925925926" calcext:value-type="float">
            <text:p>0,00011342592592592600</text:p>
          </table:table-cell>
          <table:table-cell table:formula="of:=[.D142]-[.D14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7" office:value-type="float" office:value="987" calcext:value-type="float">
            <text:p>987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114236111111111" calcext:value-type="float">
            <text:p>0,00011423611111111100</text:p>
          </table:table-cell>
          <table:table-cell table:formula="of:=[.D143]-[.D14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7" office:value-type="float" office:value="994" calcext:value-type="float">
            <text:p>99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115046296296296" calcext:value-type="float">
            <text:p>0,00011504629629629600</text:p>
          </table:table-cell>
          <table:table-cell table:formula="of:=[.D144]-[.D143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7" office:value-type="float" office:value="1001" calcext:value-type="float">
            <text:p>1001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115856481481481" calcext:value-type="float">
            <text:p>0,00011585648148148100</text:p>
          </table:table-cell>
          <table:table-cell table:formula="of:=[.D145]-[.D14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7" office:value-type="float" office:value="1008" calcext:value-type="float">
            <text:p>100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116666666666667" calcext:value-type="float">
            <text:p>0,00011666666666666700</text:p>
          </table:table-cell>
          <table:table-cell table:formula="of:=[.D146]-[.D14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7" office:value-type="float" office:value="1015" calcext:value-type="float">
            <text:p>101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117476851851852" calcext:value-type="float">
            <text:p>0,00011747685185185200</text:p>
          </table:table-cell>
          <table:table-cell table:formula="of:=[.D147]-[.D146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7" office:value-type="float" office:value="1022" calcext:value-type="float">
            <text:p>102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118287037037037" calcext:value-type="float">
            <text:p>0,00011828703703703700</text:p>
          </table:table-cell>
          <table:table-cell table:formula="of:=[.D148]-[.D14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7" office:value-type="float" office:value="1029" calcext:value-type="float">
            <text:p>1029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119097222222222" calcext:value-type="float">
            <text:p>0,00011909722222222200</text:p>
          </table:table-cell>
          <table:table-cell table:formula="of:=[.D149]-[.D148]" office:value-type="float" office:value="0.000000810185185185194" calcext:value-type="float">
            <text:p>0,000000810185185185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7" office:value-type="float" office:value="1036" calcext:value-type="float">
            <text:p>103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119907407407407" calcext:value-type="float">
            <text:p>0,00011990740740740700</text:p>
          </table:table-cell>
          <table:table-cell table:formula="of:=[.D150]-[.D14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7" office:value-type="float" office:value="1043" calcext:value-type="float">
            <text:p>1043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120717592592593" calcext:value-type="float">
            <text:p>0,00012071759259259300</text:p>
          </table:table-cell>
          <table:table-cell table:formula="of:=[.D151]-[.D15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7" office:value-type="float" office:value="1050" calcext:value-type="float">
            <text:p>10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121527777777778" calcext:value-type="float">
            <text:p>0,00012152777777777800</text:p>
          </table:table-cell>
          <table:table-cell table:formula="of:=[.D152]-[.D15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7" office:value-type="float" office:value="1057" calcext:value-type="float">
            <text:p>1057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122337962962963" calcext:value-type="float">
            <text:p>0,00012233796296296300</text:p>
          </table:table-cell>
          <table:table-cell table:formula="of:=[.D153]-[.D15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7" office:value-type="float" office:value="1064" calcext:value-type="float">
            <text:p>106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123148148148148" calcext:value-type="float">
            <text:p>0,00012314814814814800</text:p>
          </table:table-cell>
          <table:table-cell table:formula="of:=[.D154]-[.D153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7" office:value-type="float" office:value="1071" calcext:value-type="float">
            <text:p>1071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123958333333333" calcext:value-type="float">
            <text:p>0,00012395833333333300</text:p>
          </table:table-cell>
          <table:table-cell table:formula="of:=[.D155]-[.D15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7" office:value-type="float" office:value="1078" calcext:value-type="float">
            <text:p>107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124768518518519" calcext:value-type="float">
            <text:p>0,00012476851851851900</text:p>
          </table:table-cell>
          <table:table-cell table:formula="of:=[.D156]-[.D15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7" office:value-type="float" office:value="1085" calcext:value-type="float">
            <text:p>108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125578703703704" calcext:value-type="float">
            <text:p>0,00012557870370370400</text:p>
          </table:table-cell>
          <table:table-cell table:formula="of:=[.D157]-[.D15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7" office:value-type="float" office:value="1092" calcext:value-type="float">
            <text:p>109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126388888888889" calcext:value-type="float">
            <text:p>0,00012638888888888900</text:p>
          </table:table-cell>
          <table:table-cell table:formula="of:=[.D158]-[.D15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7" office:value-type="float" office:value="1099" calcext:value-type="float">
            <text:p>1099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127199074074074" calcext:value-type="float">
            <text:p>0,00012719907407407400</text:p>
          </table:table-cell>
          <table:table-cell table:formula="of:=[.D159]-[.D158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7" office:value-type="float" office:value="1106" calcext:value-type="float">
            <text:p>110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128009259259259" calcext:value-type="float">
            <text:p>0,00012800925925925900</text:p>
          </table:table-cell>
          <table:table-cell table:formula="of:=[.D160]-[.D15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7" office:value-type="float" office:value="1113" calcext:value-type="float">
            <text:p>1113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128819444444444" calcext:value-type="float">
            <text:p>0,00012881944444444400</text:p>
          </table:table-cell>
          <table:table-cell table:formula="of:=[.D161]-[.D16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7" office:value-type="float" office:value="1120" calcext:value-type="float">
            <text:p>11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12962962962963" calcext:value-type="float">
            <text:p>0,00012962962962963000</text:p>
          </table:table-cell>
          <table:table-cell table:formula="of:=[.D162]-[.D16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7" office:value-type="float" office:value="1127" calcext:value-type="float">
            <text:p>1127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130439814814815" calcext:value-type="float">
            <text:p>0,00013043981481481500</text:p>
          </table:table-cell>
          <table:table-cell table:formula="of:=[.D163]-[.D16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7" office:value-type="float" office:value="1134" calcext:value-type="float">
            <text:p>113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13125" calcext:value-type="float">
            <text:p>0,00013125000000000000</text:p>
          </table:table-cell>
          <table:table-cell table:formula="of:=[.D164]-[.D16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7" office:value-type="float" office:value="1141" calcext:value-type="float">
            <text:p>1141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132060185185185" calcext:value-type="float">
            <text:p>0,00013206018518518500</text:p>
          </table:table-cell>
          <table:table-cell table:formula="of:=[.D165]-[.D164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7" office:value-type="float" office:value="1148" calcext:value-type="float">
            <text:p>114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13287037037037" calcext:value-type="float">
            <text:p>0,00013287037037037000</text:p>
          </table:table-cell>
          <table:table-cell table:formula="of:=[.D166]-[.D16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7" office:value-type="float" office:value="1155" calcext:value-type="float">
            <text:p>115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133680555555556" calcext:value-type="float">
            <text:p>0,00013368055555555600</text:p>
          </table:table-cell>
          <table:table-cell table:formula="of:=[.D167]-[.D16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7" office:value-type="float" office:value="1162" calcext:value-type="float">
            <text:p>116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134490740740741" calcext:value-type="float">
            <text:p>0,00013449074074074100</text:p>
          </table:table-cell>
          <table:table-cell table:formula="of:=[.D168]-[.D16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7" office:value-type="float" office:value="1169" calcext:value-type="float">
            <text:p>1169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135300925925926" calcext:value-type="float">
            <text:p>0,00013530092592592600</text:p>
          </table:table-cell>
          <table:table-cell table:formula="of:=[.D169]-[.D16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7" office:value-type="float" office:value="1176" calcext:value-type="float">
            <text:p>117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136111111111111" calcext:value-type="float">
            <text:p>0,00013611111111111100</text:p>
          </table:table-cell>
          <table:table-cell table:formula="of:=[.D170]-[.D169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7" office:value-type="float" office:value="1183" calcext:value-type="float">
            <text:p>1183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136921296296296" calcext:value-type="float">
            <text:p>0,00013692129629629600</text:p>
          </table:table-cell>
          <table:table-cell table:formula="of:=[.D171]-[.D17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7" office:value-type="float" office:value="1190" calcext:value-type="float">
            <text:p>119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137731481481482" calcext:value-type="float">
            <text:p>0,00013773148148148200</text:p>
          </table:table-cell>
          <table:table-cell table:formula="of:=[.D172]-[.D17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7" office:value-type="float" office:value="1197" calcext:value-type="float">
            <text:p>1197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138541666666667" calcext:value-type="float">
            <text:p>0,00013854166666666700</text:p>
          </table:table-cell>
          <table:table-cell table:formula="of:=[.D173]-[.D17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7" office:value-type="float" office:value="1204" calcext:value-type="float">
            <text:p>120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139351851851852" calcext:value-type="float">
            <text:p>0,00013935185185185200</text:p>
          </table:table-cell>
          <table:table-cell table:formula="of:=[.D174]-[.D17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7" office:value-type="float" office:value="1211" calcext:value-type="float">
            <text:p>1211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140162037037037" calcext:value-type="float">
            <text:p>0,00014016203703703700</text:p>
          </table:table-cell>
          <table:table-cell table:formula="of:=[.D175]-[.D17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7" office:value-type="float" office:value="1218" calcext:value-type="float">
            <text:p>121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140972222222222" calcext:value-type="float">
            <text:p>0,00014097222222222200</text:p>
          </table:table-cell>
          <table:table-cell table:formula="of:=[.D176]-[.D175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7" office:value-type="float" office:value="1225" calcext:value-type="float">
            <text:p>12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141782407407407" calcext:value-type="float">
            <text:p>0,00014178240740740700</text:p>
          </table:table-cell>
          <table:table-cell table:formula="of:=[.D177]-[.D17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7" office:value-type="float" office:value="1232" calcext:value-type="float">
            <text:p>123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142592592592593" calcext:value-type="float">
            <text:p>0,00014259259259259300</text:p>
          </table:table-cell>
          <table:table-cell table:formula="of:=[.D178]-[.D17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7" office:value-type="float" office:value="1239" calcext:value-type="float">
            <text:p>1239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143402777777778" calcext:value-type="float">
            <text:p>0,00014340277777777800</text:p>
          </table:table-cell>
          <table:table-cell table:formula="of:=[.D179]-[.D17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7" office:value-type="float" office:value="1246" calcext:value-type="float">
            <text:p>124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144212962962963" calcext:value-type="float">
            <text:p>0,00014421296296296300</text:p>
          </table:table-cell>
          <table:table-cell table:formula="of:=[.D180]-[.D17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7" office:value-type="float" office:value="1253" calcext:value-type="float">
            <text:p>1253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145023148148148" calcext:value-type="float">
            <text:p>0,00014502314814814800</text:p>
          </table:table-cell>
          <table:table-cell table:formula="of:=[.D181]-[.D180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7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145833333333333" calcext:value-type="float">
            <text:p>0,00014583333333333300</text:p>
          </table:table-cell>
          <table:table-cell table:formula="of:=[.D182]-[.D18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7" office:value-type="float" office:value="1267" calcext:value-type="float">
            <text:p>1267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146643518518519" calcext:value-type="float">
            <text:p>0,00014664351851851900</text:p>
          </table:table-cell>
          <table:table-cell table:formula="of:=[.D183]-[.D18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7" office:value-type="float" office:value="1274" calcext:value-type="float">
            <text:p>127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147453703703704" calcext:value-type="float">
            <text:p>0,00014745370370370400</text:p>
          </table:table-cell>
          <table:table-cell table:formula="of:=[.D184]-[.D18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7" office:value-type="float" office:value="1281" calcext:value-type="float">
            <text:p>1281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148263888888889" calcext:value-type="float">
            <text:p>0,00014826388888888900</text:p>
          </table:table-cell>
          <table:table-cell table:formula="of:=[.D185]-[.D18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7" office:value-type="float" office:value="1288" calcext:value-type="float">
            <text:p>128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149074074074074" calcext:value-type="float">
            <text:p>0,00014907407407407400</text:p>
          </table:table-cell>
          <table:table-cell table:formula="of:=[.D186]-[.D18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7" office:value-type="float" office:value="1295" calcext:value-type="float">
            <text:p>129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149884259259259" calcext:value-type="float">
            <text:p>0,00014988425925925900</text:p>
          </table:table-cell>
          <table:table-cell table:formula="of:=[.D187]-[.D186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7" office:value-type="float" office:value="1302" calcext:value-type="float">
            <text:p>130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150694444444444" calcext:value-type="float">
            <text:p>0,00015069444444444400</text:p>
          </table:table-cell>
          <table:table-cell table:formula="of:=[.D188]-[.D18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7" office:value-type="float" office:value="1309" calcext:value-type="float">
            <text:p>1309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15150462962963" calcext:value-type="float">
            <text:p>0,00015150462962963000</text:p>
          </table:table-cell>
          <table:table-cell table:formula="of:=[.D189]-[.D18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7" office:value-type="float" office:value="1316" calcext:value-type="float">
            <text:p>131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152314814814815" calcext:value-type="float">
            <text:p>0,00015231481481481500</text:p>
          </table:table-cell>
          <table:table-cell table:formula="of:=[.D190]-[.D18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7" office:value-type="float" office:value="1323" calcext:value-type="float">
            <text:p>1323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153125" calcext:value-type="float">
            <text:p>0,00015312500000000000</text:p>
          </table:table-cell>
          <table:table-cell table:formula="of:=[.D191]-[.D19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7" office:value-type="float" office:value="1330" calcext:value-type="float">
            <text:p>133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153935185185185" calcext:value-type="float">
            <text:p>0,00015393518518518500</text:p>
          </table:table-cell>
          <table:table-cell table:formula="of:=[.D192]-[.D191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7" office:value-type="float" office:value="1337" calcext:value-type="float">
            <text:p>1337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15474537037037" calcext:value-type="float">
            <text:p>0,00015474537037037000</text:p>
          </table:table-cell>
          <table:table-cell table:formula="of:=[.D193]-[.D19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7" office:value-type="float" office:value="1344" calcext:value-type="float">
            <text:p>134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155555555555556" calcext:value-type="float">
            <text:p>0,00015555555555555600</text:p>
          </table:table-cell>
          <table:table-cell table:formula="of:=[.D194]-[.D19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7" office:value-type="float" office:value="1351" calcext:value-type="float">
            <text:p>1351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156365740740741" calcext:value-type="float">
            <text:p>0,00015636574074074100</text:p>
          </table:table-cell>
          <table:table-cell table:formula="of:=[.D195]-[.D19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7" office:value-type="float" office:value="1358" calcext:value-type="float">
            <text:p>135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157175925925926" calcext:value-type="float">
            <text:p>0,00015717592592592600</text:p>
          </table:table-cell>
          <table:table-cell table:formula="of:=[.D196]-[.D19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7" office:value-type="float" office:value="1365" calcext:value-type="float">
            <text:p>136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157986111111111" calcext:value-type="float">
            <text:p>0,00015798611111111100</text:p>
          </table:table-cell>
          <table:table-cell table:formula="of:=[.D197]-[.D19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7" office:value-type="float" office:value="1372" calcext:value-type="float">
            <text:p>137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158796296296296" calcext:value-type="float">
            <text:p>0,00015879629629629600</text:p>
          </table:table-cell>
          <table:table-cell table:formula="of:=[.D198]-[.D197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7" office:value-type="float" office:value="1379" calcext:value-type="float">
            <text:p>1379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159606481481482" calcext:value-type="float">
            <text:p>0,00015960648148148200</text:p>
          </table:table-cell>
          <table:table-cell table:formula="of:=[.D199]-[.D19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7" office:value-type="float" office:value="1386" calcext:value-type="float">
            <text:p>138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160416666666667" calcext:value-type="float">
            <text:p>0,00016041666666666700</text:p>
          </table:table-cell>
          <table:table-cell table:formula="of:=[.D200]-[.D19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7" office:value-type="float" office:value="1393" calcext:value-type="float">
            <text:p>1393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161226851851852" calcext:value-type="float">
            <text:p>0,00016122685185185200</text:p>
          </table:table-cell>
          <table:table-cell table:formula="of:=[.D201]-[.D20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7" office:value-type="float" office:value="1400" calcext:value-type="float">
            <text:p>1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162037037037037" calcext:value-type="float">
            <text:p>0,00016203703703703700</text:p>
          </table:table-cell>
          <table:table-cell table:formula="of:=[.D202]-[.D20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7" office:value-type="float" office:value="1407" calcext:value-type="float">
            <text:p>1407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162847222222222" calcext:value-type="float">
            <text:p>0,00016284722222222200</text:p>
          </table:table-cell>
          <table:table-cell table:formula="of:=[.D203]-[.D202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7" office:value-type="float" office:value="1414" calcext:value-type="float">
            <text:p>141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163657407407407" calcext:value-type="float">
            <text:p>0,00016365740740740700</text:p>
          </table:table-cell>
          <table:table-cell table:formula="of:=[.D204]-[.D20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7" office:value-type="float" office:value="1421" calcext:value-type="float">
            <text:p>1421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164467592592593" calcext:value-type="float">
            <text:p>0,00016446759259259300</text:p>
          </table:table-cell>
          <table:table-cell table:formula="of:=[.D205]-[.D20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7" office:value-type="float" office:value="1428" calcext:value-type="float">
            <text:p>142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165277777777778" calcext:value-type="float">
            <text:p>0,00016527777777777800</text:p>
          </table:table-cell>
          <table:table-cell table:formula="of:=[.D206]-[.D20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7" office:value-type="float" office:value="1435" calcext:value-type="float">
            <text:p>143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166087962962963" calcext:value-type="float">
            <text:p>0,00016608796296296300</text:p>
          </table:table-cell>
          <table:table-cell table:formula="of:=[.D207]-[.D20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7" office:value-type="float" office:value="1442" calcext:value-type="float">
            <text:p>144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166898148148148" calcext:value-type="float">
            <text:p>0,00016689814814814800</text:p>
          </table:table-cell>
          <table:table-cell table:formula="of:=[.D208]-[.D20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7" office:value-type="float" office:value="1449" calcext:value-type="float">
            <text:p>1449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167708333333333" calcext:value-type="float">
            <text:p>0,00016770833333333300</text:p>
          </table:table-cell>
          <table:table-cell table:formula="of:=[.D209]-[.D208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7" office:value-type="float" office:value="1456" calcext:value-type="float">
            <text:p>145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168518518518519" calcext:value-type="float">
            <text:p>0,00016851851851851900</text:p>
          </table:table-cell>
          <table:table-cell table:formula="of:=[.D210]-[.D20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7" office:value-type="float" office:value="1463" calcext:value-type="float">
            <text:p>1463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169328703703704" calcext:value-type="float">
            <text:p>0,00016932870370370400</text:p>
          </table:table-cell>
          <table:table-cell table:formula="of:=[.D211]-[.D21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7" office:value-type="float" office:value="1470" calcext:value-type="float">
            <text:p>147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170138888888889" calcext:value-type="float">
            <text:p>0,00017013888888888900</text:p>
          </table:table-cell>
          <table:table-cell table:formula="of:=[.D212]-[.D21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7" office:value-type="float" office:value="1477" calcext:value-type="float">
            <text:p>1477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170949074074074" calcext:value-type="float">
            <text:p>0,00017094907407407400</text:p>
          </table:table-cell>
          <table:table-cell table:formula="of:=[.D213]-[.D21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7" office:value-type="float" office:value="1484" calcext:value-type="float">
            <text:p>148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171759259259259" calcext:value-type="float">
            <text:p>0,00017175925925925900</text:p>
          </table:table-cell>
          <table:table-cell table:formula="of:=[.D214]-[.D213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7" office:value-type="float" office:value="1491" calcext:value-type="float">
            <text:p>1491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172569444444444" calcext:value-type="float">
            <text:p>0,00017256944444444400</text:p>
          </table:table-cell>
          <table:table-cell table:formula="of:=[.D215]-[.D21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7" office:value-type="float" office:value="1498" calcext:value-type="float">
            <text:p>149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17337962962963" calcext:value-type="float">
            <text:p>0,00017337962962963000</text:p>
          </table:table-cell>
          <table:table-cell table:formula="of:=[.D216]-[.D21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7" office:value-type="float" office:value="1505" calcext:value-type="float">
            <text:p>150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174189814814815" calcext:value-type="float">
            <text:p>0,00017418981481481500</text:p>
          </table:table-cell>
          <table:table-cell table:formula="of:=[.D217]-[.D21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7" office:value-type="float" office:value="1512" calcext:value-type="float">
            <text:p>151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175" calcext:value-type="float">
            <text:p>0,00017500000000000000</text:p>
          </table:table-cell>
          <table:table-cell table:formula="of:=[.D218]-[.D21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7" office:value-type="float" office:value="1519" calcext:value-type="float">
            <text:p>1519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175810185185185" calcext:value-type="float">
            <text:p>0,00017581018518518500</text:p>
          </table:table-cell>
          <table:table-cell table:formula="of:=[.D219]-[.D21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7" office:value-type="float" office:value="1526" calcext:value-type="float">
            <text:p>152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17662037037037" calcext:value-type="float">
            <text:p>0,00017662037037037000</text:p>
          </table:table-cell>
          <table:table-cell table:formula="of:=[.D220]-[.D219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7" office:value-type="float" office:value="1533" calcext:value-type="float">
            <text:p>1533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177430555555556" calcext:value-type="float">
            <text:p>0,00017743055555555600</text:p>
          </table:table-cell>
          <table:table-cell table:formula="of:=[.D221]-[.D22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7" office:value-type="float" office:value="1540" calcext:value-type="float">
            <text:p>15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178240740740741" calcext:value-type="float">
            <text:p>0,00017824074074074100</text:p>
          </table:table-cell>
          <table:table-cell table:formula="of:=[.D222]-[.D22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7" office:value-type="float" office:value="1547" calcext:value-type="float">
            <text:p>1547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179050925925926" calcext:value-type="float">
            <text:p>0,00017905092592592600</text:p>
          </table:table-cell>
          <table:table-cell table:formula="of:=[.D223]-[.D22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7" office:value-type="float" office:value="1554" calcext:value-type="float">
            <text:p>155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179861111111111" calcext:value-type="float">
            <text:p>0,00017986111111111100</text:p>
          </table:table-cell>
          <table:table-cell table:formula="of:=[.D224]-[.D22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7" office:value-type="float" office:value="1561" calcext:value-type="float">
            <text:p>1561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180671296296296" calcext:value-type="float">
            <text:p>0,00018067129629629600</text:p>
          </table:table-cell>
          <table:table-cell table:formula="of:=[.D225]-[.D224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7" office:value-type="float" office:value="1568" calcext:value-type="float">
            <text:p>156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181481481481482" calcext:value-type="float">
            <text:p>0,00018148148148148100</text:p>
          </table:table-cell>
          <table:table-cell table:formula="of:=[.D226]-[.D22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7" office:value-type="float" office:value="1575" calcext:value-type="float">
            <text:p>15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182291666666667" calcext:value-type="float">
            <text:p>0,00018229166666666700</text:p>
          </table:table-cell>
          <table:table-cell table:formula="of:=[.D227]-[.D22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7" office:value-type="float" office:value="1582" calcext:value-type="float">
            <text:p>158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183101851851852" calcext:value-type="float">
            <text:p>0,00018310185185185200</text:p>
          </table:table-cell>
          <table:table-cell table:formula="of:=[.D228]-[.D22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7" office:value-type="float" office:value="1589" calcext:value-type="float">
            <text:p>1589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183912037037037" calcext:value-type="float">
            <text:p>0,00018391203703703700</text:p>
          </table:table-cell>
          <table:table-cell table:formula="of:=[.D229]-[.D22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7" office:value-type="float" office:value="1596" calcext:value-type="float">
            <text:p>159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184722222222222" calcext:value-type="float">
            <text:p>0,00018472222222222200</text:p>
          </table:table-cell>
          <table:table-cell table:formula="of:=[.D230]-[.D22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7" office:value-type="float" office:value="1603" calcext:value-type="float">
            <text:p>1603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185532407407407" calcext:value-type="float">
            <text:p>0,00018553240740740700</text:p>
          </table:table-cell>
          <table:table-cell table:formula="of:=[.D231]-[.D230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7" office:value-type="float" office:value="1610" calcext:value-type="float">
            <text:p>161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186342592592593" calcext:value-type="float">
            <text:p>0,00018634259259259300</text:p>
          </table:table-cell>
          <table:table-cell table:formula="of:=[.D232]-[.D23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7" office:value-type="float" office:value="1617" calcext:value-type="float">
            <text:p>1617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187152777777778" calcext:value-type="float">
            <text:p>0,00018715277777777800</text:p>
          </table:table-cell>
          <table:table-cell table:formula="of:=[.D233]-[.D23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7" office:value-type="float" office:value="1624" calcext:value-type="float">
            <text:p>162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187962962962963" calcext:value-type="float">
            <text:p>0,00018796296296296300</text:p>
          </table:table-cell>
          <table:table-cell table:formula="of:=[.D234]-[.D23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7" office:value-type="float" office:value="1631" calcext:value-type="float">
            <text:p>1631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188773148148148" calcext:value-type="float">
            <text:p>0,00018877314814814800</text:p>
          </table:table-cell>
          <table:table-cell table:formula="of:=[.D235]-[.D23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7" office:value-type="float" office:value="1638" calcext:value-type="float">
            <text:p>163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189583333333333" calcext:value-type="float">
            <text:p>0,00018958333333333300</text:p>
          </table:table-cell>
          <table:table-cell table:formula="of:=[.D236]-[.D235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7" office:value-type="float" office:value="1645" calcext:value-type="float">
            <text:p>164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190393518518519" calcext:value-type="float">
            <text:p>0,00019039351851851900</text:p>
          </table:table-cell>
          <table:table-cell table:formula="of:=[.D237]-[.D23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7" office:value-type="float" office:value="1652" calcext:value-type="float">
            <text:p>165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191203703703704" calcext:value-type="float">
            <text:p>0,00019120370370370400</text:p>
          </table:table-cell>
          <table:table-cell table:formula="of:=[.D238]-[.D23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7" office:value-type="float" office:value="1659" calcext:value-type="float">
            <text:p>1659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192013888888889" calcext:value-type="float">
            <text:p>0,00019201388888888900</text:p>
          </table:table-cell>
          <table:table-cell table:formula="of:=[.D239]-[.D23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7" office:value-type="float" office:value="1666" calcext:value-type="float">
            <text:p>166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192824074074074" calcext:value-type="float">
            <text:p>0,00019282407407407400</text:p>
          </table:table-cell>
          <table:table-cell table:formula="of:=[.D240]-[.D23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7" office:value-type="float" office:value="1673" calcext:value-type="float">
            <text:p>1673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193634259259259" calcext:value-type="float">
            <text:p>0,00019363425925925900</text:p>
          </table:table-cell>
          <table:table-cell table:formula="of:=[.D241]-[.D24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7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194444444444444" calcext:value-type="float">
            <text:p>0,00019444444444444400</text:p>
          </table:table-cell>
          <table:table-cell table:formula="of:=[.D242]-[.D241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7" office:value-type="float" office:value="1687" calcext:value-type="float">
            <text:p>1687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19525462962963" calcext:value-type="float">
            <text:p>0,00019525462962963000</text:p>
          </table:table-cell>
          <table:table-cell table:formula="of:=[.D243]-[.D24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7" office:value-type="float" office:value="1694" calcext:value-type="float">
            <text:p>169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196064814814815" calcext:value-type="float">
            <text:p>0,00019606481481481500</text:p>
          </table:table-cell>
          <table:table-cell table:formula="of:=[.D244]-[.D24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7" office:value-type="float" office:value="1701" calcext:value-type="float">
            <text:p>1701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196875" calcext:value-type="float">
            <text:p>0,00019687500000000000</text:p>
          </table:table-cell>
          <table:table-cell table:formula="of:=[.D245]-[.D24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7" office:value-type="float" office:value="1708" calcext:value-type="float">
            <text:p>170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197685185185185" calcext:value-type="float">
            <text:p>0,00019768518518518500</text:p>
          </table:table-cell>
          <table:table-cell table:formula="of:=[.D246]-[.D24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7" office:value-type="float" office:value="1715" calcext:value-type="float">
            <text:p>171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19849537037037" calcext:value-type="float">
            <text:p>0,00019849537037037000</text:p>
          </table:table-cell>
          <table:table-cell table:formula="of:=[.D247]-[.D24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7" office:value-type="float" office:value="1722" calcext:value-type="float">
            <text:p>172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199305555555556" calcext:value-type="float">
            <text:p>0,00019930555555555600</text:p>
          </table:table-cell>
          <table:table-cell table:formula="of:=[.D248]-[.D247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7" office:value-type="float" office:value="1729" calcext:value-type="float">
            <text:p>1729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200115740740741" calcext:value-type="float">
            <text:p>0,00020011574074074100</text:p>
          </table:table-cell>
          <table:table-cell table:formula="of:=[.D249]-[.D24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7" office:value-type="float" office:value="1736" calcext:value-type="float">
            <text:p>173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200925925925926" calcext:value-type="float">
            <text:p>0,00020092592592592600</text:p>
          </table:table-cell>
          <table:table-cell table:formula="of:=[.D250]-[.D24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7" office:value-type="float" office:value="1743" calcext:value-type="float">
            <text:p>1743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201736111111111" calcext:value-type="float">
            <text:p>0,00020173611111111100</text:p>
          </table:table-cell>
          <table:table-cell table:formula="of:=[.D251]-[.D25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7" office:value-type="float" office:value="1750" calcext:value-type="float">
            <text:p>1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202546296296296" calcext:value-type="float">
            <text:p>0,00020254629629629600</text:p>
          </table:table-cell>
          <table:table-cell table:formula="of:=[.D252]-[.D25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7" office:value-type="float" office:value="1757" calcext:value-type="float">
            <text:p>1757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203356481481481" calcext:value-type="float">
            <text:p>0,00020335648148148100</text:p>
          </table:table-cell>
          <table:table-cell table:formula="of:=[.D253]-[.D252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7" office:value-type="float" office:value="1764" calcext:value-type="float">
            <text:p>176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204166666666667" calcext:value-type="float">
            <text:p>0,00020416666666666700</text:p>
          </table:table-cell>
          <table:table-cell table:formula="of:=[.D254]-[.D25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7" office:value-type="float" office:value="1771" calcext:value-type="float">
            <text:p>1771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204976851851852" calcext:value-type="float">
            <text:p>0,00020497685185185200</text:p>
          </table:table-cell>
          <table:table-cell table:formula="of:=[.D255]-[.D25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7" office:value-type="float" office:value="1778" calcext:value-type="float">
            <text:p>177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205787037037037" calcext:value-type="float">
            <text:p>0,00020578703703703700</text:p>
          </table:table-cell>
          <table:table-cell table:formula="of:=[.D256]-[.D25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7" office:value-type="float" office:value="1785" calcext:value-type="float">
            <text:p>178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206597222222222" calcext:value-type="float">
            <text:p>0,00020659722222222200</text:p>
          </table:table-cell>
          <table:table-cell table:formula="of:=[.D257]-[.D25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7" office:value-type="float" office:value="1792" calcext:value-type="float">
            <text:p>179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207407407407407" calcext:value-type="float">
            <text:p>0,00020740740740740700</text:p>
          </table:table-cell>
          <table:table-cell table:formula="of:=[.D258]-[.D25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7" office:value-type="float" office:value="1799" calcext:value-type="float">
            <text:p>1799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208217592592593" calcext:value-type="float">
            <text:p>0,00020821759259259300</text:p>
          </table:table-cell>
          <table:table-cell table:formula="of:=[.D259]-[.D258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7" office:value-type="float" office:value="1806" calcext:value-type="float">
            <text:p>180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209027777777778" calcext:value-type="float">
            <text:p>0,00020902777777777800</text:p>
          </table:table-cell>
          <table:table-cell table:formula="of:=[.D260]-[.D25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7" office:value-type="float" office:value="1813" calcext:value-type="float">
            <text:p>1813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209837962962963" calcext:value-type="float">
            <text:p>0,00020983796296296300</text:p>
          </table:table-cell>
          <table:table-cell table:formula="of:=[.D261]-[.D26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7" office:value-type="float" office:value="1820" calcext:value-type="float">
            <text:p>18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210648148148148" calcext:value-type="float">
            <text:p>0,00021064814814814800</text:p>
          </table:table-cell>
          <table:table-cell table:formula="of:=[.D262]-[.D26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7" office:value-type="float" office:value="1827" calcext:value-type="float">
            <text:p>1827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211458333333333" calcext:value-type="float">
            <text:p>0,00021145833333333300</text:p>
          </table:table-cell>
          <table:table-cell table:formula="of:=[.D263]-[.D26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7" office:value-type="float" office:value="1834" calcext:value-type="float">
            <text:p>1834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212268518518519" calcext:value-type="float">
            <text:p>0,00021226851851851900</text:p>
          </table:table-cell>
          <table:table-cell table:formula="of:=[.D264]-[.D263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7" office:value-type="float" office:value="1841" calcext:value-type="float">
            <text:p>1841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213078703703704" calcext:value-type="float">
            <text:p>0,00021307870370370400</text:p>
          </table:table-cell>
          <table:table-cell table:formula="of:=[.D265]-[.D26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7" office:value-type="float" office:value="1848" calcext:value-type="float">
            <text:p>1848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213888888888889" calcext:value-type="float">
            <text:p>0,00021388888888888900</text:p>
          </table:table-cell>
          <table:table-cell table:formula="of:=[.D266]-[.D26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7" office:value-type="float" office:value="1855" calcext:value-type="float">
            <text:p>185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214699074074074" calcext:value-type="float">
            <text:p>0,00021469907407407400</text:p>
          </table:table-cell>
          <table:table-cell table:formula="of:=[.D267]-[.D26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7" office:value-type="float" office:value="1862" calcext:value-type="float">
            <text:p>1862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215509259259259" calcext:value-type="float">
            <text:p>0,00021550925925925900</text:p>
          </table:table-cell>
          <table:table-cell table:formula="of:=[.D268]-[.D26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7" office:value-type="float" office:value="1869" calcext:value-type="float">
            <text:p>1869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216319444444444" calcext:value-type="float">
            <text:p>0,00021631944444444400</text:p>
          </table:table-cell>
          <table:table-cell table:formula="of:=[.D269]-[.D26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7" office:value-type="float" office:value="1876" calcext:value-type="float">
            <text:p>1876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21712962962963" calcext:value-type="float">
            <text:p>0,00021712962962963000</text:p>
          </table:table-cell>
          <table:table-cell table:formula="of:=[.D270]-[.D269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7" office:value-type="float" office:value="1883" calcext:value-type="float">
            <text:p>1883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217939814814815" calcext:value-type="float">
            <text:p>0,00021793981481481500</text:p>
          </table:table-cell>
          <table:table-cell table:formula="of:=[.D271]-[.D27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7" office:value-type="float" office:value="1890" calcext:value-type="float">
            <text:p>189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21875" calcext:value-type="float">
            <text:p>0,00021875000000000000</text:p>
          </table:table-cell>
          <table:table-cell table:formula="of:=[.D272]-[.D27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7" office:value-type="float" office:value="1897" calcext:value-type="float">
            <text:p>1897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219560185185185" calcext:value-type="float">
            <text:p>0,00021956018518518500</text:p>
          </table:table-cell>
          <table:table-cell table:formula="of:=[.D273]-[.D27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7" office:value-type="float" office:value="1904" calcext:value-type="float">
            <text:p>1904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22037037037037" calcext:value-type="float">
            <text:p>0,00022037037037037000</text:p>
          </table:table-cell>
          <table:table-cell table:formula="of:=[.D274]-[.D27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7" office:value-type="float" office:value="1911" calcext:value-type="float">
            <text:p>1911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221180555555556" calcext:value-type="float">
            <text:p>0,00022118055555555600</text:p>
          </table:table-cell>
          <table:table-cell table:formula="of:=[.D275]-[.D274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7" office:value-type="float" office:value="1918" calcext:value-type="float">
            <text:p>1918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221990740740741" calcext:value-type="float">
            <text:p>0,00022199074074074100</text:p>
          </table:table-cell>
          <table:table-cell table:formula="of:=[.D276]-[.D27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7" office:value-type="float" office:value="1925" calcext:value-type="float">
            <text:p>19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222800925925926" calcext:value-type="float">
            <text:p>0,00022280092592592600</text:p>
          </table:table-cell>
          <table:table-cell table:formula="of:=[.D277]-[.D27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7" office:value-type="float" office:value="1932" calcext:value-type="float">
            <text:p>1932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223611111111111" calcext:value-type="float">
            <text:p>0,00022361111111111100</text:p>
          </table:table-cell>
          <table:table-cell table:formula="of:=[.D278]-[.D27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7" office:value-type="float" office:value="1939" calcext:value-type="float">
            <text:p>1939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224421296296296" calcext:value-type="float">
            <text:p>0,00022442129629629600</text:p>
          </table:table-cell>
          <table:table-cell table:formula="of:=[.D279]-[.D27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7" office:value-type="float" office:value="1946" calcext:value-type="float">
            <text:p>1946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225231481481481" calcext:value-type="float">
            <text:p>0,00022523148148148100</text:p>
          </table:table-cell>
          <table:table-cell table:formula="of:=[.D280]-[.D27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7" office:value-type="float" office:value="1953" calcext:value-type="float">
            <text:p>1953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226041666666667" calcext:value-type="float">
            <text:p>0,00022604166666666700</text:p>
          </table:table-cell>
          <table:table-cell table:formula="of:=[.D281]-[.D280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7" office:value-type="float" office:value="1960" calcext:value-type="float">
            <text:p>196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226851851851852" calcext:value-type="float">
            <text:p>0,00022685185185185200</text:p>
          </table:table-cell>
          <table:table-cell table:formula="of:=[.D282]-[.D28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7" office:value-type="float" office:value="1967" calcext:value-type="float">
            <text:p>1967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227662037037037" calcext:value-type="float">
            <text:p>0,00022766203703703700</text:p>
          </table:table-cell>
          <table:table-cell table:formula="of:=[.D283]-[.D28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7" office:value-type="float" office:value="1974" calcext:value-type="float">
            <text:p>1974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228472222222222" calcext:value-type="float">
            <text:p>0,00022847222222222200</text:p>
          </table:table-cell>
          <table:table-cell table:formula="of:=[.D284]-[.D28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7" office:value-type="float" office:value="1981" calcext:value-type="float">
            <text:p>1981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229282407407407" calcext:value-type="float">
            <text:p>0,00022928240740740700</text:p>
          </table:table-cell>
          <table:table-cell table:formula="of:=[.D285]-[.D28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7" office:value-type="float" office:value="1988" calcext:value-type="float">
            <text:p>1988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230092592592593" calcext:value-type="float">
            <text:p>0,00023009259259259300</text:p>
          </table:table-cell>
          <table:table-cell table:formula="of:=[.D286]-[.D285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7" office:value-type="float" office:value="1995" calcext:value-type="float">
            <text:p>199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230902777777778" calcext:value-type="float">
            <text:p>0,00023090277777777800</text:p>
          </table:table-cell>
          <table:table-cell table:formula="of:=[.D287]-[.D28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7" office:value-type="float" office:value="2002" calcext:value-type="float">
            <text:p>2002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231712962962963" calcext:value-type="float">
            <text:p>0,00023171296296296300</text:p>
          </table:table-cell>
          <table:table-cell table:formula="of:=[.D288]-[.D28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7" office:value-type="float" office:value="2009" calcext:value-type="float">
            <text:p>2009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232523148148148" calcext:value-type="float">
            <text:p>0,00023252314814814800</text:p>
          </table:table-cell>
          <table:table-cell table:formula="of:=[.D289]-[.D28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7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233333333333333" calcext:value-type="float">
            <text:p>0,00023333333333333300</text:p>
          </table:table-cell>
          <table:table-cell table:formula="of:=[.D290]-[.D28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7" office:value-type="float" office:value="2023" calcext:value-type="float">
            <text:p>2023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234143518518519" calcext:value-type="float">
            <text:p>0,00023414351851851900</text:p>
          </table:table-cell>
          <table:table-cell table:formula="of:=[.D291]-[.D29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7" office:value-type="float" office:value="2030" calcext:value-type="float">
            <text:p>203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234953703703704" calcext:value-type="float">
            <text:p>0,00023495370370370400</text:p>
          </table:table-cell>
          <table:table-cell table:formula="of:=[.D292]-[.D291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7" office:value-type="float" office:value="2037" calcext:value-type="float">
            <text:p>2037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235763888888889" calcext:value-type="float">
            <text:p>0,00023576388888888900</text:p>
          </table:table-cell>
          <table:table-cell table:formula="of:=[.D293]-[.D29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7" office:value-type="float" office:value="2044" calcext:value-type="float">
            <text:p>2044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236574074074074" calcext:value-type="float">
            <text:p>0,00023657407407407400</text:p>
          </table:table-cell>
          <table:table-cell table:formula="of:=[.D294]-[.D29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7" office:value-type="float" office:value="2051" calcext:value-type="float">
            <text:p>2051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237384259259259" calcext:value-type="float">
            <text:p>0,00023738425925925900</text:p>
          </table:table-cell>
          <table:table-cell table:formula="of:=[.D295]-[.D29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7" office:value-type="float" office:value="2058" calcext:value-type="float">
            <text:p>2058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238194444444444" calcext:value-type="float">
            <text:p>0,00023819444444444400</text:p>
          </table:table-cell>
          <table:table-cell table:formula="of:=[.D296]-[.D29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7" office:value-type="float" office:value="2065" calcext:value-type="float">
            <text:p>206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23900462962963" calcext:value-type="float">
            <text:p>0,00023900462962963000</text:p>
          </table:table-cell>
          <table:table-cell table:formula="of:=[.D297]-[.D296]" office:value-type="float" office:value="0.000000810185185185207" calcext:value-type="float">
            <text:p>0,0000008101851851852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7" office:value-type="float" office:value="2072" calcext:value-type="float">
            <text:p>2072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239814814814815" calcext:value-type="float">
            <text:p>0,00023981481481481500</text:p>
          </table:table-cell>
          <table:table-cell table:formula="of:=[.D298]-[.D29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7" office:value-type="float" office:value="2079" calcext:value-type="float">
            <text:p>2079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240625" calcext:value-type="float">
            <text:p>0,00024062500000000000</text:p>
          </table:table-cell>
          <table:table-cell table:formula="of:=[.D299]-[.D29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7" office:value-type="float" office:value="2086" calcext:value-type="float">
            <text:p>2086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241435185185185" calcext:value-type="float">
            <text:p>0,00024143518518518500</text:p>
          </table:table-cell>
          <table:table-cell table:formula="of:=[.D300]-[.D29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7" office:value-type="float" office:value="2093" calcext:value-type="float">
            <text:p>2093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24224537037037" calcext:value-type="float">
            <text:p>0,00024224537037037000</text:p>
          </table:table-cell>
          <table:table-cell table:formula="of:=[.D301]-[.D30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7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243055555555556" calcext:value-type="float">
            <text:p>0,00024305555555555600</text:p>
          </table:table-cell>
          <table:table-cell table:formula="of:=[.D302]-[.D30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7" office:value-type="float" office:value="2107" calcext:value-type="float">
            <text:p>2107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243865740740741" calcext:value-type="float">
            <text:p>0,00024386574074074100</text:p>
          </table:table-cell>
          <table:table-cell table:formula="of:=[.D303]-[.D30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7" office:value-type="float" office:value="2114" calcext:value-type="float">
            <text:p>2114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244675925925926" calcext:value-type="float">
            <text:p>0,00024467592592592600</text:p>
          </table:table-cell>
          <table:table-cell table:formula="of:=[.D304]-[.D30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7" office:value-type="float" office:value="2121" calcext:value-type="float">
            <text:p>2121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245486111111111" calcext:value-type="float">
            <text:p>0,00024548611111111100</text:p>
          </table:table-cell>
          <table:table-cell table:formula="of:=[.D305]-[.D30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7" office:value-type="float" office:value="2128" calcext:value-type="float">
            <text:p>2128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246296296296296" calcext:value-type="float">
            <text:p>0,00024629629629629600</text:p>
          </table:table-cell>
          <table:table-cell table:formula="of:=[.D306]-[.D305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7" office:value-type="float" office:value="2135" calcext:value-type="float">
            <text:p>213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247106481481482" calcext:value-type="float">
            <text:p>0,00024710648148148200</text:p>
          </table:table-cell>
          <table:table-cell table:formula="of:=[.D307]-[.D30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7" office:value-type="float" office:value="2142" calcext:value-type="float">
            <text:p>2142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247916666666667" calcext:value-type="float">
            <text:p>0,00024791666666666700</text:p>
          </table:table-cell>
          <table:table-cell table:formula="of:=[.D308]-[.D30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7" office:value-type="float" office:value="2149" calcext:value-type="float">
            <text:p>2149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248726851851852" calcext:value-type="float">
            <text:p>0,00024872685185185200</text:p>
          </table:table-cell>
          <table:table-cell table:formula="of:=[.D309]-[.D30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7" office:value-type="float" office:value="2156" calcext:value-type="float">
            <text:p>2156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249537037037037" calcext:value-type="float">
            <text:p>0,00024953703703703700</text:p>
          </table:table-cell>
          <table:table-cell table:formula="of:=[.D310]-[.D30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7" office:value-type="float" office:value="2163" calcext:value-type="float">
            <text:p>2163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250347222222222" calcext:value-type="float">
            <text:p>0,00025034722222222200</text:p>
          </table:table-cell>
          <table:table-cell table:formula="of:=[.D311]-[.D31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7" office:value-type="float" office:value="2170" calcext:value-type="float">
            <text:p>217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251157407407407" calcext:value-type="float">
            <text:p>0,00025115740740740700</text:p>
          </table:table-cell>
          <table:table-cell table:formula="of:=[.D312]-[.D31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7" office:value-type="float" office:value="2177" calcext:value-type="float">
            <text:p>2177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251967592592593" calcext:value-type="float">
            <text:p>0,00025196759259259300</text:p>
          </table:table-cell>
          <table:table-cell table:formula="of:=[.D313]-[.D31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7" office:value-type="float" office:value="2184" calcext:value-type="float">
            <text:p>2184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252777777777778" calcext:value-type="float">
            <text:p>0,00025277777777777800</text:p>
          </table:table-cell>
          <table:table-cell table:formula="of:=[.D314]-[.D31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7" office:value-type="float" office:value="2191" calcext:value-type="float">
            <text:p>2191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253587962962963" calcext:value-type="float">
            <text:p>0,00025358796296296300</text:p>
          </table:table-cell>
          <table:table-cell table:formula="of:=[.D315]-[.D31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7" office:value-type="float" office:value="2198" calcext:value-type="float">
            <text:p>2198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254398148148148" calcext:value-type="float">
            <text:p>0,00025439814814814800</text:p>
          </table:table-cell>
          <table:table-cell table:formula="of:=[.D316]-[.D31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7" office:value-type="float" office:value="2205" calcext:value-type="float">
            <text:p>220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255208333333333" calcext:value-type="float">
            <text:p>0,00025520833333333300</text:p>
          </table:table-cell>
          <table:table-cell table:formula="of:=[.D317]-[.D316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7" office:value-type="float" office:value="2212" calcext:value-type="float">
            <text:p>2212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256018518518519" calcext:value-type="float">
            <text:p>0,00025601851851851900</text:p>
          </table:table-cell>
          <table:table-cell table:formula="of:=[.D318]-[.D31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7" office:value-type="float" office:value="2219" calcext:value-type="float">
            <text:p>2219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256828703703704" calcext:value-type="float">
            <text:p>0,00025682870370370400</text:p>
          </table:table-cell>
          <table:table-cell table:formula="of:=[.D319]-[.D31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7" office:value-type="float" office:value="2226" calcext:value-type="float">
            <text:p>2226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257638888888889" calcext:value-type="float">
            <text:p>0,00025763888888888900</text:p>
          </table:table-cell>
          <table:table-cell table:formula="of:=[.D320]-[.D31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7" office:value-type="float" office:value="2233" calcext:value-type="float">
            <text:p>2233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258449074074074" calcext:value-type="float">
            <text:p>0,00025844907407407400</text:p>
          </table:table-cell>
          <table:table-cell table:formula="of:=[.D321]-[.D32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7" office:value-type="float" office:value="2240" calcext:value-type="float">
            <text:p>224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259259259259259" calcext:value-type="float">
            <text:p>0,00025925925925925900</text:p>
          </table:table-cell>
          <table:table-cell table:formula="of:=[.D322]-[.D32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7" office:value-type="float" office:value="2247" calcext:value-type="float">
            <text:p>2247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260069444444444" calcext:value-type="float">
            <text:p>0,00026006944444444400</text:p>
          </table:table-cell>
          <table:table-cell table:formula="of:=[.D323]-[.D32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7" office:value-type="float" office:value="2254" calcext:value-type="float">
            <text:p>2254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26087962962963" calcext:value-type="float">
            <text:p>0,00026087962962963000</text:p>
          </table:table-cell>
          <table:table-cell table:formula="of:=[.D324]-[.D32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7" office:value-type="float" office:value="2261" calcext:value-type="float">
            <text:p>2261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261689814814815" calcext:value-type="float">
            <text:p>0,00026168981481481500</text:p>
          </table:table-cell>
          <table:table-cell table:formula="of:=[.D325]-[.D32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7" office:value-type="float" office:value="2268" calcext:value-type="float">
            <text:p>2268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2625" calcext:value-type="float">
            <text:p>0,00026250000000000000</text:p>
          </table:table-cell>
          <table:table-cell table:formula="of:=[.D326]-[.D32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7" office:value-type="float" office:value="2275" calcext:value-type="float">
            <text:p>227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263310185185185" calcext:value-type="float">
            <text:p>0,00026331018518518500</text:p>
          </table:table-cell>
          <table:table-cell table:formula="of:=[.D327]-[.D32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7" office:value-type="float" office:value="2282" calcext:value-type="float">
            <text:p>2282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26412037037037" calcext:value-type="float">
            <text:p>0,00026412037037037000</text:p>
          </table:table-cell>
          <table:table-cell table:formula="of:=[.D328]-[.D327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7" office:value-type="float" office:value="2289" calcext:value-type="float">
            <text:p>2289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264930555555556" calcext:value-type="float">
            <text:p>0,00026493055555555600</text:p>
          </table:table-cell>
          <table:table-cell table:formula="of:=[.D329]-[.D32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7" office:value-type="float" office:value="2296" calcext:value-type="float">
            <text:p>2296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265740740740741" calcext:value-type="float">
            <text:p>0,00026574074074074100</text:p>
          </table:table-cell>
          <table:table-cell table:formula="of:=[.D330]-[.D32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7" office:value-type="float" office:value="2303" calcext:value-type="float">
            <text:p>2303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266550925925926" calcext:value-type="float">
            <text:p>0,00026655092592592600</text:p>
          </table:table-cell>
          <table:table-cell table:formula="of:=[.D331]-[.D33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7" office:value-type="float" office:value="2310" calcext:value-type="float">
            <text:p>231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267361111111111" calcext:value-type="float">
            <text:p>0,00026736111111111100</text:p>
          </table:table-cell>
          <table:table-cell table:formula="of:=[.D332]-[.D33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7" office:value-type="float" office:value="2317" calcext:value-type="float">
            <text:p>2317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268171296296296" calcext:value-type="float">
            <text:p>0,00026817129629629600</text:p>
          </table:table-cell>
          <table:table-cell table:formula="of:=[.D333]-[.D33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7" office:value-type="float" office:value="2324" calcext:value-type="float">
            <text:p>2324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268981481481482" calcext:value-type="float">
            <text:p>0,00026898148148148200</text:p>
          </table:table-cell>
          <table:table-cell table:formula="of:=[.D334]-[.D33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7" office:value-type="float" office:value="2331" calcext:value-type="float">
            <text:p>2331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269791666666667" calcext:value-type="float">
            <text:p>0,00026979166666666700</text:p>
          </table:table-cell>
          <table:table-cell table:formula="of:=[.D335]-[.D33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7" office:value-type="float" office:value="2338" calcext:value-type="float">
            <text:p>2338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270601851851852" calcext:value-type="float">
            <text:p>0,00027060185185185200</text:p>
          </table:table-cell>
          <table:table-cell table:formula="of:=[.D336]-[.D33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7" office:value-type="float" office:value="2345" calcext:value-type="float">
            <text:p>234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271412037037037" calcext:value-type="float">
            <text:p>0,00027141203703703700</text:p>
          </table:table-cell>
          <table:table-cell table:formula="of:=[.D337]-[.D33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7" office:value-type="float" office:value="2352" calcext:value-type="float">
            <text:p>2352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272222222222222" calcext:value-type="float">
            <text:p>0,00027222222222222200</text:p>
          </table:table-cell>
          <table:table-cell table:formula="of:=[.D338]-[.D33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7" office:value-type="float" office:value="2359" calcext:value-type="float">
            <text:p>2359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273032407407407" calcext:value-type="float">
            <text:p>0,00027303240740740700</text:p>
          </table:table-cell>
          <table:table-cell table:formula="of:=[.D339]-[.D338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7" office:value-type="float" office:value="2366" calcext:value-type="float">
            <text:p>2366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273842592592593" calcext:value-type="float">
            <text:p>0,00027384259259259300</text:p>
          </table:table-cell>
          <table:table-cell table:formula="of:=[.D340]-[.D33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7" office:value-type="float" office:value="2373" calcext:value-type="float">
            <text:p>2373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274652777777778" calcext:value-type="float">
            <text:p>0,00027465277777777800</text:p>
          </table:table-cell>
          <table:table-cell table:formula="of:=[.D341]-[.D34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7" office:value-type="float" office:value="2380" calcext:value-type="float">
            <text:p>238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275462962962963" calcext:value-type="float">
            <text:p>0,00027546296296296300</text:p>
          </table:table-cell>
          <table:table-cell table:formula="of:=[.D342]-[.D34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7" office:value-type="float" office:value="2387" calcext:value-type="float">
            <text:p>2387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276273148148148" calcext:value-type="float">
            <text:p>0,00027627314814814800</text:p>
          </table:table-cell>
          <table:table-cell table:formula="of:=[.D343]-[.D34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7" office:value-type="float" office:value="2394" calcext:value-type="float">
            <text:p>2394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277083333333333" calcext:value-type="float">
            <text:p>0,00027708333333333300</text:p>
          </table:table-cell>
          <table:table-cell table:formula="of:=[.D344]-[.D34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7" office:value-type="float" office:value="2401" calcext:value-type="float">
            <text:p>2401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277893518518519" calcext:value-type="float">
            <text:p>0,00027789351851851900</text:p>
          </table:table-cell>
          <table:table-cell table:formula="of:=[.D345]-[.D34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7" office:value-type="float" office:value="2408" calcext:value-type="float">
            <text:p>2408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278703703703704" calcext:value-type="float">
            <text:p>0,00027870370370370400</text:p>
          </table:table-cell>
          <table:table-cell table:formula="of:=[.D346]-[.D34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7" office:value-type="float" office:value="2415" calcext:value-type="float">
            <text:p>241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279513888888889" calcext:value-type="float">
            <text:p>0,00027951388888888900</text:p>
          </table:table-cell>
          <table:table-cell table:formula="of:=[.D347]-[.D34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7" office:value-type="float" office:value="2422" calcext:value-type="float">
            <text:p>2422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280324074074074" calcext:value-type="float">
            <text:p>0,00028032407407407400</text:p>
          </table:table-cell>
          <table:table-cell table:formula="of:=[.D348]-[.D34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7" office:value-type="float" office:value="2429" calcext:value-type="float">
            <text:p>2429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281134259259259" calcext:value-type="float">
            <text:p>0,00028113425925925900</text:p>
          </table:table-cell>
          <table:table-cell table:formula="of:=[.D349]-[.D34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7" office:value-type="float" office:value="2436" calcext:value-type="float">
            <text:p>2436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281944444444444" calcext:value-type="float">
            <text:p>0,00028194444444444400</text:p>
          </table:table-cell>
          <table:table-cell table:formula="of:=[.D350]-[.D349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7" office:value-type="float" office:value="2443" calcext:value-type="float">
            <text:p>2443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28275462962963" calcext:value-type="float">
            <text:p>0,00028275462962963000</text:p>
          </table:table-cell>
          <table:table-cell table:formula="of:=[.D351]-[.D35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7" office:value-type="float" office:value="2450" calcext:value-type="float">
            <text:p>24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283564814814815" calcext:value-type="float">
            <text:p>0,00028356481481481500</text:p>
          </table:table-cell>
          <table:table-cell table:formula="of:=[.D352]-[.D35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7" office:value-type="float" office:value="2457" calcext:value-type="float">
            <text:p>2457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284375" calcext:value-type="float">
            <text:p>0,00028437500000000000</text:p>
          </table:table-cell>
          <table:table-cell table:formula="of:=[.D353]-[.D35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7" office:value-type="float" office:value="2464" calcext:value-type="float">
            <text:p>2464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285185185185185" calcext:value-type="float">
            <text:p>0,00028518518518518500</text:p>
          </table:table-cell>
          <table:table-cell table:formula="of:=[.D354]-[.D35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7" office:value-type="float" office:value="2471" calcext:value-type="float">
            <text:p>2471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28599537037037" calcext:value-type="float">
            <text:p>0,00028599537037037000</text:p>
          </table:table-cell>
          <table:table-cell table:formula="of:=[.D355]-[.D35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7" office:value-type="float" office:value="2478" calcext:value-type="float">
            <text:p>2478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286805555555556" calcext:value-type="float">
            <text:p>0,00028680555555555600</text:p>
          </table:table-cell>
          <table:table-cell table:formula="of:=[.D356]-[.D35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7" office:value-type="float" office:value="2485" calcext:value-type="float">
            <text:p>248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287615740740741" calcext:value-type="float">
            <text:p>0,00028761574074074100</text:p>
          </table:table-cell>
          <table:table-cell table:formula="of:=[.D357]-[.D35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7" office:value-type="float" office:value="2492" calcext:value-type="float">
            <text:p>2492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288425925925926" calcext:value-type="float">
            <text:p>0,00028842592592592600</text:p>
          </table:table-cell>
          <table:table-cell table:formula="of:=[.D358]-[.D35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7" office:value-type="float" office:value="2499" calcext:value-type="float">
            <text:p>2499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289236111111111" calcext:value-type="float">
            <text:p>0,00028923611111111100</text:p>
          </table:table-cell>
          <table:table-cell table:formula="of:=[.D359]-[.D35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7" office:value-type="float" office:value="2506" calcext:value-type="float">
            <text:p>2506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290046296296296" calcext:value-type="float">
            <text:p>0,00029004629629629600</text:p>
          </table:table-cell>
          <table:table-cell table:formula="of:=[.D360]-[.D35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7" office:value-type="float" office:value="2513" calcext:value-type="float">
            <text:p>2513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290856481481481" calcext:value-type="float">
            <text:p>0,00029085648148148100</text:p>
          </table:table-cell>
          <table:table-cell table:formula="of:=[.D361]-[.D360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7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0291666666666667" calcext:value-type="float">
            <text:p>0,00029166666666666700</text:p>
          </table:table-cell>
          <table:table-cell table:formula="of:=[.D362]-[.D36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7" office:value-type="float" office:value="2527" calcext:value-type="float">
            <text:p>2527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0292476851851852" calcext:value-type="float">
            <text:p>0,00029247685185185200</text:p>
          </table:table-cell>
          <table:table-cell table:formula="of:=[.D363]-[.D36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7" office:value-type="float" office:value="2534" calcext:value-type="float">
            <text:p>2534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0293287037037037" calcext:value-type="float">
            <text:p>0,00029328703703703700</text:p>
          </table:table-cell>
          <table:table-cell table:formula="of:=[.D364]-[.D36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7" office:value-type="float" office:value="2541" calcext:value-type="float">
            <text:p>2541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0294097222222222" calcext:value-type="float">
            <text:p>0,00029409722222222200</text:p>
          </table:table-cell>
          <table:table-cell table:formula="of:=[.D365]-[.D36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7" office:value-type="float" office:value="2548" calcext:value-type="float">
            <text:p>2548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0294907407407407" calcext:value-type="float">
            <text:p>0,00029490740740740700</text:p>
          </table:table-cell>
          <table:table-cell table:formula="of:=[.D366]-[.D36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7" office:value-type="float" office:value="2555" calcext:value-type="float">
            <text:p>255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0295717592592593" calcext:value-type="float">
            <text:p>0,00029571759259259300</text:p>
          </table:table-cell>
          <table:table-cell table:formula="of:=[.D367]-[.D36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7" office:value-type="float" office:value="2562" calcext:value-type="float">
            <text:p>2562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0296527777777778" calcext:value-type="float">
            <text:p>0,00029652777777777800</text:p>
          </table:table-cell>
          <table:table-cell table:formula="of:=[.D368]-[.D36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7" office:value-type="float" office:value="2569" calcext:value-type="float">
            <text:p>2569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0297337962962963" calcext:value-type="float">
            <text:p>0,00029733796296296300</text:p>
          </table:table-cell>
          <table:table-cell table:formula="of:=[.D369]-[.D36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7" office:value-type="float" office:value="2576" calcext:value-type="float">
            <text:p>2576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0298148148148148" calcext:value-type="float">
            <text:p>0,00029814814814814800</text:p>
          </table:table-cell>
          <table:table-cell table:formula="of:=[.D370]-[.D36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7" office:value-type="float" office:value="2583" calcext:value-type="float">
            <text:p>2583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0298958333333333" calcext:value-type="float">
            <text:p>0,00029895833333333300</text:p>
          </table:table-cell>
          <table:table-cell table:formula="of:=[.D371]-[.D37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7" office:value-type="float" office:value="2590" calcext:value-type="float">
            <text:p>259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0299768518518519" calcext:value-type="float">
            <text:p>0,00029976851851851900</text:p>
          </table:table-cell>
          <table:table-cell table:formula="of:=[.D372]-[.D371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7" office:value-type="float" office:value="2597" calcext:value-type="float">
            <text:p>2597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0300578703703704" calcext:value-type="float">
            <text:p>0,00030057870370370400</text:p>
          </table:table-cell>
          <table:table-cell table:formula="of:=[.D373]-[.D37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7" office:value-type="float" office:value="2604" calcext:value-type="float">
            <text:p>2604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0301388888888889" calcext:value-type="float">
            <text:p>0,00030138888888888900</text:p>
          </table:table-cell>
          <table:table-cell table:formula="of:=[.D374]-[.D37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7" office:value-type="float" office:value="2611" calcext:value-type="float">
            <text:p>2611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0302199074074074" calcext:value-type="float">
            <text:p>0,00030219907407407400</text:p>
          </table:table-cell>
          <table:table-cell table:formula="of:=[.D375]-[.D37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7" office:value-type="float" office:value="2618" calcext:value-type="float">
            <text:p>2618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0303009259259259" calcext:value-type="float">
            <text:p>0,00030300925925925900</text:p>
          </table:table-cell>
          <table:table-cell table:formula="of:=[.D376]-[.D37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7" office:value-type="float" office:value="2625" calcext:value-type="float">
            <text:p>262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0303819444444444" calcext:value-type="float">
            <text:p>0,00030381944444444400</text:p>
          </table:table-cell>
          <table:table-cell table:formula="of:=[.D377]-[.D37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7" office:value-type="float" office:value="2632" calcext:value-type="float">
            <text:p>2632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030462962962963" calcext:value-type="float">
            <text:p>0,00030462962962963000</text:p>
          </table:table-cell>
          <table:table-cell table:formula="of:=[.D378]-[.D37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7" office:value-type="float" office:value="2639" calcext:value-type="float">
            <text:p>2639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0305439814814815" calcext:value-type="float">
            <text:p>0,00030543981481481500</text:p>
          </table:table-cell>
          <table:table-cell table:formula="of:=[.D379]-[.D37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7" office:value-type="float" office:value="2646" calcext:value-type="float">
            <text:p>2646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030625" calcext:value-type="float">
            <text:p>0,00030625000000000000</text:p>
          </table:table-cell>
          <table:table-cell table:formula="of:=[.D380]-[.D37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7" office:value-type="float" office:value="2653" calcext:value-type="float">
            <text:p>2653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0307060185185185" calcext:value-type="float">
            <text:p>0,00030706018518518500</text:p>
          </table:table-cell>
          <table:table-cell table:formula="of:=[.D381]-[.D38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7" office:value-type="float" office:value="2660" calcext:value-type="float">
            <text:p>266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030787037037037" calcext:value-type="float">
            <text:p>0,00030787037037037000</text:p>
          </table:table-cell>
          <table:table-cell table:formula="of:=[.D382]-[.D38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7" office:value-type="float" office:value="2667" calcext:value-type="float">
            <text:p>2667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0308680555555556" calcext:value-type="float">
            <text:p>0,00030868055555555600</text:p>
          </table:table-cell>
          <table:table-cell table:formula="of:=[.D383]-[.D382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7" office:value-type="float" office:value="2674" calcext:value-type="float">
            <text:p>2674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0309490740740741" calcext:value-type="float">
            <text:p>0,00030949074074074100</text:p>
          </table:table-cell>
          <table:table-cell table:formula="of:=[.D384]-[.D38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7" office:value-type="float" office:value="2681" calcext:value-type="float">
            <text:p>2681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0310300925925926" calcext:value-type="float">
            <text:p>0,00031030092592592600</text:p>
          </table:table-cell>
          <table:table-cell table:formula="of:=[.D385]-[.D38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7" office:value-type="float" office:value="2688" calcext:value-type="float">
            <text:p>2688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0311111111111111" calcext:value-type="float">
            <text:p>0,00031111111111111100</text:p>
          </table:table-cell>
          <table:table-cell table:formula="of:=[.D386]-[.D38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7" office:value-type="float" office:value="2695" calcext:value-type="float">
            <text:p>269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0311921296296296" calcext:value-type="float">
            <text:p>0,00031192129629629600</text:p>
          </table:table-cell>
          <table:table-cell table:formula="of:=[.D387]-[.D38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7" office:value-type="float" office:value="2702" calcext:value-type="float">
            <text:p>2702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0312731481481482" calcext:value-type="float">
            <text:p>0,00031273148148148200</text:p>
          </table:table-cell>
          <table:table-cell table:formula="of:=[.D388]-[.D38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7" office:value-type="float" office:value="2709" calcext:value-type="float">
            <text:p>2709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0313541666666667" calcext:value-type="float">
            <text:p>0,00031354166666666700</text:p>
          </table:table-cell>
          <table:table-cell table:formula="of:=[.D389]-[.D38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7" office:value-type="float" office:value="2716" calcext:value-type="float">
            <text:p>2716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0314351851851852" calcext:value-type="float">
            <text:p>0,00031435185185185200</text:p>
          </table:table-cell>
          <table:table-cell table:formula="of:=[.D390]-[.D38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7" office:value-type="float" office:value="2723" calcext:value-type="float">
            <text:p>2723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0315162037037037" calcext:value-type="float">
            <text:p>0,00031516203703703700</text:p>
          </table:table-cell>
          <table:table-cell table:formula="of:=[.D391]-[.D39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7" office:value-type="float" office:value="2730" calcext:value-type="float">
            <text:p>273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0315972222222222" calcext:value-type="float">
            <text:p>0,00031597222222222200</text:p>
          </table:table-cell>
          <table:table-cell table:formula="of:=[.D392]-[.D39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7" office:value-type="float" office:value="2737" calcext:value-type="float">
            <text:p>2737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0316782407407407" calcext:value-type="float">
            <text:p>0,00031678240740740700</text:p>
          </table:table-cell>
          <table:table-cell table:formula="of:=[.D393]-[.D39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7" office:value-type="float" office:value="2744" calcext:value-type="float">
            <text:p>2744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0317592592592593" calcext:value-type="float">
            <text:p>0,00031759259259259300</text:p>
          </table:table-cell>
          <table:table-cell table:formula="of:=[.D394]-[.D393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7" office:value-type="float" office:value="2751" calcext:value-type="float">
            <text:p>2751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0318402777777778" calcext:value-type="float">
            <text:p>0,00031840277777777800</text:p>
          </table:table-cell>
          <table:table-cell table:formula="of:=[.D395]-[.D39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7" office:value-type="float" office:value="2758" calcext:value-type="float">
            <text:p>2758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0319212962962963" calcext:value-type="float">
            <text:p>0,00031921296296296300</text:p>
          </table:table-cell>
          <table:table-cell table:formula="of:=[.D396]-[.D39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7" office:value-type="float" office:value="2765" calcext:value-type="float">
            <text:p>276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0320023148148148" calcext:value-type="float">
            <text:p>0,00032002314814814800</text:p>
          </table:table-cell>
          <table:table-cell table:formula="of:=[.D397]-[.D39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7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0320833333333333" calcext:value-type="float">
            <text:p>0,00032083333333333300</text:p>
          </table:table-cell>
          <table:table-cell table:formula="of:=[.D398]-[.D39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7" office:value-type="float" office:value="2779" calcext:value-type="float">
            <text:p>2779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0321643518518519" calcext:value-type="float">
            <text:p>0,00032164351851851900</text:p>
          </table:table-cell>
          <table:table-cell table:formula="of:=[.D399]-[.D39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7" office:value-type="float" office:value="2786" calcext:value-type="float">
            <text:p>2786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0322453703703704" calcext:value-type="float">
            <text:p>0,00032245370370370400</text:p>
          </table:table-cell>
          <table:table-cell table:formula="of:=[.D400]-[.D39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7" office:value-type="float" office:value="2793" calcext:value-type="float">
            <text:p>2793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0323263888888889" calcext:value-type="float">
            <text:p>0,00032326388888888900</text:p>
          </table:table-cell>
          <table:table-cell table:formula="of:=[.D401]-[.D40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7" office:value-type="float" office:value="2800" calcext:value-type="float">
            <text:p>28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0324074074074074" calcext:value-type="float">
            <text:p>0,00032407407407407400</text:p>
          </table:table-cell>
          <table:table-cell table:formula="of:=[.D402]-[.D40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7" office:value-type="float" office:value="2807" calcext:value-type="float">
            <text:p>2807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0324884259259259" calcext:value-type="float">
            <text:p>0,00032488425925925900</text:p>
          </table:table-cell>
          <table:table-cell table:formula="of:=[.D403]-[.D40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7" office:value-type="float" office:value="2814" calcext:value-type="float">
            <text:p>2814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0325694444444444" calcext:value-type="float">
            <text:p>0,00032569444444444400</text:p>
          </table:table-cell>
          <table:table-cell table:formula="of:=[.D404]-[.D40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7" office:value-type="float" office:value="2821" calcext:value-type="float">
            <text:p>2821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032650462962963" calcext:value-type="float">
            <text:p>0,00032650462962963000</text:p>
          </table:table-cell>
          <table:table-cell table:formula="of:=[.D405]-[.D404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7" office:value-type="float" office:value="2828" calcext:value-type="float">
            <text:p>2828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0327314814814815" calcext:value-type="float">
            <text:p>0,00032731481481481500</text:p>
          </table:table-cell>
          <table:table-cell table:formula="of:=[.D406]-[.D40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7" office:value-type="float" office:value="2835" calcext:value-type="float">
            <text:p>283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0328125" calcext:value-type="float">
            <text:p>0,00032812500000000000</text:p>
          </table:table-cell>
          <table:table-cell table:formula="of:=[.D407]-[.D40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7" office:value-type="float" office:value="2842" calcext:value-type="float">
            <text:p>2842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0328935185185185" calcext:value-type="float">
            <text:p>0,00032893518518518500</text:p>
          </table:table-cell>
          <table:table-cell table:formula="of:=[.D408]-[.D40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7" office:value-type="float" office:value="2849" calcext:value-type="float">
            <text:p>2849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032974537037037" calcext:value-type="float">
            <text:p>0,00032974537037037000</text:p>
          </table:table-cell>
          <table:table-cell table:formula="of:=[.D409]-[.D40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7" office:value-type="float" office:value="2856" calcext:value-type="float">
            <text:p>2856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0330555555555556" calcext:value-type="float">
            <text:p>0,00033055555555555600</text:p>
          </table:table-cell>
          <table:table-cell table:formula="of:=[.D410]-[.D40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7" office:value-type="float" office:value="2863" calcext:value-type="float">
            <text:p>2863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0331365740740741" calcext:value-type="float">
            <text:p>0,00033136574074074100</text:p>
          </table:table-cell>
          <table:table-cell table:formula="of:=[.D411]-[.D41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7" office:value-type="float" office:value="2870" calcext:value-type="float">
            <text:p>287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0332175925925926" calcext:value-type="float">
            <text:p>0,00033217592592592600</text:p>
          </table:table-cell>
          <table:table-cell table:formula="of:=[.D412]-[.D41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7" office:value-type="float" office:value="2877" calcext:value-type="float">
            <text:p>2877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0332986111111111" calcext:value-type="float">
            <text:p>0,00033298611111111100</text:p>
          </table:table-cell>
          <table:table-cell table:formula="of:=[.D413]-[.D41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7" office:value-type="float" office:value="2884" calcext:value-type="float">
            <text:p>2884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0333796296296296" calcext:value-type="float">
            <text:p>0,00033379629629629600</text:p>
          </table:table-cell>
          <table:table-cell table:formula="of:=[.D414]-[.D41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7" office:value-type="float" office:value="2891" calcext:value-type="float">
            <text:p>2891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0334606481481481" calcext:value-type="float">
            <text:p>0,00033460648148148100</text:p>
          </table:table-cell>
          <table:table-cell table:formula="of:=[.D415]-[.D41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7" office:value-type="float" office:value="2898" calcext:value-type="float">
            <text:p>2898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0335416666666667" calcext:value-type="float">
            <text:p>0,00033541666666666700</text:p>
          </table:table-cell>
          <table:table-cell table:formula="of:=[.D416]-[.D415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7" office:value-type="float" office:value="2905" calcext:value-type="float">
            <text:p>290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0336226851851852" calcext:value-type="float">
            <text:p>0,00033622685185185200</text:p>
          </table:table-cell>
          <table:table-cell table:formula="of:=[.D417]-[.D41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7" office:value-type="float" office:value="2912" calcext:value-type="float">
            <text:p>2912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0337037037037037" calcext:value-type="float">
            <text:p>0,00033703703703703700</text:p>
          </table:table-cell>
          <table:table-cell table:formula="of:=[.D418]-[.D41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7" office:value-type="float" office:value="2919" calcext:value-type="float">
            <text:p>2919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0337847222222222" calcext:value-type="float">
            <text:p>0,00033784722222222200</text:p>
          </table:table-cell>
          <table:table-cell table:formula="of:=[.D419]-[.D41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7" office:value-type="float" office:value="2926" calcext:value-type="float">
            <text:p>2926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0338657407407407" calcext:value-type="float">
            <text:p>0,00033865740740740700</text:p>
          </table:table-cell>
          <table:table-cell table:formula="of:=[.D420]-[.D41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7" office:value-type="float" office:value="2933" calcext:value-type="float">
            <text:p>2933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0339467592592593" calcext:value-type="float">
            <text:p>0,00033946759259259300</text:p>
          </table:table-cell>
          <table:table-cell table:formula="of:=[.D421]-[.D42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7" office:value-type="float" office:value="2940" calcext:value-type="float">
            <text:p>294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0340277777777778" calcext:value-type="float">
            <text:p>0,00034027777777777800</text:p>
          </table:table-cell>
          <table:table-cell table:formula="of:=[.D422]-[.D42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7" office:value-type="float" office:value="2947" calcext:value-type="float">
            <text:p>2947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0341087962962963" calcext:value-type="float">
            <text:p>0,00034108796296296300</text:p>
          </table:table-cell>
          <table:table-cell table:formula="of:=[.D423]-[.D42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7" office:value-type="float" office:value="2954" calcext:value-type="float">
            <text:p>2954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0341898148148148" calcext:value-type="float">
            <text:p>0,00034189814814814800</text:p>
          </table:table-cell>
          <table:table-cell table:formula="of:=[.D424]-[.D42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7" office:value-type="float" office:value="2961" calcext:value-type="float">
            <text:p>2961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0342708333333333" calcext:value-type="float">
            <text:p>0,00034270833333333300</text:p>
          </table:table-cell>
          <table:table-cell table:formula="of:=[.D425]-[.D42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7" office:value-type="float" office:value="2968" calcext:value-type="float">
            <text:p>2968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0343518518518519" calcext:value-type="float">
            <text:p>0,00034351851851851900</text:p>
          </table:table-cell>
          <table:table-cell table:formula="of:=[.D426]-[.D42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7" office:value-type="float" office:value="2975" calcext:value-type="float">
            <text:p>297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0344328703703704" calcext:value-type="float">
            <text:p>0,00034432870370370400</text:p>
          </table:table-cell>
          <table:table-cell table:formula="of:=[.D427]-[.D426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7" office:value-type="float" office:value="2982" calcext:value-type="float">
            <text:p>2982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0345138888888889" calcext:value-type="float">
            <text:p>0,00034513888888888900</text:p>
          </table:table-cell>
          <table:table-cell table:formula="of:=[.D428]-[.D42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7" office:value-type="float" office:value="2989" calcext:value-type="float">
            <text:p>2989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0345949074074074" calcext:value-type="float">
            <text:p>0,00034594907407407400</text:p>
          </table:table-cell>
          <table:table-cell table:formula="of:=[.D429]-[.D42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7" office:value-type="float" office:value="2996" calcext:value-type="float">
            <text:p>2996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0346759259259259" calcext:value-type="float">
            <text:p>0,00034675925925925900</text:p>
          </table:table-cell>
          <table:table-cell table:formula="of:=[.D430]-[.D42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7" office:value-type="float" office:value="3003" calcext:value-type="float">
            <text:p>3003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0347569444444444" calcext:value-type="float">
            <text:p>0,00034756944444444400</text:p>
          </table:table-cell>
          <table:table-cell table:formula="of:=[.D431]-[.D43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7" office:value-type="float" office:value="3010" calcext:value-type="float">
            <text:p>301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034837962962963" calcext:value-type="float">
            <text:p>0,00034837962962963000</text:p>
          </table:table-cell>
          <table:table-cell table:formula="of:=[.D432]-[.D43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7" office:value-type="float" office:value="3017" calcext:value-type="float">
            <text:p>3017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0349189814814815" calcext:value-type="float">
            <text:p>0,00034918981481481500</text:p>
          </table:table-cell>
          <table:table-cell table:formula="of:=[.D433]-[.D43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7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035" calcext:value-type="float">
            <text:p>0,00035000000000000000</text:p>
          </table:table-cell>
          <table:table-cell table:formula="of:=[.D434]-[.D43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7" office:value-type="float" office:value="3031" calcext:value-type="float">
            <text:p>3031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0350810185185185" calcext:value-type="float">
            <text:p>0,00035081018518518500</text:p>
          </table:table-cell>
          <table:table-cell table:formula="of:=[.D435]-[.D43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7" office:value-type="float" office:value="3038" calcext:value-type="float">
            <text:p>3038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035162037037037" calcext:value-type="float">
            <text:p>0,00035162037037037000</text:p>
          </table:table-cell>
          <table:table-cell table:formula="of:=[.D436]-[.D43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7" office:value-type="float" office:value="3045" calcext:value-type="float">
            <text:p>304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0352430555555556" calcext:value-type="float">
            <text:p>0,00035243055555555600</text:p>
          </table:table-cell>
          <table:table-cell table:formula="of:=[.D437]-[.D43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7" office:value-type="float" office:value="3052" calcext:value-type="float">
            <text:p>3052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0353240740740741" calcext:value-type="float">
            <text:p>0,00035324074074074100</text:p>
          </table:table-cell>
          <table:table-cell table:formula="of:=[.D438]-[.D437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7" office:value-type="float" office:value="3059" calcext:value-type="float">
            <text:p>3059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0354050925925926" calcext:value-type="float">
            <text:p>0,00035405092592592600</text:p>
          </table:table-cell>
          <table:table-cell table:formula="of:=[.D439]-[.D43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7" office:value-type="float" office:value="3066" calcext:value-type="float">
            <text:p>3066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0354861111111111" calcext:value-type="float">
            <text:p>0,00035486111111111100</text:p>
          </table:table-cell>
          <table:table-cell table:formula="of:=[.D440]-[.D43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7" office:value-type="float" office:value="3073" calcext:value-type="float">
            <text:p>3073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0355671296296296" calcext:value-type="float">
            <text:p>0,00035567129629629600</text:p>
          </table:table-cell>
          <table:table-cell table:formula="of:=[.D441]-[.D44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7" office:value-type="float" office:value="3080" calcext:value-type="float">
            <text:p>308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0356481481481482" calcext:value-type="float">
            <text:p>0,00035648148148148200</text:p>
          </table:table-cell>
          <table:table-cell table:formula="of:=[.D442]-[.D44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7" office:value-type="float" office:value="3087" calcext:value-type="float">
            <text:p>3087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0357291666666667" calcext:value-type="float">
            <text:p>0,00035729166666666700</text:p>
          </table:table-cell>
          <table:table-cell table:formula="of:=[.D443]-[.D44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7" office:value-type="float" office:value="3094" calcext:value-type="float">
            <text:p>3094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0358101851851852" calcext:value-type="float">
            <text:p>0,00035810185185185200</text:p>
          </table:table-cell>
          <table:table-cell table:formula="of:=[.D444]-[.D44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7" office:value-type="float" office:value="3101" calcext:value-type="float">
            <text:p>3101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0358912037037037" calcext:value-type="float">
            <text:p>0,00035891203703703700</text:p>
          </table:table-cell>
          <table:table-cell table:formula="of:=[.D445]-[.D44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7" office:value-type="float" office:value="3108" calcext:value-type="float">
            <text:p>3108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0359722222222222" calcext:value-type="float">
            <text:p>0,00035972222222222200</text:p>
          </table:table-cell>
          <table:table-cell table:formula="of:=[.D446]-[.D44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7" office:value-type="float" office:value="3115" calcext:value-type="float">
            <text:p>311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0360532407407407" calcext:value-type="float">
            <text:p>0,00036053240740740700</text:p>
          </table:table-cell>
          <table:table-cell table:formula="of:=[.D447]-[.D44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7" office:value-type="float" office:value="3122" calcext:value-type="float">
            <text:p>3122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0361342592592593" calcext:value-type="float">
            <text:p>0,00036134259259259300</text:p>
          </table:table-cell>
          <table:table-cell table:formula="of:=[.D448]-[.D44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7" office:value-type="float" office:value="3129" calcext:value-type="float">
            <text:p>3129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0362152777777778" calcext:value-type="float">
            <text:p>0,00036215277777777800</text:p>
          </table:table-cell>
          <table:table-cell table:formula="of:=[.D449]-[.D448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7" office:value-type="float" office:value="3136" calcext:value-type="float">
            <text:p>3136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0362962962962963" calcext:value-type="float">
            <text:p>0,00036296296296296300</text:p>
          </table:table-cell>
          <table:table-cell table:formula="of:=[.D450]-[.D44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7" office:value-type="float" office:value="3143" calcext:value-type="float">
            <text:p>3143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0363773148148148" calcext:value-type="float">
            <text:p>0,00036377314814814800</text:p>
          </table:table-cell>
          <table:table-cell table:formula="of:=[.D451]-[.D45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7" office:value-type="float" office:value="3150" calcext:value-type="float">
            <text:p>31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0364583333333333" calcext:value-type="float">
            <text:p>0,00036458333333333300</text:p>
          </table:table-cell>
          <table:table-cell table:formula="of:=[.D452]-[.D45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7" office:value-type="float" office:value="3157" calcext:value-type="float">
            <text:p>3157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0365393518518519" calcext:value-type="float">
            <text:p>0,00036539351851851900</text:p>
          </table:table-cell>
          <table:table-cell table:formula="of:=[.D453]-[.D45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7" office:value-type="float" office:value="3164" calcext:value-type="float">
            <text:p>3164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0366203703703704" calcext:value-type="float">
            <text:p>0,00036620370370370400</text:p>
          </table:table-cell>
          <table:table-cell table:formula="of:=[.D454]-[.D45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7" office:value-type="float" office:value="3171" calcext:value-type="float">
            <text:p>3171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0367013888888889" calcext:value-type="float">
            <text:p>0,00036701388888888900</text:p>
          </table:table-cell>
          <table:table-cell table:formula="of:=[.D455]-[.D45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7" office:value-type="float" office:value="3178" calcext:value-type="float">
            <text:p>3178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0367824074074074" calcext:value-type="float">
            <text:p>0,00036782407407407400</text:p>
          </table:table-cell>
          <table:table-cell table:formula="of:=[.D456]-[.D45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7" office:value-type="float" office:value="3185" calcext:value-type="float">
            <text:p>318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0368634259259259" calcext:value-type="float">
            <text:p>0,00036863425925925900</text:p>
          </table:table-cell>
          <table:table-cell table:formula="of:=[.D457]-[.D45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7" office:value-type="float" office:value="3192" calcext:value-type="float">
            <text:p>3192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0369444444444444" calcext:value-type="float">
            <text:p>0,00036944444444444400</text:p>
          </table:table-cell>
          <table:table-cell table:formula="of:=[.D458]-[.D45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7" office:value-type="float" office:value="3199" calcext:value-type="float">
            <text:p>3199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037025462962963" calcext:value-type="float">
            <text:p>0,00037025462962963000</text:p>
          </table:table-cell>
          <table:table-cell table:formula="of:=[.D459]-[.D45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7" office:value-type="float" office:value="3206" calcext:value-type="float">
            <text:p>3206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0371064814814815" calcext:value-type="float">
            <text:p>0,00037106481481481500</text:p>
          </table:table-cell>
          <table:table-cell table:formula="of:=[.D460]-[.D459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7" office:value-type="float" office:value="3213" calcext:value-type="float">
            <text:p>3213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0371875" calcext:value-type="float">
            <text:p>0,00037187500000000000</text:p>
          </table:table-cell>
          <table:table-cell table:formula="of:=[.D461]-[.D46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7" office:value-type="float" office:value="3220" calcext:value-type="float">
            <text:p>322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0372685185185185" calcext:value-type="float">
            <text:p>0,00037268518518518500</text:p>
          </table:table-cell>
          <table:table-cell table:formula="of:=[.D462]-[.D46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7" office:value-type="float" office:value="3227" calcext:value-type="float">
            <text:p>3227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037349537037037" calcext:value-type="float">
            <text:p>0,00037349537037037000</text:p>
          </table:table-cell>
          <table:table-cell table:formula="of:=[.D463]-[.D46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7" office:value-type="float" office:value="3234" calcext:value-type="float">
            <text:p>3234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0374305555555556" calcext:value-type="float">
            <text:p>0,00037430555555555600</text:p>
          </table:table-cell>
          <table:table-cell table:formula="of:=[.D464]-[.D46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7" office:value-type="float" office:value="3241" calcext:value-type="float">
            <text:p>3241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0375115740740741" calcext:value-type="float">
            <text:p>0,00037511574074074100</text:p>
          </table:table-cell>
          <table:table-cell table:formula="of:=[.D465]-[.D46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7" office:value-type="float" office:value="3248" calcext:value-type="float">
            <text:p>3248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0375925925925926" calcext:value-type="float">
            <text:p>0,00037592592592592600</text:p>
          </table:table-cell>
          <table:table-cell table:formula="of:=[.D466]-[.D46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7" office:value-type="float" office:value="3255" calcext:value-type="float">
            <text:p>325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0376736111111111" calcext:value-type="float">
            <text:p>0,00037673611111111100</text:p>
          </table:table-cell>
          <table:table-cell table:formula="of:=[.D467]-[.D46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7" office:value-type="float" office:value="3262" calcext:value-type="float">
            <text:p>3262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0377546296296296" calcext:value-type="float">
            <text:p>0,00037754629629629600</text:p>
          </table:table-cell>
          <table:table-cell table:formula="of:=[.D468]-[.D46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7" office:value-type="float" office:value="3269" calcext:value-type="float">
            <text:p>3269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0378356481481481" calcext:value-type="float">
            <text:p>0,00037835648148148100</text:p>
          </table:table-cell>
          <table:table-cell table:formula="of:=[.D469]-[.D46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7" office:value-type="float" office:value="3276" calcext:value-type="float">
            <text:p>3276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0379166666666667" calcext:value-type="float">
            <text:p>0,00037916666666666700</text:p>
          </table:table-cell>
          <table:table-cell table:formula="of:=[.D470]-[.D46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7" office:value-type="float" office:value="3283" calcext:value-type="float">
            <text:p>3283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0379976851851852" calcext:value-type="float">
            <text:p>0,00037997685185185200</text:p>
          </table:table-cell>
          <table:table-cell table:formula="of:=[.D471]-[.D470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7" office:value-type="float" office:value="3290" calcext:value-type="float">
            <text:p>329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0380787037037037" calcext:value-type="float">
            <text:p>0,00038078703703703700</text:p>
          </table:table-cell>
          <table:table-cell table:formula="of:=[.D472]-[.D47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7" office:value-type="float" office:value="3297" calcext:value-type="float">
            <text:p>3297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0381597222222222" calcext:value-type="float">
            <text:p>0,00038159722222222200</text:p>
          </table:table-cell>
          <table:table-cell table:formula="of:=[.D473]-[.D47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7" office:value-type="float" office:value="3304" calcext:value-type="float">
            <text:p>3304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0382407407407407" calcext:value-type="float">
            <text:p>0,00038240740740740700</text:p>
          </table:table-cell>
          <table:table-cell table:formula="of:=[.D474]-[.D47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7" office:value-type="float" office:value="3311" calcext:value-type="float">
            <text:p>3311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0383217592592593" calcext:value-type="float">
            <text:p>0,00038321759259259300</text:p>
          </table:table-cell>
          <table:table-cell table:formula="of:=[.D475]-[.D47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7" office:value-type="float" office:value="3318" calcext:value-type="float">
            <text:p>3318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0384027777777778" calcext:value-type="float">
            <text:p>0,00038402777777777800</text:p>
          </table:table-cell>
          <table:table-cell table:formula="of:=[.D476]-[.D47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7" office:value-type="float" office:value="3325" calcext:value-type="float">
            <text:p>332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0384837962962963" calcext:value-type="float">
            <text:p>0,00038483796296296300</text:p>
          </table:table-cell>
          <table:table-cell table:formula="of:=[.D477]-[.D47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7" office:value-type="float" office:value="3332" calcext:value-type="float">
            <text:p>3332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0385648148148148" calcext:value-type="float">
            <text:p>0,00038564814814814800</text:p>
          </table:table-cell>
          <table:table-cell table:formula="of:=[.D478]-[.D47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7" office:value-type="float" office:value="3339" calcext:value-type="float">
            <text:p>3339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0386458333333333" calcext:value-type="float">
            <text:p>0,00038645833333333300</text:p>
          </table:table-cell>
          <table:table-cell table:formula="of:=[.D479]-[.D47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7" office:value-type="float" office:value="3346" calcext:value-type="float">
            <text:p>3346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0387268518518519" calcext:value-type="float">
            <text:p>0,00038726851851851900</text:p>
          </table:table-cell>
          <table:table-cell table:formula="of:=[.D480]-[.D47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7" office:value-type="float" office:value="3353" calcext:value-type="float">
            <text:p>3353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0388078703703704" calcext:value-type="float">
            <text:p>0,00038807870370370400</text:p>
          </table:table-cell>
          <table:table-cell table:formula="of:=[.D481]-[.D48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7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0388888888888889" calcext:value-type="float">
            <text:p>0,00038888888888888900</text:p>
          </table:table-cell>
          <table:table-cell table:formula="of:=[.D482]-[.D48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7" office:value-type="float" office:value="3367" calcext:value-type="float">
            <text:p>3367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0389699074074074" calcext:value-type="float">
            <text:p>0,00038969907407407400</text:p>
          </table:table-cell>
          <table:table-cell table:formula="of:=[.D483]-[.D482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7" office:value-type="float" office:value="3374" calcext:value-type="float">
            <text:p>3374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0390509259259259" calcext:value-type="float">
            <text:p>0,00039050925925925900</text:p>
          </table:table-cell>
          <table:table-cell table:formula="of:=[.D484]-[.D48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7" office:value-type="float" office:value="3381" calcext:value-type="float">
            <text:p>3381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0391319444444444" calcext:value-type="float">
            <text:p>0,00039131944444444400</text:p>
          </table:table-cell>
          <table:table-cell table:formula="of:=[.D485]-[.D48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7" office:value-type="float" office:value="3388" calcext:value-type="float">
            <text:p>3388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039212962962963" calcext:value-type="float">
            <text:p>0,00039212962962963000</text:p>
          </table:table-cell>
          <table:table-cell table:formula="of:=[.D486]-[.D48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7" office:value-type="float" office:value="3395" calcext:value-type="float">
            <text:p>339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0392939814814815" calcext:value-type="float">
            <text:p>0,00039293981481481500</text:p>
          </table:table-cell>
          <table:table-cell table:formula="of:=[.D487]-[.D48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7" office:value-type="float" office:value="3402" calcext:value-type="float">
            <text:p>3402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039375" calcext:value-type="float">
            <text:p>0,00039375000000000000</text:p>
          </table:table-cell>
          <table:table-cell table:formula="of:=[.D488]-[.D48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7" office:value-type="float" office:value="3409" calcext:value-type="float">
            <text:p>3409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0394560185185185" calcext:value-type="float">
            <text:p>0,00039456018518518500</text:p>
          </table:table-cell>
          <table:table-cell table:formula="of:=[.D489]-[.D48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7" office:value-type="float" office:value="3416" calcext:value-type="float">
            <text:p>3416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039537037037037" calcext:value-type="float">
            <text:p>0,00039537037037037000</text:p>
          </table:table-cell>
          <table:table-cell table:formula="of:=[.D490]-[.D48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7" office:value-type="float" office:value="3423" calcext:value-type="float">
            <text:p>3423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0396180555555556" calcext:value-type="float">
            <text:p>0,00039618055555555600</text:p>
          </table:table-cell>
          <table:table-cell table:formula="of:=[.D491]-[.D49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7" office:value-type="float" office:value="3430" calcext:value-type="float">
            <text:p>343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0396990740740741" calcext:value-type="float">
            <text:p>0,00039699074074074100</text:p>
          </table:table-cell>
          <table:table-cell table:formula="of:=[.D492]-[.D49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7" office:value-type="float" office:value="3437" calcext:value-type="float">
            <text:p>3437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0397800925925926" calcext:value-type="float">
            <text:p>0,00039780092592592600</text:p>
          </table:table-cell>
          <table:table-cell table:formula="of:=[.D493]-[.D49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7" office:value-type="float" office:value="3444" calcext:value-type="float">
            <text:p>3444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0398611111111111" calcext:value-type="float">
            <text:p>0,00039861111111111100</text:p>
          </table:table-cell>
          <table:table-cell table:formula="of:=[.D494]-[.D493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7" office:value-type="float" office:value="3451" calcext:value-type="float">
            <text:p>3451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0399421296296296" calcext:value-type="float">
            <text:p>0,00039942129629629600</text:p>
          </table:table-cell>
          <table:table-cell table:formula="of:=[.D495]-[.D49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7" office:value-type="float" office:value="3458" calcext:value-type="float">
            <text:p>3458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0400231481481482" calcext:value-type="float">
            <text:p>0,00040023148148148200</text:p>
          </table:table-cell>
          <table:table-cell table:formula="of:=[.D496]-[.D49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7" office:value-type="float" office:value="3465" calcext:value-type="float">
            <text:p>346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0401041666666667" calcext:value-type="float">
            <text:p>0,00040104166666666700</text:p>
          </table:table-cell>
          <table:table-cell table:formula="of:=[.D497]-[.D49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7" office:value-type="float" office:value="3472" calcext:value-type="float">
            <text:p>3472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0401851851851852" calcext:value-type="float">
            <text:p>0,00040185185185185200</text:p>
          </table:table-cell>
          <table:table-cell table:formula="of:=[.D498]-[.D49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7" office:value-type="float" office:value="3479" calcext:value-type="float">
            <text:p>3479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0402662037037037" calcext:value-type="float">
            <text:p>0,00040266203703703700</text:p>
          </table:table-cell>
          <table:table-cell table:formula="of:=[.D499]-[.D49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7" office:value-type="float" office:value="3486" calcext:value-type="float">
            <text:p>3486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0403472222222222" calcext:value-type="float">
            <text:p>0,00040347222222222200</text:p>
          </table:table-cell>
          <table:table-cell table:formula="of:=[.D500]-[.D49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7" office:value-type="float" office:value="3493" calcext:value-type="float">
            <text:p>3493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0404282407407407" calcext:value-type="float">
            <text:p>0,00040428240740740700</text:p>
          </table:table-cell>
          <table:table-cell table:formula="of:=[.D501]-[.D50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7" office:value-type="float" office:value="3500" calcext:value-type="float">
            <text:p>3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0405092592592593" calcext:value-type="float">
            <text:p>0,00040509259259259300</text:p>
          </table:table-cell>
          <table:table-cell table:formula="of:=[.D502]-[.D50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7" office:value-type="float" office:value="3507" calcext:value-type="float">
            <text:p>3507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0405902777777778" calcext:value-type="float">
            <text:p>0,00040590277777777800</text:p>
          </table:table-cell>
          <table:table-cell table:formula="of:=[.D503]-[.D50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7" office:value-type="float" office:value="3514" calcext:value-type="float">
            <text:p>3514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0406712962962963" calcext:value-type="float">
            <text:p>0,00040671296296296300</text:p>
          </table:table-cell>
          <table:table-cell table:formula="of:=[.D504]-[.D50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7" office:value-type="float" office:value="3521" calcext:value-type="float">
            <text:p>3521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0407523148148148" calcext:value-type="float">
            <text:p>0,00040752314814814800</text:p>
          </table:table-cell>
          <table:table-cell table:formula="of:=[.D505]-[.D504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7" office:value-type="float" office:value="3528" calcext:value-type="float">
            <text:p>3528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0408333333333333" calcext:value-type="float">
            <text:p>0,00040833333333333300</text:p>
          </table:table-cell>
          <table:table-cell table:formula="of:=[.D506]-[.D50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7" office:value-type="float" office:value="3535" calcext:value-type="float">
            <text:p>353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0409143518518519" calcext:value-type="float">
            <text:p>0,00040914351851851900</text:p>
          </table:table-cell>
          <table:table-cell table:formula="of:=[.D507]-[.D50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7" office:value-type="float" office:value="3542" calcext:value-type="float">
            <text:p>3542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0409953703703704" calcext:value-type="float">
            <text:p>0,00040995370370370400</text:p>
          </table:table-cell>
          <table:table-cell table:formula="of:=[.D508]-[.D50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7" office:value-type="float" office:value="3549" calcext:value-type="float">
            <text:p>3549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0410763888888889" calcext:value-type="float">
            <text:p>0,00041076388888888900</text:p>
          </table:table-cell>
          <table:table-cell table:formula="of:=[.D509]-[.D50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7" office:value-type="float" office:value="3556" calcext:value-type="float">
            <text:p>3556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0411574074074074" calcext:value-type="float">
            <text:p>0,00041157407407407400</text:p>
          </table:table-cell>
          <table:table-cell table:formula="of:=[.D510]-[.D50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7" office:value-type="float" office:value="3563" calcext:value-type="float">
            <text:p>3563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0412384259259259" calcext:value-type="float">
            <text:p>0,00041238425925925900</text:p>
          </table:table-cell>
          <table:table-cell table:formula="of:=[.D511]-[.D51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7" office:value-type="float" office:value="3570" calcext:value-type="float">
            <text:p>357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0413194444444444" calcext:value-type="float">
            <text:p>0,00041319444444444400</text:p>
          </table:table-cell>
          <table:table-cell table:formula="of:=[.D512]-[.D51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7" office:value-type="float" office:value="3577" calcext:value-type="float">
            <text:p>3577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041400462962963" calcext:value-type="float">
            <text:p>0,00041400462962963000</text:p>
          </table:table-cell>
          <table:table-cell table:formula="of:=[.D513]-[.D51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7" office:value-type="float" office:value="3584" calcext:value-type="float">
            <text:p>3584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0414814814814815" calcext:value-type="float">
            <text:p>0,00041481481481481500</text:p>
          </table:table-cell>
          <table:table-cell table:formula="of:=[.D514]-[.D51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7" office:value-type="float" office:value="3591" calcext:value-type="float">
            <text:p>3591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0415625" calcext:value-type="float">
            <text:p>0,00041562500000000000</text:p>
          </table:table-cell>
          <table:table-cell table:formula="of:=[.D515]-[.D51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7" office:value-type="float" office:value="3598" calcext:value-type="float">
            <text:p>3598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0416435185185185" calcext:value-type="float">
            <text:p>0,00041643518518518500</text:p>
          </table:table-cell>
          <table:table-cell table:formula="of:=[.D516]-[.D515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7" office:value-type="float" office:value="3605" calcext:value-type="float">
            <text:p>360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041724537037037" calcext:value-type="float">
            <text:p>0,00041724537037037000</text:p>
          </table:table-cell>
          <table:table-cell table:formula="of:=[.D517]-[.D51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7" office:value-type="float" office:value="3612" calcext:value-type="float">
            <text:p>3612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0418055555555556" calcext:value-type="float">
            <text:p>0,00041805555555555600</text:p>
          </table:table-cell>
          <table:table-cell table:formula="of:=[.D518]-[.D51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7" office:value-type="float" office:value="3619" calcext:value-type="float">
            <text:p>3619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0418865740740741" calcext:value-type="float">
            <text:p>0,00041886574074074100</text:p>
          </table:table-cell>
          <table:table-cell table:formula="of:=[.D519]-[.D51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7" office:value-type="float" office:value="3626" calcext:value-type="float">
            <text:p>3626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0419675925925926" calcext:value-type="float">
            <text:p>0,00041967592592592600</text:p>
          </table:table-cell>
          <table:table-cell table:formula="of:=[.D520]-[.D51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7" office:value-type="float" office:value="3633" calcext:value-type="float">
            <text:p>3633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0420486111111111" calcext:value-type="float">
            <text:p>0,00042048611111111100</text:p>
          </table:table-cell>
          <table:table-cell table:formula="of:=[.D521]-[.D52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7" office:value-type="float" office:value="3640" calcext:value-type="float">
            <text:p>364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0421296296296296" calcext:value-type="float">
            <text:p>0,00042129629629629600</text:p>
          </table:table-cell>
          <table:table-cell table:formula="of:=[.D522]-[.D52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7" office:value-type="float" office:value="3647" calcext:value-type="float">
            <text:p>3647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0422106481481482" calcext:value-type="float">
            <text:p>0,00042210648148148100</text:p>
          </table:table-cell>
          <table:table-cell table:formula="of:=[.D523]-[.D52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7" office:value-type="float" office:value="3654" calcext:value-type="float">
            <text:p>3654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0422916666666667" calcext:value-type="float">
            <text:p>0,00042291666666666700</text:p>
          </table:table-cell>
          <table:table-cell table:formula="of:=[.D524]-[.D52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7" office:value-type="float" office:value="3661" calcext:value-type="float">
            <text:p>3661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0423726851851852" calcext:value-type="float">
            <text:p>0,00042372685185185200</text:p>
          </table:table-cell>
          <table:table-cell table:formula="of:=[.D525]-[.D52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7" office:value-type="float" office:value="3668" calcext:value-type="float">
            <text:p>3668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0424537037037037" calcext:value-type="float">
            <text:p>0,00042453703703703700</text:p>
          </table:table-cell>
          <table:table-cell table:formula="of:=[.D526]-[.D52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7" office:value-type="float" office:value="3675" calcext:value-type="float">
            <text:p>367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0425347222222222" calcext:value-type="float">
            <text:p>0,00042534722222222200</text:p>
          </table:table-cell>
          <table:table-cell table:formula="of:=[.D527]-[.D526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7" office:value-type="float" office:value="3682" calcext:value-type="float">
            <text:p>3682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0426157407407407" calcext:value-type="float">
            <text:p>0,00042615740740740700</text:p>
          </table:table-cell>
          <table:table-cell table:formula="of:=[.D528]-[.D52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7" office:value-type="float" office:value="3689" calcext:value-type="float">
            <text:p>3689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0426967592592593" calcext:value-type="float">
            <text:p>0,00042696759259259300</text:p>
          </table:table-cell>
          <table:table-cell table:formula="of:=[.D529]-[.D52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7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0427777777777778" calcext:value-type="float">
            <text:p>0,00042777777777777800</text:p>
          </table:table-cell>
          <table:table-cell table:formula="of:=[.D530]-[.D52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7" office:value-type="float" office:value="3703" calcext:value-type="float">
            <text:p>3703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0428587962962963" calcext:value-type="float">
            <text:p>0,00042858796296296300</text:p>
          </table:table-cell>
          <table:table-cell table:formula="of:=[.D531]-[.D53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7" office:value-type="float" office:value="3710" calcext:value-type="float">
            <text:p>371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0429398148148148" calcext:value-type="float">
            <text:p>0,00042939814814814800</text:p>
          </table:table-cell>
          <table:table-cell table:formula="of:=[.D532]-[.D53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7" office:value-type="float" office:value="3717" calcext:value-type="float">
            <text:p>3717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0430208333333333" calcext:value-type="float">
            <text:p>0,00043020833333333300</text:p>
          </table:table-cell>
          <table:table-cell table:formula="of:=[.D533]-[.D53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7" office:value-type="float" office:value="3724" calcext:value-type="float">
            <text:p>3724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0431018518518519" calcext:value-type="float">
            <text:p>0,00043101851851851800</text:p>
          </table:table-cell>
          <table:table-cell table:formula="of:=[.D534]-[.D53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7" office:value-type="float" office:value="3731" calcext:value-type="float">
            <text:p>3731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0431828703703704" calcext:value-type="float">
            <text:p>0,00043182870370370400</text:p>
          </table:table-cell>
          <table:table-cell table:formula="of:=[.D535]-[.D53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7" office:value-type="float" office:value="3738" calcext:value-type="float">
            <text:p>3738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0432638888888889" calcext:value-type="float">
            <text:p>0,00043263888888888900</text:p>
          </table:table-cell>
          <table:table-cell table:formula="of:=[.D536]-[.D53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7" office:value-type="float" office:value="3745" calcext:value-type="float">
            <text:p>374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0433449074074074" calcext:value-type="float">
            <text:p>0,00043344907407407400</text:p>
          </table:table-cell>
          <table:table-cell table:formula="of:=[.D537]-[.D53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7" office:value-type="float" office:value="3752" calcext:value-type="float">
            <text:p>3752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0434259259259259" calcext:value-type="float">
            <text:p>0,00043425925925925900</text:p>
          </table:table-cell>
          <table:table-cell table:formula="of:=[.D538]-[.D537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7" office:value-type="float" office:value="3759" calcext:value-type="float">
            <text:p>3759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0435069444444444" calcext:value-type="float">
            <text:p>0,00043506944444444400</text:p>
          </table:table-cell>
          <table:table-cell table:formula="of:=[.D539]-[.D53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7" office:value-type="float" office:value="3766" calcext:value-type="float">
            <text:p>3766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043587962962963" calcext:value-type="float">
            <text:p>0,00043587962962963000</text:p>
          </table:table-cell>
          <table:table-cell table:formula="of:=[.D540]-[.D53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7" office:value-type="float" office:value="3773" calcext:value-type="float">
            <text:p>3773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0436689814814815" calcext:value-type="float">
            <text:p>0,00043668981481481500</text:p>
          </table:table-cell>
          <table:table-cell table:formula="of:=[.D541]-[.D54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7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04375" calcext:value-type="float">
            <text:p>0,00043750000000000000</text:p>
          </table:table-cell>
          <table:table-cell table:formula="of:=[.D542]-[.D54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7" office:value-type="float" office:value="3787" calcext:value-type="float">
            <text:p>3787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0438310185185185" calcext:value-type="float">
            <text:p>0,00043831018518518500</text:p>
          </table:table-cell>
          <table:table-cell table:formula="of:=[.D543]-[.D54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7" office:value-type="float" office:value="3794" calcext:value-type="float">
            <text:p>3794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043912037037037" calcext:value-type="float">
            <text:p>0,00043912037037037000</text:p>
          </table:table-cell>
          <table:table-cell table:formula="of:=[.D544]-[.D54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7" office:value-type="float" office:value="3801" calcext:value-type="float">
            <text:p>3801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0439930555555556" calcext:value-type="float">
            <text:p>0,00043993055555555600</text:p>
          </table:table-cell>
          <table:table-cell table:formula="of:=[.D545]-[.D54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7" office:value-type="float" office:value="3808" calcext:value-type="float">
            <text:p>3808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0440740740740741" calcext:value-type="float">
            <text:p>0,00044074074074074100</text:p>
          </table:table-cell>
          <table:table-cell table:formula="of:=[.D546]-[.D54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7" office:value-type="float" office:value="3815" calcext:value-type="float">
            <text:p>381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0441550925925926" calcext:value-type="float">
            <text:p>0,00044155092592592600</text:p>
          </table:table-cell>
          <table:table-cell table:formula="of:=[.D547]-[.D54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7" office:value-type="float" office:value="3822" calcext:value-type="float">
            <text:p>3822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0442361111111111" calcext:value-type="float">
            <text:p>0,00044236111111111100</text:p>
          </table:table-cell>
          <table:table-cell table:formula="of:=[.D548]-[.D54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7" office:value-type="float" office:value="3829" calcext:value-type="float">
            <text:p>3829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0443171296296296" calcext:value-type="float">
            <text:p>0,00044317129629629600</text:p>
          </table:table-cell>
          <table:table-cell table:formula="of:=[.D549]-[.D548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7" office:value-type="float" office:value="3836" calcext:value-type="float">
            <text:p>3836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0443981481481482" calcext:value-type="float">
            <text:p>0,00044398148148148200</text:p>
          </table:table-cell>
          <table:table-cell table:formula="of:=[.D550]-[.D54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7" office:value-type="float" office:value="3843" calcext:value-type="float">
            <text:p>3843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0444791666666667" calcext:value-type="float">
            <text:p>0,00044479166666666700</text:p>
          </table:table-cell>
          <table:table-cell table:formula="of:=[.D551]-[.D55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7" office:value-type="float" office:value="3850" calcext:value-type="float">
            <text:p>38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0445601851851852" calcext:value-type="float">
            <text:p>0,00044560185185185200</text:p>
          </table:table-cell>
          <table:table-cell table:formula="of:=[.D552]-[.D55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7" office:value-type="float" office:value="3857" calcext:value-type="float">
            <text:p>3857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0446412037037037" calcext:value-type="float">
            <text:p>0,00044641203703703700</text:p>
          </table:table-cell>
          <table:table-cell table:formula="of:=[.D553]-[.D55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7" office:value-type="float" office:value="3864" calcext:value-type="float">
            <text:p>3864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0447222222222222" calcext:value-type="float">
            <text:p>0,00044722222222222200</text:p>
          </table:table-cell>
          <table:table-cell table:formula="of:=[.D554]-[.D55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7" office:value-type="float" office:value="3871" calcext:value-type="float">
            <text:p>3871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0448032407407407" calcext:value-type="float">
            <text:p>0,00044803240740740700</text:p>
          </table:table-cell>
          <table:table-cell table:formula="of:=[.D555]-[.D55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7" office:value-type="float" office:value="3878" calcext:value-type="float">
            <text:p>3878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0448842592592593" calcext:value-type="float">
            <text:p>0,00044884259259259300</text:p>
          </table:table-cell>
          <table:table-cell table:formula="of:=[.D556]-[.D55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7" office:value-type="float" office:value="3885" calcext:value-type="float">
            <text:p>388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0449652777777778" calcext:value-type="float">
            <text:p>0,00044965277777777800</text:p>
          </table:table-cell>
          <table:table-cell table:formula="of:=[.D557]-[.D55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7" office:value-type="float" office:value="3892" calcext:value-type="float">
            <text:p>3892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0450462962962963" calcext:value-type="float">
            <text:p>0,00045046296296296300</text:p>
          </table:table-cell>
          <table:table-cell table:formula="of:=[.D558]-[.D55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7" office:value-type="float" office:value="3899" calcext:value-type="float">
            <text:p>3899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0451273148148148" calcext:value-type="float">
            <text:p>0,00045127314814814800</text:p>
          </table:table-cell>
          <table:table-cell table:formula="of:=[.D559]-[.D55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7" office:value-type="float" office:value="3906" calcext:value-type="float">
            <text:p>3906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0452083333333333" calcext:value-type="float">
            <text:p>0,00045208333333333300</text:p>
          </table:table-cell>
          <table:table-cell table:formula="of:=[.D560]-[.D559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7" office:value-type="float" office:value="3913" calcext:value-type="float">
            <text:p>3913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0452893518518519" calcext:value-type="float">
            <text:p>0,00045289351851851900</text:p>
          </table:table-cell>
          <table:table-cell table:formula="of:=[.D561]-[.D56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7" office:value-type="float" office:value="3920" calcext:value-type="float">
            <text:p>392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0453703703703704" calcext:value-type="float">
            <text:p>0,00045370370370370400</text:p>
          </table:table-cell>
          <table:table-cell table:formula="of:=[.D562]-[.D56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7" office:value-type="float" office:value="3927" calcext:value-type="float">
            <text:p>3927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0454513888888889" calcext:value-type="float">
            <text:p>0,00045451388888888900</text:p>
          </table:table-cell>
          <table:table-cell table:formula="of:=[.D563]-[.D56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7" office:value-type="float" office:value="3934" calcext:value-type="float">
            <text:p>3934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0455324074074074" calcext:value-type="float">
            <text:p>0,00045532407407407400</text:p>
          </table:table-cell>
          <table:table-cell table:formula="of:=[.D564]-[.D56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7" office:value-type="float" office:value="3941" calcext:value-type="float">
            <text:p>3941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0456134259259259" calcext:value-type="float">
            <text:p>0,00045613425925925900</text:p>
          </table:table-cell>
          <table:table-cell table:formula="of:=[.D565]-[.D56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7" office:value-type="float" office:value="3948" calcext:value-type="float">
            <text:p>3948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0456944444444444" calcext:value-type="float">
            <text:p>0,00045694444444444500</text:p>
          </table:table-cell>
          <table:table-cell table:formula="of:=[.D566]-[.D56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7" office:value-type="float" office:value="3955" calcext:value-type="float">
            <text:p>395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045775462962963" calcext:value-type="float">
            <text:p>0,00045775462962963000</text:p>
          </table:table-cell>
          <table:table-cell table:formula="of:=[.D567]-[.D56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7" office:value-type="float" office:value="3962" calcext:value-type="float">
            <text:p>3962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0458564814814815" calcext:value-type="float">
            <text:p>0,00045856481481481500</text:p>
          </table:table-cell>
          <table:table-cell table:formula="of:=[.D568]-[.D56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7" office:value-type="float" office:value="3969" calcext:value-type="float">
            <text:p>3969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0459375" calcext:value-type="float">
            <text:p>0,00045937500000000000</text:p>
          </table:table-cell>
          <table:table-cell table:formula="of:=[.D569]-[.D56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7" office:value-type="float" office:value="3976" calcext:value-type="float">
            <text:p>3976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0460185185185185" calcext:value-type="float">
            <text:p>0,00046018518518518500</text:p>
          </table:table-cell>
          <table:table-cell table:formula="of:=[.D570]-[.D56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7" office:value-type="float" office:value="3983" calcext:value-type="float">
            <text:p>3983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046099537037037" calcext:value-type="float">
            <text:p>0,00046099537037037000</text:p>
          </table:table-cell>
          <table:table-cell table:formula="of:=[.D571]-[.D570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7" office:value-type="float" office:value="3990" calcext:value-type="float">
            <text:p>399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0461805555555556" calcext:value-type="float">
            <text:p>0,00046180555555555600</text:p>
          </table:table-cell>
          <table:table-cell table:formula="of:=[.D572]-[.D57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7" office:value-type="float" office:value="3997" calcext:value-type="float">
            <text:p>3997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0462615740740741" calcext:value-type="float">
            <text:p>0,00046261574074074100</text:p>
          </table:table-cell>
          <table:table-cell table:formula="of:=[.D573]-[.D57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7" office:value-type="float" office:value="4004" calcext:value-type="float">
            <text:p>4004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0463425925925926" calcext:value-type="float">
            <text:p>0,00046342592592592600</text:p>
          </table:table-cell>
          <table:table-cell table:formula="of:=[.D574]-[.D57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7" office:value-type="float" office:value="4011" calcext:value-type="float">
            <text:p>4011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0464236111111111" calcext:value-type="float">
            <text:p>0,00046423611111111100</text:p>
          </table:table-cell>
          <table:table-cell table:formula="of:=[.D575]-[.D57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7" office:value-type="float" office:value="4018" calcext:value-type="float">
            <text:p>4018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0465046296296296" calcext:value-type="float">
            <text:p>0,00046504629629629600</text:p>
          </table:table-cell>
          <table:table-cell table:formula="of:=[.D576]-[.D57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7" office:value-type="float" office:value="4025" calcext:value-type="float">
            <text:p>402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0465856481481482" calcext:value-type="float">
            <text:p>0,00046585648148148200</text:p>
          </table:table-cell>
          <table:table-cell table:formula="of:=[.D577]-[.D57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7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0466666666666667" calcext:value-type="float">
            <text:p>0,00046666666666666700</text:p>
          </table:table-cell>
          <table:table-cell table:formula="of:=[.D578]-[.D57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7" office:value-type="float" office:value="4039" calcext:value-type="float">
            <text:p>4039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0467476851851852" calcext:value-type="float">
            <text:p>0,00046747685185185200</text:p>
          </table:table-cell>
          <table:table-cell table:formula="of:=[.D579]-[.D57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7" office:value-type="float" office:value="4046" calcext:value-type="float">
            <text:p>4046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0468287037037037" calcext:value-type="float">
            <text:p>0,00046828703703703700</text:p>
          </table:table-cell>
          <table:table-cell table:formula="of:=[.D580]-[.D57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7" office:value-type="float" office:value="4053" calcext:value-type="float">
            <text:p>4053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0469097222222222" calcext:value-type="float">
            <text:p>0,00046909722222222200</text:p>
          </table:table-cell>
          <table:table-cell table:formula="of:=[.D581]-[.D58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7" office:value-type="float" office:value="4060" calcext:value-type="float">
            <text:p>406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0469907407407407" calcext:value-type="float">
            <text:p>0,00046990740740740700</text:p>
          </table:table-cell>
          <table:table-cell table:formula="of:=[.D582]-[.D581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7" office:value-type="float" office:value="4067" calcext:value-type="float">
            <text:p>4067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0470717592592593" calcext:value-type="float">
            <text:p>0,00047071759259259300</text:p>
          </table:table-cell>
          <table:table-cell table:formula="of:=[.D583]-[.D58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7" office:value-type="float" office:value="4074" calcext:value-type="float">
            <text:p>4074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0471527777777778" calcext:value-type="float">
            <text:p>0,00047152777777777800</text:p>
          </table:table-cell>
          <table:table-cell table:formula="of:=[.D584]-[.D58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7" office:value-type="float" office:value="4081" calcext:value-type="float">
            <text:p>4081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0472337962962963" calcext:value-type="float">
            <text:p>0,00047233796296296300</text:p>
          </table:table-cell>
          <table:table-cell table:formula="of:=[.D585]-[.D58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7" office:value-type="float" office:value="4088" calcext:value-type="float">
            <text:p>4088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0473148148148148" calcext:value-type="float">
            <text:p>0,00047314814814814800</text:p>
          </table:table-cell>
          <table:table-cell table:formula="of:=[.D586]-[.D58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7" office:value-type="float" office:value="4095" calcext:value-type="float">
            <text:p>409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0473958333333333" calcext:value-type="float">
            <text:p>0,00047395833333333300</text:p>
          </table:table-cell>
          <table:table-cell table:formula="of:=[.D587]-[.D58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7" office:value-type="float" office:value="4102" calcext:value-type="float">
            <text:p>4102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0474768518518519" calcext:value-type="float">
            <text:p>0,00047476851851851800</text:p>
          </table:table-cell>
          <table:table-cell table:formula="of:=[.D588]-[.D58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7" office:value-type="float" office:value="4109" calcext:value-type="float">
            <text:p>4109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0475578703703704" calcext:value-type="float">
            <text:p>0,00047557870370370400</text:p>
          </table:table-cell>
          <table:table-cell table:formula="of:=[.D589]-[.D58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7" office:value-type="float" office:value="4116" calcext:value-type="float">
            <text:p>4116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0476388888888889" calcext:value-type="float">
            <text:p>0,00047638888888888900</text:p>
          </table:table-cell>
          <table:table-cell table:formula="of:=[.D590]-[.D58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7" office:value-type="float" office:value="4123" calcext:value-type="float">
            <text:p>4123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0477199074074074" calcext:value-type="float">
            <text:p>0,00047719907407407400</text:p>
          </table:table-cell>
          <table:table-cell table:formula="of:=[.D591]-[.D59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7" office:value-type="float" office:value="4130" calcext:value-type="float">
            <text:p>413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0478009259259259" calcext:value-type="float">
            <text:p>0,00047800925925925900</text:p>
          </table:table-cell>
          <table:table-cell table:formula="of:=[.D592]-[.D59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7" office:value-type="float" office:value="4137" calcext:value-type="float">
            <text:p>4137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0478819444444444" calcext:value-type="float">
            <text:p>0,00047881944444444400</text:p>
          </table:table-cell>
          <table:table-cell table:formula="of:=[.D593]-[.D592]" office:value-type="float" office:value="0.000000810185185185235" calcext:value-type="float">
            <text:p>0,0000008101851851852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7" office:value-type="float" office:value="4144" calcext:value-type="float">
            <text:p>4144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047962962962963" calcext:value-type="float">
            <text:p>0,00047962962962963000</text:p>
          </table:table-cell>
          <table:table-cell table:formula="of:=[.D594]-[.D59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7" office:value-type="float" office:value="4151" calcext:value-type="float">
            <text:p>4151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0480439814814815" calcext:value-type="float">
            <text:p>0,00048043981481481500</text:p>
          </table:table-cell>
          <table:table-cell table:formula="of:=[.D595]-[.D59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7" office:value-type="float" office:value="4158" calcext:value-type="float">
            <text:p>4158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048125" calcext:value-type="float">
            <text:p>0,00048125000000000000</text:p>
          </table:table-cell>
          <table:table-cell table:formula="of:=[.D596]-[.D59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7" office:value-type="float" office:value="4165" calcext:value-type="float">
            <text:p>4165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0482060185185185" calcext:value-type="float">
            <text:p>0,00048206018518518500</text:p>
          </table:table-cell>
          <table:table-cell table:formula="of:=[.D597]-[.D59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7" office:value-type="float" office:value="4172" calcext:value-type="float">
            <text:p>4172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048287037037037" calcext:value-type="float">
            <text:p>0,00048287037037037000</text:p>
          </table:table-cell>
          <table:table-cell table:formula="of:=[.D598]-[.D59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7" office:value-type="float" office:value="4179" calcext:value-type="float">
            <text:p>4179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0483680555555556" calcext:value-type="float">
            <text:p>0,00048368055555555600</text:p>
          </table:table-cell>
          <table:table-cell table:formula="of:=[.D599]-[.D59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7" office:value-type="float" office:value="4186" calcext:value-type="float">
            <text:p>4186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0484490740740741" calcext:value-type="float">
            <text:p>0,00048449074074074100</text:p>
          </table:table-cell>
          <table:table-cell table:formula="of:=[.D600]-[.D59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7" office:value-type="float" office:value="4193" calcext:value-type="float">
            <text:p>4193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0485300925925926" calcext:value-type="float">
            <text:p>0,00048530092592592600</text:p>
          </table:table-cell>
          <table:table-cell table:formula="of:=[.D601]-[.D60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7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0486111111111111" calcext:value-type="float">
            <text:p>0,00048611111111111100</text:p>
          </table:table-cell>
          <table:table-cell table:formula="of:=[.D602]-[.D60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7" office:value-type="float" office:value="4207" calcext:value-type="float">
            <text:p>4207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0486921296296296" calcext:value-type="float">
            <text:p>0,00048692129629629600</text:p>
          </table:table-cell>
          <table:table-cell table:formula="of:=[.D603]-[.D60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7" office:value-type="float" office:value="4214" calcext:value-type="float">
            <text:p>4214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0487731481481481" calcext:value-type="float">
            <text:p>0,00048773148148148100</text:p>
          </table:table-cell>
          <table:table-cell table:formula="of:=[.D604]-[.D60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7" office:value-type="float" office:value="4221" calcext:value-type="float">
            <text:p>4221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0488541666666667" calcext:value-type="float">
            <text:p>0,00048854166666666700</text:p>
          </table:table-cell>
          <table:table-cell table:formula="of:=[.D605]-[.D60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7" office:value-type="float" office:value="4228" calcext:value-type="float">
            <text:p>4228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0489351851851852" calcext:value-type="float">
            <text:p>0,00048935185185185200</text:p>
          </table:table-cell>
          <table:table-cell table:formula="of:=[.D606]-[.D60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7" office:value-type="float" office:value="4235" calcext:value-type="float">
            <text:p>4235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0490162037037037" calcext:value-type="float">
            <text:p>0,00049016203703703700</text:p>
          </table:table-cell>
          <table:table-cell table:formula="of:=[.D607]-[.D60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7" office:value-type="float" office:value="4242" calcext:value-type="float">
            <text:p>4242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0490972222222222" calcext:value-type="float">
            <text:p>0,00049097222222222200</text:p>
          </table:table-cell>
          <table:table-cell table:formula="of:=[.D608]-[.D60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7" office:value-type="float" office:value="4249" calcext:value-type="float">
            <text:p>4249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0491782407407407" calcext:value-type="float">
            <text:p>0,00049178240740740700</text:p>
          </table:table-cell>
          <table:table-cell table:formula="of:=[.D609]-[.D60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7" office:value-type="float" office:value="4256" calcext:value-type="float">
            <text:p>4256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0492592592592593" calcext:value-type="float">
            <text:p>0,00049259259259259300</text:p>
          </table:table-cell>
          <table:table-cell table:formula="of:=[.D610]-[.D60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7" office:value-type="float" office:value="4263" calcext:value-type="float">
            <text:p>4263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0493402777777778" calcext:value-type="float">
            <text:p>0,00049340277777777800</text:p>
          </table:table-cell>
          <table:table-cell table:formula="of:=[.D611]-[.D61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7" office:value-type="float" office:value="4270" calcext:value-type="float">
            <text:p>427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0494212962962963" calcext:value-type="float">
            <text:p>0,00049421296296296300</text:p>
          </table:table-cell>
          <table:table-cell table:formula="of:=[.D612]-[.D61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7" office:value-type="float" office:value="4277" calcext:value-type="float">
            <text:p>4277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0495023148148148" calcext:value-type="float">
            <text:p>0,00049502314814814800</text:p>
          </table:table-cell>
          <table:table-cell table:formula="of:=[.D613]-[.D61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7" office:value-type="float" office:value="4284" calcext:value-type="float">
            <text:p>4284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0495833333333333" calcext:value-type="float">
            <text:p>0,00049583333333333300</text:p>
          </table:table-cell>
          <table:table-cell table:formula="of:=[.D614]-[.D61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7" office:value-type="float" office:value="4291" calcext:value-type="float">
            <text:p>4291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0496643518518519" calcext:value-type="float">
            <text:p>0,00049664351851851900</text:p>
          </table:table-cell>
          <table:table-cell table:formula="of:=[.D615]-[.D61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7" office:value-type="float" office:value="4298" calcext:value-type="float">
            <text:p>4298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0497453703703704" calcext:value-type="float">
            <text:p>0,00049745370370370400</text:p>
          </table:table-cell>
          <table:table-cell table:formula="of:=[.D616]-[.D61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7" office:value-type="float" office:value="4305" calcext:value-type="float">
            <text:p>4305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0498263888888889" calcext:value-type="float">
            <text:p>0,00049826388888888900</text:p>
          </table:table-cell>
          <table:table-cell table:formula="of:=[.D617]-[.D61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7" office:value-type="float" office:value="4312" calcext:value-type="float">
            <text:p>4312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0499074074074074" calcext:value-type="float">
            <text:p>0,00049907407407407400</text:p>
          </table:table-cell>
          <table:table-cell table:formula="of:=[.D618]-[.D61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7" office:value-type="float" office:value="4319" calcext:value-type="float">
            <text:p>4319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0499884259259259" calcext:value-type="float">
            <text:p>0,00049988425925925900</text:p>
          </table:table-cell>
          <table:table-cell table:formula="of:=[.D619]-[.D61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7" office:value-type="float" office:value="4326" calcext:value-type="float">
            <text:p>4326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0500694444444445" calcext:value-type="float">
            <text:p>0,00050069444444444500</text:p>
          </table:table-cell>
          <table:table-cell table:formula="of:=[.D620]-[.D61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7" office:value-type="float" office:value="4333" calcext:value-type="float">
            <text:p>4333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050150462962963" calcext:value-type="float">
            <text:p>0,00050150462962963000</text:p>
          </table:table-cell>
          <table:table-cell table:formula="of:=[.D621]-[.D62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7" office:value-type="float" office:value="4340" calcext:value-type="float">
            <text:p>434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0502314814814815" calcext:value-type="float">
            <text:p>0,00050231481481481500</text:p>
          </table:table-cell>
          <table:table-cell table:formula="of:=[.D622]-[.D62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7" office:value-type="float" office:value="4347" calcext:value-type="float">
            <text:p>4347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0503125" calcext:value-type="float">
            <text:p>0,00050312500000000000</text:p>
          </table:table-cell>
          <table:table-cell table:formula="of:=[.D623]-[.D62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7" office:value-type="float" office:value="4354" calcext:value-type="float">
            <text:p>4354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0503935185185185" calcext:value-type="float">
            <text:p>0,00050393518518518500</text:p>
          </table:table-cell>
          <table:table-cell table:formula="of:=[.D624]-[.D62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7" office:value-type="float" office:value="4361" calcext:value-type="float">
            <text:p>4361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050474537037037" calcext:value-type="float">
            <text:p>0,00050474537037037000</text:p>
          </table:table-cell>
          <table:table-cell table:formula="of:=[.D625]-[.D62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7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0505555555555556" calcext:value-type="float">
            <text:p>0,00050555555555555600</text:p>
          </table:table-cell>
          <table:table-cell table:formula="of:=[.D626]-[.D62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7" office:value-type="float" office:value="4375" calcext:value-type="float">
            <text:p>4375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0506365740740741" calcext:value-type="float">
            <text:p>0,00050636574074074100</text:p>
          </table:table-cell>
          <table:table-cell table:formula="of:=[.D627]-[.D62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7" office:value-type="float" office:value="4382" calcext:value-type="float">
            <text:p>4382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0507175925925926" calcext:value-type="float">
            <text:p>0,00050717592592592600</text:p>
          </table:table-cell>
          <table:table-cell table:formula="of:=[.D628]-[.D62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7" office:value-type="float" office:value="4389" calcext:value-type="float">
            <text:p>4389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0507986111111111" calcext:value-type="float">
            <text:p>0,00050798611111111100</text:p>
          </table:table-cell>
          <table:table-cell table:formula="of:=[.D629]-[.D62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7" office:value-type="float" office:value="4396" calcext:value-type="float">
            <text:p>4396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0508796296296296" calcext:value-type="float">
            <text:p>0,00050879629629629600</text:p>
          </table:table-cell>
          <table:table-cell table:formula="of:=[.D630]-[.D62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7" office:value-type="float" office:value="4403" calcext:value-type="float">
            <text:p>4403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0509606481481481" calcext:value-type="float">
            <text:p>0,00050960648148148100</text:p>
          </table:table-cell>
          <table:table-cell table:formula="of:=[.D631]-[.D63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7" office:value-type="float" office:value="4410" calcext:value-type="float">
            <text:p>441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0510416666666667" calcext:value-type="float">
            <text:p>0,00051041666666666700</text:p>
          </table:table-cell>
          <table:table-cell table:formula="of:=[.D632]-[.D63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7" office:value-type="float" office:value="4417" calcext:value-type="float">
            <text:p>4417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0511226851851852" calcext:value-type="float">
            <text:p>0,00051122685185185200</text:p>
          </table:table-cell>
          <table:table-cell table:formula="of:=[.D633]-[.D63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7" office:value-type="float" office:value="4424" calcext:value-type="float">
            <text:p>4424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0512037037037037" calcext:value-type="float">
            <text:p>0,00051203703703703700</text:p>
          </table:table-cell>
          <table:table-cell table:formula="of:=[.D634]-[.D63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7" office:value-type="float" office:value="4431" calcext:value-type="float">
            <text:p>4431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0512847222222222" calcext:value-type="float">
            <text:p>0,00051284722222222200</text:p>
          </table:table-cell>
          <table:table-cell table:formula="of:=[.D635]-[.D63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7" office:value-type="float" office:value="4438" calcext:value-type="float">
            <text:p>4438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0513657407407407" calcext:value-type="float">
            <text:p>0,00051365740740740700</text:p>
          </table:table-cell>
          <table:table-cell table:formula="of:=[.D636]-[.D63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7" office:value-type="float" office:value="4445" calcext:value-type="float">
            <text:p>4445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0514467592592593" calcext:value-type="float">
            <text:p>0,00051446759259259300</text:p>
          </table:table-cell>
          <table:table-cell table:formula="of:=[.D637]-[.D63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7" office:value-type="float" office:value="4452" calcext:value-type="float">
            <text:p>4452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0515277777777778" calcext:value-type="float">
            <text:p>0,00051527777777777800</text:p>
          </table:table-cell>
          <table:table-cell table:formula="of:=[.D638]-[.D63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7" office:value-type="float" office:value="4459" calcext:value-type="float">
            <text:p>4459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0516087962962963" calcext:value-type="float">
            <text:p>0,00051608796296296300</text:p>
          </table:table-cell>
          <table:table-cell table:formula="of:=[.D639]-[.D63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7" office:value-type="float" office:value="4466" calcext:value-type="float">
            <text:p>4466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0516898148148148" calcext:value-type="float">
            <text:p>0,00051689814814814800</text:p>
          </table:table-cell>
          <table:table-cell table:formula="of:=[.D640]-[.D63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7" office:value-type="float" office:value="4473" calcext:value-type="float">
            <text:p>4473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0517708333333333" calcext:value-type="float">
            <text:p>0,00051770833333333300</text:p>
          </table:table-cell>
          <table:table-cell table:formula="of:=[.D641]-[.D64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7" office:value-type="float" office:value="4480" calcext:value-type="float">
            <text:p>448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0518518518518519" calcext:value-type="float">
            <text:p>0,00051851851851851900</text:p>
          </table:table-cell>
          <table:table-cell table:formula="of:=[.D642]-[.D64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7" office:value-type="float" office:value="4487" calcext:value-type="float">
            <text:p>4487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0519328703703704" calcext:value-type="float">
            <text:p>0,00051932870370370400</text:p>
          </table:table-cell>
          <table:table-cell table:formula="of:=[.D643]-[.D64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7" office:value-type="float" office:value="4494" calcext:value-type="float">
            <text:p>4494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0520138888888889" calcext:value-type="float">
            <text:p>0,00052013888888888900</text:p>
          </table:table-cell>
          <table:table-cell table:formula="of:=[.D644]-[.D64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7" office:value-type="float" office:value="4501" calcext:value-type="float">
            <text:p>4501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0520949074074074" calcext:value-type="float">
            <text:p>0,00052094907407407400</text:p>
          </table:table-cell>
          <table:table-cell table:formula="of:=[.D645]-[.D64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7" office:value-type="float" office:value="4508" calcext:value-type="float">
            <text:p>4508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0521759259259259" calcext:value-type="float">
            <text:p>0,00052175925925925900</text:p>
          </table:table-cell>
          <table:table-cell table:formula="of:=[.D646]-[.D64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7" office:value-type="float" office:value="4515" calcext:value-type="float">
            <text:p>4515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0522569444444444" calcext:value-type="float">
            <text:p>0,00052256944444444400</text:p>
          </table:table-cell>
          <table:table-cell table:formula="of:=[.D647]-[.D64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7" office:value-type="float" office:value="4522" calcext:value-type="float">
            <text:p>4522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052337962962963" calcext:value-type="float">
            <text:p>0,00052337962962963000</text:p>
          </table:table-cell>
          <table:table-cell table:formula="of:=[.D648]-[.D64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7" office:value-type="float" office:value="4529" calcext:value-type="float">
            <text:p>4529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0524189814814815" calcext:value-type="float">
            <text:p>0,00052418981481481500</text:p>
          </table:table-cell>
          <table:table-cell table:formula="of:=[.D649]-[.D64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7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0525" calcext:value-type="float">
            <text:p>0,00052500000000000000</text:p>
          </table:table-cell>
          <table:table-cell table:formula="of:=[.D650]-[.D64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7" office:value-type="float" office:value="4543" calcext:value-type="float">
            <text:p>4543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0525810185185185" calcext:value-type="float">
            <text:p>0,00052581018518518500</text:p>
          </table:table-cell>
          <table:table-cell table:formula="of:=[.D651]-[.D65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7" office:value-type="float" office:value="4550" calcext:value-type="float">
            <text:p>455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052662037037037" calcext:value-type="float">
            <text:p>0,00052662037037037000</text:p>
          </table:table-cell>
          <table:table-cell table:formula="of:=[.D652]-[.D65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7" office:value-type="float" office:value="4557" calcext:value-type="float">
            <text:p>4557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0527430555555556" calcext:value-type="float">
            <text:p>0,00052743055555555600</text:p>
          </table:table-cell>
          <table:table-cell table:formula="of:=[.D653]-[.D65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7" office:value-type="float" office:value="4564" calcext:value-type="float">
            <text:p>4564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0528240740740741" calcext:value-type="float">
            <text:p>0,00052824074074074100</text:p>
          </table:table-cell>
          <table:table-cell table:formula="of:=[.D654]-[.D65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7" office:value-type="float" office:value="4571" calcext:value-type="float">
            <text:p>4571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0529050925925926" calcext:value-type="float">
            <text:p>0,00052905092592592600</text:p>
          </table:table-cell>
          <table:table-cell table:formula="of:=[.D655]-[.D65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7" office:value-type="float" office:value="4578" calcext:value-type="float">
            <text:p>4578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0529861111111111" calcext:value-type="float">
            <text:p>0,00052986111111111100</text:p>
          </table:table-cell>
          <table:table-cell table:formula="of:=[.D656]-[.D65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7" office:value-type="float" office:value="4585" calcext:value-type="float">
            <text:p>4585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0530671296296296" calcext:value-type="float">
            <text:p>0,00053067129629629600</text:p>
          </table:table-cell>
          <table:table-cell table:formula="of:=[.D657]-[.D65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7" office:value-type="float" office:value="4592" calcext:value-type="float">
            <text:p>4592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0531481481481482" calcext:value-type="float">
            <text:p>0,00053148148148148200</text:p>
          </table:table-cell>
          <table:table-cell table:formula="of:=[.D658]-[.D65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7" office:value-type="float" office:value="4599" calcext:value-type="float">
            <text:p>4599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0532291666666667" calcext:value-type="float">
            <text:p>0,00053229166666666700</text:p>
          </table:table-cell>
          <table:table-cell table:formula="of:=[.D659]-[.D65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7" office:value-type="float" office:value="4606" calcext:value-type="float">
            <text:p>4606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0533101851851852" calcext:value-type="float">
            <text:p>0,00053310185185185200</text:p>
          </table:table-cell>
          <table:table-cell table:formula="of:=[.D660]-[.D65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7" office:value-type="float" office:value="4613" calcext:value-type="float">
            <text:p>4613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0533912037037037" calcext:value-type="float">
            <text:p>0,00053391203703703700</text:p>
          </table:table-cell>
          <table:table-cell table:formula="of:=[.D661]-[.D66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7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0534722222222222" calcext:value-type="float">
            <text:p>0,00053472222222222200</text:p>
          </table:table-cell>
          <table:table-cell table:formula="of:=[.D662]-[.D66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7" office:value-type="float" office:value="4627" calcext:value-type="float">
            <text:p>4627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0535532407407407" calcext:value-type="float">
            <text:p>0,00053553240740740700</text:p>
          </table:table-cell>
          <table:table-cell table:formula="of:=[.D663]-[.D66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7" office:value-type="float" office:value="4634" calcext:value-type="float">
            <text:p>4634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0536342592592593" calcext:value-type="float">
            <text:p>0,00053634259259259300</text:p>
          </table:table-cell>
          <table:table-cell table:formula="of:=[.D664]-[.D66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7" office:value-type="float" office:value="4641" calcext:value-type="float">
            <text:p>4641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0537152777777778" calcext:value-type="float">
            <text:p>0,00053715277777777800</text:p>
          </table:table-cell>
          <table:table-cell table:formula="of:=[.D665]-[.D66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7" office:value-type="float" office:value="4648" calcext:value-type="float">
            <text:p>4648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0537962962962963" calcext:value-type="float">
            <text:p>0,00053796296296296300</text:p>
          </table:table-cell>
          <table:table-cell table:formula="of:=[.D666]-[.D66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7" office:value-type="float" office:value="4655" calcext:value-type="float">
            <text:p>4655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0538773148148148" calcext:value-type="float">
            <text:p>0,00053877314814814800</text:p>
          </table:table-cell>
          <table:table-cell table:formula="of:=[.D667]-[.D66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7" office:value-type="float" office:value="4662" calcext:value-type="float">
            <text:p>4662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0539583333333333" calcext:value-type="float">
            <text:p>0,00053958333333333300</text:p>
          </table:table-cell>
          <table:table-cell table:formula="of:=[.D668]-[.D66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7" office:value-type="float" office:value="4669" calcext:value-type="float">
            <text:p>4669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0540393518518519" calcext:value-type="float">
            <text:p>0,00054039351851851900</text:p>
          </table:table-cell>
          <table:table-cell table:formula="of:=[.D669]-[.D66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7" office:value-type="float" office:value="4676" calcext:value-type="float">
            <text:p>4676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0541203703703704" calcext:value-type="float">
            <text:p>0,00054120370370370400</text:p>
          </table:table-cell>
          <table:table-cell table:formula="of:=[.D670]-[.D66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7" office:value-type="float" office:value="4683" calcext:value-type="float">
            <text:p>4683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0542013888888889" calcext:value-type="float">
            <text:p>0,00054201388888888900</text:p>
          </table:table-cell>
          <table:table-cell table:formula="of:=[.D671]-[.D67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7" office:value-type="float" office:value="4690" calcext:value-type="float">
            <text:p>469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0542824074074074" calcext:value-type="float">
            <text:p>0,00054282407407407400</text:p>
          </table:table-cell>
          <table:table-cell table:formula="of:=[.D672]-[.D67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7" office:value-type="float" office:value="4697" calcext:value-type="float">
            <text:p>4697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0543634259259259" calcext:value-type="float">
            <text:p>0,00054363425925925900</text:p>
          </table:table-cell>
          <table:table-cell table:formula="of:=[.D673]-[.D67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7" office:value-type="float" office:value="4704" calcext:value-type="float">
            <text:p>4704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0544444444444444" calcext:value-type="float">
            <text:p>0,00054444444444444400</text:p>
          </table:table-cell>
          <table:table-cell table:formula="of:=[.D674]-[.D67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7" office:value-type="float" office:value="4711" calcext:value-type="float">
            <text:p>4711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054525462962963" calcext:value-type="float">
            <text:p>0,00054525462962963000</text:p>
          </table:table-cell>
          <table:table-cell table:formula="of:=[.D675]-[.D67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7" office:value-type="float" office:value="4718" calcext:value-type="float">
            <text:p>4718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0546064814814815" calcext:value-type="float">
            <text:p>0,00054606481481481500</text:p>
          </table:table-cell>
          <table:table-cell table:formula="of:=[.D676]-[.D67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7" office:value-type="float" office:value="4725" calcext:value-type="float">
            <text:p>4725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0546875" calcext:value-type="float">
            <text:p>0,00054687500000000000</text:p>
          </table:table-cell>
          <table:table-cell table:formula="of:=[.D677]-[.D67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7" office:value-type="float" office:value="4732" calcext:value-type="float">
            <text:p>4732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0547685185185185" calcext:value-type="float">
            <text:p>0,00054768518518518500</text:p>
          </table:table-cell>
          <table:table-cell table:formula="of:=[.D678]-[.D67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7" office:value-type="float" office:value="4739" calcext:value-type="float">
            <text:p>4739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054849537037037" calcext:value-type="float">
            <text:p>0,00054849537037037000</text:p>
          </table:table-cell>
          <table:table-cell table:formula="of:=[.D679]-[.D67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7" office:value-type="float" office:value="4746" calcext:value-type="float">
            <text:p>4746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0549305555555556" calcext:value-type="float">
            <text:p>0,00054930555555555600</text:p>
          </table:table-cell>
          <table:table-cell table:formula="of:=[.D680]-[.D67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7" office:value-type="float" office:value="4753" calcext:value-type="float">
            <text:p>4753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0550115740740741" calcext:value-type="float">
            <text:p>0,00055011574074074100</text:p>
          </table:table-cell>
          <table:table-cell table:formula="of:=[.D681]-[.D68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7" office:value-type="float" office:value="4760" calcext:value-type="float">
            <text:p>476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0550925925925926" calcext:value-type="float">
            <text:p>0,00055092592592592600</text:p>
          </table:table-cell>
          <table:table-cell table:formula="of:=[.D682]-[.D68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7" office:value-type="float" office:value="4767" calcext:value-type="float">
            <text:p>4767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0551736111111111" calcext:value-type="float">
            <text:p>0,00055173611111111100</text:p>
          </table:table-cell>
          <table:table-cell table:formula="of:=[.D683]-[.D68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7" office:value-type="float" office:value="4774" calcext:value-type="float">
            <text:p>4774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0552546296296296" calcext:value-type="float">
            <text:p>0,00055254629629629600</text:p>
          </table:table-cell>
          <table:table-cell table:formula="of:=[.D684]-[.D68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7" office:value-type="float" office:value="4781" calcext:value-type="float">
            <text:p>4781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0553356481481482" calcext:value-type="float">
            <text:p>0,00055335648148148200</text:p>
          </table:table-cell>
          <table:table-cell table:formula="of:=[.D685]-[.D68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7" office:value-type="float" office:value="4788" calcext:value-type="float">
            <text:p>4788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0554166666666667" calcext:value-type="float">
            <text:p>0,00055416666666666700</text:p>
          </table:table-cell>
          <table:table-cell table:formula="of:=[.D686]-[.D68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7" office:value-type="float" office:value="4795" calcext:value-type="float">
            <text:p>4795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0554976851851852" calcext:value-type="float">
            <text:p>0,00055497685185185200</text:p>
          </table:table-cell>
          <table:table-cell table:formula="of:=[.D687]-[.D68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7" office:value-type="float" office:value="4802" calcext:value-type="float">
            <text:p>4802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0555787037037037" calcext:value-type="float">
            <text:p>0,00055578703703703700</text:p>
          </table:table-cell>
          <table:table-cell table:formula="of:=[.D688]-[.D68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7" office:value-type="float" office:value="4809" calcext:value-type="float">
            <text:p>4809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0556597222222222" calcext:value-type="float">
            <text:p>0,00055659722222222200</text:p>
          </table:table-cell>
          <table:table-cell table:formula="of:=[.D689]-[.D68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7" office:value-type="float" office:value="4816" calcext:value-type="float">
            <text:p>4816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0557407407407407" calcext:value-type="float">
            <text:p>0,00055740740740740700</text:p>
          </table:table-cell>
          <table:table-cell table:formula="of:=[.D690]-[.D68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7" office:value-type="float" office:value="4823" calcext:value-type="float">
            <text:p>4823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0558217592592593" calcext:value-type="float">
            <text:p>0,00055821759259259300</text:p>
          </table:table-cell>
          <table:table-cell table:formula="of:=[.D691]-[.D69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7" office:value-type="float" office:value="4830" calcext:value-type="float">
            <text:p>483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0559027777777778" calcext:value-type="float">
            <text:p>0,00055902777777777800</text:p>
          </table:table-cell>
          <table:table-cell table:formula="of:=[.D692]-[.D69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7" office:value-type="float" office:value="4837" calcext:value-type="float">
            <text:p>4837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0559837962962963" calcext:value-type="float">
            <text:p>0,00055983796296296300</text:p>
          </table:table-cell>
          <table:table-cell table:formula="of:=[.D693]-[.D69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7" office:value-type="float" office:value="4844" calcext:value-type="float">
            <text:p>4844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0560648148148148" calcext:value-type="float">
            <text:p>0,00056064814814814800</text:p>
          </table:table-cell>
          <table:table-cell table:formula="of:=[.D694]-[.D69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7" office:value-type="float" office:value="4851" calcext:value-type="float">
            <text:p>4851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0561458333333333" calcext:value-type="float">
            <text:p>0,00056145833333333300</text:p>
          </table:table-cell>
          <table:table-cell table:formula="of:=[.D695]-[.D69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7" office:value-type="float" office:value="4858" calcext:value-type="float">
            <text:p>4858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0562268518518519" calcext:value-type="float">
            <text:p>0,00056226851851851900</text:p>
          </table:table-cell>
          <table:table-cell table:formula="of:=[.D696]-[.D69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7" office:value-type="float" office:value="4865" calcext:value-type="float">
            <text:p>4865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0563078703703704" calcext:value-type="float">
            <text:p>0,00056307870370370400</text:p>
          </table:table-cell>
          <table:table-cell table:formula="of:=[.D697]-[.D69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7" office:value-type="float" office:value="4872" calcext:value-type="float">
            <text:p>4872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0563888888888889" calcext:value-type="float">
            <text:p>0,00056388888888888900</text:p>
          </table:table-cell>
          <table:table-cell table:formula="of:=[.D698]-[.D69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7" office:value-type="float" office:value="4879" calcext:value-type="float">
            <text:p>4879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0564699074074074" calcext:value-type="float">
            <text:p>0,00056469907407407400</text:p>
          </table:table-cell>
          <table:table-cell table:formula="of:=[.D699]-[.D69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7" office:value-type="float" office:value="4886" calcext:value-type="float">
            <text:p>4886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0565509259259259" calcext:value-type="float">
            <text:p>0,00056550925925925900</text:p>
          </table:table-cell>
          <table:table-cell table:formula="of:=[.D700]-[.D69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7" office:value-type="float" office:value="4893" calcext:value-type="float">
            <text:p>4893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0566319444444445" calcext:value-type="float">
            <text:p>0,00056631944444444500</text:p>
          </table:table-cell>
          <table:table-cell table:formula="of:=[.D701]-[.D70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7" office:value-type="float" office:value="4900" calcext:value-type="float">
            <text:p>49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056712962962963" calcext:value-type="float">
            <text:p>0,00056712962962963000</text:p>
          </table:table-cell>
          <table:table-cell table:formula="of:=[.D702]-[.D70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7" office:value-type="float" office:value="4907" calcext:value-type="float">
            <text:p>4907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0567939814814815" calcext:value-type="float">
            <text:p>0,00056793981481481500</text:p>
          </table:table-cell>
          <table:table-cell table:formula="of:=[.D703]-[.D70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7" office:value-type="float" office:value="4914" calcext:value-type="float">
            <text:p>4914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056875" calcext:value-type="float">
            <text:p>0,00056875000000000000</text:p>
          </table:table-cell>
          <table:table-cell table:formula="of:=[.D704]-[.D70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7" office:value-type="float" office:value="4921" calcext:value-type="float">
            <text:p>4921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0569560185185185" calcext:value-type="float">
            <text:p>0,00056956018518518500</text:p>
          </table:table-cell>
          <table:table-cell table:formula="of:=[.D705]-[.D70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7" office:value-type="float" office:value="4928" calcext:value-type="float">
            <text:p>4928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057037037037037" calcext:value-type="float">
            <text:p>0,00057037037037037000</text:p>
          </table:table-cell>
          <table:table-cell table:formula="of:=[.D706]-[.D70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7" office:value-type="float" office:value="4935" calcext:value-type="float">
            <text:p>4935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0571180555555556" calcext:value-type="float">
            <text:p>0,00057118055555555600</text:p>
          </table:table-cell>
          <table:table-cell table:formula="of:=[.D707]-[.D70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7" office:value-type="float" office:value="4942" calcext:value-type="float">
            <text:p>4942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0571990740740741" calcext:value-type="float">
            <text:p>0,00057199074074074100</text:p>
          </table:table-cell>
          <table:table-cell table:formula="of:=[.D708]-[.D70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7" office:value-type="float" office:value="4949" calcext:value-type="float">
            <text:p>4949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0572800925925926" calcext:value-type="float">
            <text:p>0,00057280092592592600</text:p>
          </table:table-cell>
          <table:table-cell table:formula="of:=[.D709]-[.D70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7" office:value-type="float" office:value="4956" calcext:value-type="float">
            <text:p>4956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0573611111111111" calcext:value-type="float">
            <text:p>0,00057361111111111100</text:p>
          </table:table-cell>
          <table:table-cell table:formula="of:=[.D710]-[.D70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7" office:value-type="float" office:value="4963" calcext:value-type="float">
            <text:p>4963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0574421296296296" calcext:value-type="float">
            <text:p>0,00057442129629629600</text:p>
          </table:table-cell>
          <table:table-cell table:formula="of:=[.D711]-[.D71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7" office:value-type="float" office:value="4970" calcext:value-type="float">
            <text:p>497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0575231481481482" calcext:value-type="float">
            <text:p>0,00057523148148148200</text:p>
          </table:table-cell>
          <table:table-cell table:formula="of:=[.D712]-[.D71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7" office:value-type="float" office:value="4977" calcext:value-type="float">
            <text:p>4977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0576041666666667" calcext:value-type="float">
            <text:p>0,00057604166666666700</text:p>
          </table:table-cell>
          <table:table-cell table:formula="of:=[.D713]-[.D71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7" office:value-type="float" office:value="4984" calcext:value-type="float">
            <text:p>4984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0576851851851852" calcext:value-type="float">
            <text:p>0,00057685185185185200</text:p>
          </table:table-cell>
          <table:table-cell table:formula="of:=[.D714]-[.D71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7" office:value-type="float" office:value="4991" calcext:value-type="float">
            <text:p>4991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0577662037037037" calcext:value-type="float">
            <text:p>0,00057766203703703700</text:p>
          </table:table-cell>
          <table:table-cell table:formula="of:=[.D715]-[.D71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7" office:value-type="float" office:value="4998" calcext:value-type="float">
            <text:p>4998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0578472222222222" calcext:value-type="float">
            <text:p>0,00057847222222222200</text:p>
          </table:table-cell>
          <table:table-cell table:formula="of:=[.D716]-[.D71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7" office:value-type="float" office:value="5005" calcext:value-type="float">
            <text:p>5005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0579282407407407" calcext:value-type="float">
            <text:p>0,00057928240740740700</text:p>
          </table:table-cell>
          <table:table-cell table:formula="of:=[.D717]-[.D71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7" office:value-type="float" office:value="5012" calcext:value-type="float">
            <text:p>5012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0580092592592593" calcext:value-type="float">
            <text:p>0,00058009259259259300</text:p>
          </table:table-cell>
          <table:table-cell table:formula="of:=[.D718]-[.D71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7" office:value-type="float" office:value="5019" calcext:value-type="float">
            <text:p>5019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0580902777777778" calcext:value-type="float">
            <text:p>0,00058090277777777800</text:p>
          </table:table-cell>
          <table:table-cell table:formula="of:=[.D719]-[.D71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7" office:value-type="float" office:value="5026" calcext:value-type="float">
            <text:p>5026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0581712962962963" calcext:value-type="float">
            <text:p>0,00058171296296296300</text:p>
          </table:table-cell>
          <table:table-cell table:formula="of:=[.D720]-[.D71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7" office:value-type="float" office:value="5033" calcext:value-type="float">
            <text:p>5033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0582523148148148" calcext:value-type="float">
            <text:p>0,00058252314814814800</text:p>
          </table:table-cell>
          <table:table-cell table:formula="of:=[.D721]-[.D72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7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0583333333333333" calcext:value-type="float">
            <text:p>0,00058333333333333300</text:p>
          </table:table-cell>
          <table:table-cell table:formula="of:=[.D722]-[.D72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7" office:value-type="float" office:value="5047" calcext:value-type="float">
            <text:p>5047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0584143518518519" calcext:value-type="float">
            <text:p>0,00058414351851851900</text:p>
          </table:table-cell>
          <table:table-cell table:formula="of:=[.D723]-[.D72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7" office:value-type="float" office:value="5054" calcext:value-type="float">
            <text:p>5054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0584953703703704" calcext:value-type="float">
            <text:p>0,00058495370370370400</text:p>
          </table:table-cell>
          <table:table-cell table:formula="of:=[.D724]-[.D72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7" office:value-type="float" office:value="5061" calcext:value-type="float">
            <text:p>5061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0585763888888889" calcext:value-type="float">
            <text:p>0,00058576388888888900</text:p>
          </table:table-cell>
          <table:table-cell table:formula="of:=[.D725]-[.D72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7" office:value-type="float" office:value="5068" calcext:value-type="float">
            <text:p>5068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0586574074074074" calcext:value-type="float">
            <text:p>0,00058657407407407400</text:p>
          </table:table-cell>
          <table:table-cell table:formula="of:=[.D726]-[.D72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7" office:value-type="float" office:value="5075" calcext:value-type="float">
            <text:p>5075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0587384259259259" calcext:value-type="float">
            <text:p>0,00058738425925925900</text:p>
          </table:table-cell>
          <table:table-cell table:formula="of:=[.D727]-[.D72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7" office:value-type="float" office:value="5082" calcext:value-type="float">
            <text:p>5082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0588194444444445" calcext:value-type="float">
            <text:p>0,00058819444444444500</text:p>
          </table:table-cell>
          <table:table-cell table:formula="of:=[.D728]-[.D72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7" office:value-type="float" office:value="5089" calcext:value-type="float">
            <text:p>5089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058900462962963" calcext:value-type="float">
            <text:p>0,00058900462962963000</text:p>
          </table:table-cell>
          <table:table-cell table:formula="of:=[.D729]-[.D72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7" office:value-type="float" office:value="5096" calcext:value-type="float">
            <text:p>5096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0589814814814815" calcext:value-type="float">
            <text:p>0,00058981481481481500</text:p>
          </table:table-cell>
          <table:table-cell table:formula="of:=[.D730]-[.D72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7" office:value-type="float" office:value="5103" calcext:value-type="float">
            <text:p>5103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0590625" calcext:value-type="float">
            <text:p>0,00059062500000000000</text:p>
          </table:table-cell>
          <table:table-cell table:formula="of:=[.D731]-[.D73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7" office:value-type="float" office:value="5110" calcext:value-type="float">
            <text:p>511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0591435185185185" calcext:value-type="float">
            <text:p>0,00059143518518518500</text:p>
          </table:table-cell>
          <table:table-cell table:formula="of:=[.D732]-[.D73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7" office:value-type="float" office:value="5117" calcext:value-type="float">
            <text:p>5117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059224537037037" calcext:value-type="float">
            <text:p>0,00059224537037037000</text:p>
          </table:table-cell>
          <table:table-cell table:formula="of:=[.D733]-[.D73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7" office:value-type="float" office:value="5124" calcext:value-type="float">
            <text:p>5124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0593055555555556" calcext:value-type="float">
            <text:p>0,00059305555555555600</text:p>
          </table:table-cell>
          <table:table-cell table:formula="of:=[.D734]-[.D73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7" office:value-type="float" office:value="5131" calcext:value-type="float">
            <text:p>5131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0593865740740741" calcext:value-type="float">
            <text:p>0,00059386574074074100</text:p>
          </table:table-cell>
          <table:table-cell table:formula="of:=[.D735]-[.D73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7" office:value-type="float" office:value="5138" calcext:value-type="float">
            <text:p>5138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0594675925925926" calcext:value-type="float">
            <text:p>0,00059467592592592600</text:p>
          </table:table-cell>
          <table:table-cell table:formula="of:=[.D736]-[.D73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7" office:value-type="float" office:value="5145" calcext:value-type="float">
            <text:p>5145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0595486111111111" calcext:value-type="float">
            <text:p>0,00059548611111111100</text:p>
          </table:table-cell>
          <table:table-cell table:formula="of:=[.D737]-[.D73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7" office:value-type="float" office:value="5152" calcext:value-type="float">
            <text:p>5152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0596296296296296" calcext:value-type="float">
            <text:p>0,00059629629629629600</text:p>
          </table:table-cell>
          <table:table-cell table:formula="of:=[.D738]-[.D73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7" office:value-type="float" office:value="5159" calcext:value-type="float">
            <text:p>5159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0597106481481481" calcext:value-type="float">
            <text:p>0,00059710648148148100</text:p>
          </table:table-cell>
          <table:table-cell table:formula="of:=[.D739]-[.D73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7" office:value-type="float" office:value="5166" calcext:value-type="float">
            <text:p>5166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0597916666666667" calcext:value-type="float">
            <text:p>0,00059791666666666700</text:p>
          </table:table-cell>
          <table:table-cell table:formula="of:=[.D740]-[.D73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7" office:value-type="float" office:value="5173" calcext:value-type="float">
            <text:p>5173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0598726851851852" calcext:value-type="float">
            <text:p>0,00059872685185185200</text:p>
          </table:table-cell>
          <table:table-cell table:formula="of:=[.D741]-[.D74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7" office:value-type="float" office:value="5180" calcext:value-type="float">
            <text:p>518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0599537037037037" calcext:value-type="float">
            <text:p>0,00059953703703703700</text:p>
          </table:table-cell>
          <table:table-cell table:formula="of:=[.D742]-[.D74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7" office:value-type="float" office:value="5187" calcext:value-type="float">
            <text:p>5187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0600347222222222" calcext:value-type="float">
            <text:p>0,00060034722222222200</text:p>
          </table:table-cell>
          <table:table-cell table:formula="of:=[.D743]-[.D74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7" office:value-type="float" office:value="5194" calcext:value-type="float">
            <text:p>5194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0601157407407408" calcext:value-type="float">
            <text:p>0,00060115740740740800</text:p>
          </table:table-cell>
          <table:table-cell table:formula="of:=[.D744]-[.D74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7" office:value-type="float" office:value="5201" calcext:value-type="float">
            <text:p>5201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0601967592592593" calcext:value-type="float">
            <text:p>0,00060196759259259300</text:p>
          </table:table-cell>
          <table:table-cell table:formula="of:=[.D745]-[.D74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7" office:value-type="float" office:value="5208" calcext:value-type="float">
            <text:p>5208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0602777777777778" calcext:value-type="float">
            <text:p>0,00060277777777777800</text:p>
          </table:table-cell>
          <table:table-cell table:formula="of:=[.D746]-[.D74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7" office:value-type="float" office:value="5215" calcext:value-type="float">
            <text:p>5215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0603587962962963" calcext:value-type="float">
            <text:p>0,00060358796296296300</text:p>
          </table:table-cell>
          <table:table-cell table:formula="of:=[.D747]-[.D74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7" office:value-type="float" office:value="5222" calcext:value-type="float">
            <text:p>5222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0604398148148148" calcext:value-type="float">
            <text:p>0,00060439814814814800</text:p>
          </table:table-cell>
          <table:table-cell table:formula="of:=[.D748]-[.D74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7" office:value-type="float" office:value="5229" calcext:value-type="float">
            <text:p>5229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0605208333333333" calcext:value-type="float">
            <text:p>0,00060520833333333300</text:p>
          </table:table-cell>
          <table:table-cell table:formula="of:=[.D749]-[.D74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7" office:value-type="float" office:value="5236" calcext:value-type="float">
            <text:p>5236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0606018518518519" calcext:value-type="float">
            <text:p>0,00060601851851851900</text:p>
          </table:table-cell>
          <table:table-cell table:formula="of:=[.D750]-[.D74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7" office:value-type="float" office:value="5243" calcext:value-type="float">
            <text:p>5243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0606828703703704" calcext:value-type="float">
            <text:p>0,00060682870370370400</text:p>
          </table:table-cell>
          <table:table-cell table:formula="of:=[.D751]-[.D75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7" office:value-type="float" office:value="5250" calcext:value-type="float">
            <text:p>525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0607638888888889" calcext:value-type="float">
            <text:p>0,00060763888888888900</text:p>
          </table:table-cell>
          <table:table-cell table:formula="of:=[.D752]-[.D75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7" office:value-type="float" office:value="5257" calcext:value-type="float">
            <text:p>5257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0608449074074074" calcext:value-type="float">
            <text:p>0,00060844907407407400</text:p>
          </table:table-cell>
          <table:table-cell table:formula="of:=[.D753]-[.D75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7" office:value-type="float" office:value="5264" calcext:value-type="float">
            <text:p>5264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0609259259259259" calcext:value-type="float">
            <text:p>0,00060925925925925900</text:p>
          </table:table-cell>
          <table:table-cell table:formula="of:=[.D754]-[.D75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7" office:value-type="float" office:value="5271" calcext:value-type="float">
            <text:p>5271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0610069444444444" calcext:value-type="float">
            <text:p>0,00061006944444444400</text:p>
          </table:table-cell>
          <table:table-cell table:formula="of:=[.D755]-[.D75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7" office:value-type="float" office:value="5278" calcext:value-type="float">
            <text:p>5278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061087962962963" calcext:value-type="float">
            <text:p>0,00061087962962963000</text:p>
          </table:table-cell>
          <table:table-cell table:formula="of:=[.D756]-[.D75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7" office:value-type="float" office:value="5285" calcext:value-type="float">
            <text:p>5285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0611689814814815" calcext:value-type="float">
            <text:p>0,00061168981481481500</text:p>
          </table:table-cell>
          <table:table-cell table:formula="of:=[.D757]-[.D75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7" office:value-type="float" office:value="5292" calcext:value-type="float">
            <text:p>5292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06125" calcext:value-type="float">
            <text:p>0,00061250000000000000</text:p>
          </table:table-cell>
          <table:table-cell table:formula="of:=[.D758]-[.D75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7" office:value-type="float" office:value="5299" calcext:value-type="float">
            <text:p>5299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0613310185185185" calcext:value-type="float">
            <text:p>0,00061331018518518500</text:p>
          </table:table-cell>
          <table:table-cell table:formula="of:=[.D759]-[.D75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7" office:value-type="float" office:value="5306" calcext:value-type="float">
            <text:p>5306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061412037037037" calcext:value-type="float">
            <text:p>0,00061412037037037000</text:p>
          </table:table-cell>
          <table:table-cell table:formula="of:=[.D760]-[.D75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7" office:value-type="float" office:value="5313" calcext:value-type="float">
            <text:p>5313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0614930555555556" calcext:value-type="float">
            <text:p>0,00061493055555555600</text:p>
          </table:table-cell>
          <table:table-cell table:formula="of:=[.D761]-[.D76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7" office:value-type="float" office:value="5320" calcext:value-type="float">
            <text:p>532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0615740740740741" calcext:value-type="float">
            <text:p>0,00061574074074074100</text:p>
          </table:table-cell>
          <table:table-cell table:formula="of:=[.D762]-[.D76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7" office:value-type="float" office:value="5327" calcext:value-type="float">
            <text:p>5327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0616550925925926" calcext:value-type="float">
            <text:p>0,00061655092592592600</text:p>
          </table:table-cell>
          <table:table-cell table:formula="of:=[.D763]-[.D76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7" office:value-type="float" office:value="5334" calcext:value-type="float">
            <text:p>5334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0617361111111111" calcext:value-type="float">
            <text:p>0,00061736111111111100</text:p>
          </table:table-cell>
          <table:table-cell table:formula="of:=[.D764]-[.D76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7" office:value-type="float" office:value="5341" calcext:value-type="float">
            <text:p>5341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0618171296296296" calcext:value-type="float">
            <text:p>0,00061817129629629600</text:p>
          </table:table-cell>
          <table:table-cell table:formula="of:=[.D765]-[.D76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7" office:value-type="float" office:value="5348" calcext:value-type="float">
            <text:p>5348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0618981481481482" calcext:value-type="float">
            <text:p>0,00061898148148148200</text:p>
          </table:table-cell>
          <table:table-cell table:formula="of:=[.D766]-[.D76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7" office:value-type="float" office:value="5355" calcext:value-type="float">
            <text:p>5355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0619791666666667" calcext:value-type="float">
            <text:p>0,00061979166666666700</text:p>
          </table:table-cell>
          <table:table-cell table:formula="of:=[.D767]-[.D76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7" office:value-type="float" office:value="5362" calcext:value-type="float">
            <text:p>5362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0620601851851852" calcext:value-type="float">
            <text:p>0,00062060185185185200</text:p>
          </table:table-cell>
          <table:table-cell table:formula="of:=[.D768]-[.D76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7" office:value-type="float" office:value="5369" calcext:value-type="float">
            <text:p>5369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0621412037037037" calcext:value-type="float">
            <text:p>0,00062141203703703700</text:p>
          </table:table-cell>
          <table:table-cell table:formula="of:=[.D769]-[.D76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7" office:value-type="float" office:value="5376" calcext:value-type="float">
            <text:p>5376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0622222222222222" calcext:value-type="float">
            <text:p>0,00062222222222222200</text:p>
          </table:table-cell>
          <table:table-cell table:formula="of:=[.D770]-[.D76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7" office:value-type="float" office:value="5383" calcext:value-type="float">
            <text:p>5383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0623032407407407" calcext:value-type="float">
            <text:p>0,00062303240740740700</text:p>
          </table:table-cell>
          <table:table-cell table:formula="of:=[.D771]-[.D77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7" office:value-type="float" office:value="5390" calcext:value-type="float">
            <text:p>539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0623842592592593" calcext:value-type="float">
            <text:p>0,00062384259259259300</text:p>
          </table:table-cell>
          <table:table-cell table:formula="of:=[.D772]-[.D77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7" office:value-type="float" office:value="5397" calcext:value-type="float">
            <text:p>5397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0624652777777778" calcext:value-type="float">
            <text:p>0,00062465277777777800</text:p>
          </table:table-cell>
          <table:table-cell table:formula="of:=[.D773]-[.D77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7" office:value-type="float" office:value="5404" calcext:value-type="float">
            <text:p>5404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0625462962962963" calcext:value-type="float">
            <text:p>0,00062546296296296300</text:p>
          </table:table-cell>
          <table:table-cell table:formula="of:=[.D774]-[.D77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7" office:value-type="float" office:value="5411" calcext:value-type="float">
            <text:p>5411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0626273148148148" calcext:value-type="float">
            <text:p>0,00062627314814814800</text:p>
          </table:table-cell>
          <table:table-cell table:formula="of:=[.D775]-[.D77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7" office:value-type="float" office:value="5418" calcext:value-type="float">
            <text:p>5418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0627083333333333" calcext:value-type="float">
            <text:p>0,00062708333333333300</text:p>
          </table:table-cell>
          <table:table-cell table:formula="of:=[.D776]-[.D77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7" office:value-type="float" office:value="5425" calcext:value-type="float">
            <text:p>5425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0627893518518519" calcext:value-type="float">
            <text:p>0,00062789351851851900</text:p>
          </table:table-cell>
          <table:table-cell table:formula="of:=[.D777]-[.D77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7" office:value-type="float" office:value="5432" calcext:value-type="float">
            <text:p>5432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0628703703703704" calcext:value-type="float">
            <text:p>0,00062870370370370400</text:p>
          </table:table-cell>
          <table:table-cell table:formula="of:=[.D778]-[.D77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7" office:value-type="float" office:value="5439" calcext:value-type="float">
            <text:p>5439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0629513888888889" calcext:value-type="float">
            <text:p>0,00062951388888888900</text:p>
          </table:table-cell>
          <table:table-cell table:formula="of:=[.D779]-[.D77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7" office:value-type="float" office:value="5446" calcext:value-type="float">
            <text:p>5446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0630324074074074" calcext:value-type="float">
            <text:p>0,00063032407407407400</text:p>
          </table:table-cell>
          <table:table-cell table:formula="of:=[.D780]-[.D77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7" office:value-type="float" office:value="5453" calcext:value-type="float">
            <text:p>5453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0631134259259259" calcext:value-type="float">
            <text:p>0,00063113425925925900</text:p>
          </table:table-cell>
          <table:table-cell table:formula="of:=[.D781]-[.D78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7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0631944444444444" calcext:value-type="float">
            <text:p>0,00063194444444444400</text:p>
          </table:table-cell>
          <table:table-cell table:formula="of:=[.D782]-[.D78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7" office:value-type="float" office:value="5467" calcext:value-type="float">
            <text:p>5467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063275462962963" calcext:value-type="float">
            <text:p>0,00063275462962963000</text:p>
          </table:table-cell>
          <table:table-cell table:formula="of:=[.D783]-[.D78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7" office:value-type="float" office:value="5474" calcext:value-type="float">
            <text:p>5474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0633564814814815" calcext:value-type="float">
            <text:p>0,00063356481481481500</text:p>
          </table:table-cell>
          <table:table-cell table:formula="of:=[.D784]-[.D78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7" office:value-type="float" office:value="5481" calcext:value-type="float">
            <text:p>5481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0634375" calcext:value-type="float">
            <text:p>0,00063437500000000000</text:p>
          </table:table-cell>
          <table:table-cell table:formula="of:=[.D785]-[.D78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7" office:value-type="float" office:value="5488" calcext:value-type="float">
            <text:p>5488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0635185185185185" calcext:value-type="float">
            <text:p>0,00063518518518518500</text:p>
          </table:table-cell>
          <table:table-cell table:formula="of:=[.D786]-[.D78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7" office:value-type="float" office:value="5495" calcext:value-type="float">
            <text:p>5495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063599537037037" calcext:value-type="float">
            <text:p>0,00063599537037037000</text:p>
          </table:table-cell>
          <table:table-cell table:formula="of:=[.D787]-[.D78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7" office:value-type="float" office:value="5502" calcext:value-type="float">
            <text:p>5502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0636805555555556" calcext:value-type="float">
            <text:p>0,00063680555555555600</text:p>
          </table:table-cell>
          <table:table-cell table:formula="of:=[.D788]-[.D78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7" office:value-type="float" office:value="5509" calcext:value-type="float">
            <text:p>5509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0637615740740741" calcext:value-type="float">
            <text:p>0,00063761574074074100</text:p>
          </table:table-cell>
          <table:table-cell table:formula="of:=[.D789]-[.D78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7" office:value-type="float" office:value="5516" calcext:value-type="float">
            <text:p>5516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0638425925925926" calcext:value-type="float">
            <text:p>0,00063842592592592600</text:p>
          </table:table-cell>
          <table:table-cell table:formula="of:=[.D790]-[.D78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7" office:value-type="float" office:value="5523" calcext:value-type="float">
            <text:p>5523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0639236111111111" calcext:value-type="float">
            <text:p>0,00063923611111111100</text:p>
          </table:table-cell>
          <table:table-cell table:formula="of:=[.D791]-[.D79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7" office:value-type="float" office:value="5530" calcext:value-type="float">
            <text:p>553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0640046296296296" calcext:value-type="float">
            <text:p>0,00064004629629629600</text:p>
          </table:table-cell>
          <table:table-cell table:formula="of:=[.D792]-[.D79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7" office:value-type="float" office:value="5537" calcext:value-type="float">
            <text:p>5537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0640856481481482" calcext:value-type="float">
            <text:p>0,00064085648148148200</text:p>
          </table:table-cell>
          <table:table-cell table:formula="of:=[.D793]-[.D79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7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0641666666666667" calcext:value-type="float">
            <text:p>0,00064166666666666700</text:p>
          </table:table-cell>
          <table:table-cell table:formula="of:=[.D794]-[.D79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7" office:value-type="float" office:value="5551" calcext:value-type="float">
            <text:p>5551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0642476851851852" calcext:value-type="float">
            <text:p>0,00064247685185185200</text:p>
          </table:table-cell>
          <table:table-cell table:formula="of:=[.D795]-[.D79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7" office:value-type="float" office:value="5558" calcext:value-type="float">
            <text:p>5558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0643287037037037" calcext:value-type="float">
            <text:p>0,00064328703703703700</text:p>
          </table:table-cell>
          <table:table-cell table:formula="of:=[.D796]-[.D79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7" office:value-type="float" office:value="5565" calcext:value-type="float">
            <text:p>5565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0644097222222222" calcext:value-type="float">
            <text:p>0,00064409722222222200</text:p>
          </table:table-cell>
          <table:table-cell table:formula="of:=[.D797]-[.D79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7" office:value-type="float" office:value="5572" calcext:value-type="float">
            <text:p>5572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0644907407407407" calcext:value-type="float">
            <text:p>0,00064490740740740700</text:p>
          </table:table-cell>
          <table:table-cell table:formula="of:=[.D798]-[.D79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7" office:value-type="float" office:value="5579" calcext:value-type="float">
            <text:p>5579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0645717592592593" calcext:value-type="float">
            <text:p>0,00064571759259259300</text:p>
          </table:table-cell>
          <table:table-cell table:formula="of:=[.D799]-[.D79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7" office:value-type="float" office:value="5586" calcext:value-type="float">
            <text:p>5586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0646527777777778" calcext:value-type="float">
            <text:p>0,00064652777777777800</text:p>
          </table:table-cell>
          <table:table-cell table:formula="of:=[.D800]-[.D79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7" office:value-type="float" office:value="5593" calcext:value-type="float">
            <text:p>5593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0647337962962963" calcext:value-type="float">
            <text:p>0,00064733796296296300</text:p>
          </table:table-cell>
          <table:table-cell table:formula="of:=[.D801]-[.D80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7" office:value-type="float" office:value="5600" calcext:value-type="float">
            <text:p>56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0648148148148148" calcext:value-type="float">
            <text:p>0,00064814814814814800</text:p>
          </table:table-cell>
          <table:table-cell table:formula="of:=[.D802]-[.D80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7" office:value-type="float" office:value="5607" calcext:value-type="float">
            <text:p>5607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0648958333333333" calcext:value-type="float">
            <text:p>0,00064895833333333300</text:p>
          </table:table-cell>
          <table:table-cell table:formula="of:=[.D803]-[.D80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7" office:value-type="float" office:value="5614" calcext:value-type="float">
            <text:p>5614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0649768518518519" calcext:value-type="float">
            <text:p>0,00064976851851851900</text:p>
          </table:table-cell>
          <table:table-cell table:formula="of:=[.D804]-[.D80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7" office:value-type="float" office:value="5621" calcext:value-type="float">
            <text:p>5621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0650578703703704" calcext:value-type="float">
            <text:p>0,00065057870370370400</text:p>
          </table:table-cell>
          <table:table-cell table:formula="of:=[.D805]-[.D80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7" office:value-type="float" office:value="5628" calcext:value-type="float">
            <text:p>5628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0651388888888889" calcext:value-type="float">
            <text:p>0,00065138888888888900</text:p>
          </table:table-cell>
          <table:table-cell table:formula="of:=[.D806]-[.D80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7" office:value-type="float" office:value="5635" calcext:value-type="float">
            <text:p>5635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0652199074074074" calcext:value-type="float">
            <text:p>0,00065219907407407400</text:p>
          </table:table-cell>
          <table:table-cell table:formula="of:=[.D807]-[.D80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7" office:value-type="float" office:value="5642" calcext:value-type="float">
            <text:p>5642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0653009259259259" calcext:value-type="float">
            <text:p>0,00065300925925925900</text:p>
          </table:table-cell>
          <table:table-cell table:formula="of:=[.D808]-[.D80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7" office:value-type="float" office:value="5649" calcext:value-type="float">
            <text:p>5649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0653819444444444" calcext:value-type="float">
            <text:p>0,00065381944444444400</text:p>
          </table:table-cell>
          <table:table-cell table:formula="of:=[.D809]-[.D80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7" office:value-type="float" office:value="5656" calcext:value-type="float">
            <text:p>5656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065462962962963" calcext:value-type="float">
            <text:p>0,00065462962962963000</text:p>
          </table:table-cell>
          <table:table-cell table:formula="of:=[.D810]-[.D80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7" office:value-type="float" office:value="5663" calcext:value-type="float">
            <text:p>5663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0655439814814815" calcext:value-type="float">
            <text:p>0,00065543981481481500</text:p>
          </table:table-cell>
          <table:table-cell table:formula="of:=[.D811]-[.D81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7" office:value-type="float" office:value="5670" calcext:value-type="float">
            <text:p>567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065625" calcext:value-type="float">
            <text:p>0,00065625000000000000</text:p>
          </table:table-cell>
          <table:table-cell table:formula="of:=[.D812]-[.D81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7" office:value-type="float" office:value="5677" calcext:value-type="float">
            <text:p>5677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0657060185185185" calcext:value-type="float">
            <text:p>0,00065706018518518500</text:p>
          </table:table-cell>
          <table:table-cell table:formula="of:=[.D813]-[.D81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7" office:value-type="float" office:value="5684" calcext:value-type="float">
            <text:p>5684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065787037037037" calcext:value-type="float">
            <text:p>0,00065787037037037000</text:p>
          </table:table-cell>
          <table:table-cell table:formula="of:=[.D814]-[.D81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7" office:value-type="float" office:value="5691" calcext:value-type="float">
            <text:p>5691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0658680555555556" calcext:value-type="float">
            <text:p>0,00065868055555555600</text:p>
          </table:table-cell>
          <table:table-cell table:formula="of:=[.D815]-[.D81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7" office:value-type="float" office:value="5698" calcext:value-type="float">
            <text:p>5698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0659490740740741" calcext:value-type="float">
            <text:p>0,00065949074074074100</text:p>
          </table:table-cell>
          <table:table-cell table:formula="of:=[.D816]-[.D81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7" office:value-type="float" office:value="5705" calcext:value-type="float">
            <text:p>5705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0660300925925926" calcext:value-type="float">
            <text:p>0,00066030092592592600</text:p>
          </table:table-cell>
          <table:table-cell table:formula="of:=[.D817]-[.D81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7" office:value-type="float" office:value="5712" calcext:value-type="float">
            <text:p>5712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0661111111111111" calcext:value-type="float">
            <text:p>0,00066111111111111100</text:p>
          </table:table-cell>
          <table:table-cell table:formula="of:=[.D818]-[.D81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7" office:value-type="float" office:value="5719" calcext:value-type="float">
            <text:p>5719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0661921296296296" calcext:value-type="float">
            <text:p>0,00066192129629629600</text:p>
          </table:table-cell>
          <table:table-cell table:formula="of:=[.D819]-[.D81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7" office:value-type="float" office:value="5726" calcext:value-type="float">
            <text:p>5726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0662731481481482" calcext:value-type="float">
            <text:p>0,00066273148148148200</text:p>
          </table:table-cell>
          <table:table-cell table:formula="of:=[.D820]-[.D81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7" office:value-type="float" office:value="5733" calcext:value-type="float">
            <text:p>5733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0663541666666667" calcext:value-type="float">
            <text:p>0,00066354166666666700</text:p>
          </table:table-cell>
          <table:table-cell table:formula="of:=[.D821]-[.D82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7" office:value-type="float" office:value="5740" calcext:value-type="float">
            <text:p>574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0664351851851852" calcext:value-type="float">
            <text:p>0,00066435185185185200</text:p>
          </table:table-cell>
          <table:table-cell table:formula="of:=[.D822]-[.D82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7" office:value-type="float" office:value="5747" calcext:value-type="float">
            <text:p>5747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0665162037037037" calcext:value-type="float">
            <text:p>0,00066516203703703700</text:p>
          </table:table-cell>
          <table:table-cell table:formula="of:=[.D823]-[.D82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7" office:value-type="float" office:value="5754" calcext:value-type="float">
            <text:p>5754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0665972222222222" calcext:value-type="float">
            <text:p>0,00066597222222222200</text:p>
          </table:table-cell>
          <table:table-cell table:formula="of:=[.D824]-[.D82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7" office:value-type="float" office:value="5761" calcext:value-type="float">
            <text:p>5761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0666782407407407" calcext:value-type="float">
            <text:p>0,00066678240740740700</text:p>
          </table:table-cell>
          <table:table-cell table:formula="of:=[.D825]-[.D82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7" office:value-type="float" office:value="5768" calcext:value-type="float">
            <text:p>5768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0667592592592593" calcext:value-type="float">
            <text:p>0,00066759259259259300</text:p>
          </table:table-cell>
          <table:table-cell table:formula="of:=[.D826]-[.D82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7" office:value-type="float" office:value="5775" calcext:value-type="float">
            <text:p>5775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0668402777777778" calcext:value-type="float">
            <text:p>0,00066840277777777800</text:p>
          </table:table-cell>
          <table:table-cell table:formula="of:=[.D827]-[.D82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7" office:value-type="float" office:value="5782" calcext:value-type="float">
            <text:p>5782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0669212962962963" calcext:value-type="float">
            <text:p>0,00066921296296296300</text:p>
          </table:table-cell>
          <table:table-cell table:formula="of:=[.D828]-[.D82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7" office:value-type="float" office:value="5789" calcext:value-type="float">
            <text:p>5789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0670023148148148" calcext:value-type="float">
            <text:p>0,00067002314814814800</text:p>
          </table:table-cell>
          <table:table-cell table:formula="of:=[.D829]-[.D82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7" office:value-type="float" office:value="5796" calcext:value-type="float">
            <text:p>5796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0670833333333333" calcext:value-type="float">
            <text:p>0,00067083333333333300</text:p>
          </table:table-cell>
          <table:table-cell table:formula="of:=[.D830]-[.D82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7" office:value-type="float" office:value="5803" calcext:value-type="float">
            <text:p>5803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0671643518518519" calcext:value-type="float">
            <text:p>0,00067164351851851900</text:p>
          </table:table-cell>
          <table:table-cell table:formula="of:=[.D831]-[.D83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7" office:value-type="float" office:value="5810" calcext:value-type="float">
            <text:p>581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0672453703703704" calcext:value-type="float">
            <text:p>0,00067245370370370400</text:p>
          </table:table-cell>
          <table:table-cell table:formula="of:=[.D832]-[.D83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7" office:value-type="float" office:value="5817" calcext:value-type="float">
            <text:p>5817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0673263888888889" calcext:value-type="float">
            <text:p>0,00067326388888888900</text:p>
          </table:table-cell>
          <table:table-cell table:formula="of:=[.D833]-[.D83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7" office:value-type="float" office:value="5824" calcext:value-type="float">
            <text:p>5824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0674074074074074" calcext:value-type="float">
            <text:p>0,00067407407407407400</text:p>
          </table:table-cell>
          <table:table-cell table:formula="of:=[.D834]-[.D83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7" office:value-type="float" office:value="5831" calcext:value-type="float">
            <text:p>5831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0674884259259259" calcext:value-type="float">
            <text:p>0,00067488425925925900</text:p>
          </table:table-cell>
          <table:table-cell table:formula="of:=[.D835]-[.D83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7" office:value-type="float" office:value="5838" calcext:value-type="float">
            <text:p>5838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0675694444444445" calcext:value-type="float">
            <text:p>0,00067569444444444500</text:p>
          </table:table-cell>
          <table:table-cell table:formula="of:=[.D836]-[.D83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7" office:value-type="float" office:value="5845" calcext:value-type="float">
            <text:p>5845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067650462962963" calcext:value-type="float">
            <text:p>0,00067650462962963000</text:p>
          </table:table-cell>
          <table:table-cell table:formula="of:=[.D837]-[.D83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7" office:value-type="float" office:value="5852" calcext:value-type="float">
            <text:p>5852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0677314814814815" calcext:value-type="float">
            <text:p>0,00067731481481481500</text:p>
          </table:table-cell>
          <table:table-cell table:formula="of:=[.D838]-[.D83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7" office:value-type="float" office:value="5859" calcext:value-type="float">
            <text:p>5859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0678125" calcext:value-type="float">
            <text:p>0,00067812500000000000</text:p>
          </table:table-cell>
          <table:table-cell table:formula="of:=[.D839]-[.D83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7" office:value-type="float" office:value="5866" calcext:value-type="float">
            <text:p>5866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0678935185185185" calcext:value-type="float">
            <text:p>0,00067893518518518500</text:p>
          </table:table-cell>
          <table:table-cell table:formula="of:=[.D840]-[.D83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7" office:value-type="float" office:value="5873" calcext:value-type="float">
            <text:p>5873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067974537037037" calcext:value-type="float">
            <text:p>0,00067974537037037000</text:p>
          </table:table-cell>
          <table:table-cell table:formula="of:=[.D841]-[.D84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7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0680555555555556" calcext:value-type="float">
            <text:p>0,00068055555555555600</text:p>
          </table:table-cell>
          <table:table-cell table:formula="of:=[.D842]-[.D84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7" office:value-type="float" office:value="5887" calcext:value-type="float">
            <text:p>5887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0681365740740741" calcext:value-type="float">
            <text:p>0,00068136574074074100</text:p>
          </table:table-cell>
          <table:table-cell table:formula="of:=[.D843]-[.D84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7" office:value-type="float" office:value="5894" calcext:value-type="float">
            <text:p>5894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0682175925925926" calcext:value-type="float">
            <text:p>0,00068217592592592600</text:p>
          </table:table-cell>
          <table:table-cell table:formula="of:=[.D844]-[.D84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7" office:value-type="float" office:value="5901" calcext:value-type="float">
            <text:p>5901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0682986111111111" calcext:value-type="float">
            <text:p>0,00068298611111111100</text:p>
          </table:table-cell>
          <table:table-cell table:formula="of:=[.D845]-[.D84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7" office:value-type="float" office:value="5908" calcext:value-type="float">
            <text:p>5908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0683796296296296" calcext:value-type="float">
            <text:p>0,00068379629629629600</text:p>
          </table:table-cell>
          <table:table-cell table:formula="of:=[.D846]-[.D84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7" office:value-type="float" office:value="5915" calcext:value-type="float">
            <text:p>5915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0684606481481482" calcext:value-type="float">
            <text:p>0,00068460648148148200</text:p>
          </table:table-cell>
          <table:table-cell table:formula="of:=[.D847]-[.D84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7" office:value-type="float" office:value="5922" calcext:value-type="float">
            <text:p>5922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0685416666666667" calcext:value-type="float">
            <text:p>0,00068541666666666700</text:p>
          </table:table-cell>
          <table:table-cell table:formula="of:=[.D848]-[.D84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7" office:value-type="float" office:value="5929" calcext:value-type="float">
            <text:p>5929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0686226851851852" calcext:value-type="float">
            <text:p>0,00068622685185185200</text:p>
          </table:table-cell>
          <table:table-cell table:formula="of:=[.D849]-[.D84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7" office:value-type="float" office:value="5936" calcext:value-type="float">
            <text:p>5936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0687037037037037" calcext:value-type="float">
            <text:p>0,00068703703703703700</text:p>
          </table:table-cell>
          <table:table-cell table:formula="of:=[.D850]-[.D84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7" office:value-type="float" office:value="5943" calcext:value-type="float">
            <text:p>5943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0687847222222222" calcext:value-type="float">
            <text:p>0,00068784722222222200</text:p>
          </table:table-cell>
          <table:table-cell table:formula="of:=[.D851]-[.D85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7" office:value-type="float" office:value="5950" calcext:value-type="float">
            <text:p>595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0688657407407407" calcext:value-type="float">
            <text:p>0,00068865740740740700</text:p>
          </table:table-cell>
          <table:table-cell table:formula="of:=[.D852]-[.D85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7" office:value-type="float" office:value="5957" calcext:value-type="float">
            <text:p>5957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0689467592592593" calcext:value-type="float">
            <text:p>0,00068946759259259300</text:p>
          </table:table-cell>
          <table:table-cell table:formula="of:=[.D853]-[.D85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7" office:value-type="float" office:value="5964" calcext:value-type="float">
            <text:p>5964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0690277777777778" calcext:value-type="float">
            <text:p>0,00069027777777777800</text:p>
          </table:table-cell>
          <table:table-cell table:formula="of:=[.D854]-[.D85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7" office:value-type="float" office:value="5971" calcext:value-type="float">
            <text:p>5971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0691087962962963" calcext:value-type="float">
            <text:p>0,00069108796296296300</text:p>
          </table:table-cell>
          <table:table-cell table:formula="of:=[.D855]-[.D85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7" office:value-type="float" office:value="5978" calcext:value-type="float">
            <text:p>5978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0691898148148148" calcext:value-type="float">
            <text:p>0,00069189814814814800</text:p>
          </table:table-cell>
          <table:table-cell table:formula="of:=[.D856]-[.D85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7" office:value-type="float" office:value="5985" calcext:value-type="float">
            <text:p>5985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0692708333333333" calcext:value-type="float">
            <text:p>0,00069270833333333300</text:p>
          </table:table-cell>
          <table:table-cell table:formula="of:=[.D857]-[.D85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7" office:value-type="float" office:value="5992" calcext:value-type="float">
            <text:p>5992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0693518518518519" calcext:value-type="float">
            <text:p>0,00069351851851851900</text:p>
          </table:table-cell>
          <table:table-cell table:formula="of:=[.D858]-[.D85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7" office:value-type="float" office:value="5999" calcext:value-type="float">
            <text:p>5999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0694328703703704" calcext:value-type="float">
            <text:p>0,00069432870370370400</text:p>
          </table:table-cell>
          <table:table-cell table:formula="of:=[.D859]-[.D85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7" office:value-type="float" office:value="6006" calcext:value-type="float">
            <text:p>6006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0695138888888889" calcext:value-type="float">
            <text:p>0,00069513888888888900</text:p>
          </table:table-cell>
          <table:table-cell table:formula="of:=[.D860]-[.D85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7" office:value-type="float" office:value="6013" calcext:value-type="float">
            <text:p>6013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0695949074074074" calcext:value-type="float">
            <text:p>0,00069594907407407400</text:p>
          </table:table-cell>
          <table:table-cell table:formula="of:=[.D861]-[.D86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7" office:value-type="float" office:value="6020" calcext:value-type="float">
            <text:p>602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0696759259259259" calcext:value-type="float">
            <text:p>0,00069675925925925900</text:p>
          </table:table-cell>
          <table:table-cell table:formula="of:=[.D862]-[.D86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7" office:value-type="float" office:value="6027" calcext:value-type="float">
            <text:p>6027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0697569444444445" calcext:value-type="float">
            <text:p>0,00069756944444444500</text:p>
          </table:table-cell>
          <table:table-cell table:formula="of:=[.D863]-[.D86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7" office:value-type="float" office:value="6034" calcext:value-type="float">
            <text:p>6034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069837962962963" calcext:value-type="float">
            <text:p>0,00069837962962963000</text:p>
          </table:table-cell>
          <table:table-cell table:formula="of:=[.D864]-[.D86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7" office:value-type="float" office:value="6041" calcext:value-type="float">
            <text:p>6041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0699189814814815" calcext:value-type="float">
            <text:p>0,00069918981481481500</text:p>
          </table:table-cell>
          <table:table-cell table:formula="of:=[.D865]-[.D86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7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07" calcext:value-type="float">
            <text:p>0,00070000000000000000</text:p>
          </table:table-cell>
          <table:table-cell table:formula="of:=[.D866]-[.D86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7" office:value-type="float" office:value="6055" calcext:value-type="float">
            <text:p>6055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0700810185185185" calcext:value-type="float">
            <text:p>0,00070081018518518500</text:p>
          </table:table-cell>
          <table:table-cell table:formula="of:=[.D867]-[.D86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7" office:value-type="float" office:value="6062" calcext:value-type="float">
            <text:p>6062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070162037037037" calcext:value-type="float">
            <text:p>0,00070162037037037000</text:p>
          </table:table-cell>
          <table:table-cell table:formula="of:=[.D868]-[.D86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7" office:value-type="float" office:value="6069" calcext:value-type="float">
            <text:p>6069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0702430555555556" calcext:value-type="float">
            <text:p>0,00070243055555555600</text:p>
          </table:table-cell>
          <table:table-cell table:formula="of:=[.D869]-[.D86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7" office:value-type="float" office:value="6076" calcext:value-type="float">
            <text:p>6076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0703240740740741" calcext:value-type="float">
            <text:p>0,00070324074074074100</text:p>
          </table:table-cell>
          <table:table-cell table:formula="of:=[.D870]-[.D86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7" office:value-type="float" office:value="6083" calcext:value-type="float">
            <text:p>6083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0704050925925926" calcext:value-type="float">
            <text:p>0,00070405092592592600</text:p>
          </table:table-cell>
          <table:table-cell table:formula="of:=[.D871]-[.D87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7" office:value-type="float" office:value="6090" calcext:value-type="float">
            <text:p>609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0704861111111111" calcext:value-type="float">
            <text:p>0,00070486111111111100</text:p>
          </table:table-cell>
          <table:table-cell table:formula="of:=[.D872]-[.D87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7" office:value-type="float" office:value="6097" calcext:value-type="float">
            <text:p>6097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0705671296296296" calcext:value-type="float">
            <text:p>0,00070567129629629600</text:p>
          </table:table-cell>
          <table:table-cell table:formula="of:=[.D873]-[.D87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7" office:value-type="float" office:value="6104" calcext:value-type="float">
            <text:p>6104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0706481481481481" calcext:value-type="float">
            <text:p>0,00070648148148148100</text:p>
          </table:table-cell>
          <table:table-cell table:formula="of:=[.D874]-[.D87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7" office:value-type="float" office:value="6111" calcext:value-type="float">
            <text:p>6111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0707291666666667" calcext:value-type="float">
            <text:p>0,00070729166666666700</text:p>
          </table:table-cell>
          <table:table-cell table:formula="of:=[.D875]-[.D87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7" office:value-type="float" office:value="6118" calcext:value-type="float">
            <text:p>6118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0708101851851852" calcext:value-type="float">
            <text:p>0,00070810185185185200</text:p>
          </table:table-cell>
          <table:table-cell table:formula="of:=[.D876]-[.D87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7" office:value-type="float" office:value="6125" calcext:value-type="float">
            <text:p>6125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0708912037037037" calcext:value-type="float">
            <text:p>0,00070891203703703700</text:p>
          </table:table-cell>
          <table:table-cell table:formula="of:=[.D877]-[.D87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7" office:value-type="float" office:value="6132" calcext:value-type="float">
            <text:p>6132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0709722222222222" calcext:value-type="float">
            <text:p>0,00070972222222222200</text:p>
          </table:table-cell>
          <table:table-cell table:formula="of:=[.D878]-[.D87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7" office:value-type="float" office:value="6139" calcext:value-type="float">
            <text:p>6139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0710532407407407" calcext:value-type="float">
            <text:p>0,00071053240740740700</text:p>
          </table:table-cell>
          <table:table-cell table:formula="of:=[.D879]-[.D87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7" office:value-type="float" office:value="6146" calcext:value-type="float">
            <text:p>6146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0711342592592593" calcext:value-type="float">
            <text:p>0,00071134259259259300</text:p>
          </table:table-cell>
          <table:table-cell table:formula="of:=[.D880]-[.D87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7" office:value-type="float" office:value="6153" calcext:value-type="float">
            <text:p>6153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0712152777777778" calcext:value-type="float">
            <text:p>0,00071215277777777800</text:p>
          </table:table-cell>
          <table:table-cell table:formula="of:=[.D881]-[.D88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7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0712962962962963" calcext:value-type="float">
            <text:p>0,00071296296296296300</text:p>
          </table:table-cell>
          <table:table-cell table:formula="of:=[.D882]-[.D88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7" office:value-type="float" office:value="6167" calcext:value-type="float">
            <text:p>6167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0713773148148148" calcext:value-type="float">
            <text:p>0,00071377314814814800</text:p>
          </table:table-cell>
          <table:table-cell table:formula="of:=[.D883]-[.D88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7" office:value-type="float" office:value="6174" calcext:value-type="float">
            <text:p>6174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0714583333333333" calcext:value-type="float">
            <text:p>0,00071458333333333300</text:p>
          </table:table-cell>
          <table:table-cell table:formula="of:=[.D884]-[.D88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7" office:value-type="float" office:value="6181" calcext:value-type="float">
            <text:p>6181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0715393518518519" calcext:value-type="float">
            <text:p>0,00071539351851851900</text:p>
          </table:table-cell>
          <table:table-cell table:formula="of:=[.D885]-[.D88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7" office:value-type="float" office:value="6188" calcext:value-type="float">
            <text:p>6188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0716203703703704" calcext:value-type="float">
            <text:p>0,00071620370370370400</text:p>
          </table:table-cell>
          <table:table-cell table:formula="of:=[.D886]-[.D88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7" office:value-type="float" office:value="6195" calcext:value-type="float">
            <text:p>6195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0717013888888889" calcext:value-type="float">
            <text:p>0,00071701388888888900</text:p>
          </table:table-cell>
          <table:table-cell table:formula="of:=[.D887]-[.D88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7" office:value-type="float" office:value="6202" calcext:value-type="float">
            <text:p>6202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0717824074074074" calcext:value-type="float">
            <text:p>0,00071782407407407400</text:p>
          </table:table-cell>
          <table:table-cell table:formula="of:=[.D888]-[.D88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7" office:value-type="float" office:value="6209" calcext:value-type="float">
            <text:p>6209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0718634259259259" calcext:value-type="float">
            <text:p>0,00071863425925925900</text:p>
          </table:table-cell>
          <table:table-cell table:formula="of:=[.D889]-[.D88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7" office:value-type="float" office:value="6216" calcext:value-type="float">
            <text:p>6216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0719444444444444" calcext:value-type="float">
            <text:p>0,00071944444444444400</text:p>
          </table:table-cell>
          <table:table-cell table:formula="of:=[.D890]-[.D88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7" office:value-type="float" office:value="6223" calcext:value-type="float">
            <text:p>6223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072025462962963" calcext:value-type="float">
            <text:p>0,00072025462962963000</text:p>
          </table:table-cell>
          <table:table-cell table:formula="of:=[.D891]-[.D89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7" office:value-type="float" office:value="6230" calcext:value-type="float">
            <text:p>623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0721064814814815" calcext:value-type="float">
            <text:p>0,00072106481481481500</text:p>
          </table:table-cell>
          <table:table-cell table:formula="of:=[.D892]-[.D89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7" office:value-type="float" office:value="6237" calcext:value-type="float">
            <text:p>6237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0721875" calcext:value-type="float">
            <text:p>0,00072187500000000000</text:p>
          </table:table-cell>
          <table:table-cell table:formula="of:=[.D893]-[.D89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7" office:value-type="float" office:value="6244" calcext:value-type="float">
            <text:p>6244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0722685185185185" calcext:value-type="float">
            <text:p>0,00072268518518518500</text:p>
          </table:table-cell>
          <table:table-cell table:formula="of:=[.D894]-[.D89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7" office:value-type="float" office:value="6251" calcext:value-type="float">
            <text:p>6251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072349537037037" calcext:value-type="float">
            <text:p>0,00072349537037037000</text:p>
          </table:table-cell>
          <table:table-cell table:formula="of:=[.D895]-[.D89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7" office:value-type="float" office:value="6258" calcext:value-type="float">
            <text:p>6258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0724305555555556" calcext:value-type="float">
            <text:p>0,00072430555555555600</text:p>
          </table:table-cell>
          <table:table-cell table:formula="of:=[.D896]-[.D89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7" office:value-type="float" office:value="6265" calcext:value-type="float">
            <text:p>6265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0725115740740741" calcext:value-type="float">
            <text:p>0,00072511574074074100</text:p>
          </table:table-cell>
          <table:table-cell table:formula="of:=[.D897]-[.D89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7" office:value-type="float" office:value="6272" calcext:value-type="float">
            <text:p>6272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0725925925925926" calcext:value-type="float">
            <text:p>0,00072592592592592600</text:p>
          </table:table-cell>
          <table:table-cell table:formula="of:=[.D898]-[.D89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7" office:value-type="float" office:value="6279" calcext:value-type="float">
            <text:p>6279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0726736111111111" calcext:value-type="float">
            <text:p>0,00072673611111111100</text:p>
          </table:table-cell>
          <table:table-cell table:formula="of:=[.D899]-[.D89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7" office:value-type="float" office:value="6286" calcext:value-type="float">
            <text:p>6286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0727546296296296" calcext:value-type="float">
            <text:p>0,00072754629629629600</text:p>
          </table:table-cell>
          <table:table-cell table:formula="of:=[.D900]-[.D89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7" office:value-type="float" office:value="6293" calcext:value-type="float">
            <text:p>6293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0728356481481482" calcext:value-type="float">
            <text:p>0,00072835648148148100</text:p>
          </table:table-cell>
          <table:table-cell table:formula="of:=[.D901]-[.D90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7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0729166666666667" calcext:value-type="float">
            <text:p>0,00072916666666666700</text:p>
          </table:table-cell>
          <table:table-cell table:formula="of:=[.D902]-[.D90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7" office:value-type="float" office:value="6307" calcext:value-type="float">
            <text:p>6307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0729976851851852" calcext:value-type="float">
            <text:p>0,00072997685185185200</text:p>
          </table:table-cell>
          <table:table-cell table:formula="of:=[.D903]-[.D90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7" office:value-type="float" office:value="6314" calcext:value-type="float">
            <text:p>6314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0730787037037037" calcext:value-type="float">
            <text:p>0,00073078703703703700</text:p>
          </table:table-cell>
          <table:table-cell table:formula="of:=[.D904]-[.D90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7" office:value-type="float" office:value="6321" calcext:value-type="float">
            <text:p>6321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0731597222222222" calcext:value-type="float">
            <text:p>0,00073159722222222200</text:p>
          </table:table-cell>
          <table:table-cell table:formula="of:=[.D905]-[.D90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7" office:value-type="float" office:value="6328" calcext:value-type="float">
            <text:p>6328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0732407407407407" calcext:value-type="float">
            <text:p>0,00073240740740740700</text:p>
          </table:table-cell>
          <table:table-cell table:formula="of:=[.D906]-[.D90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7" office:value-type="float" office:value="6335" calcext:value-type="float">
            <text:p>6335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0733217592592593" calcext:value-type="float">
            <text:p>0,00073321759259259300</text:p>
          </table:table-cell>
          <table:table-cell table:formula="of:=[.D907]-[.D90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7" office:value-type="float" office:value="6342" calcext:value-type="float">
            <text:p>6342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0734027777777778" calcext:value-type="float">
            <text:p>0,00073402777777777800</text:p>
          </table:table-cell>
          <table:table-cell table:formula="of:=[.D908]-[.D90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7" office:value-type="float" office:value="6349" calcext:value-type="float">
            <text:p>6349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0734837962962963" calcext:value-type="float">
            <text:p>0,00073483796296296300</text:p>
          </table:table-cell>
          <table:table-cell table:formula="of:=[.D909]-[.D90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7" office:value-type="float" office:value="6356" calcext:value-type="float">
            <text:p>6356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0735648148148148" calcext:value-type="float">
            <text:p>0,00073564814814814800</text:p>
          </table:table-cell>
          <table:table-cell table:formula="of:=[.D910]-[.D90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7" office:value-type="float" office:value="6363" calcext:value-type="float">
            <text:p>6363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0736458333333333" calcext:value-type="float">
            <text:p>0,00073645833333333300</text:p>
          </table:table-cell>
          <table:table-cell table:formula="of:=[.D911]-[.D91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7" office:value-type="float" office:value="6370" calcext:value-type="float">
            <text:p>637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0737268518518519" calcext:value-type="float">
            <text:p>0,00073726851851851900</text:p>
          </table:table-cell>
          <table:table-cell table:formula="of:=[.D912]-[.D91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7" office:value-type="float" office:value="6377" calcext:value-type="float">
            <text:p>6377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0738078703703704" calcext:value-type="float">
            <text:p>0,00073807870370370400</text:p>
          </table:table-cell>
          <table:table-cell table:formula="of:=[.D913]-[.D91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7" office:value-type="float" office:value="6384" calcext:value-type="float">
            <text:p>6384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0738888888888889" calcext:value-type="float">
            <text:p>0,00073888888888888900</text:p>
          </table:table-cell>
          <table:table-cell table:formula="of:=[.D914]-[.D91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7" office:value-type="float" office:value="6391" calcext:value-type="float">
            <text:p>6391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0739699074074074" calcext:value-type="float">
            <text:p>0,00073969907407407400</text:p>
          </table:table-cell>
          <table:table-cell table:formula="of:=[.D915]-[.D91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7" office:value-type="float" office:value="6398" calcext:value-type="float">
            <text:p>6398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0740509259259259" calcext:value-type="float">
            <text:p>0,00074050925925925900</text:p>
          </table:table-cell>
          <table:table-cell table:formula="of:=[.D916]-[.D91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7" office:value-type="float" office:value="6405" calcext:value-type="float">
            <text:p>6405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0741319444444444" calcext:value-type="float">
            <text:p>0,00074131944444444500</text:p>
          </table:table-cell>
          <table:table-cell table:formula="of:=[.D917]-[.D91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7" office:value-type="float" office:value="6412" calcext:value-type="float">
            <text:p>6412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074212962962963" calcext:value-type="float">
            <text:p>0,00074212962962963000</text:p>
          </table:table-cell>
          <table:table-cell table:formula="of:=[.D918]-[.D91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7" office:value-type="float" office:value="6419" calcext:value-type="float">
            <text:p>6419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0742939814814815" calcext:value-type="float">
            <text:p>0,00074293981481481500</text:p>
          </table:table-cell>
          <table:table-cell table:formula="of:=[.D919]-[.D91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7" office:value-type="float" office:value="6426" calcext:value-type="float">
            <text:p>6426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074375" calcext:value-type="float">
            <text:p>0,00074375000000000000</text:p>
          </table:table-cell>
          <table:table-cell table:formula="of:=[.D920]-[.D91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7" office:value-type="float" office:value="6433" calcext:value-type="float">
            <text:p>6433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0744560185185185" calcext:value-type="float">
            <text:p>0,00074456018518518500</text:p>
          </table:table-cell>
          <table:table-cell table:formula="of:=[.D921]-[.D92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7" office:value-type="float" office:value="6440" calcext:value-type="float">
            <text:p>644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074537037037037" calcext:value-type="float">
            <text:p>0,00074537037037037000</text:p>
          </table:table-cell>
          <table:table-cell table:formula="of:=[.D922]-[.D92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7" office:value-type="float" office:value="6447" calcext:value-type="float">
            <text:p>6447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0746180555555556" calcext:value-type="float">
            <text:p>0,00074618055555555600</text:p>
          </table:table-cell>
          <table:table-cell table:formula="of:=[.D923]-[.D92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7" office:value-type="float" office:value="6454" calcext:value-type="float">
            <text:p>6454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0746990740740741" calcext:value-type="float">
            <text:p>0,00074699074074074100</text:p>
          </table:table-cell>
          <table:table-cell table:formula="of:=[.D924]-[.D92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7" office:value-type="float" office:value="6461" calcext:value-type="float">
            <text:p>6461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0747800925925926" calcext:value-type="float">
            <text:p>0,00074780092592592600</text:p>
          </table:table-cell>
          <table:table-cell table:formula="of:=[.D925]-[.D92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7" office:value-type="float" office:value="6468" calcext:value-type="float">
            <text:p>6468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0748611111111111" calcext:value-type="float">
            <text:p>0,00074861111111111100</text:p>
          </table:table-cell>
          <table:table-cell table:formula="of:=[.D926]-[.D92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7" office:value-type="float" office:value="6475" calcext:value-type="float">
            <text:p>6475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0749421296296296" calcext:value-type="float">
            <text:p>0,00074942129629629600</text:p>
          </table:table-cell>
          <table:table-cell table:formula="of:=[.D927]-[.D92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7" office:value-type="float" office:value="6482" calcext:value-type="float">
            <text:p>6482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0750231481481482" calcext:value-type="float">
            <text:p>0,00075023148148148100</text:p>
          </table:table-cell>
          <table:table-cell table:formula="of:=[.D928]-[.D92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7" office:value-type="float" office:value="6489" calcext:value-type="float">
            <text:p>6489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0751041666666667" calcext:value-type="float">
            <text:p>0,00075104166666666700</text:p>
          </table:table-cell>
          <table:table-cell table:formula="of:=[.D929]-[.D92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7" office:value-type="float" office:value="6496" calcext:value-type="float">
            <text:p>6496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0751851851851852" calcext:value-type="float">
            <text:p>0,00075185185185185200</text:p>
          </table:table-cell>
          <table:table-cell table:formula="of:=[.D930]-[.D92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7" office:value-type="float" office:value="6503" calcext:value-type="float">
            <text:p>6503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0752662037037037" calcext:value-type="float">
            <text:p>0,00075266203703703700</text:p>
          </table:table-cell>
          <table:table-cell table:formula="of:=[.D931]-[.D93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7" office:value-type="float" office:value="6510" calcext:value-type="float">
            <text:p>651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0753472222222222" calcext:value-type="float">
            <text:p>0,00075347222222222200</text:p>
          </table:table-cell>
          <table:table-cell table:formula="of:=[.D932]-[.D93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7" office:value-type="float" office:value="6517" calcext:value-type="float">
            <text:p>6517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0754282407407407" calcext:value-type="float">
            <text:p>0,00075428240740740700</text:p>
          </table:table-cell>
          <table:table-cell table:formula="of:=[.D933]-[.D93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7" office:value-type="float" office:value="6524" calcext:value-type="float">
            <text:p>6524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0755092592592593" calcext:value-type="float">
            <text:p>0,00075509259259259300</text:p>
          </table:table-cell>
          <table:table-cell table:formula="of:=[.D934]-[.D93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7" office:value-type="float" office:value="6531" calcext:value-type="float">
            <text:p>6531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0755902777777778" calcext:value-type="float">
            <text:p>0,00075590277777777800</text:p>
          </table:table-cell>
          <table:table-cell table:formula="of:=[.D935]-[.D93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7" office:value-type="float" office:value="6538" calcext:value-type="float">
            <text:p>6538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0756712962962963" calcext:value-type="float">
            <text:p>0,00075671296296296300</text:p>
          </table:table-cell>
          <table:table-cell table:formula="of:=[.D936]-[.D93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7" office:value-type="float" office:value="6545" calcext:value-type="float">
            <text:p>6545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0757523148148148" calcext:value-type="float">
            <text:p>0,00075752314814814800</text:p>
          </table:table-cell>
          <table:table-cell table:formula="of:=[.D937]-[.D93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7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0758333333333333" calcext:value-type="float">
            <text:p>0,00075833333333333300</text:p>
          </table:table-cell>
          <table:table-cell table:formula="of:=[.D938]-[.D93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7" office:value-type="float" office:value="6559" calcext:value-type="float">
            <text:p>6559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0759143518518519" calcext:value-type="float">
            <text:p>0,00075914351851851800</text:p>
          </table:table-cell>
          <table:table-cell table:formula="of:=[.D939]-[.D93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7" office:value-type="float" office:value="6566" calcext:value-type="float">
            <text:p>6566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0759953703703704" calcext:value-type="float">
            <text:p>0,00075995370370370400</text:p>
          </table:table-cell>
          <table:table-cell table:formula="of:=[.D940]-[.D93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7" office:value-type="float" office:value="6573" calcext:value-type="float">
            <text:p>6573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0760763888888889" calcext:value-type="float">
            <text:p>0,00076076388888888900</text:p>
          </table:table-cell>
          <table:table-cell table:formula="of:=[.D941]-[.D94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7" office:value-type="float" office:value="6580" calcext:value-type="float">
            <text:p>658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0761574074074074" calcext:value-type="float">
            <text:p>0,00076157407407407400</text:p>
          </table:table-cell>
          <table:table-cell table:formula="of:=[.D942]-[.D94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7" office:value-type="float" office:value="6587" calcext:value-type="float">
            <text:p>6587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0762384259259259" calcext:value-type="float">
            <text:p>0,00076238425925925900</text:p>
          </table:table-cell>
          <table:table-cell table:formula="of:=[.D943]-[.D94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7" office:value-type="float" office:value="6594" calcext:value-type="float">
            <text:p>6594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0763194444444445" calcext:value-type="float">
            <text:p>0,00076319444444444500</text:p>
          </table:table-cell>
          <table:table-cell table:formula="of:=[.D944]-[.D94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7" office:value-type="float" office:value="6601" calcext:value-type="float">
            <text:p>6601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076400462962963" calcext:value-type="float">
            <text:p>0,00076400462962963000</text:p>
          </table:table-cell>
          <table:table-cell table:formula="of:=[.D945]-[.D94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7" office:value-type="float" office:value="6608" calcext:value-type="float">
            <text:p>6608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0764814814814815" calcext:value-type="float">
            <text:p>0,00076481481481481500</text:p>
          </table:table-cell>
          <table:table-cell table:formula="of:=[.D946]-[.D94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7" office:value-type="float" office:value="6615" calcext:value-type="float">
            <text:p>6615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0765625" calcext:value-type="float">
            <text:p>0,00076562500000000000</text:p>
          </table:table-cell>
          <table:table-cell table:formula="of:=[.D947]-[.D94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7" office:value-type="float" office:value="6622" calcext:value-type="float">
            <text:p>6622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0766435185185185" calcext:value-type="float">
            <text:p>0,00076643518518518500</text:p>
          </table:table-cell>
          <table:table-cell table:formula="of:=[.D948]-[.D94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7" office:value-type="float" office:value="6629" calcext:value-type="float">
            <text:p>6629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076724537037037" calcext:value-type="float">
            <text:p>0,00076724537037037000</text:p>
          </table:table-cell>
          <table:table-cell table:formula="of:=[.D949]-[.D94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7" office:value-type="float" office:value="6636" calcext:value-type="float">
            <text:p>6636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0768055555555556" calcext:value-type="float">
            <text:p>0,00076805555555555600</text:p>
          </table:table-cell>
          <table:table-cell table:formula="of:=[.D950]-[.D94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7" office:value-type="float" office:value="6643" calcext:value-type="float">
            <text:p>6643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0768865740740741" calcext:value-type="float">
            <text:p>0,00076886574074074100</text:p>
          </table:table-cell>
          <table:table-cell table:formula="of:=[.D951]-[.D95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7" office:value-type="float" office:value="6650" calcext:value-type="float">
            <text:p>665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0769675925925926" calcext:value-type="float">
            <text:p>0,00076967592592592600</text:p>
          </table:table-cell>
          <table:table-cell table:formula="of:=[.D952]-[.D95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7" office:value-type="float" office:value="6657" calcext:value-type="float">
            <text:p>6657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0770486111111111" calcext:value-type="float">
            <text:p>0,00077048611111111100</text:p>
          </table:table-cell>
          <table:table-cell table:formula="of:=[.D953]-[.D95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7" office:value-type="float" office:value="6664" calcext:value-type="float">
            <text:p>6664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0771296296296296" calcext:value-type="float">
            <text:p>0,00077129629629629600</text:p>
          </table:table-cell>
          <table:table-cell table:formula="of:=[.D954]-[.D95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7" office:value-type="float" office:value="6671" calcext:value-type="float">
            <text:p>6671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0772106481481482" calcext:value-type="float">
            <text:p>0,00077210648148148200</text:p>
          </table:table-cell>
          <table:table-cell table:formula="of:=[.D955]-[.D95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7" office:value-type="float" office:value="6678" calcext:value-type="float">
            <text:p>6678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0772916666666667" calcext:value-type="float">
            <text:p>0,00077291666666666700</text:p>
          </table:table-cell>
          <table:table-cell table:formula="of:=[.D956]-[.D95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7" office:value-type="float" office:value="6685" calcext:value-type="float">
            <text:p>6685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0773726851851852" calcext:value-type="float">
            <text:p>0,00077372685185185200</text:p>
          </table:table-cell>
          <table:table-cell table:formula="of:=[.D957]-[.D95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7" office:value-type="float" office:value="6692" calcext:value-type="float">
            <text:p>6692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0774537037037037" calcext:value-type="float">
            <text:p>0,00077453703703703700</text:p>
          </table:table-cell>
          <table:table-cell table:formula="of:=[.D958]-[.D95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7" office:value-type="float" office:value="6699" calcext:value-type="float">
            <text:p>6699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0775347222222222" calcext:value-type="float">
            <text:p>0,00077534722222222200</text:p>
          </table:table-cell>
          <table:table-cell table:formula="of:=[.D959]-[.D95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7" office:value-type="float" office:value="6706" calcext:value-type="float">
            <text:p>6706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0776157407407407" calcext:value-type="float">
            <text:p>0,00077615740740740700</text:p>
          </table:table-cell>
          <table:table-cell table:formula="of:=[.D960]-[.D95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7" office:value-type="float" office:value="6713" calcext:value-type="float">
            <text:p>6713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0776967592592593" calcext:value-type="float">
            <text:p>0,00077696759259259200</text:p>
          </table:table-cell>
          <table:table-cell table:formula="of:=[.D961]-[.D96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7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0777777777777778" calcext:value-type="float">
            <text:p>0,00077777777777777800</text:p>
          </table:table-cell>
          <table:table-cell table:formula="of:=[.D962]-[.D96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7" office:value-type="float" office:value="6727" calcext:value-type="float">
            <text:p>6727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0778587962962963" calcext:value-type="float">
            <text:p>0,00077858796296296300</text:p>
          </table:table-cell>
          <table:table-cell table:formula="of:=[.D963]-[.D96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7" office:value-type="float" office:value="6734" calcext:value-type="float">
            <text:p>6734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0779398148148148" calcext:value-type="float">
            <text:p>0,00077939814814814800</text:p>
          </table:table-cell>
          <table:table-cell table:formula="of:=[.D964]-[.D96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7" office:value-type="float" office:value="6741" calcext:value-type="float">
            <text:p>6741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0780208333333333" calcext:value-type="float">
            <text:p>0,00078020833333333400</text:p>
          </table:table-cell>
          <table:table-cell table:formula="of:=[.D965]-[.D96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7" office:value-type="float" office:value="6748" calcext:value-type="float">
            <text:p>6748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0781018518518519" calcext:value-type="float">
            <text:p>0,00078101851851851900</text:p>
          </table:table-cell>
          <table:table-cell table:formula="of:=[.D966]-[.D96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7" office:value-type="float" office:value="6755" calcext:value-type="float">
            <text:p>6755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0781828703703704" calcext:value-type="float">
            <text:p>0,00078182870370370400</text:p>
          </table:table-cell>
          <table:table-cell table:formula="of:=[.D967]-[.D96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7" office:value-type="float" office:value="6762" calcext:value-type="float">
            <text:p>6762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0782638888888889" calcext:value-type="float">
            <text:p>0,00078263888888888900</text:p>
          </table:table-cell>
          <table:table-cell table:formula="of:=[.D968]-[.D96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7" office:value-type="float" office:value="6769" calcext:value-type="float">
            <text:p>6769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0783449074074074" calcext:value-type="float">
            <text:p>0,00078344907407407400</text:p>
          </table:table-cell>
          <table:table-cell table:formula="of:=[.D969]-[.D96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7" office:value-type="float" office:value="6776" calcext:value-type="float">
            <text:p>6776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0784259259259259" calcext:value-type="float">
            <text:p>0,00078425925925925900</text:p>
          </table:table-cell>
          <table:table-cell table:formula="of:=[.D970]-[.D96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7" office:value-type="float" office:value="6783" calcext:value-type="float">
            <text:p>6783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0785069444444445" calcext:value-type="float">
            <text:p>0,00078506944444444500</text:p>
          </table:table-cell>
          <table:table-cell table:formula="of:=[.D971]-[.D97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7" office:value-type="float" office:value="6790" calcext:value-type="float">
            <text:p>679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078587962962963" calcext:value-type="float">
            <text:p>0,00078587962962963000</text:p>
          </table:table-cell>
          <table:table-cell table:formula="of:=[.D972]-[.D97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7" office:value-type="float" office:value="6797" calcext:value-type="float">
            <text:p>6797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0786689814814815" calcext:value-type="float">
            <text:p>0,00078668981481481500</text:p>
          </table:table-cell>
          <table:table-cell table:formula="of:=[.D973]-[.D97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7" office:value-type="float" office:value="6804" calcext:value-type="float">
            <text:p>6804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07875" calcext:value-type="float">
            <text:p>0,00078750000000000000</text:p>
          </table:table-cell>
          <table:table-cell table:formula="of:=[.D974]-[.D97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7" office:value-type="float" office:value="6811" calcext:value-type="float">
            <text:p>6811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0788310185185185" calcext:value-type="float">
            <text:p>0,00078831018518518500</text:p>
          </table:table-cell>
          <table:table-cell table:formula="of:=[.D975]-[.D97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7" office:value-type="float" office:value="6818" calcext:value-type="float">
            <text:p>6818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078912037037037" calcext:value-type="float">
            <text:p>0,00078912037037037000</text:p>
          </table:table-cell>
          <table:table-cell table:formula="of:=[.D976]-[.D97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7" office:value-type="float" office:value="6825" calcext:value-type="float">
            <text:p>6825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0789930555555556" calcext:value-type="float">
            <text:p>0,00078993055555555600</text:p>
          </table:table-cell>
          <table:table-cell table:formula="of:=[.D977]-[.D97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7" office:value-type="float" office:value="6832" calcext:value-type="float">
            <text:p>6832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0790740740740741" calcext:value-type="float">
            <text:p>0,00079074074074074100</text:p>
          </table:table-cell>
          <table:table-cell table:formula="of:=[.D978]-[.D97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7" office:value-type="float" office:value="6839" calcext:value-type="float">
            <text:p>6839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0791550925925926" calcext:value-type="float">
            <text:p>0,00079155092592592600</text:p>
          </table:table-cell>
          <table:table-cell table:formula="of:=[.D979]-[.D97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7" office:value-type="float" office:value="6846" calcext:value-type="float">
            <text:p>6846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0792361111111111" calcext:value-type="float">
            <text:p>0,00079236111111111100</text:p>
          </table:table-cell>
          <table:table-cell table:formula="of:=[.D980]-[.D97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7" office:value-type="float" office:value="6853" calcext:value-type="float">
            <text:p>6853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0793171296296296" calcext:value-type="float">
            <text:p>0,00079317129629629600</text:p>
          </table:table-cell>
          <table:table-cell table:formula="of:=[.D981]-[.D98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7" office:value-type="float" office:value="6860" calcext:value-type="float">
            <text:p>686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0793981481481481" calcext:value-type="float">
            <text:p>0,00079398148148148100</text:p>
          </table:table-cell>
          <table:table-cell table:formula="of:=[.D982]-[.D98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7" office:value-type="float" office:value="6867" calcext:value-type="float">
            <text:p>6867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0794791666666667" calcext:value-type="float">
            <text:p>0,00079479166666666700</text:p>
          </table:table-cell>
          <table:table-cell table:formula="of:=[.D983]-[.D98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7" office:value-type="float" office:value="6874" calcext:value-type="float">
            <text:p>6874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0795601851851852" calcext:value-type="float">
            <text:p>0,00079560185185185200</text:p>
          </table:table-cell>
          <table:table-cell table:formula="of:=[.D984]-[.D98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7" office:value-type="float" office:value="6881" calcext:value-type="float">
            <text:p>6881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0796412037037037" calcext:value-type="float">
            <text:p>0,00079641203703703700</text:p>
          </table:table-cell>
          <table:table-cell table:formula="of:=[.D985]-[.D98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7" office:value-type="float" office:value="6888" calcext:value-type="float">
            <text:p>6888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0797222222222222" calcext:value-type="float">
            <text:p>0,00079722222222222200</text:p>
          </table:table-cell>
          <table:table-cell table:formula="of:=[.D986]-[.D98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7" office:value-type="float" office:value="6895" calcext:value-type="float">
            <text:p>6895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0798032407407408" calcext:value-type="float">
            <text:p>0,00079803240740740800</text:p>
          </table:table-cell>
          <table:table-cell table:formula="of:=[.D987]-[.D98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7" office:value-type="float" office:value="6902" calcext:value-type="float">
            <text:p>6902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0798842592592593" calcext:value-type="float">
            <text:p>0,00079884259259259300</text:p>
          </table:table-cell>
          <table:table-cell table:formula="of:=[.D988]-[.D98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7" office:value-type="float" office:value="6909" calcext:value-type="float">
            <text:p>6909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0799652777777778" calcext:value-type="float">
            <text:p>0,00079965277777777800</text:p>
          </table:table-cell>
          <table:table-cell table:formula="of:=[.D989]-[.D98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7" office:value-type="float" office:value="6916" calcext:value-type="float">
            <text:p>6916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0800462962962963" calcext:value-type="float">
            <text:p>0,00080046296296296300</text:p>
          </table:table-cell>
          <table:table-cell table:formula="of:=[.D990]-[.D98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7" office:value-type="float" office:value="6923" calcext:value-type="float">
            <text:p>6923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0801273148148148" calcext:value-type="float">
            <text:p>0,00080127314814814800</text:p>
          </table:table-cell>
          <table:table-cell table:formula="of:=[.D991]-[.D99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7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0802083333333333" calcext:value-type="float">
            <text:p>0,00080208333333333300</text:p>
          </table:table-cell>
          <table:table-cell table:formula="of:=[.D992]-[.D99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7" office:value-type="float" office:value="6937" calcext:value-type="float">
            <text:p>6937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0802893518518519" calcext:value-type="float">
            <text:p>0,00080289351851851900</text:p>
          </table:table-cell>
          <table:table-cell table:formula="of:=[.D993]-[.D99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7" office:value-type="float" office:value="6944" calcext:value-type="float">
            <text:p>6944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0803703703703704" calcext:value-type="float">
            <text:p>0,00080370370370370400</text:p>
          </table:table-cell>
          <table:table-cell table:formula="of:=[.D994]-[.D99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7" office:value-type="float" office:value="6951" calcext:value-type="float">
            <text:p>6951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0804513888888889" calcext:value-type="float">
            <text:p>0,00080451388888888900</text:p>
          </table:table-cell>
          <table:table-cell table:formula="of:=[.D995]-[.D99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7" office:value-type="float" office:value="6958" calcext:value-type="float">
            <text:p>6958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0805324074074074" calcext:value-type="float">
            <text:p>0,00080532407407407400</text:p>
          </table:table-cell>
          <table:table-cell table:formula="of:=[.D996]-[.D99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7" office:value-type="float" office:value="6965" calcext:value-type="float">
            <text:p>6965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0806134259259259" calcext:value-type="float">
            <text:p>0,00080613425925925900</text:p>
          </table:table-cell>
          <table:table-cell table:formula="of:=[.D997]-[.D99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7" office:value-type="float" office:value="6972" calcext:value-type="float">
            <text:p>6972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0806944444444444" calcext:value-type="float">
            <text:p>0,00080694444444444400</text:p>
          </table:table-cell>
          <table:table-cell table:formula="of:=[.D998]-[.D99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7" office:value-type="float" office:value="6979" calcext:value-type="float">
            <text:p>6979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080775462962963" calcext:value-type="float">
            <text:p>0,00080775462962963000</text:p>
          </table:table-cell>
          <table:table-cell table:formula="of:=[.D999]-[.D99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7" office:value-type="float" office:value="6986" calcext:value-type="float">
            <text:p>6986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0808564814814815" calcext:value-type="float">
            <text:p>0,00080856481481481500</text:p>
          </table:table-cell>
          <table:table-cell table:formula="of:=[.D1000]-[.D99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7" office:value-type="float" office:value="6993" calcext:value-type="float">
            <text:p>6993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0809375" calcext:value-type="float">
            <text:p>0,00080937500000000000</text:p>
          </table:table-cell>
          <table:table-cell table:formula="of:=[.D1001]-[.D100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7" office:value-type="float" office:value="7000" calcext:value-type="float">
            <text:p>7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0810185185185185" calcext:value-type="float">
            <text:p>0,00081018518518518500</text:p>
          </table:table-cell>
          <table:table-cell table:formula="of:=[.D1002]-[.D100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7" office:value-type="float" office:value="7007" calcext:value-type="float">
            <text:p>7007</text:p>
          </table:table-cell>
          <table:table-cell office:value-type="float" office:value="8640000" calcext:value-type="float">
            <text:p>8640000</text:p>
          </table:table-cell>
          <table:table-cell table:formula="of:=[.B1002]/[.C1002]" office:value-type="float" office:value="0.00081099537037037" calcext:value-type="float">
            <text:p>0,00081099537037037100</text:p>
          </table:table-cell>
          <table:table-cell table:formula="of:=[.D1003]-[.D100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7" office:value-type="float" office:value="7014" calcext:value-type="float">
            <text:p>7014</text:p>
          </table:table-cell>
          <table:table-cell office:value-type="float" office:value="8640000" calcext:value-type="float">
            <text:p>8640000</text:p>
          </table:table-cell>
          <table:table-cell table:formula="of:=[.B1003]/[.C1003]" office:value-type="float" office:value="0.000811805555555556" calcext:value-type="float">
            <text:p>0,00081180555555555600</text:p>
          </table:table-cell>
          <table:table-cell table:formula="of:=[.D1004]-[.D100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7" office:value-type="float" office:value="7021" calcext:value-type="float">
            <text:p>7021</text:p>
          </table:table-cell>
          <table:table-cell office:value-type="float" office:value="8640000" calcext:value-type="float">
            <text:p>8640000</text:p>
          </table:table-cell>
          <table:table-cell table:formula="of:=[.B1004]/[.C1004]" office:value-type="float" office:value="0.000812615740740741" calcext:value-type="float">
            <text:p>0,00081261574074074100</text:p>
          </table:table-cell>
          <table:table-cell table:formula="of:=[.D1005]-[.D100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7" office:value-type="float" office:value="7028" calcext:value-type="float">
            <text:p>7028</text:p>
          </table:table-cell>
          <table:table-cell office:value-type="float" office:value="8640000" calcext:value-type="float">
            <text:p>8640000</text:p>
          </table:table-cell>
          <table:table-cell table:formula="of:=[.B1005]/[.C1005]" office:value-type="float" office:value="0.000813425925925926" calcext:value-type="float">
            <text:p>0,00081342592592592600</text:p>
          </table:table-cell>
          <table:table-cell table:formula="of:=[.D1006]-[.D100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7" office:value-type="float" office:value="7035" calcext:value-type="float">
            <text:p>7035</text:p>
          </table:table-cell>
          <table:table-cell office:value-type="float" office:value="8640000" calcext:value-type="float">
            <text:p>8640000</text:p>
          </table:table-cell>
          <table:table-cell table:formula="of:=[.B1006]/[.C1006]" office:value-type="float" office:value="0.000814236111111111" calcext:value-type="float">
            <text:p>0,00081423611111111100</text:p>
          </table:table-cell>
          <table:table-cell table:formula="of:=[.D1007]-[.D100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7" office:value-type="float" office:value="7042" calcext:value-type="float">
            <text:p>7042</text:p>
          </table:table-cell>
          <table:table-cell office:value-type="float" office:value="8640000" calcext:value-type="float">
            <text:p>8640000</text:p>
          </table:table-cell>
          <table:table-cell table:formula="of:=[.B1007]/[.C1007]" office:value-type="float" office:value="0.000815046296296296" calcext:value-type="float">
            <text:p>0,00081504629629629600</text:p>
          </table:table-cell>
          <table:table-cell table:formula="of:=[.D1008]-[.D100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7" office:value-type="float" office:value="7049" calcext:value-type="float">
            <text:p>7049</text:p>
          </table:table-cell>
          <table:table-cell office:value-type="float" office:value="8640000" calcext:value-type="float">
            <text:p>8640000</text:p>
          </table:table-cell>
          <table:table-cell table:formula="of:=[.B1008]/[.C1008]" office:value-type="float" office:value="0.000815856481481482" calcext:value-type="float">
            <text:p>0,00081585648148148200</text:p>
          </table:table-cell>
          <table:table-cell table:formula="of:=[.D1009]-[.D100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7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1009]/[.C1009]" office:value-type="float" office:value="0.000816666666666667" calcext:value-type="float">
            <text:p>0,00081666666666666700</text:p>
          </table:table-cell>
          <table:table-cell table:formula="of:=[.D1010]-[.D100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7" office:value-type="float" office:value="7063" calcext:value-type="float">
            <text:p>7063</text:p>
          </table:table-cell>
          <table:table-cell office:value-type="float" office:value="8640000" calcext:value-type="float">
            <text:p>8640000</text:p>
          </table:table-cell>
          <table:table-cell table:formula="of:=[.B1010]/[.C1010]" office:value-type="float" office:value="0.000817476851851852" calcext:value-type="float">
            <text:p>0,00081747685185185200</text:p>
          </table:table-cell>
          <table:table-cell table:formula="of:=[.D1011]-[.D101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7" office:value-type="float" office:value="7070" calcext:value-type="float">
            <text:p>7070</text:p>
          </table:table-cell>
          <table:table-cell office:value-type="float" office:value="8640000" calcext:value-type="float">
            <text:p>8640000</text:p>
          </table:table-cell>
          <table:table-cell table:formula="of:=[.B1011]/[.C1011]" office:value-type="float" office:value="0.000818287037037037" calcext:value-type="float">
            <text:p>0,00081828703703703700</text:p>
          </table:table-cell>
          <table:table-cell table:formula="of:=[.D1012]-[.D101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7" office:value-type="float" office:value="7077" calcext:value-type="float">
            <text:p>7077</text:p>
          </table:table-cell>
          <table:table-cell office:value-type="float" office:value="8640000" calcext:value-type="float">
            <text:p>8640000</text:p>
          </table:table-cell>
          <table:table-cell table:formula="of:=[.B1012]/[.C1012]" office:value-type="float" office:value="0.000819097222222222" calcext:value-type="float">
            <text:p>0,00081909722222222200</text:p>
          </table:table-cell>
          <table:table-cell table:formula="of:=[.D1013]-[.D101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7" office:value-type="float" office:value="7084" calcext:value-type="float">
            <text:p>7084</text:p>
          </table:table-cell>
          <table:table-cell office:value-type="float" office:value="8640000" calcext:value-type="float">
            <text:p>8640000</text:p>
          </table:table-cell>
          <table:table-cell table:formula="of:=[.B1013]/[.C1013]" office:value-type="float" office:value="0.000819907407407407" calcext:value-type="float">
            <text:p>0,00081990740740740700</text:p>
          </table:table-cell>
          <table:table-cell table:formula="of:=[.D1014]-[.D101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7" office:value-type="float" office:value="7091" calcext:value-type="float">
            <text:p>7091</text:p>
          </table:table-cell>
          <table:table-cell office:value-type="float" office:value="8640000" calcext:value-type="float">
            <text:p>8640000</text:p>
          </table:table-cell>
          <table:table-cell table:formula="of:=[.B1014]/[.C1014]" office:value-type="float" office:value="0.000820717592592593" calcext:value-type="float">
            <text:p>0,00082071759259259300</text:p>
          </table:table-cell>
          <table:table-cell table:formula="of:=[.D1015]-[.D101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7" office:value-type="float" office:value="7098" calcext:value-type="float">
            <text:p>7098</text:p>
          </table:table-cell>
          <table:table-cell office:value-type="float" office:value="8640000" calcext:value-type="float">
            <text:p>8640000</text:p>
          </table:table-cell>
          <table:table-cell table:formula="of:=[.B1015]/[.C1015]" office:value-type="float" office:value="0.000821527777777778" calcext:value-type="float">
            <text:p>0,00082152777777777800</text:p>
          </table:table-cell>
          <table:table-cell table:formula="of:=[.D1016]-[.D101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7" office:value-type="float" office:value="7105" calcext:value-type="float">
            <text:p>7105</text:p>
          </table:table-cell>
          <table:table-cell office:value-type="float" office:value="8640000" calcext:value-type="float">
            <text:p>8640000</text:p>
          </table:table-cell>
          <table:table-cell table:formula="of:=[.B1016]/[.C1016]" office:value-type="float" office:value="0.000822337962962963" calcext:value-type="float">
            <text:p>0,00082233796296296300</text:p>
          </table:table-cell>
          <table:table-cell table:formula="of:=[.D1017]-[.D101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7" office:value-type="float" office:value="7112" calcext:value-type="float">
            <text:p>7112</text:p>
          </table:table-cell>
          <table:table-cell office:value-type="float" office:value="8640000" calcext:value-type="float">
            <text:p>8640000</text:p>
          </table:table-cell>
          <table:table-cell table:formula="of:=[.B1017]/[.C1017]" office:value-type="float" office:value="0.000823148148148148" calcext:value-type="float">
            <text:p>0,00082314814814814800</text:p>
          </table:table-cell>
          <table:table-cell table:formula="of:=[.D1018]-[.D101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7" office:value-type="float" office:value="7119" calcext:value-type="float">
            <text:p>7119</text:p>
          </table:table-cell>
          <table:table-cell office:value-type="float" office:value="8640000" calcext:value-type="float">
            <text:p>8640000</text:p>
          </table:table-cell>
          <table:table-cell table:formula="of:=[.B1018]/[.C1018]" office:value-type="float" office:value="0.000823958333333333" calcext:value-type="float">
            <text:p>0,00082395833333333300</text:p>
          </table:table-cell>
          <table:table-cell table:formula="of:=[.D1019]-[.D101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7" office:value-type="float" office:value="7126" calcext:value-type="float">
            <text:p>7126</text:p>
          </table:table-cell>
          <table:table-cell office:value-type="float" office:value="8640000" calcext:value-type="float">
            <text:p>8640000</text:p>
          </table:table-cell>
          <table:table-cell table:formula="of:=[.B1019]/[.C1019]" office:value-type="float" office:value="0.000824768518518519" calcext:value-type="float">
            <text:p>0,00082476851851851900</text:p>
          </table:table-cell>
          <table:table-cell table:formula="of:=[.D1020]-[.D101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7" office:value-type="float" office:value="7133" calcext:value-type="float">
            <text:p>7133</text:p>
          </table:table-cell>
          <table:table-cell office:value-type="float" office:value="8640000" calcext:value-type="float">
            <text:p>8640000</text:p>
          </table:table-cell>
          <table:table-cell table:formula="of:=[.B1020]/[.C1020]" office:value-type="float" office:value="0.000825578703703704" calcext:value-type="float">
            <text:p>0,00082557870370370400</text:p>
          </table:table-cell>
          <table:table-cell table:formula="of:=[.D1021]-[.D102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7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1021]/[.C1021]" office:value-type="float" office:value="0.000826388888888889" calcext:value-type="float">
            <text:p>0,00082638888888888900</text:p>
          </table:table-cell>
          <table:table-cell table:formula="of:=[.D1022]-[.D102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7" office:value-type="float" office:value="7147" calcext:value-type="float">
            <text:p>7147</text:p>
          </table:table-cell>
          <table:table-cell office:value-type="float" office:value="8640000" calcext:value-type="float">
            <text:p>8640000</text:p>
          </table:table-cell>
          <table:table-cell table:formula="of:=[.B1022]/[.C1022]" office:value-type="float" office:value="0.000827199074074074" calcext:value-type="float">
            <text:p>0,00082719907407407400</text:p>
          </table:table-cell>
          <table:table-cell table:formula="of:=[.D1023]-[.D102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7" office:value-type="float" office:value="7154" calcext:value-type="float">
            <text:p>7154</text:p>
          </table:table-cell>
          <table:table-cell office:value-type="float" office:value="8640000" calcext:value-type="float">
            <text:p>8640000</text:p>
          </table:table-cell>
          <table:table-cell table:formula="of:=[.B1023]/[.C1023]" office:value-type="float" office:value="0.000828009259259259" calcext:value-type="float">
            <text:p>0,00082800925925925900</text:p>
          </table:table-cell>
          <table:table-cell table:formula="of:=[.D1024]-[.D102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7" office:value-type="float" office:value="7161" calcext:value-type="float">
            <text:p>7161</text:p>
          </table:table-cell>
          <table:table-cell office:value-type="float" office:value="8640000" calcext:value-type="float">
            <text:p>8640000</text:p>
          </table:table-cell>
          <table:table-cell table:formula="of:=[.B1024]/[.C1024]" office:value-type="float" office:value="0.000828819444444444" calcext:value-type="float">
            <text:p>0,00082881944444444500</text:p>
          </table:table-cell>
          <table:table-cell table:formula="of:=[.D1025]-[.D102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7" office:value-type="float" office:value="7168" calcext:value-type="float">
            <text:p>7168</text:p>
          </table:table-cell>
          <table:table-cell office:value-type="float" office:value="8640000" calcext:value-type="float">
            <text:p>8640000</text:p>
          </table:table-cell>
          <table:table-cell table:formula="of:=[.B1025]/[.C1025]" office:value-type="float" office:value="0.00082962962962963" calcext:value-type="float">
            <text:p>0,00082962962962963000</text:p>
          </table:table-cell>
          <table:table-cell table:formula="of:=[.D1026]-[.D102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7" office:value-type="float" office:value="7175" calcext:value-type="float">
            <text:p>7175</text:p>
          </table:table-cell>
          <table:table-cell office:value-type="float" office:value="8640000" calcext:value-type="float">
            <text:p>8640000</text:p>
          </table:table-cell>
          <table:table-cell table:formula="of:=[.B1026]/[.C1026]" office:value-type="float" office:value="0.000830439814814815" calcext:value-type="float">
            <text:p>0,00083043981481481500</text:p>
          </table:table-cell>
          <table:table-cell table:formula="of:=[.D1027]-[.D102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7" office:value-type="float" office:value="7182" calcext:value-type="float">
            <text:p>7182</text:p>
          </table:table-cell>
          <table:table-cell office:value-type="float" office:value="8640000" calcext:value-type="float">
            <text:p>8640000</text:p>
          </table:table-cell>
          <table:table-cell table:formula="of:=[.B1027]/[.C1027]" office:value-type="float" office:value="0.00083125" calcext:value-type="float">
            <text:p>0,00083125000000000000</text:p>
          </table:table-cell>
          <table:table-cell table:formula="of:=[.D1028]-[.D102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7" office:value-type="float" office:value="7189" calcext:value-type="float">
            <text:p>7189</text:p>
          </table:table-cell>
          <table:table-cell office:value-type="float" office:value="8640000" calcext:value-type="float">
            <text:p>8640000</text:p>
          </table:table-cell>
          <table:table-cell table:formula="of:=[.B1028]/[.C1028]" office:value-type="float" office:value="0.000832060185185185" calcext:value-type="float">
            <text:p>0,00083206018518518500</text:p>
          </table:table-cell>
          <table:table-cell table:formula="of:=[.D1029]-[.D102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7" office:value-type="float" office:value="7196" calcext:value-type="float">
            <text:p>7196</text:p>
          </table:table-cell>
          <table:table-cell office:value-type="float" office:value="8640000" calcext:value-type="float">
            <text:p>8640000</text:p>
          </table:table-cell>
          <table:table-cell table:formula="of:=[.B1029]/[.C1029]" office:value-type="float" office:value="0.00083287037037037" calcext:value-type="float">
            <text:p>0,00083287037037037000</text:p>
          </table:table-cell>
          <table:table-cell table:formula="of:=[.D1030]-[.D102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7" office:value-type="float" office:value="7203" calcext:value-type="float">
            <text:p>7203</text:p>
          </table:table-cell>
          <table:table-cell office:value-type="float" office:value="8640000" calcext:value-type="float">
            <text:p>8640000</text:p>
          </table:table-cell>
          <table:table-cell table:formula="of:=[.B1030]/[.C1030]" office:value-type="float" office:value="0.000833680555555556" calcext:value-type="float">
            <text:p>0,00083368055555555600</text:p>
          </table:table-cell>
          <table:table-cell table:formula="of:=[.D1031]-[.D103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7" office:value-type="float" office:value="7210" calcext:value-type="float">
            <text:p>7210</text:p>
          </table:table-cell>
          <table:table-cell office:value-type="float" office:value="8640000" calcext:value-type="float">
            <text:p>8640000</text:p>
          </table:table-cell>
          <table:table-cell table:formula="of:=[.B1031]/[.C1031]" office:value-type="float" office:value="0.000834490740740741" calcext:value-type="float">
            <text:p>0,00083449074074074100</text:p>
          </table:table-cell>
          <table:table-cell table:formula="of:=[.D1032]-[.D103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7" office:value-type="float" office:value="7217" calcext:value-type="float">
            <text:p>7217</text:p>
          </table:table-cell>
          <table:table-cell office:value-type="float" office:value="8640000" calcext:value-type="float">
            <text:p>8640000</text:p>
          </table:table-cell>
          <table:table-cell table:formula="of:=[.B1032]/[.C1032]" office:value-type="float" office:value="0.000835300925925926" calcext:value-type="float">
            <text:p>0,00083530092592592600</text:p>
          </table:table-cell>
          <table:table-cell table:formula="of:=[.D1033]-[.D103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7" office:value-type="float" office:value="7224" calcext:value-type="float">
            <text:p>7224</text:p>
          </table:table-cell>
          <table:table-cell office:value-type="float" office:value="8640000" calcext:value-type="float">
            <text:p>8640000</text:p>
          </table:table-cell>
          <table:table-cell table:formula="of:=[.B1033]/[.C1033]" office:value-type="float" office:value="0.000836111111111111" calcext:value-type="float">
            <text:p>0,00083611111111111100</text:p>
          </table:table-cell>
          <table:table-cell table:formula="of:=[.D1034]-[.D103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7" office:value-type="float" office:value="7231" calcext:value-type="float">
            <text:p>7231</text:p>
          </table:table-cell>
          <table:table-cell office:value-type="float" office:value="8640000" calcext:value-type="float">
            <text:p>8640000</text:p>
          </table:table-cell>
          <table:table-cell table:formula="of:=[.B1034]/[.C1034]" office:value-type="float" office:value="0.000836921296296296" calcext:value-type="float">
            <text:p>0,00083692129629629600</text:p>
          </table:table-cell>
          <table:table-cell table:formula="of:=[.D1035]-[.D103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7" office:value-type="float" office:value="7238" calcext:value-type="float">
            <text:p>7238</text:p>
          </table:table-cell>
          <table:table-cell office:value-type="float" office:value="8640000" calcext:value-type="float">
            <text:p>8640000</text:p>
          </table:table-cell>
          <table:table-cell table:formula="of:=[.B1035]/[.C1035]" office:value-type="float" office:value="0.000837731481481482" calcext:value-type="float">
            <text:p>0,00083773148148148100</text:p>
          </table:table-cell>
          <table:table-cell table:formula="of:=[.D1036]-[.D103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7" office:value-type="float" office:value="7245" calcext:value-type="float">
            <text:p>7245</text:p>
          </table:table-cell>
          <table:table-cell office:value-type="float" office:value="8640000" calcext:value-type="float">
            <text:p>8640000</text:p>
          </table:table-cell>
          <table:table-cell table:formula="of:=[.B1036]/[.C1036]" office:value-type="float" office:value="0.000838541666666667" calcext:value-type="float">
            <text:p>0,00083854166666666700</text:p>
          </table:table-cell>
          <table:table-cell table:formula="of:=[.D1037]-[.D103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7" office:value-type="float" office:value="7252" calcext:value-type="float">
            <text:p>7252</text:p>
          </table:table-cell>
          <table:table-cell office:value-type="float" office:value="8640000" calcext:value-type="float">
            <text:p>8640000</text:p>
          </table:table-cell>
          <table:table-cell table:formula="of:=[.B1037]/[.C1037]" office:value-type="float" office:value="0.000839351851851852" calcext:value-type="float">
            <text:p>0,00083935185185185200</text:p>
          </table:table-cell>
          <table:table-cell table:formula="of:=[.D1038]-[.D103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7" office:value-type="float" office:value="7259" calcext:value-type="float">
            <text:p>7259</text:p>
          </table:table-cell>
          <table:table-cell office:value-type="float" office:value="8640000" calcext:value-type="float">
            <text:p>8640000</text:p>
          </table:table-cell>
          <table:table-cell table:formula="of:=[.B1038]/[.C1038]" office:value-type="float" office:value="0.000840162037037037" calcext:value-type="float">
            <text:p>0,00084016203703703700</text:p>
          </table:table-cell>
          <table:table-cell table:formula="of:=[.D1039]-[.D103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7" office:value-type="float" office:value="7266" calcext:value-type="float">
            <text:p>7266</text:p>
          </table:table-cell>
          <table:table-cell office:value-type="float" office:value="8640000" calcext:value-type="float">
            <text:p>8640000</text:p>
          </table:table-cell>
          <table:table-cell table:formula="of:=[.B1039]/[.C1039]" office:value-type="float" office:value="0.000840972222222222" calcext:value-type="float">
            <text:p>0,00084097222222222200</text:p>
          </table:table-cell>
          <table:table-cell table:formula="of:=[.D1040]-[.D103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7" office:value-type="float" office:value="7273" calcext:value-type="float">
            <text:p>7273</text:p>
          </table:table-cell>
          <table:table-cell office:value-type="float" office:value="8640000" calcext:value-type="float">
            <text:p>8640000</text:p>
          </table:table-cell>
          <table:table-cell table:formula="of:=[.B1040]/[.C1040]" office:value-type="float" office:value="0.000841782407407407" calcext:value-type="float">
            <text:p>0,00084178240740740700</text:p>
          </table:table-cell>
          <table:table-cell table:formula="of:=[.D1041]-[.D104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7" office:value-type="float" office:value="7280" calcext:value-type="float">
            <text:p>7280</text:p>
          </table:table-cell>
          <table:table-cell office:value-type="float" office:value="8640000" calcext:value-type="float">
            <text:p>8640000</text:p>
          </table:table-cell>
          <table:table-cell table:formula="of:=[.B1041]/[.C1041]" office:value-type="float" office:value="0.000842592592592593" calcext:value-type="float">
            <text:p>0,00084259259259259300</text:p>
          </table:table-cell>
          <table:table-cell table:formula="of:=[.D1042]-[.D104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7" office:value-type="float" office:value="7287" calcext:value-type="float">
            <text:p>7287</text:p>
          </table:table-cell>
          <table:table-cell office:value-type="float" office:value="8640000" calcext:value-type="float">
            <text:p>8640000</text:p>
          </table:table-cell>
          <table:table-cell table:formula="of:=[.B1042]/[.C1042]" office:value-type="float" office:value="0.000843402777777778" calcext:value-type="float">
            <text:p>0,00084340277777777800</text:p>
          </table:table-cell>
          <table:table-cell table:formula="of:=[.D1043]-[.D104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7" office:value-type="float" office:value="7294" calcext:value-type="float">
            <text:p>7294</text:p>
          </table:table-cell>
          <table:table-cell office:value-type="float" office:value="8640000" calcext:value-type="float">
            <text:p>8640000</text:p>
          </table:table-cell>
          <table:table-cell table:formula="of:=[.B1043]/[.C1043]" office:value-type="float" office:value="0.000844212962962963" calcext:value-type="float">
            <text:p>0,00084421296296296300</text:p>
          </table:table-cell>
          <table:table-cell table:formula="of:=[.D1044]-[.D104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7" office:value-type="float" office:value="7301" calcext:value-type="float">
            <text:p>7301</text:p>
          </table:table-cell>
          <table:table-cell office:value-type="float" office:value="8640000" calcext:value-type="float">
            <text:p>8640000</text:p>
          </table:table-cell>
          <table:table-cell table:formula="of:=[.B1044]/[.C1044]" office:value-type="float" office:value="0.000845023148148148" calcext:value-type="float">
            <text:p>0,00084502314814814800</text:p>
          </table:table-cell>
          <table:table-cell table:formula="of:=[.D1045]-[.D104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+7" office:value-type="float" office:value="7308" calcext:value-type="float">
            <text:p>7308</text:p>
          </table:table-cell>
          <table:table-cell office:value-type="float" office:value="8640000" calcext:value-type="float">
            <text:p>8640000</text:p>
          </table:table-cell>
          <table:table-cell table:formula="of:=[.B1045]/[.C1045]" office:value-type="float" office:value="0.000845833333333333" calcext:value-type="float">
            <text:p>0,00084583333333333300</text:p>
          </table:table-cell>
          <table:table-cell table:formula="of:=[.D1046]-[.D104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+7" office:value-type="float" office:value="7315" calcext:value-type="float">
            <text:p>7315</text:p>
          </table:table-cell>
          <table:table-cell office:value-type="float" office:value="8640000" calcext:value-type="float">
            <text:p>8640000</text:p>
          </table:table-cell>
          <table:table-cell table:formula="of:=[.B1046]/[.C1046]" office:value-type="float" office:value="0.000846643518518519" calcext:value-type="float">
            <text:p>0,00084664351851851900</text:p>
          </table:table-cell>
          <table:table-cell table:formula="of:=[.D1047]-[.D104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+7" office:value-type="float" office:value="7322" calcext:value-type="float">
            <text:p>7322</text:p>
          </table:table-cell>
          <table:table-cell office:value-type="float" office:value="8640000" calcext:value-type="float">
            <text:p>8640000</text:p>
          </table:table-cell>
          <table:table-cell table:formula="of:=[.B1047]/[.C1047]" office:value-type="float" office:value="0.000847453703703704" calcext:value-type="float">
            <text:p>0,00084745370370370400</text:p>
          </table:table-cell>
          <table:table-cell table:formula="of:=[.D1048]-[.D104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+7" office:value-type="float" office:value="7329" calcext:value-type="float">
            <text:p>7329</text:p>
          </table:table-cell>
          <table:table-cell office:value-type="float" office:value="8640000" calcext:value-type="float">
            <text:p>8640000</text:p>
          </table:table-cell>
          <table:table-cell table:formula="of:=[.B1048]/[.C1048]" office:value-type="float" office:value="0.000848263888888889" calcext:value-type="float">
            <text:p>0,00084826388888888900</text:p>
          </table:table-cell>
          <table:table-cell table:formula="of:=[.D1049]-[.D104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+7" office:value-type="float" office:value="7336" calcext:value-type="float">
            <text:p>7336</text:p>
          </table:table-cell>
          <table:table-cell office:value-type="float" office:value="8640000" calcext:value-type="float">
            <text:p>8640000</text:p>
          </table:table-cell>
          <table:table-cell table:formula="of:=[.B1049]/[.C1049]" office:value-type="float" office:value="0.000849074074074074" calcext:value-type="float">
            <text:p>0,00084907407407407400</text:p>
          </table:table-cell>
          <table:table-cell table:formula="of:=[.D1050]-[.D104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+7" office:value-type="float" office:value="7343" calcext:value-type="float">
            <text:p>7343</text:p>
          </table:table-cell>
          <table:table-cell office:value-type="float" office:value="8640000" calcext:value-type="float">
            <text:p>8640000</text:p>
          </table:table-cell>
          <table:table-cell table:formula="of:=[.B1050]/[.C1050]" office:value-type="float" office:value="0.000849884259259259" calcext:value-type="float">
            <text:p>0,00084988425925925900</text:p>
          </table:table-cell>
          <table:table-cell table:formula="of:=[.D1051]-[.D105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+7" office:value-type="float" office:value="7350" calcext:value-type="float">
            <text:p>7350</text:p>
          </table:table-cell>
          <table:table-cell office:value-type="float" office:value="8640000" calcext:value-type="float">
            <text:p>8640000</text:p>
          </table:table-cell>
          <table:table-cell table:formula="of:=[.B1051]/[.C1051]" office:value-type="float" office:value="0.000850694444444444" calcext:value-type="float">
            <text:p>0,00085069444444444400</text:p>
          </table:table-cell>
          <table:table-cell table:formula="of:=[.D1052]-[.D105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+7" office:value-type="float" office:value="7357" calcext:value-type="float">
            <text:p>7357</text:p>
          </table:table-cell>
          <table:table-cell office:value-type="float" office:value="8640000" calcext:value-type="float">
            <text:p>8640000</text:p>
          </table:table-cell>
          <table:table-cell table:formula="of:=[.B1052]/[.C1052]" office:value-type="float" office:value="0.00085150462962963" calcext:value-type="float">
            <text:p>0,00085150462962963000</text:p>
          </table:table-cell>
          <table:table-cell table:formula="of:=[.D1053]-[.D105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+7" office:value-type="float" office:value="7364" calcext:value-type="float">
            <text:p>7364</text:p>
          </table:table-cell>
          <table:table-cell office:value-type="float" office:value="8640000" calcext:value-type="float">
            <text:p>8640000</text:p>
          </table:table-cell>
          <table:table-cell table:formula="of:=[.B1053]/[.C1053]" office:value-type="float" office:value="0.000852314814814815" calcext:value-type="float">
            <text:p>0,00085231481481481500</text:p>
          </table:table-cell>
          <table:table-cell table:formula="of:=[.D1054]-[.D105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+7" office:value-type="float" office:value="7371" calcext:value-type="float">
            <text:p>7371</text:p>
          </table:table-cell>
          <table:table-cell office:value-type="float" office:value="8640000" calcext:value-type="float">
            <text:p>8640000</text:p>
          </table:table-cell>
          <table:table-cell table:formula="of:=[.B1054]/[.C1054]" office:value-type="float" office:value="0.000853125" calcext:value-type="float">
            <text:p>0,00085312500000000000</text:p>
          </table:table-cell>
          <table:table-cell table:formula="of:=[.D1055]-[.D105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+7" office:value-type="float" office:value="7378" calcext:value-type="float">
            <text:p>7378</text:p>
          </table:table-cell>
          <table:table-cell office:value-type="float" office:value="8640000" calcext:value-type="float">
            <text:p>8640000</text:p>
          </table:table-cell>
          <table:table-cell table:formula="of:=[.B1055]/[.C1055]" office:value-type="float" office:value="0.000853935185185185" calcext:value-type="float">
            <text:p>0,00085393518518518500</text:p>
          </table:table-cell>
          <table:table-cell table:formula="of:=[.D1056]-[.D105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+7" office:value-type="float" office:value="7385" calcext:value-type="float">
            <text:p>7385</text:p>
          </table:table-cell>
          <table:table-cell office:value-type="float" office:value="8640000" calcext:value-type="float">
            <text:p>8640000</text:p>
          </table:table-cell>
          <table:table-cell table:formula="of:=[.B1056]/[.C1056]" office:value-type="float" office:value="0.00085474537037037" calcext:value-type="float">
            <text:p>0,00085474537037037000</text:p>
          </table:table-cell>
          <table:table-cell table:formula="of:=[.D1057]-[.D105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+7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1057]/[.C1057]" office:value-type="float" office:value="0.000855555555555556" calcext:value-type="float">
            <text:p>0,00085555555555555600</text:p>
          </table:table-cell>
          <table:table-cell table:formula="of:=[.D1058]-[.D105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+7" office:value-type="float" office:value="7399" calcext:value-type="float">
            <text:p>7399</text:p>
          </table:table-cell>
          <table:table-cell office:value-type="float" office:value="8640000" calcext:value-type="float">
            <text:p>8640000</text:p>
          </table:table-cell>
          <table:table-cell table:formula="of:=[.B1058]/[.C1058]" office:value-type="float" office:value="0.000856365740740741" calcext:value-type="float">
            <text:p>0,00085636574074074100</text:p>
          </table:table-cell>
          <table:table-cell table:formula="of:=[.D1059]-[.D105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+7" office:value-type="float" office:value="7406" calcext:value-type="float">
            <text:p>7406</text:p>
          </table:table-cell>
          <table:table-cell office:value-type="float" office:value="8640000" calcext:value-type="float">
            <text:p>8640000</text:p>
          </table:table-cell>
          <table:table-cell table:formula="of:=[.B1059]/[.C1059]" office:value-type="float" office:value="0.000857175925925926" calcext:value-type="float">
            <text:p>0,00085717592592592600</text:p>
          </table:table-cell>
          <table:table-cell table:formula="of:=[.D1060]-[.D105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+7" office:value-type="float" office:value="7413" calcext:value-type="float">
            <text:p>7413</text:p>
          </table:table-cell>
          <table:table-cell office:value-type="float" office:value="8640000" calcext:value-type="float">
            <text:p>8640000</text:p>
          </table:table-cell>
          <table:table-cell table:formula="of:=[.B1060]/[.C1060]" office:value-type="float" office:value="0.000857986111111111" calcext:value-type="float">
            <text:p>0,00085798611111111100</text:p>
          </table:table-cell>
          <table:table-cell table:formula="of:=[.D1061]-[.D106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+7" office:value-type="float" office:value="7420" calcext:value-type="float">
            <text:p>7420</text:p>
          </table:table-cell>
          <table:table-cell office:value-type="float" office:value="8640000" calcext:value-type="float">
            <text:p>8640000</text:p>
          </table:table-cell>
          <table:table-cell table:formula="of:=[.B1061]/[.C1061]" office:value-type="float" office:value="0.000858796296296296" calcext:value-type="float">
            <text:p>0,00085879629629629600</text:p>
          </table:table-cell>
          <table:table-cell table:formula="of:=[.D1062]-[.D106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+7" office:value-type="float" office:value="7427" calcext:value-type="float">
            <text:p>7427</text:p>
          </table:table-cell>
          <table:table-cell office:value-type="float" office:value="8640000" calcext:value-type="float">
            <text:p>8640000</text:p>
          </table:table-cell>
          <table:table-cell table:formula="of:=[.B1062]/[.C1062]" office:value-type="float" office:value="0.000859606481481482" calcext:value-type="float">
            <text:p>0,00085960648148148200</text:p>
          </table:table-cell>
          <table:table-cell table:formula="of:=[.D1063]-[.D106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+7" office:value-type="float" office:value="7434" calcext:value-type="float">
            <text:p>7434</text:p>
          </table:table-cell>
          <table:table-cell office:value-type="float" office:value="8640000" calcext:value-type="float">
            <text:p>8640000</text:p>
          </table:table-cell>
          <table:table-cell table:formula="of:=[.B1063]/[.C1063]" office:value-type="float" office:value="0.000860416666666667" calcext:value-type="float">
            <text:p>0,00086041666666666700</text:p>
          </table:table-cell>
          <table:table-cell table:formula="of:=[.D1064]-[.D106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+7" office:value-type="float" office:value="7441" calcext:value-type="float">
            <text:p>7441</text:p>
          </table:table-cell>
          <table:table-cell office:value-type="float" office:value="8640000" calcext:value-type="float">
            <text:p>8640000</text:p>
          </table:table-cell>
          <table:table-cell table:formula="of:=[.B1064]/[.C1064]" office:value-type="float" office:value="0.000861226851851852" calcext:value-type="float">
            <text:p>0,00086122685185185200</text:p>
          </table:table-cell>
          <table:table-cell table:formula="of:=[.D1065]-[.D106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+7" office:value-type="float" office:value="7448" calcext:value-type="float">
            <text:p>7448</text:p>
          </table:table-cell>
          <table:table-cell office:value-type="float" office:value="8640000" calcext:value-type="float">
            <text:p>8640000</text:p>
          </table:table-cell>
          <table:table-cell table:formula="of:=[.B1065]/[.C1065]" office:value-type="float" office:value="0.000862037037037037" calcext:value-type="float">
            <text:p>0,00086203703703703700</text:p>
          </table:table-cell>
          <table:table-cell table:formula="of:=[.D1066]-[.D106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+7" office:value-type="float" office:value="7455" calcext:value-type="float">
            <text:p>7455</text:p>
          </table:table-cell>
          <table:table-cell office:value-type="float" office:value="8640000" calcext:value-type="float">
            <text:p>8640000</text:p>
          </table:table-cell>
          <table:table-cell table:formula="of:=[.B1066]/[.C1066]" office:value-type="float" office:value="0.000862847222222222" calcext:value-type="float">
            <text:p>0,00086284722222222200</text:p>
          </table:table-cell>
          <table:table-cell table:formula="of:=[.D1067]-[.D106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+7" office:value-type="float" office:value="7462" calcext:value-type="float">
            <text:p>7462</text:p>
          </table:table-cell>
          <table:table-cell office:value-type="float" office:value="8640000" calcext:value-type="float">
            <text:p>8640000</text:p>
          </table:table-cell>
          <table:table-cell table:formula="of:=[.B1067]/[.C1067]" office:value-type="float" office:value="0.000863657407407407" calcext:value-type="float">
            <text:p>0,00086365740740740700</text:p>
          </table:table-cell>
          <table:table-cell table:formula="of:=[.D1068]-[.D106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+7" office:value-type="float" office:value="7469" calcext:value-type="float">
            <text:p>7469</text:p>
          </table:table-cell>
          <table:table-cell office:value-type="float" office:value="8640000" calcext:value-type="float">
            <text:p>8640000</text:p>
          </table:table-cell>
          <table:table-cell table:formula="of:=[.B1068]/[.C1068]" office:value-type="float" office:value="0.000864467592592593" calcext:value-type="float">
            <text:p>0,00086446759259259300</text:p>
          </table:table-cell>
          <table:table-cell table:formula="of:=[.D1069]-[.D106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+7" office:value-type="float" office:value="7476" calcext:value-type="float">
            <text:p>7476</text:p>
          </table:table-cell>
          <table:table-cell office:value-type="float" office:value="8640000" calcext:value-type="float">
            <text:p>8640000</text:p>
          </table:table-cell>
          <table:table-cell table:formula="of:=[.B1069]/[.C1069]" office:value-type="float" office:value="0.000865277777777778" calcext:value-type="float">
            <text:p>0,00086527777777777800</text:p>
          </table:table-cell>
          <table:table-cell table:formula="of:=[.D1070]-[.D106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+7" office:value-type="float" office:value="7483" calcext:value-type="float">
            <text:p>7483</text:p>
          </table:table-cell>
          <table:table-cell office:value-type="float" office:value="8640000" calcext:value-type="float">
            <text:p>8640000</text:p>
          </table:table-cell>
          <table:table-cell table:formula="of:=[.B1070]/[.C1070]" office:value-type="float" office:value="0.000866087962962963" calcext:value-type="float">
            <text:p>0,00086608796296296300</text:p>
          </table:table-cell>
          <table:table-cell table:formula="of:=[.D1071]-[.D107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+7" office:value-type="float" office:value="7490" calcext:value-type="float">
            <text:p>7490</text:p>
          </table:table-cell>
          <table:table-cell office:value-type="float" office:value="8640000" calcext:value-type="float">
            <text:p>8640000</text:p>
          </table:table-cell>
          <table:table-cell table:formula="of:=[.B1071]/[.C1071]" office:value-type="float" office:value="0.000866898148148148" calcext:value-type="float">
            <text:p>0,00086689814814814800</text:p>
          </table:table-cell>
          <table:table-cell table:formula="of:=[.D1072]-[.D107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+7" office:value-type="float" office:value="7497" calcext:value-type="float">
            <text:p>7497</text:p>
          </table:table-cell>
          <table:table-cell office:value-type="float" office:value="8640000" calcext:value-type="float">
            <text:p>8640000</text:p>
          </table:table-cell>
          <table:table-cell table:formula="of:=[.B1072]/[.C1072]" office:value-type="float" office:value="0.000867708333333333" calcext:value-type="float">
            <text:p>0,00086770833333333300</text:p>
          </table:table-cell>
          <table:table-cell table:formula="of:=[.D1073]-[.D107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+7" office:value-type="float" office:value="7504" calcext:value-type="float">
            <text:p>7504</text:p>
          </table:table-cell>
          <table:table-cell office:value-type="float" office:value="8640000" calcext:value-type="float">
            <text:p>8640000</text:p>
          </table:table-cell>
          <table:table-cell table:formula="of:=[.B1073]/[.C1073]" office:value-type="float" office:value="0.000868518518518519" calcext:value-type="float">
            <text:p>0,00086851851851851800</text:p>
          </table:table-cell>
          <table:table-cell table:formula="of:=[.D1074]-[.D107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+7" office:value-type="float" office:value="7511" calcext:value-type="float">
            <text:p>7511</text:p>
          </table:table-cell>
          <table:table-cell office:value-type="float" office:value="8640000" calcext:value-type="float">
            <text:p>8640000</text:p>
          </table:table-cell>
          <table:table-cell table:formula="of:=[.B1074]/[.C1074]" office:value-type="float" office:value="0.000869328703703704" calcext:value-type="float">
            <text:p>0,00086932870370370400</text:p>
          </table:table-cell>
          <table:table-cell table:formula="of:=[.D1075]-[.D107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+7" office:value-type="float" office:value="7518" calcext:value-type="float">
            <text:p>7518</text:p>
          </table:table-cell>
          <table:table-cell office:value-type="float" office:value="8640000" calcext:value-type="float">
            <text:p>8640000</text:p>
          </table:table-cell>
          <table:table-cell table:formula="of:=[.B1075]/[.C1075]" office:value-type="float" office:value="0.000870138888888889" calcext:value-type="float">
            <text:p>0,00087013888888888900</text:p>
          </table:table-cell>
          <table:table-cell table:formula="of:=[.D1076]-[.D107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+7" office:value-type="float" office:value="7525" calcext:value-type="float">
            <text:p>7525</text:p>
          </table:table-cell>
          <table:table-cell office:value-type="float" office:value="8640000" calcext:value-type="float">
            <text:p>8640000</text:p>
          </table:table-cell>
          <table:table-cell table:formula="of:=[.B1076]/[.C1076]" office:value-type="float" office:value="0.000870949074074074" calcext:value-type="float">
            <text:p>0,00087094907407407400</text:p>
          </table:table-cell>
          <table:table-cell table:formula="of:=[.D1077]-[.D107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+7" office:value-type="float" office:value="7532" calcext:value-type="float">
            <text:p>7532</text:p>
          </table:table-cell>
          <table:table-cell office:value-type="float" office:value="8640000" calcext:value-type="float">
            <text:p>8640000</text:p>
          </table:table-cell>
          <table:table-cell table:formula="of:=[.B1077]/[.C1077]" office:value-type="float" office:value="0.000871759259259259" calcext:value-type="float">
            <text:p>0,00087175925925925900</text:p>
          </table:table-cell>
          <table:table-cell table:formula="of:=[.D1078]-[.D107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+7" office:value-type="float" office:value="7539" calcext:value-type="float">
            <text:p>7539</text:p>
          </table:table-cell>
          <table:table-cell office:value-type="float" office:value="8640000" calcext:value-type="float">
            <text:p>8640000</text:p>
          </table:table-cell>
          <table:table-cell table:formula="of:=[.B1078]/[.C1078]" office:value-type="float" office:value="0.000872569444444445" calcext:value-type="float">
            <text:p>0,00087256944444444500</text:p>
          </table:table-cell>
          <table:table-cell table:formula="of:=[.D1079]-[.D107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+7" office:value-type="float" office:value="7546" calcext:value-type="float">
            <text:p>7546</text:p>
          </table:table-cell>
          <table:table-cell office:value-type="float" office:value="8640000" calcext:value-type="float">
            <text:p>8640000</text:p>
          </table:table-cell>
          <table:table-cell table:formula="of:=[.B1079]/[.C1079]" office:value-type="float" office:value="0.00087337962962963" calcext:value-type="float">
            <text:p>0,00087337962962963000</text:p>
          </table:table-cell>
          <table:table-cell table:formula="of:=[.D1080]-[.D107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+7" office:value-type="float" office:value="7553" calcext:value-type="float">
            <text:p>7553</text:p>
          </table:table-cell>
          <table:table-cell office:value-type="float" office:value="8640000" calcext:value-type="float">
            <text:p>8640000</text:p>
          </table:table-cell>
          <table:table-cell table:formula="of:=[.B1080]/[.C1080]" office:value-type="float" office:value="0.000874189814814815" calcext:value-type="float">
            <text:p>0,00087418981481481500</text:p>
          </table:table-cell>
          <table:table-cell table:formula="of:=[.D1081]-[.D108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+7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1081]/[.C1081]" office:value-type="float" office:value="0.000875" calcext:value-type="float">
            <text:p>0,00087500000000000000</text:p>
          </table:table-cell>
          <table:table-cell table:formula="of:=[.D1082]-[.D108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+7" office:value-type="float" office:value="7567" calcext:value-type="float">
            <text:p>7567</text:p>
          </table:table-cell>
          <table:table-cell office:value-type="float" office:value="8640000" calcext:value-type="float">
            <text:p>8640000</text:p>
          </table:table-cell>
          <table:table-cell table:formula="of:=[.B1082]/[.C1082]" office:value-type="float" office:value="0.000875810185185185" calcext:value-type="float">
            <text:p>0,00087581018518518500</text:p>
          </table:table-cell>
          <table:table-cell table:formula="of:=[.D1083]-[.D108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+7" office:value-type="float" office:value="7574" calcext:value-type="float">
            <text:p>7574</text:p>
          </table:table-cell>
          <table:table-cell office:value-type="float" office:value="8640000" calcext:value-type="float">
            <text:p>8640000</text:p>
          </table:table-cell>
          <table:table-cell table:formula="of:=[.B1083]/[.C1083]" office:value-type="float" office:value="0.00087662037037037" calcext:value-type="float">
            <text:p>0,00087662037037037000</text:p>
          </table:table-cell>
          <table:table-cell table:formula="of:=[.D1084]-[.D108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+7" office:value-type="float" office:value="7581" calcext:value-type="float">
            <text:p>7581</text:p>
          </table:table-cell>
          <table:table-cell office:value-type="float" office:value="8640000" calcext:value-type="float">
            <text:p>8640000</text:p>
          </table:table-cell>
          <table:table-cell table:formula="of:=[.B1084]/[.C1084]" office:value-type="float" office:value="0.000877430555555556" calcext:value-type="float">
            <text:p>0,00087743055555555600</text:p>
          </table:table-cell>
          <table:table-cell table:formula="of:=[.D1085]-[.D108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4]+7" office:value-type="float" office:value="7588" calcext:value-type="float">
            <text:p>7588</text:p>
          </table:table-cell>
          <table:table-cell office:value-type="float" office:value="8640000" calcext:value-type="float">
            <text:p>8640000</text:p>
          </table:table-cell>
          <table:table-cell table:formula="of:=[.B1085]/[.C1085]" office:value-type="float" office:value="0.000878240740740741" calcext:value-type="float">
            <text:p>0,00087824074074074100</text:p>
          </table:table-cell>
          <table:table-cell table:formula="of:=[.D1086]-[.D108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5]+7" office:value-type="float" office:value="7595" calcext:value-type="float">
            <text:p>7595</text:p>
          </table:table-cell>
          <table:table-cell office:value-type="float" office:value="8640000" calcext:value-type="float">
            <text:p>8640000</text:p>
          </table:table-cell>
          <table:table-cell table:formula="of:=[.B1086]/[.C1086]" office:value-type="float" office:value="0.000879050925925926" calcext:value-type="float">
            <text:p>0,00087905092592592600</text:p>
          </table:table-cell>
          <table:table-cell table:formula="of:=[.D1087]-[.D108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6]+7" office:value-type="float" office:value="7602" calcext:value-type="float">
            <text:p>7602</text:p>
          </table:table-cell>
          <table:table-cell office:value-type="float" office:value="8640000" calcext:value-type="float">
            <text:p>8640000</text:p>
          </table:table-cell>
          <table:table-cell table:formula="of:=[.B1087]/[.C1087]" office:value-type="float" office:value="0.000879861111111111" calcext:value-type="float">
            <text:p>0,00087986111111111100</text:p>
          </table:table-cell>
          <table:table-cell table:formula="of:=[.D1088]-[.D108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87]+7" office:value-type="float" office:value="7609" calcext:value-type="float">
            <text:p>7609</text:p>
          </table:table-cell>
          <table:table-cell office:value-type="float" office:value="8640000" calcext:value-type="float">
            <text:p>8640000</text:p>
          </table:table-cell>
          <table:table-cell table:formula="of:=[.B1088]/[.C1088]" office:value-type="float" office:value="0.000880671296296296" calcext:value-type="float">
            <text:p>0,00088067129629629600</text:p>
          </table:table-cell>
          <table:table-cell table:formula="of:=[.D1089]-[.D108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88]+7" office:value-type="float" office:value="7616" calcext:value-type="float">
            <text:p>7616</text:p>
          </table:table-cell>
          <table:table-cell office:value-type="float" office:value="8640000" calcext:value-type="float">
            <text:p>8640000</text:p>
          </table:table-cell>
          <table:table-cell table:formula="of:=[.B1089]/[.C1089]" office:value-type="float" office:value="0.000881481481481482" calcext:value-type="float">
            <text:p>0,00088148148148148200</text:p>
          </table:table-cell>
          <table:table-cell table:formula="of:=[.D1090]-[.D108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89]+7" office:value-type="float" office:value="7623" calcext:value-type="float">
            <text:p>7623</text:p>
          </table:table-cell>
          <table:table-cell office:value-type="float" office:value="8640000" calcext:value-type="float">
            <text:p>8640000</text:p>
          </table:table-cell>
          <table:table-cell table:formula="of:=[.B1090]/[.C1090]" office:value-type="float" office:value="0.000882291666666667" calcext:value-type="float">
            <text:p>0,00088229166666666700</text:p>
          </table:table-cell>
          <table:table-cell table:formula="of:=[.D1091]-[.D109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0]+7" office:value-type="float" office:value="7630" calcext:value-type="float">
            <text:p>7630</text:p>
          </table:table-cell>
          <table:table-cell office:value-type="float" office:value="8640000" calcext:value-type="float">
            <text:p>8640000</text:p>
          </table:table-cell>
          <table:table-cell table:formula="of:=[.B1091]/[.C1091]" office:value-type="float" office:value="0.000883101851851852" calcext:value-type="float">
            <text:p>0,00088310185185185200</text:p>
          </table:table-cell>
          <table:table-cell table:formula="of:=[.D1092]-[.D109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1091]+7" office:value-type="float" office:value="7637" calcext:value-type="float">
            <text:p>7637</text:p>
          </table:table-cell>
          <table:table-cell office:value-type="float" office:value="8640000" calcext:value-type="float">
            <text:p>8640000</text:p>
          </table:table-cell>
          <table:table-cell table:formula="of:=[.B1092]/[.C1092]" office:value-type="float" office:value="0.000883912037037037" calcext:value-type="float">
            <text:p>0,00088391203703703700</text:p>
          </table:table-cell>
          <table:table-cell table:formula="of:=[.D1093]-[.D109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1092]+7" office:value-type="float" office:value="7644" calcext:value-type="float">
            <text:p>7644</text:p>
          </table:table-cell>
          <table:table-cell office:value-type="float" office:value="8640000" calcext:value-type="float">
            <text:p>8640000</text:p>
          </table:table-cell>
          <table:table-cell table:formula="of:=[.B1093]/[.C1093]" office:value-type="float" office:value="0.000884722222222222" calcext:value-type="float">
            <text:p>0,00088472222222222200</text:p>
          </table:table-cell>
          <table:table-cell table:formula="of:=[.D1094]-[.D109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B1093]+7" office:value-type="float" office:value="7651" calcext:value-type="float">
            <text:p>7651</text:p>
          </table:table-cell>
          <table:table-cell office:value-type="float" office:value="8640000" calcext:value-type="float">
            <text:p>8640000</text:p>
          </table:table-cell>
          <table:table-cell table:formula="of:=[.B1094]/[.C1094]" office:value-type="float" office:value="0.000885532407407407" calcext:value-type="float">
            <text:p>0,00088553240740740700</text:p>
          </table:table-cell>
          <table:table-cell table:formula="of:=[.D1095]-[.D109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B1094]+7" office:value-type="float" office:value="7658" calcext:value-type="float">
            <text:p>7658</text:p>
          </table:table-cell>
          <table:table-cell office:value-type="float" office:value="8640000" calcext:value-type="float">
            <text:p>8640000</text:p>
          </table:table-cell>
          <table:table-cell table:formula="of:=[.B1095]/[.C1095]" office:value-type="float" office:value="0.000886342592592593" calcext:value-type="float">
            <text:p>0,00088634259259259200</text:p>
          </table:table-cell>
          <table:table-cell table:formula="of:=[.D1096]-[.D109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1095]+7" office:value-type="float" office:value="7665" calcext:value-type="float">
            <text:p>7665</text:p>
          </table:table-cell>
          <table:table-cell office:value-type="float" office:value="8640000" calcext:value-type="float">
            <text:p>8640000</text:p>
          </table:table-cell>
          <table:table-cell table:formula="of:=[.B1096]/[.C1096]" office:value-type="float" office:value="0.000887152777777778" calcext:value-type="float">
            <text:p>0,00088715277777777800</text:p>
          </table:table-cell>
          <table:table-cell table:formula="of:=[.D1097]-[.D109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1096]+7" office:value-type="float" office:value="7672" calcext:value-type="float">
            <text:p>7672</text:p>
          </table:table-cell>
          <table:table-cell office:value-type="float" office:value="8640000" calcext:value-type="float">
            <text:p>8640000</text:p>
          </table:table-cell>
          <table:table-cell table:formula="of:=[.B1097]/[.C1097]" office:value-type="float" office:value="0.000887962962962963" calcext:value-type="float">
            <text:p>0,00088796296296296300</text:p>
          </table:table-cell>
          <table:table-cell table:formula="of:=[.D1098]-[.D109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B1097]+7" office:value-type="float" office:value="7679" calcext:value-type="float">
            <text:p>7679</text:p>
          </table:table-cell>
          <table:table-cell office:value-type="float" office:value="8640000" calcext:value-type="float">
            <text:p>8640000</text:p>
          </table:table-cell>
          <table:table-cell table:formula="of:=[.B1098]/[.C1098]" office:value-type="float" office:value="0.000888773148148148" calcext:value-type="float">
            <text:p>0,00088877314814814800</text:p>
          </table:table-cell>
          <table:table-cell table:formula="of:=[.D1099]-[.D109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B1098]+7" office:value-type="float" office:value="7686" calcext:value-type="float">
            <text:p>7686</text:p>
          </table:table-cell>
          <table:table-cell office:value-type="float" office:value="8640000" calcext:value-type="float">
            <text:p>8640000</text:p>
          </table:table-cell>
          <table:table-cell table:formula="of:=[.B1099]/[.C1099]" office:value-type="float" office:value="0.000889583333333333" calcext:value-type="float">
            <text:p>0,00088958333333333400</text:p>
          </table:table-cell>
          <table:table-cell table:formula="of:=[.D1100]-[.D109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1099]+7" office:value-type="float" office:value="7693" calcext:value-type="float">
            <text:p>7693</text:p>
          </table:table-cell>
          <table:table-cell office:value-type="float" office:value="8640000" calcext:value-type="float">
            <text:p>8640000</text:p>
          </table:table-cell>
          <table:table-cell table:formula="of:=[.B1100]/[.C1100]" office:value-type="float" office:value="0.000890393518518519" calcext:value-type="float">
            <text:p>0,00089039351851851900</text:p>
          </table:table-cell>
          <table:table-cell table:formula="of:=[.D1101]-[.D110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1100]+7" office:value-type="float" office:value="7700" calcext:value-type="float">
            <text:p>7700</text:p>
          </table:table-cell>
          <table:table-cell office:value-type="float" office:value="8640000" calcext:value-type="float">
            <text:p>8640000</text:p>
          </table:table-cell>
          <table:table-cell table:formula="of:=[.B1101]/[.C1101]" office:value-type="float" office:value="0.000891203703703704" calcext:value-type="float">
            <text:p>0,00089120370370370400</text:p>
          </table:table-cell>
          <table:table-cell table:formula="of:=[.D1102]-[.D110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1101]+7" office:value-type="float" office:value="7707" calcext:value-type="float">
            <text:p>7707</text:p>
          </table:table-cell>
          <table:table-cell office:value-type="float" office:value="8640000" calcext:value-type="float">
            <text:p>8640000</text:p>
          </table:table-cell>
          <table:table-cell table:formula="of:=[.B1102]/[.C1102]" office:value-type="float" office:value="0.000892013888888889" calcext:value-type="float">
            <text:p>0,00089201388888888900</text:p>
          </table:table-cell>
          <table:table-cell table:formula="of:=[.D1103]-[.D110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1102]+7" office:value-type="float" office:value="7714" calcext:value-type="float">
            <text:p>7714</text:p>
          </table:table-cell>
          <table:table-cell office:value-type="float" office:value="8640000" calcext:value-type="float">
            <text:p>8640000</text:p>
          </table:table-cell>
          <table:table-cell table:formula="of:=[.B1103]/[.C1103]" office:value-type="float" office:value="0.000892824074074074" calcext:value-type="float">
            <text:p>0,00089282407407407400</text:p>
          </table:table-cell>
          <table:table-cell table:formula="of:=[.D1104]-[.D110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B1103]+7" office:value-type="float" office:value="7721" calcext:value-type="float">
            <text:p>7721</text:p>
          </table:table-cell>
          <table:table-cell office:value-type="float" office:value="8640000" calcext:value-type="float">
            <text:p>8640000</text:p>
          </table:table-cell>
          <table:table-cell table:formula="of:=[.B1104]/[.C1104]" office:value-type="float" office:value="0.000893634259259259" calcext:value-type="float">
            <text:p>0,00089363425925925900</text:p>
          </table:table-cell>
          <table:table-cell table:formula="of:=[.D1105]-[.D110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B1104]+7" office:value-type="float" office:value="7728" calcext:value-type="float">
            <text:p>7728</text:p>
          </table:table-cell>
          <table:table-cell office:value-type="float" office:value="8640000" calcext:value-type="float">
            <text:p>8640000</text:p>
          </table:table-cell>
          <table:table-cell table:formula="of:=[.B1105]/[.C1105]" office:value-type="float" office:value="0.000894444444444445" calcext:value-type="float">
            <text:p>0,00089444444444444500</text:p>
          </table:table-cell>
          <table:table-cell table:formula="of:=[.D1106]-[.D110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1105]+7" office:value-type="float" office:value="7735" calcext:value-type="float">
            <text:p>7735</text:p>
          </table:table-cell>
          <table:table-cell office:value-type="float" office:value="8640000" calcext:value-type="float">
            <text:p>8640000</text:p>
          </table:table-cell>
          <table:table-cell table:formula="of:=[.B1106]/[.C1106]" office:value-type="float" office:value="0.00089525462962963" calcext:value-type="float">
            <text:p>0,00089525462962963000</text:p>
          </table:table-cell>
          <table:table-cell table:formula="of:=[.D1107]-[.D110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B1106]+7" office:value-type="float" office:value="7742" calcext:value-type="float">
            <text:p>7742</text:p>
          </table:table-cell>
          <table:table-cell office:value-type="float" office:value="8640000" calcext:value-type="float">
            <text:p>8640000</text:p>
          </table:table-cell>
          <table:table-cell table:formula="of:=[.B1107]/[.C1107]" office:value-type="float" office:value="0.000896064814814815" calcext:value-type="float">
            <text:p>0,00089606481481481500</text:p>
          </table:table-cell>
          <table:table-cell table:formula="of:=[.D1108]-[.D110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B1107]+7" office:value-type="float" office:value="7749" calcext:value-type="float">
            <text:p>7749</text:p>
          </table:table-cell>
          <table:table-cell office:value-type="float" office:value="8640000" calcext:value-type="float">
            <text:p>8640000</text:p>
          </table:table-cell>
          <table:table-cell table:formula="of:=[.B1108]/[.C1108]" office:value-type="float" office:value="0.000896875" calcext:value-type="float">
            <text:p>0,00089687500000000000</text:p>
          </table:table-cell>
          <table:table-cell table:formula="of:=[.D1109]-[.D110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B1108]+7" office:value-type="float" office:value="7756" calcext:value-type="float">
            <text:p>7756</text:p>
          </table:table-cell>
          <table:table-cell office:value-type="float" office:value="8640000" calcext:value-type="float">
            <text:p>8640000</text:p>
          </table:table-cell>
          <table:table-cell table:formula="of:=[.B1109]/[.C1109]" office:value-type="float" office:value="0.000897685185185185" calcext:value-type="float">
            <text:p>0,00089768518518518500</text:p>
          </table:table-cell>
          <table:table-cell table:formula="of:=[.D1110]-[.D110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1109]+7" office:value-type="float" office:value="7763" calcext:value-type="float">
            <text:p>7763</text:p>
          </table:table-cell>
          <table:table-cell office:value-type="float" office:value="8640000" calcext:value-type="float">
            <text:p>8640000</text:p>
          </table:table-cell>
          <table:table-cell table:formula="of:=[.B1110]/[.C1110]" office:value-type="float" office:value="0.00089849537037037" calcext:value-type="float">
            <text:p>0,00089849537037037000</text:p>
          </table:table-cell>
          <table:table-cell table:formula="of:=[.D1111]-[.D111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B1110]+7" office:value-type="float" office:value="7770" calcext:value-type="float">
            <text:p>7770</text:p>
          </table:table-cell>
          <table:table-cell office:value-type="float" office:value="8640000" calcext:value-type="float">
            <text:p>8640000</text:p>
          </table:table-cell>
          <table:table-cell table:formula="of:=[.B1111]/[.C1111]" office:value-type="float" office:value="0.000899305555555556" calcext:value-type="float">
            <text:p>0,00089930555555555600</text:p>
          </table:table-cell>
          <table:table-cell table:formula="of:=[.D1112]-[.D111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1111]+7" office:value-type="float" office:value="7777" calcext:value-type="float">
            <text:p>7777</text:p>
          </table:table-cell>
          <table:table-cell office:value-type="float" office:value="8640000" calcext:value-type="float">
            <text:p>8640000</text:p>
          </table:table-cell>
          <table:table-cell table:formula="of:=[.B1112]/[.C1112]" office:value-type="float" office:value="0.000900115740740741" calcext:value-type="float">
            <text:p>0,00090011574074074100</text:p>
          </table:table-cell>
          <table:table-cell table:formula="of:=[.D1113]-[.D111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B1112]+7" office:value-type="float" office:value="7784" calcext:value-type="float">
            <text:p>7784</text:p>
          </table:table-cell>
          <table:table-cell office:value-type="float" office:value="8640000" calcext:value-type="float">
            <text:p>8640000</text:p>
          </table:table-cell>
          <table:table-cell table:formula="of:=[.B1113]/[.C1113]" office:value-type="float" office:value="0.000900925925925926" calcext:value-type="float">
            <text:p>0,00090092592592592600</text:p>
          </table:table-cell>
          <table:table-cell table:formula="of:=[.D1114]-[.D111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B1113]+7" office:value-type="float" office:value="7791" calcext:value-type="float">
            <text:p>7791</text:p>
          </table:table-cell>
          <table:table-cell office:value-type="float" office:value="8640000" calcext:value-type="float">
            <text:p>8640000</text:p>
          </table:table-cell>
          <table:table-cell table:formula="of:=[.B1114]/[.C1114]" office:value-type="float" office:value="0.000901736111111111" calcext:value-type="float">
            <text:p>0,00090173611111111100</text:p>
          </table:table-cell>
          <table:table-cell table:formula="of:=[.D1115]-[.D111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B1114]+7" office:value-type="float" office:value="7798" calcext:value-type="float">
            <text:p>7798</text:p>
          </table:table-cell>
          <table:table-cell office:value-type="float" office:value="8640000" calcext:value-type="float">
            <text:p>8640000</text:p>
          </table:table-cell>
          <table:table-cell table:formula="of:=[.B1115]/[.C1115]" office:value-type="float" office:value="0.000902546296296296" calcext:value-type="float">
            <text:p>0,00090254629629629600</text:p>
          </table:table-cell>
          <table:table-cell table:formula="of:=[.D1116]-[.D111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1115]+7" office:value-type="float" office:value="7805" calcext:value-type="float">
            <text:p>7805</text:p>
          </table:table-cell>
          <table:table-cell office:value-type="float" office:value="8640000" calcext:value-type="float">
            <text:p>8640000</text:p>
          </table:table-cell>
          <table:table-cell table:formula="of:=[.B1116]/[.C1116]" office:value-type="float" office:value="0.000903356481481481" calcext:value-type="float">
            <text:p>0,00090335648148148100</text:p>
          </table:table-cell>
          <table:table-cell table:formula="of:=[.D1117]-[.D111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B1116]+7" office:value-type="float" office:value="7812" calcext:value-type="float">
            <text:p>7812</text:p>
          </table:table-cell>
          <table:table-cell office:value-type="float" office:value="8640000" calcext:value-type="float">
            <text:p>8640000</text:p>
          </table:table-cell>
          <table:table-cell table:formula="of:=[.B1117]/[.C1117]" office:value-type="float" office:value="0.000904166666666667" calcext:value-type="float">
            <text:p>0,00090416666666666700</text:p>
          </table:table-cell>
          <table:table-cell table:formula="of:=[.D1118]-[.D111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B1117]+7" office:value-type="float" office:value="7819" calcext:value-type="float">
            <text:p>7819</text:p>
          </table:table-cell>
          <table:table-cell office:value-type="float" office:value="8640000" calcext:value-type="float">
            <text:p>8640000</text:p>
          </table:table-cell>
          <table:table-cell table:formula="of:=[.B1118]/[.C1118]" office:value-type="float" office:value="0.000904976851851852" calcext:value-type="float">
            <text:p>0,00090497685185185200</text:p>
          </table:table-cell>
          <table:table-cell table:formula="of:=[.D1119]-[.D111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1118]+7" office:value-type="float" office:value="7826" calcext:value-type="float">
            <text:p>7826</text:p>
          </table:table-cell>
          <table:table-cell office:value-type="float" office:value="8640000" calcext:value-type="float">
            <text:p>8640000</text:p>
          </table:table-cell>
          <table:table-cell table:formula="of:=[.B1119]/[.C1119]" office:value-type="float" office:value="0.000905787037037037" calcext:value-type="float">
            <text:p>0,00090578703703703700</text:p>
          </table:table-cell>
          <table:table-cell table:formula="of:=[.D1120]-[.D111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1119]+7" office:value-type="float" office:value="7833" calcext:value-type="float">
            <text:p>7833</text:p>
          </table:table-cell>
          <table:table-cell office:value-type="float" office:value="8640000" calcext:value-type="float">
            <text:p>8640000</text:p>
          </table:table-cell>
          <table:table-cell table:formula="of:=[.B1120]/[.C1120]" office:value-type="float" office:value="0.000906597222222222" calcext:value-type="float">
            <text:p>0,00090659722222222200</text:p>
          </table:table-cell>
          <table:table-cell table:formula="of:=[.D1121]-[.D112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1120]+7" office:value-type="float" office:value="7840" calcext:value-type="float">
            <text:p>7840</text:p>
          </table:table-cell>
          <table:table-cell office:value-type="float" office:value="8640000" calcext:value-type="float">
            <text:p>8640000</text:p>
          </table:table-cell>
          <table:table-cell table:formula="of:=[.B1121]/[.C1121]" office:value-type="float" office:value="0.000907407407407407" calcext:value-type="float">
            <text:p>0,00090740740740740800</text:p>
          </table:table-cell>
          <table:table-cell table:formula="of:=[.D1122]-[.D112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B1121]+7" office:value-type="float" office:value="7847" calcext:value-type="float">
            <text:p>7847</text:p>
          </table:table-cell>
          <table:table-cell office:value-type="float" office:value="8640000" calcext:value-type="float">
            <text:p>8640000</text:p>
          </table:table-cell>
          <table:table-cell table:formula="of:=[.B1122]/[.C1122]" office:value-type="float" office:value="0.000908217592592593" calcext:value-type="float">
            <text:p>0,00090821759259259300</text:p>
          </table:table-cell>
          <table:table-cell table:formula="of:=[.D1123]-[.D112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1122]+7" office:value-type="float" office:value="7854" calcext:value-type="float">
            <text:p>7854</text:p>
          </table:table-cell>
          <table:table-cell office:value-type="float" office:value="8640000" calcext:value-type="float">
            <text:p>8640000</text:p>
          </table:table-cell>
          <table:table-cell table:formula="of:=[.B1123]/[.C1123]" office:value-type="float" office:value="0.000909027777777778" calcext:value-type="float">
            <text:p>0,00090902777777777800</text:p>
          </table:table-cell>
          <table:table-cell table:formula="of:=[.D1124]-[.D112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B1123]+7" office:value-type="float" office:value="7861" calcext:value-type="float">
            <text:p>7861</text:p>
          </table:table-cell>
          <table:table-cell office:value-type="float" office:value="8640000" calcext:value-type="float">
            <text:p>8640000</text:p>
          </table:table-cell>
          <table:table-cell table:formula="of:=[.B1124]/[.C1124]" office:value-type="float" office:value="0.000909837962962963" calcext:value-type="float">
            <text:p>0,00090983796296296300</text:p>
          </table:table-cell>
          <table:table-cell table:formula="of:=[.D1125]-[.D112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B1124]+7" office:value-type="float" office:value="7868" calcext:value-type="float">
            <text:p>7868</text:p>
          </table:table-cell>
          <table:table-cell office:value-type="float" office:value="8640000" calcext:value-type="float">
            <text:p>8640000</text:p>
          </table:table-cell>
          <table:table-cell table:formula="of:=[.B1125]/[.C1125]" office:value-type="float" office:value="0.000910648148148148" calcext:value-type="float">
            <text:p>0,00091064814814814800</text:p>
          </table:table-cell>
          <table:table-cell table:formula="of:=[.D1126]-[.D112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1125]+7" office:value-type="float" office:value="7875" calcext:value-type="float">
            <text:p>7875</text:p>
          </table:table-cell>
          <table:table-cell office:value-type="float" office:value="8640000" calcext:value-type="float">
            <text:p>8640000</text:p>
          </table:table-cell>
          <table:table-cell table:formula="of:=[.B1126]/[.C1126]" office:value-type="float" office:value="0.000911458333333333" calcext:value-type="float">
            <text:p>0,00091145833333333300</text:p>
          </table:table-cell>
          <table:table-cell table:formula="of:=[.D1127]-[.D112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1126]+7" office:value-type="float" office:value="7882" calcext:value-type="float">
            <text:p>7882</text:p>
          </table:table-cell>
          <table:table-cell office:value-type="float" office:value="8640000" calcext:value-type="float">
            <text:p>8640000</text:p>
          </table:table-cell>
          <table:table-cell table:formula="of:=[.B1127]/[.C1127]" office:value-type="float" office:value="0.000912268518518519" calcext:value-type="float">
            <text:p>0,00091226851851851900</text:p>
          </table:table-cell>
          <table:table-cell table:formula="of:=[.D1128]-[.D112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B1127]+7" office:value-type="float" office:value="7889" calcext:value-type="float">
            <text:p>7889</text:p>
          </table:table-cell>
          <table:table-cell office:value-type="float" office:value="8640000" calcext:value-type="float">
            <text:p>8640000</text:p>
          </table:table-cell>
          <table:table-cell table:formula="of:=[.B1128]/[.C1128]" office:value-type="float" office:value="0.000913078703703704" calcext:value-type="float">
            <text:p>0,00091307870370370400</text:p>
          </table:table-cell>
          <table:table-cell table:formula="of:=[.D1129]-[.D112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1128]+7" office:value-type="float" office:value="7896" calcext:value-type="float">
            <text:p>7896</text:p>
          </table:table-cell>
          <table:table-cell office:value-type="float" office:value="8640000" calcext:value-type="float">
            <text:p>8640000</text:p>
          </table:table-cell>
          <table:table-cell table:formula="of:=[.B1129]/[.C1129]" office:value-type="float" office:value="0.000913888888888889" calcext:value-type="float">
            <text:p>0,00091388888888888900</text:p>
          </table:table-cell>
          <table:table-cell table:formula="of:=[.D1130]-[.D112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1129]+7" office:value-type="float" office:value="7903" calcext:value-type="float">
            <text:p>7903</text:p>
          </table:table-cell>
          <table:table-cell office:value-type="float" office:value="8640000" calcext:value-type="float">
            <text:p>8640000</text:p>
          </table:table-cell>
          <table:table-cell table:formula="of:=[.B1130]/[.C1130]" office:value-type="float" office:value="0.000914699074074074" calcext:value-type="float">
            <text:p>0,00091469907407407400</text:p>
          </table:table-cell>
          <table:table-cell table:formula="of:=[.D1131]-[.D113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B1130]+7" office:value-type="float" office:value="7910" calcext:value-type="float">
            <text:p>7910</text:p>
          </table:table-cell>
          <table:table-cell office:value-type="float" office:value="8640000" calcext:value-type="float">
            <text:p>8640000</text:p>
          </table:table-cell>
          <table:table-cell table:formula="of:=[.B1131]/[.C1131]" office:value-type="float" office:value="0.000915509259259259" calcext:value-type="float">
            <text:p>0,00091550925925925900</text:p>
          </table:table-cell>
          <table:table-cell table:formula="of:=[.D1132]-[.D113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1131]+7" office:value-type="float" office:value="7917" calcext:value-type="float">
            <text:p>7917</text:p>
          </table:table-cell>
          <table:table-cell office:value-type="float" office:value="8640000" calcext:value-type="float">
            <text:p>8640000</text:p>
          </table:table-cell>
          <table:table-cell table:formula="of:=[.B1132]/[.C1132]" office:value-type="float" office:value="0.000916319444444444" calcext:value-type="float">
            <text:p>0,00091631944444444400</text:p>
          </table:table-cell>
          <table:table-cell table:formula="of:=[.D1133]-[.D113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B1132]+7" office:value-type="float" office:value="7924" calcext:value-type="float">
            <text:p>7924</text:p>
          </table:table-cell>
          <table:table-cell office:value-type="float" office:value="8640000" calcext:value-type="float">
            <text:p>8640000</text:p>
          </table:table-cell>
          <table:table-cell table:formula="of:=[.B1133]/[.C1133]" office:value-type="float" office:value="0.00091712962962963" calcext:value-type="float">
            <text:p>0,00091712962962963000</text:p>
          </table:table-cell>
          <table:table-cell table:formula="of:=[.D1134]-[.D113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B1133]+7" office:value-type="float" office:value="7931" calcext:value-type="float">
            <text:p>7931</text:p>
          </table:table-cell>
          <table:table-cell office:value-type="float" office:value="8640000" calcext:value-type="float">
            <text:p>8640000</text:p>
          </table:table-cell>
          <table:table-cell table:formula="of:=[.B1134]/[.C1134]" office:value-type="float" office:value="0.000917939814814815" calcext:value-type="float">
            <text:p>0,00091793981481481500</text:p>
          </table:table-cell>
          <table:table-cell table:formula="of:=[.D1135]-[.D113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B1134]+7" office:value-type="float" office:value="7938" calcext:value-type="float">
            <text:p>7938</text:p>
          </table:table-cell>
          <table:table-cell office:value-type="float" office:value="8640000" calcext:value-type="float">
            <text:p>8640000</text:p>
          </table:table-cell>
          <table:table-cell table:formula="of:=[.B1135]/[.C1135]" office:value-type="float" office:value="0.00091875" calcext:value-type="float">
            <text:p>0,00091875000000000000</text:p>
          </table:table-cell>
          <table:table-cell table:formula="of:=[.D1136]-[.D113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1135]+7" office:value-type="float" office:value="7945" calcext:value-type="float">
            <text:p>7945</text:p>
          </table:table-cell>
          <table:table-cell office:value-type="float" office:value="8640000" calcext:value-type="float">
            <text:p>8640000</text:p>
          </table:table-cell>
          <table:table-cell table:formula="of:=[.B1136]/[.C1136]" office:value-type="float" office:value="0.000919560185185185" calcext:value-type="float">
            <text:p>0,00091956018518518500</text:p>
          </table:table-cell>
          <table:table-cell table:formula="of:=[.D1137]-[.D113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B1136]+7" office:value-type="float" office:value="7952" calcext:value-type="float">
            <text:p>7952</text:p>
          </table:table-cell>
          <table:table-cell office:value-type="float" office:value="8640000" calcext:value-type="float">
            <text:p>8640000</text:p>
          </table:table-cell>
          <table:table-cell table:formula="of:=[.B1137]/[.C1137]" office:value-type="float" office:value="0.00092037037037037" calcext:value-type="float">
            <text:p>0,00092037037037037000</text:p>
          </table:table-cell>
          <table:table-cell table:formula="of:=[.D1138]-[.D113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1137]+7" office:value-type="float" office:value="7959" calcext:value-type="float">
            <text:p>7959</text:p>
          </table:table-cell>
          <table:table-cell office:value-type="float" office:value="8640000" calcext:value-type="float">
            <text:p>8640000</text:p>
          </table:table-cell>
          <table:table-cell table:formula="of:=[.B1138]/[.C1138]" office:value-type="float" office:value="0.000921180555555556" calcext:value-type="float">
            <text:p>0,00092118055555555600</text:p>
          </table:table-cell>
          <table:table-cell table:formula="of:=[.D1139]-[.D113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B1138]+7" office:value-type="float" office:value="7966" calcext:value-type="float">
            <text:p>7966</text:p>
          </table:table-cell>
          <table:table-cell office:value-type="float" office:value="8640000" calcext:value-type="float">
            <text:p>8640000</text:p>
          </table:table-cell>
          <table:table-cell table:formula="of:=[.B1139]/[.C1139]" office:value-type="float" office:value="0.000921990740740741" calcext:value-type="float">
            <text:p>0,00092199074074074100</text:p>
          </table:table-cell>
          <table:table-cell table:formula="of:=[.D1140]-[.D113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1139]+7" office:value-type="float" office:value="7973" calcext:value-type="float">
            <text:p>7973</text:p>
          </table:table-cell>
          <table:table-cell office:value-type="float" office:value="8640000" calcext:value-type="float">
            <text:p>8640000</text:p>
          </table:table-cell>
          <table:table-cell table:formula="of:=[.B1140]/[.C1140]" office:value-type="float" office:value="0.000922800925925926" calcext:value-type="float">
            <text:p>0,00092280092592592600</text:p>
          </table:table-cell>
          <table:table-cell table:formula="of:=[.D1141]-[.D114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B1140]+7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1141]/[.C1141]" office:value-type="float" office:value="0.000923611111111111" calcext:value-type="float">
            <text:p>0,00092361111111111100</text:p>
          </table:table-cell>
          <table:table-cell table:formula="of:=[.D1142]-[.D114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B1141]+7" office:value-type="float" office:value="7987" calcext:value-type="float">
            <text:p>7987</text:p>
          </table:table-cell>
          <table:table-cell office:value-type="float" office:value="8640000" calcext:value-type="float">
            <text:p>8640000</text:p>
          </table:table-cell>
          <table:table-cell table:formula="of:=[.B1142]/[.C1142]" office:value-type="float" office:value="0.000924421296296296" calcext:value-type="float">
            <text:p>0,00092442129629629600</text:p>
          </table:table-cell>
          <table:table-cell table:formula="of:=[.D1143]-[.D114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B1142]+7" office:value-type="float" office:value="7994" calcext:value-type="float">
            <text:p>7994</text:p>
          </table:table-cell>
          <table:table-cell office:value-type="float" office:value="8640000" calcext:value-type="float">
            <text:p>8640000</text:p>
          </table:table-cell>
          <table:table-cell table:formula="of:=[.B1143]/[.C1143]" office:value-type="float" office:value="0.000925231481481482" calcext:value-type="float">
            <text:p>0,00092523148148148200</text:p>
          </table:table-cell>
          <table:table-cell table:formula="of:=[.D1144]-[.D114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B1143]+7" office:value-type="float" office:value="8001" calcext:value-type="float">
            <text:p>8001</text:p>
          </table:table-cell>
          <table:table-cell office:value-type="float" office:value="8640000" calcext:value-type="float">
            <text:p>8640000</text:p>
          </table:table-cell>
          <table:table-cell table:formula="of:=[.B1144]/[.C1144]" office:value-type="float" office:value="0.000926041666666667" calcext:value-type="float">
            <text:p>0,00092604166666666700</text:p>
          </table:table-cell>
          <table:table-cell table:formula="of:=[.D1145]-[.D114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B1144]+7" office:value-type="float" office:value="8008" calcext:value-type="float">
            <text:p>8008</text:p>
          </table:table-cell>
          <table:table-cell office:value-type="float" office:value="8640000" calcext:value-type="float">
            <text:p>8640000</text:p>
          </table:table-cell>
          <table:table-cell table:formula="of:=[.B1145]/[.C1145]" office:value-type="float" office:value="0.000926851851851852" calcext:value-type="float">
            <text:p>0,00092685185185185200</text:p>
          </table:table-cell>
          <table:table-cell table:formula="of:=[.D1146]-[.D114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B1145]+7" office:value-type="float" office:value="8015" calcext:value-type="float">
            <text:p>8015</text:p>
          </table:table-cell>
          <table:table-cell office:value-type="float" office:value="8640000" calcext:value-type="float">
            <text:p>8640000</text:p>
          </table:table-cell>
          <table:table-cell table:formula="of:=[.B1146]/[.C1146]" office:value-type="float" office:value="0.000927662037037037" calcext:value-type="float">
            <text:p>0,00092766203703703700</text:p>
          </table:table-cell>
          <table:table-cell table:formula="of:=[.D1147]-[.D114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B1146]+7" office:value-type="float" office:value="8022" calcext:value-type="float">
            <text:p>8022</text:p>
          </table:table-cell>
          <table:table-cell office:value-type="float" office:value="8640000" calcext:value-type="float">
            <text:p>8640000</text:p>
          </table:table-cell>
          <table:table-cell table:formula="of:=[.B1147]/[.C1147]" office:value-type="float" office:value="0.000928472222222222" calcext:value-type="float">
            <text:p>0,00092847222222222200</text:p>
          </table:table-cell>
          <table:table-cell table:formula="of:=[.D1148]-[.D114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B1147]+7" office:value-type="float" office:value="8029" calcext:value-type="float">
            <text:p>8029</text:p>
          </table:table-cell>
          <table:table-cell office:value-type="float" office:value="8640000" calcext:value-type="float">
            <text:p>8640000</text:p>
          </table:table-cell>
          <table:table-cell table:formula="of:=[.B1148]/[.C1148]" office:value-type="float" office:value="0.000929282407407407" calcext:value-type="float">
            <text:p>0,00092928240740740700</text:p>
          </table:table-cell>
          <table:table-cell table:formula="of:=[.D1149]-[.D114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B1148]+7" office:value-type="float" office:value="8036" calcext:value-type="float">
            <text:p>8036</text:p>
          </table:table-cell>
          <table:table-cell office:value-type="float" office:value="8640000" calcext:value-type="float">
            <text:p>8640000</text:p>
          </table:table-cell>
          <table:table-cell table:formula="of:=[.B1149]/[.C1149]" office:value-type="float" office:value="0.000930092592592593" calcext:value-type="float">
            <text:p>0,00093009259259259300</text:p>
          </table:table-cell>
          <table:table-cell table:formula="of:=[.D1150]-[.D114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B1149]+7" office:value-type="float" office:value="8043" calcext:value-type="float">
            <text:p>8043</text:p>
          </table:table-cell>
          <table:table-cell office:value-type="float" office:value="8640000" calcext:value-type="float">
            <text:p>8640000</text:p>
          </table:table-cell>
          <table:table-cell table:formula="of:=[.B1150]/[.C1150]" office:value-type="float" office:value="0.000930902777777778" calcext:value-type="float">
            <text:p>0,00093090277777777800</text:p>
          </table:table-cell>
          <table:table-cell table:formula="of:=[.D1151]-[.D115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B1150]+7" office:value-type="float" office:value="8050" calcext:value-type="float">
            <text:p>8050</text:p>
          </table:table-cell>
          <table:table-cell office:value-type="float" office:value="8640000" calcext:value-type="float">
            <text:p>8640000</text:p>
          </table:table-cell>
          <table:table-cell table:formula="of:=[.B1151]/[.C1151]" office:value-type="float" office:value="0.000931712962962963" calcext:value-type="float">
            <text:p>0,00093171296296296300</text:p>
          </table:table-cell>
          <table:table-cell table:formula="of:=[.D1152]-[.D115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B1151]+7" office:value-type="float" office:value="8057" calcext:value-type="float">
            <text:p>8057</text:p>
          </table:table-cell>
          <table:table-cell office:value-type="float" office:value="8640000" calcext:value-type="float">
            <text:p>8640000</text:p>
          </table:table-cell>
          <table:table-cell table:formula="of:=[.B1152]/[.C1152]" office:value-type="float" office:value="0.000932523148148148" calcext:value-type="float">
            <text:p>0,00093252314814814800</text:p>
          </table:table-cell>
          <table:table-cell table:formula="of:=[.D1153]-[.D115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B1152]+7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1153]/[.C1153]" office:value-type="float" office:value="0.000933333333333333" calcext:value-type="float">
            <text:p>0,00093333333333333300</text:p>
          </table:table-cell>
          <table:table-cell table:formula="of:=[.D1154]-[.D115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B1153]+7" office:value-type="float" office:value="8071" calcext:value-type="float">
            <text:p>8071</text:p>
          </table:table-cell>
          <table:table-cell office:value-type="float" office:value="8640000" calcext:value-type="float">
            <text:p>8640000</text:p>
          </table:table-cell>
          <table:table-cell table:formula="of:=[.B1154]/[.C1154]" office:value-type="float" office:value="0.000934143518518519" calcext:value-type="float">
            <text:p>0,00093414351851851900</text:p>
          </table:table-cell>
          <table:table-cell table:formula="of:=[.D1155]-[.D115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B1154]+7" office:value-type="float" office:value="8078" calcext:value-type="float">
            <text:p>8078</text:p>
          </table:table-cell>
          <table:table-cell office:value-type="float" office:value="8640000" calcext:value-type="float">
            <text:p>8640000</text:p>
          </table:table-cell>
          <table:table-cell table:formula="of:=[.B1155]/[.C1155]" office:value-type="float" office:value="0.000934953703703704" calcext:value-type="float">
            <text:p>0,00093495370370370400</text:p>
          </table:table-cell>
          <table:table-cell table:formula="of:=[.D1156]-[.D115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B1155]+7" office:value-type="float" office:value="8085" calcext:value-type="float">
            <text:p>8085</text:p>
          </table:table-cell>
          <table:table-cell office:value-type="float" office:value="8640000" calcext:value-type="float">
            <text:p>8640000</text:p>
          </table:table-cell>
          <table:table-cell table:formula="of:=[.B1156]/[.C1156]" office:value-type="float" office:value="0.000935763888888889" calcext:value-type="float">
            <text:p>0,00093576388888888900</text:p>
          </table:table-cell>
          <table:table-cell table:formula="of:=[.D1157]-[.D115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B1156]+7" office:value-type="float" office:value="8092" calcext:value-type="float">
            <text:p>8092</text:p>
          </table:table-cell>
          <table:table-cell office:value-type="float" office:value="8640000" calcext:value-type="float">
            <text:p>8640000</text:p>
          </table:table-cell>
          <table:table-cell table:formula="of:=[.B1157]/[.C1157]" office:value-type="float" office:value="0.000936574074074074" calcext:value-type="float">
            <text:p>0,00093657407407407400</text:p>
          </table:table-cell>
          <table:table-cell table:formula="of:=[.D1158]-[.D115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B1157]+7" office:value-type="float" office:value="8099" calcext:value-type="float">
            <text:p>8099</text:p>
          </table:table-cell>
          <table:table-cell office:value-type="float" office:value="8640000" calcext:value-type="float">
            <text:p>8640000</text:p>
          </table:table-cell>
          <table:table-cell table:formula="of:=[.B1158]/[.C1158]" office:value-type="float" office:value="0.000937384259259259" calcext:value-type="float">
            <text:p>0,00093738425925925900</text:p>
          </table:table-cell>
          <table:table-cell table:formula="of:=[.D1159]-[.D115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B1158]+7" office:value-type="float" office:value="8106" calcext:value-type="float">
            <text:p>8106</text:p>
          </table:table-cell>
          <table:table-cell office:value-type="float" office:value="8640000" calcext:value-type="float">
            <text:p>8640000</text:p>
          </table:table-cell>
          <table:table-cell table:formula="of:=[.B1159]/[.C1159]" office:value-type="float" office:value="0.000938194444444444" calcext:value-type="float">
            <text:p>0,00093819444444444500</text:p>
          </table:table-cell>
          <table:table-cell table:formula="of:=[.D1160]-[.D115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B1159]+7" office:value-type="float" office:value="8113" calcext:value-type="float">
            <text:p>8113</text:p>
          </table:table-cell>
          <table:table-cell office:value-type="float" office:value="8640000" calcext:value-type="float">
            <text:p>8640000</text:p>
          </table:table-cell>
          <table:table-cell table:formula="of:=[.B1160]/[.C1160]" office:value-type="float" office:value="0.00093900462962963" calcext:value-type="float">
            <text:p>0,00093900462962963000</text:p>
          </table:table-cell>
          <table:table-cell table:formula="of:=[.D1161]-[.D116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B1160]+7" office:value-type="float" office:value="8120" calcext:value-type="float">
            <text:p>8120</text:p>
          </table:table-cell>
          <table:table-cell office:value-type="float" office:value="8640000" calcext:value-type="float">
            <text:p>8640000</text:p>
          </table:table-cell>
          <table:table-cell table:formula="of:=[.B1161]/[.C1161]" office:value-type="float" office:value="0.000939814814814815" calcext:value-type="float">
            <text:p>0,00093981481481481500</text:p>
          </table:table-cell>
          <table:table-cell table:formula="of:=[.D1162]-[.D116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B1161]+7" office:value-type="float" office:value="8127" calcext:value-type="float">
            <text:p>8127</text:p>
          </table:table-cell>
          <table:table-cell office:value-type="float" office:value="8640000" calcext:value-type="float">
            <text:p>8640000</text:p>
          </table:table-cell>
          <table:table-cell table:formula="of:=[.B1162]/[.C1162]" office:value-type="float" office:value="0.000940625" calcext:value-type="float">
            <text:p>0,00094062500000000000</text:p>
          </table:table-cell>
          <table:table-cell table:formula="of:=[.D1163]-[.D116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B1162]+7" office:value-type="float" office:value="8134" calcext:value-type="float">
            <text:p>8134</text:p>
          </table:table-cell>
          <table:table-cell office:value-type="float" office:value="8640000" calcext:value-type="float">
            <text:p>8640000</text:p>
          </table:table-cell>
          <table:table-cell table:formula="of:=[.B1163]/[.C1163]" office:value-type="float" office:value="0.000941435185185185" calcext:value-type="float">
            <text:p>0,00094143518518518500</text:p>
          </table:table-cell>
          <table:table-cell table:formula="of:=[.D1164]-[.D116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B1163]+7" office:value-type="float" office:value="8141" calcext:value-type="float">
            <text:p>8141</text:p>
          </table:table-cell>
          <table:table-cell office:value-type="float" office:value="8640000" calcext:value-type="float">
            <text:p>8640000</text:p>
          </table:table-cell>
          <table:table-cell table:formula="of:=[.B1164]/[.C1164]" office:value-type="float" office:value="0.00094224537037037" calcext:value-type="float">
            <text:p>0,00094224537037037000</text:p>
          </table:table-cell>
          <table:table-cell table:formula="of:=[.D1165]-[.D116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B1164]+7" office:value-type="float" office:value="8148" calcext:value-type="float">
            <text:p>8148</text:p>
          </table:table-cell>
          <table:table-cell office:value-type="float" office:value="8640000" calcext:value-type="float">
            <text:p>8640000</text:p>
          </table:table-cell>
          <table:table-cell table:formula="of:=[.B1165]/[.C1165]" office:value-type="float" office:value="0.000943055555555556" calcext:value-type="float">
            <text:p>0,00094305555555555600</text:p>
          </table:table-cell>
          <table:table-cell table:formula="of:=[.D1166]-[.D116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B1165]+7" office:value-type="float" office:value="8155" calcext:value-type="float">
            <text:p>8155</text:p>
          </table:table-cell>
          <table:table-cell office:value-type="float" office:value="8640000" calcext:value-type="float">
            <text:p>8640000</text:p>
          </table:table-cell>
          <table:table-cell table:formula="of:=[.B1166]/[.C1166]" office:value-type="float" office:value="0.000943865740740741" calcext:value-type="float">
            <text:p>0,00094386574074074100</text:p>
          </table:table-cell>
          <table:table-cell table:formula="of:=[.D1167]-[.D116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B1166]+7" office:value-type="float" office:value="8162" calcext:value-type="float">
            <text:p>8162</text:p>
          </table:table-cell>
          <table:table-cell office:value-type="float" office:value="8640000" calcext:value-type="float">
            <text:p>8640000</text:p>
          </table:table-cell>
          <table:table-cell table:formula="of:=[.B1167]/[.C1167]" office:value-type="float" office:value="0.000944675925925926" calcext:value-type="float">
            <text:p>0,00094467592592592600</text:p>
          </table:table-cell>
          <table:table-cell table:formula="of:=[.D1168]-[.D116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B1167]+7" office:value-type="float" office:value="8169" calcext:value-type="float">
            <text:p>8169</text:p>
          </table:table-cell>
          <table:table-cell office:value-type="float" office:value="8640000" calcext:value-type="float">
            <text:p>8640000</text:p>
          </table:table-cell>
          <table:table-cell table:formula="of:=[.B1168]/[.C1168]" office:value-type="float" office:value="0.000945486111111111" calcext:value-type="float">
            <text:p>0,00094548611111111100</text:p>
          </table:table-cell>
          <table:table-cell table:formula="of:=[.D1169]-[.D116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B1168]+7" office:value-type="float" office:value="8176" calcext:value-type="float">
            <text:p>8176</text:p>
          </table:table-cell>
          <table:table-cell office:value-type="float" office:value="8640000" calcext:value-type="float">
            <text:p>8640000</text:p>
          </table:table-cell>
          <table:table-cell table:formula="of:=[.B1169]/[.C1169]" office:value-type="float" office:value="0.000946296296296296" calcext:value-type="float">
            <text:p>0,00094629629629629600</text:p>
          </table:table-cell>
          <table:table-cell table:formula="of:=[.D1170]-[.D116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B1169]+7" office:value-type="float" office:value="8183" calcext:value-type="float">
            <text:p>8183</text:p>
          </table:table-cell>
          <table:table-cell office:value-type="float" office:value="8640000" calcext:value-type="float">
            <text:p>8640000</text:p>
          </table:table-cell>
          <table:table-cell table:formula="of:=[.B1170]/[.C1170]" office:value-type="float" office:value="0.000947106481481482" calcext:value-type="float">
            <text:p>0,00094710648148148100</text:p>
          </table:table-cell>
          <table:table-cell table:formula="of:=[.D1171]-[.D117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B1170]+7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1171]/[.C1171]" office:value-type="float" office:value="0.000947916666666667" calcext:value-type="float">
            <text:p>0,00094791666666666700</text:p>
          </table:table-cell>
          <table:table-cell table:formula="of:=[.D1172]-[.D117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B1171]+7" office:value-type="float" office:value="8197" calcext:value-type="float">
            <text:p>8197</text:p>
          </table:table-cell>
          <table:table-cell office:value-type="float" office:value="8640000" calcext:value-type="float">
            <text:p>8640000</text:p>
          </table:table-cell>
          <table:table-cell table:formula="of:=[.B1172]/[.C1172]" office:value-type="float" office:value="0.000948726851851852" calcext:value-type="float">
            <text:p>0,00094872685185185200</text:p>
          </table:table-cell>
          <table:table-cell table:formula="of:=[.D1173]-[.D117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B1172]+7" office:value-type="float" office:value="8204" calcext:value-type="float">
            <text:p>8204</text:p>
          </table:table-cell>
          <table:table-cell office:value-type="float" office:value="8640000" calcext:value-type="float">
            <text:p>8640000</text:p>
          </table:table-cell>
          <table:table-cell table:formula="of:=[.B1173]/[.C1173]" office:value-type="float" office:value="0.000949537037037037" calcext:value-type="float">
            <text:p>0,00094953703703703700</text:p>
          </table:table-cell>
          <table:table-cell table:formula="of:=[.D1174]-[.D117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B1173]+7" office:value-type="float" office:value="8211" calcext:value-type="float">
            <text:p>8211</text:p>
          </table:table-cell>
          <table:table-cell office:value-type="float" office:value="8640000" calcext:value-type="float">
            <text:p>8640000</text:p>
          </table:table-cell>
          <table:table-cell table:formula="of:=[.B1174]/[.C1174]" office:value-type="float" office:value="0.000950347222222222" calcext:value-type="float">
            <text:p>0,00095034722222222200</text:p>
          </table:table-cell>
          <table:table-cell table:formula="of:=[.D1175]-[.D117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B1174]+7" office:value-type="float" office:value="8218" calcext:value-type="float">
            <text:p>8218</text:p>
          </table:table-cell>
          <table:table-cell office:value-type="float" office:value="8640000" calcext:value-type="float">
            <text:p>8640000</text:p>
          </table:table-cell>
          <table:table-cell table:formula="of:=[.B1175]/[.C1175]" office:value-type="float" office:value="0.000951157407407407" calcext:value-type="float">
            <text:p>0,00095115740740740700</text:p>
          </table:table-cell>
          <table:table-cell table:formula="of:=[.D1176]-[.D117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B1175]+7" office:value-type="float" office:value="8225" calcext:value-type="float">
            <text:p>8225</text:p>
          </table:table-cell>
          <table:table-cell office:value-type="float" office:value="8640000" calcext:value-type="float">
            <text:p>8640000</text:p>
          </table:table-cell>
          <table:table-cell table:formula="of:=[.B1176]/[.C1176]" office:value-type="float" office:value="0.000951967592592593" calcext:value-type="float">
            <text:p>0,00095196759259259300</text:p>
          </table:table-cell>
          <table:table-cell table:formula="of:=[.D1177]-[.D117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B1176]+7" office:value-type="float" office:value="8232" calcext:value-type="float">
            <text:p>8232</text:p>
          </table:table-cell>
          <table:table-cell office:value-type="float" office:value="8640000" calcext:value-type="float">
            <text:p>8640000</text:p>
          </table:table-cell>
          <table:table-cell table:formula="of:=[.B1177]/[.C1177]" office:value-type="float" office:value="0.000952777777777778" calcext:value-type="float">
            <text:p>0,00095277777777777800</text:p>
          </table:table-cell>
          <table:table-cell table:formula="of:=[.D1178]-[.D117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B1177]+7" office:value-type="float" office:value="8239" calcext:value-type="float">
            <text:p>8239</text:p>
          </table:table-cell>
          <table:table-cell office:value-type="float" office:value="8640000" calcext:value-type="float">
            <text:p>8640000</text:p>
          </table:table-cell>
          <table:table-cell table:formula="of:=[.B1178]/[.C1178]" office:value-type="float" office:value="0.000953587962962963" calcext:value-type="float">
            <text:p>0,00095358796296296300</text:p>
          </table:table-cell>
          <table:table-cell table:formula="of:=[.D1179]-[.D117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B1178]+7" office:value-type="float" office:value="8246" calcext:value-type="float">
            <text:p>8246</text:p>
          </table:table-cell>
          <table:table-cell office:value-type="float" office:value="8640000" calcext:value-type="float">
            <text:p>8640000</text:p>
          </table:table-cell>
          <table:table-cell table:formula="of:=[.B1179]/[.C1179]" office:value-type="float" office:value="0.000954398148148148" calcext:value-type="float">
            <text:p>0,00095439814814814800</text:p>
          </table:table-cell>
          <table:table-cell table:formula="of:=[.D1180]-[.D117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B1179]+7" office:value-type="float" office:value="8253" calcext:value-type="float">
            <text:p>8253</text:p>
          </table:table-cell>
          <table:table-cell office:value-type="float" office:value="8640000" calcext:value-type="float">
            <text:p>8640000</text:p>
          </table:table-cell>
          <table:table-cell table:formula="of:=[.B1180]/[.C1180]" office:value-type="float" office:value="0.000955208333333333" calcext:value-type="float">
            <text:p>0,00095520833333333300</text:p>
          </table:table-cell>
          <table:table-cell table:formula="of:=[.D1181]-[.D118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B1180]+7" office:value-type="float" office:value="8260" calcext:value-type="float">
            <text:p>8260</text:p>
          </table:table-cell>
          <table:table-cell office:value-type="float" office:value="8640000" calcext:value-type="float">
            <text:p>8640000</text:p>
          </table:table-cell>
          <table:table-cell table:formula="of:=[.B1181]/[.C1181]" office:value-type="float" office:value="0.000956018518518519" calcext:value-type="float">
            <text:p>0,00095601851851851900</text:p>
          </table:table-cell>
          <table:table-cell table:formula="of:=[.D1182]-[.D118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B1181]+7" office:value-type="float" office:value="8267" calcext:value-type="float">
            <text:p>8267</text:p>
          </table:table-cell>
          <table:table-cell office:value-type="float" office:value="8640000" calcext:value-type="float">
            <text:p>8640000</text:p>
          </table:table-cell>
          <table:table-cell table:formula="of:=[.B1182]/[.C1182]" office:value-type="float" office:value="0.000956828703703704" calcext:value-type="float">
            <text:p>0,00095682870370370400</text:p>
          </table:table-cell>
          <table:table-cell table:formula="of:=[.D1183]-[.D118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B1182]+7" office:value-type="float" office:value="8274" calcext:value-type="float">
            <text:p>8274</text:p>
          </table:table-cell>
          <table:table-cell office:value-type="float" office:value="8640000" calcext:value-type="float">
            <text:p>8640000</text:p>
          </table:table-cell>
          <table:table-cell table:formula="of:=[.B1183]/[.C1183]" office:value-type="float" office:value="0.000957638888888889" calcext:value-type="float">
            <text:p>0,00095763888888888900</text:p>
          </table:table-cell>
          <table:table-cell table:formula="of:=[.D1184]-[.D118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B1183]+7" office:value-type="float" office:value="8281" calcext:value-type="float">
            <text:p>8281</text:p>
          </table:table-cell>
          <table:table-cell office:value-type="float" office:value="8640000" calcext:value-type="float">
            <text:p>8640000</text:p>
          </table:table-cell>
          <table:table-cell table:formula="of:=[.B1184]/[.C1184]" office:value-type="float" office:value="0.000958449074074074" calcext:value-type="float">
            <text:p>0,00095844907407407400</text:p>
          </table:table-cell>
          <table:table-cell table:formula="of:=[.D1185]-[.D118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B1184]+7" office:value-type="float" office:value="8288" calcext:value-type="float">
            <text:p>8288</text:p>
          </table:table-cell>
          <table:table-cell office:value-type="float" office:value="8640000" calcext:value-type="float">
            <text:p>8640000</text:p>
          </table:table-cell>
          <table:table-cell table:formula="of:=[.B1185]/[.C1185]" office:value-type="float" office:value="0.000959259259259259" calcext:value-type="float">
            <text:p>0,00095925925925925900</text:p>
          </table:table-cell>
          <table:table-cell table:formula="of:=[.D1186]-[.D118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B1185]+7" office:value-type="float" office:value="8295" calcext:value-type="float">
            <text:p>8295</text:p>
          </table:table-cell>
          <table:table-cell office:value-type="float" office:value="8640000" calcext:value-type="float">
            <text:p>8640000</text:p>
          </table:table-cell>
          <table:table-cell table:formula="of:=[.B1186]/[.C1186]" office:value-type="float" office:value="0.000960069444444445" calcext:value-type="float">
            <text:p>0,00096006944444444500</text:p>
          </table:table-cell>
          <table:table-cell table:formula="of:=[.D1187]-[.D118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B1186]+7" office:value-type="float" office:value="8302" calcext:value-type="float">
            <text:p>8302</text:p>
          </table:table-cell>
          <table:table-cell office:value-type="float" office:value="8640000" calcext:value-type="float">
            <text:p>8640000</text:p>
          </table:table-cell>
          <table:table-cell table:formula="of:=[.B1187]/[.C1187]" office:value-type="float" office:value="0.00096087962962963" calcext:value-type="float">
            <text:p>0,00096087962962963000</text:p>
          </table:table-cell>
          <table:table-cell table:formula="of:=[.D1188]-[.D118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B1187]+7" office:value-type="float" office:value="8309" calcext:value-type="float">
            <text:p>8309</text:p>
          </table:table-cell>
          <table:table-cell office:value-type="float" office:value="8640000" calcext:value-type="float">
            <text:p>8640000</text:p>
          </table:table-cell>
          <table:table-cell table:formula="of:=[.B1188]/[.C1188]" office:value-type="float" office:value="0.000961689814814815" calcext:value-type="float">
            <text:p>0,00096168981481481500</text:p>
          </table:table-cell>
          <table:table-cell table:formula="of:=[.D1189]-[.D118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B1188]+7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1189]/[.C1189]" office:value-type="float" office:value="0.0009625" calcext:value-type="float">
            <text:p>0,00096250000000000000</text:p>
          </table:table-cell>
          <table:table-cell table:formula="of:=[.D1190]-[.D118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B1189]+7" office:value-type="float" office:value="8323" calcext:value-type="float">
            <text:p>8323</text:p>
          </table:table-cell>
          <table:table-cell office:value-type="float" office:value="8640000" calcext:value-type="float">
            <text:p>8640000</text:p>
          </table:table-cell>
          <table:table-cell table:formula="of:=[.B1190]/[.C1190]" office:value-type="float" office:value="0.000963310185185185" calcext:value-type="float">
            <text:p>0,00096331018518518500</text:p>
          </table:table-cell>
          <table:table-cell table:formula="of:=[.D1191]-[.D119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B1190]+7" office:value-type="float" office:value="8330" calcext:value-type="float">
            <text:p>8330</text:p>
          </table:table-cell>
          <table:table-cell office:value-type="float" office:value="8640000" calcext:value-type="float">
            <text:p>8640000</text:p>
          </table:table-cell>
          <table:table-cell table:formula="of:=[.B1191]/[.C1191]" office:value-type="float" office:value="0.00096412037037037" calcext:value-type="float">
            <text:p>0,00096412037037037000</text:p>
          </table:table-cell>
          <table:table-cell table:formula="of:=[.D1192]-[.D119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B1191]+7" office:value-type="float" office:value="8337" calcext:value-type="float">
            <text:p>8337</text:p>
          </table:table-cell>
          <table:table-cell office:value-type="float" office:value="8640000" calcext:value-type="float">
            <text:p>8640000</text:p>
          </table:table-cell>
          <table:table-cell table:formula="of:=[.B1192]/[.C1192]" office:value-type="float" office:value="0.000964930555555556" calcext:value-type="float">
            <text:p>0,00096493055555555600</text:p>
          </table:table-cell>
          <table:table-cell table:formula="of:=[.D1193]-[.D119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B1192]+7" office:value-type="float" office:value="8344" calcext:value-type="float">
            <text:p>8344</text:p>
          </table:table-cell>
          <table:table-cell office:value-type="float" office:value="8640000" calcext:value-type="float">
            <text:p>8640000</text:p>
          </table:table-cell>
          <table:table-cell table:formula="of:=[.B1193]/[.C1193]" office:value-type="float" office:value="0.000965740740740741" calcext:value-type="float">
            <text:p>0,00096574074074074100</text:p>
          </table:table-cell>
          <table:table-cell table:formula="of:=[.D1194]-[.D119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B1193]+7" office:value-type="float" office:value="8351" calcext:value-type="float">
            <text:p>8351</text:p>
          </table:table-cell>
          <table:table-cell office:value-type="float" office:value="8640000" calcext:value-type="float">
            <text:p>8640000</text:p>
          </table:table-cell>
          <table:table-cell table:formula="of:=[.B1194]/[.C1194]" office:value-type="float" office:value="0.000966550925925926" calcext:value-type="float">
            <text:p>0,00096655092592592600</text:p>
          </table:table-cell>
          <table:table-cell table:formula="of:=[.D1195]-[.D119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B1194]+7" office:value-type="float" office:value="8358" calcext:value-type="float">
            <text:p>8358</text:p>
          </table:table-cell>
          <table:table-cell office:value-type="float" office:value="8640000" calcext:value-type="float">
            <text:p>8640000</text:p>
          </table:table-cell>
          <table:table-cell table:formula="of:=[.B1195]/[.C1195]" office:value-type="float" office:value="0.000967361111111111" calcext:value-type="float">
            <text:p>0,00096736111111111100</text:p>
          </table:table-cell>
          <table:table-cell table:formula="of:=[.D1196]-[.D119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B1195]+7" office:value-type="float" office:value="8365" calcext:value-type="float">
            <text:p>8365</text:p>
          </table:table-cell>
          <table:table-cell office:value-type="float" office:value="8640000" calcext:value-type="float">
            <text:p>8640000</text:p>
          </table:table-cell>
          <table:table-cell table:formula="of:=[.B1196]/[.C1196]" office:value-type="float" office:value="0.000968171296296296" calcext:value-type="float">
            <text:p>0,00096817129629629600</text:p>
          </table:table-cell>
          <table:table-cell table:formula="of:=[.D1197]-[.D119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B1196]+7" office:value-type="float" office:value="8372" calcext:value-type="float">
            <text:p>8372</text:p>
          </table:table-cell>
          <table:table-cell office:value-type="float" office:value="8640000" calcext:value-type="float">
            <text:p>8640000</text:p>
          </table:table-cell>
          <table:table-cell table:formula="of:=[.B1197]/[.C1197]" office:value-type="float" office:value="0.000968981481481482" calcext:value-type="float">
            <text:p>0,00096898148148148200</text:p>
          </table:table-cell>
          <table:table-cell table:formula="of:=[.D1198]-[.D1197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B1197]+7" office:value-type="float" office:value="8379" calcext:value-type="float">
            <text:p>8379</text:p>
          </table:table-cell>
          <table:table-cell office:value-type="float" office:value="8640000" calcext:value-type="float">
            <text:p>8640000</text:p>
          </table:table-cell>
          <table:table-cell table:formula="of:=[.B1198]/[.C1198]" office:value-type="float" office:value="0.000969791666666667" calcext:value-type="float">
            <text:p>0,00096979166666666700</text:p>
          </table:table-cell>
          <table:table-cell table:formula="of:=[.D1199]-[.D1198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B1198]+7" office:value-type="float" office:value="8386" calcext:value-type="float">
            <text:p>8386</text:p>
          </table:table-cell>
          <table:table-cell office:value-type="float" office:value="8640000" calcext:value-type="float">
            <text:p>8640000</text:p>
          </table:table-cell>
          <table:table-cell table:formula="of:=[.B1199]/[.C1199]" office:value-type="float" office:value="0.000970601851851852" calcext:value-type="float">
            <text:p>0,00097060185185185200</text:p>
          </table:table-cell>
          <table:table-cell table:formula="of:=[.D1200]-[.D1199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B1199]+7" office:value-type="float" office:value="8393" calcext:value-type="float">
            <text:p>8393</text:p>
          </table:table-cell>
          <table:table-cell office:value-type="float" office:value="8640000" calcext:value-type="float">
            <text:p>8640000</text:p>
          </table:table-cell>
          <table:table-cell table:formula="of:=[.B1200]/[.C1200]" office:value-type="float" office:value="0.000971412037037037" calcext:value-type="float">
            <text:p>0,00097141203703703700</text:p>
          </table:table-cell>
          <table:table-cell table:formula="of:=[.D1201]-[.D1200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1200]+7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1201]/[.C1201]" office:value-type="float" office:value="0.000972222222222222" calcext:value-type="float">
            <text:p>0,00097222222222222200</text:p>
          </table:table-cell>
          <table:table-cell table:formula="of:=[.D1202]-[.D1201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B1201]+7" office:value-type="float" office:value="8407" calcext:value-type="float">
            <text:p>8407</text:p>
          </table:table-cell>
          <table:table-cell office:value-type="float" office:value="8640000" calcext:value-type="float">
            <text:p>8640000</text:p>
          </table:table-cell>
          <table:table-cell table:formula="of:=[.B1202]/[.C1202]" office:value-type="float" office:value="0.000973032407407407" calcext:value-type="float">
            <text:p>0,00097303240740740700</text:p>
          </table:table-cell>
          <table:table-cell table:formula="of:=[.D1203]-[.D1202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B1202]+7" office:value-type="float" office:value="8414" calcext:value-type="float">
            <text:p>8414</text:p>
          </table:table-cell>
          <table:table-cell office:value-type="float" office:value="8640000" calcext:value-type="float">
            <text:p>8640000</text:p>
          </table:table-cell>
          <table:table-cell table:formula="of:=[.B1203]/[.C1203]" office:value-type="float" office:value="0.000973842592592593" calcext:value-type="float">
            <text:p>0,00097384259259259200</text:p>
          </table:table-cell>
          <table:table-cell table:formula="of:=[.D1204]-[.D1203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B1203]+7" office:value-type="float" office:value="8421" calcext:value-type="float">
            <text:p>8421</text:p>
          </table:table-cell>
          <table:table-cell office:value-type="float" office:value="8640000" calcext:value-type="float">
            <text:p>8640000</text:p>
          </table:table-cell>
          <table:table-cell table:formula="of:=[.B1204]/[.C1204]" office:value-type="float" office:value="0.000974652777777778" calcext:value-type="float">
            <text:p>0,00097465277777777800</text:p>
          </table:table-cell>
          <table:table-cell table:formula="of:=[.D1205]-[.D1204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B1204]+7" office:value-type="float" office:value="8428" calcext:value-type="float">
            <text:p>8428</text:p>
          </table:table-cell>
          <table:table-cell office:value-type="float" office:value="8640000" calcext:value-type="float">
            <text:p>8640000</text:p>
          </table:table-cell>
          <table:table-cell table:formula="of:=[.B1205]/[.C1205]" office:value-type="float" office:value="0.000975462962962963" calcext:value-type="float">
            <text:p>0,00097546296296296300</text:p>
          </table:table-cell>
          <table:table-cell table:formula="of:=[.D1206]-[.D1205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B1205]+7" office:value-type="float" office:value="8435" calcext:value-type="float">
            <text:p>8435</text:p>
          </table:table-cell>
          <table:table-cell office:value-type="float" office:value="8640000" calcext:value-type="float">
            <text:p>8640000</text:p>
          </table:table-cell>
          <table:table-cell table:formula="of:=[.B1206]/[.C1206]" office:value-type="float" office:value="0.000976273148148148" calcext:value-type="float">
            <text:p>0,00097627314814814800</text:p>
          </table:table-cell>
          <table:table-cell table:formula="of:=[.D1207]-[.D1206]" office:value-type="float" office:value="0.00000081018518518518" calcext:value-type="float">
            <text:p>0,00000081018518518518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B1206]+7" office:value-type="float" office:value="8442" calcext:value-type="float">
            <text:p>8442</text:p>
          </table:table-cell>
          <table:table-cell office:value-type="float" office:value="8640000" calcext:value-type="float">
            <text:p>8640000</text:p>
          </table:table-cell>
          <table:table-cell table:formula="of:=[.B1207]/[.C1207]" office:value-type="float" office:value="0.000977083333333333" calcext:value-type="float">
            <text:p>0,00097708333333333300</text:p>
          </table:table-cell>
          <table:table-cell table:formula="of:=[.D1208]-[.D120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B1207]+7" office:value-type="float" office:value="8449" calcext:value-type="float">
            <text:p>8449</text:p>
          </table:table-cell>
          <table:table-cell office:value-type="float" office:value="8640000" calcext:value-type="float">
            <text:p>8640000</text:p>
          </table:table-cell>
          <table:table-cell table:formula="of:=[.B1208]/[.C1208]" office:value-type="float" office:value="0.000977893518518519" calcext:value-type="float">
            <text:p>0,00097789351851851900</text:p>
          </table:table-cell>
          <table:table-cell table:formula="of:=[.D1209]-[.D120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B1208]+7" office:value-type="float" office:value="8456" calcext:value-type="float">
            <text:p>8456</text:p>
          </table:table-cell>
          <table:table-cell office:value-type="float" office:value="8640000" calcext:value-type="float">
            <text:p>8640000</text:p>
          </table:table-cell>
          <table:table-cell table:formula="of:=[.B1209]/[.C1209]" office:value-type="float" office:value="0.000978703703703704" calcext:value-type="float">
            <text:p>0,00097870370370370400</text:p>
          </table:table-cell>
          <table:table-cell table:formula="of:=[.D1210]-[.D120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B1209]+7" office:value-type="float" office:value="8463" calcext:value-type="float">
            <text:p>8463</text:p>
          </table:table-cell>
          <table:table-cell office:value-type="float" office:value="8640000" calcext:value-type="float">
            <text:p>8640000</text:p>
          </table:table-cell>
          <table:table-cell table:formula="of:=[.B1210]/[.C1210]" office:value-type="float" office:value="0.000979513888888889" calcext:value-type="float">
            <text:p>0,00097951388888888900</text:p>
          </table:table-cell>
          <table:table-cell table:formula="of:=[.D1211]-[.D121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B1210]+7" office:value-type="float" office:value="8470" calcext:value-type="float">
            <text:p>8470</text:p>
          </table:table-cell>
          <table:table-cell office:value-type="float" office:value="8640000" calcext:value-type="float">
            <text:p>8640000</text:p>
          </table:table-cell>
          <table:table-cell table:formula="of:=[.B1211]/[.C1211]" office:value-type="float" office:value="0.000980324074074074" calcext:value-type="float">
            <text:p>0,00098032407407407400</text:p>
          </table:table-cell>
          <table:table-cell table:formula="of:=[.D1212]-[.D121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B1211]+7" office:value-type="float" office:value="8477" calcext:value-type="float">
            <text:p>8477</text:p>
          </table:table-cell>
          <table:table-cell office:value-type="float" office:value="8640000" calcext:value-type="float">
            <text:p>8640000</text:p>
          </table:table-cell>
          <table:table-cell table:formula="of:=[.B1212]/[.C1212]" office:value-type="float" office:value="0.000981134259259259" calcext:value-type="float">
            <text:p>0,00098113425925925900</text:p>
          </table:table-cell>
          <table:table-cell table:formula="of:=[.D1213]-[.D121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B1212]+7" office:value-type="float" office:value="8484" calcext:value-type="float">
            <text:p>8484</text:p>
          </table:table-cell>
          <table:table-cell office:value-type="float" office:value="8640000" calcext:value-type="float">
            <text:p>8640000</text:p>
          </table:table-cell>
          <table:table-cell table:formula="of:=[.B1213]/[.C1213]" office:value-type="float" office:value="0.000981944444444444" calcext:value-type="float">
            <text:p>0,00098194444444444400</text:p>
          </table:table-cell>
          <table:table-cell table:formula="of:=[.D1214]-[.D121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B1213]+7" office:value-type="float" office:value="8491" calcext:value-type="float">
            <text:p>8491</text:p>
          </table:table-cell>
          <table:table-cell office:value-type="float" office:value="8640000" calcext:value-type="float">
            <text:p>8640000</text:p>
          </table:table-cell>
          <table:table-cell table:formula="of:=[.B1214]/[.C1214]" office:value-type="float" office:value="0.00098275462962963" calcext:value-type="float">
            <text:p>0,00098275462962963000</text:p>
          </table:table-cell>
          <table:table-cell table:formula="of:=[.D1215]-[.D121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B1214]+7" office:value-type="float" office:value="8498" calcext:value-type="float">
            <text:p>8498</text:p>
          </table:table-cell>
          <table:table-cell office:value-type="float" office:value="8640000" calcext:value-type="float">
            <text:p>8640000</text:p>
          </table:table-cell>
          <table:table-cell table:formula="of:=[.B1215]/[.C1215]" office:value-type="float" office:value="0.000983564814814815" calcext:value-type="float">
            <text:p>0,00098356481481481500</text:p>
          </table:table-cell>
          <table:table-cell table:formula="of:=[.D1216]-[.D121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B1215]+7" office:value-type="float" office:value="8505" calcext:value-type="float">
            <text:p>8505</text:p>
          </table:table-cell>
          <table:table-cell office:value-type="float" office:value="8640000" calcext:value-type="float">
            <text:p>8640000</text:p>
          </table:table-cell>
          <table:table-cell table:formula="of:=[.B1216]/[.C1216]" office:value-type="float" office:value="0.000984375" calcext:value-type="float">
            <text:p>0,00098437500000000000</text:p>
          </table:table-cell>
          <table:table-cell table:formula="of:=[.D1217]-[.D121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B1216]+7" office:value-type="float" office:value="8512" calcext:value-type="float">
            <text:p>8512</text:p>
          </table:table-cell>
          <table:table-cell office:value-type="float" office:value="8640000" calcext:value-type="float">
            <text:p>8640000</text:p>
          </table:table-cell>
          <table:table-cell table:formula="of:=[.B1217]/[.C1217]" office:value-type="float" office:value="0.000985185185185185" calcext:value-type="float">
            <text:p>0,00098518518518518500</text:p>
          </table:table-cell>
          <table:table-cell table:formula="of:=[.D1218]-[.D121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B1217]+7" office:value-type="float" office:value="8519" calcext:value-type="float">
            <text:p>8519</text:p>
          </table:table-cell>
          <table:table-cell office:value-type="float" office:value="8640000" calcext:value-type="float">
            <text:p>8640000</text:p>
          </table:table-cell>
          <table:table-cell table:formula="of:=[.B1218]/[.C1218]" office:value-type="float" office:value="0.00098599537037037" calcext:value-type="float">
            <text:p>0,00098599537037037000</text:p>
          </table:table-cell>
          <table:table-cell table:formula="of:=[.D1219]-[.D121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B1218]+7" office:value-type="float" office:value="8526" calcext:value-type="float">
            <text:p>8526</text:p>
          </table:table-cell>
          <table:table-cell office:value-type="float" office:value="8640000" calcext:value-type="float">
            <text:p>8640000</text:p>
          </table:table-cell>
          <table:table-cell table:formula="of:=[.B1219]/[.C1219]" office:value-type="float" office:value="0.000986805555555556" calcext:value-type="float">
            <text:p>0,00098680555555555600</text:p>
          </table:table-cell>
          <table:table-cell table:formula="of:=[.D1220]-[.D121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B1219]+7" office:value-type="float" office:value="8533" calcext:value-type="float">
            <text:p>8533</text:p>
          </table:table-cell>
          <table:table-cell office:value-type="float" office:value="8640000" calcext:value-type="float">
            <text:p>8640000</text:p>
          </table:table-cell>
          <table:table-cell table:formula="of:=[.B1220]/[.C1220]" office:value-type="float" office:value="0.000987615740740741" calcext:value-type="float">
            <text:p>0,00098761574074074100</text:p>
          </table:table-cell>
          <table:table-cell table:formula="of:=[.D1221]-[.D122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B1220]+7" office:value-type="float" office:value="8540" calcext:value-type="float">
            <text:p>8540</text:p>
          </table:table-cell>
          <table:table-cell office:value-type="float" office:value="8640000" calcext:value-type="float">
            <text:p>8640000</text:p>
          </table:table-cell>
          <table:table-cell table:formula="of:=[.B1221]/[.C1221]" office:value-type="float" office:value="0.000988425925925926" calcext:value-type="float">
            <text:p>0,00098842592592592600</text:p>
          </table:table-cell>
          <table:table-cell table:formula="of:=[.D1222]-[.D122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B1221]+7" office:value-type="float" office:value="8547" calcext:value-type="float">
            <text:p>8547</text:p>
          </table:table-cell>
          <table:table-cell office:value-type="float" office:value="8640000" calcext:value-type="float">
            <text:p>8640000</text:p>
          </table:table-cell>
          <table:table-cell table:formula="of:=[.B1222]/[.C1222]" office:value-type="float" office:value="0.000989236111111111" calcext:value-type="float">
            <text:p>0,00098923611111111100</text:p>
          </table:table-cell>
          <table:table-cell table:formula="of:=[.D1223]-[.D122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B1222]+7" office:value-type="float" office:value="8554" calcext:value-type="float">
            <text:p>8554</text:p>
          </table:table-cell>
          <table:table-cell office:value-type="float" office:value="8640000" calcext:value-type="float">
            <text:p>8640000</text:p>
          </table:table-cell>
          <table:table-cell table:formula="of:=[.B1223]/[.C1223]" office:value-type="float" office:value="0.000990046296296296" calcext:value-type="float">
            <text:p>0,00099004629629629600</text:p>
          </table:table-cell>
          <table:table-cell table:formula="of:=[.D1224]-[.D122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B1223]+7" office:value-type="float" office:value="8561" calcext:value-type="float">
            <text:p>8561</text:p>
          </table:table-cell>
          <table:table-cell office:value-type="float" office:value="8640000" calcext:value-type="float">
            <text:p>8640000</text:p>
          </table:table-cell>
          <table:table-cell table:formula="of:=[.B1224]/[.C1224]" office:value-type="float" office:value="0.000990856481481481" calcext:value-type="float">
            <text:p>0,00099085648148148100</text:p>
          </table:table-cell>
          <table:table-cell table:formula="of:=[.D1225]-[.D122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B1224]+7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1225]/[.C1225]" office:value-type="float" office:value="0.000991666666666667" calcext:value-type="float">
            <text:p>0,00099166666666666700</text:p>
          </table:table-cell>
          <table:table-cell table:formula="of:=[.D1226]-[.D122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B1225]+7" office:value-type="float" office:value="8575" calcext:value-type="float">
            <text:p>8575</text:p>
          </table:table-cell>
          <table:table-cell office:value-type="float" office:value="8640000" calcext:value-type="float">
            <text:p>8640000</text:p>
          </table:table-cell>
          <table:table-cell table:formula="of:=[.B1226]/[.C1226]" office:value-type="float" office:value="0.000992476851851852" calcext:value-type="float">
            <text:p>0,00099247685185185200</text:p>
          </table:table-cell>
          <table:table-cell table:formula="of:=[.D1227]-[.D122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B1226]+7" office:value-type="float" office:value="8582" calcext:value-type="float">
            <text:p>8582</text:p>
          </table:table-cell>
          <table:table-cell office:value-type="float" office:value="8640000" calcext:value-type="float">
            <text:p>8640000</text:p>
          </table:table-cell>
          <table:table-cell table:formula="of:=[.B1227]/[.C1227]" office:value-type="float" office:value="0.000993287037037037" calcext:value-type="float">
            <text:p>0,00099328703703703700</text:p>
          </table:table-cell>
          <table:table-cell table:formula="of:=[.D1228]-[.D122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B1227]+7" office:value-type="float" office:value="8589" calcext:value-type="float">
            <text:p>8589</text:p>
          </table:table-cell>
          <table:table-cell office:value-type="float" office:value="8640000" calcext:value-type="float">
            <text:p>8640000</text:p>
          </table:table-cell>
          <table:table-cell table:formula="of:=[.B1228]/[.C1228]" office:value-type="float" office:value="0.000994097222222222" calcext:value-type="float">
            <text:p>0,00099409722222222200</text:p>
          </table:table-cell>
          <table:table-cell table:formula="of:=[.D1229]-[.D122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B1228]+7" office:value-type="float" office:value="8596" calcext:value-type="float">
            <text:p>8596</text:p>
          </table:table-cell>
          <table:table-cell office:value-type="float" office:value="8640000" calcext:value-type="float">
            <text:p>8640000</text:p>
          </table:table-cell>
          <table:table-cell table:formula="of:=[.B1229]/[.C1229]" office:value-type="float" office:value="0.000994907407407408" calcext:value-type="float">
            <text:p>0,00099490740740740800</text:p>
          </table:table-cell>
          <table:table-cell table:formula="of:=[.D1230]-[.D122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B1229]+7" office:value-type="float" office:value="8603" calcext:value-type="float">
            <text:p>8603</text:p>
          </table:table-cell>
          <table:table-cell office:value-type="float" office:value="8640000" calcext:value-type="float">
            <text:p>8640000</text:p>
          </table:table-cell>
          <table:table-cell table:formula="of:=[.B1230]/[.C1230]" office:value-type="float" office:value="0.000995717592592593" calcext:value-type="float">
            <text:p>0,00099571759259259300</text:p>
          </table:table-cell>
          <table:table-cell table:formula="of:=[.D1231]-[.D123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B1230]+7" office:value-type="float" office:value="8610" calcext:value-type="float">
            <text:p>8610</text:p>
          </table:table-cell>
          <table:table-cell office:value-type="float" office:value="8640000" calcext:value-type="float">
            <text:p>8640000</text:p>
          </table:table-cell>
          <table:table-cell table:formula="of:=[.B1231]/[.C1231]" office:value-type="float" office:value="0.000996527777777778" calcext:value-type="float">
            <text:p>0,00099652777777777800</text:p>
          </table:table-cell>
          <table:table-cell table:formula="of:=[.D1232]-[.D123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B1231]+7" office:value-type="float" office:value="8617" calcext:value-type="float">
            <text:p>8617</text:p>
          </table:table-cell>
          <table:table-cell office:value-type="float" office:value="8640000" calcext:value-type="float">
            <text:p>8640000</text:p>
          </table:table-cell>
          <table:table-cell table:formula="of:=[.B1232]/[.C1232]" office:value-type="float" office:value="0.000997337962962963" calcext:value-type="float">
            <text:p>0,00099733796296296300</text:p>
          </table:table-cell>
          <table:table-cell table:formula="of:=[.D1233]-[.D123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B1232]+7" office:value-type="float" office:value="8624" calcext:value-type="float">
            <text:p>8624</text:p>
          </table:table-cell>
          <table:table-cell office:value-type="float" office:value="8640000" calcext:value-type="float">
            <text:p>8640000</text:p>
          </table:table-cell>
          <table:table-cell table:formula="of:=[.B1233]/[.C1233]" office:value-type="float" office:value="0.000998148148148148" calcext:value-type="float">
            <text:p>0,00099814814814814800</text:p>
          </table:table-cell>
          <table:table-cell table:formula="of:=[.D1234]-[.D123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B1233]+7" office:value-type="float" office:value="8631" calcext:value-type="float">
            <text:p>8631</text:p>
          </table:table-cell>
          <table:table-cell office:value-type="float" office:value="8640000" calcext:value-type="float">
            <text:p>8640000</text:p>
          </table:table-cell>
          <table:table-cell table:formula="of:=[.B1234]/[.C1234]" office:value-type="float" office:value="0.000998958333333333" calcext:value-type="float">
            <text:p>0,00099895833333333300</text:p>
          </table:table-cell>
          <table:table-cell table:formula="of:=[.D1235]-[.D123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B1234]+7" office:value-type="float" office:value="8638" calcext:value-type="float">
            <text:p>8638</text:p>
          </table:table-cell>
          <table:table-cell office:value-type="float" office:value="8640000" calcext:value-type="float">
            <text:p>8640000</text:p>
          </table:table-cell>
          <table:table-cell table:formula="of:=[.B1235]/[.C1235]" office:value-type="float" office:value="0.000999768518518519" calcext:value-type="float">
            <text:p>0,00099976851851851900</text:p>
          </table:table-cell>
          <table:table-cell table:formula="of:=[.D1236]-[.D123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B1235]+7" office:value-type="float" office:value="8645" calcext:value-type="float">
            <text:p>8645</text:p>
          </table:table-cell>
          <table:table-cell office:value-type="float" office:value="8640000" calcext:value-type="float">
            <text:p>8640000</text:p>
          </table:table-cell>
          <table:table-cell table:formula="of:=[.B1236]/[.C1236]" office:value-type="float" office:value="0.0010005787037037" calcext:value-type="float">
            <text:p>0,00100057870370370000</text:p>
          </table:table-cell>
          <table:table-cell table:formula="of:=[.D1237]-[.D123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B1236]+7" office:value-type="float" office:value="8652" calcext:value-type="float">
            <text:p>8652</text:p>
          </table:table-cell>
          <table:table-cell office:value-type="float" office:value="8640000" calcext:value-type="float">
            <text:p>8640000</text:p>
          </table:table-cell>
          <table:table-cell table:formula="of:=[.B1237]/[.C1237]" office:value-type="float" office:value="0.00100138888888889" calcext:value-type="float">
            <text:p>0,00100138888888889000</text:p>
          </table:table-cell>
          <table:table-cell table:formula="of:=[.D1238]-[.D123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B1237]+7" office:value-type="float" office:value="8659" calcext:value-type="float">
            <text:p>8659</text:p>
          </table:table-cell>
          <table:table-cell office:value-type="float" office:value="8640000" calcext:value-type="float">
            <text:p>8640000</text:p>
          </table:table-cell>
          <table:table-cell table:formula="of:=[.B1238]/[.C1238]" office:value-type="float" office:value="0.00100219907407407" calcext:value-type="float">
            <text:p>0,00100219907407407000</text:p>
          </table:table-cell>
          <table:table-cell table:formula="of:=[.D1239]-[.D123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B1238]+7" office:value-type="float" office:value="8666" calcext:value-type="float">
            <text:p>8666</text:p>
          </table:table-cell>
          <table:table-cell office:value-type="float" office:value="8640000" calcext:value-type="float">
            <text:p>8640000</text:p>
          </table:table-cell>
          <table:table-cell table:formula="of:=[.B1239]/[.C1239]" office:value-type="float" office:value="0.00100300925925926" calcext:value-type="float">
            <text:p>0,00100300925925926000</text:p>
          </table:table-cell>
          <table:table-cell table:formula="of:=[.D1240]-[.D123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B1239]+7" office:value-type="float" office:value="8673" calcext:value-type="float">
            <text:p>8673</text:p>
          </table:table-cell>
          <table:table-cell office:value-type="float" office:value="8640000" calcext:value-type="float">
            <text:p>8640000</text:p>
          </table:table-cell>
          <table:table-cell table:formula="of:=[.B1240]/[.C1240]" office:value-type="float" office:value="0.00100381944444444" calcext:value-type="float">
            <text:p>0,00100381944444444000</text:p>
          </table:table-cell>
          <table:table-cell table:formula="of:=[.D1241]-[.D124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B1240]+7" office:value-type="float" office:value="8680" calcext:value-type="float">
            <text:p>8680</text:p>
          </table:table-cell>
          <table:table-cell office:value-type="float" office:value="8640000" calcext:value-type="float">
            <text:p>8640000</text:p>
          </table:table-cell>
          <table:table-cell table:formula="of:=[.B1241]/[.C1241]" office:value-type="float" office:value="0.00100462962962963" calcext:value-type="float">
            <text:p>0,00100462962962963000</text:p>
          </table:table-cell>
          <table:table-cell table:formula="of:=[.D1242]-[.D124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B1241]+7" office:value-type="float" office:value="8687" calcext:value-type="float">
            <text:p>8687</text:p>
          </table:table-cell>
          <table:table-cell office:value-type="float" office:value="8640000" calcext:value-type="float">
            <text:p>8640000</text:p>
          </table:table-cell>
          <table:table-cell table:formula="of:=[.B1242]/[.C1242]" office:value-type="float" office:value="0.00100543981481482" calcext:value-type="float">
            <text:p>0,00100543981481482000</text:p>
          </table:table-cell>
          <table:table-cell table:formula="of:=[.D1243]-[.D124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B1242]+7" office:value-type="float" office:value="8694" calcext:value-type="float">
            <text:p>8694</text:p>
          </table:table-cell>
          <table:table-cell office:value-type="float" office:value="8640000" calcext:value-type="float">
            <text:p>8640000</text:p>
          </table:table-cell>
          <table:table-cell table:formula="of:=[.B1243]/[.C1243]" office:value-type="float" office:value="0.00100625" calcext:value-type="float">
            <text:p>0,00100625000000000000</text:p>
          </table:table-cell>
          <table:table-cell table:formula="of:=[.D1244]-[.D124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B1243]+7" office:value-type="float" office:value="8701" calcext:value-type="float">
            <text:p>8701</text:p>
          </table:table-cell>
          <table:table-cell office:value-type="float" office:value="8640000" calcext:value-type="float">
            <text:p>8640000</text:p>
          </table:table-cell>
          <table:table-cell table:formula="of:=[.B1244]/[.C1244]" office:value-type="float" office:value="0.00100706018518519" calcext:value-type="float">
            <text:p>0,00100706018518519000</text:p>
          </table:table-cell>
          <table:table-cell table:formula="of:=[.D1245]-[.D124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B1244]+7" office:value-type="float" office:value="8708" calcext:value-type="float">
            <text:p>8708</text:p>
          </table:table-cell>
          <table:table-cell office:value-type="float" office:value="8640000" calcext:value-type="float">
            <text:p>8640000</text:p>
          </table:table-cell>
          <table:table-cell table:formula="of:=[.B1245]/[.C1245]" office:value-type="float" office:value="0.00100787037037037" calcext:value-type="float">
            <text:p>0,00100787037037037000</text:p>
          </table:table-cell>
          <table:table-cell table:formula="of:=[.D1246]-[.D124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B1245]+7" office:value-type="float" office:value="8715" calcext:value-type="float">
            <text:p>8715</text:p>
          </table:table-cell>
          <table:table-cell office:value-type="float" office:value="8640000" calcext:value-type="float">
            <text:p>8640000</text:p>
          </table:table-cell>
          <table:table-cell table:formula="of:=[.B1246]/[.C1246]" office:value-type="float" office:value="0.00100868055555556" calcext:value-type="float">
            <text:p>0,00100868055555556000</text:p>
          </table:table-cell>
          <table:table-cell table:formula="of:=[.D1247]-[.D124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B1246]+7" office:value-type="float" office:value="8722" calcext:value-type="float">
            <text:p>8722</text:p>
          </table:table-cell>
          <table:table-cell office:value-type="float" office:value="8640000" calcext:value-type="float">
            <text:p>8640000</text:p>
          </table:table-cell>
          <table:table-cell table:formula="of:=[.B1247]/[.C1247]" office:value-type="float" office:value="0.00100949074074074" calcext:value-type="float">
            <text:p>0,00100949074074074000</text:p>
          </table:table-cell>
          <table:table-cell table:formula="of:=[.D1248]-[.D124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B1247]+7" office:value-type="float" office:value="8729" calcext:value-type="float">
            <text:p>8729</text:p>
          </table:table-cell>
          <table:table-cell office:value-type="float" office:value="8640000" calcext:value-type="float">
            <text:p>8640000</text:p>
          </table:table-cell>
          <table:table-cell table:formula="of:=[.B1248]/[.C1248]" office:value-type="float" office:value="0.00101030092592593" calcext:value-type="float">
            <text:p>0,00101030092592593000</text:p>
          </table:table-cell>
          <table:table-cell table:formula="of:=[.D1249]-[.D124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B1248]+7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1249]/[.C1249]" office:value-type="float" office:value="0.00101111111111111" calcext:value-type="float">
            <text:p>0,00101111111111111000</text:p>
          </table:table-cell>
          <table:table-cell table:formula="of:=[.D1250]-[.D124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B1249]+7" office:value-type="float" office:value="8743" calcext:value-type="float">
            <text:p>8743</text:p>
          </table:table-cell>
          <table:table-cell office:value-type="float" office:value="8640000" calcext:value-type="float">
            <text:p>8640000</text:p>
          </table:table-cell>
          <table:table-cell table:formula="of:=[.B1250]/[.C1250]" office:value-type="float" office:value="0.0010119212962963" calcext:value-type="float">
            <text:p>0,00101192129629630000</text:p>
          </table:table-cell>
          <table:table-cell table:formula="of:=[.D1251]-[.D125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1250]+7" office:value-type="float" office:value="8750" calcext:value-type="float">
            <text:p>8750</text:p>
          </table:table-cell>
          <table:table-cell office:value-type="float" office:value="8640000" calcext:value-type="float">
            <text:p>8640000</text:p>
          </table:table-cell>
          <table:table-cell table:formula="of:=[.B1251]/[.C1251]" office:value-type="float" office:value="0.00101273148148148" calcext:value-type="float">
            <text:p>0,00101273148148148000</text:p>
          </table:table-cell>
          <table:table-cell table:formula="of:=[.D1252]-[.D125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B1251]+7" office:value-type="float" office:value="8757" calcext:value-type="float">
            <text:p>8757</text:p>
          </table:table-cell>
          <table:table-cell office:value-type="float" office:value="8640000" calcext:value-type="float">
            <text:p>8640000</text:p>
          </table:table-cell>
          <table:table-cell table:formula="of:=[.B1252]/[.C1252]" office:value-type="float" office:value="0.00101354166666667" calcext:value-type="float">
            <text:p>0,00101354166666667000</text:p>
          </table:table-cell>
          <table:table-cell table:formula="of:=[.D1253]-[.D125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B1252]+7" office:value-type="float" office:value="8764" calcext:value-type="float">
            <text:p>8764</text:p>
          </table:table-cell>
          <table:table-cell office:value-type="float" office:value="8640000" calcext:value-type="float">
            <text:p>8640000</text:p>
          </table:table-cell>
          <table:table-cell table:formula="of:=[.B1253]/[.C1253]" office:value-type="float" office:value="0.00101435185185185" calcext:value-type="float">
            <text:p>0,00101435185185185000</text:p>
          </table:table-cell>
          <table:table-cell table:formula="of:=[.D1254]-[.D125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B1253]+7" office:value-type="float" office:value="8771" calcext:value-type="float">
            <text:p>8771</text:p>
          </table:table-cell>
          <table:table-cell office:value-type="float" office:value="8640000" calcext:value-type="float">
            <text:p>8640000</text:p>
          </table:table-cell>
          <table:table-cell table:formula="of:=[.B1254]/[.C1254]" office:value-type="float" office:value="0.00101516203703704" calcext:value-type="float">
            <text:p>0,00101516203703704000</text:p>
          </table:table-cell>
          <table:table-cell table:formula="of:=[.D1255]-[.D125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B1254]+7" office:value-type="float" office:value="8778" calcext:value-type="float">
            <text:p>8778</text:p>
          </table:table-cell>
          <table:table-cell office:value-type="float" office:value="8640000" calcext:value-type="float">
            <text:p>8640000</text:p>
          </table:table-cell>
          <table:table-cell table:formula="of:=[.B1255]/[.C1255]" office:value-type="float" office:value="0.00101597222222222" calcext:value-type="float">
            <text:p>0,00101597222222222000</text:p>
          </table:table-cell>
          <table:table-cell table:formula="of:=[.D1256]-[.D125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B1255]+7" office:value-type="float" office:value="8785" calcext:value-type="float">
            <text:p>8785</text:p>
          </table:table-cell>
          <table:table-cell office:value-type="float" office:value="8640000" calcext:value-type="float">
            <text:p>8640000</text:p>
          </table:table-cell>
          <table:table-cell table:formula="of:=[.B1256]/[.C1256]" office:value-type="float" office:value="0.00101678240740741" calcext:value-type="float">
            <text:p>0,00101678240740741000</text:p>
          </table:table-cell>
          <table:table-cell table:formula="of:=[.D1257]-[.D125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B1256]+7" office:value-type="float" office:value="8792" calcext:value-type="float">
            <text:p>8792</text:p>
          </table:table-cell>
          <table:table-cell office:value-type="float" office:value="8640000" calcext:value-type="float">
            <text:p>8640000</text:p>
          </table:table-cell>
          <table:table-cell table:formula="of:=[.B1257]/[.C1257]" office:value-type="float" office:value="0.00101759259259259" calcext:value-type="float">
            <text:p>0,00101759259259259000</text:p>
          </table:table-cell>
          <table:table-cell table:formula="of:=[.D1258]-[.D125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B1257]+7" office:value-type="float" office:value="8799" calcext:value-type="float">
            <text:p>8799</text:p>
          </table:table-cell>
          <table:table-cell office:value-type="float" office:value="8640000" calcext:value-type="float">
            <text:p>8640000</text:p>
          </table:table-cell>
          <table:table-cell table:formula="of:=[.B1258]/[.C1258]" office:value-type="float" office:value="0.00101840277777778" calcext:value-type="float">
            <text:p>0,00101840277777778000</text:p>
          </table:table-cell>
          <table:table-cell table:formula="of:=[.D1259]-[.D125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B1258]+7" office:value-type="float" office:value="8806" calcext:value-type="float">
            <text:p>8806</text:p>
          </table:table-cell>
          <table:table-cell office:value-type="float" office:value="8640000" calcext:value-type="float">
            <text:p>8640000</text:p>
          </table:table-cell>
          <table:table-cell table:formula="of:=[.B1259]/[.C1259]" office:value-type="float" office:value="0.00101921296296296" calcext:value-type="float">
            <text:p>0,00101921296296296000</text:p>
          </table:table-cell>
          <table:table-cell table:formula="of:=[.D1260]-[.D125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B1259]+7" office:value-type="float" office:value="8813" calcext:value-type="float">
            <text:p>8813</text:p>
          </table:table-cell>
          <table:table-cell office:value-type="float" office:value="8640000" calcext:value-type="float">
            <text:p>8640000</text:p>
          </table:table-cell>
          <table:table-cell table:formula="of:=[.B1260]/[.C1260]" office:value-type="float" office:value="0.00102002314814815" calcext:value-type="float">
            <text:p>0,00102002314814815000</text:p>
          </table:table-cell>
          <table:table-cell table:formula="of:=[.D1261]-[.D126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B1260]+7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1261]/[.C1261]" office:value-type="float" office:value="0.00102083333333333" calcext:value-type="float">
            <text:p>0,00102083333333333000</text:p>
          </table:table-cell>
          <table:table-cell table:formula="of:=[.D1262]-[.D126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B1261]+7" office:value-type="float" office:value="8827" calcext:value-type="float">
            <text:p>8827</text:p>
          </table:table-cell>
          <table:table-cell office:value-type="float" office:value="8640000" calcext:value-type="float">
            <text:p>8640000</text:p>
          </table:table-cell>
          <table:table-cell table:formula="of:=[.B1262]/[.C1262]" office:value-type="float" office:value="0.00102164351851852" calcext:value-type="float">
            <text:p>0,00102164351851852000</text:p>
          </table:table-cell>
          <table:table-cell table:formula="of:=[.D1263]-[.D126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B1262]+7" office:value-type="float" office:value="8834" calcext:value-type="float">
            <text:p>8834</text:p>
          </table:table-cell>
          <table:table-cell office:value-type="float" office:value="8640000" calcext:value-type="float">
            <text:p>8640000</text:p>
          </table:table-cell>
          <table:table-cell table:formula="of:=[.B1263]/[.C1263]" office:value-type="float" office:value="0.0010224537037037" calcext:value-type="float">
            <text:p>0,00102245370370370000</text:p>
          </table:table-cell>
          <table:table-cell table:formula="of:=[.D1264]-[.D126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B1263]+7" office:value-type="float" office:value="8841" calcext:value-type="float">
            <text:p>8841</text:p>
          </table:table-cell>
          <table:table-cell office:value-type="float" office:value="8640000" calcext:value-type="float">
            <text:p>8640000</text:p>
          </table:table-cell>
          <table:table-cell table:formula="of:=[.B1264]/[.C1264]" office:value-type="float" office:value="0.00102326388888889" calcext:value-type="float">
            <text:p>0,00102326388888889000</text:p>
          </table:table-cell>
          <table:table-cell table:formula="of:=[.D1265]-[.D126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B1264]+7" office:value-type="float" office:value="8848" calcext:value-type="float">
            <text:p>8848</text:p>
          </table:table-cell>
          <table:table-cell office:value-type="float" office:value="8640000" calcext:value-type="float">
            <text:p>8640000</text:p>
          </table:table-cell>
          <table:table-cell table:formula="of:=[.B1265]/[.C1265]" office:value-type="float" office:value="0.00102407407407407" calcext:value-type="float">
            <text:p>0,00102407407407407000</text:p>
          </table:table-cell>
          <table:table-cell table:formula="of:=[.D1266]-[.D126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B1265]+7" office:value-type="float" office:value="8855" calcext:value-type="float">
            <text:p>8855</text:p>
          </table:table-cell>
          <table:table-cell office:value-type="float" office:value="8640000" calcext:value-type="float">
            <text:p>8640000</text:p>
          </table:table-cell>
          <table:table-cell table:formula="of:=[.B1266]/[.C1266]" office:value-type="float" office:value="0.00102488425925926" calcext:value-type="float">
            <text:p>0,00102488425925926000</text:p>
          </table:table-cell>
          <table:table-cell table:formula="of:=[.D1267]-[.D126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B1266]+7" office:value-type="float" office:value="8862" calcext:value-type="float">
            <text:p>8862</text:p>
          </table:table-cell>
          <table:table-cell office:value-type="float" office:value="8640000" calcext:value-type="float">
            <text:p>8640000</text:p>
          </table:table-cell>
          <table:table-cell table:formula="of:=[.B1267]/[.C1267]" office:value-type="float" office:value="0.00102569444444444" calcext:value-type="float">
            <text:p>0,00102569444444444000</text:p>
          </table:table-cell>
          <table:table-cell table:formula="of:=[.D1268]-[.D126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B1267]+7" office:value-type="float" office:value="8869" calcext:value-type="float">
            <text:p>8869</text:p>
          </table:table-cell>
          <table:table-cell office:value-type="float" office:value="8640000" calcext:value-type="float">
            <text:p>8640000</text:p>
          </table:table-cell>
          <table:table-cell table:formula="of:=[.B1268]/[.C1268]" office:value-type="float" office:value="0.00102650462962963" calcext:value-type="float">
            <text:p>0,00102650462962963000</text:p>
          </table:table-cell>
          <table:table-cell table:formula="of:=[.D1269]-[.D126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B1268]+7" office:value-type="float" office:value="8876" calcext:value-type="float">
            <text:p>8876</text:p>
          </table:table-cell>
          <table:table-cell office:value-type="float" office:value="8640000" calcext:value-type="float">
            <text:p>8640000</text:p>
          </table:table-cell>
          <table:table-cell table:formula="of:=[.B1269]/[.C1269]" office:value-type="float" office:value="0.00102731481481481" calcext:value-type="float">
            <text:p>0,00102731481481481000</text:p>
          </table:table-cell>
          <table:table-cell table:formula="of:=[.D1270]-[.D126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B1269]+7" office:value-type="float" office:value="8883" calcext:value-type="float">
            <text:p>8883</text:p>
          </table:table-cell>
          <table:table-cell office:value-type="float" office:value="8640000" calcext:value-type="float">
            <text:p>8640000</text:p>
          </table:table-cell>
          <table:table-cell table:formula="of:=[.B1270]/[.C1270]" office:value-type="float" office:value="0.001028125" calcext:value-type="float">
            <text:p>0,00102812500000000000</text:p>
          </table:table-cell>
          <table:table-cell table:formula="of:=[.D1271]-[.D127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B1270]+7" office:value-type="float" office:value="8890" calcext:value-type="float">
            <text:p>8890</text:p>
          </table:table-cell>
          <table:table-cell office:value-type="float" office:value="8640000" calcext:value-type="float">
            <text:p>8640000</text:p>
          </table:table-cell>
          <table:table-cell table:formula="of:=[.B1271]/[.C1271]" office:value-type="float" office:value="0.00102893518518519" calcext:value-type="float">
            <text:p>0,00102893518518519000</text:p>
          </table:table-cell>
          <table:table-cell table:formula="of:=[.D1272]-[.D127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B1271]+7" office:value-type="float" office:value="8897" calcext:value-type="float">
            <text:p>8897</text:p>
          </table:table-cell>
          <table:table-cell office:value-type="float" office:value="8640000" calcext:value-type="float">
            <text:p>8640000</text:p>
          </table:table-cell>
          <table:table-cell table:formula="of:=[.B1272]/[.C1272]" office:value-type="float" office:value="0.00102974537037037" calcext:value-type="float">
            <text:p>0,00102974537037037000</text:p>
          </table:table-cell>
          <table:table-cell table:formula="of:=[.D1273]-[.D127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B1272]+7" office:value-type="float" office:value="8904" calcext:value-type="float">
            <text:p>8904</text:p>
          </table:table-cell>
          <table:table-cell office:value-type="float" office:value="8640000" calcext:value-type="float">
            <text:p>8640000</text:p>
          </table:table-cell>
          <table:table-cell table:formula="of:=[.B1273]/[.C1273]" office:value-type="float" office:value="0.00103055555555556" calcext:value-type="float">
            <text:p>0,00103055555555556000</text:p>
          </table:table-cell>
          <table:table-cell table:formula="of:=[.D1274]-[.D127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B1273]+7" office:value-type="float" office:value="8911" calcext:value-type="float">
            <text:p>8911</text:p>
          </table:table-cell>
          <table:table-cell office:value-type="float" office:value="8640000" calcext:value-type="float">
            <text:p>8640000</text:p>
          </table:table-cell>
          <table:table-cell table:formula="of:=[.B1274]/[.C1274]" office:value-type="float" office:value="0.00103136574074074" calcext:value-type="float">
            <text:p>0,00103136574074074000</text:p>
          </table:table-cell>
          <table:table-cell table:formula="of:=[.D1275]-[.D127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B1274]+7" office:value-type="float" office:value="8918" calcext:value-type="float">
            <text:p>8918</text:p>
          </table:table-cell>
          <table:table-cell office:value-type="float" office:value="8640000" calcext:value-type="float">
            <text:p>8640000</text:p>
          </table:table-cell>
          <table:table-cell table:formula="of:=[.B1275]/[.C1275]" office:value-type="float" office:value="0.00103217592592593" calcext:value-type="float">
            <text:p>0,00103217592592593000</text:p>
          </table:table-cell>
          <table:table-cell table:formula="of:=[.D1276]-[.D127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B1275]+7" office:value-type="float" office:value="8925" calcext:value-type="float">
            <text:p>8925</text:p>
          </table:table-cell>
          <table:table-cell office:value-type="float" office:value="8640000" calcext:value-type="float">
            <text:p>8640000</text:p>
          </table:table-cell>
          <table:table-cell table:formula="of:=[.B1276]/[.C1276]" office:value-type="float" office:value="0.00103298611111111" calcext:value-type="float">
            <text:p>0,00103298611111111000</text:p>
          </table:table-cell>
          <table:table-cell table:formula="of:=[.D1277]-[.D127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B1276]+7" office:value-type="float" office:value="8932" calcext:value-type="float">
            <text:p>8932</text:p>
          </table:table-cell>
          <table:table-cell office:value-type="float" office:value="8640000" calcext:value-type="float">
            <text:p>8640000</text:p>
          </table:table-cell>
          <table:table-cell table:formula="of:=[.B1277]/[.C1277]" office:value-type="float" office:value="0.0010337962962963" calcext:value-type="float">
            <text:p>0,00103379629629630000</text:p>
          </table:table-cell>
          <table:table-cell table:formula="of:=[.D1278]-[.D127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B1277]+7" office:value-type="float" office:value="8939" calcext:value-type="float">
            <text:p>8939</text:p>
          </table:table-cell>
          <table:table-cell office:value-type="float" office:value="8640000" calcext:value-type="float">
            <text:p>8640000</text:p>
          </table:table-cell>
          <table:table-cell table:formula="of:=[.B1278]/[.C1278]" office:value-type="float" office:value="0.00103460648148148" calcext:value-type="float">
            <text:p>0,00103460648148148000</text:p>
          </table:table-cell>
          <table:table-cell table:formula="of:=[.D1279]-[.D127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B1278]+7" office:value-type="float" office:value="8946" calcext:value-type="float">
            <text:p>8946</text:p>
          </table:table-cell>
          <table:table-cell office:value-type="float" office:value="8640000" calcext:value-type="float">
            <text:p>8640000</text:p>
          </table:table-cell>
          <table:table-cell table:formula="of:=[.B1279]/[.C1279]" office:value-type="float" office:value="0.00103541666666667" calcext:value-type="float">
            <text:p>0,00103541666666667000</text:p>
          </table:table-cell>
          <table:table-cell table:formula="of:=[.D1280]-[.D127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B1279]+7" office:value-type="float" office:value="8953" calcext:value-type="float">
            <text:p>8953</text:p>
          </table:table-cell>
          <table:table-cell office:value-type="float" office:value="8640000" calcext:value-type="float">
            <text:p>8640000</text:p>
          </table:table-cell>
          <table:table-cell table:formula="of:=[.B1280]/[.C1280]" office:value-type="float" office:value="0.00103622685185185" calcext:value-type="float">
            <text:p>0,00103622685185185000</text:p>
          </table:table-cell>
          <table:table-cell table:formula="of:=[.D1281]-[.D128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B1280]+7" office:value-type="float" office:value="8960" calcext:value-type="float">
            <text:p>8960</text:p>
          </table:table-cell>
          <table:table-cell office:value-type="float" office:value="8640000" calcext:value-type="float">
            <text:p>8640000</text:p>
          </table:table-cell>
          <table:table-cell table:formula="of:=[.B1281]/[.C1281]" office:value-type="float" office:value="0.00103703703703704" calcext:value-type="float">
            <text:p>0,00103703703703704000</text:p>
          </table:table-cell>
          <table:table-cell table:formula="of:=[.D1282]-[.D128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B1281]+7" office:value-type="float" office:value="8967" calcext:value-type="float">
            <text:p>8967</text:p>
          </table:table-cell>
          <table:table-cell office:value-type="float" office:value="8640000" calcext:value-type="float">
            <text:p>8640000</text:p>
          </table:table-cell>
          <table:table-cell table:formula="of:=[.B1282]/[.C1282]" office:value-type="float" office:value="0.00103784722222222" calcext:value-type="float">
            <text:p>0,00103784722222222000</text:p>
          </table:table-cell>
          <table:table-cell table:formula="of:=[.D1283]-[.D128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B1282]+7" office:value-type="float" office:value="8974" calcext:value-type="float">
            <text:p>8974</text:p>
          </table:table-cell>
          <table:table-cell office:value-type="float" office:value="8640000" calcext:value-type="float">
            <text:p>8640000</text:p>
          </table:table-cell>
          <table:table-cell table:formula="of:=[.B1283]/[.C1283]" office:value-type="float" office:value="0.00103865740740741" calcext:value-type="float">
            <text:p>0,00103865740740741000</text:p>
          </table:table-cell>
          <table:table-cell table:formula="of:=[.D1284]-[.D128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B1283]+7" office:value-type="float" office:value="8981" calcext:value-type="float">
            <text:p>8981</text:p>
          </table:table-cell>
          <table:table-cell office:value-type="float" office:value="8640000" calcext:value-type="float">
            <text:p>8640000</text:p>
          </table:table-cell>
          <table:table-cell table:formula="of:=[.B1284]/[.C1284]" office:value-type="float" office:value="0.00103946759259259" calcext:value-type="float">
            <text:p>0,00103946759259259000</text:p>
          </table:table-cell>
          <table:table-cell table:formula="of:=[.D1285]-[.D128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B1284]+7" office:value-type="float" office:value="8988" calcext:value-type="float">
            <text:p>8988</text:p>
          </table:table-cell>
          <table:table-cell office:value-type="float" office:value="8640000" calcext:value-type="float">
            <text:p>8640000</text:p>
          </table:table-cell>
          <table:table-cell table:formula="of:=[.B1285]/[.C1285]" office:value-type="float" office:value="0.00104027777777778" calcext:value-type="float">
            <text:p>0,00104027777777778000</text:p>
          </table:table-cell>
          <table:table-cell table:formula="of:=[.D1286]-[.D128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B1285]+7" office:value-type="float" office:value="8995" calcext:value-type="float">
            <text:p>8995</text:p>
          </table:table-cell>
          <table:table-cell office:value-type="float" office:value="8640000" calcext:value-type="float">
            <text:p>8640000</text:p>
          </table:table-cell>
          <table:table-cell table:formula="of:=[.B1286]/[.C1286]" office:value-type="float" office:value="0.00104108796296296" calcext:value-type="float">
            <text:p>0,00104108796296296000</text:p>
          </table:table-cell>
          <table:table-cell table:formula="of:=[.D1287]-[.D128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B1286]+7" office:value-type="float" office:value="9002" calcext:value-type="float">
            <text:p>9002</text:p>
          </table:table-cell>
          <table:table-cell office:value-type="float" office:value="8640000" calcext:value-type="float">
            <text:p>8640000</text:p>
          </table:table-cell>
          <table:table-cell table:formula="of:=[.B1287]/[.C1287]" office:value-type="float" office:value="0.00104189814814815" calcext:value-type="float">
            <text:p>0,00104189814814815000</text:p>
          </table:table-cell>
          <table:table-cell table:formula="of:=[.D1288]-[.D128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B1287]+7" office:value-type="float" office:value="9009" calcext:value-type="float">
            <text:p>9009</text:p>
          </table:table-cell>
          <table:table-cell office:value-type="float" office:value="8640000" calcext:value-type="float">
            <text:p>8640000</text:p>
          </table:table-cell>
          <table:table-cell table:formula="of:=[.B1288]/[.C1288]" office:value-type="float" office:value="0.00104270833333333" calcext:value-type="float">
            <text:p>0,00104270833333333000</text:p>
          </table:table-cell>
          <table:table-cell table:formula="of:=[.D1289]-[.D128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B1288]+7" office:value-type="float" office:value="9016" calcext:value-type="float">
            <text:p>9016</text:p>
          </table:table-cell>
          <table:table-cell office:value-type="float" office:value="8640000" calcext:value-type="float">
            <text:p>8640000</text:p>
          </table:table-cell>
          <table:table-cell table:formula="of:=[.B1289]/[.C1289]" office:value-type="float" office:value="0.00104351851851852" calcext:value-type="float">
            <text:p>0,00104351851851852000</text:p>
          </table:table-cell>
          <table:table-cell table:formula="of:=[.D1290]-[.D128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B1289]+7" office:value-type="float" office:value="9023" calcext:value-type="float">
            <text:p>9023</text:p>
          </table:table-cell>
          <table:table-cell office:value-type="float" office:value="8640000" calcext:value-type="float">
            <text:p>8640000</text:p>
          </table:table-cell>
          <table:table-cell table:formula="of:=[.B1290]/[.C1290]" office:value-type="float" office:value="0.0010443287037037" calcext:value-type="float">
            <text:p>0,00104432870370370000</text:p>
          </table:table-cell>
          <table:table-cell table:formula="of:=[.D1291]-[.D129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B1290]+7" office:value-type="float" office:value="9030" calcext:value-type="float">
            <text:p>9030</text:p>
          </table:table-cell>
          <table:table-cell office:value-type="float" office:value="8640000" calcext:value-type="float">
            <text:p>8640000</text:p>
          </table:table-cell>
          <table:table-cell table:formula="of:=[.B1291]/[.C1291]" office:value-type="float" office:value="0.00104513888888889" calcext:value-type="float">
            <text:p>0,00104513888888889000</text:p>
          </table:table-cell>
          <table:table-cell table:formula="of:=[.D1292]-[.D129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B1291]+7" office:value-type="float" office:value="9037" calcext:value-type="float">
            <text:p>9037</text:p>
          </table:table-cell>
          <table:table-cell office:value-type="float" office:value="8640000" calcext:value-type="float">
            <text:p>8640000</text:p>
          </table:table-cell>
          <table:table-cell table:formula="of:=[.B1292]/[.C1292]" office:value-type="float" office:value="0.00104594907407407" calcext:value-type="float">
            <text:p>0,00104594907407407000</text:p>
          </table:table-cell>
          <table:table-cell table:formula="of:=[.D1293]-[.D129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B1292]+7" office:value-type="float" office:value="9044" calcext:value-type="float">
            <text:p>9044</text:p>
          </table:table-cell>
          <table:table-cell office:value-type="float" office:value="8640000" calcext:value-type="float">
            <text:p>8640000</text:p>
          </table:table-cell>
          <table:table-cell table:formula="of:=[.B1293]/[.C1293]" office:value-type="float" office:value="0.00104675925925926" calcext:value-type="float">
            <text:p>0,00104675925925926000</text:p>
          </table:table-cell>
          <table:table-cell table:formula="of:=[.D1294]-[.D129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B1293]+7" office:value-type="float" office:value="9051" calcext:value-type="float">
            <text:p>9051</text:p>
          </table:table-cell>
          <table:table-cell office:value-type="float" office:value="8640000" calcext:value-type="float">
            <text:p>8640000</text:p>
          </table:table-cell>
          <table:table-cell table:formula="of:=[.B1294]/[.C1294]" office:value-type="float" office:value="0.00104756944444444" calcext:value-type="float">
            <text:p>0,00104756944444444000</text:p>
          </table:table-cell>
          <table:table-cell table:formula="of:=[.D1295]-[.D129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B1294]+7" office:value-type="float" office:value="9058" calcext:value-type="float">
            <text:p>9058</text:p>
          </table:table-cell>
          <table:table-cell office:value-type="float" office:value="8640000" calcext:value-type="float">
            <text:p>8640000</text:p>
          </table:table-cell>
          <table:table-cell table:formula="of:=[.B1295]/[.C1295]" office:value-type="float" office:value="0.00104837962962963" calcext:value-type="float">
            <text:p>0,00104837962962963000</text:p>
          </table:table-cell>
          <table:table-cell table:formula="of:=[.D1296]-[.D129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B1295]+7" office:value-type="float" office:value="9065" calcext:value-type="float">
            <text:p>9065</text:p>
          </table:table-cell>
          <table:table-cell office:value-type="float" office:value="8640000" calcext:value-type="float">
            <text:p>8640000</text:p>
          </table:table-cell>
          <table:table-cell table:formula="of:=[.B1296]/[.C1296]" office:value-type="float" office:value="0.00104918981481481" calcext:value-type="float">
            <text:p>0,00104918981481481000</text:p>
          </table:table-cell>
          <table:table-cell table:formula="of:=[.D1297]-[.D129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B1296]+7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1297]/[.C1297]" office:value-type="float" office:value="0.00105" calcext:value-type="float">
            <text:p>0,00105000000000000000</text:p>
          </table:table-cell>
          <table:table-cell table:formula="of:=[.D1298]-[.D129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B1297]+7" office:value-type="float" office:value="9079" calcext:value-type="float">
            <text:p>9079</text:p>
          </table:table-cell>
          <table:table-cell office:value-type="float" office:value="8640000" calcext:value-type="float">
            <text:p>8640000</text:p>
          </table:table-cell>
          <table:table-cell table:formula="of:=[.B1298]/[.C1298]" office:value-type="float" office:value="0.00105081018518519" calcext:value-type="float">
            <text:p>0,00105081018518519000</text:p>
          </table:table-cell>
          <table:table-cell table:formula="of:=[.D1299]-[.D129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B1298]+7" office:value-type="float" office:value="9086" calcext:value-type="float">
            <text:p>9086</text:p>
          </table:table-cell>
          <table:table-cell office:value-type="float" office:value="8640000" calcext:value-type="float">
            <text:p>8640000</text:p>
          </table:table-cell>
          <table:table-cell table:formula="of:=[.B1299]/[.C1299]" office:value-type="float" office:value="0.00105162037037037" calcext:value-type="float">
            <text:p>0,00105162037037037000</text:p>
          </table:table-cell>
          <table:table-cell table:formula="of:=[.D1300]-[.D129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B1299]+7" office:value-type="float" office:value="9093" calcext:value-type="float">
            <text:p>9093</text:p>
          </table:table-cell>
          <table:table-cell office:value-type="float" office:value="8640000" calcext:value-type="float">
            <text:p>8640000</text:p>
          </table:table-cell>
          <table:table-cell table:formula="of:=[.B1300]/[.C1300]" office:value-type="float" office:value="0.00105243055555556" calcext:value-type="float">
            <text:p>0,00105243055555556000</text:p>
          </table:table-cell>
          <table:table-cell table:formula="of:=[.D1301]-[.D130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B1300]+7" office:value-type="float" office:value="9100" calcext:value-type="float">
            <text:p>9100</text:p>
          </table:table-cell>
          <table:table-cell office:value-type="float" office:value="8640000" calcext:value-type="float">
            <text:p>8640000</text:p>
          </table:table-cell>
          <table:table-cell table:formula="of:=[.B1301]/[.C1301]" office:value-type="float" office:value="0.00105324074074074" calcext:value-type="float">
            <text:p>0,00105324074074074000</text:p>
          </table:table-cell>
          <table:table-cell table:formula="of:=[.D1302]-[.D130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B1301]+7" office:value-type="float" office:value="9107" calcext:value-type="float">
            <text:p>9107</text:p>
          </table:table-cell>
          <table:table-cell office:value-type="float" office:value="8640000" calcext:value-type="float">
            <text:p>8640000</text:p>
          </table:table-cell>
          <table:table-cell table:formula="of:=[.B1302]/[.C1302]" office:value-type="float" office:value="0.00105405092592593" calcext:value-type="float">
            <text:p>0,00105405092592593000</text:p>
          </table:table-cell>
          <table:table-cell table:formula="of:=[.D1303]-[.D130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B1302]+7" office:value-type="float" office:value="9114" calcext:value-type="float">
            <text:p>9114</text:p>
          </table:table-cell>
          <table:table-cell office:value-type="float" office:value="8640000" calcext:value-type="float">
            <text:p>8640000</text:p>
          </table:table-cell>
          <table:table-cell table:formula="of:=[.B1303]/[.C1303]" office:value-type="float" office:value="0.00105486111111111" calcext:value-type="float">
            <text:p>0,00105486111111111000</text:p>
          </table:table-cell>
          <table:table-cell table:formula="of:=[.D1304]-[.D130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B1303]+7" office:value-type="float" office:value="9121" calcext:value-type="float">
            <text:p>9121</text:p>
          </table:table-cell>
          <table:table-cell office:value-type="float" office:value="8640000" calcext:value-type="float">
            <text:p>8640000</text:p>
          </table:table-cell>
          <table:table-cell table:formula="of:=[.B1304]/[.C1304]" office:value-type="float" office:value="0.0010556712962963" calcext:value-type="float">
            <text:p>0,00105567129629630000</text:p>
          </table:table-cell>
          <table:table-cell table:formula="of:=[.D1305]-[.D130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B1304]+7" office:value-type="float" office:value="9128" calcext:value-type="float">
            <text:p>9128</text:p>
          </table:table-cell>
          <table:table-cell office:value-type="float" office:value="8640000" calcext:value-type="float">
            <text:p>8640000</text:p>
          </table:table-cell>
          <table:table-cell table:formula="of:=[.B1305]/[.C1305]" office:value-type="float" office:value="0.00105648148148148" calcext:value-type="float">
            <text:p>0,00105648148148148000</text:p>
          </table:table-cell>
          <table:table-cell table:formula="of:=[.D1306]-[.D130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B1305]+7" office:value-type="float" office:value="9135" calcext:value-type="float">
            <text:p>9135</text:p>
          </table:table-cell>
          <table:table-cell office:value-type="float" office:value="8640000" calcext:value-type="float">
            <text:p>8640000</text:p>
          </table:table-cell>
          <table:table-cell table:formula="of:=[.B1306]/[.C1306]" office:value-type="float" office:value="0.00105729166666667" calcext:value-type="float">
            <text:p>0,00105729166666667000</text:p>
          </table:table-cell>
          <table:table-cell table:formula="of:=[.D1307]-[.D130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B1306]+7" office:value-type="float" office:value="9142" calcext:value-type="float">
            <text:p>9142</text:p>
          </table:table-cell>
          <table:table-cell office:value-type="float" office:value="8640000" calcext:value-type="float">
            <text:p>8640000</text:p>
          </table:table-cell>
          <table:table-cell table:formula="of:=[.B1307]/[.C1307]" office:value-type="float" office:value="0.00105810185185185" calcext:value-type="float">
            <text:p>0,00105810185185185000</text:p>
          </table:table-cell>
          <table:table-cell table:formula="of:=[.D1308]-[.D130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B1307]+7" office:value-type="float" office:value="9149" calcext:value-type="float">
            <text:p>9149</text:p>
          </table:table-cell>
          <table:table-cell office:value-type="float" office:value="8640000" calcext:value-type="float">
            <text:p>8640000</text:p>
          </table:table-cell>
          <table:table-cell table:formula="of:=[.B1308]/[.C1308]" office:value-type="float" office:value="0.00105891203703704" calcext:value-type="float">
            <text:p>0,00105891203703704000</text:p>
          </table:table-cell>
          <table:table-cell table:formula="of:=[.D1309]-[.D130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B1308]+7" office:value-type="float" office:value="9156" calcext:value-type="float">
            <text:p>9156</text:p>
          </table:table-cell>
          <table:table-cell office:value-type="float" office:value="8640000" calcext:value-type="float">
            <text:p>8640000</text:p>
          </table:table-cell>
          <table:table-cell table:formula="of:=[.B1309]/[.C1309]" office:value-type="float" office:value="0.00105972222222222" calcext:value-type="float">
            <text:p>0,00105972222222222000</text:p>
          </table:table-cell>
          <table:table-cell table:formula="of:=[.D1310]-[.D130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B1309]+7" office:value-type="float" office:value="9163" calcext:value-type="float">
            <text:p>9163</text:p>
          </table:table-cell>
          <table:table-cell office:value-type="float" office:value="8640000" calcext:value-type="float">
            <text:p>8640000</text:p>
          </table:table-cell>
          <table:table-cell table:formula="of:=[.B1310]/[.C1310]" office:value-type="float" office:value="0.00106053240740741" calcext:value-type="float">
            <text:p>0,00106053240740741000</text:p>
          </table:table-cell>
          <table:table-cell table:formula="of:=[.D1311]-[.D131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B1310]+7" office:value-type="float" office:value="9170" calcext:value-type="float">
            <text:p>9170</text:p>
          </table:table-cell>
          <table:table-cell office:value-type="float" office:value="8640000" calcext:value-type="float">
            <text:p>8640000</text:p>
          </table:table-cell>
          <table:table-cell table:formula="of:=[.B1311]/[.C1311]" office:value-type="float" office:value="0.00106134259259259" calcext:value-type="float">
            <text:p>0,00106134259259259000</text:p>
          </table:table-cell>
          <table:table-cell table:formula="of:=[.D1312]-[.D131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B1311]+7" office:value-type="float" office:value="9177" calcext:value-type="float">
            <text:p>9177</text:p>
          </table:table-cell>
          <table:table-cell office:value-type="float" office:value="8640000" calcext:value-type="float">
            <text:p>8640000</text:p>
          </table:table-cell>
          <table:table-cell table:formula="of:=[.B1312]/[.C1312]" office:value-type="float" office:value="0.00106215277777778" calcext:value-type="float">
            <text:p>0,00106215277777778000</text:p>
          </table:table-cell>
          <table:table-cell table:formula="of:=[.D1313]-[.D131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B1312]+7" office:value-type="float" office:value="9184" calcext:value-type="float">
            <text:p>9184</text:p>
          </table:table-cell>
          <table:table-cell office:value-type="float" office:value="8640000" calcext:value-type="float">
            <text:p>8640000</text:p>
          </table:table-cell>
          <table:table-cell table:formula="of:=[.B1313]/[.C1313]" office:value-type="float" office:value="0.00106296296296296" calcext:value-type="float">
            <text:p>0,00106296296296296000</text:p>
          </table:table-cell>
          <table:table-cell table:formula="of:=[.D1314]-[.D131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B1313]+7" office:value-type="float" office:value="9191" calcext:value-type="float">
            <text:p>9191</text:p>
          </table:table-cell>
          <table:table-cell office:value-type="float" office:value="8640000" calcext:value-type="float">
            <text:p>8640000</text:p>
          </table:table-cell>
          <table:table-cell table:formula="of:=[.B1314]/[.C1314]" office:value-type="float" office:value="0.00106377314814815" calcext:value-type="float">
            <text:p>0,00106377314814815000</text:p>
          </table:table-cell>
          <table:table-cell table:formula="of:=[.D1315]-[.D131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B1314]+7" office:value-type="float" office:value="9198" calcext:value-type="float">
            <text:p>9198</text:p>
          </table:table-cell>
          <table:table-cell office:value-type="float" office:value="8640000" calcext:value-type="float">
            <text:p>8640000</text:p>
          </table:table-cell>
          <table:table-cell table:formula="of:=[.B1315]/[.C1315]" office:value-type="float" office:value="0.00106458333333333" calcext:value-type="float">
            <text:p>0,00106458333333333000</text:p>
          </table:table-cell>
          <table:table-cell table:formula="of:=[.D1316]-[.D131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B1315]+7" office:value-type="float" office:value="9205" calcext:value-type="float">
            <text:p>9205</text:p>
          </table:table-cell>
          <table:table-cell office:value-type="float" office:value="8640000" calcext:value-type="float">
            <text:p>8640000</text:p>
          </table:table-cell>
          <table:table-cell table:formula="of:=[.B1316]/[.C1316]" office:value-type="float" office:value="0.00106539351851852" calcext:value-type="float">
            <text:p>0,00106539351851852000</text:p>
          </table:table-cell>
          <table:table-cell table:formula="of:=[.D1317]-[.D131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B1316]+7" office:value-type="float" office:value="9212" calcext:value-type="float">
            <text:p>9212</text:p>
          </table:table-cell>
          <table:table-cell office:value-type="float" office:value="8640000" calcext:value-type="float">
            <text:p>8640000</text:p>
          </table:table-cell>
          <table:table-cell table:formula="of:=[.B1317]/[.C1317]" office:value-type="float" office:value="0.0010662037037037" calcext:value-type="float">
            <text:p>0,00106620370370370000</text:p>
          </table:table-cell>
          <table:table-cell table:formula="of:=[.D1318]-[.D131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B1317]+7" office:value-type="float" office:value="9219" calcext:value-type="float">
            <text:p>9219</text:p>
          </table:table-cell>
          <table:table-cell office:value-type="float" office:value="8640000" calcext:value-type="float">
            <text:p>8640000</text:p>
          </table:table-cell>
          <table:table-cell table:formula="of:=[.B1318]/[.C1318]" office:value-type="float" office:value="0.00106701388888889" calcext:value-type="float">
            <text:p>0,00106701388888889000</text:p>
          </table:table-cell>
          <table:table-cell table:formula="of:=[.D1319]-[.D131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B1318]+7" office:value-type="float" office:value="9226" calcext:value-type="float">
            <text:p>9226</text:p>
          </table:table-cell>
          <table:table-cell office:value-type="float" office:value="8640000" calcext:value-type="float">
            <text:p>8640000</text:p>
          </table:table-cell>
          <table:table-cell table:formula="of:=[.B1319]/[.C1319]" office:value-type="float" office:value="0.00106782407407407" calcext:value-type="float">
            <text:p>0,00106782407407407000</text:p>
          </table:table-cell>
          <table:table-cell table:formula="of:=[.D1320]-[.D131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B1319]+7" office:value-type="float" office:value="9233" calcext:value-type="float">
            <text:p>9233</text:p>
          </table:table-cell>
          <table:table-cell office:value-type="float" office:value="8640000" calcext:value-type="float">
            <text:p>8640000</text:p>
          </table:table-cell>
          <table:table-cell table:formula="of:=[.B1320]/[.C1320]" office:value-type="float" office:value="0.00106863425925926" calcext:value-type="float">
            <text:p>0,00106863425925926000</text:p>
          </table:table-cell>
          <table:table-cell table:formula="of:=[.D1321]-[.D132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B1320]+7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1321]/[.C1321]" office:value-type="float" office:value="0.00106944444444444" calcext:value-type="float">
            <text:p>0,00106944444444444000</text:p>
          </table:table-cell>
          <table:table-cell table:formula="of:=[.D1322]-[.D132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B1321]+7" office:value-type="float" office:value="9247" calcext:value-type="float">
            <text:p>9247</text:p>
          </table:table-cell>
          <table:table-cell office:value-type="float" office:value="8640000" calcext:value-type="float">
            <text:p>8640000</text:p>
          </table:table-cell>
          <table:table-cell table:formula="of:=[.B1322]/[.C1322]" office:value-type="float" office:value="0.00107025462962963" calcext:value-type="float">
            <text:p>0,00107025462962963000</text:p>
          </table:table-cell>
          <table:table-cell table:formula="of:=[.D1323]-[.D132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B1322]+7" office:value-type="float" office:value="9254" calcext:value-type="float">
            <text:p>9254</text:p>
          </table:table-cell>
          <table:table-cell office:value-type="float" office:value="8640000" calcext:value-type="float">
            <text:p>8640000</text:p>
          </table:table-cell>
          <table:table-cell table:formula="of:=[.B1323]/[.C1323]" office:value-type="float" office:value="0.00107106481481481" calcext:value-type="float">
            <text:p>0,00107106481481481000</text:p>
          </table:table-cell>
          <table:table-cell table:formula="of:=[.D1324]-[.D132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B1323]+7" office:value-type="float" office:value="9261" calcext:value-type="float">
            <text:p>9261</text:p>
          </table:table-cell>
          <table:table-cell office:value-type="float" office:value="8640000" calcext:value-type="float">
            <text:p>8640000</text:p>
          </table:table-cell>
          <table:table-cell table:formula="of:=[.B1324]/[.C1324]" office:value-type="float" office:value="0.001071875" calcext:value-type="float">
            <text:p>0,00107187500000000000</text:p>
          </table:table-cell>
          <table:table-cell table:formula="of:=[.D1325]-[.D132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B1324]+7" office:value-type="float" office:value="9268" calcext:value-type="float">
            <text:p>9268</text:p>
          </table:table-cell>
          <table:table-cell office:value-type="float" office:value="8640000" calcext:value-type="float">
            <text:p>8640000</text:p>
          </table:table-cell>
          <table:table-cell table:formula="of:=[.B1325]/[.C1325]" office:value-type="float" office:value="0.00107268518518519" calcext:value-type="float">
            <text:p>0,00107268518518519000</text:p>
          </table:table-cell>
          <table:table-cell table:formula="of:=[.D1326]-[.D132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B1325]+7" office:value-type="float" office:value="9275" calcext:value-type="float">
            <text:p>9275</text:p>
          </table:table-cell>
          <table:table-cell office:value-type="float" office:value="8640000" calcext:value-type="float">
            <text:p>8640000</text:p>
          </table:table-cell>
          <table:table-cell table:formula="of:=[.B1326]/[.C1326]" office:value-type="float" office:value="0.00107349537037037" calcext:value-type="float">
            <text:p>0,00107349537037037000</text:p>
          </table:table-cell>
          <table:table-cell table:formula="of:=[.D1327]-[.D132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B1326]+7" office:value-type="float" office:value="9282" calcext:value-type="float">
            <text:p>9282</text:p>
          </table:table-cell>
          <table:table-cell office:value-type="float" office:value="8640000" calcext:value-type="float">
            <text:p>8640000</text:p>
          </table:table-cell>
          <table:table-cell table:formula="of:=[.B1327]/[.C1327]" office:value-type="float" office:value="0.00107430555555556" calcext:value-type="float">
            <text:p>0,00107430555555556000</text:p>
          </table:table-cell>
          <table:table-cell table:formula="of:=[.D1328]-[.D132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B1327]+7" office:value-type="float" office:value="9289" calcext:value-type="float">
            <text:p>9289</text:p>
          </table:table-cell>
          <table:table-cell office:value-type="float" office:value="8640000" calcext:value-type="float">
            <text:p>8640000</text:p>
          </table:table-cell>
          <table:table-cell table:formula="of:=[.B1328]/[.C1328]" office:value-type="float" office:value="0.00107511574074074" calcext:value-type="float">
            <text:p>0,00107511574074074000</text:p>
          </table:table-cell>
          <table:table-cell table:formula="of:=[.D1329]-[.D132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B1328]+7" office:value-type="float" office:value="9296" calcext:value-type="float">
            <text:p>9296</text:p>
          </table:table-cell>
          <table:table-cell office:value-type="float" office:value="8640000" calcext:value-type="float">
            <text:p>8640000</text:p>
          </table:table-cell>
          <table:table-cell table:formula="of:=[.B1329]/[.C1329]" office:value-type="float" office:value="0.00107592592592593" calcext:value-type="float">
            <text:p>0,00107592592592593000</text:p>
          </table:table-cell>
          <table:table-cell table:formula="of:=[.D1330]-[.D132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B1329]+7" office:value-type="float" office:value="9303" calcext:value-type="float">
            <text:p>9303</text:p>
          </table:table-cell>
          <table:table-cell office:value-type="float" office:value="8640000" calcext:value-type="float">
            <text:p>8640000</text:p>
          </table:table-cell>
          <table:table-cell table:formula="of:=[.B1330]/[.C1330]" office:value-type="float" office:value="0.00107673611111111" calcext:value-type="float">
            <text:p>0,00107673611111111000</text:p>
          </table:table-cell>
          <table:table-cell table:formula="of:=[.D1331]-[.D133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B1330]+7" office:value-type="float" office:value="9310" calcext:value-type="float">
            <text:p>9310</text:p>
          </table:table-cell>
          <table:table-cell office:value-type="float" office:value="8640000" calcext:value-type="float">
            <text:p>8640000</text:p>
          </table:table-cell>
          <table:table-cell table:formula="of:=[.B1331]/[.C1331]" office:value-type="float" office:value="0.0010775462962963" calcext:value-type="float">
            <text:p>0,00107754629629630000</text:p>
          </table:table-cell>
          <table:table-cell table:formula="of:=[.D1332]-[.D133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B1331]+7" office:value-type="float" office:value="9317" calcext:value-type="float">
            <text:p>9317</text:p>
          </table:table-cell>
          <table:table-cell office:value-type="float" office:value="8640000" calcext:value-type="float">
            <text:p>8640000</text:p>
          </table:table-cell>
          <table:table-cell table:formula="of:=[.B1332]/[.C1332]" office:value-type="float" office:value="0.00107835648148148" calcext:value-type="float">
            <text:p>0,00107835648148148000</text:p>
          </table:table-cell>
          <table:table-cell table:formula="of:=[.D1333]-[.D133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B1332]+7" office:value-type="float" office:value="9324" calcext:value-type="float">
            <text:p>9324</text:p>
          </table:table-cell>
          <table:table-cell office:value-type="float" office:value="8640000" calcext:value-type="float">
            <text:p>8640000</text:p>
          </table:table-cell>
          <table:table-cell table:formula="of:=[.B1333]/[.C1333]" office:value-type="float" office:value="0.00107916666666667" calcext:value-type="float">
            <text:p>0,00107916666666667000</text:p>
          </table:table-cell>
          <table:table-cell table:formula="of:=[.D1334]-[.D133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B1333]+7" office:value-type="float" office:value="9331" calcext:value-type="float">
            <text:p>9331</text:p>
          </table:table-cell>
          <table:table-cell office:value-type="float" office:value="8640000" calcext:value-type="float">
            <text:p>8640000</text:p>
          </table:table-cell>
          <table:table-cell table:formula="of:=[.B1334]/[.C1334]" office:value-type="float" office:value="0.00107997685185185" calcext:value-type="float">
            <text:p>0,00107997685185185000</text:p>
          </table:table-cell>
          <table:table-cell table:formula="of:=[.D1335]-[.D133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B1334]+7" office:value-type="float" office:value="9338" calcext:value-type="float">
            <text:p>9338</text:p>
          </table:table-cell>
          <table:table-cell office:value-type="float" office:value="8640000" calcext:value-type="float">
            <text:p>8640000</text:p>
          </table:table-cell>
          <table:table-cell table:formula="of:=[.B1335]/[.C1335]" office:value-type="float" office:value="0.00108078703703704" calcext:value-type="float">
            <text:p>0,00108078703703704000</text:p>
          </table:table-cell>
          <table:table-cell table:formula="of:=[.D1336]-[.D133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B1335]+7" office:value-type="float" office:value="9345" calcext:value-type="float">
            <text:p>9345</text:p>
          </table:table-cell>
          <table:table-cell office:value-type="float" office:value="8640000" calcext:value-type="float">
            <text:p>8640000</text:p>
          </table:table-cell>
          <table:table-cell table:formula="of:=[.B1336]/[.C1336]" office:value-type="float" office:value="0.00108159722222222" calcext:value-type="float">
            <text:p>0,00108159722222222000</text:p>
          </table:table-cell>
          <table:table-cell table:formula="of:=[.D1337]-[.D133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B1336]+7" office:value-type="float" office:value="9352" calcext:value-type="float">
            <text:p>9352</text:p>
          </table:table-cell>
          <table:table-cell office:value-type="float" office:value="8640000" calcext:value-type="float">
            <text:p>8640000</text:p>
          </table:table-cell>
          <table:table-cell table:formula="of:=[.B1337]/[.C1337]" office:value-type="float" office:value="0.00108240740740741" calcext:value-type="float">
            <text:p>0,00108240740740741000</text:p>
          </table:table-cell>
          <table:table-cell table:formula="of:=[.D1338]-[.D133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B1337]+7" office:value-type="float" office:value="9359" calcext:value-type="float">
            <text:p>9359</text:p>
          </table:table-cell>
          <table:table-cell office:value-type="float" office:value="8640000" calcext:value-type="float">
            <text:p>8640000</text:p>
          </table:table-cell>
          <table:table-cell table:formula="of:=[.B1338]/[.C1338]" office:value-type="float" office:value="0.00108321759259259" calcext:value-type="float">
            <text:p>0,00108321759259259000</text:p>
          </table:table-cell>
          <table:table-cell table:formula="of:=[.D1339]-[.D133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B1338]+7" office:value-type="float" office:value="9366" calcext:value-type="float">
            <text:p>9366</text:p>
          </table:table-cell>
          <table:table-cell office:value-type="float" office:value="8640000" calcext:value-type="float">
            <text:p>8640000</text:p>
          </table:table-cell>
          <table:table-cell table:formula="of:=[.B1339]/[.C1339]" office:value-type="float" office:value="0.00108402777777778" calcext:value-type="float">
            <text:p>0,00108402777777778000</text:p>
          </table:table-cell>
          <table:table-cell table:formula="of:=[.D1340]-[.D133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B1339]+7" office:value-type="float" office:value="9373" calcext:value-type="float">
            <text:p>9373</text:p>
          </table:table-cell>
          <table:table-cell office:value-type="float" office:value="8640000" calcext:value-type="float">
            <text:p>8640000</text:p>
          </table:table-cell>
          <table:table-cell table:formula="of:=[.B1340]/[.C1340]" office:value-type="float" office:value="0.00108483796296296" calcext:value-type="float">
            <text:p>0,00108483796296296000</text:p>
          </table:table-cell>
          <table:table-cell table:formula="of:=[.D1341]-[.D134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B1340]+7" office:value-type="float" office:value="9380" calcext:value-type="float">
            <text:p>9380</text:p>
          </table:table-cell>
          <table:table-cell office:value-type="float" office:value="8640000" calcext:value-type="float">
            <text:p>8640000</text:p>
          </table:table-cell>
          <table:table-cell table:formula="of:=[.B1341]/[.C1341]" office:value-type="float" office:value="0.00108564814814815" calcext:value-type="float">
            <text:p>0,00108564814814815000</text:p>
          </table:table-cell>
          <table:table-cell table:formula="of:=[.D1342]-[.D134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B1341]+7" office:value-type="float" office:value="9387" calcext:value-type="float">
            <text:p>9387</text:p>
          </table:table-cell>
          <table:table-cell office:value-type="float" office:value="8640000" calcext:value-type="float">
            <text:p>8640000</text:p>
          </table:table-cell>
          <table:table-cell table:formula="of:=[.B1342]/[.C1342]" office:value-type="float" office:value="0.00108645833333333" calcext:value-type="float">
            <text:p>0,00108645833333333000</text:p>
          </table:table-cell>
          <table:table-cell table:formula="of:=[.D1343]-[.D134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B1342]+7" office:value-type="float" office:value="9394" calcext:value-type="float">
            <text:p>9394</text:p>
          </table:table-cell>
          <table:table-cell office:value-type="float" office:value="8640000" calcext:value-type="float">
            <text:p>8640000</text:p>
          </table:table-cell>
          <table:table-cell table:formula="of:=[.B1343]/[.C1343]" office:value-type="float" office:value="0.00108726851851852" calcext:value-type="float">
            <text:p>0,00108726851851852000</text:p>
          </table:table-cell>
          <table:table-cell table:formula="of:=[.D1344]-[.D134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B1343]+7" office:value-type="float" office:value="9401" calcext:value-type="float">
            <text:p>9401</text:p>
          </table:table-cell>
          <table:table-cell office:value-type="float" office:value="8640000" calcext:value-type="float">
            <text:p>8640000</text:p>
          </table:table-cell>
          <table:table-cell table:formula="of:=[.B1344]/[.C1344]" office:value-type="float" office:value="0.0010880787037037" calcext:value-type="float">
            <text:p>0,00108807870370370000</text:p>
          </table:table-cell>
          <table:table-cell table:formula="of:=[.D1345]-[.D134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B1344]+7" office:value-type="float" office:value="9408" calcext:value-type="float">
            <text:p>9408</text:p>
          </table:table-cell>
          <table:table-cell office:value-type="float" office:value="8640000" calcext:value-type="float">
            <text:p>8640000</text:p>
          </table:table-cell>
          <table:table-cell table:formula="of:=[.B1345]/[.C1345]" office:value-type="float" office:value="0.00108888888888889" calcext:value-type="float">
            <text:p>0,00108888888888889000</text:p>
          </table:table-cell>
          <table:table-cell table:formula="of:=[.D1346]-[.D134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B1345]+7" office:value-type="float" office:value="9415" calcext:value-type="float">
            <text:p>9415</text:p>
          </table:table-cell>
          <table:table-cell office:value-type="float" office:value="8640000" calcext:value-type="float">
            <text:p>8640000</text:p>
          </table:table-cell>
          <table:table-cell table:formula="of:=[.B1346]/[.C1346]" office:value-type="float" office:value="0.00108969907407407" calcext:value-type="float">
            <text:p>0,00108969907407407000</text:p>
          </table:table-cell>
          <table:table-cell table:formula="of:=[.D1347]-[.D134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B1346]+7" office:value-type="float" office:value="9422" calcext:value-type="float">
            <text:p>9422</text:p>
          </table:table-cell>
          <table:table-cell office:value-type="float" office:value="8640000" calcext:value-type="float">
            <text:p>8640000</text:p>
          </table:table-cell>
          <table:table-cell table:formula="of:=[.B1347]/[.C1347]" office:value-type="float" office:value="0.00109050925925926" calcext:value-type="float">
            <text:p>0,00109050925925926000</text:p>
          </table:table-cell>
          <table:table-cell table:formula="of:=[.D1348]-[.D134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B1347]+7" office:value-type="float" office:value="9429" calcext:value-type="float">
            <text:p>9429</text:p>
          </table:table-cell>
          <table:table-cell office:value-type="float" office:value="8640000" calcext:value-type="float">
            <text:p>8640000</text:p>
          </table:table-cell>
          <table:table-cell table:formula="of:=[.B1348]/[.C1348]" office:value-type="float" office:value="0.00109131944444444" calcext:value-type="float">
            <text:p>0,00109131944444444000</text:p>
          </table:table-cell>
          <table:table-cell table:formula="of:=[.D1349]-[.D134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B1348]+7" office:value-type="float" office:value="9436" calcext:value-type="float">
            <text:p>9436</text:p>
          </table:table-cell>
          <table:table-cell office:value-type="float" office:value="8640000" calcext:value-type="float">
            <text:p>8640000</text:p>
          </table:table-cell>
          <table:table-cell table:formula="of:=[.B1349]/[.C1349]" office:value-type="float" office:value="0.00109212962962963" calcext:value-type="float">
            <text:p>0,00109212962962963000</text:p>
          </table:table-cell>
          <table:table-cell table:formula="of:=[.D1350]-[.D134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B1349]+7" office:value-type="float" office:value="9443" calcext:value-type="float">
            <text:p>9443</text:p>
          </table:table-cell>
          <table:table-cell office:value-type="float" office:value="8640000" calcext:value-type="float">
            <text:p>8640000</text:p>
          </table:table-cell>
          <table:table-cell table:formula="of:=[.B1350]/[.C1350]" office:value-type="float" office:value="0.00109293981481481" calcext:value-type="float">
            <text:p>0,00109293981481481000</text:p>
          </table:table-cell>
          <table:table-cell table:formula="of:=[.D1351]-[.D135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B1350]+7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1351]/[.C1351]" office:value-type="float" office:value="0.00109375" calcext:value-type="float">
            <text:p>0,00109375000000000000</text:p>
          </table:table-cell>
          <table:table-cell table:formula="of:=[.D1352]-[.D135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B1351]+7" office:value-type="float" office:value="9457" calcext:value-type="float">
            <text:p>9457</text:p>
          </table:table-cell>
          <table:table-cell office:value-type="float" office:value="8640000" calcext:value-type="float">
            <text:p>8640000</text:p>
          </table:table-cell>
          <table:table-cell table:formula="of:=[.B1352]/[.C1352]" office:value-type="float" office:value="0.00109456018518519" calcext:value-type="float">
            <text:p>0,00109456018518519000</text:p>
          </table:table-cell>
          <table:table-cell table:formula="of:=[.D1353]-[.D135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B1352]+7" office:value-type="float" office:value="9464" calcext:value-type="float">
            <text:p>9464</text:p>
          </table:table-cell>
          <table:table-cell office:value-type="float" office:value="8640000" calcext:value-type="float">
            <text:p>8640000</text:p>
          </table:table-cell>
          <table:table-cell table:formula="of:=[.B1353]/[.C1353]" office:value-type="float" office:value="0.00109537037037037" calcext:value-type="float">
            <text:p>0,00109537037037037000</text:p>
          </table:table-cell>
          <table:table-cell table:formula="of:=[.D1354]-[.D135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B1353]+7" office:value-type="float" office:value="9471" calcext:value-type="float">
            <text:p>9471</text:p>
          </table:table-cell>
          <table:table-cell office:value-type="float" office:value="8640000" calcext:value-type="float">
            <text:p>8640000</text:p>
          </table:table-cell>
          <table:table-cell table:formula="of:=[.B1354]/[.C1354]" office:value-type="float" office:value="0.00109618055555556" calcext:value-type="float">
            <text:p>0,00109618055555556000</text:p>
          </table:table-cell>
          <table:table-cell table:formula="of:=[.D1355]-[.D135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B1354]+7" office:value-type="float" office:value="9478" calcext:value-type="float">
            <text:p>9478</text:p>
          </table:table-cell>
          <table:table-cell office:value-type="float" office:value="8640000" calcext:value-type="float">
            <text:p>8640000</text:p>
          </table:table-cell>
          <table:table-cell table:formula="of:=[.B1355]/[.C1355]" office:value-type="float" office:value="0.00109699074074074" calcext:value-type="float">
            <text:p>0,00109699074074074000</text:p>
          </table:table-cell>
          <table:table-cell table:formula="of:=[.D1356]-[.D135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B1355]+7" office:value-type="float" office:value="9485" calcext:value-type="float">
            <text:p>9485</text:p>
          </table:table-cell>
          <table:table-cell office:value-type="float" office:value="8640000" calcext:value-type="float">
            <text:p>8640000</text:p>
          </table:table-cell>
          <table:table-cell table:formula="of:=[.B1356]/[.C1356]" office:value-type="float" office:value="0.00109780092592593" calcext:value-type="float">
            <text:p>0,00109780092592593000</text:p>
          </table:table-cell>
          <table:table-cell table:formula="of:=[.D1357]-[.D135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B1356]+7" office:value-type="float" office:value="9492" calcext:value-type="float">
            <text:p>9492</text:p>
          </table:table-cell>
          <table:table-cell office:value-type="float" office:value="8640000" calcext:value-type="float">
            <text:p>8640000</text:p>
          </table:table-cell>
          <table:table-cell table:formula="of:=[.B1357]/[.C1357]" office:value-type="float" office:value="0.00109861111111111" calcext:value-type="float">
            <text:p>0,00109861111111111000</text:p>
          </table:table-cell>
          <table:table-cell table:formula="of:=[.D1358]-[.D135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B1357]+7" office:value-type="float" office:value="9499" calcext:value-type="float">
            <text:p>9499</text:p>
          </table:table-cell>
          <table:table-cell office:value-type="float" office:value="8640000" calcext:value-type="float">
            <text:p>8640000</text:p>
          </table:table-cell>
          <table:table-cell table:formula="of:=[.B1358]/[.C1358]" office:value-type="float" office:value="0.0010994212962963" calcext:value-type="float">
            <text:p>0,00109942129629630000</text:p>
          </table:table-cell>
          <table:table-cell table:formula="of:=[.D1359]-[.D135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B1358]+7" office:value-type="float" office:value="9506" calcext:value-type="float">
            <text:p>9506</text:p>
          </table:table-cell>
          <table:table-cell office:value-type="float" office:value="8640000" calcext:value-type="float">
            <text:p>8640000</text:p>
          </table:table-cell>
          <table:table-cell table:formula="of:=[.B1359]/[.C1359]" office:value-type="float" office:value="0.00110023148148148" calcext:value-type="float">
            <text:p>0,00110023148148148000</text:p>
          </table:table-cell>
          <table:table-cell table:formula="of:=[.D1360]-[.D135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B1359]+7" office:value-type="float" office:value="9513" calcext:value-type="float">
            <text:p>9513</text:p>
          </table:table-cell>
          <table:table-cell office:value-type="float" office:value="8640000" calcext:value-type="float">
            <text:p>8640000</text:p>
          </table:table-cell>
          <table:table-cell table:formula="of:=[.B1360]/[.C1360]" office:value-type="float" office:value="0.00110104166666667" calcext:value-type="float">
            <text:p>0,00110104166666667000</text:p>
          </table:table-cell>
          <table:table-cell table:formula="of:=[.D1361]-[.D136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B1360]+7" office:value-type="float" office:value="9520" calcext:value-type="float">
            <text:p>9520</text:p>
          </table:table-cell>
          <table:table-cell office:value-type="float" office:value="8640000" calcext:value-type="float">
            <text:p>8640000</text:p>
          </table:table-cell>
          <table:table-cell table:formula="of:=[.B1361]/[.C1361]" office:value-type="float" office:value="0.00110185185185185" calcext:value-type="float">
            <text:p>0,00110185185185185000</text:p>
          </table:table-cell>
          <table:table-cell table:formula="of:=[.D1362]-[.D136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B1361]+7" office:value-type="float" office:value="9527" calcext:value-type="float">
            <text:p>9527</text:p>
          </table:table-cell>
          <table:table-cell office:value-type="float" office:value="8640000" calcext:value-type="float">
            <text:p>8640000</text:p>
          </table:table-cell>
          <table:table-cell table:formula="of:=[.B1362]/[.C1362]" office:value-type="float" office:value="0.00110266203703704" calcext:value-type="float">
            <text:p>0,00110266203703704000</text:p>
          </table:table-cell>
          <table:table-cell table:formula="of:=[.D1363]-[.D136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B1362]+7" office:value-type="float" office:value="9534" calcext:value-type="float">
            <text:p>9534</text:p>
          </table:table-cell>
          <table:table-cell office:value-type="float" office:value="8640000" calcext:value-type="float">
            <text:p>8640000</text:p>
          </table:table-cell>
          <table:table-cell table:formula="of:=[.B1363]/[.C1363]" office:value-type="float" office:value="0.00110347222222222" calcext:value-type="float">
            <text:p>0,00110347222222222000</text:p>
          </table:table-cell>
          <table:table-cell table:formula="of:=[.D1364]-[.D136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B1363]+7" office:value-type="float" office:value="9541" calcext:value-type="float">
            <text:p>9541</text:p>
          </table:table-cell>
          <table:table-cell office:value-type="float" office:value="8640000" calcext:value-type="float">
            <text:p>8640000</text:p>
          </table:table-cell>
          <table:table-cell table:formula="of:=[.B1364]/[.C1364]" office:value-type="float" office:value="0.00110428240740741" calcext:value-type="float">
            <text:p>0,00110428240740741000</text:p>
          </table:table-cell>
          <table:table-cell table:formula="of:=[.D1365]-[.D136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B1364]+7" office:value-type="float" office:value="9548" calcext:value-type="float">
            <text:p>9548</text:p>
          </table:table-cell>
          <table:table-cell office:value-type="float" office:value="8640000" calcext:value-type="float">
            <text:p>8640000</text:p>
          </table:table-cell>
          <table:table-cell table:formula="of:=[.B1365]/[.C1365]" office:value-type="float" office:value="0.00110509259259259" calcext:value-type="float">
            <text:p>0,00110509259259259000</text:p>
          </table:table-cell>
          <table:table-cell table:formula="of:=[.D1366]-[.D136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B1365]+7" office:value-type="float" office:value="9555" calcext:value-type="float">
            <text:p>9555</text:p>
          </table:table-cell>
          <table:table-cell office:value-type="float" office:value="8640000" calcext:value-type="float">
            <text:p>8640000</text:p>
          </table:table-cell>
          <table:table-cell table:formula="of:=[.B1366]/[.C1366]" office:value-type="float" office:value="0.00110590277777778" calcext:value-type="float">
            <text:p>0,00110590277777778000</text:p>
          </table:table-cell>
          <table:table-cell table:formula="of:=[.D1367]-[.D136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B1366]+7" office:value-type="float" office:value="9562" calcext:value-type="float">
            <text:p>9562</text:p>
          </table:table-cell>
          <table:table-cell office:value-type="float" office:value="8640000" calcext:value-type="float">
            <text:p>8640000</text:p>
          </table:table-cell>
          <table:table-cell table:formula="of:=[.B1367]/[.C1367]" office:value-type="float" office:value="0.00110671296296296" calcext:value-type="float">
            <text:p>0,00110671296296296000</text:p>
          </table:table-cell>
          <table:table-cell table:formula="of:=[.D1368]-[.D136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B1367]+7" office:value-type="float" office:value="9569" calcext:value-type="float">
            <text:p>9569</text:p>
          </table:table-cell>
          <table:table-cell office:value-type="float" office:value="8640000" calcext:value-type="float">
            <text:p>8640000</text:p>
          </table:table-cell>
          <table:table-cell table:formula="of:=[.B1368]/[.C1368]" office:value-type="float" office:value="0.00110752314814815" calcext:value-type="float">
            <text:p>0,00110752314814815000</text:p>
          </table:table-cell>
          <table:table-cell table:formula="of:=[.D1369]-[.D136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B1368]+7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1369]/[.C1369]" office:value-type="float" office:value="0.00110833333333333" calcext:value-type="float">
            <text:p>0,00110833333333333000</text:p>
          </table:table-cell>
          <table:table-cell table:formula="of:=[.D1370]-[.D136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B1369]+7" office:value-type="float" office:value="9583" calcext:value-type="float">
            <text:p>9583</text:p>
          </table:table-cell>
          <table:table-cell office:value-type="float" office:value="8640000" calcext:value-type="float">
            <text:p>8640000</text:p>
          </table:table-cell>
          <table:table-cell table:formula="of:=[.B1370]/[.C1370]" office:value-type="float" office:value="0.00110914351851852" calcext:value-type="float">
            <text:p>0,00110914351851852000</text:p>
          </table:table-cell>
          <table:table-cell table:formula="of:=[.D1371]-[.D137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B1370]+7" office:value-type="float" office:value="9590" calcext:value-type="float">
            <text:p>9590</text:p>
          </table:table-cell>
          <table:table-cell office:value-type="float" office:value="8640000" calcext:value-type="float">
            <text:p>8640000</text:p>
          </table:table-cell>
          <table:table-cell table:formula="of:=[.B1371]/[.C1371]" office:value-type="float" office:value="0.0011099537037037" calcext:value-type="float">
            <text:p>0,00110995370370370000</text:p>
          </table:table-cell>
          <table:table-cell table:formula="of:=[.D1372]-[.D137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B1371]+7" office:value-type="float" office:value="9597" calcext:value-type="float">
            <text:p>9597</text:p>
          </table:table-cell>
          <table:table-cell office:value-type="float" office:value="8640000" calcext:value-type="float">
            <text:p>8640000</text:p>
          </table:table-cell>
          <table:table-cell table:formula="of:=[.B1372]/[.C1372]" office:value-type="float" office:value="0.00111076388888889" calcext:value-type="float">
            <text:p>0,00111076388888889000</text:p>
          </table:table-cell>
          <table:table-cell table:formula="of:=[.D1373]-[.D137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B1372]+7" office:value-type="float" office:value="9604" calcext:value-type="float">
            <text:p>9604</text:p>
          </table:table-cell>
          <table:table-cell office:value-type="float" office:value="8640000" calcext:value-type="float">
            <text:p>8640000</text:p>
          </table:table-cell>
          <table:table-cell table:formula="of:=[.B1373]/[.C1373]" office:value-type="float" office:value="0.00111157407407407" calcext:value-type="float">
            <text:p>0,00111157407407407000</text:p>
          </table:table-cell>
          <table:table-cell table:formula="of:=[.D1374]-[.D137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B1373]+7" office:value-type="float" office:value="9611" calcext:value-type="float">
            <text:p>9611</text:p>
          </table:table-cell>
          <table:table-cell office:value-type="float" office:value="8640000" calcext:value-type="float">
            <text:p>8640000</text:p>
          </table:table-cell>
          <table:table-cell table:formula="of:=[.B1374]/[.C1374]" office:value-type="float" office:value="0.00111238425925926" calcext:value-type="float">
            <text:p>0,00111238425925926000</text:p>
          </table:table-cell>
          <table:table-cell table:formula="of:=[.D1375]-[.D137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B1374]+7" office:value-type="float" office:value="9618" calcext:value-type="float">
            <text:p>9618</text:p>
          </table:table-cell>
          <table:table-cell office:value-type="float" office:value="8640000" calcext:value-type="float">
            <text:p>8640000</text:p>
          </table:table-cell>
          <table:table-cell table:formula="of:=[.B1375]/[.C1375]" office:value-type="float" office:value="0.00111319444444444" calcext:value-type="float">
            <text:p>0,00111319444444444000</text:p>
          </table:table-cell>
          <table:table-cell table:formula="of:=[.D1376]-[.D137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B1375]+7" office:value-type="float" office:value="9625" calcext:value-type="float">
            <text:p>9625</text:p>
          </table:table-cell>
          <table:table-cell office:value-type="float" office:value="8640000" calcext:value-type="float">
            <text:p>8640000</text:p>
          </table:table-cell>
          <table:table-cell table:formula="of:=[.B1376]/[.C1376]" office:value-type="float" office:value="0.00111400462962963" calcext:value-type="float">
            <text:p>0,00111400462962963000</text:p>
          </table:table-cell>
          <table:table-cell table:formula="of:=[.D1377]-[.D137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B1376]+7" office:value-type="float" office:value="9632" calcext:value-type="float">
            <text:p>9632</text:p>
          </table:table-cell>
          <table:table-cell office:value-type="float" office:value="8640000" calcext:value-type="float">
            <text:p>8640000</text:p>
          </table:table-cell>
          <table:table-cell table:formula="of:=[.B1377]/[.C1377]" office:value-type="float" office:value="0.00111481481481481" calcext:value-type="float">
            <text:p>0,00111481481481481000</text:p>
          </table:table-cell>
          <table:table-cell table:formula="of:=[.D1378]-[.D137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B1377]+7" office:value-type="float" office:value="9639" calcext:value-type="float">
            <text:p>9639</text:p>
          </table:table-cell>
          <table:table-cell office:value-type="float" office:value="8640000" calcext:value-type="float">
            <text:p>8640000</text:p>
          </table:table-cell>
          <table:table-cell table:formula="of:=[.B1378]/[.C1378]" office:value-type="float" office:value="0.001115625" calcext:value-type="float">
            <text:p>0,00111562500000000000</text:p>
          </table:table-cell>
          <table:table-cell table:formula="of:=[.D1379]-[.D137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B1378]+7" office:value-type="float" office:value="9646" calcext:value-type="float">
            <text:p>9646</text:p>
          </table:table-cell>
          <table:table-cell office:value-type="float" office:value="8640000" calcext:value-type="float">
            <text:p>8640000</text:p>
          </table:table-cell>
          <table:table-cell table:formula="of:=[.B1379]/[.C1379]" office:value-type="float" office:value="0.00111643518518519" calcext:value-type="float">
            <text:p>0,00111643518518519000</text:p>
          </table:table-cell>
          <table:table-cell table:formula="of:=[.D1380]-[.D137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B1379]+7" office:value-type="float" office:value="9653" calcext:value-type="float">
            <text:p>9653</text:p>
          </table:table-cell>
          <table:table-cell office:value-type="float" office:value="8640000" calcext:value-type="float">
            <text:p>8640000</text:p>
          </table:table-cell>
          <table:table-cell table:formula="of:=[.B1380]/[.C1380]" office:value-type="float" office:value="0.00111724537037037" calcext:value-type="float">
            <text:p>0,00111724537037037000</text:p>
          </table:table-cell>
          <table:table-cell table:formula="of:=[.D1381]-[.D138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B1380]+7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1381]/[.C1381]" office:value-type="float" office:value="0.00111805555555556" calcext:value-type="float">
            <text:p>0,00111805555555556000</text:p>
          </table:table-cell>
          <table:table-cell table:formula="of:=[.D1382]-[.D138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B1381]+7" office:value-type="float" office:value="9667" calcext:value-type="float">
            <text:p>9667</text:p>
          </table:table-cell>
          <table:table-cell office:value-type="float" office:value="8640000" calcext:value-type="float">
            <text:p>8640000</text:p>
          </table:table-cell>
          <table:table-cell table:formula="of:=[.B1382]/[.C1382]" office:value-type="float" office:value="0.00111886574074074" calcext:value-type="float">
            <text:p>0,00111886574074074000</text:p>
          </table:table-cell>
          <table:table-cell table:formula="of:=[.D1383]-[.D138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B1382]+7" office:value-type="float" office:value="9674" calcext:value-type="float">
            <text:p>9674</text:p>
          </table:table-cell>
          <table:table-cell office:value-type="float" office:value="8640000" calcext:value-type="float">
            <text:p>8640000</text:p>
          </table:table-cell>
          <table:table-cell table:formula="of:=[.B1383]/[.C1383]" office:value-type="float" office:value="0.00111967592592593" calcext:value-type="float">
            <text:p>0,00111967592592593000</text:p>
          </table:table-cell>
          <table:table-cell table:formula="of:=[.D1384]-[.D138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B1383]+7" office:value-type="float" office:value="9681" calcext:value-type="float">
            <text:p>9681</text:p>
          </table:table-cell>
          <table:table-cell office:value-type="float" office:value="8640000" calcext:value-type="float">
            <text:p>8640000</text:p>
          </table:table-cell>
          <table:table-cell table:formula="of:=[.B1384]/[.C1384]" office:value-type="float" office:value="0.00112048611111111" calcext:value-type="float">
            <text:p>0,00112048611111111000</text:p>
          </table:table-cell>
          <table:table-cell table:formula="of:=[.D1385]-[.D138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B1384]+7" office:value-type="float" office:value="9688" calcext:value-type="float">
            <text:p>9688</text:p>
          </table:table-cell>
          <table:table-cell office:value-type="float" office:value="8640000" calcext:value-type="float">
            <text:p>8640000</text:p>
          </table:table-cell>
          <table:table-cell table:formula="of:=[.B1385]/[.C1385]" office:value-type="float" office:value="0.0011212962962963" calcext:value-type="float">
            <text:p>0,00112129629629630000</text:p>
          </table:table-cell>
          <table:table-cell table:formula="of:=[.D1386]-[.D138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B1385]+7" office:value-type="float" office:value="9695" calcext:value-type="float">
            <text:p>9695</text:p>
          </table:table-cell>
          <table:table-cell office:value-type="float" office:value="8640000" calcext:value-type="float">
            <text:p>8640000</text:p>
          </table:table-cell>
          <table:table-cell table:formula="of:=[.B1386]/[.C1386]" office:value-type="float" office:value="0.00112210648148148" calcext:value-type="float">
            <text:p>0,00112210648148148000</text:p>
          </table:table-cell>
          <table:table-cell table:formula="of:=[.D1387]-[.D138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B1386]+7" office:value-type="float" office:value="9702" calcext:value-type="float">
            <text:p>9702</text:p>
          </table:table-cell>
          <table:table-cell office:value-type="float" office:value="8640000" calcext:value-type="float">
            <text:p>8640000</text:p>
          </table:table-cell>
          <table:table-cell table:formula="of:=[.B1387]/[.C1387]" office:value-type="float" office:value="0.00112291666666667" calcext:value-type="float">
            <text:p>0,00112291666666667000</text:p>
          </table:table-cell>
          <table:table-cell table:formula="of:=[.D1388]-[.D138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B1387]+7" office:value-type="float" office:value="9709" calcext:value-type="float">
            <text:p>9709</text:p>
          </table:table-cell>
          <table:table-cell office:value-type="float" office:value="8640000" calcext:value-type="float">
            <text:p>8640000</text:p>
          </table:table-cell>
          <table:table-cell table:formula="of:=[.B1388]/[.C1388]" office:value-type="float" office:value="0.00112372685185185" calcext:value-type="float">
            <text:p>0,00112372685185185000</text:p>
          </table:table-cell>
          <table:table-cell table:formula="of:=[.D1389]-[.D138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B1388]+7" office:value-type="float" office:value="9716" calcext:value-type="float">
            <text:p>9716</text:p>
          </table:table-cell>
          <table:table-cell office:value-type="float" office:value="8640000" calcext:value-type="float">
            <text:p>8640000</text:p>
          </table:table-cell>
          <table:table-cell table:formula="of:=[.B1389]/[.C1389]" office:value-type="float" office:value="0.00112453703703704" calcext:value-type="float">
            <text:p>0,00112453703703704000</text:p>
          </table:table-cell>
          <table:table-cell table:formula="of:=[.D1390]-[.D138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B1389]+7" office:value-type="float" office:value="9723" calcext:value-type="float">
            <text:p>9723</text:p>
          </table:table-cell>
          <table:table-cell office:value-type="float" office:value="8640000" calcext:value-type="float">
            <text:p>8640000</text:p>
          </table:table-cell>
          <table:table-cell table:formula="of:=[.B1390]/[.C1390]" office:value-type="float" office:value="0.00112534722222222" calcext:value-type="float">
            <text:p>0,00112534722222222000</text:p>
          </table:table-cell>
          <table:table-cell table:formula="of:=[.D1391]-[.D139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B1390]+7" office:value-type="float" office:value="9730" calcext:value-type="float">
            <text:p>9730</text:p>
          </table:table-cell>
          <table:table-cell office:value-type="float" office:value="8640000" calcext:value-type="float">
            <text:p>8640000</text:p>
          </table:table-cell>
          <table:table-cell table:formula="of:=[.B1391]/[.C1391]" office:value-type="float" office:value="0.00112615740740741" calcext:value-type="float">
            <text:p>0,00112615740740741000</text:p>
          </table:table-cell>
          <table:table-cell table:formula="of:=[.D1392]-[.D139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B1391]+7" office:value-type="float" office:value="9737" calcext:value-type="float">
            <text:p>9737</text:p>
          </table:table-cell>
          <table:table-cell office:value-type="float" office:value="8640000" calcext:value-type="float">
            <text:p>8640000</text:p>
          </table:table-cell>
          <table:table-cell table:formula="of:=[.B1392]/[.C1392]" office:value-type="float" office:value="0.00112696759259259" calcext:value-type="float">
            <text:p>0,00112696759259259000</text:p>
          </table:table-cell>
          <table:table-cell table:formula="of:=[.D1393]-[.D139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B1392]+7" office:value-type="float" office:value="9744" calcext:value-type="float">
            <text:p>9744</text:p>
          </table:table-cell>
          <table:table-cell office:value-type="float" office:value="8640000" calcext:value-type="float">
            <text:p>8640000</text:p>
          </table:table-cell>
          <table:table-cell table:formula="of:=[.B1393]/[.C1393]" office:value-type="float" office:value="0.00112777777777778" calcext:value-type="float">
            <text:p>0,00112777777777778000</text:p>
          </table:table-cell>
          <table:table-cell table:formula="of:=[.D1394]-[.D139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B1393]+7" office:value-type="float" office:value="9751" calcext:value-type="float">
            <text:p>9751</text:p>
          </table:table-cell>
          <table:table-cell office:value-type="float" office:value="8640000" calcext:value-type="float">
            <text:p>8640000</text:p>
          </table:table-cell>
          <table:table-cell table:formula="of:=[.B1394]/[.C1394]" office:value-type="float" office:value="0.00112858796296296" calcext:value-type="float">
            <text:p>0,00112858796296296000</text:p>
          </table:table-cell>
          <table:table-cell table:formula="of:=[.D1395]-[.D139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B1394]+7" office:value-type="float" office:value="9758" calcext:value-type="float">
            <text:p>9758</text:p>
          </table:table-cell>
          <table:table-cell office:value-type="float" office:value="8640000" calcext:value-type="float">
            <text:p>8640000</text:p>
          </table:table-cell>
          <table:table-cell table:formula="of:=[.B1395]/[.C1395]" office:value-type="float" office:value="0.00112939814814815" calcext:value-type="float">
            <text:p>0,00112939814814815000</text:p>
          </table:table-cell>
          <table:table-cell table:formula="of:=[.D1396]-[.D139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B1395]+7" office:value-type="float" office:value="9765" calcext:value-type="float">
            <text:p>9765</text:p>
          </table:table-cell>
          <table:table-cell office:value-type="float" office:value="8640000" calcext:value-type="float">
            <text:p>8640000</text:p>
          </table:table-cell>
          <table:table-cell table:formula="of:=[.B1396]/[.C1396]" office:value-type="float" office:value="0.00113020833333333" calcext:value-type="float">
            <text:p>0,00113020833333333000</text:p>
          </table:table-cell>
          <table:table-cell table:formula="of:=[.D1397]-[.D139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B1396]+7" office:value-type="float" office:value="9772" calcext:value-type="float">
            <text:p>9772</text:p>
          </table:table-cell>
          <table:table-cell office:value-type="float" office:value="8640000" calcext:value-type="float">
            <text:p>8640000</text:p>
          </table:table-cell>
          <table:table-cell table:formula="of:=[.B1397]/[.C1397]" office:value-type="float" office:value="0.00113101851851852" calcext:value-type="float">
            <text:p>0,00113101851851852000</text:p>
          </table:table-cell>
          <table:table-cell table:formula="of:=[.D1398]-[.D139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B1397]+7" office:value-type="float" office:value="9779" calcext:value-type="float">
            <text:p>9779</text:p>
          </table:table-cell>
          <table:table-cell office:value-type="float" office:value="8640000" calcext:value-type="float">
            <text:p>8640000</text:p>
          </table:table-cell>
          <table:table-cell table:formula="of:=[.B1398]/[.C1398]" office:value-type="float" office:value="0.0011318287037037" calcext:value-type="float">
            <text:p>0,00113182870370370000</text:p>
          </table:table-cell>
          <table:table-cell table:formula="of:=[.D1399]-[.D139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B1398]+7" office:value-type="float" office:value="9786" calcext:value-type="float">
            <text:p>9786</text:p>
          </table:table-cell>
          <table:table-cell office:value-type="float" office:value="8640000" calcext:value-type="float">
            <text:p>8640000</text:p>
          </table:table-cell>
          <table:table-cell table:formula="of:=[.B1399]/[.C1399]" office:value-type="float" office:value="0.00113263888888889" calcext:value-type="float">
            <text:p>0,00113263888888889000</text:p>
          </table:table-cell>
          <table:table-cell table:formula="of:=[.D1400]-[.D139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B1399]+7" office:value-type="float" office:value="9793" calcext:value-type="float">
            <text:p>9793</text:p>
          </table:table-cell>
          <table:table-cell office:value-type="float" office:value="8640000" calcext:value-type="float">
            <text:p>8640000</text:p>
          </table:table-cell>
          <table:table-cell table:formula="of:=[.B1400]/[.C1400]" office:value-type="float" office:value="0.00113344907407407" calcext:value-type="float">
            <text:p>0,00113344907407407000</text:p>
          </table:table-cell>
          <table:table-cell table:formula="of:=[.D1401]-[.D140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B1400]+7" office:value-type="float" office:value="9800" calcext:value-type="float">
            <text:p>9800</text:p>
          </table:table-cell>
          <table:table-cell office:value-type="float" office:value="8640000" calcext:value-type="float">
            <text:p>8640000</text:p>
          </table:table-cell>
          <table:table-cell table:formula="of:=[.B1401]/[.C1401]" office:value-type="float" office:value="0.00113425925925926" calcext:value-type="float">
            <text:p>0,00113425925925926000</text:p>
          </table:table-cell>
          <table:table-cell table:formula="of:=[.D1402]-[.D140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B1401]+7" office:value-type="float" office:value="9807" calcext:value-type="float">
            <text:p>9807</text:p>
          </table:table-cell>
          <table:table-cell office:value-type="float" office:value="8640000" calcext:value-type="float">
            <text:p>8640000</text:p>
          </table:table-cell>
          <table:table-cell table:formula="of:=[.B1402]/[.C1402]" office:value-type="float" office:value="0.00113506944444444" calcext:value-type="float">
            <text:p>0,00113506944444444000</text:p>
          </table:table-cell>
          <table:table-cell table:formula="of:=[.D1403]-[.D140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B1402]+7" office:value-type="float" office:value="9814" calcext:value-type="float">
            <text:p>9814</text:p>
          </table:table-cell>
          <table:table-cell office:value-type="float" office:value="8640000" calcext:value-type="float">
            <text:p>8640000</text:p>
          </table:table-cell>
          <table:table-cell table:formula="of:=[.B1403]/[.C1403]" office:value-type="float" office:value="0.00113587962962963" calcext:value-type="float">
            <text:p>0,00113587962962963000</text:p>
          </table:table-cell>
          <table:table-cell table:formula="of:=[.D1404]-[.D140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B1403]+7" office:value-type="float" office:value="9821" calcext:value-type="float">
            <text:p>9821</text:p>
          </table:table-cell>
          <table:table-cell office:value-type="float" office:value="8640000" calcext:value-type="float">
            <text:p>8640000</text:p>
          </table:table-cell>
          <table:table-cell table:formula="of:=[.B1404]/[.C1404]" office:value-type="float" office:value="0.00113668981481481" calcext:value-type="float">
            <text:p>0,00113668981481481000</text:p>
          </table:table-cell>
          <table:table-cell table:formula="of:=[.D1405]-[.D140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B1404]+7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1405]/[.C1405]" office:value-type="float" office:value="0.0011375" calcext:value-type="float">
            <text:p>0,00113750000000000000</text:p>
          </table:table-cell>
          <table:table-cell table:formula="of:=[.D1406]-[.D140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B1405]+7" office:value-type="float" office:value="9835" calcext:value-type="float">
            <text:p>9835</text:p>
          </table:table-cell>
          <table:table-cell office:value-type="float" office:value="8640000" calcext:value-type="float">
            <text:p>8640000</text:p>
          </table:table-cell>
          <table:table-cell table:formula="of:=[.B1406]/[.C1406]" office:value-type="float" office:value="0.00113831018518519" calcext:value-type="float">
            <text:p>0,00113831018518519000</text:p>
          </table:table-cell>
          <table:table-cell table:formula="of:=[.D1407]-[.D140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B1406]+7" office:value-type="float" office:value="9842" calcext:value-type="float">
            <text:p>9842</text:p>
          </table:table-cell>
          <table:table-cell office:value-type="float" office:value="8640000" calcext:value-type="float">
            <text:p>8640000</text:p>
          </table:table-cell>
          <table:table-cell table:formula="of:=[.B1407]/[.C1407]" office:value-type="float" office:value="0.00113912037037037" calcext:value-type="float">
            <text:p>0,00113912037037037000</text:p>
          </table:table-cell>
          <table:table-cell table:formula="of:=[.D1408]-[.D140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B1407]+7" office:value-type="float" office:value="9849" calcext:value-type="float">
            <text:p>9849</text:p>
          </table:table-cell>
          <table:table-cell office:value-type="float" office:value="8640000" calcext:value-type="float">
            <text:p>8640000</text:p>
          </table:table-cell>
          <table:table-cell table:formula="of:=[.B1408]/[.C1408]" office:value-type="float" office:value="0.00113993055555556" calcext:value-type="float">
            <text:p>0,00113993055555556000</text:p>
          </table:table-cell>
          <table:table-cell table:formula="of:=[.D1409]-[.D140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B1408]+7" office:value-type="float" office:value="9856" calcext:value-type="float">
            <text:p>9856</text:p>
          </table:table-cell>
          <table:table-cell office:value-type="float" office:value="8640000" calcext:value-type="float">
            <text:p>8640000</text:p>
          </table:table-cell>
          <table:table-cell table:formula="of:=[.B1409]/[.C1409]" office:value-type="float" office:value="0.00114074074074074" calcext:value-type="float">
            <text:p>0,00114074074074074000</text:p>
          </table:table-cell>
          <table:table-cell table:formula="of:=[.D1410]-[.D140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B1409]+7" office:value-type="float" office:value="9863" calcext:value-type="float">
            <text:p>9863</text:p>
          </table:table-cell>
          <table:table-cell office:value-type="float" office:value="8640000" calcext:value-type="float">
            <text:p>8640000</text:p>
          </table:table-cell>
          <table:table-cell table:formula="of:=[.B1410]/[.C1410]" office:value-type="float" office:value="0.00114155092592593" calcext:value-type="float">
            <text:p>0,00114155092592593000</text:p>
          </table:table-cell>
          <table:table-cell table:formula="of:=[.D1411]-[.D141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B1410]+7" office:value-type="float" office:value="9870" calcext:value-type="float">
            <text:p>9870</text:p>
          </table:table-cell>
          <table:table-cell office:value-type="float" office:value="8640000" calcext:value-type="float">
            <text:p>8640000</text:p>
          </table:table-cell>
          <table:table-cell table:formula="of:=[.B1411]/[.C1411]" office:value-type="float" office:value="0.00114236111111111" calcext:value-type="float">
            <text:p>0,00114236111111111000</text:p>
          </table:table-cell>
          <table:table-cell table:formula="of:=[.D1412]-[.D141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B1411]+7" office:value-type="float" office:value="9877" calcext:value-type="float">
            <text:p>9877</text:p>
          </table:table-cell>
          <table:table-cell office:value-type="float" office:value="8640000" calcext:value-type="float">
            <text:p>8640000</text:p>
          </table:table-cell>
          <table:table-cell table:formula="of:=[.B1412]/[.C1412]" office:value-type="float" office:value="0.0011431712962963" calcext:value-type="float">
            <text:p>0,00114317129629630000</text:p>
          </table:table-cell>
          <table:table-cell table:formula="of:=[.D1413]-[.D141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B1412]+7" office:value-type="float" office:value="9884" calcext:value-type="float">
            <text:p>9884</text:p>
          </table:table-cell>
          <table:table-cell office:value-type="float" office:value="8640000" calcext:value-type="float">
            <text:p>8640000</text:p>
          </table:table-cell>
          <table:table-cell table:formula="of:=[.B1413]/[.C1413]" office:value-type="float" office:value="0.00114398148148148" calcext:value-type="float">
            <text:p>0,00114398148148148000</text:p>
          </table:table-cell>
          <table:table-cell table:formula="of:=[.D1414]-[.D141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B1413]+7" office:value-type="float" office:value="9891" calcext:value-type="float">
            <text:p>9891</text:p>
          </table:table-cell>
          <table:table-cell office:value-type="float" office:value="8640000" calcext:value-type="float">
            <text:p>8640000</text:p>
          </table:table-cell>
          <table:table-cell table:formula="of:=[.B1414]/[.C1414]" office:value-type="float" office:value="0.00114479166666667" calcext:value-type="float">
            <text:p>0,00114479166666667000</text:p>
          </table:table-cell>
          <table:table-cell table:formula="of:=[.D1415]-[.D141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B1414]+7" office:value-type="float" office:value="9898" calcext:value-type="float">
            <text:p>9898</text:p>
          </table:table-cell>
          <table:table-cell office:value-type="float" office:value="8640000" calcext:value-type="float">
            <text:p>8640000</text:p>
          </table:table-cell>
          <table:table-cell table:formula="of:=[.B1415]/[.C1415]" office:value-type="float" office:value="0.00114560185185185" calcext:value-type="float">
            <text:p>0,00114560185185185000</text:p>
          </table:table-cell>
          <table:table-cell table:formula="of:=[.D1416]-[.D141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B1415]+7" office:value-type="float" office:value="9905" calcext:value-type="float">
            <text:p>9905</text:p>
          </table:table-cell>
          <table:table-cell office:value-type="float" office:value="8640000" calcext:value-type="float">
            <text:p>8640000</text:p>
          </table:table-cell>
          <table:table-cell table:formula="of:=[.B1416]/[.C1416]" office:value-type="float" office:value="0.00114641203703704" calcext:value-type="float">
            <text:p>0,00114641203703704000</text:p>
          </table:table-cell>
          <table:table-cell table:formula="of:=[.D1417]-[.D141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B1416]+7" office:value-type="float" office:value="9912" calcext:value-type="float">
            <text:p>9912</text:p>
          </table:table-cell>
          <table:table-cell office:value-type="float" office:value="8640000" calcext:value-type="float">
            <text:p>8640000</text:p>
          </table:table-cell>
          <table:table-cell table:formula="of:=[.B1417]/[.C1417]" office:value-type="float" office:value="0.00114722222222222" calcext:value-type="float">
            <text:p>0,00114722222222222000</text:p>
          </table:table-cell>
          <table:table-cell table:formula="of:=[.D1418]-[.D141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B1417]+7" office:value-type="float" office:value="9919" calcext:value-type="float">
            <text:p>9919</text:p>
          </table:table-cell>
          <table:table-cell office:value-type="float" office:value="8640000" calcext:value-type="float">
            <text:p>8640000</text:p>
          </table:table-cell>
          <table:table-cell table:formula="of:=[.B1418]/[.C1418]" office:value-type="float" office:value="0.00114803240740741" calcext:value-type="float">
            <text:p>0,00114803240740741000</text:p>
          </table:table-cell>
          <table:table-cell table:formula="of:=[.D1419]-[.D141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B1418]+7" office:value-type="float" office:value="9926" calcext:value-type="float">
            <text:p>9926</text:p>
          </table:table-cell>
          <table:table-cell office:value-type="float" office:value="8640000" calcext:value-type="float">
            <text:p>8640000</text:p>
          </table:table-cell>
          <table:table-cell table:formula="of:=[.B1419]/[.C1419]" office:value-type="float" office:value="0.00114884259259259" calcext:value-type="float">
            <text:p>0,00114884259259259000</text:p>
          </table:table-cell>
          <table:table-cell table:formula="of:=[.D1420]-[.D141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B1419]+7" office:value-type="float" office:value="9933" calcext:value-type="float">
            <text:p>9933</text:p>
          </table:table-cell>
          <table:table-cell office:value-type="float" office:value="8640000" calcext:value-type="float">
            <text:p>8640000</text:p>
          </table:table-cell>
          <table:table-cell table:formula="of:=[.B1420]/[.C1420]" office:value-type="float" office:value="0.00114965277777778" calcext:value-type="float">
            <text:p>0,00114965277777778000</text:p>
          </table:table-cell>
          <table:table-cell table:formula="of:=[.D1421]-[.D142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B1420]+7" office:value-type="float" office:value="9940" calcext:value-type="float">
            <text:p>9940</text:p>
          </table:table-cell>
          <table:table-cell office:value-type="float" office:value="8640000" calcext:value-type="float">
            <text:p>8640000</text:p>
          </table:table-cell>
          <table:table-cell table:formula="of:=[.B1421]/[.C1421]" office:value-type="float" office:value="0.00115046296296296" calcext:value-type="float">
            <text:p>0,00115046296296296000</text:p>
          </table:table-cell>
          <table:table-cell table:formula="of:=[.D1422]-[.D142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B1421]+7" office:value-type="float" office:value="9947" calcext:value-type="float">
            <text:p>9947</text:p>
          </table:table-cell>
          <table:table-cell office:value-type="float" office:value="8640000" calcext:value-type="float">
            <text:p>8640000</text:p>
          </table:table-cell>
          <table:table-cell table:formula="of:=[.B1422]/[.C1422]" office:value-type="float" office:value="0.00115127314814815" calcext:value-type="float">
            <text:p>0,00115127314814815000</text:p>
          </table:table-cell>
          <table:table-cell table:formula="of:=[.D1423]-[.D142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[.B1422]+7" office:value-type="float" office:value="9954" calcext:value-type="float">
            <text:p>9954</text:p>
          </table:table-cell>
          <table:table-cell office:value-type="float" office:value="8640000" calcext:value-type="float">
            <text:p>8640000</text:p>
          </table:table-cell>
          <table:table-cell table:formula="of:=[.B1423]/[.C1423]" office:value-type="float" office:value="0.00115208333333333" calcext:value-type="float">
            <text:p>0,00115208333333333000</text:p>
          </table:table-cell>
          <table:table-cell table:formula="of:=[.D1424]-[.D142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B1423]+7" office:value-type="float" office:value="9961" calcext:value-type="float">
            <text:p>9961</text:p>
          </table:table-cell>
          <table:table-cell office:value-type="float" office:value="8640000" calcext:value-type="float">
            <text:p>8640000</text:p>
          </table:table-cell>
          <table:table-cell table:formula="of:=[.B1424]/[.C1424]" office:value-type="float" office:value="0.00115289351851852" calcext:value-type="float">
            <text:p>0,00115289351851852000</text:p>
          </table:table-cell>
          <table:table-cell table:formula="of:=[.D1425]-[.D142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B1424]+7" office:value-type="float" office:value="9968" calcext:value-type="float">
            <text:p>9968</text:p>
          </table:table-cell>
          <table:table-cell office:value-type="float" office:value="8640000" calcext:value-type="float">
            <text:p>8640000</text:p>
          </table:table-cell>
          <table:table-cell table:formula="of:=[.B1425]/[.C1425]" office:value-type="float" office:value="0.0011537037037037" calcext:value-type="float">
            <text:p>0,00115370370370370000</text:p>
          </table:table-cell>
          <table:table-cell table:formula="of:=[.D1426]-[.D142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B1425]+7" office:value-type="float" office:value="9975" calcext:value-type="float">
            <text:p>9975</text:p>
          </table:table-cell>
          <table:table-cell office:value-type="float" office:value="8640000" calcext:value-type="float">
            <text:p>8640000</text:p>
          </table:table-cell>
          <table:table-cell table:formula="of:=[.B1426]/[.C1426]" office:value-type="float" office:value="0.00115451388888889" calcext:value-type="float">
            <text:p>0,00115451388888889000</text:p>
          </table:table-cell>
          <table:table-cell table:formula="of:=[.D1427]-[.D142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B1426]+7" office:value-type="float" office:value="9982" calcext:value-type="float">
            <text:p>9982</text:p>
          </table:table-cell>
          <table:table-cell office:value-type="float" office:value="8640000" calcext:value-type="float">
            <text:p>8640000</text:p>
          </table:table-cell>
          <table:table-cell table:formula="of:=[.B1427]/[.C1427]" office:value-type="float" office:value="0.00115532407407407" calcext:value-type="float">
            <text:p>0,00115532407407407000</text:p>
          </table:table-cell>
          <table:table-cell table:formula="of:=[.D1428]-[.D142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B1427]+7" office:value-type="float" office:value="9989" calcext:value-type="float">
            <text:p>9989</text:p>
          </table:table-cell>
          <table:table-cell office:value-type="float" office:value="8640000" calcext:value-type="float">
            <text:p>8640000</text:p>
          </table:table-cell>
          <table:table-cell table:formula="of:=[.B1428]/[.C1428]" office:value-type="float" office:value="0.00115613425925926" calcext:value-type="float">
            <text:p>0,00115613425925926000</text:p>
          </table:table-cell>
          <table:table-cell table:formula="of:=[.D1429]-[.D142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B1428]+7" office:value-type="float" office:value="9996" calcext:value-type="float">
            <text:p>9996</text:p>
          </table:table-cell>
          <table:table-cell office:value-type="float" office:value="8640000" calcext:value-type="float">
            <text:p>8640000</text:p>
          </table:table-cell>
          <table:table-cell table:formula="of:=[.B1429]/[.C1429]" office:value-type="float" office:value="0.00115694444444444" calcext:value-type="float">
            <text:p>0,00115694444444444000</text:p>
          </table:table-cell>
          <table:table-cell table:formula="of:=[.D1430]-[.D142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B1429]+7" office:value-type="float" office:value="10003" calcext:value-type="float">
            <text:p>10003</text:p>
          </table:table-cell>
          <table:table-cell office:value-type="float" office:value="8640000" calcext:value-type="float">
            <text:p>8640000</text:p>
          </table:table-cell>
          <table:table-cell table:formula="of:=[.B1430]/[.C1430]" office:value-type="float" office:value="0.00115775462962963" calcext:value-type="float">
            <text:p>0,00115775462962963000</text:p>
          </table:table-cell>
          <table:table-cell table:formula="of:=[.D1431]-[.D143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B1430]+7" office:value-type="float" office:value="10010" calcext:value-type="float">
            <text:p>10010</text:p>
          </table:table-cell>
          <table:table-cell office:value-type="float" office:value="8640000" calcext:value-type="float">
            <text:p>8640000</text:p>
          </table:table-cell>
          <table:table-cell table:formula="of:=[.B1431]/[.C1431]" office:value-type="float" office:value="0.00115856481481481" calcext:value-type="float">
            <text:p>0,00115856481481481000</text:p>
          </table:table-cell>
          <table:table-cell table:formula="of:=[.D1432]-[.D143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B1431]+7" office:value-type="float" office:value="10017" calcext:value-type="float">
            <text:p>10017</text:p>
          </table:table-cell>
          <table:table-cell office:value-type="float" office:value="8640000" calcext:value-type="float">
            <text:p>8640000</text:p>
          </table:table-cell>
          <table:table-cell table:formula="of:=[.B1432]/[.C1432]" office:value-type="float" office:value="0.001159375" calcext:value-type="float">
            <text:p>0,00115937500000000000</text:p>
          </table:table-cell>
          <table:table-cell table:formula="of:=[.D1433]-[.D143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B1432]+7" office:value-type="float" office:value="10024" calcext:value-type="float">
            <text:p>10024</text:p>
          </table:table-cell>
          <table:table-cell office:value-type="float" office:value="8640000" calcext:value-type="float">
            <text:p>8640000</text:p>
          </table:table-cell>
          <table:table-cell table:formula="of:=[.B1433]/[.C1433]" office:value-type="float" office:value="0.00116018518518519" calcext:value-type="float">
            <text:p>0,00116018518518519000</text:p>
          </table:table-cell>
          <table:table-cell table:formula="of:=[.D1434]-[.D143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B1433]+7" office:value-type="float" office:value="10031" calcext:value-type="float">
            <text:p>10031</text:p>
          </table:table-cell>
          <table:table-cell office:value-type="float" office:value="8640000" calcext:value-type="float">
            <text:p>8640000</text:p>
          </table:table-cell>
          <table:table-cell table:formula="of:=[.B1434]/[.C1434]" office:value-type="float" office:value="0.00116099537037037" calcext:value-type="float">
            <text:p>0,00116099537037037000</text:p>
          </table:table-cell>
          <table:table-cell table:formula="of:=[.D1435]-[.D143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B1434]+7" office:value-type="float" office:value="10038" calcext:value-type="float">
            <text:p>10038</text:p>
          </table:table-cell>
          <table:table-cell office:value-type="float" office:value="8640000" calcext:value-type="float">
            <text:p>8640000</text:p>
          </table:table-cell>
          <table:table-cell table:formula="of:=[.B1435]/[.C1435]" office:value-type="float" office:value="0.00116180555555556" calcext:value-type="float">
            <text:p>0,00116180555555556000</text:p>
          </table:table-cell>
          <table:table-cell table:formula="of:=[.D1436]-[.D143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[.B1435]+7" office:value-type="float" office:value="10045" calcext:value-type="float">
            <text:p>10045</text:p>
          </table:table-cell>
          <table:table-cell office:value-type="float" office:value="8640000" calcext:value-type="float">
            <text:p>8640000</text:p>
          </table:table-cell>
          <table:table-cell table:formula="of:=[.B1436]/[.C1436]" office:value-type="float" office:value="0.00116261574074074" calcext:value-type="float">
            <text:p>0,00116261574074074000</text:p>
          </table:table-cell>
          <table:table-cell table:formula="of:=[.D1437]-[.D143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B1436]+7" office:value-type="float" office:value="10052" calcext:value-type="float">
            <text:p>10052</text:p>
          </table:table-cell>
          <table:table-cell office:value-type="float" office:value="8640000" calcext:value-type="float">
            <text:p>8640000</text:p>
          </table:table-cell>
          <table:table-cell table:formula="of:=[.B1437]/[.C1437]" office:value-type="float" office:value="0.00116342592592593" calcext:value-type="float">
            <text:p>0,00116342592592593000</text:p>
          </table:table-cell>
          <table:table-cell table:formula="of:=[.D1438]-[.D143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B1437]+7" office:value-type="float" office:value="10059" calcext:value-type="float">
            <text:p>10059</text:p>
          </table:table-cell>
          <table:table-cell office:value-type="float" office:value="8640000" calcext:value-type="float">
            <text:p>8640000</text:p>
          </table:table-cell>
          <table:table-cell table:formula="of:=[.B1438]/[.C1438]" office:value-type="float" office:value="0.00116423611111111" calcext:value-type="float">
            <text:p>0,00116423611111111000</text:p>
          </table:table-cell>
          <table:table-cell table:formula="of:=[.D1439]-[.D143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B1438]+7" office:value-type="float" office:value="10066" calcext:value-type="float">
            <text:p>10066</text:p>
          </table:table-cell>
          <table:table-cell office:value-type="float" office:value="8640000" calcext:value-type="float">
            <text:p>8640000</text:p>
          </table:table-cell>
          <table:table-cell table:formula="of:=[.B1439]/[.C1439]" office:value-type="float" office:value="0.0011650462962963" calcext:value-type="float">
            <text:p>0,00116504629629630000</text:p>
          </table:table-cell>
          <table:table-cell table:formula="of:=[.D1440]-[.D143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B1439]+7" office:value-type="float" office:value="10073" calcext:value-type="float">
            <text:p>10073</text:p>
          </table:table-cell>
          <table:table-cell office:value-type="float" office:value="8640000" calcext:value-type="float">
            <text:p>8640000</text:p>
          </table:table-cell>
          <table:table-cell table:formula="of:=[.B1440]/[.C1440]" office:value-type="float" office:value="0.00116585648148148" calcext:value-type="float">
            <text:p>0,00116585648148148000</text:p>
          </table:table-cell>
          <table:table-cell table:formula="of:=[.D1441]-[.D144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B1440]+7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1441]/[.C1441]" office:value-type="float" office:value="0.00116666666666667" calcext:value-type="float">
            <text:p>0,00116666666666667000</text:p>
          </table:table-cell>
          <table:table-cell table:formula="of:=[.D1442]-[.D144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B1441]+7" office:value-type="float" office:value="10087" calcext:value-type="float">
            <text:p>10087</text:p>
          </table:table-cell>
          <table:table-cell office:value-type="float" office:value="8640000" calcext:value-type="float">
            <text:p>8640000</text:p>
          </table:table-cell>
          <table:table-cell table:formula="of:=[.B1442]/[.C1442]" office:value-type="float" office:value="0.00116747685185185" calcext:value-type="float">
            <text:p>0,00116747685185185000</text:p>
          </table:table-cell>
          <table:table-cell table:formula="of:=[.D1443]-[.D144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B1442]+7" office:value-type="float" office:value="10094" calcext:value-type="float">
            <text:p>10094</text:p>
          </table:table-cell>
          <table:table-cell office:value-type="float" office:value="8640000" calcext:value-type="float">
            <text:p>8640000</text:p>
          </table:table-cell>
          <table:table-cell table:formula="of:=[.B1443]/[.C1443]" office:value-type="float" office:value="0.00116828703703704" calcext:value-type="float">
            <text:p>0,00116828703703704000</text:p>
          </table:table-cell>
          <table:table-cell table:formula="of:=[.D1444]-[.D144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B1443]+7" office:value-type="float" office:value="10101" calcext:value-type="float">
            <text:p>10101</text:p>
          </table:table-cell>
          <table:table-cell office:value-type="float" office:value="8640000" calcext:value-type="float">
            <text:p>8640000</text:p>
          </table:table-cell>
          <table:table-cell table:formula="of:=[.B1444]/[.C1444]" office:value-type="float" office:value="0.00116909722222222" calcext:value-type="float">
            <text:p>0,00116909722222222000</text:p>
          </table:table-cell>
          <table:table-cell table:formula="of:=[.D1445]-[.D144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B1444]+7" office:value-type="float" office:value="10108" calcext:value-type="float">
            <text:p>10108</text:p>
          </table:table-cell>
          <table:table-cell office:value-type="float" office:value="8640000" calcext:value-type="float">
            <text:p>8640000</text:p>
          </table:table-cell>
          <table:table-cell table:formula="of:=[.B1445]/[.C1445]" office:value-type="float" office:value="0.00116990740740741" calcext:value-type="float">
            <text:p>0,00116990740740741000</text:p>
          </table:table-cell>
          <table:table-cell table:formula="of:=[.D1446]-[.D144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[.B1445]+7" office:value-type="float" office:value="10115" calcext:value-type="float">
            <text:p>10115</text:p>
          </table:table-cell>
          <table:table-cell office:value-type="float" office:value="8640000" calcext:value-type="float">
            <text:p>8640000</text:p>
          </table:table-cell>
          <table:table-cell table:formula="of:=[.B1446]/[.C1446]" office:value-type="float" office:value="0.00117071759259259" calcext:value-type="float">
            <text:p>0,00117071759259259000</text:p>
          </table:table-cell>
          <table:table-cell table:formula="of:=[.D1447]-[.D144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B1446]+7" office:value-type="float" office:value="10122" calcext:value-type="float">
            <text:p>10122</text:p>
          </table:table-cell>
          <table:table-cell office:value-type="float" office:value="8640000" calcext:value-type="float">
            <text:p>8640000</text:p>
          </table:table-cell>
          <table:table-cell table:formula="of:=[.B1447]/[.C1447]" office:value-type="float" office:value="0.00117152777777778" calcext:value-type="float">
            <text:p>0,00117152777777778000</text:p>
          </table:table-cell>
          <table:table-cell table:formula="of:=[.D1448]-[.D144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B1447]+7" office:value-type="float" office:value="10129" calcext:value-type="float">
            <text:p>10129</text:p>
          </table:table-cell>
          <table:table-cell office:value-type="float" office:value="8640000" calcext:value-type="float">
            <text:p>8640000</text:p>
          </table:table-cell>
          <table:table-cell table:formula="of:=[.B1448]/[.C1448]" office:value-type="float" office:value="0.00117233796296296" calcext:value-type="float">
            <text:p>0,00117233796296296000</text:p>
          </table:table-cell>
          <table:table-cell table:formula="of:=[.D1449]-[.D144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B1448]+7" office:value-type="float" office:value="10136" calcext:value-type="float">
            <text:p>10136</text:p>
          </table:table-cell>
          <table:table-cell office:value-type="float" office:value="8640000" calcext:value-type="float">
            <text:p>8640000</text:p>
          </table:table-cell>
          <table:table-cell table:formula="of:=[.B1449]/[.C1449]" office:value-type="float" office:value="0.00117314814814815" calcext:value-type="float">
            <text:p>0,00117314814814815000</text:p>
          </table:table-cell>
          <table:table-cell table:formula="of:=[.D1450]-[.D144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B1449]+7" office:value-type="float" office:value="10143" calcext:value-type="float">
            <text:p>10143</text:p>
          </table:table-cell>
          <table:table-cell office:value-type="float" office:value="8640000" calcext:value-type="float">
            <text:p>8640000</text:p>
          </table:table-cell>
          <table:table-cell table:formula="of:=[.B1450]/[.C1450]" office:value-type="float" office:value="0.00117395833333333" calcext:value-type="float">
            <text:p>0,00117395833333333000</text:p>
          </table:table-cell>
          <table:table-cell table:formula="of:=[.D1451]-[.D145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B1450]+7" office:value-type="float" office:value="10150" calcext:value-type="float">
            <text:p>10150</text:p>
          </table:table-cell>
          <table:table-cell office:value-type="float" office:value="8640000" calcext:value-type="float">
            <text:p>8640000</text:p>
          </table:table-cell>
          <table:table-cell table:formula="of:=[.B1451]/[.C1451]" office:value-type="float" office:value="0.00117476851851852" calcext:value-type="float">
            <text:p>0,00117476851851852000</text:p>
          </table:table-cell>
          <table:table-cell table:formula="of:=[.D1452]-[.D145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B1451]+7" office:value-type="float" office:value="10157" calcext:value-type="float">
            <text:p>10157</text:p>
          </table:table-cell>
          <table:table-cell office:value-type="float" office:value="8640000" calcext:value-type="float">
            <text:p>8640000</text:p>
          </table:table-cell>
          <table:table-cell table:formula="of:=[.B1452]/[.C1452]" office:value-type="float" office:value="0.0011755787037037" calcext:value-type="float">
            <text:p>0,00117557870370370000</text:p>
          </table:table-cell>
          <table:table-cell table:formula="of:=[.D1453]-[.D145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B1452]+7" office:value-type="float" office:value="10164" calcext:value-type="float">
            <text:p>10164</text:p>
          </table:table-cell>
          <table:table-cell office:value-type="float" office:value="8640000" calcext:value-type="float">
            <text:p>8640000</text:p>
          </table:table-cell>
          <table:table-cell table:formula="of:=[.B1453]/[.C1453]" office:value-type="float" office:value="0.00117638888888889" calcext:value-type="float">
            <text:p>0,00117638888888889000</text:p>
          </table:table-cell>
          <table:table-cell table:formula="of:=[.D1454]-[.D145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B1453]+7" office:value-type="float" office:value="10171" calcext:value-type="float">
            <text:p>10171</text:p>
          </table:table-cell>
          <table:table-cell office:value-type="float" office:value="8640000" calcext:value-type="float">
            <text:p>8640000</text:p>
          </table:table-cell>
          <table:table-cell table:formula="of:=[.B1454]/[.C1454]" office:value-type="float" office:value="0.00117719907407407" calcext:value-type="float">
            <text:p>0,00117719907407407000</text:p>
          </table:table-cell>
          <table:table-cell table:formula="of:=[.D1455]-[.D145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B1454]+7" office:value-type="float" office:value="10178" calcext:value-type="float">
            <text:p>10178</text:p>
          </table:table-cell>
          <table:table-cell office:value-type="float" office:value="8640000" calcext:value-type="float">
            <text:p>8640000</text:p>
          </table:table-cell>
          <table:table-cell table:formula="of:=[.B1455]/[.C1455]" office:value-type="float" office:value="0.00117800925925926" calcext:value-type="float">
            <text:p>0,00117800925925926000</text:p>
          </table:table-cell>
          <table:table-cell table:formula="of:=[.D1456]-[.D145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B1455]+7" office:value-type="float" office:value="10185" calcext:value-type="float">
            <text:p>10185</text:p>
          </table:table-cell>
          <table:table-cell office:value-type="float" office:value="8640000" calcext:value-type="float">
            <text:p>8640000</text:p>
          </table:table-cell>
          <table:table-cell table:formula="of:=[.B1456]/[.C1456]" office:value-type="float" office:value="0.00117881944444444" calcext:value-type="float">
            <text:p>0,00117881944444444000</text:p>
          </table:table-cell>
          <table:table-cell table:formula="of:=[.D1457]-[.D145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[.B1456]+7" office:value-type="float" office:value="10192" calcext:value-type="float">
            <text:p>10192</text:p>
          </table:table-cell>
          <table:table-cell office:value-type="float" office:value="8640000" calcext:value-type="float">
            <text:p>8640000</text:p>
          </table:table-cell>
          <table:table-cell table:formula="of:=[.B1457]/[.C1457]" office:value-type="float" office:value="0.00117962962962963" calcext:value-type="float">
            <text:p>0,00117962962962963000</text:p>
          </table:table-cell>
          <table:table-cell table:formula="of:=[.D1458]-[.D145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B1457]+7" office:value-type="float" office:value="10199" calcext:value-type="float">
            <text:p>10199</text:p>
          </table:table-cell>
          <table:table-cell office:value-type="float" office:value="8640000" calcext:value-type="float">
            <text:p>8640000</text:p>
          </table:table-cell>
          <table:table-cell table:formula="of:=[.B1458]/[.C1458]" office:value-type="float" office:value="0.00118043981481481" calcext:value-type="float">
            <text:p>0,00118043981481481000</text:p>
          </table:table-cell>
          <table:table-cell table:formula="of:=[.D1459]-[.D145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B1458]+7" office:value-type="float" office:value="10206" calcext:value-type="float">
            <text:p>10206</text:p>
          </table:table-cell>
          <table:table-cell office:value-type="float" office:value="8640000" calcext:value-type="float">
            <text:p>8640000</text:p>
          </table:table-cell>
          <table:table-cell table:formula="of:=[.B1459]/[.C1459]" office:value-type="float" office:value="0.00118125" calcext:value-type="float">
            <text:p>0,00118125000000000000</text:p>
          </table:table-cell>
          <table:table-cell table:formula="of:=[.D1460]-[.D145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B1459]+7" office:value-type="float" office:value="10213" calcext:value-type="float">
            <text:p>10213</text:p>
          </table:table-cell>
          <table:table-cell office:value-type="float" office:value="8640000" calcext:value-type="float">
            <text:p>8640000</text:p>
          </table:table-cell>
          <table:table-cell table:formula="of:=[.B1460]/[.C1460]" office:value-type="float" office:value="0.00118206018518519" calcext:value-type="float">
            <text:p>0,00118206018518519000</text:p>
          </table:table-cell>
          <table:table-cell table:formula="of:=[.D1461]-[.D146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B1460]+7" office:value-type="float" office:value="10220" calcext:value-type="float">
            <text:p>10220</text:p>
          </table:table-cell>
          <table:table-cell office:value-type="float" office:value="8640000" calcext:value-type="float">
            <text:p>8640000</text:p>
          </table:table-cell>
          <table:table-cell table:formula="of:=[.B1461]/[.C1461]" office:value-type="float" office:value="0.00118287037037037" calcext:value-type="float">
            <text:p>0,00118287037037037000</text:p>
          </table:table-cell>
          <table:table-cell table:formula="of:=[.D1462]-[.D146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B1461]+7" office:value-type="float" office:value="10227" calcext:value-type="float">
            <text:p>10227</text:p>
          </table:table-cell>
          <table:table-cell office:value-type="float" office:value="8640000" calcext:value-type="float">
            <text:p>8640000</text:p>
          </table:table-cell>
          <table:table-cell table:formula="of:=[.B1462]/[.C1462]" office:value-type="float" office:value="0.00118368055555556" calcext:value-type="float">
            <text:p>0,00118368055555556000</text:p>
          </table:table-cell>
          <table:table-cell table:formula="of:=[.D1463]-[.D146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[.B1462]+7" office:value-type="float" office:value="10234" calcext:value-type="float">
            <text:p>10234</text:p>
          </table:table-cell>
          <table:table-cell office:value-type="float" office:value="8640000" calcext:value-type="float">
            <text:p>8640000</text:p>
          </table:table-cell>
          <table:table-cell table:formula="of:=[.B1463]/[.C1463]" office:value-type="float" office:value="0.00118449074074074" calcext:value-type="float">
            <text:p>0,00118449074074074000</text:p>
          </table:table-cell>
          <table:table-cell table:formula="of:=[.D1464]-[.D146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B1463]+7" office:value-type="float" office:value="10241" calcext:value-type="float">
            <text:p>10241</text:p>
          </table:table-cell>
          <table:table-cell office:value-type="float" office:value="8640000" calcext:value-type="float">
            <text:p>8640000</text:p>
          </table:table-cell>
          <table:table-cell table:formula="of:=[.B1464]/[.C1464]" office:value-type="float" office:value="0.00118530092592593" calcext:value-type="float">
            <text:p>0,00118530092592593000</text:p>
          </table:table-cell>
          <table:table-cell table:formula="of:=[.D1465]-[.D146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B1464]+7" office:value-type="float" office:value="10248" calcext:value-type="float">
            <text:p>10248</text:p>
          </table:table-cell>
          <table:table-cell office:value-type="float" office:value="8640000" calcext:value-type="float">
            <text:p>8640000</text:p>
          </table:table-cell>
          <table:table-cell table:formula="of:=[.B1465]/[.C1465]" office:value-type="float" office:value="0.00118611111111111" calcext:value-type="float">
            <text:p>0,00118611111111111000</text:p>
          </table:table-cell>
          <table:table-cell table:formula="of:=[.D1466]-[.D146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B1465]+7" office:value-type="float" office:value="10255" calcext:value-type="float">
            <text:p>10255</text:p>
          </table:table-cell>
          <table:table-cell office:value-type="float" office:value="8640000" calcext:value-type="float">
            <text:p>8640000</text:p>
          </table:table-cell>
          <table:table-cell table:formula="of:=[.B1466]/[.C1466]" office:value-type="float" office:value="0.0011869212962963" calcext:value-type="float">
            <text:p>0,00118692129629630000</text:p>
          </table:table-cell>
          <table:table-cell table:formula="of:=[.D1467]-[.D146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B1466]+7" office:value-type="float" office:value="10262" calcext:value-type="float">
            <text:p>10262</text:p>
          </table:table-cell>
          <table:table-cell office:value-type="float" office:value="8640000" calcext:value-type="float">
            <text:p>8640000</text:p>
          </table:table-cell>
          <table:table-cell table:formula="of:=[.B1467]/[.C1467]" office:value-type="float" office:value="0.00118773148148148" calcext:value-type="float">
            <text:p>0,00118773148148148000</text:p>
          </table:table-cell>
          <table:table-cell table:formula="of:=[.D1468]-[.D146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B1467]+7" office:value-type="float" office:value="10269" calcext:value-type="float">
            <text:p>10269</text:p>
          </table:table-cell>
          <table:table-cell office:value-type="float" office:value="8640000" calcext:value-type="float">
            <text:p>8640000</text:p>
          </table:table-cell>
          <table:table-cell table:formula="of:=[.B1468]/[.C1468]" office:value-type="float" office:value="0.00118854166666667" calcext:value-type="float">
            <text:p>0,00118854166666667000</text:p>
          </table:table-cell>
          <table:table-cell table:formula="of:=[.D1469]-[.D146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B1468]+7" office:value-type="float" office:value="10276" calcext:value-type="float">
            <text:p>10276</text:p>
          </table:table-cell>
          <table:table-cell office:value-type="float" office:value="8640000" calcext:value-type="float">
            <text:p>8640000</text:p>
          </table:table-cell>
          <table:table-cell table:formula="of:=[.B1469]/[.C1469]" office:value-type="float" office:value="0.00118935185185185" calcext:value-type="float">
            <text:p>0,00118935185185185000</text:p>
          </table:table-cell>
          <table:table-cell table:formula="of:=[.D1470]-[.D146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[.B1469]+7" office:value-type="float" office:value="10283" calcext:value-type="float">
            <text:p>10283</text:p>
          </table:table-cell>
          <table:table-cell office:value-type="float" office:value="8640000" calcext:value-type="float">
            <text:p>8640000</text:p>
          </table:table-cell>
          <table:table-cell table:formula="of:=[.B1470]/[.C1470]" office:value-type="float" office:value="0.00119016203703704" calcext:value-type="float">
            <text:p>0,00119016203703704000</text:p>
          </table:table-cell>
          <table:table-cell table:formula="of:=[.D1471]-[.D147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B1470]+7" office:value-type="float" office:value="10290" calcext:value-type="float">
            <text:p>10290</text:p>
          </table:table-cell>
          <table:table-cell office:value-type="float" office:value="8640000" calcext:value-type="float">
            <text:p>8640000</text:p>
          </table:table-cell>
          <table:table-cell table:formula="of:=[.B1471]/[.C1471]" office:value-type="float" office:value="0.00119097222222222" calcext:value-type="float">
            <text:p>0,00119097222222222000</text:p>
          </table:table-cell>
          <table:table-cell table:formula="of:=[.D1472]-[.D147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B1471]+7" office:value-type="float" office:value="10297" calcext:value-type="float">
            <text:p>10297</text:p>
          </table:table-cell>
          <table:table-cell office:value-type="float" office:value="8640000" calcext:value-type="float">
            <text:p>8640000</text:p>
          </table:table-cell>
          <table:table-cell table:formula="of:=[.B1472]/[.C1472]" office:value-type="float" office:value="0.00119178240740741" calcext:value-type="float">
            <text:p>0,00119178240740741000</text:p>
          </table:table-cell>
          <table:table-cell table:formula="of:=[.D1473]-[.D147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B1472]+7" office:value-type="float" office:value="10304" calcext:value-type="float">
            <text:p>10304</text:p>
          </table:table-cell>
          <table:table-cell office:value-type="float" office:value="8640000" calcext:value-type="float">
            <text:p>8640000</text:p>
          </table:table-cell>
          <table:table-cell table:formula="of:=[.B1473]/[.C1473]" office:value-type="float" office:value="0.00119259259259259" calcext:value-type="float">
            <text:p>0,00119259259259259000</text:p>
          </table:table-cell>
          <table:table-cell table:formula="of:=[.D1474]-[.D147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B1473]+7" office:value-type="float" office:value="10311" calcext:value-type="float">
            <text:p>10311</text:p>
          </table:table-cell>
          <table:table-cell office:value-type="float" office:value="8640000" calcext:value-type="float">
            <text:p>8640000</text:p>
          </table:table-cell>
          <table:table-cell table:formula="of:=[.B1474]/[.C1474]" office:value-type="float" office:value="0.00119340277777778" calcext:value-type="float">
            <text:p>0,00119340277777778000</text:p>
          </table:table-cell>
          <table:table-cell table:formula="of:=[.D1475]-[.D147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B1474]+7" office:value-type="float" office:value="10318" calcext:value-type="float">
            <text:p>10318</text:p>
          </table:table-cell>
          <table:table-cell office:value-type="float" office:value="8640000" calcext:value-type="float">
            <text:p>8640000</text:p>
          </table:table-cell>
          <table:table-cell table:formula="of:=[.B1475]/[.C1475]" office:value-type="float" office:value="0.00119421296296296" calcext:value-type="float">
            <text:p>0,00119421296296296000</text:p>
          </table:table-cell>
          <table:table-cell table:formula="of:=[.D1476]-[.D147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B1475]+7" office:value-type="float" office:value="10325" calcext:value-type="float">
            <text:p>10325</text:p>
          </table:table-cell>
          <table:table-cell office:value-type="float" office:value="8640000" calcext:value-type="float">
            <text:p>8640000</text:p>
          </table:table-cell>
          <table:table-cell table:formula="of:=[.B1476]/[.C1476]" office:value-type="float" office:value="0.00119502314814815" calcext:value-type="float">
            <text:p>0,00119502314814815000</text:p>
          </table:table-cell>
          <table:table-cell table:formula="of:=[.D1477]-[.D147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B1476]+7" office:value-type="float" office:value="10332" calcext:value-type="float">
            <text:p>10332</text:p>
          </table:table-cell>
          <table:table-cell office:value-type="float" office:value="8640000" calcext:value-type="float">
            <text:p>8640000</text:p>
          </table:table-cell>
          <table:table-cell table:formula="of:=[.B1477]/[.C1477]" office:value-type="float" office:value="0.00119583333333333" calcext:value-type="float">
            <text:p>0,00119583333333333000</text:p>
          </table:table-cell>
          <table:table-cell table:formula="of:=[.D1478]-[.D147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[.B1477]+7" office:value-type="float" office:value="10339" calcext:value-type="float">
            <text:p>10339</text:p>
          </table:table-cell>
          <table:table-cell office:value-type="float" office:value="8640000" calcext:value-type="float">
            <text:p>8640000</text:p>
          </table:table-cell>
          <table:table-cell table:formula="of:=[.B1478]/[.C1478]" office:value-type="float" office:value="0.00119664351851852" calcext:value-type="float">
            <text:p>0,00119664351851852000</text:p>
          </table:table-cell>
          <table:table-cell table:formula="of:=[.D1479]-[.D147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B1478]+7" office:value-type="float" office:value="10346" calcext:value-type="float">
            <text:p>10346</text:p>
          </table:table-cell>
          <table:table-cell office:value-type="float" office:value="8640000" calcext:value-type="float">
            <text:p>8640000</text:p>
          </table:table-cell>
          <table:table-cell table:formula="of:=[.B1479]/[.C1479]" office:value-type="float" office:value="0.0011974537037037" calcext:value-type="float">
            <text:p>0,00119745370370370000</text:p>
          </table:table-cell>
          <table:table-cell table:formula="of:=[.D1480]-[.D147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B1479]+7" office:value-type="float" office:value="10353" calcext:value-type="float">
            <text:p>10353</text:p>
          </table:table-cell>
          <table:table-cell office:value-type="float" office:value="8640000" calcext:value-type="float">
            <text:p>8640000</text:p>
          </table:table-cell>
          <table:table-cell table:formula="of:=[.B1480]/[.C1480]" office:value-type="float" office:value="0.00119826388888889" calcext:value-type="float">
            <text:p>0,00119826388888889000</text:p>
          </table:table-cell>
          <table:table-cell table:formula="of:=[.D1481]-[.D148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B1480]+7" office:value-type="float" office:value="10360" calcext:value-type="float">
            <text:p>10360</text:p>
          </table:table-cell>
          <table:table-cell office:value-type="float" office:value="8640000" calcext:value-type="float">
            <text:p>8640000</text:p>
          </table:table-cell>
          <table:table-cell table:formula="of:=[.B1481]/[.C1481]" office:value-type="float" office:value="0.00119907407407407" calcext:value-type="float">
            <text:p>0,00119907407407407000</text:p>
          </table:table-cell>
          <table:table-cell table:formula="of:=[.D1482]-[.D148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B1481]+7" office:value-type="float" office:value="10367" calcext:value-type="float">
            <text:p>10367</text:p>
          </table:table-cell>
          <table:table-cell office:value-type="float" office:value="8640000" calcext:value-type="float">
            <text:p>8640000</text:p>
          </table:table-cell>
          <table:table-cell table:formula="of:=[.B1482]/[.C1482]" office:value-type="float" office:value="0.00119988425925926" calcext:value-type="float">
            <text:p>0,00119988425925926000</text:p>
          </table:table-cell>
          <table:table-cell table:formula="of:=[.D1483]-[.D148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B1482]+7" office:value-type="float" office:value="10374" calcext:value-type="float">
            <text:p>10374</text:p>
          </table:table-cell>
          <table:table-cell office:value-type="float" office:value="8640000" calcext:value-type="float">
            <text:p>8640000</text:p>
          </table:table-cell>
          <table:table-cell table:formula="of:=[.B1483]/[.C1483]" office:value-type="float" office:value="0.00120069444444444" calcext:value-type="float">
            <text:p>0,00120069444444444000</text:p>
          </table:table-cell>
          <table:table-cell table:formula="of:=[.D1484]-[.D148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B1483]+7" office:value-type="float" office:value="10381" calcext:value-type="float">
            <text:p>10381</text:p>
          </table:table-cell>
          <table:table-cell office:value-type="float" office:value="8640000" calcext:value-type="float">
            <text:p>8640000</text:p>
          </table:table-cell>
          <table:table-cell table:formula="of:=[.B1484]/[.C1484]" office:value-type="float" office:value="0.00120150462962963" calcext:value-type="float">
            <text:p>0,00120150462962963000</text:p>
          </table:table-cell>
          <table:table-cell table:formula="of:=[.D1485]-[.D148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B1484]+7" office:value-type="float" office:value="10388" calcext:value-type="float">
            <text:p>10388</text:p>
          </table:table-cell>
          <table:table-cell office:value-type="float" office:value="8640000" calcext:value-type="float">
            <text:p>8640000</text:p>
          </table:table-cell>
          <table:table-cell table:formula="of:=[.B1485]/[.C1485]" office:value-type="float" office:value="0.00120231481481482" calcext:value-type="float">
            <text:p>0,00120231481481482000</text:p>
          </table:table-cell>
          <table:table-cell table:formula="of:=[.D1486]-[.D148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B1485]+7" office:value-type="float" office:value="10395" calcext:value-type="float">
            <text:p>10395</text:p>
          </table:table-cell>
          <table:table-cell office:value-type="float" office:value="8640000" calcext:value-type="float">
            <text:p>8640000</text:p>
          </table:table-cell>
          <table:table-cell table:formula="of:=[.B1486]/[.C1486]" office:value-type="float" office:value="0.001203125" calcext:value-type="float">
            <text:p>0,00120312500000000000</text:p>
          </table:table-cell>
          <table:table-cell table:formula="of:=[.D1487]-[.D148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B1486]+7" office:value-type="float" office:value="10402" calcext:value-type="float">
            <text:p>10402</text:p>
          </table:table-cell>
          <table:table-cell office:value-type="float" office:value="8640000" calcext:value-type="float">
            <text:p>8640000</text:p>
          </table:table-cell>
          <table:table-cell table:formula="of:=[.B1487]/[.C1487]" office:value-type="float" office:value="0.00120393518518519" calcext:value-type="float">
            <text:p>0,00120393518518519000</text:p>
          </table:table-cell>
          <table:table-cell table:formula="of:=[.D1488]-[.D148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B1487]+7" office:value-type="float" office:value="10409" calcext:value-type="float">
            <text:p>10409</text:p>
          </table:table-cell>
          <table:table-cell office:value-type="float" office:value="8640000" calcext:value-type="float">
            <text:p>8640000</text:p>
          </table:table-cell>
          <table:table-cell table:formula="of:=[.B1488]/[.C1488]" office:value-type="float" office:value="0.00120474537037037" calcext:value-type="float">
            <text:p>0,00120474537037037000</text:p>
          </table:table-cell>
          <table:table-cell table:formula="of:=[.D1489]-[.D148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B1488]+7" office:value-type="float" office:value="10416" calcext:value-type="float">
            <text:p>10416</text:p>
          </table:table-cell>
          <table:table-cell office:value-type="float" office:value="8640000" calcext:value-type="float">
            <text:p>8640000</text:p>
          </table:table-cell>
          <table:table-cell table:formula="of:=[.B1489]/[.C1489]" office:value-type="float" office:value="0.00120555555555556" calcext:value-type="float">
            <text:p>0,00120555555555556000</text:p>
          </table:table-cell>
          <table:table-cell table:formula="of:=[.D1490]-[.D148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B1489]+7" office:value-type="float" office:value="10423" calcext:value-type="float">
            <text:p>10423</text:p>
          </table:table-cell>
          <table:table-cell office:value-type="float" office:value="8640000" calcext:value-type="float">
            <text:p>8640000</text:p>
          </table:table-cell>
          <table:table-cell table:formula="of:=[.B1490]/[.C1490]" office:value-type="float" office:value="0.00120636574074074" calcext:value-type="float">
            <text:p>0,00120636574074074000</text:p>
          </table:table-cell>
          <table:table-cell table:formula="of:=[.D1491]-[.D149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B1490]+7" office:value-type="float" office:value="10430" calcext:value-type="float">
            <text:p>10430</text:p>
          </table:table-cell>
          <table:table-cell office:value-type="float" office:value="8640000" calcext:value-type="float">
            <text:p>8640000</text:p>
          </table:table-cell>
          <table:table-cell table:formula="of:=[.B1491]/[.C1491]" office:value-type="float" office:value="0.00120717592592593" calcext:value-type="float">
            <text:p>0,00120717592592593000</text:p>
          </table:table-cell>
          <table:table-cell table:formula="of:=[.D1492]-[.D149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B1491]+7" office:value-type="float" office:value="10437" calcext:value-type="float">
            <text:p>10437</text:p>
          </table:table-cell>
          <table:table-cell office:value-type="float" office:value="8640000" calcext:value-type="float">
            <text:p>8640000</text:p>
          </table:table-cell>
          <table:table-cell table:formula="of:=[.B1492]/[.C1492]" office:value-type="float" office:value="0.00120798611111111" calcext:value-type="float">
            <text:p>0,00120798611111111000</text:p>
          </table:table-cell>
          <table:table-cell table:formula="of:=[.D1493]-[.D149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B1492]+7" office:value-type="float" office:value="10444" calcext:value-type="float">
            <text:p>10444</text:p>
          </table:table-cell>
          <table:table-cell office:value-type="float" office:value="8640000" calcext:value-type="float">
            <text:p>8640000</text:p>
          </table:table-cell>
          <table:table-cell table:formula="of:=[.B1493]/[.C1493]" office:value-type="float" office:value="0.0012087962962963" calcext:value-type="float">
            <text:p>0,00120879629629630000</text:p>
          </table:table-cell>
          <table:table-cell table:formula="of:=[.D1494]-[.D149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B1493]+7" office:value-type="float" office:value="10451" calcext:value-type="float">
            <text:p>10451</text:p>
          </table:table-cell>
          <table:table-cell office:value-type="float" office:value="8640000" calcext:value-type="float">
            <text:p>8640000</text:p>
          </table:table-cell>
          <table:table-cell table:formula="of:=[.B1494]/[.C1494]" office:value-type="float" office:value="0.00120960648148148" calcext:value-type="float">
            <text:p>0,00120960648148148000</text:p>
          </table:table-cell>
          <table:table-cell table:formula="of:=[.D1495]-[.D149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B1494]+7" office:value-type="float" office:value="10458" calcext:value-type="float">
            <text:p>10458</text:p>
          </table:table-cell>
          <table:table-cell office:value-type="float" office:value="8640000" calcext:value-type="float">
            <text:p>8640000</text:p>
          </table:table-cell>
          <table:table-cell table:formula="of:=[.B1495]/[.C1495]" office:value-type="float" office:value="0.00121041666666667" calcext:value-type="float">
            <text:p>0,00121041666666667000</text:p>
          </table:table-cell>
          <table:table-cell table:formula="of:=[.D1496]-[.D149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B1495]+7" office:value-type="float" office:value="10465" calcext:value-type="float">
            <text:p>10465</text:p>
          </table:table-cell>
          <table:table-cell office:value-type="float" office:value="8640000" calcext:value-type="float">
            <text:p>8640000</text:p>
          </table:table-cell>
          <table:table-cell table:formula="of:=[.B1496]/[.C1496]" office:value-type="float" office:value="0.00121122685185185" calcext:value-type="float">
            <text:p>0,00121122685185185000</text:p>
          </table:table-cell>
          <table:table-cell table:formula="of:=[.D1497]-[.D149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B1496]+7" office:value-type="float" office:value="10472" calcext:value-type="float">
            <text:p>10472</text:p>
          </table:table-cell>
          <table:table-cell office:value-type="float" office:value="8640000" calcext:value-type="float">
            <text:p>8640000</text:p>
          </table:table-cell>
          <table:table-cell table:formula="of:=[.B1497]/[.C1497]" office:value-type="float" office:value="0.00121203703703704" calcext:value-type="float">
            <text:p>0,00121203703703704000</text:p>
          </table:table-cell>
          <table:table-cell table:formula="of:=[.D1498]-[.D149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B1497]+7" office:value-type="float" office:value="10479" calcext:value-type="float">
            <text:p>10479</text:p>
          </table:table-cell>
          <table:table-cell office:value-type="float" office:value="8640000" calcext:value-type="float">
            <text:p>8640000</text:p>
          </table:table-cell>
          <table:table-cell table:formula="of:=[.B1498]/[.C1498]" office:value-type="float" office:value="0.00121284722222222" calcext:value-type="float">
            <text:p>0,00121284722222222000</text:p>
          </table:table-cell>
          <table:table-cell table:formula="of:=[.D1499]-[.D149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B1498]+7" office:value-type="float" office:value="10486" calcext:value-type="float">
            <text:p>10486</text:p>
          </table:table-cell>
          <table:table-cell office:value-type="float" office:value="8640000" calcext:value-type="float">
            <text:p>8640000</text:p>
          </table:table-cell>
          <table:table-cell table:formula="of:=[.B1499]/[.C1499]" office:value-type="float" office:value="0.00121365740740741" calcext:value-type="float">
            <text:p>0,00121365740740741000</text:p>
          </table:table-cell>
          <table:table-cell table:formula="of:=[.D1500]-[.D149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B1499]+7" office:value-type="float" office:value="10493" calcext:value-type="float">
            <text:p>10493</text:p>
          </table:table-cell>
          <table:table-cell office:value-type="float" office:value="8640000" calcext:value-type="float">
            <text:p>8640000</text:p>
          </table:table-cell>
          <table:table-cell table:formula="of:=[.B1500]/[.C1500]" office:value-type="float" office:value="0.00121446759259259" calcext:value-type="float">
            <text:p>0,00121446759259259000</text:p>
          </table:table-cell>
          <table:table-cell table:formula="of:=[.D1501]-[.D150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1500]+7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1501]/[.C1501]" office:value-type="float" office:value="0.00121527777777778" calcext:value-type="float">
            <text:p>0,00121527777777778000</text:p>
          </table:table-cell>
          <table:table-cell table:formula="of:=[.D1502]-[.D150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[.B1501]+7" office:value-type="float" office:value="10507" calcext:value-type="float">
            <text:p>10507</text:p>
          </table:table-cell>
          <table:table-cell office:value-type="float" office:value="8640000" calcext:value-type="float">
            <text:p>8640000</text:p>
          </table:table-cell>
          <table:table-cell table:formula="of:=[.B1502]/[.C1502]" office:value-type="float" office:value="0.00121608796296296" calcext:value-type="float">
            <text:p>0,00121608796296296000</text:p>
          </table:table-cell>
          <table:table-cell table:formula="of:=[.D1503]-[.D150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B1502]+7" office:value-type="float" office:value="10514" calcext:value-type="float">
            <text:p>10514</text:p>
          </table:table-cell>
          <table:table-cell office:value-type="float" office:value="8640000" calcext:value-type="float">
            <text:p>8640000</text:p>
          </table:table-cell>
          <table:table-cell table:formula="of:=[.B1503]/[.C1503]" office:value-type="float" office:value="0.00121689814814815" calcext:value-type="float">
            <text:p>0,00121689814814815000</text:p>
          </table:table-cell>
          <table:table-cell table:formula="of:=[.D1504]-[.D150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[.B1503]+7" office:value-type="float" office:value="10521" calcext:value-type="float">
            <text:p>10521</text:p>
          </table:table-cell>
          <table:table-cell office:value-type="float" office:value="8640000" calcext:value-type="float">
            <text:p>8640000</text:p>
          </table:table-cell>
          <table:table-cell table:formula="of:=[.B1504]/[.C1504]" office:value-type="float" office:value="0.00121770833333333" calcext:value-type="float">
            <text:p>0,00121770833333333000</text:p>
          </table:table-cell>
          <table:table-cell table:formula="of:=[.D1505]-[.D150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[.B1504]+7" office:value-type="float" office:value="10528" calcext:value-type="float">
            <text:p>10528</text:p>
          </table:table-cell>
          <table:table-cell office:value-type="float" office:value="8640000" calcext:value-type="float">
            <text:p>8640000</text:p>
          </table:table-cell>
          <table:table-cell table:formula="of:=[.B1505]/[.C1505]" office:value-type="float" office:value="0.00121851851851852" calcext:value-type="float">
            <text:p>0,00121851851851852000</text:p>
          </table:table-cell>
          <table:table-cell table:formula="of:=[.D1506]-[.D150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[.B1505]+7" office:value-type="float" office:value="10535" calcext:value-type="float">
            <text:p>10535</text:p>
          </table:table-cell>
          <table:table-cell office:value-type="float" office:value="8640000" calcext:value-type="float">
            <text:p>8640000</text:p>
          </table:table-cell>
          <table:table-cell table:formula="of:=[.B1506]/[.C1506]" office:value-type="float" office:value="0.0012193287037037" calcext:value-type="float">
            <text:p>0,00121932870370370000</text:p>
          </table:table-cell>
          <table:table-cell table:formula="of:=[.D1507]-[.D150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B1506]+7" office:value-type="float" office:value="10542" calcext:value-type="float">
            <text:p>10542</text:p>
          </table:table-cell>
          <table:table-cell office:value-type="float" office:value="8640000" calcext:value-type="float">
            <text:p>8640000</text:p>
          </table:table-cell>
          <table:table-cell table:formula="of:=[.B1507]/[.C1507]" office:value-type="float" office:value="0.00122013888888889" calcext:value-type="float">
            <text:p>0,00122013888888889000</text:p>
          </table:table-cell>
          <table:table-cell table:formula="of:=[.D1508]-[.D150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B1507]+7" office:value-type="float" office:value="10549" calcext:value-type="float">
            <text:p>10549</text:p>
          </table:table-cell>
          <table:table-cell office:value-type="float" office:value="8640000" calcext:value-type="float">
            <text:p>8640000</text:p>
          </table:table-cell>
          <table:table-cell table:formula="of:=[.B1508]/[.C1508]" office:value-type="float" office:value="0.00122094907407407" calcext:value-type="float">
            <text:p>0,00122094907407407000</text:p>
          </table:table-cell>
          <table:table-cell table:formula="of:=[.D1509]-[.D150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B1508]+7" office:value-type="float" office:value="10556" calcext:value-type="float">
            <text:p>10556</text:p>
          </table:table-cell>
          <table:table-cell office:value-type="float" office:value="8640000" calcext:value-type="float">
            <text:p>8640000</text:p>
          </table:table-cell>
          <table:table-cell table:formula="of:=[.B1509]/[.C1509]" office:value-type="float" office:value="0.00122175925925926" calcext:value-type="float">
            <text:p>0,00122175925925926000</text:p>
          </table:table-cell>
          <table:table-cell table:formula="of:=[.D1510]-[.D150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[.B1509]+7" office:value-type="float" office:value="10563" calcext:value-type="float">
            <text:p>10563</text:p>
          </table:table-cell>
          <table:table-cell office:value-type="float" office:value="8640000" calcext:value-type="float">
            <text:p>8640000</text:p>
          </table:table-cell>
          <table:table-cell table:formula="of:=[.B1510]/[.C1510]" office:value-type="float" office:value="0.00122256944444444" calcext:value-type="float">
            <text:p>0,00122256944444444000</text:p>
          </table:table-cell>
          <table:table-cell table:formula="of:=[.D1511]-[.D151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B1510]+7" office:value-type="float" office:value="10570" calcext:value-type="float">
            <text:p>10570</text:p>
          </table:table-cell>
          <table:table-cell office:value-type="float" office:value="8640000" calcext:value-type="float">
            <text:p>8640000</text:p>
          </table:table-cell>
          <table:table-cell table:formula="of:=[.B1511]/[.C1511]" office:value-type="float" office:value="0.00122337962962963" calcext:value-type="float">
            <text:p>0,00122337962962963000</text:p>
          </table:table-cell>
          <table:table-cell table:formula="of:=[.D1512]-[.D151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B1511]+7" office:value-type="float" office:value="10577" calcext:value-type="float">
            <text:p>10577</text:p>
          </table:table-cell>
          <table:table-cell office:value-type="float" office:value="8640000" calcext:value-type="float">
            <text:p>8640000</text:p>
          </table:table-cell>
          <table:table-cell table:formula="of:=[.B1512]/[.C1512]" office:value-type="float" office:value="0.00122418981481481" calcext:value-type="float">
            <text:p>0,00122418981481481000</text:p>
          </table:table-cell>
          <table:table-cell table:formula="of:=[.D1513]-[.D151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[.B1512]+7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1513]/[.C1513]" office:value-type="float" office:value="0.001225" calcext:value-type="float">
            <text:p>0,00122500000000000000</text:p>
          </table:table-cell>
          <table:table-cell table:formula="of:=[.D1514]-[.D151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[.B1513]+7" office:value-type="float" office:value="10591" calcext:value-type="float">
            <text:p>10591</text:p>
          </table:table-cell>
          <table:table-cell office:value-type="float" office:value="8640000" calcext:value-type="float">
            <text:p>8640000</text:p>
          </table:table-cell>
          <table:table-cell table:formula="of:=[.B1514]/[.C1514]" office:value-type="float" office:value="0.00122581018518519" calcext:value-type="float">
            <text:p>0,00122581018518519000</text:p>
          </table:table-cell>
          <table:table-cell table:formula="of:=[.D1515]-[.D151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[.B1514]+7" office:value-type="float" office:value="10598" calcext:value-type="float">
            <text:p>10598</text:p>
          </table:table-cell>
          <table:table-cell office:value-type="float" office:value="8640000" calcext:value-type="float">
            <text:p>8640000</text:p>
          </table:table-cell>
          <table:table-cell table:formula="of:=[.B1515]/[.C1515]" office:value-type="float" office:value="0.00122662037037037" calcext:value-type="float">
            <text:p>0,00122662037037037000</text:p>
          </table:table-cell>
          <table:table-cell table:formula="of:=[.D1516]-[.D151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B1515]+7" office:value-type="float" office:value="10605" calcext:value-type="float">
            <text:p>10605</text:p>
          </table:table-cell>
          <table:table-cell office:value-type="float" office:value="8640000" calcext:value-type="float">
            <text:p>8640000</text:p>
          </table:table-cell>
          <table:table-cell table:formula="of:=[.B1516]/[.C1516]" office:value-type="float" office:value="0.00122743055555556" calcext:value-type="float">
            <text:p>0,00122743055555556000</text:p>
          </table:table-cell>
          <table:table-cell table:formula="of:=[.D1517]-[.D151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B1516]+7" office:value-type="float" office:value="10612" calcext:value-type="float">
            <text:p>10612</text:p>
          </table:table-cell>
          <table:table-cell office:value-type="float" office:value="8640000" calcext:value-type="float">
            <text:p>8640000</text:p>
          </table:table-cell>
          <table:table-cell table:formula="of:=[.B1517]/[.C1517]" office:value-type="float" office:value="0.00122824074074074" calcext:value-type="float">
            <text:p>0,00122824074074074000</text:p>
          </table:table-cell>
          <table:table-cell table:formula="of:=[.D1518]-[.D151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B1517]+7" office:value-type="float" office:value="10619" calcext:value-type="float">
            <text:p>10619</text:p>
          </table:table-cell>
          <table:table-cell office:value-type="float" office:value="8640000" calcext:value-type="float">
            <text:p>8640000</text:p>
          </table:table-cell>
          <table:table-cell table:formula="of:=[.B1518]/[.C1518]" office:value-type="float" office:value="0.00122905092592593" calcext:value-type="float">
            <text:p>0,00122905092592593000</text:p>
          </table:table-cell>
          <table:table-cell table:formula="of:=[.D1519]-[.D151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B1518]+7" office:value-type="float" office:value="10626" calcext:value-type="float">
            <text:p>10626</text:p>
          </table:table-cell>
          <table:table-cell office:value-type="float" office:value="8640000" calcext:value-type="float">
            <text:p>8640000</text:p>
          </table:table-cell>
          <table:table-cell table:formula="of:=[.B1519]/[.C1519]" office:value-type="float" office:value="0.00122986111111111" calcext:value-type="float">
            <text:p>0,00122986111111111000</text:p>
          </table:table-cell>
          <table:table-cell table:formula="of:=[.D1520]-[.D151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[.B1519]+7" office:value-type="float" office:value="10633" calcext:value-type="float">
            <text:p>10633</text:p>
          </table:table-cell>
          <table:table-cell office:value-type="float" office:value="8640000" calcext:value-type="float">
            <text:p>8640000</text:p>
          </table:table-cell>
          <table:table-cell table:formula="of:=[.B1520]/[.C1520]" office:value-type="float" office:value="0.0012306712962963" calcext:value-type="float">
            <text:p>0,00123067129629630000</text:p>
          </table:table-cell>
          <table:table-cell table:formula="of:=[.D1521]-[.D152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B1520]+7" office:value-type="float" office:value="10640" calcext:value-type="float">
            <text:p>10640</text:p>
          </table:table-cell>
          <table:table-cell office:value-type="float" office:value="8640000" calcext:value-type="float">
            <text:p>8640000</text:p>
          </table:table-cell>
          <table:table-cell table:formula="of:=[.B1521]/[.C1521]" office:value-type="float" office:value="0.00123148148148148" calcext:value-type="float">
            <text:p>0,00123148148148148000</text:p>
          </table:table-cell>
          <table:table-cell table:formula="of:=[.D1522]-[.D152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B1521]+7" office:value-type="float" office:value="10647" calcext:value-type="float">
            <text:p>10647</text:p>
          </table:table-cell>
          <table:table-cell office:value-type="float" office:value="8640000" calcext:value-type="float">
            <text:p>8640000</text:p>
          </table:table-cell>
          <table:table-cell table:formula="of:=[.B1522]/[.C1522]" office:value-type="float" office:value="0.00123229166666667" calcext:value-type="float">
            <text:p>0,00123229166666667000</text:p>
          </table:table-cell>
          <table:table-cell table:formula="of:=[.D1523]-[.D152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B1522]+7" office:value-type="float" office:value="10654" calcext:value-type="float">
            <text:p>10654</text:p>
          </table:table-cell>
          <table:table-cell office:value-type="float" office:value="8640000" calcext:value-type="float">
            <text:p>8640000</text:p>
          </table:table-cell>
          <table:table-cell table:formula="of:=[.B1523]/[.C1523]" office:value-type="float" office:value="0.00123310185185185" calcext:value-type="float">
            <text:p>0,00123310185185185000</text:p>
          </table:table-cell>
          <table:table-cell table:formula="of:=[.D1524]-[.D152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B1523]+7" office:value-type="float" office:value="10661" calcext:value-type="float">
            <text:p>10661</text:p>
          </table:table-cell>
          <table:table-cell office:value-type="float" office:value="8640000" calcext:value-type="float">
            <text:p>8640000</text:p>
          </table:table-cell>
          <table:table-cell table:formula="of:=[.B1524]/[.C1524]" office:value-type="float" office:value="0.00123391203703704" calcext:value-type="float">
            <text:p>0,00123391203703704000</text:p>
          </table:table-cell>
          <table:table-cell table:formula="of:=[.D1525]-[.D152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[.B1524]+7" office:value-type="float" office:value="10668" calcext:value-type="float">
            <text:p>10668</text:p>
          </table:table-cell>
          <table:table-cell office:value-type="float" office:value="8640000" calcext:value-type="float">
            <text:p>8640000</text:p>
          </table:table-cell>
          <table:table-cell table:formula="of:=[.B1525]/[.C1525]" office:value-type="float" office:value="0.00123472222222222" calcext:value-type="float">
            <text:p>0,00123472222222222000</text:p>
          </table:table-cell>
          <table:table-cell table:formula="of:=[.D1526]-[.D152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B1525]+7" office:value-type="float" office:value="10675" calcext:value-type="float">
            <text:p>10675</text:p>
          </table:table-cell>
          <table:table-cell office:value-type="float" office:value="8640000" calcext:value-type="float">
            <text:p>8640000</text:p>
          </table:table-cell>
          <table:table-cell table:formula="of:=[.B1526]/[.C1526]" office:value-type="float" office:value="0.00123553240740741" calcext:value-type="float">
            <text:p>0,00123553240740741000</text:p>
          </table:table-cell>
          <table:table-cell table:formula="of:=[.D1527]-[.D152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B1526]+7" office:value-type="float" office:value="10682" calcext:value-type="float">
            <text:p>10682</text:p>
          </table:table-cell>
          <table:table-cell office:value-type="float" office:value="8640000" calcext:value-type="float">
            <text:p>8640000</text:p>
          </table:table-cell>
          <table:table-cell table:formula="of:=[.B1527]/[.C1527]" office:value-type="float" office:value="0.00123634259259259" calcext:value-type="float">
            <text:p>0,00123634259259259000</text:p>
          </table:table-cell>
          <table:table-cell table:formula="of:=[.D1528]-[.D152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B1527]+7" office:value-type="float" office:value="10689" calcext:value-type="float">
            <text:p>10689</text:p>
          </table:table-cell>
          <table:table-cell office:value-type="float" office:value="8640000" calcext:value-type="float">
            <text:p>8640000</text:p>
          </table:table-cell>
          <table:table-cell table:formula="of:=[.B1528]/[.C1528]" office:value-type="float" office:value="0.00123715277777778" calcext:value-type="float">
            <text:p>0,00123715277777778000</text:p>
          </table:table-cell>
          <table:table-cell table:formula="of:=[.D1529]-[.D152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B1528]+7" office:value-type="float" office:value="10696" calcext:value-type="float">
            <text:p>10696</text:p>
          </table:table-cell>
          <table:table-cell office:value-type="float" office:value="8640000" calcext:value-type="float">
            <text:p>8640000</text:p>
          </table:table-cell>
          <table:table-cell table:formula="of:=[.B1529]/[.C1529]" office:value-type="float" office:value="0.00123796296296296" calcext:value-type="float">
            <text:p>0,00123796296296296000</text:p>
          </table:table-cell>
          <table:table-cell table:formula="of:=[.D1530]-[.D152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[.B1529]+7" office:value-type="float" office:value="10703" calcext:value-type="float">
            <text:p>10703</text:p>
          </table:table-cell>
          <table:table-cell office:value-type="float" office:value="8640000" calcext:value-type="float">
            <text:p>8640000</text:p>
          </table:table-cell>
          <table:table-cell table:formula="of:=[.B1530]/[.C1530]" office:value-type="float" office:value="0.00123877314814815" calcext:value-type="float">
            <text:p>0,00123877314814815000</text:p>
          </table:table-cell>
          <table:table-cell table:formula="of:=[.D1531]-[.D153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[.B1530]+7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1531]/[.C1531]" office:value-type="float" office:value="0.00123958333333333" calcext:value-type="float">
            <text:p>0,00123958333333333000</text:p>
          </table:table-cell>
          <table:table-cell table:formula="of:=[.D1532]-[.D153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[.B1531]+7" office:value-type="float" office:value="10717" calcext:value-type="float">
            <text:p>10717</text:p>
          </table:table-cell>
          <table:table-cell office:value-type="float" office:value="8640000" calcext:value-type="float">
            <text:p>8640000</text:p>
          </table:table-cell>
          <table:table-cell table:formula="of:=[.B1532]/[.C1532]" office:value-type="float" office:value="0.00124039351851852" calcext:value-type="float">
            <text:p>0,00124039351851852000</text:p>
          </table:table-cell>
          <table:table-cell table:formula="of:=[.D1533]-[.D153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[.B1532]+7" office:value-type="float" office:value="10724" calcext:value-type="float">
            <text:p>10724</text:p>
          </table:table-cell>
          <table:table-cell office:value-type="float" office:value="8640000" calcext:value-type="float">
            <text:p>8640000</text:p>
          </table:table-cell>
          <table:table-cell table:formula="of:=[.B1533]/[.C1533]" office:value-type="float" office:value="0.0012412037037037" calcext:value-type="float">
            <text:p>0,00124120370370370000</text:p>
          </table:table-cell>
          <table:table-cell table:formula="of:=[.D1534]-[.D153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[.B1533]+7" office:value-type="float" office:value="10731" calcext:value-type="float">
            <text:p>10731</text:p>
          </table:table-cell>
          <table:table-cell office:value-type="float" office:value="8640000" calcext:value-type="float">
            <text:p>8640000</text:p>
          </table:table-cell>
          <table:table-cell table:formula="of:=[.B1534]/[.C1534]" office:value-type="float" office:value="0.00124201388888889" calcext:value-type="float">
            <text:p>0,00124201388888889000</text:p>
          </table:table-cell>
          <table:table-cell table:formula="of:=[.D1535]-[.D153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[.B1534]+7" office:value-type="float" office:value="10738" calcext:value-type="float">
            <text:p>10738</text:p>
          </table:table-cell>
          <table:table-cell office:value-type="float" office:value="8640000" calcext:value-type="float">
            <text:p>8640000</text:p>
          </table:table-cell>
          <table:table-cell table:formula="of:=[.B1535]/[.C1535]" office:value-type="float" office:value="0.00124282407407407" calcext:value-type="float">
            <text:p>0,00124282407407407000</text:p>
          </table:table-cell>
          <table:table-cell table:formula="of:=[.D1536]-[.D153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[.B1535]+7" office:value-type="float" office:value="10745" calcext:value-type="float">
            <text:p>10745</text:p>
          </table:table-cell>
          <table:table-cell office:value-type="float" office:value="8640000" calcext:value-type="float">
            <text:p>8640000</text:p>
          </table:table-cell>
          <table:table-cell table:formula="of:=[.B1536]/[.C1536]" office:value-type="float" office:value="0.00124363425925926" calcext:value-type="float">
            <text:p>0,00124363425925926000</text:p>
          </table:table-cell>
          <table:table-cell table:formula="of:=[.D1537]-[.D153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B1536]+7" office:value-type="float" office:value="10752" calcext:value-type="float">
            <text:p>10752</text:p>
          </table:table-cell>
          <table:table-cell office:value-type="float" office:value="8640000" calcext:value-type="float">
            <text:p>8640000</text:p>
          </table:table-cell>
          <table:table-cell table:formula="of:=[.B1537]/[.C1537]" office:value-type="float" office:value="0.00124444444444444" calcext:value-type="float">
            <text:p>0,00124444444444444000</text:p>
          </table:table-cell>
          <table:table-cell table:formula="of:=[.D1538]-[.D153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B1537]+7" office:value-type="float" office:value="10759" calcext:value-type="float">
            <text:p>10759</text:p>
          </table:table-cell>
          <table:table-cell office:value-type="float" office:value="8640000" calcext:value-type="float">
            <text:p>8640000</text:p>
          </table:table-cell>
          <table:table-cell table:formula="of:=[.B1538]/[.C1538]" office:value-type="float" office:value="0.00124525462962963" calcext:value-type="float">
            <text:p>0,00124525462962963000</text:p>
          </table:table-cell>
          <table:table-cell table:formula="of:=[.D1539]-[.D153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[.B1538]+7" office:value-type="float" office:value="10766" calcext:value-type="float">
            <text:p>10766</text:p>
          </table:table-cell>
          <table:table-cell office:value-type="float" office:value="8640000" calcext:value-type="float">
            <text:p>8640000</text:p>
          </table:table-cell>
          <table:table-cell table:formula="of:=[.B1539]/[.C1539]" office:value-type="float" office:value="0.00124606481481481" calcext:value-type="float">
            <text:p>0,00124606481481481000</text:p>
          </table:table-cell>
          <table:table-cell table:formula="of:=[.D1540]-[.D153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B1539]+7" office:value-type="float" office:value="10773" calcext:value-type="float">
            <text:p>10773</text:p>
          </table:table-cell>
          <table:table-cell office:value-type="float" office:value="8640000" calcext:value-type="float">
            <text:p>8640000</text:p>
          </table:table-cell>
          <table:table-cell table:formula="of:=[.B1540]/[.C1540]" office:value-type="float" office:value="0.001246875" calcext:value-type="float">
            <text:p>0,00124687500000000000</text:p>
          </table:table-cell>
          <table:table-cell table:formula="of:=[.D1541]-[.D154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B1540]+7" office:value-type="float" office:value="10780" calcext:value-type="float">
            <text:p>10780</text:p>
          </table:table-cell>
          <table:table-cell office:value-type="float" office:value="8640000" calcext:value-type="float">
            <text:p>8640000</text:p>
          </table:table-cell>
          <table:table-cell table:formula="of:=[.B1541]/[.C1541]" office:value-type="float" office:value="0.00124768518518519" calcext:value-type="float">
            <text:p>0,00124768518518519000</text:p>
          </table:table-cell>
          <table:table-cell table:formula="of:=[.D1542]-[.D154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[.B1541]+7" office:value-type="float" office:value="10787" calcext:value-type="float">
            <text:p>10787</text:p>
          </table:table-cell>
          <table:table-cell office:value-type="float" office:value="8640000" calcext:value-type="float">
            <text:p>8640000</text:p>
          </table:table-cell>
          <table:table-cell table:formula="of:=[.B1542]/[.C1542]" office:value-type="float" office:value="0.00124849537037037" calcext:value-type="float">
            <text:p>0,00124849537037037000</text:p>
          </table:table-cell>
          <table:table-cell table:formula="of:=[.D1543]-[.D154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[.B1542]+7" office:value-type="float" office:value="10794" calcext:value-type="float">
            <text:p>10794</text:p>
          </table:table-cell>
          <table:table-cell office:value-type="float" office:value="8640000" calcext:value-type="float">
            <text:p>8640000</text:p>
          </table:table-cell>
          <table:table-cell table:formula="of:=[.B1543]/[.C1543]" office:value-type="float" office:value="0.00124930555555556" calcext:value-type="float">
            <text:p>0,00124930555555556000</text:p>
          </table:table-cell>
          <table:table-cell table:formula="of:=[.D1544]-[.D154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B1543]+7" office:value-type="float" office:value="10801" calcext:value-type="float">
            <text:p>10801</text:p>
          </table:table-cell>
          <table:table-cell office:value-type="float" office:value="8640000" calcext:value-type="float">
            <text:p>8640000</text:p>
          </table:table-cell>
          <table:table-cell table:formula="of:=[.B1544]/[.C1544]" office:value-type="float" office:value="0.00125011574074074" calcext:value-type="float">
            <text:p>0,00125011574074074000</text:p>
          </table:table-cell>
          <table:table-cell table:formula="of:=[.D1545]-[.D154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B1544]+7" office:value-type="float" office:value="10808" calcext:value-type="float">
            <text:p>10808</text:p>
          </table:table-cell>
          <table:table-cell office:value-type="float" office:value="8640000" calcext:value-type="float">
            <text:p>8640000</text:p>
          </table:table-cell>
          <table:table-cell table:formula="of:=[.B1545]/[.C1545]" office:value-type="float" office:value="0.00125092592592593" calcext:value-type="float">
            <text:p>0,00125092592592593000</text:p>
          </table:table-cell>
          <table:table-cell table:formula="of:=[.D1546]-[.D154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B1545]+7" office:value-type="float" office:value="10815" calcext:value-type="float">
            <text:p>10815</text:p>
          </table:table-cell>
          <table:table-cell office:value-type="float" office:value="8640000" calcext:value-type="float">
            <text:p>8640000</text:p>
          </table:table-cell>
          <table:table-cell table:formula="of:=[.B1546]/[.C1546]" office:value-type="float" office:value="0.00125173611111111" calcext:value-type="float">
            <text:p>0,00125173611111111000</text:p>
          </table:table-cell>
          <table:table-cell table:formula="of:=[.D1547]-[.D154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B1546]+7" office:value-type="float" office:value="10822" calcext:value-type="float">
            <text:p>10822</text:p>
          </table:table-cell>
          <table:table-cell office:value-type="float" office:value="8640000" calcext:value-type="float">
            <text:p>8640000</text:p>
          </table:table-cell>
          <table:table-cell table:formula="of:=[.B1547]/[.C1547]" office:value-type="float" office:value="0.0012525462962963" calcext:value-type="float">
            <text:p>0,00125254629629630000</text:p>
          </table:table-cell>
          <table:table-cell table:formula="of:=[.D1548]-[.D154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[.B1547]+7" office:value-type="float" office:value="10829" calcext:value-type="float">
            <text:p>10829</text:p>
          </table:table-cell>
          <table:table-cell office:value-type="float" office:value="8640000" calcext:value-type="float">
            <text:p>8640000</text:p>
          </table:table-cell>
          <table:table-cell table:formula="of:=[.B1548]/[.C1548]" office:value-type="float" office:value="0.00125335648148148" calcext:value-type="float">
            <text:p>0,00125335648148148000</text:p>
          </table:table-cell>
          <table:table-cell table:formula="of:=[.D1549]-[.D154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B1548]+7" office:value-type="float" office:value="10836" calcext:value-type="float">
            <text:p>10836</text:p>
          </table:table-cell>
          <table:table-cell office:value-type="float" office:value="8640000" calcext:value-type="float">
            <text:p>8640000</text:p>
          </table:table-cell>
          <table:table-cell table:formula="of:=[.B1549]/[.C1549]" office:value-type="float" office:value="0.00125416666666667" calcext:value-type="float">
            <text:p>0,00125416666666667000</text:p>
          </table:table-cell>
          <table:table-cell table:formula="of:=[.D1550]-[.D154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B1549]+7" office:value-type="float" office:value="10843" calcext:value-type="float">
            <text:p>10843</text:p>
          </table:table-cell>
          <table:table-cell office:value-type="float" office:value="8640000" calcext:value-type="float">
            <text:p>8640000</text:p>
          </table:table-cell>
          <table:table-cell table:formula="of:=[.B1550]/[.C1550]" office:value-type="float" office:value="0.00125497685185185" calcext:value-type="float">
            <text:p>0,00125497685185185000</text:p>
          </table:table-cell>
          <table:table-cell table:formula="of:=[.D1551]-[.D155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B1550]+7" office:value-type="float" office:value="10850" calcext:value-type="float">
            <text:p>10850</text:p>
          </table:table-cell>
          <table:table-cell office:value-type="float" office:value="8640000" calcext:value-type="float">
            <text:p>8640000</text:p>
          </table:table-cell>
          <table:table-cell table:formula="of:=[.B1551]/[.C1551]" office:value-type="float" office:value="0.00125578703703704" calcext:value-type="float">
            <text:p>0,00125578703703704000</text:p>
          </table:table-cell>
          <table:table-cell table:formula="of:=[.D1552]-[.D155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B1551]+7" office:value-type="float" office:value="10857" calcext:value-type="float">
            <text:p>10857</text:p>
          </table:table-cell>
          <table:table-cell office:value-type="float" office:value="8640000" calcext:value-type="float">
            <text:p>8640000</text:p>
          </table:table-cell>
          <table:table-cell table:formula="of:=[.B1552]/[.C1552]" office:value-type="float" office:value="0.00125659722222222" calcext:value-type="float">
            <text:p>0,00125659722222222000</text:p>
          </table:table-cell>
          <table:table-cell table:formula="of:=[.D1553]-[.D155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[.B1552]+7" office:value-type="float" office:value="10864" calcext:value-type="float">
            <text:p>10864</text:p>
          </table:table-cell>
          <table:table-cell office:value-type="float" office:value="8640000" calcext:value-type="float">
            <text:p>8640000</text:p>
          </table:table-cell>
          <table:table-cell table:formula="of:=[.B1553]/[.C1553]" office:value-type="float" office:value="0.00125740740740741" calcext:value-type="float">
            <text:p>0,00125740740740741000</text:p>
          </table:table-cell>
          <table:table-cell table:formula="of:=[.D1554]-[.D155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B1553]+7" office:value-type="float" office:value="10871" calcext:value-type="float">
            <text:p>10871</text:p>
          </table:table-cell>
          <table:table-cell office:value-type="float" office:value="8640000" calcext:value-type="float">
            <text:p>8640000</text:p>
          </table:table-cell>
          <table:table-cell table:formula="of:=[.B1554]/[.C1554]" office:value-type="float" office:value="0.00125821759259259" calcext:value-type="float">
            <text:p>0,00125821759259259000</text:p>
          </table:table-cell>
          <table:table-cell table:formula="of:=[.D1555]-[.D155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B1554]+7" office:value-type="float" office:value="10878" calcext:value-type="float">
            <text:p>10878</text:p>
          </table:table-cell>
          <table:table-cell office:value-type="float" office:value="8640000" calcext:value-type="float">
            <text:p>8640000</text:p>
          </table:table-cell>
          <table:table-cell table:formula="of:=[.B1555]/[.C1555]" office:value-type="float" office:value="0.00125902777777778" calcext:value-type="float">
            <text:p>0,00125902777777778000</text:p>
          </table:table-cell>
          <table:table-cell table:formula="of:=[.D1556]-[.D155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[.B1555]+7" office:value-type="float" office:value="10885" calcext:value-type="float">
            <text:p>10885</text:p>
          </table:table-cell>
          <table:table-cell office:value-type="float" office:value="8640000" calcext:value-type="float">
            <text:p>8640000</text:p>
          </table:table-cell>
          <table:table-cell table:formula="of:=[.B1556]/[.C1556]" office:value-type="float" office:value="0.00125983796296296" calcext:value-type="float">
            <text:p>0,00125983796296296000</text:p>
          </table:table-cell>
          <table:table-cell table:formula="of:=[.D1557]-[.D155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[.B1556]+7" office:value-type="float" office:value="10892" calcext:value-type="float">
            <text:p>10892</text:p>
          </table:table-cell>
          <table:table-cell office:value-type="float" office:value="8640000" calcext:value-type="float">
            <text:p>8640000</text:p>
          </table:table-cell>
          <table:table-cell table:formula="of:=[.B1557]/[.C1557]" office:value-type="float" office:value="0.00126064814814815" calcext:value-type="float">
            <text:p>0,00126064814814815000</text:p>
          </table:table-cell>
          <table:table-cell table:formula="of:=[.D1558]-[.D155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[.B1557]+7" office:value-type="float" office:value="10899" calcext:value-type="float">
            <text:p>10899</text:p>
          </table:table-cell>
          <table:table-cell office:value-type="float" office:value="8640000" calcext:value-type="float">
            <text:p>8640000</text:p>
          </table:table-cell>
          <table:table-cell table:formula="of:=[.B1558]/[.C1558]" office:value-type="float" office:value="0.00126145833333333" calcext:value-type="float">
            <text:p>0,00126145833333333000</text:p>
          </table:table-cell>
          <table:table-cell table:formula="of:=[.D1559]-[.D155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[.B1558]+7" office:value-type="float" office:value="10906" calcext:value-type="float">
            <text:p>10906</text:p>
          </table:table-cell>
          <table:table-cell office:value-type="float" office:value="8640000" calcext:value-type="float">
            <text:p>8640000</text:p>
          </table:table-cell>
          <table:table-cell table:formula="of:=[.B1559]/[.C1559]" office:value-type="float" office:value="0.00126226851851852" calcext:value-type="float">
            <text:p>0,00126226851851852000</text:p>
          </table:table-cell>
          <table:table-cell table:formula="of:=[.D1560]-[.D155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B1559]+7" office:value-type="float" office:value="10913" calcext:value-type="float">
            <text:p>10913</text:p>
          </table:table-cell>
          <table:table-cell office:value-type="float" office:value="8640000" calcext:value-type="float">
            <text:p>8640000</text:p>
          </table:table-cell>
          <table:table-cell table:formula="of:=[.B1560]/[.C1560]" office:value-type="float" office:value="0.0012630787037037" calcext:value-type="float">
            <text:p>0,00126307870370370000</text:p>
          </table:table-cell>
          <table:table-cell table:formula="of:=[.D1561]-[.D156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B1560]+7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1561]/[.C1561]" office:value-type="float" office:value="0.00126388888888889" calcext:value-type="float">
            <text:p>0,00126388888888889000</text:p>
          </table:table-cell>
          <table:table-cell table:formula="of:=[.D1562]-[.D156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B1561]+7" office:value-type="float" office:value="10927" calcext:value-type="float">
            <text:p>10927</text:p>
          </table:table-cell>
          <table:table-cell office:value-type="float" office:value="8640000" calcext:value-type="float">
            <text:p>8640000</text:p>
          </table:table-cell>
          <table:table-cell table:formula="of:=[.B1562]/[.C1562]" office:value-type="float" office:value="0.00126469907407407" calcext:value-type="float">
            <text:p>0,00126469907407407000</text:p>
          </table:table-cell>
          <table:table-cell table:formula="of:=[.D1563]-[.D156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B1562]+7" office:value-type="float" office:value="10934" calcext:value-type="float">
            <text:p>10934</text:p>
          </table:table-cell>
          <table:table-cell office:value-type="float" office:value="8640000" calcext:value-type="float">
            <text:p>8640000</text:p>
          </table:table-cell>
          <table:table-cell table:formula="of:=[.B1563]/[.C1563]" office:value-type="float" office:value="0.00126550925925926" calcext:value-type="float">
            <text:p>0,00126550925925926000</text:p>
          </table:table-cell>
          <table:table-cell table:formula="of:=[.D1564]-[.D156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[.B1563]+7" office:value-type="float" office:value="10941" calcext:value-type="float">
            <text:p>10941</text:p>
          </table:table-cell>
          <table:table-cell office:value-type="float" office:value="8640000" calcext:value-type="float">
            <text:p>8640000</text:p>
          </table:table-cell>
          <table:table-cell table:formula="of:=[.B1564]/[.C1564]" office:value-type="float" office:value="0.00126631944444444" calcext:value-type="float">
            <text:p>0,00126631944444444000</text:p>
          </table:table-cell>
          <table:table-cell table:formula="of:=[.D1565]-[.D156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[.B1564]+7" office:value-type="float" office:value="10948" calcext:value-type="float">
            <text:p>10948</text:p>
          </table:table-cell>
          <table:table-cell office:value-type="float" office:value="8640000" calcext:value-type="float">
            <text:p>8640000</text:p>
          </table:table-cell>
          <table:table-cell table:formula="of:=[.B1565]/[.C1565]" office:value-type="float" office:value="0.00126712962962963" calcext:value-type="float">
            <text:p>0,00126712962962963000</text:p>
          </table:table-cell>
          <table:table-cell table:formula="of:=[.D1566]-[.D156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[.B1565]+7" office:value-type="float" office:value="10955" calcext:value-type="float">
            <text:p>10955</text:p>
          </table:table-cell>
          <table:table-cell office:value-type="float" office:value="8640000" calcext:value-type="float">
            <text:p>8640000</text:p>
          </table:table-cell>
          <table:table-cell table:formula="of:=[.B1566]/[.C1566]" office:value-type="float" office:value="0.00126793981481481" calcext:value-type="float">
            <text:p>0,00126793981481481000</text:p>
          </table:table-cell>
          <table:table-cell table:formula="of:=[.D1567]-[.D156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B1566]+7" office:value-type="float" office:value="10962" calcext:value-type="float">
            <text:p>10962</text:p>
          </table:table-cell>
          <table:table-cell office:value-type="float" office:value="8640000" calcext:value-type="float">
            <text:p>8640000</text:p>
          </table:table-cell>
          <table:table-cell table:formula="of:=[.B1567]/[.C1567]" office:value-type="float" office:value="0.00126875" calcext:value-type="float">
            <text:p>0,00126875000000000000</text:p>
          </table:table-cell>
          <table:table-cell table:formula="of:=[.D1568]-[.D156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B1567]+7" office:value-type="float" office:value="10969" calcext:value-type="float">
            <text:p>10969</text:p>
          </table:table-cell>
          <table:table-cell office:value-type="float" office:value="8640000" calcext:value-type="float">
            <text:p>8640000</text:p>
          </table:table-cell>
          <table:table-cell table:formula="of:=[.B1568]/[.C1568]" office:value-type="float" office:value="0.00126956018518519" calcext:value-type="float">
            <text:p>0,00126956018518519000</text:p>
          </table:table-cell>
          <table:table-cell table:formula="of:=[.D1569]-[.D156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B1568]+7" office:value-type="float" office:value="10976" calcext:value-type="float">
            <text:p>10976</text:p>
          </table:table-cell>
          <table:table-cell office:value-type="float" office:value="8640000" calcext:value-type="float">
            <text:p>8640000</text:p>
          </table:table-cell>
          <table:table-cell table:formula="of:=[.B1569]/[.C1569]" office:value-type="float" office:value="0.00127037037037037" calcext:value-type="float">
            <text:p>0,00127037037037037000</text:p>
          </table:table-cell>
          <table:table-cell table:formula="of:=[.D1570]-[.D156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[.B1569]+7" office:value-type="float" office:value="10983" calcext:value-type="float">
            <text:p>10983</text:p>
          </table:table-cell>
          <table:table-cell office:value-type="float" office:value="8640000" calcext:value-type="float">
            <text:p>8640000</text:p>
          </table:table-cell>
          <table:table-cell table:formula="of:=[.B1570]/[.C1570]" office:value-type="float" office:value="0.00127118055555556" calcext:value-type="float">
            <text:p>0,00127118055555556000</text:p>
          </table:table-cell>
          <table:table-cell table:formula="of:=[.D1571]-[.D157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B1570]+7" office:value-type="float" office:value="10990" calcext:value-type="float">
            <text:p>10990</text:p>
          </table:table-cell>
          <table:table-cell office:value-type="float" office:value="8640000" calcext:value-type="float">
            <text:p>8640000</text:p>
          </table:table-cell>
          <table:table-cell table:formula="of:=[.B1571]/[.C1571]" office:value-type="float" office:value="0.00127199074074074" calcext:value-type="float">
            <text:p>0,00127199074074074000</text:p>
          </table:table-cell>
          <table:table-cell table:formula="of:=[.D1572]-[.D157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B1571]+7" office:value-type="float" office:value="10997" calcext:value-type="float">
            <text:p>10997</text:p>
          </table:table-cell>
          <table:table-cell office:value-type="float" office:value="8640000" calcext:value-type="float">
            <text:p>8640000</text:p>
          </table:table-cell>
          <table:table-cell table:formula="of:=[.B1572]/[.C1572]" office:value-type="float" office:value="0.00127280092592593" calcext:value-type="float">
            <text:p>0,00127280092592593000</text:p>
          </table:table-cell>
          <table:table-cell table:formula="of:=[.D1573]-[.D157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B1572]+7" office:value-type="float" office:value="11004" calcext:value-type="float">
            <text:p>11004</text:p>
          </table:table-cell>
          <table:table-cell office:value-type="float" office:value="8640000" calcext:value-type="float">
            <text:p>8640000</text:p>
          </table:table-cell>
          <table:table-cell table:formula="of:=[.B1573]/[.C1573]" office:value-type="float" office:value="0.00127361111111111" calcext:value-type="float">
            <text:p>0,00127361111111111000</text:p>
          </table:table-cell>
          <table:table-cell table:formula="of:=[.D1574]-[.D157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B1573]+7" office:value-type="float" office:value="11011" calcext:value-type="float">
            <text:p>11011</text:p>
          </table:table-cell>
          <table:table-cell office:value-type="float" office:value="8640000" calcext:value-type="float">
            <text:p>8640000</text:p>
          </table:table-cell>
          <table:table-cell table:formula="of:=[.B1574]/[.C1574]" office:value-type="float" office:value="0.0012744212962963" calcext:value-type="float">
            <text:p>0,00127442129629630000</text:p>
          </table:table-cell>
          <table:table-cell table:formula="of:=[.D1575]-[.D157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B1574]+7" office:value-type="float" office:value="11018" calcext:value-type="float">
            <text:p>11018</text:p>
          </table:table-cell>
          <table:table-cell office:value-type="float" office:value="8640000" calcext:value-type="float">
            <text:p>8640000</text:p>
          </table:table-cell>
          <table:table-cell table:formula="of:=[.B1575]/[.C1575]" office:value-type="float" office:value="0.00127523148148148" calcext:value-type="float">
            <text:p>0,00127523148148148000</text:p>
          </table:table-cell>
          <table:table-cell table:formula="of:=[.D1576]-[.D157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B1575]+7" office:value-type="float" office:value="11025" calcext:value-type="float">
            <text:p>11025</text:p>
          </table:table-cell>
          <table:table-cell office:value-type="float" office:value="8640000" calcext:value-type="float">
            <text:p>8640000</text:p>
          </table:table-cell>
          <table:table-cell table:formula="of:=[.B1576]/[.C1576]" office:value-type="float" office:value="0.00127604166666667" calcext:value-type="float">
            <text:p>0,00127604166666667000</text:p>
          </table:table-cell>
          <table:table-cell table:formula="of:=[.D1577]-[.D157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[.B1576]+7" office:value-type="float" office:value="11032" calcext:value-type="float">
            <text:p>11032</text:p>
          </table:table-cell>
          <table:table-cell office:value-type="float" office:value="8640000" calcext:value-type="float">
            <text:p>8640000</text:p>
          </table:table-cell>
          <table:table-cell table:formula="of:=[.B1577]/[.C1577]" office:value-type="float" office:value="0.00127685185185185" calcext:value-type="float">
            <text:p>0,00127685185185185000</text:p>
          </table:table-cell>
          <table:table-cell table:formula="of:=[.D1578]-[.D157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[.B1577]+7" office:value-type="float" office:value="11039" calcext:value-type="float">
            <text:p>11039</text:p>
          </table:table-cell>
          <table:table-cell office:value-type="float" office:value="8640000" calcext:value-type="float">
            <text:p>8640000</text:p>
          </table:table-cell>
          <table:table-cell table:formula="of:=[.B1578]/[.C1578]" office:value-type="float" office:value="0.00127766203703704" calcext:value-type="float">
            <text:p>0,00127766203703704000</text:p>
          </table:table-cell>
          <table:table-cell table:formula="of:=[.D1579]-[.D157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B1578]+7" office:value-type="float" office:value="11046" calcext:value-type="float">
            <text:p>11046</text:p>
          </table:table-cell>
          <table:table-cell office:value-type="float" office:value="8640000" calcext:value-type="float">
            <text:p>8640000</text:p>
          </table:table-cell>
          <table:table-cell table:formula="of:=[.B1579]/[.C1579]" office:value-type="float" office:value="0.00127847222222222" calcext:value-type="float">
            <text:p>0,00127847222222222000</text:p>
          </table:table-cell>
          <table:table-cell table:formula="of:=[.D1580]-[.D157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[.B1579]+7" office:value-type="float" office:value="11053" calcext:value-type="float">
            <text:p>11053</text:p>
          </table:table-cell>
          <table:table-cell office:value-type="float" office:value="8640000" calcext:value-type="float">
            <text:p>8640000</text:p>
          </table:table-cell>
          <table:table-cell table:formula="of:=[.B1580]/[.C1580]" office:value-type="float" office:value="0.00127928240740741" calcext:value-type="float">
            <text:p>0,00127928240740741000</text:p>
          </table:table-cell>
          <table:table-cell table:formula="of:=[.D1581]-[.D158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B1580]+7" office:value-type="float" office:value="11060" calcext:value-type="float">
            <text:p>11060</text:p>
          </table:table-cell>
          <table:table-cell office:value-type="float" office:value="8640000" calcext:value-type="float">
            <text:p>8640000</text:p>
          </table:table-cell>
          <table:table-cell table:formula="of:=[.B1581]/[.C1581]" office:value-type="float" office:value="0.00128009259259259" calcext:value-type="float">
            <text:p>0,00128009259259259000</text:p>
          </table:table-cell>
          <table:table-cell table:formula="of:=[.D1582]-[.D158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B1581]+7" office:value-type="float" office:value="11067" calcext:value-type="float">
            <text:p>11067</text:p>
          </table:table-cell>
          <table:table-cell office:value-type="float" office:value="8640000" calcext:value-type="float">
            <text:p>8640000</text:p>
          </table:table-cell>
          <table:table-cell table:formula="of:=[.B1582]/[.C1582]" office:value-type="float" office:value="0.00128090277777778" calcext:value-type="float">
            <text:p>0,00128090277777778000</text:p>
          </table:table-cell>
          <table:table-cell table:formula="of:=[.D1583]-[.D158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[.B1582]+7" office:value-type="float" office:value="11074" calcext:value-type="float">
            <text:p>11074</text:p>
          </table:table-cell>
          <table:table-cell office:value-type="float" office:value="8640000" calcext:value-type="float">
            <text:p>8640000</text:p>
          </table:table-cell>
          <table:table-cell table:formula="of:=[.B1583]/[.C1583]" office:value-type="float" office:value="0.00128171296296296" calcext:value-type="float">
            <text:p>0,00128171296296296000</text:p>
          </table:table-cell>
          <table:table-cell table:formula="of:=[.D1584]-[.D158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B1583]+7" office:value-type="float" office:value="11081" calcext:value-type="float">
            <text:p>11081</text:p>
          </table:table-cell>
          <table:table-cell office:value-type="float" office:value="8640000" calcext:value-type="float">
            <text:p>8640000</text:p>
          </table:table-cell>
          <table:table-cell table:formula="of:=[.B1584]/[.C1584]" office:value-type="float" office:value="0.00128252314814815" calcext:value-type="float">
            <text:p>0,00128252314814815000</text:p>
          </table:table-cell>
          <table:table-cell table:formula="of:=[.D1585]-[.D158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[.B1584]+7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1585]/[.C1585]" office:value-type="float" office:value="0.00128333333333333" calcext:value-type="float">
            <text:p>0,00128333333333333000</text:p>
          </table:table-cell>
          <table:table-cell table:formula="of:=[.D1586]-[.D158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B1585]+7" office:value-type="float" office:value="11095" calcext:value-type="float">
            <text:p>11095</text:p>
          </table:table-cell>
          <table:table-cell office:value-type="float" office:value="8640000" calcext:value-type="float">
            <text:p>8640000</text:p>
          </table:table-cell>
          <table:table-cell table:formula="of:=[.B1586]/[.C1586]" office:value-type="float" office:value="0.00128414351851852" calcext:value-type="float">
            <text:p>0,00128414351851852000</text:p>
          </table:table-cell>
          <table:table-cell table:formula="of:=[.D1587]-[.D158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[.B1586]+7" office:value-type="float" office:value="11102" calcext:value-type="float">
            <text:p>11102</text:p>
          </table:table-cell>
          <table:table-cell office:value-type="float" office:value="8640000" calcext:value-type="float">
            <text:p>8640000</text:p>
          </table:table-cell>
          <table:table-cell table:formula="of:=[.B1587]/[.C1587]" office:value-type="float" office:value="0.0012849537037037" calcext:value-type="float">
            <text:p>0,00128495370370370000</text:p>
          </table:table-cell>
          <table:table-cell table:formula="of:=[.D1588]-[.D158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B1587]+7" office:value-type="float" office:value="11109" calcext:value-type="float">
            <text:p>11109</text:p>
          </table:table-cell>
          <table:table-cell office:value-type="float" office:value="8640000" calcext:value-type="float">
            <text:p>8640000</text:p>
          </table:table-cell>
          <table:table-cell table:formula="of:=[.B1588]/[.C1588]" office:value-type="float" office:value="0.00128576388888889" calcext:value-type="float">
            <text:p>0,00128576388888889000</text:p>
          </table:table-cell>
          <table:table-cell table:formula="of:=[.D1589]-[.D158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B1588]+7" office:value-type="float" office:value="11116" calcext:value-type="float">
            <text:p>11116</text:p>
          </table:table-cell>
          <table:table-cell office:value-type="float" office:value="8640000" calcext:value-type="float">
            <text:p>8640000</text:p>
          </table:table-cell>
          <table:table-cell table:formula="of:=[.B1589]/[.C1589]" office:value-type="float" office:value="0.00128657407407407" calcext:value-type="float">
            <text:p>0,00128657407407407000</text:p>
          </table:table-cell>
          <table:table-cell table:formula="of:=[.D1590]-[.D158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B1589]+7" office:value-type="float" office:value="11123" calcext:value-type="float">
            <text:p>11123</text:p>
          </table:table-cell>
          <table:table-cell office:value-type="float" office:value="8640000" calcext:value-type="float">
            <text:p>8640000</text:p>
          </table:table-cell>
          <table:table-cell table:formula="of:=[.B1590]/[.C1590]" office:value-type="float" office:value="0.00128738425925926" calcext:value-type="float">
            <text:p>0,00128738425925926000</text:p>
          </table:table-cell>
          <table:table-cell table:formula="of:=[.D1591]-[.D159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B1590]+7" office:value-type="float" office:value="11130" calcext:value-type="float">
            <text:p>11130</text:p>
          </table:table-cell>
          <table:table-cell office:value-type="float" office:value="8640000" calcext:value-type="float">
            <text:p>8640000</text:p>
          </table:table-cell>
          <table:table-cell table:formula="of:=[.B1591]/[.C1591]" office:value-type="float" office:value="0.00128819444444444" calcext:value-type="float">
            <text:p>0,00128819444444444000</text:p>
          </table:table-cell>
          <table:table-cell table:formula="of:=[.D1592]-[.D159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B1591]+7" office:value-type="float" office:value="11137" calcext:value-type="float">
            <text:p>11137</text:p>
          </table:table-cell>
          <table:table-cell office:value-type="float" office:value="8640000" calcext:value-type="float">
            <text:p>8640000</text:p>
          </table:table-cell>
          <table:table-cell table:formula="of:=[.B1592]/[.C1592]" office:value-type="float" office:value="0.00128900462962963" calcext:value-type="float">
            <text:p>0,00128900462962963000</text:p>
          </table:table-cell>
          <table:table-cell table:formula="of:=[.D1593]-[.D159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B1592]+7" office:value-type="float" office:value="11144" calcext:value-type="float">
            <text:p>11144</text:p>
          </table:table-cell>
          <table:table-cell office:value-type="float" office:value="8640000" calcext:value-type="float">
            <text:p>8640000</text:p>
          </table:table-cell>
          <table:table-cell table:formula="of:=[.B1593]/[.C1593]" office:value-type="float" office:value="0.00128981481481481" calcext:value-type="float">
            <text:p>0,00128981481481481000</text:p>
          </table:table-cell>
          <table:table-cell table:formula="of:=[.D1594]-[.D159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[.B1593]+7" office:value-type="float" office:value="11151" calcext:value-type="float">
            <text:p>11151</text:p>
          </table:table-cell>
          <table:table-cell office:value-type="float" office:value="8640000" calcext:value-type="float">
            <text:p>8640000</text:p>
          </table:table-cell>
          <table:table-cell table:formula="of:=[.B1594]/[.C1594]" office:value-type="float" office:value="0.001290625" calcext:value-type="float">
            <text:p>0,00129062500000000000</text:p>
          </table:table-cell>
          <table:table-cell table:formula="of:=[.D1595]-[.D159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B1594]+7" office:value-type="float" office:value="11158" calcext:value-type="float">
            <text:p>11158</text:p>
          </table:table-cell>
          <table:table-cell office:value-type="float" office:value="8640000" calcext:value-type="float">
            <text:p>8640000</text:p>
          </table:table-cell>
          <table:table-cell table:formula="of:=[.B1595]/[.C1595]" office:value-type="float" office:value="0.00129143518518519" calcext:value-type="float">
            <text:p>0,00129143518518519000</text:p>
          </table:table-cell>
          <table:table-cell table:formula="of:=[.D1596]-[.D159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B1595]+7" office:value-type="float" office:value="11165" calcext:value-type="float">
            <text:p>11165</text:p>
          </table:table-cell>
          <table:table-cell office:value-type="float" office:value="8640000" calcext:value-type="float">
            <text:p>8640000</text:p>
          </table:table-cell>
          <table:table-cell table:formula="of:=[.B1596]/[.C1596]" office:value-type="float" office:value="0.00129224537037037" calcext:value-type="float">
            <text:p>0,00129224537037037000</text:p>
          </table:table-cell>
          <table:table-cell table:formula="of:=[.D1597]-[.D159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B1596]+7" office:value-type="float" office:value="11172" calcext:value-type="float">
            <text:p>11172</text:p>
          </table:table-cell>
          <table:table-cell office:value-type="float" office:value="8640000" calcext:value-type="float">
            <text:p>8640000</text:p>
          </table:table-cell>
          <table:table-cell table:formula="of:=[.B1597]/[.C1597]" office:value-type="float" office:value="0.00129305555555556" calcext:value-type="float">
            <text:p>0,00129305555555556000</text:p>
          </table:table-cell>
          <table:table-cell table:formula="of:=[.D1598]-[.D159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B1597]+7" office:value-type="float" office:value="11179" calcext:value-type="float">
            <text:p>11179</text:p>
          </table:table-cell>
          <table:table-cell office:value-type="float" office:value="8640000" calcext:value-type="float">
            <text:p>8640000</text:p>
          </table:table-cell>
          <table:table-cell table:formula="of:=[.B1598]/[.C1598]" office:value-type="float" office:value="0.00129386574074074" calcext:value-type="float">
            <text:p>0,00129386574074074000</text:p>
          </table:table-cell>
          <table:table-cell table:formula="of:=[.D1599]-[.D159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B1598]+7" office:value-type="float" office:value="11186" calcext:value-type="float">
            <text:p>11186</text:p>
          </table:table-cell>
          <table:table-cell office:value-type="float" office:value="8640000" calcext:value-type="float">
            <text:p>8640000</text:p>
          </table:table-cell>
          <table:table-cell table:formula="of:=[.B1599]/[.C1599]" office:value-type="float" office:value="0.00129467592592593" calcext:value-type="float">
            <text:p>0,00129467592592593000</text:p>
          </table:table-cell>
          <table:table-cell table:formula="of:=[.D1600]-[.D159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B1599]+7" office:value-type="float" office:value="11193" calcext:value-type="float">
            <text:p>11193</text:p>
          </table:table-cell>
          <table:table-cell office:value-type="float" office:value="8640000" calcext:value-type="float">
            <text:p>8640000</text:p>
          </table:table-cell>
          <table:table-cell table:formula="of:=[.B1600]/[.C1600]" office:value-type="float" office:value="0.00129548611111111" calcext:value-type="float">
            <text:p>0,00129548611111111000</text:p>
          </table:table-cell>
          <table:table-cell table:formula="of:=[.D1601]-[.D160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B1600]+7" office:value-type="float" office:value="11200" calcext:value-type="float">
            <text:p>11200</text:p>
          </table:table-cell>
          <table:table-cell office:value-type="float" office:value="8640000" calcext:value-type="float">
            <text:p>8640000</text:p>
          </table:table-cell>
          <table:table-cell table:formula="of:=[.B1601]/[.C1601]" office:value-type="float" office:value="0.0012962962962963" calcext:value-type="float">
            <text:p>0,00129629629629630000</text:p>
          </table:table-cell>
          <table:table-cell table:formula="of:=[.D1602]-[.D160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[.B1601]+7" office:value-type="float" office:value="11207" calcext:value-type="float">
            <text:p>11207</text:p>
          </table:table-cell>
          <table:table-cell office:value-type="float" office:value="8640000" calcext:value-type="float">
            <text:p>8640000</text:p>
          </table:table-cell>
          <table:table-cell table:formula="of:=[.B1602]/[.C1602]" office:value-type="float" office:value="0.00129710648148148" calcext:value-type="float">
            <text:p>0,00129710648148148000</text:p>
          </table:table-cell>
          <table:table-cell table:formula="of:=[.D1603]-[.D160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[.B1602]+7" office:value-type="float" office:value="11214" calcext:value-type="float">
            <text:p>11214</text:p>
          </table:table-cell>
          <table:table-cell office:value-type="float" office:value="8640000" calcext:value-type="float">
            <text:p>8640000</text:p>
          </table:table-cell>
          <table:table-cell table:formula="of:=[.B1603]/[.C1603]" office:value-type="float" office:value="0.00129791666666667" calcext:value-type="float">
            <text:p>0,00129791666666667000</text:p>
          </table:table-cell>
          <table:table-cell table:formula="of:=[.D1604]-[.D160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B1603]+7" office:value-type="float" office:value="11221" calcext:value-type="float">
            <text:p>11221</text:p>
          </table:table-cell>
          <table:table-cell office:value-type="float" office:value="8640000" calcext:value-type="float">
            <text:p>8640000</text:p>
          </table:table-cell>
          <table:table-cell table:formula="of:=[.B1604]/[.C1604]" office:value-type="float" office:value="0.00129872685185185" calcext:value-type="float">
            <text:p>0,00129872685185185000</text:p>
          </table:table-cell>
          <table:table-cell table:formula="of:=[.D1605]-[.D160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[.B1604]+7" office:value-type="float" office:value="11228" calcext:value-type="float">
            <text:p>11228</text:p>
          </table:table-cell>
          <table:table-cell office:value-type="float" office:value="8640000" calcext:value-type="float">
            <text:p>8640000</text:p>
          </table:table-cell>
          <table:table-cell table:formula="of:=[.B1605]/[.C1605]" office:value-type="float" office:value="0.00129953703703704" calcext:value-type="float">
            <text:p>0,00129953703703704000</text:p>
          </table:table-cell>
          <table:table-cell table:formula="of:=[.D1606]-[.D160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[.B1605]+7" office:value-type="float" office:value="11235" calcext:value-type="float">
            <text:p>11235</text:p>
          </table:table-cell>
          <table:table-cell office:value-type="float" office:value="8640000" calcext:value-type="float">
            <text:p>8640000</text:p>
          </table:table-cell>
          <table:table-cell table:formula="of:=[.B1606]/[.C1606]" office:value-type="float" office:value="0.00130034722222222" calcext:value-type="float">
            <text:p>0,00130034722222222000</text:p>
          </table:table-cell>
          <table:table-cell table:formula="of:=[.D1607]-[.D160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[.B1606]+7" office:value-type="float" office:value="11242" calcext:value-type="float">
            <text:p>11242</text:p>
          </table:table-cell>
          <table:table-cell office:value-type="float" office:value="8640000" calcext:value-type="float">
            <text:p>8640000</text:p>
          </table:table-cell>
          <table:table-cell table:formula="of:=[.B1607]/[.C1607]" office:value-type="float" office:value="0.00130115740740741" calcext:value-type="float">
            <text:p>0,00130115740740741000</text:p>
          </table:table-cell>
          <table:table-cell table:formula="of:=[.D1608]-[.D160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[.B1607]+7" office:value-type="float" office:value="11249" calcext:value-type="float">
            <text:p>11249</text:p>
          </table:table-cell>
          <table:table-cell office:value-type="float" office:value="8640000" calcext:value-type="float">
            <text:p>8640000</text:p>
          </table:table-cell>
          <table:table-cell table:formula="of:=[.B1608]/[.C1608]" office:value-type="float" office:value="0.00130196759259259" calcext:value-type="float">
            <text:p>0,00130196759259259000</text:p>
          </table:table-cell>
          <table:table-cell table:formula="of:=[.D1609]-[.D160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[.B1608]+7" office:value-type="float" office:value="11256" calcext:value-type="float">
            <text:p>11256</text:p>
          </table:table-cell>
          <table:table-cell office:value-type="float" office:value="8640000" calcext:value-type="float">
            <text:p>8640000</text:p>
          </table:table-cell>
          <table:table-cell table:formula="of:=[.B1609]/[.C1609]" office:value-type="float" office:value="0.00130277777777778" calcext:value-type="float">
            <text:p>0,00130277777777778000</text:p>
          </table:table-cell>
          <table:table-cell table:formula="of:=[.D1610]-[.D160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[.B1609]+7" office:value-type="float" office:value="11263" calcext:value-type="float">
            <text:p>11263</text:p>
          </table:table-cell>
          <table:table-cell office:value-type="float" office:value="8640000" calcext:value-type="float">
            <text:p>8640000</text:p>
          </table:table-cell>
          <table:table-cell table:formula="of:=[.B1610]/[.C1610]" office:value-type="float" office:value="0.00130358796296296" calcext:value-type="float">
            <text:p>0,00130358796296296000</text:p>
          </table:table-cell>
          <table:table-cell table:formula="of:=[.D1611]-[.D161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[.B1610]+7" office:value-type="float" office:value="11270" calcext:value-type="float">
            <text:p>11270</text:p>
          </table:table-cell>
          <table:table-cell office:value-type="float" office:value="8640000" calcext:value-type="float">
            <text:p>8640000</text:p>
          </table:table-cell>
          <table:table-cell table:formula="of:=[.B1611]/[.C1611]" office:value-type="float" office:value="0.00130439814814815" calcext:value-type="float">
            <text:p>0,00130439814814815000</text:p>
          </table:table-cell>
          <table:table-cell table:formula="of:=[.D1612]-[.D161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[.B1611]+7" office:value-type="float" office:value="11277" calcext:value-type="float">
            <text:p>11277</text:p>
          </table:table-cell>
          <table:table-cell office:value-type="float" office:value="8640000" calcext:value-type="float">
            <text:p>8640000</text:p>
          </table:table-cell>
          <table:table-cell table:formula="of:=[.B1612]/[.C1612]" office:value-type="float" office:value="0.00130520833333333" calcext:value-type="float">
            <text:p>0,00130520833333333000</text:p>
          </table:table-cell>
          <table:table-cell table:formula="of:=[.D1613]-[.D161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[.B1612]+7" office:value-type="float" office:value="11284" calcext:value-type="float">
            <text:p>11284</text:p>
          </table:table-cell>
          <table:table-cell office:value-type="float" office:value="8640000" calcext:value-type="float">
            <text:p>8640000</text:p>
          </table:table-cell>
          <table:table-cell table:formula="of:=[.B1613]/[.C1613]" office:value-type="float" office:value="0.00130601851851852" calcext:value-type="float">
            <text:p>0,00130601851851852000</text:p>
          </table:table-cell>
          <table:table-cell table:formula="of:=[.D1614]-[.D161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[.B1613]+7" office:value-type="float" office:value="11291" calcext:value-type="float">
            <text:p>11291</text:p>
          </table:table-cell>
          <table:table-cell office:value-type="float" office:value="8640000" calcext:value-type="float">
            <text:p>8640000</text:p>
          </table:table-cell>
          <table:table-cell table:formula="of:=[.B1614]/[.C1614]" office:value-type="float" office:value="0.0013068287037037" calcext:value-type="float">
            <text:p>0,00130682870370370000</text:p>
          </table:table-cell>
          <table:table-cell table:formula="of:=[.D1615]-[.D161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B1614]+7" office:value-type="float" office:value="11298" calcext:value-type="float">
            <text:p>11298</text:p>
          </table:table-cell>
          <table:table-cell office:value-type="float" office:value="8640000" calcext:value-type="float">
            <text:p>8640000</text:p>
          </table:table-cell>
          <table:table-cell table:formula="of:=[.B1615]/[.C1615]" office:value-type="float" office:value="0.00130763888888889" calcext:value-type="float">
            <text:p>0,00130763888888889000</text:p>
          </table:table-cell>
          <table:table-cell table:formula="of:=[.D1616]-[.D161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B1615]+7" office:value-type="float" office:value="11305" calcext:value-type="float">
            <text:p>11305</text:p>
          </table:table-cell>
          <table:table-cell office:value-type="float" office:value="8640000" calcext:value-type="float">
            <text:p>8640000</text:p>
          </table:table-cell>
          <table:table-cell table:formula="of:=[.B1616]/[.C1616]" office:value-type="float" office:value="0.00130844907407407" calcext:value-type="float">
            <text:p>0,00130844907407407000</text:p>
          </table:table-cell>
          <table:table-cell table:formula="of:=[.D1617]-[.D161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[.B1616]+7" office:value-type="float" office:value="11312" calcext:value-type="float">
            <text:p>11312</text:p>
          </table:table-cell>
          <table:table-cell office:value-type="float" office:value="8640000" calcext:value-type="float">
            <text:p>8640000</text:p>
          </table:table-cell>
          <table:table-cell table:formula="of:=[.B1617]/[.C1617]" office:value-type="float" office:value="0.00130925925925926" calcext:value-type="float">
            <text:p>0,00130925925925926000</text:p>
          </table:table-cell>
          <table:table-cell table:formula="of:=[.D1618]-[.D161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B1617]+7" office:value-type="float" office:value="11319" calcext:value-type="float">
            <text:p>11319</text:p>
          </table:table-cell>
          <table:table-cell office:value-type="float" office:value="8640000" calcext:value-type="float">
            <text:p>8640000</text:p>
          </table:table-cell>
          <table:table-cell table:formula="of:=[.B1618]/[.C1618]" office:value-type="float" office:value="0.00131006944444444" calcext:value-type="float">
            <text:p>0,00131006944444444000</text:p>
          </table:table-cell>
          <table:table-cell table:formula="of:=[.D1619]-[.D161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[.B1618]+7" office:value-type="float" office:value="11326" calcext:value-type="float">
            <text:p>11326</text:p>
          </table:table-cell>
          <table:table-cell office:value-type="float" office:value="8640000" calcext:value-type="float">
            <text:p>8640000</text:p>
          </table:table-cell>
          <table:table-cell table:formula="of:=[.B1619]/[.C1619]" office:value-type="float" office:value="0.00131087962962963" calcext:value-type="float">
            <text:p>0,00131087962962963000</text:p>
          </table:table-cell>
          <table:table-cell table:formula="of:=[.D1620]-[.D161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[.B1619]+7" office:value-type="float" office:value="11333" calcext:value-type="float">
            <text:p>11333</text:p>
          </table:table-cell>
          <table:table-cell office:value-type="float" office:value="8640000" calcext:value-type="float">
            <text:p>8640000</text:p>
          </table:table-cell>
          <table:table-cell table:formula="of:=[.B1620]/[.C1620]" office:value-type="float" office:value="0.00131168981481481" calcext:value-type="float">
            <text:p>0,00131168981481481000</text:p>
          </table:table-cell>
          <table:table-cell table:formula="of:=[.D1621]-[.D162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B1620]+7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1621]/[.C1621]" office:value-type="float" office:value="0.0013125" calcext:value-type="float">
            <text:p>0,00131250000000000000</text:p>
          </table:table-cell>
          <table:table-cell table:formula="of:=[.D1622]-[.D162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[.B1621]+7" office:value-type="float" office:value="11347" calcext:value-type="float">
            <text:p>11347</text:p>
          </table:table-cell>
          <table:table-cell office:value-type="float" office:value="8640000" calcext:value-type="float">
            <text:p>8640000</text:p>
          </table:table-cell>
          <table:table-cell table:formula="of:=[.B1622]/[.C1622]" office:value-type="float" office:value="0.00131331018518519" calcext:value-type="float">
            <text:p>0,00131331018518519000</text:p>
          </table:table-cell>
          <table:table-cell table:formula="of:=[.D1623]-[.D162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[.B1622]+7" office:value-type="float" office:value="11354" calcext:value-type="float">
            <text:p>11354</text:p>
          </table:table-cell>
          <table:table-cell office:value-type="float" office:value="8640000" calcext:value-type="float">
            <text:p>8640000</text:p>
          </table:table-cell>
          <table:table-cell table:formula="of:=[.B1623]/[.C1623]" office:value-type="float" office:value="0.00131412037037037" calcext:value-type="float">
            <text:p>0,00131412037037037000</text:p>
          </table:table-cell>
          <table:table-cell table:formula="of:=[.D1624]-[.D162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[.B1623]+7" office:value-type="float" office:value="11361" calcext:value-type="float">
            <text:p>11361</text:p>
          </table:table-cell>
          <table:table-cell office:value-type="float" office:value="8640000" calcext:value-type="float">
            <text:p>8640000</text:p>
          </table:table-cell>
          <table:table-cell table:formula="of:=[.B1624]/[.C1624]" office:value-type="float" office:value="0.00131493055555556" calcext:value-type="float">
            <text:p>0,00131493055555556000</text:p>
          </table:table-cell>
          <table:table-cell table:formula="of:=[.D1625]-[.D162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[.B1624]+7" office:value-type="float" office:value="11368" calcext:value-type="float">
            <text:p>11368</text:p>
          </table:table-cell>
          <table:table-cell office:value-type="float" office:value="8640000" calcext:value-type="float">
            <text:p>8640000</text:p>
          </table:table-cell>
          <table:table-cell table:formula="of:=[.B1625]/[.C1625]" office:value-type="float" office:value="0.00131574074074074" calcext:value-type="float">
            <text:p>0,00131574074074074000</text:p>
          </table:table-cell>
          <table:table-cell table:formula="of:=[.D1626]-[.D162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[.B1625]+7" office:value-type="float" office:value="11375" calcext:value-type="float">
            <text:p>11375</text:p>
          </table:table-cell>
          <table:table-cell office:value-type="float" office:value="8640000" calcext:value-type="float">
            <text:p>8640000</text:p>
          </table:table-cell>
          <table:table-cell table:formula="of:=[.B1626]/[.C1626]" office:value-type="float" office:value="0.00131655092592593" calcext:value-type="float">
            <text:p>0,00131655092592593000</text:p>
          </table:table-cell>
          <table:table-cell table:formula="of:=[.D1627]-[.D162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[.B1626]+7" office:value-type="float" office:value="11382" calcext:value-type="float">
            <text:p>11382</text:p>
          </table:table-cell>
          <table:table-cell office:value-type="float" office:value="8640000" calcext:value-type="float">
            <text:p>8640000</text:p>
          </table:table-cell>
          <table:table-cell table:formula="of:=[.B1627]/[.C1627]" office:value-type="float" office:value="0.00131736111111111" calcext:value-type="float">
            <text:p>0,00131736111111111000</text:p>
          </table:table-cell>
          <table:table-cell table:formula="of:=[.D1628]-[.D162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[.B1627]+7" office:value-type="float" office:value="11389" calcext:value-type="float">
            <text:p>11389</text:p>
          </table:table-cell>
          <table:table-cell office:value-type="float" office:value="8640000" calcext:value-type="float">
            <text:p>8640000</text:p>
          </table:table-cell>
          <table:table-cell table:formula="of:=[.B1628]/[.C1628]" office:value-type="float" office:value="0.0013181712962963" calcext:value-type="float">
            <text:p>0,00131817129629630000</text:p>
          </table:table-cell>
          <table:table-cell table:formula="of:=[.D1629]-[.D162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[.B1628]+7" office:value-type="float" office:value="11396" calcext:value-type="float">
            <text:p>11396</text:p>
          </table:table-cell>
          <table:table-cell office:value-type="float" office:value="8640000" calcext:value-type="float">
            <text:p>8640000</text:p>
          </table:table-cell>
          <table:table-cell table:formula="of:=[.B1629]/[.C1629]" office:value-type="float" office:value="0.00131898148148148" calcext:value-type="float">
            <text:p>0,00131898148148148000</text:p>
          </table:table-cell>
          <table:table-cell table:formula="of:=[.D1630]-[.D162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B1629]+7" office:value-type="float" office:value="11403" calcext:value-type="float">
            <text:p>11403</text:p>
          </table:table-cell>
          <table:table-cell office:value-type="float" office:value="8640000" calcext:value-type="float">
            <text:p>8640000</text:p>
          </table:table-cell>
          <table:table-cell table:formula="of:=[.B1630]/[.C1630]" office:value-type="float" office:value="0.00131979166666667" calcext:value-type="float">
            <text:p>0,00131979166666667000</text:p>
          </table:table-cell>
          <table:table-cell table:formula="of:=[.D1631]-[.D163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B1630]+7" office:value-type="float" office:value="11410" calcext:value-type="float">
            <text:p>11410</text:p>
          </table:table-cell>
          <table:table-cell office:value-type="float" office:value="8640000" calcext:value-type="float">
            <text:p>8640000</text:p>
          </table:table-cell>
          <table:table-cell table:formula="of:=[.B1631]/[.C1631]" office:value-type="float" office:value="0.00132060185185185" calcext:value-type="float">
            <text:p>0,00132060185185185000</text:p>
          </table:table-cell>
          <table:table-cell table:formula="of:=[.D1632]-[.D163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[.B1631]+7" office:value-type="float" office:value="11417" calcext:value-type="float">
            <text:p>11417</text:p>
          </table:table-cell>
          <table:table-cell office:value-type="float" office:value="8640000" calcext:value-type="float">
            <text:p>8640000</text:p>
          </table:table-cell>
          <table:table-cell table:formula="of:=[.B1632]/[.C1632]" office:value-type="float" office:value="0.00132141203703704" calcext:value-type="float">
            <text:p>0,00132141203703704000</text:p>
          </table:table-cell>
          <table:table-cell table:formula="of:=[.D1633]-[.D163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[.B1632]+7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1633]/[.C1633]" office:value-type="float" office:value="0.00132222222222222" calcext:value-type="float">
            <text:p>0,00132222222222222000</text:p>
          </table:table-cell>
          <table:table-cell table:formula="of:=[.D1634]-[.D163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[.B1633]+7" office:value-type="float" office:value="11431" calcext:value-type="float">
            <text:p>11431</text:p>
          </table:table-cell>
          <table:table-cell office:value-type="float" office:value="8640000" calcext:value-type="float">
            <text:p>8640000</text:p>
          </table:table-cell>
          <table:table-cell table:formula="of:=[.B1634]/[.C1634]" office:value-type="float" office:value="0.00132303240740741" calcext:value-type="float">
            <text:p>0,00132303240740741000</text:p>
          </table:table-cell>
          <table:table-cell table:formula="of:=[.D1635]-[.D163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[.B1634]+7" office:value-type="float" office:value="11438" calcext:value-type="float">
            <text:p>11438</text:p>
          </table:table-cell>
          <table:table-cell office:value-type="float" office:value="8640000" calcext:value-type="float">
            <text:p>8640000</text:p>
          </table:table-cell>
          <table:table-cell table:formula="of:=[.B1635]/[.C1635]" office:value-type="float" office:value="0.00132384259259259" calcext:value-type="float">
            <text:p>0,00132384259259259000</text:p>
          </table:table-cell>
          <table:table-cell table:formula="of:=[.D1636]-[.D163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[.B1635]+7" office:value-type="float" office:value="11445" calcext:value-type="float">
            <text:p>11445</text:p>
          </table:table-cell>
          <table:table-cell office:value-type="float" office:value="8640000" calcext:value-type="float">
            <text:p>8640000</text:p>
          </table:table-cell>
          <table:table-cell table:formula="of:=[.B1636]/[.C1636]" office:value-type="float" office:value="0.00132465277777778" calcext:value-type="float">
            <text:p>0,00132465277777778000</text:p>
          </table:table-cell>
          <table:table-cell table:formula="of:=[.D1637]-[.D163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[.B1636]+7" office:value-type="float" office:value="11452" calcext:value-type="float">
            <text:p>11452</text:p>
          </table:table-cell>
          <table:table-cell office:value-type="float" office:value="8640000" calcext:value-type="float">
            <text:p>8640000</text:p>
          </table:table-cell>
          <table:table-cell table:formula="of:=[.B1637]/[.C1637]" office:value-type="float" office:value="0.00132546296296296" calcext:value-type="float">
            <text:p>0,00132546296296296000</text:p>
          </table:table-cell>
          <table:table-cell table:formula="of:=[.D1638]-[.D163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[.B1637]+7" office:value-type="float" office:value="11459" calcext:value-type="float">
            <text:p>11459</text:p>
          </table:table-cell>
          <table:table-cell office:value-type="float" office:value="8640000" calcext:value-type="float">
            <text:p>8640000</text:p>
          </table:table-cell>
          <table:table-cell table:formula="of:=[.B1638]/[.C1638]" office:value-type="float" office:value="0.00132627314814815" calcext:value-type="float">
            <text:p>0,00132627314814815000</text:p>
          </table:table-cell>
          <table:table-cell table:formula="of:=[.D1639]-[.D163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[.B1638]+7" office:value-type="float" office:value="11466" calcext:value-type="float">
            <text:p>11466</text:p>
          </table:table-cell>
          <table:table-cell office:value-type="float" office:value="8640000" calcext:value-type="float">
            <text:p>8640000</text:p>
          </table:table-cell>
          <table:table-cell table:formula="of:=[.B1639]/[.C1639]" office:value-type="float" office:value="0.00132708333333333" calcext:value-type="float">
            <text:p>0,00132708333333333000</text:p>
          </table:table-cell>
          <table:table-cell table:formula="of:=[.D1640]-[.D163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[.B1639]+7" office:value-type="float" office:value="11473" calcext:value-type="float">
            <text:p>11473</text:p>
          </table:table-cell>
          <table:table-cell office:value-type="float" office:value="8640000" calcext:value-type="float">
            <text:p>8640000</text:p>
          </table:table-cell>
          <table:table-cell table:formula="of:=[.B1640]/[.C1640]" office:value-type="float" office:value="0.00132789351851852" calcext:value-type="float">
            <text:p>0,00132789351851852000</text:p>
          </table:table-cell>
          <table:table-cell table:formula="of:=[.D1641]-[.D164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B1640]+7" office:value-type="float" office:value="11480" calcext:value-type="float">
            <text:p>11480</text:p>
          </table:table-cell>
          <table:table-cell office:value-type="float" office:value="8640000" calcext:value-type="float">
            <text:p>8640000</text:p>
          </table:table-cell>
          <table:table-cell table:formula="of:=[.B1641]/[.C1641]" office:value-type="float" office:value="0.0013287037037037" calcext:value-type="float">
            <text:p>0,00132870370370370000</text:p>
          </table:table-cell>
          <table:table-cell table:formula="of:=[.D1642]-[.D164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[.B1641]+7" office:value-type="float" office:value="11487" calcext:value-type="float">
            <text:p>11487</text:p>
          </table:table-cell>
          <table:table-cell office:value-type="float" office:value="8640000" calcext:value-type="float">
            <text:p>8640000</text:p>
          </table:table-cell>
          <table:table-cell table:formula="of:=[.B1642]/[.C1642]" office:value-type="float" office:value="0.00132951388888889" calcext:value-type="float">
            <text:p>0,00132951388888889000</text:p>
          </table:table-cell>
          <table:table-cell table:formula="of:=[.D1643]-[.D164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[.B1642]+7" office:value-type="float" office:value="11494" calcext:value-type="float">
            <text:p>11494</text:p>
          </table:table-cell>
          <table:table-cell office:value-type="float" office:value="8640000" calcext:value-type="float">
            <text:p>8640000</text:p>
          </table:table-cell>
          <table:table-cell table:formula="of:=[.B1643]/[.C1643]" office:value-type="float" office:value="0.00133032407407407" calcext:value-type="float">
            <text:p>0,00133032407407407000</text:p>
          </table:table-cell>
          <table:table-cell table:formula="of:=[.D1644]-[.D164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[.B1643]+7" office:value-type="float" office:value="11501" calcext:value-type="float">
            <text:p>11501</text:p>
          </table:table-cell>
          <table:table-cell office:value-type="float" office:value="8640000" calcext:value-type="float">
            <text:p>8640000</text:p>
          </table:table-cell>
          <table:table-cell table:formula="of:=[.B1644]/[.C1644]" office:value-type="float" office:value="0.00133113425925926" calcext:value-type="float">
            <text:p>0,00133113425925926000</text:p>
          </table:table-cell>
          <table:table-cell table:formula="of:=[.D1645]-[.D164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[.B1644]+7" office:value-type="float" office:value="11508" calcext:value-type="float">
            <text:p>11508</text:p>
          </table:table-cell>
          <table:table-cell office:value-type="float" office:value="8640000" calcext:value-type="float">
            <text:p>8640000</text:p>
          </table:table-cell>
          <table:table-cell table:formula="of:=[.B1645]/[.C1645]" office:value-type="float" office:value="0.00133194444444444" calcext:value-type="float">
            <text:p>0,00133194444444444000</text:p>
          </table:table-cell>
          <table:table-cell table:formula="of:=[.D1646]-[.D164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B1645]+7" office:value-type="float" office:value="11515" calcext:value-type="float">
            <text:p>11515</text:p>
          </table:table-cell>
          <table:table-cell office:value-type="float" office:value="8640000" calcext:value-type="float">
            <text:p>8640000</text:p>
          </table:table-cell>
          <table:table-cell table:formula="of:=[.B1646]/[.C1646]" office:value-type="float" office:value="0.00133275462962963" calcext:value-type="float">
            <text:p>0,00133275462962963000</text:p>
          </table:table-cell>
          <table:table-cell table:formula="of:=[.D1647]-[.D164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[.B1646]+7" office:value-type="float" office:value="11522" calcext:value-type="float">
            <text:p>11522</text:p>
          </table:table-cell>
          <table:table-cell office:value-type="float" office:value="8640000" calcext:value-type="float">
            <text:p>8640000</text:p>
          </table:table-cell>
          <table:table-cell table:formula="of:=[.B1647]/[.C1647]" office:value-type="float" office:value="0.00133356481481481" calcext:value-type="float">
            <text:p>0,00133356481481481000</text:p>
          </table:table-cell>
          <table:table-cell table:formula="of:=[.D1648]-[.D164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[.B1647]+7" office:value-type="float" office:value="11529" calcext:value-type="float">
            <text:p>11529</text:p>
          </table:table-cell>
          <table:table-cell office:value-type="float" office:value="8640000" calcext:value-type="float">
            <text:p>8640000</text:p>
          </table:table-cell>
          <table:table-cell table:formula="of:=[.B1648]/[.C1648]" office:value-type="float" office:value="0.001334375" calcext:value-type="float">
            <text:p>0,00133437500000000000</text:p>
          </table:table-cell>
          <table:table-cell table:formula="of:=[.D1649]-[.D164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[.B1648]+7" office:value-type="float" office:value="11536" calcext:value-type="float">
            <text:p>11536</text:p>
          </table:table-cell>
          <table:table-cell office:value-type="float" office:value="8640000" calcext:value-type="float">
            <text:p>8640000</text:p>
          </table:table-cell>
          <table:table-cell table:formula="of:=[.B1649]/[.C1649]" office:value-type="float" office:value="0.00133518518518519" calcext:value-type="float">
            <text:p>0,00133518518518519000</text:p>
          </table:table-cell>
          <table:table-cell table:formula="of:=[.D1650]-[.D164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[.B1649]+7" office:value-type="float" office:value="11543" calcext:value-type="float">
            <text:p>11543</text:p>
          </table:table-cell>
          <table:table-cell office:value-type="float" office:value="8640000" calcext:value-type="float">
            <text:p>8640000</text:p>
          </table:table-cell>
          <table:table-cell table:formula="of:=[.B1650]/[.C1650]" office:value-type="float" office:value="0.00133599537037037" calcext:value-type="float">
            <text:p>0,00133599537037037000</text:p>
          </table:table-cell>
          <table:table-cell table:formula="of:=[.D1651]-[.D165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B1650]+7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1651]/[.C1651]" office:value-type="float" office:value="0.00133680555555556" calcext:value-type="float">
            <text:p>0,00133680555555556000</text:p>
          </table:table-cell>
          <table:table-cell table:formula="of:=[.D1652]-[.D165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[.B1651]+7" office:value-type="float" office:value="11557" calcext:value-type="float">
            <text:p>11557</text:p>
          </table:table-cell>
          <table:table-cell office:value-type="float" office:value="8640000" calcext:value-type="float">
            <text:p>8640000</text:p>
          </table:table-cell>
          <table:table-cell table:formula="of:=[.B1652]/[.C1652]" office:value-type="float" office:value="0.00133761574074074" calcext:value-type="float">
            <text:p>0,00133761574074074000</text:p>
          </table:table-cell>
          <table:table-cell table:formula="of:=[.D1653]-[.D165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B1652]+7" office:value-type="float" office:value="11564" calcext:value-type="float">
            <text:p>11564</text:p>
          </table:table-cell>
          <table:table-cell office:value-type="float" office:value="8640000" calcext:value-type="float">
            <text:p>8640000</text:p>
          </table:table-cell>
          <table:table-cell table:formula="of:=[.B1653]/[.C1653]" office:value-type="float" office:value="0.00133842592592593" calcext:value-type="float">
            <text:p>0,00133842592592593000</text:p>
          </table:table-cell>
          <table:table-cell table:formula="of:=[.D1654]-[.D165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[.B1653]+7" office:value-type="float" office:value="11571" calcext:value-type="float">
            <text:p>11571</text:p>
          </table:table-cell>
          <table:table-cell office:value-type="float" office:value="8640000" calcext:value-type="float">
            <text:p>8640000</text:p>
          </table:table-cell>
          <table:table-cell table:formula="of:=[.B1654]/[.C1654]" office:value-type="float" office:value="0.00133923611111111" calcext:value-type="float">
            <text:p>0,00133923611111111000</text:p>
          </table:table-cell>
          <table:table-cell table:formula="of:=[.D1655]-[.D165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[.B1654]+7" office:value-type="float" office:value="11578" calcext:value-type="float">
            <text:p>11578</text:p>
          </table:table-cell>
          <table:table-cell office:value-type="float" office:value="8640000" calcext:value-type="float">
            <text:p>8640000</text:p>
          </table:table-cell>
          <table:table-cell table:formula="of:=[.B1655]/[.C1655]" office:value-type="float" office:value="0.0013400462962963" calcext:value-type="float">
            <text:p>0,00134004629629630000</text:p>
          </table:table-cell>
          <table:table-cell table:formula="of:=[.D1656]-[.D165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[.B1655]+7" office:value-type="float" office:value="11585" calcext:value-type="float">
            <text:p>11585</text:p>
          </table:table-cell>
          <table:table-cell office:value-type="float" office:value="8640000" calcext:value-type="float">
            <text:p>8640000</text:p>
          </table:table-cell>
          <table:table-cell table:formula="of:=[.B1656]/[.C1656]" office:value-type="float" office:value="0.00134085648148148" calcext:value-type="float">
            <text:p>0,00134085648148148000</text:p>
          </table:table-cell>
          <table:table-cell table:formula="of:=[.D1657]-[.D165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[.B1656]+7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1657]/[.C1657]" office:value-type="float" office:value="0.00134166666666667" calcext:value-type="float">
            <text:p>0,00134166666666667000</text:p>
          </table:table-cell>
          <table:table-cell table:formula="of:=[.D1658]-[.D165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[.B1657]+7" office:value-type="float" office:value="11599" calcext:value-type="float">
            <text:p>11599</text:p>
          </table:table-cell>
          <table:table-cell office:value-type="float" office:value="8640000" calcext:value-type="float">
            <text:p>8640000</text:p>
          </table:table-cell>
          <table:table-cell table:formula="of:=[.B1658]/[.C1658]" office:value-type="float" office:value="0.00134247685185185" calcext:value-type="float">
            <text:p>0,00134247685185185000</text:p>
          </table:table-cell>
          <table:table-cell table:formula="of:=[.D1659]-[.D165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[.B1658]+7" office:value-type="float" office:value="11606" calcext:value-type="float">
            <text:p>11606</text:p>
          </table:table-cell>
          <table:table-cell office:value-type="float" office:value="8640000" calcext:value-type="float">
            <text:p>8640000</text:p>
          </table:table-cell>
          <table:table-cell table:formula="of:=[.B1659]/[.C1659]" office:value-type="float" office:value="0.00134328703703704" calcext:value-type="float">
            <text:p>0,00134328703703704000</text:p>
          </table:table-cell>
          <table:table-cell table:formula="of:=[.D1660]-[.D165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[.B1659]+7" office:value-type="float" office:value="11613" calcext:value-type="float">
            <text:p>11613</text:p>
          </table:table-cell>
          <table:table-cell office:value-type="float" office:value="8640000" calcext:value-type="float">
            <text:p>8640000</text:p>
          </table:table-cell>
          <table:table-cell table:formula="of:=[.B1660]/[.C1660]" office:value-type="float" office:value="0.00134409722222222" calcext:value-type="float">
            <text:p>0,00134409722222222000</text:p>
          </table:table-cell>
          <table:table-cell table:formula="of:=[.D1661]-[.D166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B1660]+7" office:value-type="float" office:value="11620" calcext:value-type="float">
            <text:p>11620</text:p>
          </table:table-cell>
          <table:table-cell office:value-type="float" office:value="8640000" calcext:value-type="float">
            <text:p>8640000</text:p>
          </table:table-cell>
          <table:table-cell table:formula="of:=[.B1661]/[.C1661]" office:value-type="float" office:value="0.00134490740740741" calcext:value-type="float">
            <text:p>0,00134490740740741000</text:p>
          </table:table-cell>
          <table:table-cell table:formula="of:=[.D1662]-[.D166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[.B1661]+7" office:value-type="float" office:value="11627" calcext:value-type="float">
            <text:p>11627</text:p>
          </table:table-cell>
          <table:table-cell office:value-type="float" office:value="8640000" calcext:value-type="float">
            <text:p>8640000</text:p>
          </table:table-cell>
          <table:table-cell table:formula="of:=[.B1662]/[.C1662]" office:value-type="float" office:value="0.00134571759259259" calcext:value-type="float">
            <text:p>0,00134571759259259000</text:p>
          </table:table-cell>
          <table:table-cell table:formula="of:=[.D1663]-[.D166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[.B1662]+7" office:value-type="float" office:value="11634" calcext:value-type="float">
            <text:p>11634</text:p>
          </table:table-cell>
          <table:table-cell office:value-type="float" office:value="8640000" calcext:value-type="float">
            <text:p>8640000</text:p>
          </table:table-cell>
          <table:table-cell table:formula="of:=[.B1663]/[.C1663]" office:value-type="float" office:value="0.00134652777777778" calcext:value-type="float">
            <text:p>0,00134652777777778000</text:p>
          </table:table-cell>
          <table:table-cell table:formula="of:=[.D1664]-[.D166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B1663]+7" office:value-type="float" office:value="11641" calcext:value-type="float">
            <text:p>11641</text:p>
          </table:table-cell>
          <table:table-cell office:value-type="float" office:value="8640000" calcext:value-type="float">
            <text:p>8640000</text:p>
          </table:table-cell>
          <table:table-cell table:formula="of:=[.B1664]/[.C1664]" office:value-type="float" office:value="0.00134733796296296" calcext:value-type="float">
            <text:p>0,00134733796296296000</text:p>
          </table:table-cell>
          <table:table-cell table:formula="of:=[.D1665]-[.D166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[.B1664]+7" office:value-type="float" office:value="11648" calcext:value-type="float">
            <text:p>11648</text:p>
          </table:table-cell>
          <table:table-cell office:value-type="float" office:value="8640000" calcext:value-type="float">
            <text:p>8640000</text:p>
          </table:table-cell>
          <table:table-cell table:formula="of:=[.B1665]/[.C1665]" office:value-type="float" office:value="0.00134814814814815" calcext:value-type="float">
            <text:p>0,00134814814814815000</text:p>
          </table:table-cell>
          <table:table-cell table:formula="of:=[.D1666]-[.D166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[.B1665]+7" office:value-type="float" office:value="11655" calcext:value-type="float">
            <text:p>11655</text:p>
          </table:table-cell>
          <table:table-cell office:value-type="float" office:value="8640000" calcext:value-type="float">
            <text:p>8640000</text:p>
          </table:table-cell>
          <table:table-cell table:formula="of:=[.B1666]/[.C1666]" office:value-type="float" office:value="0.00134895833333333" calcext:value-type="float">
            <text:p>0,00134895833333333000</text:p>
          </table:table-cell>
          <table:table-cell table:formula="of:=[.D1667]-[.D166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[.B1666]+7" office:value-type="float" office:value="11662" calcext:value-type="float">
            <text:p>11662</text:p>
          </table:table-cell>
          <table:table-cell office:value-type="float" office:value="8640000" calcext:value-type="float">
            <text:p>8640000</text:p>
          </table:table-cell>
          <table:table-cell table:formula="of:=[.B1667]/[.C1667]" office:value-type="float" office:value="0.00134976851851852" calcext:value-type="float">
            <text:p>0,00134976851851852000</text:p>
          </table:table-cell>
          <table:table-cell table:formula="of:=[.D1668]-[.D166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B1667]+7" office:value-type="float" office:value="11669" calcext:value-type="float">
            <text:p>11669</text:p>
          </table:table-cell>
          <table:table-cell office:value-type="float" office:value="8640000" calcext:value-type="float">
            <text:p>8640000</text:p>
          </table:table-cell>
          <table:table-cell table:formula="of:=[.B1668]/[.C1668]" office:value-type="float" office:value="0.0013505787037037" calcext:value-type="float">
            <text:p>0,00135057870370370000</text:p>
          </table:table-cell>
          <table:table-cell table:formula="of:=[.D1669]-[.D166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[.B1668]+7" office:value-type="float" office:value="11676" calcext:value-type="float">
            <text:p>11676</text:p>
          </table:table-cell>
          <table:table-cell office:value-type="float" office:value="8640000" calcext:value-type="float">
            <text:p>8640000</text:p>
          </table:table-cell>
          <table:table-cell table:formula="of:=[.B1669]/[.C1669]" office:value-type="float" office:value="0.00135138888888889" calcext:value-type="float">
            <text:p>0,00135138888888889000</text:p>
          </table:table-cell>
          <table:table-cell table:formula="of:=[.D1670]-[.D166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[.B1669]+7" office:value-type="float" office:value="11683" calcext:value-type="float">
            <text:p>11683</text:p>
          </table:table-cell>
          <table:table-cell office:value-type="float" office:value="8640000" calcext:value-type="float">
            <text:p>8640000</text:p>
          </table:table-cell>
          <table:table-cell table:formula="of:=[.B1670]/[.C1670]" office:value-type="float" office:value="0.00135219907407407" calcext:value-type="float">
            <text:p>0,00135219907407407000</text:p>
          </table:table-cell>
          <table:table-cell table:formula="of:=[.D1671]-[.D167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B1670]+7" office:value-type="float" office:value="11690" calcext:value-type="float">
            <text:p>11690</text:p>
          </table:table-cell>
          <table:table-cell office:value-type="float" office:value="8640000" calcext:value-type="float">
            <text:p>8640000</text:p>
          </table:table-cell>
          <table:table-cell table:formula="of:=[.B1671]/[.C1671]" office:value-type="float" office:value="0.00135300925925926" calcext:value-type="float">
            <text:p>0,00135300925925926000</text:p>
          </table:table-cell>
          <table:table-cell table:formula="of:=[.D1672]-[.D167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B1671]+7" office:value-type="float" office:value="11697" calcext:value-type="float">
            <text:p>11697</text:p>
          </table:table-cell>
          <table:table-cell office:value-type="float" office:value="8640000" calcext:value-type="float">
            <text:p>8640000</text:p>
          </table:table-cell>
          <table:table-cell table:formula="of:=[.B1672]/[.C1672]" office:value-type="float" office:value="0.00135381944444444" calcext:value-type="float">
            <text:p>0,00135381944444444000</text:p>
          </table:table-cell>
          <table:table-cell table:formula="of:=[.D1673]-[.D167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[.B1672]+7" office:value-type="float" office:value="11704" calcext:value-type="float">
            <text:p>11704</text:p>
          </table:table-cell>
          <table:table-cell office:value-type="float" office:value="8640000" calcext:value-type="float">
            <text:p>8640000</text:p>
          </table:table-cell>
          <table:table-cell table:formula="of:=[.B1673]/[.C1673]" office:value-type="float" office:value="0.00135462962962963" calcext:value-type="float">
            <text:p>0,00135462962962963000</text:p>
          </table:table-cell>
          <table:table-cell table:formula="of:=[.D1674]-[.D167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B1673]+7" office:value-type="float" office:value="11711" calcext:value-type="float">
            <text:p>11711</text:p>
          </table:table-cell>
          <table:table-cell office:value-type="float" office:value="8640000" calcext:value-type="float">
            <text:p>8640000</text:p>
          </table:table-cell>
          <table:table-cell table:formula="of:=[.B1674]/[.C1674]" office:value-type="float" office:value="0.00135543981481481" calcext:value-type="float">
            <text:p>0,00135543981481481000</text:p>
          </table:table-cell>
          <table:table-cell table:formula="of:=[.D1675]-[.D167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[.B1674]+7" office:value-type="float" office:value="11718" calcext:value-type="float">
            <text:p>11718</text:p>
          </table:table-cell>
          <table:table-cell office:value-type="float" office:value="8640000" calcext:value-type="float">
            <text:p>8640000</text:p>
          </table:table-cell>
          <table:table-cell table:formula="of:=[.B1675]/[.C1675]" office:value-type="float" office:value="0.00135625" calcext:value-type="float">
            <text:p>0,00135625000000000000</text:p>
          </table:table-cell>
          <table:table-cell table:formula="of:=[.D1676]-[.D167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.B1675]+7" office:value-type="float" office:value="11725" calcext:value-type="float">
            <text:p>11725</text:p>
          </table:table-cell>
          <table:table-cell office:value-type="float" office:value="8640000" calcext:value-type="float">
            <text:p>8640000</text:p>
          </table:table-cell>
          <table:table-cell table:formula="of:=[.B1676]/[.C1676]" office:value-type="float" office:value="0.00135706018518519" calcext:value-type="float">
            <text:p>0,00135706018518519000</text:p>
          </table:table-cell>
          <table:table-cell table:formula="of:=[.D1677]-[.D167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[.B1676]+7" office:value-type="float" office:value="11732" calcext:value-type="float">
            <text:p>11732</text:p>
          </table:table-cell>
          <table:table-cell office:value-type="float" office:value="8640000" calcext:value-type="float">
            <text:p>8640000</text:p>
          </table:table-cell>
          <table:table-cell table:formula="of:=[.B1677]/[.C1677]" office:value-type="float" office:value="0.00135787037037037" calcext:value-type="float">
            <text:p>0,00135787037037037000</text:p>
          </table:table-cell>
          <table:table-cell table:formula="of:=[.D1678]-[.D167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[.B1677]+7" office:value-type="float" office:value="11739" calcext:value-type="float">
            <text:p>11739</text:p>
          </table:table-cell>
          <table:table-cell office:value-type="float" office:value="8640000" calcext:value-type="float">
            <text:p>8640000</text:p>
          </table:table-cell>
          <table:table-cell table:formula="of:=[.B1678]/[.C1678]" office:value-type="float" office:value="0.00135868055555556" calcext:value-type="float">
            <text:p>0,00135868055555556000</text:p>
          </table:table-cell>
          <table:table-cell table:formula="of:=[.D1679]-[.D167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[.B1678]+7" office:value-type="float" office:value="11746" calcext:value-type="float">
            <text:p>11746</text:p>
          </table:table-cell>
          <table:table-cell office:value-type="float" office:value="8640000" calcext:value-type="float">
            <text:p>8640000</text:p>
          </table:table-cell>
          <table:table-cell table:formula="of:=[.B1679]/[.C1679]" office:value-type="float" office:value="0.00135949074074074" calcext:value-type="float">
            <text:p>0,00135949074074074000</text:p>
          </table:table-cell>
          <table:table-cell table:formula="of:=[.D1680]-[.D167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[.B1679]+7" office:value-type="float" office:value="11753" calcext:value-type="float">
            <text:p>11753</text:p>
          </table:table-cell>
          <table:table-cell office:value-type="float" office:value="8640000" calcext:value-type="float">
            <text:p>8640000</text:p>
          </table:table-cell>
          <table:table-cell table:formula="of:=[.B1680]/[.C1680]" office:value-type="float" office:value="0.00136030092592593" calcext:value-type="float">
            <text:p>0,00136030092592593000</text:p>
          </table:table-cell>
          <table:table-cell table:formula="of:=[.D1681]-[.D168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B1680]+7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1681]/[.C1681]" office:value-type="float" office:value="0.00136111111111111" calcext:value-type="float">
            <text:p>0,00136111111111111000</text:p>
          </table:table-cell>
          <table:table-cell table:formula="of:=[.D1682]-[.D168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B1681]+7" office:value-type="float" office:value="11767" calcext:value-type="float">
            <text:p>11767</text:p>
          </table:table-cell>
          <table:table-cell office:value-type="float" office:value="8640000" calcext:value-type="float">
            <text:p>8640000</text:p>
          </table:table-cell>
          <table:table-cell table:formula="of:=[.B1682]/[.C1682]" office:value-type="float" office:value="0.0013619212962963" calcext:value-type="float">
            <text:p>0,00136192129629630000</text:p>
          </table:table-cell>
          <table:table-cell table:formula="of:=[.D1683]-[.D168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[.B1682]+7" office:value-type="float" office:value="11774" calcext:value-type="float">
            <text:p>11774</text:p>
          </table:table-cell>
          <table:table-cell office:value-type="float" office:value="8640000" calcext:value-type="float">
            <text:p>8640000</text:p>
          </table:table-cell>
          <table:table-cell table:formula="of:=[.B1683]/[.C1683]" office:value-type="float" office:value="0.00136273148148148" calcext:value-type="float">
            <text:p>0,00136273148148148000</text:p>
          </table:table-cell>
          <table:table-cell table:formula="of:=[.D1684]-[.D168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[.B1683]+7" office:value-type="float" office:value="11781" calcext:value-type="float">
            <text:p>11781</text:p>
          </table:table-cell>
          <table:table-cell office:value-type="float" office:value="8640000" calcext:value-type="float">
            <text:p>8640000</text:p>
          </table:table-cell>
          <table:table-cell table:formula="of:=[.B1684]/[.C1684]" office:value-type="float" office:value="0.00136354166666667" calcext:value-type="float">
            <text:p>0,00136354166666667000</text:p>
          </table:table-cell>
          <table:table-cell table:formula="of:=[.D1685]-[.D168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[.B1684]+7" office:value-type="float" office:value="11788" calcext:value-type="float">
            <text:p>11788</text:p>
          </table:table-cell>
          <table:table-cell office:value-type="float" office:value="8640000" calcext:value-type="float">
            <text:p>8640000</text:p>
          </table:table-cell>
          <table:table-cell table:formula="of:=[.B1685]/[.C1685]" office:value-type="float" office:value="0.00136435185185185" calcext:value-type="float">
            <text:p>0,00136435185185185000</text:p>
          </table:table-cell>
          <table:table-cell table:formula="of:=[.D1686]-[.D168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[.B1685]+7" office:value-type="float" office:value="11795" calcext:value-type="float">
            <text:p>11795</text:p>
          </table:table-cell>
          <table:table-cell office:value-type="float" office:value="8640000" calcext:value-type="float">
            <text:p>8640000</text:p>
          </table:table-cell>
          <table:table-cell table:formula="of:=[.B1686]/[.C1686]" office:value-type="float" office:value="0.00136516203703704" calcext:value-type="float">
            <text:p>0,00136516203703704000</text:p>
          </table:table-cell>
          <table:table-cell table:formula="of:=[.D1687]-[.D168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[.B1686]+7" office:value-type="float" office:value="11802" calcext:value-type="float">
            <text:p>11802</text:p>
          </table:table-cell>
          <table:table-cell office:value-type="float" office:value="8640000" calcext:value-type="float">
            <text:p>8640000</text:p>
          </table:table-cell>
          <table:table-cell table:formula="of:=[.B1687]/[.C1687]" office:value-type="float" office:value="0.00136597222222222" calcext:value-type="float">
            <text:p>0,00136597222222222000</text:p>
          </table:table-cell>
          <table:table-cell table:formula="of:=[.D1688]-[.D168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[.B1687]+7" office:value-type="float" office:value="11809" calcext:value-type="float">
            <text:p>11809</text:p>
          </table:table-cell>
          <table:table-cell office:value-type="float" office:value="8640000" calcext:value-type="float">
            <text:p>8640000</text:p>
          </table:table-cell>
          <table:table-cell table:formula="of:=[.B1688]/[.C1688]" office:value-type="float" office:value="0.00136678240740741" calcext:value-type="float">
            <text:p>0,00136678240740741000</text:p>
          </table:table-cell>
          <table:table-cell table:formula="of:=[.D1689]-[.D168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[.B1688]+7" office:value-type="float" office:value="11816" calcext:value-type="float">
            <text:p>11816</text:p>
          </table:table-cell>
          <table:table-cell office:value-type="float" office:value="8640000" calcext:value-type="float">
            <text:p>8640000</text:p>
          </table:table-cell>
          <table:table-cell table:formula="of:=[.B1689]/[.C1689]" office:value-type="float" office:value="0.00136759259259259" calcext:value-type="float">
            <text:p>0,00136759259259259000</text:p>
          </table:table-cell>
          <table:table-cell table:formula="of:=[.D1690]-[.D168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[.B1689]+7" office:value-type="float" office:value="11823" calcext:value-type="float">
            <text:p>11823</text:p>
          </table:table-cell>
          <table:table-cell office:value-type="float" office:value="8640000" calcext:value-type="float">
            <text:p>8640000</text:p>
          </table:table-cell>
          <table:table-cell table:formula="of:=[.B1690]/[.C1690]" office:value-type="float" office:value="0.00136840277777778" calcext:value-type="float">
            <text:p>0,00136840277777778000</text:p>
          </table:table-cell>
          <table:table-cell table:formula="of:=[.D1691]-[.D169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[.B1690]+7" office:value-type="float" office:value="11830" calcext:value-type="float">
            <text:p>11830</text:p>
          </table:table-cell>
          <table:table-cell office:value-type="float" office:value="8640000" calcext:value-type="float">
            <text:p>8640000</text:p>
          </table:table-cell>
          <table:table-cell table:formula="of:=[.B1691]/[.C1691]" office:value-type="float" office:value="0.00136921296296296" calcext:value-type="float">
            <text:p>0,00136921296296296000</text:p>
          </table:table-cell>
          <table:table-cell table:formula="of:=[.D1692]-[.D169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[.B1691]+7" office:value-type="float" office:value="11837" calcext:value-type="float">
            <text:p>11837</text:p>
          </table:table-cell>
          <table:table-cell office:value-type="float" office:value="8640000" calcext:value-type="float">
            <text:p>8640000</text:p>
          </table:table-cell>
          <table:table-cell table:formula="of:=[.B1692]/[.C1692]" office:value-type="float" office:value="0.00137002314814815" calcext:value-type="float">
            <text:p>0,00137002314814815000</text:p>
          </table:table-cell>
          <table:table-cell table:formula="of:=[.D1693]-[.D169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[.B1692]+7" office:value-type="float" office:value="11844" calcext:value-type="float">
            <text:p>11844</text:p>
          </table:table-cell>
          <table:table-cell office:value-type="float" office:value="8640000" calcext:value-type="float">
            <text:p>8640000</text:p>
          </table:table-cell>
          <table:table-cell table:formula="of:=[.B1693]/[.C1693]" office:value-type="float" office:value="0.00137083333333333" calcext:value-type="float">
            <text:p>0,00137083333333333000</text:p>
          </table:table-cell>
          <table:table-cell table:formula="of:=[.D1694]-[.D169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[.B1693]+7" office:value-type="float" office:value="11851" calcext:value-type="float">
            <text:p>11851</text:p>
          </table:table-cell>
          <table:table-cell office:value-type="float" office:value="8640000" calcext:value-type="float">
            <text:p>8640000</text:p>
          </table:table-cell>
          <table:table-cell table:formula="of:=[.B1694]/[.C1694]" office:value-type="float" office:value="0.00137164351851852" calcext:value-type="float">
            <text:p>0,00137164351851852000</text:p>
          </table:table-cell>
          <table:table-cell table:formula="of:=[.D1695]-[.D169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[.B1694]+7" office:value-type="float" office:value="11858" calcext:value-type="float">
            <text:p>11858</text:p>
          </table:table-cell>
          <table:table-cell office:value-type="float" office:value="8640000" calcext:value-type="float">
            <text:p>8640000</text:p>
          </table:table-cell>
          <table:table-cell table:formula="of:=[.B1695]/[.C1695]" office:value-type="float" office:value="0.0013724537037037" calcext:value-type="float">
            <text:p>0,00137245370370370000</text:p>
          </table:table-cell>
          <table:table-cell table:formula="of:=[.D1696]-[.D169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[.B1695]+7" office:value-type="float" office:value="11865" calcext:value-type="float">
            <text:p>11865</text:p>
          </table:table-cell>
          <table:table-cell office:value-type="float" office:value="8640000" calcext:value-type="float">
            <text:p>8640000</text:p>
          </table:table-cell>
          <table:table-cell table:formula="of:=[.B1696]/[.C1696]" office:value-type="float" office:value="0.00137326388888889" calcext:value-type="float">
            <text:p>0,00137326388888889000</text:p>
          </table:table-cell>
          <table:table-cell table:formula="of:=[.D1697]-[.D169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[.B1696]+7" office:value-type="float" office:value="11872" calcext:value-type="float">
            <text:p>11872</text:p>
          </table:table-cell>
          <table:table-cell office:value-type="float" office:value="8640000" calcext:value-type="float">
            <text:p>8640000</text:p>
          </table:table-cell>
          <table:table-cell table:formula="of:=[.B1697]/[.C1697]" office:value-type="float" office:value="0.00137407407407407" calcext:value-type="float">
            <text:p>0,00137407407407407000</text:p>
          </table:table-cell>
          <table:table-cell table:formula="of:=[.D1698]-[.D169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[.B1697]+7" office:value-type="float" office:value="11879" calcext:value-type="float">
            <text:p>11879</text:p>
          </table:table-cell>
          <table:table-cell office:value-type="float" office:value="8640000" calcext:value-type="float">
            <text:p>8640000</text:p>
          </table:table-cell>
          <table:table-cell table:formula="of:=[.B1698]/[.C1698]" office:value-type="float" office:value="0.00137488425925926" calcext:value-type="float">
            <text:p>0,00137488425925926000</text:p>
          </table:table-cell>
          <table:table-cell table:formula="of:=[.D1699]-[.D169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B1698]+7" office:value-type="float" office:value="11886" calcext:value-type="float">
            <text:p>11886</text:p>
          </table:table-cell>
          <table:table-cell office:value-type="float" office:value="8640000" calcext:value-type="float">
            <text:p>8640000</text:p>
          </table:table-cell>
          <table:table-cell table:formula="of:=[.B1699]/[.C1699]" office:value-type="float" office:value="0.00137569444444444" calcext:value-type="float">
            <text:p>0,00137569444444444000</text:p>
          </table:table-cell>
          <table:table-cell table:formula="of:=[.D1700]-[.D169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B1699]+7" office:value-type="float" office:value="11893" calcext:value-type="float">
            <text:p>11893</text:p>
          </table:table-cell>
          <table:table-cell office:value-type="float" office:value="8640000" calcext:value-type="float">
            <text:p>8640000</text:p>
          </table:table-cell>
          <table:table-cell table:formula="of:=[.B1700]/[.C1700]" office:value-type="float" office:value="0.00137650462962963" calcext:value-type="float">
            <text:p>0,00137650462962963000</text:p>
          </table:table-cell>
          <table:table-cell table:formula="of:=[.D1701]-[.D170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B1700]+7" office:value-type="float" office:value="11900" calcext:value-type="float">
            <text:p>11900</text:p>
          </table:table-cell>
          <table:table-cell office:value-type="float" office:value="8640000" calcext:value-type="float">
            <text:p>8640000</text:p>
          </table:table-cell>
          <table:table-cell table:formula="of:=[.B1701]/[.C1701]" office:value-type="float" office:value="0.00137731481481481" calcext:value-type="float">
            <text:p>0,00137731481481481000</text:p>
          </table:table-cell>
          <table:table-cell table:formula="of:=[.D1702]-[.D170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[.B1701]+7" office:value-type="float" office:value="11907" calcext:value-type="float">
            <text:p>11907</text:p>
          </table:table-cell>
          <table:table-cell office:value-type="float" office:value="8640000" calcext:value-type="float">
            <text:p>8640000</text:p>
          </table:table-cell>
          <table:table-cell table:formula="of:=[.B1702]/[.C1702]" office:value-type="float" office:value="0.001378125" calcext:value-type="float">
            <text:p>0,00137812500000000000</text:p>
          </table:table-cell>
          <table:table-cell table:formula="of:=[.D1703]-[.D170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[.B1702]+7" office:value-type="float" office:value="11914" calcext:value-type="float">
            <text:p>11914</text:p>
          </table:table-cell>
          <table:table-cell office:value-type="float" office:value="8640000" calcext:value-type="float">
            <text:p>8640000</text:p>
          </table:table-cell>
          <table:table-cell table:formula="of:=[.B1703]/[.C1703]" office:value-type="float" office:value="0.00137893518518519" calcext:value-type="float">
            <text:p>0,00137893518518519000</text:p>
          </table:table-cell>
          <table:table-cell table:formula="of:=[.D1704]-[.D170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B1703]+7" office:value-type="float" office:value="11921" calcext:value-type="float">
            <text:p>11921</text:p>
          </table:table-cell>
          <table:table-cell office:value-type="float" office:value="8640000" calcext:value-type="float">
            <text:p>8640000</text:p>
          </table:table-cell>
          <table:table-cell table:formula="of:=[.B1704]/[.C1704]" office:value-type="float" office:value="0.00137974537037037" calcext:value-type="float">
            <text:p>0,00137974537037037000</text:p>
          </table:table-cell>
          <table:table-cell table:formula="of:=[.D1705]-[.D170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[.B1704]+7" office:value-type="float" office:value="11928" calcext:value-type="float">
            <text:p>11928</text:p>
          </table:table-cell>
          <table:table-cell office:value-type="float" office:value="8640000" calcext:value-type="float">
            <text:p>8640000</text:p>
          </table:table-cell>
          <table:table-cell table:formula="of:=[.B1705]/[.C1705]" office:value-type="float" office:value="0.00138055555555556" calcext:value-type="float">
            <text:p>0,00138055555555556000</text:p>
          </table:table-cell>
          <table:table-cell table:formula="of:=[.D1706]-[.D170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[.B1705]+7" office:value-type="float" office:value="11935" calcext:value-type="float">
            <text:p>11935</text:p>
          </table:table-cell>
          <table:table-cell office:value-type="float" office:value="8640000" calcext:value-type="float">
            <text:p>8640000</text:p>
          </table:table-cell>
          <table:table-cell table:formula="of:=[.B1706]/[.C1706]" office:value-type="float" office:value="0.00138136574074074" calcext:value-type="float">
            <text:p>0,00138136574074074000</text:p>
          </table:table-cell>
          <table:table-cell table:formula="of:=[.D1707]-[.D170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[.B1706]+7" office:value-type="float" office:value="11942" calcext:value-type="float">
            <text:p>11942</text:p>
          </table:table-cell>
          <table:table-cell office:value-type="float" office:value="8640000" calcext:value-type="float">
            <text:p>8640000</text:p>
          </table:table-cell>
          <table:table-cell table:formula="of:=[.B1707]/[.C1707]" office:value-type="float" office:value="0.00138217592592593" calcext:value-type="float">
            <text:p>0,00138217592592593000</text:p>
          </table:table-cell>
          <table:table-cell table:formula="of:=[.D1708]-[.D170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[.B1707]+7" office:value-type="float" office:value="11949" calcext:value-type="float">
            <text:p>11949</text:p>
          </table:table-cell>
          <table:table-cell office:value-type="float" office:value="8640000" calcext:value-type="float">
            <text:p>8640000</text:p>
          </table:table-cell>
          <table:table-cell table:formula="of:=[.B1708]/[.C1708]" office:value-type="float" office:value="0.00138298611111111" calcext:value-type="float">
            <text:p>0,00138298611111111000</text:p>
          </table:table-cell>
          <table:table-cell table:formula="of:=[.D1709]-[.D170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[.B1708]+7" office:value-type="float" office:value="11956" calcext:value-type="float">
            <text:p>11956</text:p>
          </table:table-cell>
          <table:table-cell office:value-type="float" office:value="8640000" calcext:value-type="float">
            <text:p>8640000</text:p>
          </table:table-cell>
          <table:table-cell table:formula="of:=[.B1709]/[.C1709]" office:value-type="float" office:value="0.0013837962962963" calcext:value-type="float">
            <text:p>0,00138379629629630000</text:p>
          </table:table-cell>
          <table:table-cell table:formula="of:=[.D1710]-[.D170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[.B1709]+7" office:value-type="float" office:value="11963" calcext:value-type="float">
            <text:p>11963</text:p>
          </table:table-cell>
          <table:table-cell office:value-type="float" office:value="8640000" calcext:value-type="float">
            <text:p>8640000</text:p>
          </table:table-cell>
          <table:table-cell table:formula="of:=[.B1710]/[.C1710]" office:value-type="float" office:value="0.00138460648148148" calcext:value-type="float">
            <text:p>0,00138460648148148000</text:p>
          </table:table-cell>
          <table:table-cell table:formula="of:=[.D1711]-[.D171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[.B1710]+7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1711]/[.C1711]" office:value-type="float" office:value="0.00138541666666667" calcext:value-type="float">
            <text:p>0,00138541666666667000</text:p>
          </table:table-cell>
          <table:table-cell table:formula="of:=[.D1712]-[.D171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[.B1711]+7" office:value-type="float" office:value="11977" calcext:value-type="float">
            <text:p>11977</text:p>
          </table:table-cell>
          <table:table-cell office:value-type="float" office:value="8640000" calcext:value-type="float">
            <text:p>8640000</text:p>
          </table:table-cell>
          <table:table-cell table:formula="of:=[.B1712]/[.C1712]" office:value-type="float" office:value="0.00138622685185185" calcext:value-type="float">
            <text:p>0,00138622685185185000</text:p>
          </table:table-cell>
          <table:table-cell table:formula="of:=[.D1713]-[.D171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[.B1712]+7" office:value-type="float" office:value="11984" calcext:value-type="float">
            <text:p>11984</text:p>
          </table:table-cell>
          <table:table-cell office:value-type="float" office:value="8640000" calcext:value-type="float">
            <text:p>8640000</text:p>
          </table:table-cell>
          <table:table-cell table:formula="of:=[.B1713]/[.C1713]" office:value-type="float" office:value="0.00138703703703704" calcext:value-type="float">
            <text:p>0,00138703703703704000</text:p>
          </table:table-cell>
          <table:table-cell table:formula="of:=[.D1714]-[.D171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[.B1713]+7" office:value-type="float" office:value="11991" calcext:value-type="float">
            <text:p>11991</text:p>
          </table:table-cell>
          <table:table-cell office:value-type="float" office:value="8640000" calcext:value-type="float">
            <text:p>8640000</text:p>
          </table:table-cell>
          <table:table-cell table:formula="of:=[.B1714]/[.C1714]" office:value-type="float" office:value="0.00138784722222222" calcext:value-type="float">
            <text:p>0,00138784722222222000</text:p>
          </table:table-cell>
          <table:table-cell table:formula="of:=[.D1715]-[.D171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[.B1714]+7" office:value-type="float" office:value="11998" calcext:value-type="float">
            <text:p>11998</text:p>
          </table:table-cell>
          <table:table-cell office:value-type="float" office:value="8640000" calcext:value-type="float">
            <text:p>8640000</text:p>
          </table:table-cell>
          <table:table-cell table:formula="of:=[.B1715]/[.C1715]" office:value-type="float" office:value="0.00138865740740741" calcext:value-type="float">
            <text:p>0,00138865740740741000</text:p>
          </table:table-cell>
          <table:table-cell table:formula="of:=[.D1716]-[.D171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[.B1715]+7" office:value-type="float" office:value="12005" calcext:value-type="float">
            <text:p>12005</text:p>
          </table:table-cell>
          <table:table-cell office:value-type="float" office:value="8640000" calcext:value-type="float">
            <text:p>8640000</text:p>
          </table:table-cell>
          <table:table-cell table:formula="of:=[.B1716]/[.C1716]" office:value-type="float" office:value="0.00138946759259259" calcext:value-type="float">
            <text:p>0,00138946759259259000</text:p>
          </table:table-cell>
          <table:table-cell table:formula="of:=[.D1717]-[.D171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[.B1716]+7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1717]/[.C1717]" office:value-type="float" office:value="0.00139027777777778" calcext:value-type="float">
            <text:p>0,00139027777777778000</text:p>
          </table:table-cell>
          <table:table-cell table:formula="of:=[.D1718]-[.D171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[.B1717]+7" office:value-type="float" office:value="12019" calcext:value-type="float">
            <text:p>12019</text:p>
          </table:table-cell>
          <table:table-cell office:value-type="float" office:value="8640000" calcext:value-type="float">
            <text:p>8640000</text:p>
          </table:table-cell>
          <table:table-cell table:formula="of:=[.B1718]/[.C1718]" office:value-type="float" office:value="0.00139108796296296" calcext:value-type="float">
            <text:p>0,00139108796296296000</text:p>
          </table:table-cell>
          <table:table-cell table:formula="of:=[.D1719]-[.D171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[.B1718]+7" office:value-type="float" office:value="12026" calcext:value-type="float">
            <text:p>12026</text:p>
          </table:table-cell>
          <table:table-cell office:value-type="float" office:value="8640000" calcext:value-type="float">
            <text:p>8640000</text:p>
          </table:table-cell>
          <table:table-cell table:formula="of:=[.B1719]/[.C1719]" office:value-type="float" office:value="0.00139189814814815" calcext:value-type="float">
            <text:p>0,00139189814814815000</text:p>
          </table:table-cell>
          <table:table-cell table:formula="of:=[.D1720]-[.D171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[.B1719]+7" office:value-type="float" office:value="12033" calcext:value-type="float">
            <text:p>12033</text:p>
          </table:table-cell>
          <table:table-cell office:value-type="float" office:value="8640000" calcext:value-type="float">
            <text:p>8640000</text:p>
          </table:table-cell>
          <table:table-cell table:formula="of:=[.B1720]/[.C1720]" office:value-type="float" office:value="0.00139270833333333" calcext:value-type="float">
            <text:p>0,00139270833333333000</text:p>
          </table:table-cell>
          <table:table-cell table:formula="of:=[.D1721]-[.D172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[.B1720]+7" office:value-type="float" office:value="12040" calcext:value-type="float">
            <text:p>12040</text:p>
          </table:table-cell>
          <table:table-cell office:value-type="float" office:value="8640000" calcext:value-type="float">
            <text:p>8640000</text:p>
          </table:table-cell>
          <table:table-cell table:formula="of:=[.B1721]/[.C1721]" office:value-type="float" office:value="0.00139351851851852" calcext:value-type="float">
            <text:p>0,00139351851851852000</text:p>
          </table:table-cell>
          <table:table-cell table:formula="of:=[.D1722]-[.D172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[.B1721]+7" office:value-type="float" office:value="12047" calcext:value-type="float">
            <text:p>12047</text:p>
          </table:table-cell>
          <table:table-cell office:value-type="float" office:value="8640000" calcext:value-type="float">
            <text:p>8640000</text:p>
          </table:table-cell>
          <table:table-cell table:formula="of:=[.B1722]/[.C1722]" office:value-type="float" office:value="0.0013943287037037" calcext:value-type="float">
            <text:p>0,00139432870370370000</text:p>
          </table:table-cell>
          <table:table-cell table:formula="of:=[.D1723]-[.D172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[.B1722]+7" office:value-type="float" office:value="12054" calcext:value-type="float">
            <text:p>12054</text:p>
          </table:table-cell>
          <table:table-cell office:value-type="float" office:value="8640000" calcext:value-type="float">
            <text:p>8640000</text:p>
          </table:table-cell>
          <table:table-cell table:formula="of:=[.B1723]/[.C1723]" office:value-type="float" office:value="0.00139513888888889" calcext:value-type="float">
            <text:p>0,00139513888888889000</text:p>
          </table:table-cell>
          <table:table-cell table:formula="of:=[.D1724]-[.D172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[.B1723]+7" office:value-type="float" office:value="12061" calcext:value-type="float">
            <text:p>12061</text:p>
          </table:table-cell>
          <table:table-cell office:value-type="float" office:value="8640000" calcext:value-type="float">
            <text:p>8640000</text:p>
          </table:table-cell>
          <table:table-cell table:formula="of:=[.B1724]/[.C1724]" office:value-type="float" office:value="0.00139594907407407" calcext:value-type="float">
            <text:p>0,00139594907407407000</text:p>
          </table:table-cell>
          <table:table-cell table:formula="of:=[.D1725]-[.D172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[.B1724]+7" office:value-type="float" office:value="12068" calcext:value-type="float">
            <text:p>12068</text:p>
          </table:table-cell>
          <table:table-cell office:value-type="float" office:value="8640000" calcext:value-type="float">
            <text:p>8640000</text:p>
          </table:table-cell>
          <table:table-cell table:formula="of:=[.B1725]/[.C1725]" office:value-type="float" office:value="0.00139675925925926" calcext:value-type="float">
            <text:p>0,00139675925925926000</text:p>
          </table:table-cell>
          <table:table-cell table:formula="of:=[.D1726]-[.D172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[.B1725]+7" office:value-type="float" office:value="12075" calcext:value-type="float">
            <text:p>12075</text:p>
          </table:table-cell>
          <table:table-cell office:value-type="float" office:value="8640000" calcext:value-type="float">
            <text:p>8640000</text:p>
          </table:table-cell>
          <table:table-cell table:formula="of:=[.B1726]/[.C1726]" office:value-type="float" office:value="0.00139756944444444" calcext:value-type="float">
            <text:p>0,00139756944444444000</text:p>
          </table:table-cell>
          <table:table-cell table:formula="of:=[.D1727]-[.D172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[.B1726]+7" office:value-type="float" office:value="12082" calcext:value-type="float">
            <text:p>12082</text:p>
          </table:table-cell>
          <table:table-cell office:value-type="float" office:value="8640000" calcext:value-type="float">
            <text:p>8640000</text:p>
          </table:table-cell>
          <table:table-cell table:formula="of:=[.B1727]/[.C1727]" office:value-type="float" office:value="0.00139837962962963" calcext:value-type="float">
            <text:p>0,00139837962962963000</text:p>
          </table:table-cell>
          <table:table-cell table:formula="of:=[.D1728]-[.D172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[.B1727]+7" office:value-type="float" office:value="12089" calcext:value-type="float">
            <text:p>12089</text:p>
          </table:table-cell>
          <table:table-cell office:value-type="float" office:value="8640000" calcext:value-type="float">
            <text:p>8640000</text:p>
          </table:table-cell>
          <table:table-cell table:formula="of:=[.B1728]/[.C1728]" office:value-type="float" office:value="0.00139918981481482" calcext:value-type="float">
            <text:p>0,00139918981481482000</text:p>
          </table:table-cell>
          <table:table-cell table:formula="of:=[.D1729]-[.D172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[.B1728]+7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1729]/[.C1729]" office:value-type="float" office:value="0.0014" calcext:value-type="float">
            <text:p>0,00140000000000000000</text:p>
          </table:table-cell>
          <table:table-cell table:formula="of:=[.D1730]-[.D172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[.B1729]+7" office:value-type="float" office:value="12103" calcext:value-type="float">
            <text:p>12103</text:p>
          </table:table-cell>
          <table:table-cell office:value-type="float" office:value="8640000" calcext:value-type="float">
            <text:p>8640000</text:p>
          </table:table-cell>
          <table:table-cell table:formula="of:=[.B1730]/[.C1730]" office:value-type="float" office:value="0.00140081018518519" calcext:value-type="float">
            <text:p>0,00140081018518519000</text:p>
          </table:table-cell>
          <table:table-cell table:formula="of:=[.D1731]-[.D173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[.B1730]+7" office:value-type="float" office:value="12110" calcext:value-type="float">
            <text:p>12110</text:p>
          </table:table-cell>
          <table:table-cell office:value-type="float" office:value="8640000" calcext:value-type="float">
            <text:p>8640000</text:p>
          </table:table-cell>
          <table:table-cell table:formula="of:=[.B1731]/[.C1731]" office:value-type="float" office:value="0.00140162037037037" calcext:value-type="float">
            <text:p>0,00140162037037037000</text:p>
          </table:table-cell>
          <table:table-cell table:formula="of:=[.D1732]-[.D173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[.B1731]+7" office:value-type="float" office:value="12117" calcext:value-type="float">
            <text:p>12117</text:p>
          </table:table-cell>
          <table:table-cell office:value-type="float" office:value="8640000" calcext:value-type="float">
            <text:p>8640000</text:p>
          </table:table-cell>
          <table:table-cell table:formula="of:=[.B1732]/[.C1732]" office:value-type="float" office:value="0.00140243055555556" calcext:value-type="float">
            <text:p>0,00140243055555556000</text:p>
          </table:table-cell>
          <table:table-cell table:formula="of:=[.D1733]-[.D173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[.B1732]+7" office:value-type="float" office:value="12124" calcext:value-type="float">
            <text:p>12124</text:p>
          </table:table-cell>
          <table:table-cell office:value-type="float" office:value="8640000" calcext:value-type="float">
            <text:p>8640000</text:p>
          </table:table-cell>
          <table:table-cell table:formula="of:=[.B1733]/[.C1733]" office:value-type="float" office:value="0.00140324074074074" calcext:value-type="float">
            <text:p>0,00140324074074074000</text:p>
          </table:table-cell>
          <table:table-cell table:formula="of:=[.D1734]-[.D173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[.B1733]+7" office:value-type="float" office:value="12131" calcext:value-type="float">
            <text:p>12131</text:p>
          </table:table-cell>
          <table:table-cell office:value-type="float" office:value="8640000" calcext:value-type="float">
            <text:p>8640000</text:p>
          </table:table-cell>
          <table:table-cell table:formula="of:=[.B1734]/[.C1734]" office:value-type="float" office:value="0.00140405092592593" calcext:value-type="float">
            <text:p>0,00140405092592593000</text:p>
          </table:table-cell>
          <table:table-cell table:formula="of:=[.D1735]-[.D173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[.B1734]+7" office:value-type="float" office:value="12138" calcext:value-type="float">
            <text:p>12138</text:p>
          </table:table-cell>
          <table:table-cell office:value-type="float" office:value="8640000" calcext:value-type="float">
            <text:p>8640000</text:p>
          </table:table-cell>
          <table:table-cell table:formula="of:=[.B1735]/[.C1735]" office:value-type="float" office:value="0.00140486111111111" calcext:value-type="float">
            <text:p>0,00140486111111111000</text:p>
          </table:table-cell>
          <table:table-cell table:formula="of:=[.D1736]-[.D173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[.B1735]+7" office:value-type="float" office:value="12145" calcext:value-type="float">
            <text:p>12145</text:p>
          </table:table-cell>
          <table:table-cell office:value-type="float" office:value="8640000" calcext:value-type="float">
            <text:p>8640000</text:p>
          </table:table-cell>
          <table:table-cell table:formula="of:=[.B1736]/[.C1736]" office:value-type="float" office:value="0.0014056712962963" calcext:value-type="float">
            <text:p>0,00140567129629630000</text:p>
          </table:table-cell>
          <table:table-cell table:formula="of:=[.D1737]-[.D173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[.B1736]+7" office:value-type="float" office:value="12152" calcext:value-type="float">
            <text:p>12152</text:p>
          </table:table-cell>
          <table:table-cell office:value-type="float" office:value="8640000" calcext:value-type="float">
            <text:p>8640000</text:p>
          </table:table-cell>
          <table:table-cell table:formula="of:=[.B1737]/[.C1737]" office:value-type="float" office:value="0.00140648148148148" calcext:value-type="float">
            <text:p>0,00140648148148148000</text:p>
          </table:table-cell>
          <table:table-cell table:formula="of:=[.D1738]-[.D173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[.B1737]+7" office:value-type="float" office:value="12159" calcext:value-type="float">
            <text:p>12159</text:p>
          </table:table-cell>
          <table:table-cell office:value-type="float" office:value="8640000" calcext:value-type="float">
            <text:p>8640000</text:p>
          </table:table-cell>
          <table:table-cell table:formula="of:=[.B1738]/[.C1738]" office:value-type="float" office:value="0.00140729166666667" calcext:value-type="float">
            <text:p>0,00140729166666667000</text:p>
          </table:table-cell>
          <table:table-cell table:formula="of:=[.D1739]-[.D173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[.B1738]+7" office:value-type="float" office:value="12166" calcext:value-type="float">
            <text:p>12166</text:p>
          </table:table-cell>
          <table:table-cell office:value-type="float" office:value="8640000" calcext:value-type="float">
            <text:p>8640000</text:p>
          </table:table-cell>
          <table:table-cell table:formula="of:=[.B1739]/[.C1739]" office:value-type="float" office:value="0.00140810185185185" calcext:value-type="float">
            <text:p>0,00140810185185185000</text:p>
          </table:table-cell>
          <table:table-cell table:formula="of:=[.D1740]-[.D173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[.B1739]+7" office:value-type="float" office:value="12173" calcext:value-type="float">
            <text:p>12173</text:p>
          </table:table-cell>
          <table:table-cell office:value-type="float" office:value="8640000" calcext:value-type="float">
            <text:p>8640000</text:p>
          </table:table-cell>
          <table:table-cell table:formula="of:=[.B1740]/[.C1740]" office:value-type="float" office:value="0.00140891203703704" calcext:value-type="float">
            <text:p>0,00140891203703704000</text:p>
          </table:table-cell>
          <table:table-cell table:formula="of:=[.D1741]-[.D174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[.B1740]+7" office:value-type="float" office:value="12180" calcext:value-type="float">
            <text:p>12180</text:p>
          </table:table-cell>
          <table:table-cell office:value-type="float" office:value="8640000" calcext:value-type="float">
            <text:p>8640000</text:p>
          </table:table-cell>
          <table:table-cell table:formula="of:=[.B1741]/[.C1741]" office:value-type="float" office:value="0.00140972222222222" calcext:value-type="float">
            <text:p>0,00140972222222222000</text:p>
          </table:table-cell>
          <table:table-cell table:formula="of:=[.D1742]-[.D174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[.B1741]+7" office:value-type="float" office:value="12187" calcext:value-type="float">
            <text:p>12187</text:p>
          </table:table-cell>
          <table:table-cell office:value-type="float" office:value="8640000" calcext:value-type="float">
            <text:p>8640000</text:p>
          </table:table-cell>
          <table:table-cell table:formula="of:=[.B1742]/[.C1742]" office:value-type="float" office:value="0.00141053240740741" calcext:value-type="float">
            <text:p>0,00141053240740741000</text:p>
          </table:table-cell>
          <table:table-cell table:formula="of:=[.D1743]-[.D174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[.B1742]+7" office:value-type="float" office:value="12194" calcext:value-type="float">
            <text:p>12194</text:p>
          </table:table-cell>
          <table:table-cell office:value-type="float" office:value="8640000" calcext:value-type="float">
            <text:p>8640000</text:p>
          </table:table-cell>
          <table:table-cell table:formula="of:=[.B1743]/[.C1743]" office:value-type="float" office:value="0.00141134259259259" calcext:value-type="float">
            <text:p>0,00141134259259259000</text:p>
          </table:table-cell>
          <table:table-cell table:formula="of:=[.D1744]-[.D174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[.B1743]+7" office:value-type="float" office:value="12201" calcext:value-type="float">
            <text:p>12201</text:p>
          </table:table-cell>
          <table:table-cell office:value-type="float" office:value="8640000" calcext:value-type="float">
            <text:p>8640000</text:p>
          </table:table-cell>
          <table:table-cell table:formula="of:=[.B1744]/[.C1744]" office:value-type="float" office:value="0.00141215277777778" calcext:value-type="float">
            <text:p>0,00141215277777778000</text:p>
          </table:table-cell>
          <table:table-cell table:formula="of:=[.D1745]-[.D174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[.B1744]+7" office:value-type="float" office:value="12208" calcext:value-type="float">
            <text:p>12208</text:p>
          </table:table-cell>
          <table:table-cell office:value-type="float" office:value="8640000" calcext:value-type="float">
            <text:p>8640000</text:p>
          </table:table-cell>
          <table:table-cell table:formula="of:=[.B1745]/[.C1745]" office:value-type="float" office:value="0.00141296296296296" calcext:value-type="float">
            <text:p>0,00141296296296296000</text:p>
          </table:table-cell>
          <table:table-cell table:formula="of:=[.D1746]-[.D174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[.B1745]+7" office:value-type="float" office:value="12215" calcext:value-type="float">
            <text:p>12215</text:p>
          </table:table-cell>
          <table:table-cell office:value-type="float" office:value="8640000" calcext:value-type="float">
            <text:p>8640000</text:p>
          </table:table-cell>
          <table:table-cell table:formula="of:=[.B1746]/[.C1746]" office:value-type="float" office:value="0.00141377314814815" calcext:value-type="float">
            <text:p>0,00141377314814815000</text:p>
          </table:table-cell>
          <table:table-cell table:formula="of:=[.D1747]-[.D174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[.B1746]+7" office:value-type="float" office:value="12222" calcext:value-type="float">
            <text:p>12222</text:p>
          </table:table-cell>
          <table:table-cell office:value-type="float" office:value="8640000" calcext:value-type="float">
            <text:p>8640000</text:p>
          </table:table-cell>
          <table:table-cell table:formula="of:=[.B1747]/[.C1747]" office:value-type="float" office:value="0.00141458333333333" calcext:value-type="float">
            <text:p>0,00141458333333333000</text:p>
          </table:table-cell>
          <table:table-cell table:formula="of:=[.D1748]-[.D174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[.B1747]+7" office:value-type="float" office:value="12229" calcext:value-type="float">
            <text:p>12229</text:p>
          </table:table-cell>
          <table:table-cell office:value-type="float" office:value="8640000" calcext:value-type="float">
            <text:p>8640000</text:p>
          </table:table-cell>
          <table:table-cell table:formula="of:=[.B1748]/[.C1748]" office:value-type="float" office:value="0.00141539351851852" calcext:value-type="float">
            <text:p>0,00141539351851852000</text:p>
          </table:table-cell>
          <table:table-cell table:formula="of:=[.D1749]-[.D174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[.B1748]+7" office:value-type="float" office:value="12236" calcext:value-type="float">
            <text:p>12236</text:p>
          </table:table-cell>
          <table:table-cell office:value-type="float" office:value="8640000" calcext:value-type="float">
            <text:p>8640000</text:p>
          </table:table-cell>
          <table:table-cell table:formula="of:=[.B1749]/[.C1749]" office:value-type="float" office:value="0.0014162037037037" calcext:value-type="float">
            <text:p>0,00141620370370370000</text:p>
          </table:table-cell>
          <table:table-cell table:formula="of:=[.D1750]-[.D174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[.B1749]+7" office:value-type="float" office:value="12243" calcext:value-type="float">
            <text:p>12243</text:p>
          </table:table-cell>
          <table:table-cell office:value-type="float" office:value="8640000" calcext:value-type="float">
            <text:p>8640000</text:p>
          </table:table-cell>
          <table:table-cell table:formula="of:=[.B1750]/[.C1750]" office:value-type="float" office:value="0.00141701388888889" calcext:value-type="float">
            <text:p>0,00141701388888889000</text:p>
          </table:table-cell>
          <table:table-cell table:formula="of:=[.D1751]-[.D175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B1750]+7" office:value-type="float" office:value="12250" calcext:value-type="float">
            <text:p>12250</text:p>
          </table:table-cell>
          <table:table-cell office:value-type="float" office:value="8640000" calcext:value-type="float">
            <text:p>8640000</text:p>
          </table:table-cell>
          <table:table-cell table:formula="of:=[.B1751]/[.C1751]" office:value-type="float" office:value="0.00141782407407407" calcext:value-type="float">
            <text:p>0,00141782407407407000</text:p>
          </table:table-cell>
          <table:table-cell table:formula="of:=[.D1752]-[.D175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[.B1751]+7" office:value-type="float" office:value="12257" calcext:value-type="float">
            <text:p>12257</text:p>
          </table:table-cell>
          <table:table-cell office:value-type="float" office:value="8640000" calcext:value-type="float">
            <text:p>8640000</text:p>
          </table:table-cell>
          <table:table-cell table:formula="of:=[.B1752]/[.C1752]" office:value-type="float" office:value="0.00141863425925926" calcext:value-type="float">
            <text:p>0,00141863425925926000</text:p>
          </table:table-cell>
          <table:table-cell table:formula="of:=[.D1753]-[.D175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[.B1752]+7" office:value-type="float" office:value="12264" calcext:value-type="float">
            <text:p>12264</text:p>
          </table:table-cell>
          <table:table-cell office:value-type="float" office:value="8640000" calcext:value-type="float">
            <text:p>8640000</text:p>
          </table:table-cell>
          <table:table-cell table:formula="of:=[.B1753]/[.C1753]" office:value-type="float" office:value="0.00141944444444444" calcext:value-type="float">
            <text:p>0,00141944444444444000</text:p>
          </table:table-cell>
          <table:table-cell table:formula="of:=[.D1754]-[.D175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[.B1753]+7" office:value-type="float" office:value="12271" calcext:value-type="float">
            <text:p>12271</text:p>
          </table:table-cell>
          <table:table-cell office:value-type="float" office:value="8640000" calcext:value-type="float">
            <text:p>8640000</text:p>
          </table:table-cell>
          <table:table-cell table:formula="of:=[.B1754]/[.C1754]" office:value-type="float" office:value="0.00142025462962963" calcext:value-type="float">
            <text:p>0,00142025462962963000</text:p>
          </table:table-cell>
          <table:table-cell table:formula="of:=[.D1755]-[.D175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[.B1754]+7" office:value-type="float" office:value="12278" calcext:value-type="float">
            <text:p>12278</text:p>
          </table:table-cell>
          <table:table-cell office:value-type="float" office:value="8640000" calcext:value-type="float">
            <text:p>8640000</text:p>
          </table:table-cell>
          <table:table-cell table:formula="of:=[.B1755]/[.C1755]" office:value-type="float" office:value="0.00142106481481481" calcext:value-type="float">
            <text:p>0,00142106481481481000</text:p>
          </table:table-cell>
          <table:table-cell table:formula="of:=[.D1756]-[.D175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[.B1755]+7" office:value-type="float" office:value="12285" calcext:value-type="float">
            <text:p>12285</text:p>
          </table:table-cell>
          <table:table-cell office:value-type="float" office:value="8640000" calcext:value-type="float">
            <text:p>8640000</text:p>
          </table:table-cell>
          <table:table-cell table:formula="of:=[.B1756]/[.C1756]" office:value-type="float" office:value="0.001421875" calcext:value-type="float">
            <text:p>0,00142187500000000000</text:p>
          </table:table-cell>
          <table:table-cell table:formula="of:=[.D1757]-[.D175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[.B1756]+7" office:value-type="float" office:value="12292" calcext:value-type="float">
            <text:p>12292</text:p>
          </table:table-cell>
          <table:table-cell office:value-type="float" office:value="8640000" calcext:value-type="float">
            <text:p>8640000</text:p>
          </table:table-cell>
          <table:table-cell table:formula="of:=[.B1757]/[.C1757]" office:value-type="float" office:value="0.00142268518518519" calcext:value-type="float">
            <text:p>0,00142268518518519000</text:p>
          </table:table-cell>
          <table:table-cell table:formula="of:=[.D1758]-[.D175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[.B1757]+7" office:value-type="float" office:value="12299" calcext:value-type="float">
            <text:p>12299</text:p>
          </table:table-cell>
          <table:table-cell office:value-type="float" office:value="8640000" calcext:value-type="float">
            <text:p>8640000</text:p>
          </table:table-cell>
          <table:table-cell table:formula="of:=[.B1758]/[.C1758]" office:value-type="float" office:value="0.00142349537037037" calcext:value-type="float">
            <text:p>0,00142349537037037000</text:p>
          </table:table-cell>
          <table:table-cell table:formula="of:=[.D1759]-[.D175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[.B1758]+7" office:value-type="float" office:value="12306" calcext:value-type="float">
            <text:p>12306</text:p>
          </table:table-cell>
          <table:table-cell office:value-type="float" office:value="8640000" calcext:value-type="float">
            <text:p>8640000</text:p>
          </table:table-cell>
          <table:table-cell table:formula="of:=[.B1759]/[.C1759]" office:value-type="float" office:value="0.00142430555555556" calcext:value-type="float">
            <text:p>0,00142430555555556000</text:p>
          </table:table-cell>
          <table:table-cell table:formula="of:=[.D1760]-[.D175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[.B1759]+7" office:value-type="float" office:value="12313" calcext:value-type="float">
            <text:p>12313</text:p>
          </table:table-cell>
          <table:table-cell office:value-type="float" office:value="8640000" calcext:value-type="float">
            <text:p>8640000</text:p>
          </table:table-cell>
          <table:table-cell table:formula="of:=[.B1760]/[.C1760]" office:value-type="float" office:value="0.00142511574074074" calcext:value-type="float">
            <text:p>0,00142511574074074000</text:p>
          </table:table-cell>
          <table:table-cell table:formula="of:=[.D1761]-[.D176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[.B1760]+7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1761]/[.C1761]" office:value-type="float" office:value="0.00142592592592593" calcext:value-type="float">
            <text:p>0,00142592592592593000</text:p>
          </table:table-cell>
          <table:table-cell table:formula="of:=[.D1762]-[.D176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B1761]+7" office:value-type="float" office:value="12327" calcext:value-type="float">
            <text:p>12327</text:p>
          </table:table-cell>
          <table:table-cell office:value-type="float" office:value="8640000" calcext:value-type="float">
            <text:p>8640000</text:p>
          </table:table-cell>
          <table:table-cell table:formula="of:=[.B1762]/[.C1762]" office:value-type="float" office:value="0.00142673611111111" calcext:value-type="float">
            <text:p>0,00142673611111111000</text:p>
          </table:table-cell>
          <table:table-cell table:formula="of:=[.D1763]-[.D176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[.B1762]+7" office:value-type="float" office:value="12334" calcext:value-type="float">
            <text:p>12334</text:p>
          </table:table-cell>
          <table:table-cell office:value-type="float" office:value="8640000" calcext:value-type="float">
            <text:p>8640000</text:p>
          </table:table-cell>
          <table:table-cell table:formula="of:=[.B1763]/[.C1763]" office:value-type="float" office:value="0.0014275462962963" calcext:value-type="float">
            <text:p>0,00142754629629630000</text:p>
          </table:table-cell>
          <table:table-cell table:formula="of:=[.D1764]-[.D176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B1763]+7" office:value-type="float" office:value="12341" calcext:value-type="float">
            <text:p>12341</text:p>
          </table:table-cell>
          <table:table-cell office:value-type="float" office:value="8640000" calcext:value-type="float">
            <text:p>8640000</text:p>
          </table:table-cell>
          <table:table-cell table:formula="of:=[.B1764]/[.C1764]" office:value-type="float" office:value="0.00142835648148148" calcext:value-type="float">
            <text:p>0,00142835648148148000</text:p>
          </table:table-cell>
          <table:table-cell table:formula="of:=[.D1765]-[.D176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[.B1764]+7" office:value-type="float" office:value="12348" calcext:value-type="float">
            <text:p>12348</text:p>
          </table:table-cell>
          <table:table-cell office:value-type="float" office:value="8640000" calcext:value-type="float">
            <text:p>8640000</text:p>
          </table:table-cell>
          <table:table-cell table:formula="of:=[.B1765]/[.C1765]" office:value-type="float" office:value="0.00142916666666667" calcext:value-type="float">
            <text:p>0,00142916666666667000</text:p>
          </table:table-cell>
          <table:table-cell table:formula="of:=[.D1766]-[.D176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[.B1765]+7" office:value-type="float" office:value="12355" calcext:value-type="float">
            <text:p>12355</text:p>
          </table:table-cell>
          <table:table-cell office:value-type="float" office:value="8640000" calcext:value-type="float">
            <text:p>8640000</text:p>
          </table:table-cell>
          <table:table-cell table:formula="of:=[.B1766]/[.C1766]" office:value-type="float" office:value="0.00142997685185185" calcext:value-type="float">
            <text:p>0,00142997685185185000</text:p>
          </table:table-cell>
          <table:table-cell table:formula="of:=[.D1767]-[.D176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[.B1766]+7" office:value-type="float" office:value="12362" calcext:value-type="float">
            <text:p>12362</text:p>
          </table:table-cell>
          <table:table-cell office:value-type="float" office:value="8640000" calcext:value-type="float">
            <text:p>8640000</text:p>
          </table:table-cell>
          <table:table-cell table:formula="of:=[.B1767]/[.C1767]" office:value-type="float" office:value="0.00143078703703704" calcext:value-type="float">
            <text:p>0,00143078703703704000</text:p>
          </table:table-cell>
          <table:table-cell table:formula="of:=[.D1768]-[.D176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[.B1767]+7" office:value-type="float" office:value="12369" calcext:value-type="float">
            <text:p>12369</text:p>
          </table:table-cell>
          <table:table-cell office:value-type="float" office:value="8640000" calcext:value-type="float">
            <text:p>8640000</text:p>
          </table:table-cell>
          <table:table-cell table:formula="of:=[.B1768]/[.C1768]" office:value-type="float" office:value="0.00143159722222222" calcext:value-type="float">
            <text:p>0,00143159722222222000</text:p>
          </table:table-cell>
          <table:table-cell table:formula="of:=[.D1769]-[.D176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[.B1768]+7" office:value-type="float" office:value="12376" calcext:value-type="float">
            <text:p>12376</text:p>
          </table:table-cell>
          <table:table-cell office:value-type="float" office:value="8640000" calcext:value-type="float">
            <text:p>8640000</text:p>
          </table:table-cell>
          <table:table-cell table:formula="of:=[.B1769]/[.C1769]" office:value-type="float" office:value="0.00143240740740741" calcext:value-type="float">
            <text:p>0,00143240740740741000</text:p>
          </table:table-cell>
          <table:table-cell table:formula="of:=[.D1770]-[.D176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[.B1769]+7" office:value-type="float" office:value="12383" calcext:value-type="float">
            <text:p>12383</text:p>
          </table:table-cell>
          <table:table-cell office:value-type="float" office:value="8640000" calcext:value-type="float">
            <text:p>8640000</text:p>
          </table:table-cell>
          <table:table-cell table:formula="of:=[.B1770]/[.C1770]" office:value-type="float" office:value="0.00143321759259259" calcext:value-type="float">
            <text:p>0,00143321759259259000</text:p>
          </table:table-cell>
          <table:table-cell table:formula="of:=[.D1771]-[.D177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[.B1770]+7" office:value-type="float" office:value="12390" calcext:value-type="float">
            <text:p>12390</text:p>
          </table:table-cell>
          <table:table-cell office:value-type="float" office:value="8640000" calcext:value-type="float">
            <text:p>8640000</text:p>
          </table:table-cell>
          <table:table-cell table:formula="of:=[.B1771]/[.C1771]" office:value-type="float" office:value="0.00143402777777778" calcext:value-type="float">
            <text:p>0,00143402777777778000</text:p>
          </table:table-cell>
          <table:table-cell table:formula="of:=[.D1772]-[.D177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[.B1771]+7" office:value-type="float" office:value="12397" calcext:value-type="float">
            <text:p>12397</text:p>
          </table:table-cell>
          <table:table-cell office:value-type="float" office:value="8640000" calcext:value-type="float">
            <text:p>8640000</text:p>
          </table:table-cell>
          <table:table-cell table:formula="of:=[.B1772]/[.C1772]" office:value-type="float" office:value="0.00143483796296296" calcext:value-type="float">
            <text:p>0,00143483796296296000</text:p>
          </table:table-cell>
          <table:table-cell table:formula="of:=[.D1773]-[.D177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[.B1772]+7" office:value-type="float" office:value="12404" calcext:value-type="float">
            <text:p>12404</text:p>
          </table:table-cell>
          <table:table-cell office:value-type="float" office:value="8640000" calcext:value-type="float">
            <text:p>8640000</text:p>
          </table:table-cell>
          <table:table-cell table:formula="of:=[.B1773]/[.C1773]" office:value-type="float" office:value="0.00143564814814815" calcext:value-type="float">
            <text:p>0,00143564814814815000</text:p>
          </table:table-cell>
          <table:table-cell table:formula="of:=[.D1774]-[.D177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[.B1773]+7" office:value-type="float" office:value="12411" calcext:value-type="float">
            <text:p>12411</text:p>
          </table:table-cell>
          <table:table-cell office:value-type="float" office:value="8640000" calcext:value-type="float">
            <text:p>8640000</text:p>
          </table:table-cell>
          <table:table-cell table:formula="of:=[.B1774]/[.C1774]" office:value-type="float" office:value="0.00143645833333333" calcext:value-type="float">
            <text:p>0,00143645833333333000</text:p>
          </table:table-cell>
          <table:table-cell table:formula="of:=[.D1775]-[.D177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[.B1774]+7" office:value-type="float" office:value="12418" calcext:value-type="float">
            <text:p>12418</text:p>
          </table:table-cell>
          <table:table-cell office:value-type="float" office:value="8640000" calcext:value-type="float">
            <text:p>8640000</text:p>
          </table:table-cell>
          <table:table-cell table:formula="of:=[.B1775]/[.C1775]" office:value-type="float" office:value="0.00143726851851852" calcext:value-type="float">
            <text:p>0,00143726851851852000</text:p>
          </table:table-cell>
          <table:table-cell table:formula="of:=[.D1776]-[.D177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.B1775]+7" office:value-type="float" office:value="12425" calcext:value-type="float">
            <text:p>12425</text:p>
          </table:table-cell>
          <table:table-cell office:value-type="float" office:value="8640000" calcext:value-type="float">
            <text:p>8640000</text:p>
          </table:table-cell>
          <table:table-cell table:formula="of:=[.B1776]/[.C1776]" office:value-type="float" office:value="0.0014380787037037" calcext:value-type="float">
            <text:p>0,00143807870370370000</text:p>
          </table:table-cell>
          <table:table-cell table:formula="of:=[.D1777]-[.D177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[.B1776]+7" office:value-type="float" office:value="12432" calcext:value-type="float">
            <text:p>12432</text:p>
          </table:table-cell>
          <table:table-cell office:value-type="float" office:value="8640000" calcext:value-type="float">
            <text:p>8640000</text:p>
          </table:table-cell>
          <table:table-cell table:formula="of:=[.B1777]/[.C1777]" office:value-type="float" office:value="0.00143888888888889" calcext:value-type="float">
            <text:p>0,00143888888888889000</text:p>
          </table:table-cell>
          <table:table-cell table:formula="of:=[.D1778]-[.D177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[.B1777]+7" office:value-type="float" office:value="12439" calcext:value-type="float">
            <text:p>12439</text:p>
          </table:table-cell>
          <table:table-cell office:value-type="float" office:value="8640000" calcext:value-type="float">
            <text:p>8640000</text:p>
          </table:table-cell>
          <table:table-cell table:formula="of:=[.B1778]/[.C1778]" office:value-type="float" office:value="0.00143969907407407" calcext:value-type="float">
            <text:p>0,00143969907407407000</text:p>
          </table:table-cell>
          <table:table-cell table:formula="of:=[.D1779]-[.D177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[.B1778]+7" office:value-type="float" office:value="12446" calcext:value-type="float">
            <text:p>12446</text:p>
          </table:table-cell>
          <table:table-cell office:value-type="float" office:value="8640000" calcext:value-type="float">
            <text:p>8640000</text:p>
          </table:table-cell>
          <table:table-cell table:formula="of:=[.B1779]/[.C1779]" office:value-type="float" office:value="0.00144050925925926" calcext:value-type="float">
            <text:p>0,00144050925925926000</text:p>
          </table:table-cell>
          <table:table-cell table:formula="of:=[.D1780]-[.D177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[.B1779]+7" office:value-type="float" office:value="12453" calcext:value-type="float">
            <text:p>12453</text:p>
          </table:table-cell>
          <table:table-cell office:value-type="float" office:value="8640000" calcext:value-type="float">
            <text:p>8640000</text:p>
          </table:table-cell>
          <table:table-cell table:formula="of:=[.B1780]/[.C1780]" office:value-type="float" office:value="0.00144131944444444" calcext:value-type="float">
            <text:p>0,00144131944444444000</text:p>
          </table:table-cell>
          <table:table-cell table:formula="of:=[.D1781]-[.D178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[.B1780]+7" office:value-type="float" office:value="12460" calcext:value-type="float">
            <text:p>12460</text:p>
          </table:table-cell>
          <table:table-cell office:value-type="float" office:value="8640000" calcext:value-type="float">
            <text:p>8640000</text:p>
          </table:table-cell>
          <table:table-cell table:formula="of:=[.B1781]/[.C1781]" office:value-type="float" office:value="0.00144212962962963" calcext:value-type="float">
            <text:p>0,00144212962962963000</text:p>
          </table:table-cell>
          <table:table-cell table:formula="of:=[.D1782]-[.D178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[.B1781]+7" office:value-type="float" office:value="12467" calcext:value-type="float">
            <text:p>12467</text:p>
          </table:table-cell>
          <table:table-cell office:value-type="float" office:value="8640000" calcext:value-type="float">
            <text:p>8640000</text:p>
          </table:table-cell>
          <table:table-cell table:formula="of:=[.B1782]/[.C1782]" office:value-type="float" office:value="0.00144293981481481" calcext:value-type="float">
            <text:p>0,00144293981481481000</text:p>
          </table:table-cell>
          <table:table-cell table:formula="of:=[.D1783]-[.D178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[.B1782]+7" office:value-type="float" office:value="12474" calcext:value-type="float">
            <text:p>12474</text:p>
          </table:table-cell>
          <table:table-cell office:value-type="float" office:value="8640000" calcext:value-type="float">
            <text:p>8640000</text:p>
          </table:table-cell>
          <table:table-cell table:formula="of:=[.B1783]/[.C1783]" office:value-type="float" office:value="0.00144375" calcext:value-type="float">
            <text:p>0,00144375000000000000</text:p>
          </table:table-cell>
          <table:table-cell table:formula="of:=[.D1784]-[.D178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[.B1783]+7" office:value-type="float" office:value="12481" calcext:value-type="float">
            <text:p>12481</text:p>
          </table:table-cell>
          <table:table-cell office:value-type="float" office:value="8640000" calcext:value-type="float">
            <text:p>8640000</text:p>
          </table:table-cell>
          <table:table-cell table:formula="of:=[.B1784]/[.C1784]" office:value-type="float" office:value="0.00144456018518519" calcext:value-type="float">
            <text:p>0,00144456018518519000</text:p>
          </table:table-cell>
          <table:table-cell table:formula="of:=[.D1785]-[.D178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[.B1784]+7" office:value-type="float" office:value="12488" calcext:value-type="float">
            <text:p>12488</text:p>
          </table:table-cell>
          <table:table-cell office:value-type="float" office:value="8640000" calcext:value-type="float">
            <text:p>8640000</text:p>
          </table:table-cell>
          <table:table-cell table:formula="of:=[.B1785]/[.C1785]" office:value-type="float" office:value="0.00144537037037037" calcext:value-type="float">
            <text:p>0,00144537037037037000</text:p>
          </table:table-cell>
          <table:table-cell table:formula="of:=[.D1786]-[.D178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[.B1785]+7" office:value-type="float" office:value="12495" calcext:value-type="float">
            <text:p>12495</text:p>
          </table:table-cell>
          <table:table-cell office:value-type="float" office:value="8640000" calcext:value-type="float">
            <text:p>8640000</text:p>
          </table:table-cell>
          <table:table-cell table:formula="of:=[.B1786]/[.C1786]" office:value-type="float" office:value="0.00144618055555556" calcext:value-type="float">
            <text:p>0,00144618055555556000</text:p>
          </table:table-cell>
          <table:table-cell table:formula="of:=[.D1787]-[.D178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[.B1786]+7" office:value-type="float" office:value="12502" calcext:value-type="float">
            <text:p>12502</text:p>
          </table:table-cell>
          <table:table-cell office:value-type="float" office:value="8640000" calcext:value-type="float">
            <text:p>8640000</text:p>
          </table:table-cell>
          <table:table-cell table:formula="of:=[.B1787]/[.C1787]" office:value-type="float" office:value="0.00144699074074074" calcext:value-type="float">
            <text:p>0,00144699074074074000</text:p>
          </table:table-cell>
          <table:table-cell table:formula="of:=[.D1788]-[.D178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[.B1787]+7" office:value-type="float" office:value="12509" calcext:value-type="float">
            <text:p>12509</text:p>
          </table:table-cell>
          <table:table-cell office:value-type="float" office:value="8640000" calcext:value-type="float">
            <text:p>8640000</text:p>
          </table:table-cell>
          <table:table-cell table:formula="of:=[.B1788]/[.C1788]" office:value-type="float" office:value="0.00144780092592593" calcext:value-type="float">
            <text:p>0,00144780092592593000</text:p>
          </table:table-cell>
          <table:table-cell table:formula="of:=[.D1789]-[.D178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[.B1788]+7" office:value-type="float" office:value="12516" calcext:value-type="float">
            <text:p>12516</text:p>
          </table:table-cell>
          <table:table-cell office:value-type="float" office:value="8640000" calcext:value-type="float">
            <text:p>8640000</text:p>
          </table:table-cell>
          <table:table-cell table:formula="of:=[.B1789]/[.C1789]" office:value-type="float" office:value="0.00144861111111111" calcext:value-type="float">
            <text:p>0,00144861111111111000</text:p>
          </table:table-cell>
          <table:table-cell table:formula="of:=[.D1790]-[.D178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[.B1789]+7" office:value-type="float" office:value="12523" calcext:value-type="float">
            <text:p>12523</text:p>
          </table:table-cell>
          <table:table-cell office:value-type="float" office:value="8640000" calcext:value-type="float">
            <text:p>8640000</text:p>
          </table:table-cell>
          <table:table-cell table:formula="of:=[.B1790]/[.C1790]" office:value-type="float" office:value="0.0014494212962963" calcext:value-type="float">
            <text:p>0,00144942129629630000</text:p>
          </table:table-cell>
          <table:table-cell table:formula="of:=[.D1791]-[.D179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[.B1790]+7" office:value-type="float" office:value="12530" calcext:value-type="float">
            <text:p>12530</text:p>
          </table:table-cell>
          <table:table-cell office:value-type="float" office:value="8640000" calcext:value-type="float">
            <text:p>8640000</text:p>
          </table:table-cell>
          <table:table-cell table:formula="of:=[.B1791]/[.C1791]" office:value-type="float" office:value="0.00145023148148148" calcext:value-type="float">
            <text:p>0,00145023148148148000</text:p>
          </table:table-cell>
          <table:table-cell table:formula="of:=[.D1792]-[.D179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[.B1791]+7" office:value-type="float" office:value="12537" calcext:value-type="float">
            <text:p>12537</text:p>
          </table:table-cell>
          <table:table-cell office:value-type="float" office:value="8640000" calcext:value-type="float">
            <text:p>8640000</text:p>
          </table:table-cell>
          <table:table-cell table:formula="of:=[.B1792]/[.C1792]" office:value-type="float" office:value="0.00145104166666667" calcext:value-type="float">
            <text:p>0,00145104166666667000</text:p>
          </table:table-cell>
          <table:table-cell table:formula="of:=[.D1793]-[.D179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[.B1792]+7" office:value-type="float" office:value="12544" calcext:value-type="float">
            <text:p>12544</text:p>
          </table:table-cell>
          <table:table-cell office:value-type="float" office:value="8640000" calcext:value-type="float">
            <text:p>8640000</text:p>
          </table:table-cell>
          <table:table-cell table:formula="of:=[.B1793]/[.C1793]" office:value-type="float" office:value="0.00145185185185185" calcext:value-type="float">
            <text:p>0,00145185185185185000</text:p>
          </table:table-cell>
          <table:table-cell table:formula="of:=[.D1794]-[.D179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[.B1793]+7" office:value-type="float" office:value="12551" calcext:value-type="float">
            <text:p>12551</text:p>
          </table:table-cell>
          <table:table-cell office:value-type="float" office:value="8640000" calcext:value-type="float">
            <text:p>8640000</text:p>
          </table:table-cell>
          <table:table-cell table:formula="of:=[.B1794]/[.C1794]" office:value-type="float" office:value="0.00145266203703704" calcext:value-type="float">
            <text:p>0,00145266203703704000</text:p>
          </table:table-cell>
          <table:table-cell table:formula="of:=[.D1795]-[.D179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[.B1794]+7" office:value-type="float" office:value="12558" calcext:value-type="float">
            <text:p>12558</text:p>
          </table:table-cell>
          <table:table-cell office:value-type="float" office:value="8640000" calcext:value-type="float">
            <text:p>8640000</text:p>
          </table:table-cell>
          <table:table-cell table:formula="of:=[.B1795]/[.C1795]" office:value-type="float" office:value="0.00145347222222222" calcext:value-type="float">
            <text:p>0,00145347222222222000</text:p>
          </table:table-cell>
          <table:table-cell table:formula="of:=[.D1796]-[.D179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[.B1795]+7" office:value-type="float" office:value="12565" calcext:value-type="float">
            <text:p>12565</text:p>
          </table:table-cell>
          <table:table-cell office:value-type="float" office:value="8640000" calcext:value-type="float">
            <text:p>8640000</text:p>
          </table:table-cell>
          <table:table-cell table:formula="of:=[.B1796]/[.C1796]" office:value-type="float" office:value="0.00145428240740741" calcext:value-type="float">
            <text:p>0,00145428240740741000</text:p>
          </table:table-cell>
          <table:table-cell table:formula="of:=[.D1797]-[.D179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[.B1796]+7" office:value-type="float" office:value="12572" calcext:value-type="float">
            <text:p>12572</text:p>
          </table:table-cell>
          <table:table-cell office:value-type="float" office:value="8640000" calcext:value-type="float">
            <text:p>8640000</text:p>
          </table:table-cell>
          <table:table-cell table:formula="of:=[.B1797]/[.C1797]" office:value-type="float" office:value="0.00145509259259259" calcext:value-type="float">
            <text:p>0,00145509259259259000</text:p>
          </table:table-cell>
          <table:table-cell table:formula="of:=[.D1798]-[.D179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[.B1797]+7" office:value-type="float" office:value="12579" calcext:value-type="float">
            <text:p>12579</text:p>
          </table:table-cell>
          <table:table-cell office:value-type="float" office:value="8640000" calcext:value-type="float">
            <text:p>8640000</text:p>
          </table:table-cell>
          <table:table-cell table:formula="of:=[.B1798]/[.C1798]" office:value-type="float" office:value="0.00145590277777778" calcext:value-type="float">
            <text:p>0,00145590277777778000</text:p>
          </table:table-cell>
          <table:table-cell table:formula="of:=[.D1799]-[.D179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[.B1798]+7" office:value-type="float" office:value="12586" calcext:value-type="float">
            <text:p>12586</text:p>
          </table:table-cell>
          <table:table-cell office:value-type="float" office:value="8640000" calcext:value-type="float">
            <text:p>8640000</text:p>
          </table:table-cell>
          <table:table-cell table:formula="of:=[.B1799]/[.C1799]" office:value-type="float" office:value="0.00145671296296296" calcext:value-type="float">
            <text:p>0,00145671296296296000</text:p>
          </table:table-cell>
          <table:table-cell table:formula="of:=[.D1800]-[.D179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[.B1799]+7" office:value-type="float" office:value="12593" calcext:value-type="float">
            <text:p>12593</text:p>
          </table:table-cell>
          <table:table-cell office:value-type="float" office:value="8640000" calcext:value-type="float">
            <text:p>8640000</text:p>
          </table:table-cell>
          <table:table-cell table:formula="of:=[.B1800]/[.C1800]" office:value-type="float" office:value="0.00145752314814815" calcext:value-type="float">
            <text:p>0,00145752314814815000</text:p>
          </table:table-cell>
          <table:table-cell table:formula="of:=[.D1801]-[.D180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B1800]+7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1801]/[.C1801]" office:value-type="float" office:value="0.00145833333333333" calcext:value-type="float">
            <text:p>0,00145833333333333000</text:p>
          </table:table-cell>
          <table:table-cell table:formula="of:=[.D1802]-[.D180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[.B1801]+7" office:value-type="float" office:value="12607" calcext:value-type="float">
            <text:p>12607</text:p>
          </table:table-cell>
          <table:table-cell office:value-type="float" office:value="8640000" calcext:value-type="float">
            <text:p>8640000</text:p>
          </table:table-cell>
          <table:table-cell table:formula="of:=[.B1802]/[.C1802]" office:value-type="float" office:value="0.00145914351851852" calcext:value-type="float">
            <text:p>0,00145914351851852000</text:p>
          </table:table-cell>
          <table:table-cell table:formula="of:=[.D1803]-[.D180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[.B1802]+7" office:value-type="float" office:value="12614" calcext:value-type="float">
            <text:p>12614</text:p>
          </table:table-cell>
          <table:table-cell office:value-type="float" office:value="8640000" calcext:value-type="float">
            <text:p>8640000</text:p>
          </table:table-cell>
          <table:table-cell table:formula="of:=[.B1803]/[.C1803]" office:value-type="float" office:value="0.0014599537037037" calcext:value-type="float">
            <text:p>0,00145995370370370000</text:p>
          </table:table-cell>
          <table:table-cell table:formula="of:=[.D1804]-[.D180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[.B1803]+7" office:value-type="float" office:value="12621" calcext:value-type="float">
            <text:p>12621</text:p>
          </table:table-cell>
          <table:table-cell office:value-type="float" office:value="8640000" calcext:value-type="float">
            <text:p>8640000</text:p>
          </table:table-cell>
          <table:table-cell table:formula="of:=[.B1804]/[.C1804]" office:value-type="float" office:value="0.00146076388888889" calcext:value-type="float">
            <text:p>0,00146076388888889000</text:p>
          </table:table-cell>
          <table:table-cell table:formula="of:=[.D1805]-[.D180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[.B1804]+7" office:value-type="float" office:value="12628" calcext:value-type="float">
            <text:p>12628</text:p>
          </table:table-cell>
          <table:table-cell office:value-type="float" office:value="8640000" calcext:value-type="float">
            <text:p>8640000</text:p>
          </table:table-cell>
          <table:table-cell table:formula="of:=[.B1805]/[.C1805]" office:value-type="float" office:value="0.00146157407407407" calcext:value-type="float">
            <text:p>0,00146157407407407000</text:p>
          </table:table-cell>
          <table:table-cell table:formula="of:=[.D1806]-[.D180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[.B1805]+7" office:value-type="float" office:value="12635" calcext:value-type="float">
            <text:p>12635</text:p>
          </table:table-cell>
          <table:table-cell office:value-type="float" office:value="8640000" calcext:value-type="float">
            <text:p>8640000</text:p>
          </table:table-cell>
          <table:table-cell table:formula="of:=[.B1806]/[.C1806]" office:value-type="float" office:value="0.00146238425925926" calcext:value-type="float">
            <text:p>0,00146238425925926000</text:p>
          </table:table-cell>
          <table:table-cell table:formula="of:=[.D1807]-[.D180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[.B1806]+7" office:value-type="float" office:value="12642" calcext:value-type="float">
            <text:p>12642</text:p>
          </table:table-cell>
          <table:table-cell office:value-type="float" office:value="8640000" calcext:value-type="float">
            <text:p>8640000</text:p>
          </table:table-cell>
          <table:table-cell table:formula="of:=[.B1807]/[.C1807]" office:value-type="float" office:value="0.00146319444444444" calcext:value-type="float">
            <text:p>0,00146319444444444000</text:p>
          </table:table-cell>
          <table:table-cell table:formula="of:=[.D1808]-[.D180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[.B1807]+7" office:value-type="float" office:value="12649" calcext:value-type="float">
            <text:p>12649</text:p>
          </table:table-cell>
          <table:table-cell office:value-type="float" office:value="8640000" calcext:value-type="float">
            <text:p>8640000</text:p>
          </table:table-cell>
          <table:table-cell table:formula="of:=[.B1808]/[.C1808]" office:value-type="float" office:value="0.00146400462962963" calcext:value-type="float">
            <text:p>0,00146400462962963000</text:p>
          </table:table-cell>
          <table:table-cell table:formula="of:=[.D1809]-[.D180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[.B1808]+7" office:value-type="float" office:value="12656" calcext:value-type="float">
            <text:p>12656</text:p>
          </table:table-cell>
          <table:table-cell office:value-type="float" office:value="8640000" calcext:value-type="float">
            <text:p>8640000</text:p>
          </table:table-cell>
          <table:table-cell table:formula="of:=[.B1809]/[.C1809]" office:value-type="float" office:value="0.00146481481481481" calcext:value-type="float">
            <text:p>0,00146481481481481000</text:p>
          </table:table-cell>
          <table:table-cell table:formula="of:=[.D1810]-[.D180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[.B1809]+7" office:value-type="float" office:value="12663" calcext:value-type="float">
            <text:p>12663</text:p>
          </table:table-cell>
          <table:table-cell office:value-type="float" office:value="8640000" calcext:value-type="float">
            <text:p>8640000</text:p>
          </table:table-cell>
          <table:table-cell table:formula="of:=[.B1810]/[.C1810]" office:value-type="float" office:value="0.001465625" calcext:value-type="float">
            <text:p>0,00146562500000000000</text:p>
          </table:table-cell>
          <table:table-cell table:formula="of:=[.D1811]-[.D181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[.B1810]+7" office:value-type="float" office:value="12670" calcext:value-type="float">
            <text:p>12670</text:p>
          </table:table-cell>
          <table:table-cell office:value-type="float" office:value="8640000" calcext:value-type="float">
            <text:p>8640000</text:p>
          </table:table-cell>
          <table:table-cell table:formula="of:=[.B1811]/[.C1811]" office:value-type="float" office:value="0.00146643518518519" calcext:value-type="float">
            <text:p>0,00146643518518519000</text:p>
          </table:table-cell>
          <table:table-cell table:formula="of:=[.D1812]-[.D181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[.B1811]+7" office:value-type="float" office:value="12677" calcext:value-type="float">
            <text:p>12677</text:p>
          </table:table-cell>
          <table:table-cell office:value-type="float" office:value="8640000" calcext:value-type="float">
            <text:p>8640000</text:p>
          </table:table-cell>
          <table:table-cell table:formula="of:=[.B1812]/[.C1812]" office:value-type="float" office:value="0.00146724537037037" calcext:value-type="float">
            <text:p>0,00146724537037037000</text:p>
          </table:table-cell>
          <table:table-cell table:formula="of:=[.D1813]-[.D181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[.B1812]+7" office:value-type="float" office:value="12684" calcext:value-type="float">
            <text:p>12684</text:p>
          </table:table-cell>
          <table:table-cell office:value-type="float" office:value="8640000" calcext:value-type="float">
            <text:p>8640000</text:p>
          </table:table-cell>
          <table:table-cell table:formula="of:=[.B1813]/[.C1813]" office:value-type="float" office:value="0.00146805555555556" calcext:value-type="float">
            <text:p>0,00146805555555556000</text:p>
          </table:table-cell>
          <table:table-cell table:formula="of:=[.D1814]-[.D181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[.B1813]+7" office:value-type="float" office:value="12691" calcext:value-type="float">
            <text:p>12691</text:p>
          </table:table-cell>
          <table:table-cell office:value-type="float" office:value="8640000" calcext:value-type="float">
            <text:p>8640000</text:p>
          </table:table-cell>
          <table:table-cell table:formula="of:=[.B1814]/[.C1814]" office:value-type="float" office:value="0.00146886574074074" calcext:value-type="float">
            <text:p>0,00146886574074074000</text:p>
          </table:table-cell>
          <table:table-cell table:formula="of:=[.D1815]-[.D181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[.B1814]+7" office:value-type="float" office:value="12698" calcext:value-type="float">
            <text:p>12698</text:p>
          </table:table-cell>
          <table:table-cell office:value-type="float" office:value="8640000" calcext:value-type="float">
            <text:p>8640000</text:p>
          </table:table-cell>
          <table:table-cell table:formula="of:=[.B1815]/[.C1815]" office:value-type="float" office:value="0.00146967592592593" calcext:value-type="float">
            <text:p>0,00146967592592593000</text:p>
          </table:table-cell>
          <table:table-cell table:formula="of:=[.D1816]-[.D181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[.B1815]+7" office:value-type="float" office:value="12705" calcext:value-type="float">
            <text:p>12705</text:p>
          </table:table-cell>
          <table:table-cell office:value-type="float" office:value="8640000" calcext:value-type="float">
            <text:p>8640000</text:p>
          </table:table-cell>
          <table:table-cell table:formula="of:=[.B1816]/[.C1816]" office:value-type="float" office:value="0.00147048611111111" calcext:value-type="float">
            <text:p>0,00147048611111111000</text:p>
          </table:table-cell>
          <table:table-cell table:formula="of:=[.D1817]-[.D181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[.B1816]+7" office:value-type="float" office:value="12712" calcext:value-type="float">
            <text:p>12712</text:p>
          </table:table-cell>
          <table:table-cell office:value-type="float" office:value="8640000" calcext:value-type="float">
            <text:p>8640000</text:p>
          </table:table-cell>
          <table:table-cell table:formula="of:=[.B1817]/[.C1817]" office:value-type="float" office:value="0.0014712962962963" calcext:value-type="float">
            <text:p>0,00147129629629630000</text:p>
          </table:table-cell>
          <table:table-cell table:formula="of:=[.D1818]-[.D181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[.B1817]+7" office:value-type="float" office:value="12719" calcext:value-type="float">
            <text:p>12719</text:p>
          </table:table-cell>
          <table:table-cell office:value-type="float" office:value="8640000" calcext:value-type="float">
            <text:p>8640000</text:p>
          </table:table-cell>
          <table:table-cell table:formula="of:=[.B1818]/[.C1818]" office:value-type="float" office:value="0.00147210648148148" calcext:value-type="float">
            <text:p>0,00147210648148148000</text:p>
          </table:table-cell>
          <table:table-cell table:formula="of:=[.D1819]-[.D181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.B1818]+7" office:value-type="float" office:value="12726" calcext:value-type="float">
            <text:p>12726</text:p>
          </table:table-cell>
          <table:table-cell office:value-type="float" office:value="8640000" calcext:value-type="float">
            <text:p>8640000</text:p>
          </table:table-cell>
          <table:table-cell table:formula="of:=[.B1819]/[.C1819]" office:value-type="float" office:value="0.00147291666666667" calcext:value-type="float">
            <text:p>0,00147291666666667000</text:p>
          </table:table-cell>
          <table:table-cell table:formula="of:=[.D1820]-[.D181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.B1819]+7" office:value-type="float" office:value="12733" calcext:value-type="float">
            <text:p>12733</text:p>
          </table:table-cell>
          <table:table-cell office:value-type="float" office:value="8640000" calcext:value-type="float">
            <text:p>8640000</text:p>
          </table:table-cell>
          <table:table-cell table:formula="of:=[.B1820]/[.C1820]" office:value-type="float" office:value="0.00147372685185185" calcext:value-type="float">
            <text:p>0,00147372685185185000</text:p>
          </table:table-cell>
          <table:table-cell table:formula="of:=[.D1821]-[.D182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[.B1820]+7" office:value-type="float" office:value="12740" calcext:value-type="float">
            <text:p>12740</text:p>
          </table:table-cell>
          <table:table-cell office:value-type="float" office:value="8640000" calcext:value-type="float">
            <text:p>8640000</text:p>
          </table:table-cell>
          <table:table-cell table:formula="of:=[.B1821]/[.C1821]" office:value-type="float" office:value="0.00147453703703704" calcext:value-type="float">
            <text:p>0,00147453703703704000</text:p>
          </table:table-cell>
          <table:table-cell table:formula="of:=[.D1822]-[.D182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[.B1821]+7" office:value-type="float" office:value="12747" calcext:value-type="float">
            <text:p>12747</text:p>
          </table:table-cell>
          <table:table-cell office:value-type="float" office:value="8640000" calcext:value-type="float">
            <text:p>8640000</text:p>
          </table:table-cell>
          <table:table-cell table:formula="of:=[.B1822]/[.C1822]" office:value-type="float" office:value="0.00147534722222222" calcext:value-type="float">
            <text:p>0,00147534722222222000</text:p>
          </table:table-cell>
          <table:table-cell table:formula="of:=[.D1823]-[.D182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[.B1822]+7" office:value-type="float" office:value="12754" calcext:value-type="float">
            <text:p>12754</text:p>
          </table:table-cell>
          <table:table-cell office:value-type="float" office:value="8640000" calcext:value-type="float">
            <text:p>8640000</text:p>
          </table:table-cell>
          <table:table-cell table:formula="of:=[.B1823]/[.C1823]" office:value-type="float" office:value="0.00147615740740741" calcext:value-type="float">
            <text:p>0,00147615740740741000</text:p>
          </table:table-cell>
          <table:table-cell table:formula="of:=[.D1824]-[.D182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[.B1823]+7" office:value-type="float" office:value="12761" calcext:value-type="float">
            <text:p>12761</text:p>
          </table:table-cell>
          <table:table-cell office:value-type="float" office:value="8640000" calcext:value-type="float">
            <text:p>8640000</text:p>
          </table:table-cell>
          <table:table-cell table:formula="of:=[.B1824]/[.C1824]" office:value-type="float" office:value="0.00147696759259259" calcext:value-type="float">
            <text:p>0,00147696759259259000</text:p>
          </table:table-cell>
          <table:table-cell table:formula="of:=[.D1825]-[.D182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[.B1824]+7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1825]/[.C1825]" office:value-type="float" office:value="0.00147777777777778" calcext:value-type="float">
            <text:p>0,00147777777777778000</text:p>
          </table:table-cell>
          <table:table-cell table:formula="of:=[.D1826]-[.D182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[.B1825]+7" office:value-type="float" office:value="12775" calcext:value-type="float">
            <text:p>12775</text:p>
          </table:table-cell>
          <table:table-cell office:value-type="float" office:value="8640000" calcext:value-type="float">
            <text:p>8640000</text:p>
          </table:table-cell>
          <table:table-cell table:formula="of:=[.B1826]/[.C1826]" office:value-type="float" office:value="0.00147858796296296" calcext:value-type="float">
            <text:p>0,00147858796296296000</text:p>
          </table:table-cell>
          <table:table-cell table:formula="of:=[.D1827]-[.D182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[.B1826]+7" office:value-type="float" office:value="12782" calcext:value-type="float">
            <text:p>12782</text:p>
          </table:table-cell>
          <table:table-cell office:value-type="float" office:value="8640000" calcext:value-type="float">
            <text:p>8640000</text:p>
          </table:table-cell>
          <table:table-cell table:formula="of:=[.B1827]/[.C1827]" office:value-type="float" office:value="0.00147939814814815" calcext:value-type="float">
            <text:p>0,00147939814814815000</text:p>
          </table:table-cell>
          <table:table-cell table:formula="of:=[.D1828]-[.D182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[.B1827]+7" office:value-type="float" office:value="12789" calcext:value-type="float">
            <text:p>12789</text:p>
          </table:table-cell>
          <table:table-cell office:value-type="float" office:value="8640000" calcext:value-type="float">
            <text:p>8640000</text:p>
          </table:table-cell>
          <table:table-cell table:formula="of:=[.B1828]/[.C1828]" office:value-type="float" office:value="0.00148020833333333" calcext:value-type="float">
            <text:p>0,00148020833333333000</text:p>
          </table:table-cell>
          <table:table-cell table:formula="of:=[.D1829]-[.D182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[.B1828]+7" office:value-type="float" office:value="12796" calcext:value-type="float">
            <text:p>12796</text:p>
          </table:table-cell>
          <table:table-cell office:value-type="float" office:value="8640000" calcext:value-type="float">
            <text:p>8640000</text:p>
          </table:table-cell>
          <table:table-cell table:formula="of:=[.B1829]/[.C1829]" office:value-type="float" office:value="0.00148101851851852" calcext:value-type="float">
            <text:p>0,00148101851851852000</text:p>
          </table:table-cell>
          <table:table-cell table:formula="of:=[.D1830]-[.D182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[.B1829]+7" office:value-type="float" office:value="12803" calcext:value-type="float">
            <text:p>12803</text:p>
          </table:table-cell>
          <table:table-cell office:value-type="float" office:value="8640000" calcext:value-type="float">
            <text:p>8640000</text:p>
          </table:table-cell>
          <table:table-cell table:formula="of:=[.B1830]/[.C1830]" office:value-type="float" office:value="0.0014818287037037" calcext:value-type="float">
            <text:p>0,00148182870370370000</text:p>
          </table:table-cell>
          <table:table-cell table:formula="of:=[.D1831]-[.D183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[.B1830]+7" office:value-type="float" office:value="12810" calcext:value-type="float">
            <text:p>12810</text:p>
          </table:table-cell>
          <table:table-cell office:value-type="float" office:value="8640000" calcext:value-type="float">
            <text:p>8640000</text:p>
          </table:table-cell>
          <table:table-cell table:formula="of:=[.B1831]/[.C1831]" office:value-type="float" office:value="0.00148263888888889" calcext:value-type="float">
            <text:p>0,00148263888888889000</text:p>
          </table:table-cell>
          <table:table-cell table:formula="of:=[.D1832]-[.D183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[.B1831]+7" office:value-type="float" office:value="12817" calcext:value-type="float">
            <text:p>12817</text:p>
          </table:table-cell>
          <table:table-cell office:value-type="float" office:value="8640000" calcext:value-type="float">
            <text:p>8640000</text:p>
          </table:table-cell>
          <table:table-cell table:formula="of:=[.B1832]/[.C1832]" office:value-type="float" office:value="0.00148344907407407" calcext:value-type="float">
            <text:p>0,00148344907407407000</text:p>
          </table:table-cell>
          <table:table-cell table:formula="of:=[.D1833]-[.D183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[.B1832]+7" office:value-type="float" office:value="12824" calcext:value-type="float">
            <text:p>12824</text:p>
          </table:table-cell>
          <table:table-cell office:value-type="float" office:value="8640000" calcext:value-type="float">
            <text:p>8640000</text:p>
          </table:table-cell>
          <table:table-cell table:formula="of:=[.B1833]/[.C1833]" office:value-type="float" office:value="0.00148425925925926" calcext:value-type="float">
            <text:p>0,00148425925925926000</text:p>
          </table:table-cell>
          <table:table-cell table:formula="of:=[.D1834]-[.D183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[.B1833]+7" office:value-type="float" office:value="12831" calcext:value-type="float">
            <text:p>12831</text:p>
          </table:table-cell>
          <table:table-cell office:value-type="float" office:value="8640000" calcext:value-type="float">
            <text:p>8640000</text:p>
          </table:table-cell>
          <table:table-cell table:formula="of:=[.B1834]/[.C1834]" office:value-type="float" office:value="0.00148506944444444" calcext:value-type="float">
            <text:p>0,00148506944444444000</text:p>
          </table:table-cell>
          <table:table-cell table:formula="of:=[.D1835]-[.D183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[.B1834]+7" office:value-type="float" office:value="12838" calcext:value-type="float">
            <text:p>12838</text:p>
          </table:table-cell>
          <table:table-cell office:value-type="float" office:value="8640000" calcext:value-type="float">
            <text:p>8640000</text:p>
          </table:table-cell>
          <table:table-cell table:formula="of:=[.B1835]/[.C1835]" office:value-type="float" office:value="0.00148587962962963" calcext:value-type="float">
            <text:p>0,00148587962962963000</text:p>
          </table:table-cell>
          <table:table-cell table:formula="of:=[.D1836]-[.D183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[.B1835]+7" office:value-type="float" office:value="12845" calcext:value-type="float">
            <text:p>12845</text:p>
          </table:table-cell>
          <table:table-cell office:value-type="float" office:value="8640000" calcext:value-type="float">
            <text:p>8640000</text:p>
          </table:table-cell>
          <table:table-cell table:formula="of:=[.B1836]/[.C1836]" office:value-type="float" office:value="0.00148668981481481" calcext:value-type="float">
            <text:p>0,00148668981481481000</text:p>
          </table:table-cell>
          <table:table-cell table:formula="of:=[.D1837]-[.D183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[.B1836]+7" office:value-type="float" office:value="12852" calcext:value-type="float">
            <text:p>12852</text:p>
          </table:table-cell>
          <table:table-cell office:value-type="float" office:value="8640000" calcext:value-type="float">
            <text:p>8640000</text:p>
          </table:table-cell>
          <table:table-cell table:formula="of:=[.B1837]/[.C1837]" office:value-type="float" office:value="0.0014875" calcext:value-type="float">
            <text:p>0,00148750000000000000</text:p>
          </table:table-cell>
          <table:table-cell table:formula="of:=[.D1838]-[.D183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[.B1837]+7" office:value-type="float" office:value="12859" calcext:value-type="float">
            <text:p>12859</text:p>
          </table:table-cell>
          <table:table-cell office:value-type="float" office:value="8640000" calcext:value-type="float">
            <text:p>8640000</text:p>
          </table:table-cell>
          <table:table-cell table:formula="of:=[.B1838]/[.C1838]" office:value-type="float" office:value="0.00148831018518519" calcext:value-type="float">
            <text:p>0,00148831018518519000</text:p>
          </table:table-cell>
          <table:table-cell table:formula="of:=[.D1839]-[.D183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[.B1838]+7" office:value-type="float" office:value="12866" calcext:value-type="float">
            <text:p>12866</text:p>
          </table:table-cell>
          <table:table-cell office:value-type="float" office:value="8640000" calcext:value-type="float">
            <text:p>8640000</text:p>
          </table:table-cell>
          <table:table-cell table:formula="of:=[.B1839]/[.C1839]" office:value-type="float" office:value="0.00148912037037037" calcext:value-type="float">
            <text:p>0,00148912037037037000</text:p>
          </table:table-cell>
          <table:table-cell table:formula="of:=[.D1840]-[.D183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[.B1839]+7" office:value-type="float" office:value="12873" calcext:value-type="float">
            <text:p>12873</text:p>
          </table:table-cell>
          <table:table-cell office:value-type="float" office:value="8640000" calcext:value-type="float">
            <text:p>8640000</text:p>
          </table:table-cell>
          <table:table-cell table:formula="of:=[.B1840]/[.C1840]" office:value-type="float" office:value="0.00148993055555556" calcext:value-type="float">
            <text:p>0,00148993055555556000</text:p>
          </table:table-cell>
          <table:table-cell table:formula="of:=[.D1841]-[.D184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[.B1840]+7" office:value-type="float" office:value="12880" calcext:value-type="float">
            <text:p>12880</text:p>
          </table:table-cell>
          <table:table-cell office:value-type="float" office:value="8640000" calcext:value-type="float">
            <text:p>8640000</text:p>
          </table:table-cell>
          <table:table-cell table:formula="of:=[.B1841]/[.C1841]" office:value-type="float" office:value="0.00149074074074074" calcext:value-type="float">
            <text:p>0,00149074074074074000</text:p>
          </table:table-cell>
          <table:table-cell table:formula="of:=[.D1842]-[.D184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[.B1841]+7" office:value-type="float" office:value="12887" calcext:value-type="float">
            <text:p>12887</text:p>
          </table:table-cell>
          <table:table-cell office:value-type="float" office:value="8640000" calcext:value-type="float">
            <text:p>8640000</text:p>
          </table:table-cell>
          <table:table-cell table:formula="of:=[.B1842]/[.C1842]" office:value-type="float" office:value="0.00149155092592593" calcext:value-type="float">
            <text:p>0,00149155092592593000</text:p>
          </table:table-cell>
          <table:table-cell table:formula="of:=[.D1843]-[.D184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[.B1842]+7" office:value-type="float" office:value="12894" calcext:value-type="float">
            <text:p>12894</text:p>
          </table:table-cell>
          <table:table-cell office:value-type="float" office:value="8640000" calcext:value-type="float">
            <text:p>8640000</text:p>
          </table:table-cell>
          <table:table-cell table:formula="of:=[.B1843]/[.C1843]" office:value-type="float" office:value="0.00149236111111111" calcext:value-type="float">
            <text:p>0,00149236111111111000</text:p>
          </table:table-cell>
          <table:table-cell table:formula="of:=[.D1844]-[.D184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[.B1843]+7" office:value-type="float" office:value="12901" calcext:value-type="float">
            <text:p>12901</text:p>
          </table:table-cell>
          <table:table-cell office:value-type="float" office:value="8640000" calcext:value-type="float">
            <text:p>8640000</text:p>
          </table:table-cell>
          <table:table-cell table:formula="of:=[.B1844]/[.C1844]" office:value-type="float" office:value="0.0014931712962963" calcext:value-type="float">
            <text:p>0,00149317129629630000</text:p>
          </table:table-cell>
          <table:table-cell table:formula="of:=[.D1845]-[.D184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[.B1844]+7" office:value-type="float" office:value="12908" calcext:value-type="float">
            <text:p>12908</text:p>
          </table:table-cell>
          <table:table-cell office:value-type="float" office:value="8640000" calcext:value-type="float">
            <text:p>8640000</text:p>
          </table:table-cell>
          <table:table-cell table:formula="of:=[.B1845]/[.C1845]" office:value-type="float" office:value="0.00149398148148148" calcext:value-type="float">
            <text:p>0,00149398148148148000</text:p>
          </table:table-cell>
          <table:table-cell table:formula="of:=[.D1846]-[.D184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[.B1845]+7" office:value-type="float" office:value="12915" calcext:value-type="float">
            <text:p>12915</text:p>
          </table:table-cell>
          <table:table-cell office:value-type="float" office:value="8640000" calcext:value-type="float">
            <text:p>8640000</text:p>
          </table:table-cell>
          <table:table-cell table:formula="of:=[.B1846]/[.C1846]" office:value-type="float" office:value="0.00149479166666667" calcext:value-type="float">
            <text:p>0,00149479166666667000</text:p>
          </table:table-cell>
          <table:table-cell table:formula="of:=[.D1847]-[.D184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[.B1846]+7" office:value-type="float" office:value="12922" calcext:value-type="float">
            <text:p>12922</text:p>
          </table:table-cell>
          <table:table-cell office:value-type="float" office:value="8640000" calcext:value-type="float">
            <text:p>8640000</text:p>
          </table:table-cell>
          <table:table-cell table:formula="of:=[.B1847]/[.C1847]" office:value-type="float" office:value="0.00149560185185185" calcext:value-type="float">
            <text:p>0,00149560185185185000</text:p>
          </table:table-cell>
          <table:table-cell table:formula="of:=[.D1848]-[.D184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[.B1847]+7" office:value-type="float" office:value="12929" calcext:value-type="float">
            <text:p>12929</text:p>
          </table:table-cell>
          <table:table-cell office:value-type="float" office:value="8640000" calcext:value-type="float">
            <text:p>8640000</text:p>
          </table:table-cell>
          <table:table-cell table:formula="of:=[.B1848]/[.C1848]" office:value-type="float" office:value="0.00149641203703704" calcext:value-type="float">
            <text:p>0,00149641203703704000</text:p>
          </table:table-cell>
          <table:table-cell table:formula="of:=[.D1849]-[.D184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[.B1848]+7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1849]/[.C1849]" office:value-type="float" office:value="0.00149722222222222" calcext:value-type="float">
            <text:p>0,00149722222222222000</text:p>
          </table:table-cell>
          <table:table-cell table:formula="of:=[.D1850]-[.D184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[.B1849]+7" office:value-type="float" office:value="12943" calcext:value-type="float">
            <text:p>12943</text:p>
          </table:table-cell>
          <table:table-cell office:value-type="float" office:value="8640000" calcext:value-type="float">
            <text:p>8640000</text:p>
          </table:table-cell>
          <table:table-cell table:formula="of:=[.B1850]/[.C1850]" office:value-type="float" office:value="0.00149803240740741" calcext:value-type="float">
            <text:p>0,00149803240740741000</text:p>
          </table:table-cell>
          <table:table-cell table:formula="of:=[.D1851]-[.D185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[.B1850]+7" office:value-type="float" office:value="12950" calcext:value-type="float">
            <text:p>12950</text:p>
          </table:table-cell>
          <table:table-cell office:value-type="float" office:value="8640000" calcext:value-type="float">
            <text:p>8640000</text:p>
          </table:table-cell>
          <table:table-cell table:formula="of:=[.B1851]/[.C1851]" office:value-type="float" office:value="0.00149884259259259" calcext:value-type="float">
            <text:p>0,00149884259259259000</text:p>
          </table:table-cell>
          <table:table-cell table:formula="of:=[.D1852]-[.D185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[.B1851]+7" office:value-type="float" office:value="12957" calcext:value-type="float">
            <text:p>12957</text:p>
          </table:table-cell>
          <table:table-cell office:value-type="float" office:value="8640000" calcext:value-type="float">
            <text:p>8640000</text:p>
          </table:table-cell>
          <table:table-cell table:formula="of:=[.B1852]/[.C1852]" office:value-type="float" office:value="0.00149965277777778" calcext:value-type="float">
            <text:p>0,00149965277777778000</text:p>
          </table:table-cell>
          <table:table-cell table:formula="of:=[.D1853]-[.D185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[.B1852]+7" office:value-type="float" office:value="12964" calcext:value-type="float">
            <text:p>12964</text:p>
          </table:table-cell>
          <table:table-cell office:value-type="float" office:value="8640000" calcext:value-type="float">
            <text:p>8640000</text:p>
          </table:table-cell>
          <table:table-cell table:formula="of:=[.B1853]/[.C1853]" office:value-type="float" office:value="0.00150046296296296" calcext:value-type="float">
            <text:p>0,00150046296296296000</text:p>
          </table:table-cell>
          <table:table-cell table:formula="of:=[.D1854]-[.D185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[.B1853]+7" office:value-type="float" office:value="12971" calcext:value-type="float">
            <text:p>12971</text:p>
          </table:table-cell>
          <table:table-cell office:value-type="float" office:value="8640000" calcext:value-type="float">
            <text:p>8640000</text:p>
          </table:table-cell>
          <table:table-cell table:formula="of:=[.B1854]/[.C1854]" office:value-type="float" office:value="0.00150127314814815" calcext:value-type="float">
            <text:p>0,00150127314814815000</text:p>
          </table:table-cell>
          <table:table-cell table:formula="of:=[.D1855]-[.D185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[.B1854]+7" office:value-type="float" office:value="12978" calcext:value-type="float">
            <text:p>12978</text:p>
          </table:table-cell>
          <table:table-cell office:value-type="float" office:value="8640000" calcext:value-type="float">
            <text:p>8640000</text:p>
          </table:table-cell>
          <table:table-cell table:formula="of:=[.B1855]/[.C1855]" office:value-type="float" office:value="0.00150208333333333" calcext:value-type="float">
            <text:p>0,00150208333333333000</text:p>
          </table:table-cell>
          <table:table-cell table:formula="of:=[.D1856]-[.D185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[.B1855]+7" office:value-type="float" office:value="12985" calcext:value-type="float">
            <text:p>12985</text:p>
          </table:table-cell>
          <table:table-cell office:value-type="float" office:value="8640000" calcext:value-type="float">
            <text:p>8640000</text:p>
          </table:table-cell>
          <table:table-cell table:formula="of:=[.B1856]/[.C1856]" office:value-type="float" office:value="0.00150289351851852" calcext:value-type="float">
            <text:p>0,00150289351851852000</text:p>
          </table:table-cell>
          <table:table-cell table:formula="of:=[.D1857]-[.D185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[.B1856]+7" office:value-type="float" office:value="12992" calcext:value-type="float">
            <text:p>12992</text:p>
          </table:table-cell>
          <table:table-cell office:value-type="float" office:value="8640000" calcext:value-type="float">
            <text:p>8640000</text:p>
          </table:table-cell>
          <table:table-cell table:formula="of:=[.B1857]/[.C1857]" office:value-type="float" office:value="0.0015037037037037" calcext:value-type="float">
            <text:p>0,00150370370370370000</text:p>
          </table:table-cell>
          <table:table-cell table:formula="of:=[.D1858]-[.D185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[.B1857]+7" office:value-type="float" office:value="12999" calcext:value-type="float">
            <text:p>12999</text:p>
          </table:table-cell>
          <table:table-cell office:value-type="float" office:value="8640000" calcext:value-type="float">
            <text:p>8640000</text:p>
          </table:table-cell>
          <table:table-cell table:formula="of:=[.B1858]/[.C1858]" office:value-type="float" office:value="0.00150451388888889" calcext:value-type="float">
            <text:p>0,00150451388888889000</text:p>
          </table:table-cell>
          <table:table-cell table:formula="of:=[.D1859]-[.D185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[.B1858]+7" office:value-type="float" office:value="13006" calcext:value-type="float">
            <text:p>13006</text:p>
          </table:table-cell>
          <table:table-cell office:value-type="float" office:value="8640000" calcext:value-type="float">
            <text:p>8640000</text:p>
          </table:table-cell>
          <table:table-cell table:formula="of:=[.B1859]/[.C1859]" office:value-type="float" office:value="0.00150532407407407" calcext:value-type="float">
            <text:p>0,00150532407407407000</text:p>
          </table:table-cell>
          <table:table-cell table:formula="of:=[.D1860]-[.D185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[.B1859]+7" office:value-type="float" office:value="13013" calcext:value-type="float">
            <text:p>13013</text:p>
          </table:table-cell>
          <table:table-cell office:value-type="float" office:value="8640000" calcext:value-type="float">
            <text:p>8640000</text:p>
          </table:table-cell>
          <table:table-cell table:formula="of:=[.B1860]/[.C1860]" office:value-type="float" office:value="0.00150613425925926" calcext:value-type="float">
            <text:p>0,00150613425925926000</text:p>
          </table:table-cell>
          <table:table-cell table:formula="of:=[.D1861]-[.D186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[.B1860]+7" office:value-type="float" office:value="13020" calcext:value-type="float">
            <text:p>13020</text:p>
          </table:table-cell>
          <table:table-cell office:value-type="float" office:value="8640000" calcext:value-type="float">
            <text:p>8640000</text:p>
          </table:table-cell>
          <table:table-cell table:formula="of:=[.B1861]/[.C1861]" office:value-type="float" office:value="0.00150694444444444" calcext:value-type="float">
            <text:p>0,00150694444444444000</text:p>
          </table:table-cell>
          <table:table-cell table:formula="of:=[.D1862]-[.D186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[.B1861]+7" office:value-type="float" office:value="13027" calcext:value-type="float">
            <text:p>13027</text:p>
          </table:table-cell>
          <table:table-cell office:value-type="float" office:value="8640000" calcext:value-type="float">
            <text:p>8640000</text:p>
          </table:table-cell>
          <table:table-cell table:formula="of:=[.B1862]/[.C1862]" office:value-type="float" office:value="0.00150775462962963" calcext:value-type="float">
            <text:p>0,00150775462962963000</text:p>
          </table:table-cell>
          <table:table-cell table:formula="of:=[.D1863]-[.D186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[.B1862]+7" office:value-type="float" office:value="13034" calcext:value-type="float">
            <text:p>13034</text:p>
          </table:table-cell>
          <table:table-cell office:value-type="float" office:value="8640000" calcext:value-type="float">
            <text:p>8640000</text:p>
          </table:table-cell>
          <table:table-cell table:formula="of:=[.B1863]/[.C1863]" office:value-type="float" office:value="0.00150856481481481" calcext:value-type="float">
            <text:p>0,00150856481481481000</text:p>
          </table:table-cell>
          <table:table-cell table:formula="of:=[.D1864]-[.D186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[.B1863]+7" office:value-type="float" office:value="13041" calcext:value-type="float">
            <text:p>13041</text:p>
          </table:table-cell>
          <table:table-cell office:value-type="float" office:value="8640000" calcext:value-type="float">
            <text:p>8640000</text:p>
          </table:table-cell>
          <table:table-cell table:formula="of:=[.B1864]/[.C1864]" office:value-type="float" office:value="0.001509375" calcext:value-type="float">
            <text:p>0,00150937500000000000</text:p>
          </table:table-cell>
          <table:table-cell table:formula="of:=[.D1865]-[.D186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[.B1864]+7" office:value-type="float" office:value="13048" calcext:value-type="float">
            <text:p>13048</text:p>
          </table:table-cell>
          <table:table-cell office:value-type="float" office:value="8640000" calcext:value-type="float">
            <text:p>8640000</text:p>
          </table:table-cell>
          <table:table-cell table:formula="of:=[.B1865]/[.C1865]" office:value-type="float" office:value="0.00151018518518519" calcext:value-type="float">
            <text:p>0,00151018518518519000</text:p>
          </table:table-cell>
          <table:table-cell table:formula="of:=[.D1866]-[.D186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[.B1865]+7" office:value-type="float" office:value="13055" calcext:value-type="float">
            <text:p>13055</text:p>
          </table:table-cell>
          <table:table-cell office:value-type="float" office:value="8640000" calcext:value-type="float">
            <text:p>8640000</text:p>
          </table:table-cell>
          <table:table-cell table:formula="of:=[.B1866]/[.C1866]" office:value-type="float" office:value="0.00151099537037037" calcext:value-type="float">
            <text:p>0,00151099537037037000</text:p>
          </table:table-cell>
          <table:table-cell table:formula="of:=[.D1867]-[.D186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[.B1866]+7" office:value-type="float" office:value="13062" calcext:value-type="float">
            <text:p>13062</text:p>
          </table:table-cell>
          <table:table-cell office:value-type="float" office:value="8640000" calcext:value-type="float">
            <text:p>8640000</text:p>
          </table:table-cell>
          <table:table-cell table:formula="of:=[.B1867]/[.C1867]" office:value-type="float" office:value="0.00151180555555556" calcext:value-type="float">
            <text:p>0,00151180555555556000</text:p>
          </table:table-cell>
          <table:table-cell table:formula="of:=[.D1868]-[.D186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[.B1867]+7" office:value-type="float" office:value="13069" calcext:value-type="float">
            <text:p>13069</text:p>
          </table:table-cell>
          <table:table-cell office:value-type="float" office:value="8640000" calcext:value-type="float">
            <text:p>8640000</text:p>
          </table:table-cell>
          <table:table-cell table:formula="of:=[.B1868]/[.C1868]" office:value-type="float" office:value="0.00151261574074074" calcext:value-type="float">
            <text:p>0,00151261574074074000</text:p>
          </table:table-cell>
          <table:table-cell table:formula="of:=[.D1869]-[.D186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[.B1868]+7" office:value-type="float" office:value="13076" calcext:value-type="float">
            <text:p>13076</text:p>
          </table:table-cell>
          <table:table-cell office:value-type="float" office:value="8640000" calcext:value-type="float">
            <text:p>8640000</text:p>
          </table:table-cell>
          <table:table-cell table:formula="of:=[.B1869]/[.C1869]" office:value-type="float" office:value="0.00151342592592593" calcext:value-type="float">
            <text:p>0,00151342592592593000</text:p>
          </table:table-cell>
          <table:table-cell table:formula="of:=[.D1870]-[.D186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[.B1869]+7" office:value-type="float" office:value="13083" calcext:value-type="float">
            <text:p>13083</text:p>
          </table:table-cell>
          <table:table-cell office:value-type="float" office:value="8640000" calcext:value-type="float">
            <text:p>8640000</text:p>
          </table:table-cell>
          <table:table-cell table:formula="of:=[.B1870]/[.C1870]" office:value-type="float" office:value="0.00151423611111111" calcext:value-type="float">
            <text:p>0,00151423611111111000</text:p>
          </table:table-cell>
          <table:table-cell table:formula="of:=[.D1871]-[.D187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[.B1870]+7" office:value-type="float" office:value="13090" calcext:value-type="float">
            <text:p>13090</text:p>
          </table:table-cell>
          <table:table-cell office:value-type="float" office:value="8640000" calcext:value-type="float">
            <text:p>8640000</text:p>
          </table:table-cell>
          <table:table-cell table:formula="of:=[.B1871]/[.C1871]" office:value-type="float" office:value="0.0015150462962963" calcext:value-type="float">
            <text:p>0,00151504629629630000</text:p>
          </table:table-cell>
          <table:table-cell table:formula="of:=[.D1872]-[.D187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[.B1871]+7" office:value-type="float" office:value="13097" calcext:value-type="float">
            <text:p>13097</text:p>
          </table:table-cell>
          <table:table-cell office:value-type="float" office:value="8640000" calcext:value-type="float">
            <text:p>8640000</text:p>
          </table:table-cell>
          <table:table-cell table:formula="of:=[.B1872]/[.C1872]" office:value-type="float" office:value="0.00151585648148148" calcext:value-type="float">
            <text:p>0,00151585648148148000</text:p>
          </table:table-cell>
          <table:table-cell table:formula="of:=[.D1873]-[.D187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[.B1872]+7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1873]/[.C1873]" office:value-type="float" office:value="0.00151666666666667" calcext:value-type="float">
            <text:p>0,00151666666666667000</text:p>
          </table:table-cell>
          <table:table-cell table:formula="of:=[.D1874]-[.D187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[.B1873]+7" office:value-type="float" office:value="13111" calcext:value-type="float">
            <text:p>13111</text:p>
          </table:table-cell>
          <table:table-cell office:value-type="float" office:value="8640000" calcext:value-type="float">
            <text:p>8640000</text:p>
          </table:table-cell>
          <table:table-cell table:formula="of:=[.B1874]/[.C1874]" office:value-type="float" office:value="0.00151747685185185" calcext:value-type="float">
            <text:p>0,00151747685185185000</text:p>
          </table:table-cell>
          <table:table-cell table:formula="of:=[.D1875]-[.D187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[.B1874]+7" office:value-type="float" office:value="13118" calcext:value-type="float">
            <text:p>13118</text:p>
          </table:table-cell>
          <table:table-cell office:value-type="float" office:value="8640000" calcext:value-type="float">
            <text:p>8640000</text:p>
          </table:table-cell>
          <table:table-cell table:formula="of:=[.B1875]/[.C1875]" office:value-type="float" office:value="0.00151828703703704" calcext:value-type="float">
            <text:p>0,00151828703703704000</text:p>
          </table:table-cell>
          <table:table-cell table:formula="of:=[.D1876]-[.D187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[.B1875]+7" office:value-type="float" office:value="13125" calcext:value-type="float">
            <text:p>13125</text:p>
          </table:table-cell>
          <table:table-cell office:value-type="float" office:value="8640000" calcext:value-type="float">
            <text:p>8640000</text:p>
          </table:table-cell>
          <table:table-cell table:formula="of:=[.B1876]/[.C1876]" office:value-type="float" office:value="0.00151909722222222" calcext:value-type="float">
            <text:p>0,00151909722222222000</text:p>
          </table:table-cell>
          <table:table-cell table:formula="of:=[.D1877]-[.D187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[.B1876]+7" office:value-type="float" office:value="13132" calcext:value-type="float">
            <text:p>13132</text:p>
          </table:table-cell>
          <table:table-cell office:value-type="float" office:value="8640000" calcext:value-type="float">
            <text:p>8640000</text:p>
          </table:table-cell>
          <table:table-cell table:formula="of:=[.B1877]/[.C1877]" office:value-type="float" office:value="0.00151990740740741" calcext:value-type="float">
            <text:p>0,00151990740740741000</text:p>
          </table:table-cell>
          <table:table-cell table:formula="of:=[.D1878]-[.D187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[.B1877]+7" office:value-type="float" office:value="13139" calcext:value-type="float">
            <text:p>13139</text:p>
          </table:table-cell>
          <table:table-cell office:value-type="float" office:value="8640000" calcext:value-type="float">
            <text:p>8640000</text:p>
          </table:table-cell>
          <table:table-cell table:formula="of:=[.B1878]/[.C1878]" office:value-type="float" office:value="0.00152071759259259" calcext:value-type="float">
            <text:p>0,00152071759259259000</text:p>
          </table:table-cell>
          <table:table-cell table:formula="of:=[.D1879]-[.D187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[.B1878]+7" office:value-type="float" office:value="13146" calcext:value-type="float">
            <text:p>13146</text:p>
          </table:table-cell>
          <table:table-cell office:value-type="float" office:value="8640000" calcext:value-type="float">
            <text:p>8640000</text:p>
          </table:table-cell>
          <table:table-cell table:formula="of:=[.B1879]/[.C1879]" office:value-type="float" office:value="0.00152152777777778" calcext:value-type="float">
            <text:p>0,00152152777777778000</text:p>
          </table:table-cell>
          <table:table-cell table:formula="of:=[.D1880]-[.D187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[.B1879]+7" office:value-type="float" office:value="13153" calcext:value-type="float">
            <text:p>13153</text:p>
          </table:table-cell>
          <table:table-cell office:value-type="float" office:value="8640000" calcext:value-type="float">
            <text:p>8640000</text:p>
          </table:table-cell>
          <table:table-cell table:formula="of:=[.B1880]/[.C1880]" office:value-type="float" office:value="0.00152233796296296" calcext:value-type="float">
            <text:p>0,00152233796296296000</text:p>
          </table:table-cell>
          <table:table-cell table:formula="of:=[.D1881]-[.D188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[.B1880]+7" office:value-type="float" office:value="13160" calcext:value-type="float">
            <text:p>13160</text:p>
          </table:table-cell>
          <table:table-cell office:value-type="float" office:value="8640000" calcext:value-type="float">
            <text:p>8640000</text:p>
          </table:table-cell>
          <table:table-cell table:formula="of:=[.B1881]/[.C1881]" office:value-type="float" office:value="0.00152314814814815" calcext:value-type="float">
            <text:p>0,00152314814814815000</text:p>
          </table:table-cell>
          <table:table-cell table:formula="of:=[.D1882]-[.D188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[.B1881]+7" office:value-type="float" office:value="13167" calcext:value-type="float">
            <text:p>13167</text:p>
          </table:table-cell>
          <table:table-cell office:value-type="float" office:value="8640000" calcext:value-type="float">
            <text:p>8640000</text:p>
          </table:table-cell>
          <table:table-cell table:formula="of:=[.B1882]/[.C1882]" office:value-type="float" office:value="0.00152395833333333" calcext:value-type="float">
            <text:p>0,00152395833333333000</text:p>
          </table:table-cell>
          <table:table-cell table:formula="of:=[.D1883]-[.D188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[.B1882]+7" office:value-type="float" office:value="13174" calcext:value-type="float">
            <text:p>13174</text:p>
          </table:table-cell>
          <table:table-cell office:value-type="float" office:value="8640000" calcext:value-type="float">
            <text:p>8640000</text:p>
          </table:table-cell>
          <table:table-cell table:formula="of:=[.B1883]/[.C1883]" office:value-type="float" office:value="0.00152476851851852" calcext:value-type="float">
            <text:p>0,00152476851851852000</text:p>
          </table:table-cell>
          <table:table-cell table:formula="of:=[.D1884]-[.D188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[.B1883]+7" office:value-type="float" office:value="13181" calcext:value-type="float">
            <text:p>13181</text:p>
          </table:table-cell>
          <table:table-cell office:value-type="float" office:value="8640000" calcext:value-type="float">
            <text:p>8640000</text:p>
          </table:table-cell>
          <table:table-cell table:formula="of:=[.B1884]/[.C1884]" office:value-type="float" office:value="0.0015255787037037" calcext:value-type="float">
            <text:p>0,00152557870370370000</text:p>
          </table:table-cell>
          <table:table-cell table:formula="of:=[.D1885]-[.D188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[.B1884]+7" office:value-type="float" office:value="13188" calcext:value-type="float">
            <text:p>13188</text:p>
          </table:table-cell>
          <table:table-cell office:value-type="float" office:value="8640000" calcext:value-type="float">
            <text:p>8640000</text:p>
          </table:table-cell>
          <table:table-cell table:formula="of:=[.B1885]/[.C1885]" office:value-type="float" office:value="0.00152638888888889" calcext:value-type="float">
            <text:p>0,00152638888888889000</text:p>
          </table:table-cell>
          <table:table-cell table:formula="of:=[.D1886]-[.D188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[.B1885]+7" office:value-type="float" office:value="13195" calcext:value-type="float">
            <text:p>13195</text:p>
          </table:table-cell>
          <table:table-cell office:value-type="float" office:value="8640000" calcext:value-type="float">
            <text:p>8640000</text:p>
          </table:table-cell>
          <table:table-cell table:formula="of:=[.B1886]/[.C1886]" office:value-type="float" office:value="0.00152719907407407" calcext:value-type="float">
            <text:p>0,00152719907407407000</text:p>
          </table:table-cell>
          <table:table-cell table:formula="of:=[.D1887]-[.D188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[.B1886]+7" office:value-type="float" office:value="13202" calcext:value-type="float">
            <text:p>13202</text:p>
          </table:table-cell>
          <table:table-cell office:value-type="float" office:value="8640000" calcext:value-type="float">
            <text:p>8640000</text:p>
          </table:table-cell>
          <table:table-cell table:formula="of:=[.B1887]/[.C1887]" office:value-type="float" office:value="0.00152800925925926" calcext:value-type="float">
            <text:p>0,00152800925925926000</text:p>
          </table:table-cell>
          <table:table-cell table:formula="of:=[.D1888]-[.D188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[.B1887]+7" office:value-type="float" office:value="13209" calcext:value-type="float">
            <text:p>13209</text:p>
          </table:table-cell>
          <table:table-cell office:value-type="float" office:value="8640000" calcext:value-type="float">
            <text:p>8640000</text:p>
          </table:table-cell>
          <table:table-cell table:formula="of:=[.B1888]/[.C1888]" office:value-type="float" office:value="0.00152881944444444" calcext:value-type="float">
            <text:p>0,00152881944444444000</text:p>
          </table:table-cell>
          <table:table-cell table:formula="of:=[.D1889]-[.D188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[.B1888]+7" office:value-type="float" office:value="13216" calcext:value-type="float">
            <text:p>13216</text:p>
          </table:table-cell>
          <table:table-cell office:value-type="float" office:value="8640000" calcext:value-type="float">
            <text:p>8640000</text:p>
          </table:table-cell>
          <table:table-cell table:formula="of:=[.B1889]/[.C1889]" office:value-type="float" office:value="0.00152962962962963" calcext:value-type="float">
            <text:p>0,00152962962962963000</text:p>
          </table:table-cell>
          <table:table-cell table:formula="of:=[.D1890]-[.D188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[.B1889]+7" office:value-type="float" office:value="13223" calcext:value-type="float">
            <text:p>13223</text:p>
          </table:table-cell>
          <table:table-cell office:value-type="float" office:value="8640000" calcext:value-type="float">
            <text:p>8640000</text:p>
          </table:table-cell>
          <table:table-cell table:formula="of:=[.B1890]/[.C1890]" office:value-type="float" office:value="0.00153043981481481" calcext:value-type="float">
            <text:p>0,00153043981481481000</text:p>
          </table:table-cell>
          <table:table-cell table:formula="of:=[.D1891]-[.D189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[.B1890]+7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1891]/[.C1891]" office:value-type="float" office:value="0.00153125" calcext:value-type="float">
            <text:p>0,00153125000000000000</text:p>
          </table:table-cell>
          <table:table-cell table:formula="of:=[.D1892]-[.D189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[.B1891]+7" office:value-type="float" office:value="13237" calcext:value-type="float">
            <text:p>13237</text:p>
          </table:table-cell>
          <table:table-cell office:value-type="float" office:value="8640000" calcext:value-type="float">
            <text:p>8640000</text:p>
          </table:table-cell>
          <table:table-cell table:formula="of:=[.B1892]/[.C1892]" office:value-type="float" office:value="0.00153206018518519" calcext:value-type="float">
            <text:p>0,00153206018518519000</text:p>
          </table:table-cell>
          <table:table-cell table:formula="of:=[.D1893]-[.D189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[.B1892]+7" office:value-type="float" office:value="13244" calcext:value-type="float">
            <text:p>13244</text:p>
          </table:table-cell>
          <table:table-cell office:value-type="float" office:value="8640000" calcext:value-type="float">
            <text:p>8640000</text:p>
          </table:table-cell>
          <table:table-cell table:formula="of:=[.B1893]/[.C1893]" office:value-type="float" office:value="0.00153287037037037" calcext:value-type="float">
            <text:p>0,00153287037037037000</text:p>
          </table:table-cell>
          <table:table-cell table:formula="of:=[.D1894]-[.D189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B1893]+7" office:value-type="float" office:value="13251" calcext:value-type="float">
            <text:p>13251</text:p>
          </table:table-cell>
          <table:table-cell office:value-type="float" office:value="8640000" calcext:value-type="float">
            <text:p>8640000</text:p>
          </table:table-cell>
          <table:table-cell table:formula="of:=[.B1894]/[.C1894]" office:value-type="float" office:value="0.00153368055555556" calcext:value-type="float">
            <text:p>0,00153368055555556000</text:p>
          </table:table-cell>
          <table:table-cell table:formula="of:=[.D1895]-[.D189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[.B1894]+7" office:value-type="float" office:value="13258" calcext:value-type="float">
            <text:p>13258</text:p>
          </table:table-cell>
          <table:table-cell office:value-type="float" office:value="8640000" calcext:value-type="float">
            <text:p>8640000</text:p>
          </table:table-cell>
          <table:table-cell table:formula="of:=[.B1895]/[.C1895]" office:value-type="float" office:value="0.00153449074074074" calcext:value-type="float">
            <text:p>0,00153449074074074000</text:p>
          </table:table-cell>
          <table:table-cell table:formula="of:=[.D1896]-[.D189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[.B1895]+7" office:value-type="float" office:value="13265" calcext:value-type="float">
            <text:p>13265</text:p>
          </table:table-cell>
          <table:table-cell office:value-type="float" office:value="8640000" calcext:value-type="float">
            <text:p>8640000</text:p>
          </table:table-cell>
          <table:table-cell table:formula="of:=[.B1896]/[.C1896]" office:value-type="float" office:value="0.00153530092592593" calcext:value-type="float">
            <text:p>0,00153530092592593000</text:p>
          </table:table-cell>
          <table:table-cell table:formula="of:=[.D1897]-[.D189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[.B1896]+7" office:value-type="float" office:value="13272" calcext:value-type="float">
            <text:p>13272</text:p>
          </table:table-cell>
          <table:table-cell office:value-type="float" office:value="8640000" calcext:value-type="float">
            <text:p>8640000</text:p>
          </table:table-cell>
          <table:table-cell table:formula="of:=[.B1897]/[.C1897]" office:value-type="float" office:value="0.00153611111111111" calcext:value-type="float">
            <text:p>0,00153611111111111000</text:p>
          </table:table-cell>
          <table:table-cell table:formula="of:=[.D1898]-[.D189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[.B1897]+7" office:value-type="float" office:value="13279" calcext:value-type="float">
            <text:p>13279</text:p>
          </table:table-cell>
          <table:table-cell office:value-type="float" office:value="8640000" calcext:value-type="float">
            <text:p>8640000</text:p>
          </table:table-cell>
          <table:table-cell table:formula="of:=[.B1898]/[.C1898]" office:value-type="float" office:value="0.0015369212962963" calcext:value-type="float">
            <text:p>0,00153692129629630000</text:p>
          </table:table-cell>
          <table:table-cell table:formula="of:=[.D1899]-[.D189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[.B1898]+7" office:value-type="float" office:value="13286" calcext:value-type="float">
            <text:p>13286</text:p>
          </table:table-cell>
          <table:table-cell office:value-type="float" office:value="8640000" calcext:value-type="float">
            <text:p>8640000</text:p>
          </table:table-cell>
          <table:table-cell table:formula="of:=[.B1899]/[.C1899]" office:value-type="float" office:value="0.00153773148148148" calcext:value-type="float">
            <text:p>0,00153773148148148000</text:p>
          </table:table-cell>
          <table:table-cell table:formula="of:=[.D1900]-[.D189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[.B1899]+7" office:value-type="float" office:value="13293" calcext:value-type="float">
            <text:p>13293</text:p>
          </table:table-cell>
          <table:table-cell office:value-type="float" office:value="8640000" calcext:value-type="float">
            <text:p>8640000</text:p>
          </table:table-cell>
          <table:table-cell table:formula="of:=[.B1900]/[.C1900]" office:value-type="float" office:value="0.00153854166666667" calcext:value-type="float">
            <text:p>0,00153854166666667000</text:p>
          </table:table-cell>
          <table:table-cell table:formula="of:=[.D1901]-[.D190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B1900]+7" office:value-type="float" office:value="13300" calcext:value-type="float">
            <text:p>13300</text:p>
          </table:table-cell>
          <table:table-cell office:value-type="float" office:value="8640000" calcext:value-type="float">
            <text:p>8640000</text:p>
          </table:table-cell>
          <table:table-cell table:formula="of:=[.B1901]/[.C1901]" office:value-type="float" office:value="0.00153935185185185" calcext:value-type="float">
            <text:p>0,00153935185185185000</text:p>
          </table:table-cell>
          <table:table-cell table:formula="of:=[.D1902]-[.D190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[.B1901]+7" office:value-type="float" office:value="13307" calcext:value-type="float">
            <text:p>13307</text:p>
          </table:table-cell>
          <table:table-cell office:value-type="float" office:value="8640000" calcext:value-type="float">
            <text:p>8640000</text:p>
          </table:table-cell>
          <table:table-cell table:formula="of:=[.B1902]/[.C1902]" office:value-type="float" office:value="0.00154016203703704" calcext:value-type="float">
            <text:p>0,00154016203703704000</text:p>
          </table:table-cell>
          <table:table-cell table:formula="of:=[.D1903]-[.D190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[.B1902]+7" office:value-type="float" office:value="13314" calcext:value-type="float">
            <text:p>13314</text:p>
          </table:table-cell>
          <table:table-cell office:value-type="float" office:value="8640000" calcext:value-type="float">
            <text:p>8640000</text:p>
          </table:table-cell>
          <table:table-cell table:formula="of:=[.B1903]/[.C1903]" office:value-type="float" office:value="0.00154097222222222" calcext:value-type="float">
            <text:p>0,00154097222222222000</text:p>
          </table:table-cell>
          <table:table-cell table:formula="of:=[.D1904]-[.D190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[.B1903]+7" office:value-type="float" office:value="13321" calcext:value-type="float">
            <text:p>13321</text:p>
          </table:table-cell>
          <table:table-cell office:value-type="float" office:value="8640000" calcext:value-type="float">
            <text:p>8640000</text:p>
          </table:table-cell>
          <table:table-cell table:formula="of:=[.B1904]/[.C1904]" office:value-type="float" office:value="0.00154178240740741" calcext:value-type="float">
            <text:p>0,00154178240740741000</text:p>
          </table:table-cell>
          <table:table-cell table:formula="of:=[.D1905]-[.D190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[.B1904]+7" office:value-type="float" office:value="13328" calcext:value-type="float">
            <text:p>13328</text:p>
          </table:table-cell>
          <table:table-cell office:value-type="float" office:value="8640000" calcext:value-type="float">
            <text:p>8640000</text:p>
          </table:table-cell>
          <table:table-cell table:formula="of:=[.B1905]/[.C1905]" office:value-type="float" office:value="0.00154259259259259" calcext:value-type="float">
            <text:p>0,00154259259259259000</text:p>
          </table:table-cell>
          <table:table-cell table:formula="of:=[.D1906]-[.D190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[.B1905]+7" office:value-type="float" office:value="13335" calcext:value-type="float">
            <text:p>13335</text:p>
          </table:table-cell>
          <table:table-cell office:value-type="float" office:value="8640000" calcext:value-type="float">
            <text:p>8640000</text:p>
          </table:table-cell>
          <table:table-cell table:formula="of:=[.B1906]/[.C1906]" office:value-type="float" office:value="0.00154340277777778" calcext:value-type="float">
            <text:p>0,00154340277777778000</text:p>
          </table:table-cell>
          <table:table-cell table:formula="of:=[.D1907]-[.D190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[.B1906]+7" office:value-type="float" office:value="13342" calcext:value-type="float">
            <text:p>13342</text:p>
          </table:table-cell>
          <table:table-cell office:value-type="float" office:value="8640000" calcext:value-type="float">
            <text:p>8640000</text:p>
          </table:table-cell>
          <table:table-cell table:formula="of:=[.B1907]/[.C1907]" office:value-type="float" office:value="0.00154421296296296" calcext:value-type="float">
            <text:p>0,00154421296296296000</text:p>
          </table:table-cell>
          <table:table-cell table:formula="of:=[.D1908]-[.D190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[.B1907]+7" office:value-type="float" office:value="13349" calcext:value-type="float">
            <text:p>13349</text:p>
          </table:table-cell>
          <table:table-cell office:value-type="float" office:value="8640000" calcext:value-type="float">
            <text:p>8640000</text:p>
          </table:table-cell>
          <table:table-cell table:formula="of:=[.B1908]/[.C1908]" office:value-type="float" office:value="0.00154502314814815" calcext:value-type="float">
            <text:p>0,00154502314814815000</text:p>
          </table:table-cell>
          <table:table-cell table:formula="of:=[.D1909]-[.D190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[.B1908]+7" office:value-type="float" office:value="13356" calcext:value-type="float">
            <text:p>13356</text:p>
          </table:table-cell>
          <table:table-cell office:value-type="float" office:value="8640000" calcext:value-type="float">
            <text:p>8640000</text:p>
          </table:table-cell>
          <table:table-cell table:formula="of:=[.B1909]/[.C1909]" office:value-type="float" office:value="0.00154583333333333" calcext:value-type="float">
            <text:p>0,00154583333333333000</text:p>
          </table:table-cell>
          <table:table-cell table:formula="of:=[.D1910]-[.D190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[.B1909]+7" office:value-type="float" office:value="13363" calcext:value-type="float">
            <text:p>13363</text:p>
          </table:table-cell>
          <table:table-cell office:value-type="float" office:value="8640000" calcext:value-type="float">
            <text:p>8640000</text:p>
          </table:table-cell>
          <table:table-cell table:formula="of:=[.B1910]/[.C1910]" office:value-type="float" office:value="0.00154664351851852" calcext:value-type="float">
            <text:p>0,00154664351851852000</text:p>
          </table:table-cell>
          <table:table-cell table:formula="of:=[.D1911]-[.D191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[.B1910]+7" office:value-type="float" office:value="13370" calcext:value-type="float">
            <text:p>13370</text:p>
          </table:table-cell>
          <table:table-cell office:value-type="float" office:value="8640000" calcext:value-type="float">
            <text:p>8640000</text:p>
          </table:table-cell>
          <table:table-cell table:formula="of:=[.B1911]/[.C1911]" office:value-type="float" office:value="0.0015474537037037" calcext:value-type="float">
            <text:p>0,00154745370370370000</text:p>
          </table:table-cell>
          <table:table-cell table:formula="of:=[.D1912]-[.D191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[.B1911]+7" office:value-type="float" office:value="13377" calcext:value-type="float">
            <text:p>13377</text:p>
          </table:table-cell>
          <table:table-cell office:value-type="float" office:value="8640000" calcext:value-type="float">
            <text:p>8640000</text:p>
          </table:table-cell>
          <table:table-cell table:formula="of:=[.B1912]/[.C1912]" office:value-type="float" office:value="0.00154826388888889" calcext:value-type="float">
            <text:p>0,00154826388888889000</text:p>
          </table:table-cell>
          <table:table-cell table:formula="of:=[.D1913]-[.D191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B1912]+7" office:value-type="float" office:value="13384" calcext:value-type="float">
            <text:p>13384</text:p>
          </table:table-cell>
          <table:table-cell office:value-type="float" office:value="8640000" calcext:value-type="float">
            <text:p>8640000</text:p>
          </table:table-cell>
          <table:table-cell table:formula="of:=[.B1913]/[.C1913]" office:value-type="float" office:value="0.00154907407407407" calcext:value-type="float">
            <text:p>0,00154907407407407000</text:p>
          </table:table-cell>
          <table:table-cell table:formula="of:=[.D1914]-[.D191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[.B1913]+7" office:value-type="float" office:value="13391" calcext:value-type="float">
            <text:p>13391</text:p>
          </table:table-cell>
          <table:table-cell office:value-type="float" office:value="8640000" calcext:value-type="float">
            <text:p>8640000</text:p>
          </table:table-cell>
          <table:table-cell table:formula="of:=[.B1914]/[.C1914]" office:value-type="float" office:value="0.00154988425925926" calcext:value-type="float">
            <text:p>0,00154988425925926000</text:p>
          </table:table-cell>
          <table:table-cell table:formula="of:=[.D1915]-[.D191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[.B1914]+7" office:value-type="float" office:value="13398" calcext:value-type="float">
            <text:p>13398</text:p>
          </table:table-cell>
          <table:table-cell office:value-type="float" office:value="8640000" calcext:value-type="float">
            <text:p>8640000</text:p>
          </table:table-cell>
          <table:table-cell table:formula="of:=[.B1915]/[.C1915]" office:value-type="float" office:value="0.00155069444444444" calcext:value-type="float">
            <text:p>0,00155069444444444000</text:p>
          </table:table-cell>
          <table:table-cell table:formula="of:=[.D1916]-[.D191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[.B1915]+7" office:value-type="float" office:value="13405" calcext:value-type="float">
            <text:p>13405</text:p>
          </table:table-cell>
          <table:table-cell office:value-type="float" office:value="8640000" calcext:value-type="float">
            <text:p>8640000</text:p>
          </table:table-cell>
          <table:table-cell table:formula="of:=[.B1916]/[.C1916]" office:value-type="float" office:value="0.00155150462962963" calcext:value-type="float">
            <text:p>0,00155150462962963000</text:p>
          </table:table-cell>
          <table:table-cell table:formula="of:=[.D1917]-[.D191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[.B1916]+7" office:value-type="float" office:value="13412" calcext:value-type="float">
            <text:p>13412</text:p>
          </table:table-cell>
          <table:table-cell office:value-type="float" office:value="8640000" calcext:value-type="float">
            <text:p>8640000</text:p>
          </table:table-cell>
          <table:table-cell table:formula="of:=[.B1917]/[.C1917]" office:value-type="float" office:value="0.00155231481481481" calcext:value-type="float">
            <text:p>0,00155231481481481000</text:p>
          </table:table-cell>
          <table:table-cell table:formula="of:=[.D1918]-[.D191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[.B1917]+7" office:value-type="float" office:value="13419" calcext:value-type="float">
            <text:p>13419</text:p>
          </table:table-cell>
          <table:table-cell office:value-type="float" office:value="8640000" calcext:value-type="float">
            <text:p>8640000</text:p>
          </table:table-cell>
          <table:table-cell table:formula="of:=[.B1918]/[.C1918]" office:value-type="float" office:value="0.001553125" calcext:value-type="float">
            <text:p>0,00155312500000000000</text:p>
          </table:table-cell>
          <table:table-cell table:formula="of:=[.D1919]-[.D191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[.B1918]+7" office:value-type="float" office:value="13426" calcext:value-type="float">
            <text:p>13426</text:p>
          </table:table-cell>
          <table:table-cell office:value-type="float" office:value="8640000" calcext:value-type="float">
            <text:p>8640000</text:p>
          </table:table-cell>
          <table:table-cell table:formula="of:=[.B1919]/[.C1919]" office:value-type="float" office:value="0.00155393518518519" calcext:value-type="float">
            <text:p>0,00155393518518518000</text:p>
          </table:table-cell>
          <table:table-cell table:formula="of:=[.D1920]-[.D191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[.B1919]+7" office:value-type="float" office:value="13433" calcext:value-type="float">
            <text:p>13433</text:p>
          </table:table-cell>
          <table:table-cell office:value-type="float" office:value="8640000" calcext:value-type="float">
            <text:p>8640000</text:p>
          </table:table-cell>
          <table:table-cell table:formula="of:=[.B1920]/[.C1920]" office:value-type="float" office:value="0.00155474537037037" calcext:value-type="float">
            <text:p>0,00155474537037037000</text:p>
          </table:table-cell>
          <table:table-cell table:formula="of:=[.D1921]-[.D192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B1920]+7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1921]/[.C1921]" office:value-type="float" office:value="0.00155555555555556" calcext:value-type="float">
            <text:p>0,00155555555555556000</text:p>
          </table:table-cell>
          <table:table-cell table:formula="of:=[.D1922]-[.D192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[.B1921]+7" office:value-type="float" office:value="13447" calcext:value-type="float">
            <text:p>13447</text:p>
          </table:table-cell>
          <table:table-cell office:value-type="float" office:value="8640000" calcext:value-type="float">
            <text:p>8640000</text:p>
          </table:table-cell>
          <table:table-cell table:formula="of:=[.B1922]/[.C1922]" office:value-type="float" office:value="0.00155636574074074" calcext:value-type="float">
            <text:p>0,00155636574074074000</text:p>
          </table:table-cell>
          <table:table-cell table:formula="of:=[.D1923]-[.D192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[.B1922]+7" office:value-type="float" office:value="13454" calcext:value-type="float">
            <text:p>13454</text:p>
          </table:table-cell>
          <table:table-cell office:value-type="float" office:value="8640000" calcext:value-type="float">
            <text:p>8640000</text:p>
          </table:table-cell>
          <table:table-cell table:formula="of:=[.B1923]/[.C1923]" office:value-type="float" office:value="0.00155717592592593" calcext:value-type="float">
            <text:p>0,00155717592592593000</text:p>
          </table:table-cell>
          <table:table-cell table:formula="of:=[.D1924]-[.D192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[.B1923]+7" office:value-type="float" office:value="13461" calcext:value-type="float">
            <text:p>13461</text:p>
          </table:table-cell>
          <table:table-cell office:value-type="float" office:value="8640000" calcext:value-type="float">
            <text:p>8640000</text:p>
          </table:table-cell>
          <table:table-cell table:formula="of:=[.B1924]/[.C1924]" office:value-type="float" office:value="0.00155798611111111" calcext:value-type="float">
            <text:p>0,00155798611111111000</text:p>
          </table:table-cell>
          <table:table-cell table:formula="of:=[.D1925]-[.D192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[.B1924]+7" office:value-type="float" office:value="13468" calcext:value-type="float">
            <text:p>13468</text:p>
          </table:table-cell>
          <table:table-cell office:value-type="float" office:value="8640000" calcext:value-type="float">
            <text:p>8640000</text:p>
          </table:table-cell>
          <table:table-cell table:formula="of:=[.B1925]/[.C1925]" office:value-type="float" office:value="0.0015587962962963" calcext:value-type="float">
            <text:p>0,00155879629629630000</text:p>
          </table:table-cell>
          <table:table-cell table:formula="of:=[.D1926]-[.D192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[.B1925]+7" office:value-type="float" office:value="13475" calcext:value-type="float">
            <text:p>13475</text:p>
          </table:table-cell>
          <table:table-cell office:value-type="float" office:value="8640000" calcext:value-type="float">
            <text:p>8640000</text:p>
          </table:table-cell>
          <table:table-cell table:formula="of:=[.B1926]/[.C1926]" office:value-type="float" office:value="0.00155960648148148" calcext:value-type="float">
            <text:p>0,00155960648148148000</text:p>
          </table:table-cell>
          <table:table-cell table:formula="of:=[.D1927]-[.D192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[.B1926]+7" office:value-type="float" office:value="13482" calcext:value-type="float">
            <text:p>13482</text:p>
          </table:table-cell>
          <table:table-cell office:value-type="float" office:value="8640000" calcext:value-type="float">
            <text:p>8640000</text:p>
          </table:table-cell>
          <table:table-cell table:formula="of:=[.B1927]/[.C1927]" office:value-type="float" office:value="0.00156041666666667" calcext:value-type="float">
            <text:p>0,00156041666666667000</text:p>
          </table:table-cell>
          <table:table-cell table:formula="of:=[.D1928]-[.D192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[.B1927]+7" office:value-type="float" office:value="13489" calcext:value-type="float">
            <text:p>13489</text:p>
          </table:table-cell>
          <table:table-cell office:value-type="float" office:value="8640000" calcext:value-type="float">
            <text:p>8640000</text:p>
          </table:table-cell>
          <table:table-cell table:formula="of:=[.B1928]/[.C1928]" office:value-type="float" office:value="0.00156122685185185" calcext:value-type="float">
            <text:p>0,00156122685185185000</text:p>
          </table:table-cell>
          <table:table-cell table:formula="of:=[.D1929]-[.D192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[.B1928]+7" office:value-type="float" office:value="13496" calcext:value-type="float">
            <text:p>13496</text:p>
          </table:table-cell>
          <table:table-cell office:value-type="float" office:value="8640000" calcext:value-type="float">
            <text:p>8640000</text:p>
          </table:table-cell>
          <table:table-cell table:formula="of:=[.B1929]/[.C1929]" office:value-type="float" office:value="0.00156203703703704" calcext:value-type="float">
            <text:p>0,00156203703703704000</text:p>
          </table:table-cell>
          <table:table-cell table:formula="of:=[.D1930]-[.D192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[.B1929]+7" office:value-type="float" office:value="13503" calcext:value-type="float">
            <text:p>13503</text:p>
          </table:table-cell>
          <table:table-cell office:value-type="float" office:value="8640000" calcext:value-type="float">
            <text:p>8640000</text:p>
          </table:table-cell>
          <table:table-cell table:formula="of:=[.B1930]/[.C1930]" office:value-type="float" office:value="0.00156284722222222" calcext:value-type="float">
            <text:p>0,00156284722222222000</text:p>
          </table:table-cell>
          <table:table-cell table:formula="of:=[.D1931]-[.D193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[.B1930]+7" office:value-type="float" office:value="13510" calcext:value-type="float">
            <text:p>13510</text:p>
          </table:table-cell>
          <table:table-cell office:value-type="float" office:value="8640000" calcext:value-type="float">
            <text:p>8640000</text:p>
          </table:table-cell>
          <table:table-cell table:formula="of:=[.B1931]/[.C1931]" office:value-type="float" office:value="0.00156365740740741" calcext:value-type="float">
            <text:p>0,00156365740740741000</text:p>
          </table:table-cell>
          <table:table-cell table:formula="of:=[.D1932]-[.D193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[.B1931]+7" office:value-type="float" office:value="13517" calcext:value-type="float">
            <text:p>13517</text:p>
          </table:table-cell>
          <table:table-cell office:value-type="float" office:value="8640000" calcext:value-type="float">
            <text:p>8640000</text:p>
          </table:table-cell>
          <table:table-cell table:formula="of:=[.B1932]/[.C1932]" office:value-type="float" office:value="0.00156446759259259" calcext:value-type="float">
            <text:p>0,00156446759259259000</text:p>
          </table:table-cell>
          <table:table-cell table:formula="of:=[.D1933]-[.D193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B1932]+7" office:value-type="float" office:value="13524" calcext:value-type="float">
            <text:p>13524</text:p>
          </table:table-cell>
          <table:table-cell office:value-type="float" office:value="8640000" calcext:value-type="float">
            <text:p>8640000</text:p>
          </table:table-cell>
          <table:table-cell table:formula="of:=[.B1933]/[.C1933]" office:value-type="float" office:value="0.00156527777777778" calcext:value-type="float">
            <text:p>0,00156527777777778000</text:p>
          </table:table-cell>
          <table:table-cell table:formula="of:=[.D1934]-[.D193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[.B1933]+7" office:value-type="float" office:value="13531" calcext:value-type="float">
            <text:p>13531</text:p>
          </table:table-cell>
          <table:table-cell office:value-type="float" office:value="8640000" calcext:value-type="float">
            <text:p>8640000</text:p>
          </table:table-cell>
          <table:table-cell table:formula="of:=[.B1934]/[.C1934]" office:value-type="float" office:value="0.00156608796296296" calcext:value-type="float">
            <text:p>0,00156608796296296000</text:p>
          </table:table-cell>
          <table:table-cell table:formula="of:=[.D1935]-[.D193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[.B1934]+7" office:value-type="float" office:value="13538" calcext:value-type="float">
            <text:p>13538</text:p>
          </table:table-cell>
          <table:table-cell office:value-type="float" office:value="8640000" calcext:value-type="float">
            <text:p>8640000</text:p>
          </table:table-cell>
          <table:table-cell table:formula="of:=[.B1935]/[.C1935]" office:value-type="float" office:value="0.00156689814814815" calcext:value-type="float">
            <text:p>0,00156689814814815000</text:p>
          </table:table-cell>
          <table:table-cell table:formula="of:=[.D1936]-[.D193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[.B1935]+7" office:value-type="float" office:value="13545" calcext:value-type="float">
            <text:p>13545</text:p>
          </table:table-cell>
          <table:table-cell office:value-type="float" office:value="8640000" calcext:value-type="float">
            <text:p>8640000</text:p>
          </table:table-cell>
          <table:table-cell table:formula="of:=[.B1936]/[.C1936]" office:value-type="float" office:value="0.00156770833333333" calcext:value-type="float">
            <text:p>0,00156770833333333000</text:p>
          </table:table-cell>
          <table:table-cell table:formula="of:=[.D1937]-[.D193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[.B1936]+7" office:value-type="float" office:value="13552" calcext:value-type="float">
            <text:p>13552</text:p>
          </table:table-cell>
          <table:table-cell office:value-type="float" office:value="8640000" calcext:value-type="float">
            <text:p>8640000</text:p>
          </table:table-cell>
          <table:table-cell table:formula="of:=[.B1937]/[.C1937]" office:value-type="float" office:value="0.00156851851851852" calcext:value-type="float">
            <text:p>0,00156851851851852000</text:p>
          </table:table-cell>
          <table:table-cell table:formula="of:=[.D1938]-[.D193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[.B1937]+7" office:value-type="float" office:value="13559" calcext:value-type="float">
            <text:p>13559</text:p>
          </table:table-cell>
          <table:table-cell office:value-type="float" office:value="8640000" calcext:value-type="float">
            <text:p>8640000</text:p>
          </table:table-cell>
          <table:table-cell table:formula="of:=[.B1938]/[.C1938]" office:value-type="float" office:value="0.0015693287037037" calcext:value-type="float">
            <text:p>0,00156932870370370000</text:p>
          </table:table-cell>
          <table:table-cell table:formula="of:=[.D1939]-[.D193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[.B1938]+7" office:value-type="float" office:value="13566" calcext:value-type="float">
            <text:p>13566</text:p>
          </table:table-cell>
          <table:table-cell office:value-type="float" office:value="8640000" calcext:value-type="float">
            <text:p>8640000</text:p>
          </table:table-cell>
          <table:table-cell table:formula="of:=[.B1939]/[.C1939]" office:value-type="float" office:value="0.00157013888888889" calcext:value-type="float">
            <text:p>0,00157013888888889000</text:p>
          </table:table-cell>
          <table:table-cell table:formula="of:=[.D1940]-[.D193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[.B1939]+7" office:value-type="float" office:value="13573" calcext:value-type="float">
            <text:p>13573</text:p>
          </table:table-cell>
          <table:table-cell office:value-type="float" office:value="8640000" calcext:value-type="float">
            <text:p>8640000</text:p>
          </table:table-cell>
          <table:table-cell table:formula="of:=[.B1940]/[.C1940]" office:value-type="float" office:value="0.00157094907407407" calcext:value-type="float">
            <text:p>0,00157094907407407000</text:p>
          </table:table-cell>
          <table:table-cell table:formula="of:=[.D1941]-[.D194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[.B1940]+7" office:value-type="float" office:value="13580" calcext:value-type="float">
            <text:p>13580</text:p>
          </table:table-cell>
          <table:table-cell office:value-type="float" office:value="8640000" calcext:value-type="float">
            <text:p>8640000</text:p>
          </table:table-cell>
          <table:table-cell table:formula="of:=[.B1941]/[.C1941]" office:value-type="float" office:value="0.00157175925925926" calcext:value-type="float">
            <text:p>0,00157175925925926000</text:p>
          </table:table-cell>
          <table:table-cell table:formula="of:=[.D1942]-[.D194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[.B1941]+7" office:value-type="float" office:value="13587" calcext:value-type="float">
            <text:p>13587</text:p>
          </table:table-cell>
          <table:table-cell office:value-type="float" office:value="8640000" calcext:value-type="float">
            <text:p>8640000</text:p>
          </table:table-cell>
          <table:table-cell table:formula="of:=[.B1942]/[.C1942]" office:value-type="float" office:value="0.00157256944444444" calcext:value-type="float">
            <text:p>0,00157256944444444000</text:p>
          </table:table-cell>
          <table:table-cell table:formula="of:=[.D1943]-[.D194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[.B1942]+7" office:value-type="float" office:value="13594" calcext:value-type="float">
            <text:p>13594</text:p>
          </table:table-cell>
          <table:table-cell office:value-type="float" office:value="8640000" calcext:value-type="float">
            <text:p>8640000</text:p>
          </table:table-cell>
          <table:table-cell table:formula="of:=[.B1943]/[.C1943]" office:value-type="float" office:value="0.00157337962962963" calcext:value-type="float">
            <text:p>0,00157337962962963000</text:p>
          </table:table-cell>
          <table:table-cell table:formula="of:=[.D1944]-[.D194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[.B1943]+7" office:value-type="float" office:value="13601" calcext:value-type="float">
            <text:p>13601</text:p>
          </table:table-cell>
          <table:table-cell office:value-type="float" office:value="8640000" calcext:value-type="float">
            <text:p>8640000</text:p>
          </table:table-cell>
          <table:table-cell table:formula="of:=[.B1944]/[.C1944]" office:value-type="float" office:value="0.00157418981481481" calcext:value-type="float">
            <text:p>0,00157418981481481000</text:p>
          </table:table-cell>
          <table:table-cell table:formula="of:=[.D1945]-[.D194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[.B1944]+7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1945]/[.C1945]" office:value-type="float" office:value="0.001575" calcext:value-type="float">
            <text:p>0,00157500000000000000</text:p>
          </table:table-cell>
          <table:table-cell table:formula="of:=[.D1946]-[.D194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[.B1945]+7" office:value-type="float" office:value="13615" calcext:value-type="float">
            <text:p>13615</text:p>
          </table:table-cell>
          <table:table-cell office:value-type="float" office:value="8640000" calcext:value-type="float">
            <text:p>8640000</text:p>
          </table:table-cell>
          <table:table-cell table:formula="of:=[.B1946]/[.C1946]" office:value-type="float" office:value="0.00157581018518519" calcext:value-type="float">
            <text:p>0,00157581018518518000</text:p>
          </table:table-cell>
          <table:table-cell table:formula="of:=[.D1947]-[.D194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[.B1946]+7" office:value-type="float" office:value="13622" calcext:value-type="float">
            <text:p>13622</text:p>
          </table:table-cell>
          <table:table-cell office:value-type="float" office:value="8640000" calcext:value-type="float">
            <text:p>8640000</text:p>
          </table:table-cell>
          <table:table-cell table:formula="of:=[.B1947]/[.C1947]" office:value-type="float" office:value="0.00157662037037037" calcext:value-type="float">
            <text:p>0,00157662037037037000</text:p>
          </table:table-cell>
          <table:table-cell table:formula="of:=[.D1948]-[.D194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[.B1947]+7" office:value-type="float" office:value="13629" calcext:value-type="float">
            <text:p>13629</text:p>
          </table:table-cell>
          <table:table-cell office:value-type="float" office:value="8640000" calcext:value-type="float">
            <text:p>8640000</text:p>
          </table:table-cell>
          <table:table-cell table:formula="of:=[.B1948]/[.C1948]" office:value-type="float" office:value="0.00157743055555556" calcext:value-type="float">
            <text:p>0,00157743055555556000</text:p>
          </table:table-cell>
          <table:table-cell table:formula="of:=[.D1949]-[.D194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[.B1948]+7" office:value-type="float" office:value="13636" calcext:value-type="float">
            <text:p>13636</text:p>
          </table:table-cell>
          <table:table-cell office:value-type="float" office:value="8640000" calcext:value-type="float">
            <text:p>8640000</text:p>
          </table:table-cell>
          <table:table-cell table:formula="of:=[.B1949]/[.C1949]" office:value-type="float" office:value="0.00157824074074074" calcext:value-type="float">
            <text:p>0,00157824074074074000</text:p>
          </table:table-cell>
          <table:table-cell table:formula="of:=[.D1950]-[.D194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[.B1949]+7" office:value-type="float" office:value="13643" calcext:value-type="float">
            <text:p>13643</text:p>
          </table:table-cell>
          <table:table-cell office:value-type="float" office:value="8640000" calcext:value-type="float">
            <text:p>8640000</text:p>
          </table:table-cell>
          <table:table-cell table:formula="of:=[.B1950]/[.C1950]" office:value-type="float" office:value="0.00157905092592593" calcext:value-type="float">
            <text:p>0,00157905092592593000</text:p>
          </table:table-cell>
          <table:table-cell table:formula="of:=[.D1951]-[.D195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[.B1950]+7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1951]/[.C1951]" office:value-type="float" office:value="0.00157986111111111" calcext:value-type="float">
            <text:p>0,00157986111111111000</text:p>
          </table:table-cell>
          <table:table-cell table:formula="of:=[.D1952]-[.D195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[.B1951]+7" office:value-type="float" office:value="13657" calcext:value-type="float">
            <text:p>13657</text:p>
          </table:table-cell>
          <table:table-cell office:value-type="float" office:value="8640000" calcext:value-type="float">
            <text:p>8640000</text:p>
          </table:table-cell>
          <table:table-cell table:formula="of:=[.B1952]/[.C1952]" office:value-type="float" office:value="0.0015806712962963" calcext:value-type="float">
            <text:p>0,00158067129629630000</text:p>
          </table:table-cell>
          <table:table-cell table:formula="of:=[.D1953]-[.D195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[.B1952]+7" office:value-type="float" office:value="13664" calcext:value-type="float">
            <text:p>13664</text:p>
          </table:table-cell>
          <table:table-cell office:value-type="float" office:value="8640000" calcext:value-type="float">
            <text:p>8640000</text:p>
          </table:table-cell>
          <table:table-cell table:formula="of:=[.B1953]/[.C1953]" office:value-type="float" office:value="0.00158148148148148" calcext:value-type="float">
            <text:p>0,00158148148148148000</text:p>
          </table:table-cell>
          <table:table-cell table:formula="of:=[.D1954]-[.D195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[.B1953]+7" office:value-type="float" office:value="13671" calcext:value-type="float">
            <text:p>13671</text:p>
          </table:table-cell>
          <table:table-cell office:value-type="float" office:value="8640000" calcext:value-type="float">
            <text:p>8640000</text:p>
          </table:table-cell>
          <table:table-cell table:formula="of:=[.B1954]/[.C1954]" office:value-type="float" office:value="0.00158229166666667" calcext:value-type="float">
            <text:p>0,00158229166666667000</text:p>
          </table:table-cell>
          <table:table-cell table:formula="of:=[.D1955]-[.D195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[.B1954]+7" office:value-type="float" office:value="13678" calcext:value-type="float">
            <text:p>13678</text:p>
          </table:table-cell>
          <table:table-cell office:value-type="float" office:value="8640000" calcext:value-type="float">
            <text:p>8640000</text:p>
          </table:table-cell>
          <table:table-cell table:formula="of:=[.B1955]/[.C1955]" office:value-type="float" office:value="0.00158310185185185" calcext:value-type="float">
            <text:p>0,00158310185185185000</text:p>
          </table:table-cell>
          <table:table-cell table:formula="of:=[.D1956]-[.D195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[.B1955]+7" office:value-type="float" office:value="13685" calcext:value-type="float">
            <text:p>13685</text:p>
          </table:table-cell>
          <table:table-cell office:value-type="float" office:value="8640000" calcext:value-type="float">
            <text:p>8640000</text:p>
          </table:table-cell>
          <table:table-cell table:formula="of:=[.B1956]/[.C1956]" office:value-type="float" office:value="0.00158391203703704" calcext:value-type="float">
            <text:p>0,00158391203703704000</text:p>
          </table:table-cell>
          <table:table-cell table:formula="of:=[.D1957]-[.D195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[.B1956]+7" office:value-type="float" office:value="13692" calcext:value-type="float">
            <text:p>13692</text:p>
          </table:table-cell>
          <table:table-cell office:value-type="float" office:value="8640000" calcext:value-type="float">
            <text:p>8640000</text:p>
          </table:table-cell>
          <table:table-cell table:formula="of:=[.B1957]/[.C1957]" office:value-type="float" office:value="0.00158472222222222" calcext:value-type="float">
            <text:p>0,00158472222222222000</text:p>
          </table:table-cell>
          <table:table-cell table:formula="of:=[.D1958]-[.D195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[.B1957]+7" office:value-type="float" office:value="13699" calcext:value-type="float">
            <text:p>13699</text:p>
          </table:table-cell>
          <table:table-cell office:value-type="float" office:value="8640000" calcext:value-type="float">
            <text:p>8640000</text:p>
          </table:table-cell>
          <table:table-cell table:formula="of:=[.B1958]/[.C1958]" office:value-type="float" office:value="0.00158553240740741" calcext:value-type="float">
            <text:p>0,00158553240740741000</text:p>
          </table:table-cell>
          <table:table-cell table:formula="of:=[.D1959]-[.D195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[.B1958]+7" office:value-type="float" office:value="13706" calcext:value-type="float">
            <text:p>13706</text:p>
          </table:table-cell>
          <table:table-cell office:value-type="float" office:value="8640000" calcext:value-type="float">
            <text:p>8640000</text:p>
          </table:table-cell>
          <table:table-cell table:formula="of:=[.B1959]/[.C1959]" office:value-type="float" office:value="0.00158634259259259" calcext:value-type="float">
            <text:p>0,00158634259259259000</text:p>
          </table:table-cell>
          <table:table-cell table:formula="of:=[.D1960]-[.D195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[.B1959]+7" office:value-type="float" office:value="13713" calcext:value-type="float">
            <text:p>13713</text:p>
          </table:table-cell>
          <table:table-cell office:value-type="float" office:value="8640000" calcext:value-type="float">
            <text:p>8640000</text:p>
          </table:table-cell>
          <table:table-cell table:formula="of:=[.B1960]/[.C1960]" office:value-type="float" office:value="0.00158715277777778" calcext:value-type="float">
            <text:p>0,00158715277777778000</text:p>
          </table:table-cell>
          <table:table-cell table:formula="of:=[.D1961]-[.D196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[.B1960]+7" office:value-type="float" office:value="13720" calcext:value-type="float">
            <text:p>13720</text:p>
          </table:table-cell>
          <table:table-cell office:value-type="float" office:value="8640000" calcext:value-type="float">
            <text:p>8640000</text:p>
          </table:table-cell>
          <table:table-cell table:formula="of:=[.B1961]/[.C1961]" office:value-type="float" office:value="0.00158796296296296" calcext:value-type="float">
            <text:p>0,00158796296296296000</text:p>
          </table:table-cell>
          <table:table-cell table:formula="of:=[.D1962]-[.D196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[.B1961]+7" office:value-type="float" office:value="13727" calcext:value-type="float">
            <text:p>13727</text:p>
          </table:table-cell>
          <table:table-cell office:value-type="float" office:value="8640000" calcext:value-type="float">
            <text:p>8640000</text:p>
          </table:table-cell>
          <table:table-cell table:formula="of:=[.B1962]/[.C1962]" office:value-type="float" office:value="0.00158877314814815" calcext:value-type="float">
            <text:p>0,00158877314814815000</text:p>
          </table:table-cell>
          <table:table-cell table:formula="of:=[.D1963]-[.D196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[.B1962]+7" office:value-type="float" office:value="13734" calcext:value-type="float">
            <text:p>13734</text:p>
          </table:table-cell>
          <table:table-cell office:value-type="float" office:value="8640000" calcext:value-type="float">
            <text:p>8640000</text:p>
          </table:table-cell>
          <table:table-cell table:formula="of:=[.B1963]/[.C1963]" office:value-type="float" office:value="0.00158958333333333" calcext:value-type="float">
            <text:p>0,00158958333333333000</text:p>
          </table:table-cell>
          <table:table-cell table:formula="of:=[.D1964]-[.D196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[.B1963]+7" office:value-type="float" office:value="13741" calcext:value-type="float">
            <text:p>13741</text:p>
          </table:table-cell>
          <table:table-cell office:value-type="float" office:value="8640000" calcext:value-type="float">
            <text:p>8640000</text:p>
          </table:table-cell>
          <table:table-cell table:formula="of:=[.B1964]/[.C1964]" office:value-type="float" office:value="0.00159039351851852" calcext:value-type="float">
            <text:p>0,00159039351851852000</text:p>
          </table:table-cell>
          <table:table-cell table:formula="of:=[.D1965]-[.D196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[.B1964]+7" office:value-type="float" office:value="13748" calcext:value-type="float">
            <text:p>13748</text:p>
          </table:table-cell>
          <table:table-cell office:value-type="float" office:value="8640000" calcext:value-type="float">
            <text:p>8640000</text:p>
          </table:table-cell>
          <table:table-cell table:formula="of:=[.B1965]/[.C1965]" office:value-type="float" office:value="0.0015912037037037" calcext:value-type="float">
            <text:p>0,00159120370370370000</text:p>
          </table:table-cell>
          <table:table-cell table:formula="of:=[.D1966]-[.D196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[.B1965]+7" office:value-type="float" office:value="13755" calcext:value-type="float">
            <text:p>13755</text:p>
          </table:table-cell>
          <table:table-cell office:value-type="float" office:value="8640000" calcext:value-type="float">
            <text:p>8640000</text:p>
          </table:table-cell>
          <table:table-cell table:formula="of:=[.B1966]/[.C1966]" office:value-type="float" office:value="0.00159201388888889" calcext:value-type="float">
            <text:p>0,00159201388888889000</text:p>
          </table:table-cell>
          <table:table-cell table:formula="of:=[.D1967]-[.D196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[.B1966]+7" office:value-type="float" office:value="13762" calcext:value-type="float">
            <text:p>13762</text:p>
          </table:table-cell>
          <table:table-cell office:value-type="float" office:value="8640000" calcext:value-type="float">
            <text:p>8640000</text:p>
          </table:table-cell>
          <table:table-cell table:formula="of:=[.B1967]/[.C1967]" office:value-type="float" office:value="0.00159282407407407" calcext:value-type="float">
            <text:p>0,00159282407407407000</text:p>
          </table:table-cell>
          <table:table-cell table:formula="of:=[.D1968]-[.D196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[.B1967]+7" office:value-type="float" office:value="13769" calcext:value-type="float">
            <text:p>13769</text:p>
          </table:table-cell>
          <table:table-cell office:value-type="float" office:value="8640000" calcext:value-type="float">
            <text:p>8640000</text:p>
          </table:table-cell>
          <table:table-cell table:formula="of:=[.B1968]/[.C1968]" office:value-type="float" office:value="0.00159363425925926" calcext:value-type="float">
            <text:p>0,00159363425925926000</text:p>
          </table:table-cell>
          <table:table-cell table:formula="of:=[.D1969]-[.D196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[.B1968]+7" office:value-type="float" office:value="13776" calcext:value-type="float">
            <text:p>13776</text:p>
          </table:table-cell>
          <table:table-cell office:value-type="float" office:value="8640000" calcext:value-type="float">
            <text:p>8640000</text:p>
          </table:table-cell>
          <table:table-cell table:formula="of:=[.B1969]/[.C1969]" office:value-type="float" office:value="0.00159444444444444" calcext:value-type="float">
            <text:p>0,00159444444444444000</text:p>
          </table:table-cell>
          <table:table-cell table:formula="of:=[.D1970]-[.D196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[.B1969]+7" office:value-type="float" office:value="13783" calcext:value-type="float">
            <text:p>13783</text:p>
          </table:table-cell>
          <table:table-cell office:value-type="float" office:value="8640000" calcext:value-type="float">
            <text:p>8640000</text:p>
          </table:table-cell>
          <table:table-cell table:formula="of:=[.B1970]/[.C1970]" office:value-type="float" office:value="0.00159525462962963" calcext:value-type="float">
            <text:p>0,00159525462962963000</text:p>
          </table:table-cell>
          <table:table-cell table:formula="of:=[.D1971]-[.D197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[.B1970]+7" office:value-type="float" office:value="13790" calcext:value-type="float">
            <text:p>13790</text:p>
          </table:table-cell>
          <table:table-cell office:value-type="float" office:value="8640000" calcext:value-type="float">
            <text:p>8640000</text:p>
          </table:table-cell>
          <table:table-cell table:formula="of:=[.B1971]/[.C1971]" office:value-type="float" office:value="0.00159606481481482" calcext:value-type="float">
            <text:p>0,00159606481481482000</text:p>
          </table:table-cell>
          <table:table-cell table:formula="of:=[.D1972]-[.D197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[.B1971]+7" office:value-type="float" office:value="13797" calcext:value-type="float">
            <text:p>13797</text:p>
          </table:table-cell>
          <table:table-cell office:value-type="float" office:value="8640000" calcext:value-type="float">
            <text:p>8640000</text:p>
          </table:table-cell>
          <table:table-cell table:formula="of:=[.B1972]/[.C1972]" office:value-type="float" office:value="0.001596875" calcext:value-type="float">
            <text:p>0,00159687500000000000</text:p>
          </table:table-cell>
          <table:table-cell table:formula="of:=[.D1973]-[.D197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[.B1972]+7" office:value-type="float" office:value="13804" calcext:value-type="float">
            <text:p>13804</text:p>
          </table:table-cell>
          <table:table-cell office:value-type="float" office:value="8640000" calcext:value-type="float">
            <text:p>8640000</text:p>
          </table:table-cell>
          <table:table-cell table:formula="of:=[.B1973]/[.C1973]" office:value-type="float" office:value="0.00159768518518519" calcext:value-type="float">
            <text:p>0,00159768518518519000</text:p>
          </table:table-cell>
          <table:table-cell table:formula="of:=[.D1974]-[.D197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[.B1973]+7" office:value-type="float" office:value="13811" calcext:value-type="float">
            <text:p>13811</text:p>
          </table:table-cell>
          <table:table-cell office:value-type="float" office:value="8640000" calcext:value-type="float">
            <text:p>8640000</text:p>
          </table:table-cell>
          <table:table-cell table:formula="of:=[.B1974]/[.C1974]" office:value-type="float" office:value="0.00159849537037037" calcext:value-type="float">
            <text:p>0,00159849537037037000</text:p>
          </table:table-cell>
          <table:table-cell table:formula="of:=[.D1975]-[.D197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[.B1974]+7" office:value-type="float" office:value="13818" calcext:value-type="float">
            <text:p>13818</text:p>
          </table:table-cell>
          <table:table-cell office:value-type="float" office:value="8640000" calcext:value-type="float">
            <text:p>8640000</text:p>
          </table:table-cell>
          <table:table-cell table:formula="of:=[.B1975]/[.C1975]" office:value-type="float" office:value="0.00159930555555556" calcext:value-type="float">
            <text:p>0,00159930555555556000</text:p>
          </table:table-cell>
          <table:table-cell table:formula="of:=[.D1976]-[.D197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.B1975]+7" office:value-type="float" office:value="13825" calcext:value-type="float">
            <text:p>13825</text:p>
          </table:table-cell>
          <table:table-cell office:value-type="float" office:value="8640000" calcext:value-type="float">
            <text:p>8640000</text:p>
          </table:table-cell>
          <table:table-cell table:formula="of:=[.B1976]/[.C1976]" office:value-type="float" office:value="0.00160011574074074" calcext:value-type="float">
            <text:p>0,00160011574074074000</text:p>
          </table:table-cell>
          <table:table-cell table:formula="of:=[.D1977]-[.D197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B1976]+7" office:value-type="float" office:value="13832" calcext:value-type="float">
            <text:p>13832</text:p>
          </table:table-cell>
          <table:table-cell office:value-type="float" office:value="8640000" calcext:value-type="float">
            <text:p>8640000</text:p>
          </table:table-cell>
          <table:table-cell table:formula="of:=[.B1977]/[.C1977]" office:value-type="float" office:value="0.00160092592592593" calcext:value-type="float">
            <text:p>0,00160092592592593000</text:p>
          </table:table-cell>
          <table:table-cell table:formula="of:=[.D1978]-[.D197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.B1977]+7" office:value-type="float" office:value="13839" calcext:value-type="float">
            <text:p>13839</text:p>
          </table:table-cell>
          <table:table-cell office:value-type="float" office:value="8640000" calcext:value-type="float">
            <text:p>8640000</text:p>
          </table:table-cell>
          <table:table-cell table:formula="of:=[.B1978]/[.C1978]" office:value-type="float" office:value="0.00160173611111111" calcext:value-type="float">
            <text:p>0,00160173611111111000</text:p>
          </table:table-cell>
          <table:table-cell table:formula="of:=[.D1979]-[.D197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.B1978]+7" office:value-type="float" office:value="13846" calcext:value-type="float">
            <text:p>13846</text:p>
          </table:table-cell>
          <table:table-cell office:value-type="float" office:value="8640000" calcext:value-type="float">
            <text:p>8640000</text:p>
          </table:table-cell>
          <table:table-cell table:formula="of:=[.B1979]/[.C1979]" office:value-type="float" office:value="0.0016025462962963" calcext:value-type="float">
            <text:p>0,00160254629629630000</text:p>
          </table:table-cell>
          <table:table-cell table:formula="of:=[.D1980]-[.D197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.B1979]+7" office:value-type="float" office:value="13853" calcext:value-type="float">
            <text:p>13853</text:p>
          </table:table-cell>
          <table:table-cell office:value-type="float" office:value="8640000" calcext:value-type="float">
            <text:p>8640000</text:p>
          </table:table-cell>
          <table:table-cell table:formula="of:=[.B1980]/[.C1980]" office:value-type="float" office:value="0.00160335648148148" calcext:value-type="float">
            <text:p>0,00160335648148148000</text:p>
          </table:table-cell>
          <table:table-cell table:formula="of:=[.D1981]-[.D198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.B1980]+7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1981]/[.C1981]" office:value-type="float" office:value="0.00160416666666667" calcext:value-type="float">
            <text:p>0,00160416666666667000</text:p>
          </table:table-cell>
          <table:table-cell table:formula="of:=[.D1982]-[.D198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.B1981]+7" office:value-type="float" office:value="13867" calcext:value-type="float">
            <text:p>13867</text:p>
          </table:table-cell>
          <table:table-cell office:value-type="float" office:value="8640000" calcext:value-type="float">
            <text:p>8640000</text:p>
          </table:table-cell>
          <table:table-cell table:formula="of:=[.B1982]/[.C1982]" office:value-type="float" office:value="0.00160497685185185" calcext:value-type="float">
            <text:p>0,00160497685185185000</text:p>
          </table:table-cell>
          <table:table-cell table:formula="of:=[.D1983]-[.D198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.B1982]+7" office:value-type="float" office:value="13874" calcext:value-type="float">
            <text:p>13874</text:p>
          </table:table-cell>
          <table:table-cell office:value-type="float" office:value="8640000" calcext:value-type="float">
            <text:p>8640000</text:p>
          </table:table-cell>
          <table:table-cell table:formula="of:=[.B1983]/[.C1983]" office:value-type="float" office:value="0.00160578703703704" calcext:value-type="float">
            <text:p>0,00160578703703704000</text:p>
          </table:table-cell>
          <table:table-cell table:formula="of:=[.D1984]-[.D198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.B1983]+7" office:value-type="float" office:value="13881" calcext:value-type="float">
            <text:p>13881</text:p>
          </table:table-cell>
          <table:table-cell office:value-type="float" office:value="8640000" calcext:value-type="float">
            <text:p>8640000</text:p>
          </table:table-cell>
          <table:table-cell table:formula="of:=[.B1984]/[.C1984]" office:value-type="float" office:value="0.00160659722222222" calcext:value-type="float">
            <text:p>0,00160659722222222000</text:p>
          </table:table-cell>
          <table:table-cell table:formula="of:=[.D1985]-[.D198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.B1984]+7" office:value-type="float" office:value="13888" calcext:value-type="float">
            <text:p>13888</text:p>
          </table:table-cell>
          <table:table-cell office:value-type="float" office:value="8640000" calcext:value-type="float">
            <text:p>8640000</text:p>
          </table:table-cell>
          <table:table-cell table:formula="of:=[.B1985]/[.C1985]" office:value-type="float" office:value="0.00160740740740741" calcext:value-type="float">
            <text:p>0,00160740740740741000</text:p>
          </table:table-cell>
          <table:table-cell table:formula="of:=[.D1986]-[.D198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.B1985]+7" office:value-type="float" office:value="13895" calcext:value-type="float">
            <text:p>13895</text:p>
          </table:table-cell>
          <table:table-cell office:value-type="float" office:value="8640000" calcext:value-type="float">
            <text:p>8640000</text:p>
          </table:table-cell>
          <table:table-cell table:formula="of:=[.B1986]/[.C1986]" office:value-type="float" office:value="0.00160821759259259" calcext:value-type="float">
            <text:p>0,00160821759259259000</text:p>
          </table:table-cell>
          <table:table-cell table:formula="of:=[.D1987]-[.D198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.B1986]+7" office:value-type="float" office:value="13902" calcext:value-type="float">
            <text:p>13902</text:p>
          </table:table-cell>
          <table:table-cell office:value-type="float" office:value="8640000" calcext:value-type="float">
            <text:p>8640000</text:p>
          </table:table-cell>
          <table:table-cell table:formula="of:=[.B1987]/[.C1987]" office:value-type="float" office:value="0.00160902777777778" calcext:value-type="float">
            <text:p>0,00160902777777778000</text:p>
          </table:table-cell>
          <table:table-cell table:formula="of:=[.D1988]-[.D198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.B1987]+7" office:value-type="float" office:value="13909" calcext:value-type="float">
            <text:p>13909</text:p>
          </table:table-cell>
          <table:table-cell office:value-type="float" office:value="8640000" calcext:value-type="float">
            <text:p>8640000</text:p>
          </table:table-cell>
          <table:table-cell table:formula="of:=[.B1988]/[.C1988]" office:value-type="float" office:value="0.00160983796296296" calcext:value-type="float">
            <text:p>0,00160983796296296000</text:p>
          </table:table-cell>
          <table:table-cell table:formula="of:=[.D1989]-[.D198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.B1988]+7" office:value-type="float" office:value="13916" calcext:value-type="float">
            <text:p>13916</text:p>
          </table:table-cell>
          <table:table-cell office:value-type="float" office:value="8640000" calcext:value-type="float">
            <text:p>8640000</text:p>
          </table:table-cell>
          <table:table-cell table:formula="of:=[.B1989]/[.C1989]" office:value-type="float" office:value="0.00161064814814815" calcext:value-type="float">
            <text:p>0,00161064814814815000</text:p>
          </table:table-cell>
          <table:table-cell table:formula="of:=[.D1990]-[.D198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.B1989]+7" office:value-type="float" office:value="13923" calcext:value-type="float">
            <text:p>13923</text:p>
          </table:table-cell>
          <table:table-cell office:value-type="float" office:value="8640000" calcext:value-type="float">
            <text:p>8640000</text:p>
          </table:table-cell>
          <table:table-cell table:formula="of:=[.B1990]/[.C1990]" office:value-type="float" office:value="0.00161145833333333" calcext:value-type="float">
            <text:p>0,00161145833333333000</text:p>
          </table:table-cell>
          <table:table-cell table:formula="of:=[.D1991]-[.D199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.B1990]+7" office:value-type="float" office:value="13930" calcext:value-type="float">
            <text:p>13930</text:p>
          </table:table-cell>
          <table:table-cell office:value-type="float" office:value="8640000" calcext:value-type="float">
            <text:p>8640000</text:p>
          </table:table-cell>
          <table:table-cell table:formula="of:=[.B1991]/[.C1991]" office:value-type="float" office:value="0.00161226851851852" calcext:value-type="float">
            <text:p>0,00161226851851852000</text:p>
          </table:table-cell>
          <table:table-cell table:formula="of:=[.D1992]-[.D199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.B1991]+7" office:value-type="float" office:value="13937" calcext:value-type="float">
            <text:p>13937</text:p>
          </table:table-cell>
          <table:table-cell office:value-type="float" office:value="8640000" calcext:value-type="float">
            <text:p>8640000</text:p>
          </table:table-cell>
          <table:table-cell table:formula="of:=[.B1992]/[.C1992]" office:value-type="float" office:value="0.0016130787037037" calcext:value-type="float">
            <text:p>0,00161307870370370000</text:p>
          </table:table-cell>
          <table:table-cell table:formula="of:=[.D1993]-[.D199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.B1992]+7" office:value-type="float" office:value="13944" calcext:value-type="float">
            <text:p>13944</text:p>
          </table:table-cell>
          <table:table-cell office:value-type="float" office:value="8640000" calcext:value-type="float">
            <text:p>8640000</text:p>
          </table:table-cell>
          <table:table-cell table:formula="of:=[.B1993]/[.C1993]" office:value-type="float" office:value="0.00161388888888889" calcext:value-type="float">
            <text:p>0,00161388888888889000</text:p>
          </table:table-cell>
          <table:table-cell table:formula="of:=[.D1994]-[.D199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.B1993]+7" office:value-type="float" office:value="13951" calcext:value-type="float">
            <text:p>13951</text:p>
          </table:table-cell>
          <table:table-cell office:value-type="float" office:value="8640000" calcext:value-type="float">
            <text:p>8640000</text:p>
          </table:table-cell>
          <table:table-cell table:formula="of:=[.B1994]/[.C1994]" office:value-type="float" office:value="0.00161469907407407" calcext:value-type="float">
            <text:p>0,00161469907407407000</text:p>
          </table:table-cell>
          <table:table-cell table:formula="of:=[.D1995]-[.D199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.B1994]+7" office:value-type="float" office:value="13958" calcext:value-type="float">
            <text:p>13958</text:p>
          </table:table-cell>
          <table:table-cell office:value-type="float" office:value="8640000" calcext:value-type="float">
            <text:p>8640000</text:p>
          </table:table-cell>
          <table:table-cell table:formula="of:=[.B1995]/[.C1995]" office:value-type="float" office:value="0.00161550925925926" calcext:value-type="float">
            <text:p>0,00161550925925926000</text:p>
          </table:table-cell>
          <table:table-cell table:formula="of:=[.D1996]-[.D199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.B1995]+7" office:value-type="float" office:value="13965" calcext:value-type="float">
            <text:p>13965</text:p>
          </table:table-cell>
          <table:table-cell office:value-type="float" office:value="8640000" calcext:value-type="float">
            <text:p>8640000</text:p>
          </table:table-cell>
          <table:table-cell table:formula="of:=[.B1996]/[.C1996]" office:value-type="float" office:value="0.00161631944444444" calcext:value-type="float">
            <text:p>0,00161631944444444000</text:p>
          </table:table-cell>
          <table:table-cell table:formula="of:=[.D1997]-[.D199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.B1996]+7" office:value-type="float" office:value="13972" calcext:value-type="float">
            <text:p>13972</text:p>
          </table:table-cell>
          <table:table-cell office:value-type="float" office:value="8640000" calcext:value-type="float">
            <text:p>8640000</text:p>
          </table:table-cell>
          <table:table-cell table:formula="of:=[.B1997]/[.C1997]" office:value-type="float" office:value="0.00161712962962963" calcext:value-type="float">
            <text:p>0,00161712962962963000</text:p>
          </table:table-cell>
          <table:table-cell table:formula="of:=[.D1998]-[.D199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.B1997]+7" office:value-type="float" office:value="13979" calcext:value-type="float">
            <text:p>13979</text:p>
          </table:table-cell>
          <table:table-cell office:value-type="float" office:value="8640000" calcext:value-type="float">
            <text:p>8640000</text:p>
          </table:table-cell>
          <table:table-cell table:formula="of:=[.B1998]/[.C1998]" office:value-type="float" office:value="0.00161793981481481" calcext:value-type="float">
            <text:p>0,00161793981481482000</text:p>
          </table:table-cell>
          <table:table-cell table:formula="of:=[.D1999]-[.D199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.B1998]+7" office:value-type="float" office:value="13986" calcext:value-type="float">
            <text:p>13986</text:p>
          </table:table-cell>
          <table:table-cell office:value-type="float" office:value="8640000" calcext:value-type="float">
            <text:p>8640000</text:p>
          </table:table-cell>
          <table:table-cell table:formula="of:=[.B1999]/[.C1999]" office:value-type="float" office:value="0.00161875" calcext:value-type="float">
            <text:p>0,00161875000000000000</text:p>
          </table:table-cell>
          <table:table-cell table:formula="of:=[.D2000]-[.D199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.B1999]+7" office:value-type="float" office:value="13993" calcext:value-type="float">
            <text:p>13993</text:p>
          </table:table-cell>
          <table:table-cell office:value-type="float" office:value="8640000" calcext:value-type="float">
            <text:p>8640000</text:p>
          </table:table-cell>
          <table:table-cell table:formula="of:=[.B2000]/[.C2000]" office:value-type="float" office:value="0.00161956018518519" calcext:value-type="float">
            <text:p>0,00161956018518519000</text:p>
          </table:table-cell>
          <table:table-cell table:formula="of:=[.D2001]-[.D200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000]+7" office:value-type="float" office:value="14000" calcext:value-type="float">
            <text:p>14000</text:p>
          </table:table-cell>
          <table:table-cell office:value-type="float" office:value="8640000" calcext:value-type="float">
            <text:p>8640000</text:p>
          </table:table-cell>
          <table:table-cell table:formula="of:=[.B2001]/[.C2001]" office:value-type="float" office:value="0.00162037037037037" calcext:value-type="float">
            <text:p>0,00162037037037037000</text:p>
          </table:table-cell>
          <table:table-cell table:formula="of:=[.D2002]-[.D200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.B2001]+7" office:value-type="float" office:value="14007" calcext:value-type="float">
            <text:p>14007</text:p>
          </table:table-cell>
          <table:table-cell office:value-type="float" office:value="8640000" calcext:value-type="float">
            <text:p>8640000</text:p>
          </table:table-cell>
          <table:table-cell table:formula="of:=[.B2002]/[.C2002]" office:value-type="float" office:value="0.00162118055555556" calcext:value-type="float">
            <text:p>0,00162118055555556000</text:p>
          </table:table-cell>
          <table:table-cell table:formula="of:=[.D2003]-[.D200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.B2002]+7" office:value-type="float" office:value="14014" calcext:value-type="float">
            <text:p>14014</text:p>
          </table:table-cell>
          <table:table-cell office:value-type="float" office:value="8640000" calcext:value-type="float">
            <text:p>8640000</text:p>
          </table:table-cell>
          <table:table-cell table:formula="of:=[.B2003]/[.C2003]" office:value-type="float" office:value="0.00162199074074074" calcext:value-type="float">
            <text:p>0,00162199074074074000</text:p>
          </table:table-cell>
          <table:table-cell table:formula="of:=[.D2004]-[.D200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.B2003]+7" office:value-type="float" office:value="14021" calcext:value-type="float">
            <text:p>14021</text:p>
          </table:table-cell>
          <table:table-cell office:value-type="float" office:value="8640000" calcext:value-type="float">
            <text:p>8640000</text:p>
          </table:table-cell>
          <table:table-cell table:formula="of:=[.B2004]/[.C2004]" office:value-type="float" office:value="0.00162280092592593" calcext:value-type="float">
            <text:p>0,00162280092592593000</text:p>
          </table:table-cell>
          <table:table-cell table:formula="of:=[.D2005]-[.D200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B2004]+7" office:value-type="float" office:value="14028" calcext:value-type="float">
            <text:p>14028</text:p>
          </table:table-cell>
          <table:table-cell office:value-type="float" office:value="8640000" calcext:value-type="float">
            <text:p>8640000</text:p>
          </table:table-cell>
          <table:table-cell table:formula="of:=[.B2005]/[.C2005]" office:value-type="float" office:value="0.00162361111111111" calcext:value-type="float">
            <text:p>0,00162361111111111000</text:p>
          </table:table-cell>
          <table:table-cell table:formula="of:=[.D2006]-[.D200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.B2005]+7" office:value-type="float" office:value="14035" calcext:value-type="float">
            <text:p>14035</text:p>
          </table:table-cell>
          <table:table-cell office:value-type="float" office:value="8640000" calcext:value-type="float">
            <text:p>8640000</text:p>
          </table:table-cell>
          <table:table-cell table:formula="of:=[.B2006]/[.C2006]" office:value-type="float" office:value="0.0016244212962963" calcext:value-type="float">
            <text:p>0,00162442129629630000</text:p>
          </table:table-cell>
          <table:table-cell table:formula="of:=[.D2007]-[.D200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.B2006]+7" office:value-type="float" office:value="14042" calcext:value-type="float">
            <text:p>14042</text:p>
          </table:table-cell>
          <table:table-cell office:value-type="float" office:value="8640000" calcext:value-type="float">
            <text:p>8640000</text:p>
          </table:table-cell>
          <table:table-cell table:formula="of:=[.B2007]/[.C2007]" office:value-type="float" office:value="0.00162523148148148" calcext:value-type="float">
            <text:p>0,00162523148148148000</text:p>
          </table:table-cell>
          <table:table-cell table:formula="of:=[.D2008]-[.D200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B2007]+7" office:value-type="float" office:value="14049" calcext:value-type="float">
            <text:p>14049</text:p>
          </table:table-cell>
          <table:table-cell office:value-type="float" office:value="8640000" calcext:value-type="float">
            <text:p>8640000</text:p>
          </table:table-cell>
          <table:table-cell table:formula="of:=[.B2008]/[.C2008]" office:value-type="float" office:value="0.00162604166666667" calcext:value-type="float">
            <text:p>0,00162604166666667000</text:p>
          </table:table-cell>
          <table:table-cell table:formula="of:=[.D2009]-[.D200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B2008]+7" office:value-type="float" office:value="14056" calcext:value-type="float">
            <text:p>14056</text:p>
          </table:table-cell>
          <table:table-cell office:value-type="float" office:value="8640000" calcext:value-type="float">
            <text:p>8640000</text:p>
          </table:table-cell>
          <table:table-cell table:formula="of:=[.B2009]/[.C2009]" office:value-type="float" office:value="0.00162685185185185" calcext:value-type="float">
            <text:p>0,00162685185185185000</text:p>
          </table:table-cell>
          <table:table-cell table:formula="of:=[.D2010]-[.D200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B2009]+7" office:value-type="float" office:value="14063" calcext:value-type="float">
            <text:p>14063</text:p>
          </table:table-cell>
          <table:table-cell office:value-type="float" office:value="8640000" calcext:value-type="float">
            <text:p>8640000</text:p>
          </table:table-cell>
          <table:table-cell table:formula="of:=[.B2010]/[.C2010]" office:value-type="float" office:value="0.00162766203703704" calcext:value-type="float">
            <text:p>0,00162766203703704000</text:p>
          </table:table-cell>
          <table:table-cell table:formula="of:=[.D2011]-[.D201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B2010]+7" office:value-type="float" office:value="14070" calcext:value-type="float">
            <text:p>14070</text:p>
          </table:table-cell>
          <table:table-cell office:value-type="float" office:value="8640000" calcext:value-type="float">
            <text:p>8640000</text:p>
          </table:table-cell>
          <table:table-cell table:formula="of:=[.B2011]/[.C2011]" office:value-type="float" office:value="0.00162847222222222" calcext:value-type="float">
            <text:p>0,00162847222222222000</text:p>
          </table:table-cell>
          <table:table-cell table:formula="of:=[.D2012]-[.D201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B2011]+7" office:value-type="float" office:value="14077" calcext:value-type="float">
            <text:p>14077</text:p>
          </table:table-cell>
          <table:table-cell office:value-type="float" office:value="8640000" calcext:value-type="float">
            <text:p>8640000</text:p>
          </table:table-cell>
          <table:table-cell table:formula="of:=[.B2012]/[.C2012]" office:value-type="float" office:value="0.00162928240740741" calcext:value-type="float">
            <text:p>0,00162928240740741000</text:p>
          </table:table-cell>
          <table:table-cell table:formula="of:=[.D2013]-[.D201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B2012]+7" office:value-type="float" office:value="14084" calcext:value-type="float">
            <text:p>14084</text:p>
          </table:table-cell>
          <table:table-cell office:value-type="float" office:value="8640000" calcext:value-type="float">
            <text:p>8640000</text:p>
          </table:table-cell>
          <table:table-cell table:formula="of:=[.B2013]/[.C2013]" office:value-type="float" office:value="0.00163009259259259" calcext:value-type="float">
            <text:p>0,00163009259259259000</text:p>
          </table:table-cell>
          <table:table-cell table:formula="of:=[.D2014]-[.D201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B2013]+7" office:value-type="float" office:value="14091" calcext:value-type="float">
            <text:p>14091</text:p>
          </table:table-cell>
          <table:table-cell office:value-type="float" office:value="8640000" calcext:value-type="float">
            <text:p>8640000</text:p>
          </table:table-cell>
          <table:table-cell table:formula="of:=[.B2014]/[.C2014]" office:value-type="float" office:value="0.00163090277777778" calcext:value-type="float">
            <text:p>0,00163090277777778000</text:p>
          </table:table-cell>
          <table:table-cell table:formula="of:=[.D2015]-[.D201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B2014]+7" office:value-type="float" office:value="14098" calcext:value-type="float">
            <text:p>14098</text:p>
          </table:table-cell>
          <table:table-cell office:value-type="float" office:value="8640000" calcext:value-type="float">
            <text:p>8640000</text:p>
          </table:table-cell>
          <table:table-cell table:formula="of:=[.B2015]/[.C2015]" office:value-type="float" office:value="0.00163171296296296" calcext:value-type="float">
            <text:p>0,00163171296296296000</text:p>
          </table:table-cell>
          <table:table-cell table:formula="of:=[.D2016]-[.D201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B2015]+7" office:value-type="float" office:value="14105" calcext:value-type="float">
            <text:p>14105</text:p>
          </table:table-cell>
          <table:table-cell office:value-type="float" office:value="8640000" calcext:value-type="float">
            <text:p>8640000</text:p>
          </table:table-cell>
          <table:table-cell table:formula="of:=[.B2016]/[.C2016]" office:value-type="float" office:value="0.00163252314814815" calcext:value-type="float">
            <text:p>0,00163252314814815000</text:p>
          </table:table-cell>
          <table:table-cell table:formula="of:=[.D2017]-[.D201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B2016]+7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2017]/[.C2017]" office:value-type="float" office:value="0.00163333333333333" calcext:value-type="float">
            <text:p>0,00163333333333333000</text:p>
          </table:table-cell>
          <table:table-cell table:formula="of:=[.D2018]-[.D201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B2017]+7" office:value-type="float" office:value="14119" calcext:value-type="float">
            <text:p>14119</text:p>
          </table:table-cell>
          <table:table-cell office:value-type="float" office:value="8640000" calcext:value-type="float">
            <text:p>8640000</text:p>
          </table:table-cell>
          <table:table-cell table:formula="of:=[.B2018]/[.C2018]" office:value-type="float" office:value="0.00163414351851852" calcext:value-type="float">
            <text:p>0,00163414351851852000</text:p>
          </table:table-cell>
          <table:table-cell table:formula="of:=[.D2019]-[.D201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.B2018]+7" office:value-type="float" office:value="14126" calcext:value-type="float">
            <text:p>14126</text:p>
          </table:table-cell>
          <table:table-cell office:value-type="float" office:value="8640000" calcext:value-type="float">
            <text:p>8640000</text:p>
          </table:table-cell>
          <table:table-cell table:formula="of:=[.B2019]/[.C2019]" office:value-type="float" office:value="0.0016349537037037" calcext:value-type="float">
            <text:p>0,00163495370370370000</text:p>
          </table:table-cell>
          <table:table-cell table:formula="of:=[.D2020]-[.D201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B2019]+7" office:value-type="float" office:value="14133" calcext:value-type="float">
            <text:p>14133</text:p>
          </table:table-cell>
          <table:table-cell office:value-type="float" office:value="8640000" calcext:value-type="float">
            <text:p>8640000</text:p>
          </table:table-cell>
          <table:table-cell table:formula="of:=[.B2020]/[.C2020]" office:value-type="float" office:value="0.00163576388888889" calcext:value-type="float">
            <text:p>0,00163576388888889000</text:p>
          </table:table-cell>
          <table:table-cell table:formula="of:=[.D2021]-[.D202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[.B2020]+7" office:value-type="float" office:value="14140" calcext:value-type="float">
            <text:p>14140</text:p>
          </table:table-cell>
          <table:table-cell office:value-type="float" office:value="8640000" calcext:value-type="float">
            <text:p>8640000</text:p>
          </table:table-cell>
          <table:table-cell table:formula="of:=[.B2021]/[.C2021]" office:value-type="float" office:value="0.00163657407407407" calcext:value-type="float">
            <text:p>0,00163657407407407000</text:p>
          </table:table-cell>
          <table:table-cell table:formula="of:=[.D2022]-[.D202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[.B2021]+7" office:value-type="float" office:value="14147" calcext:value-type="float">
            <text:p>14147</text:p>
          </table:table-cell>
          <table:table-cell office:value-type="float" office:value="8640000" calcext:value-type="float">
            <text:p>8640000</text:p>
          </table:table-cell>
          <table:table-cell table:formula="of:=[.B2022]/[.C2022]" office:value-type="float" office:value="0.00163738425925926" calcext:value-type="float">
            <text:p>0,00163738425925926000</text:p>
          </table:table-cell>
          <table:table-cell table:formula="of:=[.D2023]-[.D202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[.B2022]+7" office:value-type="float" office:value="14154" calcext:value-type="float">
            <text:p>14154</text:p>
          </table:table-cell>
          <table:table-cell office:value-type="float" office:value="8640000" calcext:value-type="float">
            <text:p>8640000</text:p>
          </table:table-cell>
          <table:table-cell table:formula="of:=[.B2023]/[.C2023]" office:value-type="float" office:value="0.00163819444444444" calcext:value-type="float">
            <text:p>0,00163819444444444000</text:p>
          </table:table-cell>
          <table:table-cell table:formula="of:=[.D2024]-[.D202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[.B2023]+7" office:value-type="float" office:value="14161" calcext:value-type="float">
            <text:p>14161</text:p>
          </table:table-cell>
          <table:table-cell office:value-type="float" office:value="8640000" calcext:value-type="float">
            <text:p>8640000</text:p>
          </table:table-cell>
          <table:table-cell table:formula="of:=[.B2024]/[.C2024]" office:value-type="float" office:value="0.00163900462962963" calcext:value-type="float">
            <text:p>0,00163900462962963000</text:p>
          </table:table-cell>
          <table:table-cell table:formula="of:=[.D2025]-[.D202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[.B2024]+7" office:value-type="float" office:value="14168" calcext:value-type="float">
            <text:p>14168</text:p>
          </table:table-cell>
          <table:table-cell office:value-type="float" office:value="8640000" calcext:value-type="float">
            <text:p>8640000</text:p>
          </table:table-cell>
          <table:table-cell table:formula="of:=[.B2025]/[.C2025]" office:value-type="float" office:value="0.00163981481481481" calcext:value-type="float">
            <text:p>0,00163981481481481000</text:p>
          </table:table-cell>
          <table:table-cell table:formula="of:=[.D2026]-[.D202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[.B2025]+7" office:value-type="float" office:value="14175" calcext:value-type="float">
            <text:p>14175</text:p>
          </table:table-cell>
          <table:table-cell office:value-type="float" office:value="8640000" calcext:value-type="float">
            <text:p>8640000</text:p>
          </table:table-cell>
          <table:table-cell table:formula="of:=[.B2026]/[.C2026]" office:value-type="float" office:value="0.001640625" calcext:value-type="float">
            <text:p>0,00164062500000000000</text:p>
          </table:table-cell>
          <table:table-cell table:formula="of:=[.D2027]-[.D202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[.B2026]+7" office:value-type="float" office:value="14182" calcext:value-type="float">
            <text:p>14182</text:p>
          </table:table-cell>
          <table:table-cell office:value-type="float" office:value="8640000" calcext:value-type="float">
            <text:p>8640000</text:p>
          </table:table-cell>
          <table:table-cell table:formula="of:=[.B2027]/[.C2027]" office:value-type="float" office:value="0.00164143518518519" calcext:value-type="float">
            <text:p>0,00164143518518519000</text:p>
          </table:table-cell>
          <table:table-cell table:formula="of:=[.D2028]-[.D202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[.B2027]+7" office:value-type="float" office:value="14189" calcext:value-type="float">
            <text:p>14189</text:p>
          </table:table-cell>
          <table:table-cell office:value-type="float" office:value="8640000" calcext:value-type="float">
            <text:p>8640000</text:p>
          </table:table-cell>
          <table:table-cell table:formula="of:=[.B2028]/[.C2028]" office:value-type="float" office:value="0.00164224537037037" calcext:value-type="float">
            <text:p>0,00164224537037037000</text:p>
          </table:table-cell>
          <table:table-cell table:formula="of:=[.D2029]-[.D202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[.B2028]+7" office:value-type="float" office:value="14196" calcext:value-type="float">
            <text:p>14196</text:p>
          </table:table-cell>
          <table:table-cell office:value-type="float" office:value="8640000" calcext:value-type="float">
            <text:p>8640000</text:p>
          </table:table-cell>
          <table:table-cell table:formula="of:=[.B2029]/[.C2029]" office:value-type="float" office:value="0.00164305555555556" calcext:value-type="float">
            <text:p>0,00164305555555556000</text:p>
          </table:table-cell>
          <table:table-cell table:formula="of:=[.D2030]-[.D202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[.B2029]+7" office:value-type="float" office:value="14203" calcext:value-type="float">
            <text:p>14203</text:p>
          </table:table-cell>
          <table:table-cell office:value-type="float" office:value="8640000" calcext:value-type="float">
            <text:p>8640000</text:p>
          </table:table-cell>
          <table:table-cell table:formula="of:=[.B2030]/[.C2030]" office:value-type="float" office:value="0.00164386574074074" calcext:value-type="float">
            <text:p>0,00164386574074074000</text:p>
          </table:table-cell>
          <table:table-cell table:formula="of:=[.D2031]-[.D203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[.B2030]+7" office:value-type="float" office:value="14210" calcext:value-type="float">
            <text:p>14210</text:p>
          </table:table-cell>
          <table:table-cell office:value-type="float" office:value="8640000" calcext:value-type="float">
            <text:p>8640000</text:p>
          </table:table-cell>
          <table:table-cell table:formula="of:=[.B2031]/[.C2031]" office:value-type="float" office:value="0.00164467592592593" calcext:value-type="float">
            <text:p>0,00164467592592593000</text:p>
          </table:table-cell>
          <table:table-cell table:formula="of:=[.D2032]-[.D203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[.B2031]+7" office:value-type="float" office:value="14217" calcext:value-type="float">
            <text:p>14217</text:p>
          </table:table-cell>
          <table:table-cell office:value-type="float" office:value="8640000" calcext:value-type="float">
            <text:p>8640000</text:p>
          </table:table-cell>
          <table:table-cell table:formula="of:=[.B2032]/[.C2032]" office:value-type="float" office:value="0.00164548611111111" calcext:value-type="float">
            <text:p>0,00164548611111111000</text:p>
          </table:table-cell>
          <table:table-cell table:formula="of:=[.D2033]-[.D203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[.B2032]+7" office:value-type="float" office:value="14224" calcext:value-type="float">
            <text:p>14224</text:p>
          </table:table-cell>
          <table:table-cell office:value-type="float" office:value="8640000" calcext:value-type="float">
            <text:p>8640000</text:p>
          </table:table-cell>
          <table:table-cell table:formula="of:=[.B2033]/[.C2033]" office:value-type="float" office:value="0.0016462962962963" calcext:value-type="float">
            <text:p>0,00164629629629630000</text:p>
          </table:table-cell>
          <table:table-cell table:formula="of:=[.D2034]-[.D203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[.B2033]+7" office:value-type="float" office:value="14231" calcext:value-type="float">
            <text:p>14231</text:p>
          </table:table-cell>
          <table:table-cell office:value-type="float" office:value="8640000" calcext:value-type="float">
            <text:p>8640000</text:p>
          </table:table-cell>
          <table:table-cell table:formula="of:=[.B2034]/[.C2034]" office:value-type="float" office:value="0.00164710648148148" calcext:value-type="float">
            <text:p>0,00164710648148148000</text:p>
          </table:table-cell>
          <table:table-cell table:formula="of:=[.D2035]-[.D203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[.B2034]+7" office:value-type="float" office:value="14238" calcext:value-type="float">
            <text:p>14238</text:p>
          </table:table-cell>
          <table:table-cell office:value-type="float" office:value="8640000" calcext:value-type="float">
            <text:p>8640000</text:p>
          </table:table-cell>
          <table:table-cell table:formula="of:=[.B2035]/[.C2035]" office:value-type="float" office:value="0.00164791666666667" calcext:value-type="float">
            <text:p>0,00164791666666667000</text:p>
          </table:table-cell>
          <table:table-cell table:formula="of:=[.D2036]-[.D203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[.B2035]+7" office:value-type="float" office:value="14245" calcext:value-type="float">
            <text:p>14245</text:p>
          </table:table-cell>
          <table:table-cell office:value-type="float" office:value="8640000" calcext:value-type="float">
            <text:p>8640000</text:p>
          </table:table-cell>
          <table:table-cell table:formula="of:=[.B2036]/[.C2036]" office:value-type="float" office:value="0.00164872685185185" calcext:value-type="float">
            <text:p>0,00164872685185185000</text:p>
          </table:table-cell>
          <table:table-cell table:formula="of:=[.D2037]-[.D203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[.B2036]+7" office:value-type="float" office:value="14252" calcext:value-type="float">
            <text:p>14252</text:p>
          </table:table-cell>
          <table:table-cell office:value-type="float" office:value="8640000" calcext:value-type="float">
            <text:p>8640000</text:p>
          </table:table-cell>
          <table:table-cell table:formula="of:=[.B2037]/[.C2037]" office:value-type="float" office:value="0.00164953703703704" calcext:value-type="float">
            <text:p>0,00164953703703704000</text:p>
          </table:table-cell>
          <table:table-cell table:formula="of:=[.D2038]-[.D203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[.B2037]+7" office:value-type="float" office:value="14259" calcext:value-type="float">
            <text:p>14259</text:p>
          </table:table-cell>
          <table:table-cell office:value-type="float" office:value="8640000" calcext:value-type="float">
            <text:p>8640000</text:p>
          </table:table-cell>
          <table:table-cell table:formula="of:=[.B2038]/[.C2038]" office:value-type="float" office:value="0.00165034722222222" calcext:value-type="float">
            <text:p>0,00165034722222222000</text:p>
          </table:table-cell>
          <table:table-cell table:formula="of:=[.D2039]-[.D203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[.B2038]+7" office:value-type="float" office:value="14266" calcext:value-type="float">
            <text:p>14266</text:p>
          </table:table-cell>
          <table:table-cell office:value-type="float" office:value="8640000" calcext:value-type="float">
            <text:p>8640000</text:p>
          </table:table-cell>
          <table:table-cell table:formula="of:=[.B2039]/[.C2039]" office:value-type="float" office:value="0.00165115740740741" calcext:value-type="float">
            <text:p>0,00165115740740741000</text:p>
          </table:table-cell>
          <table:table-cell table:formula="of:=[.D2040]-[.D203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[.B2039]+7" office:value-type="float" office:value="14273" calcext:value-type="float">
            <text:p>14273</text:p>
          </table:table-cell>
          <table:table-cell office:value-type="float" office:value="8640000" calcext:value-type="float">
            <text:p>8640000</text:p>
          </table:table-cell>
          <table:table-cell table:formula="of:=[.B2040]/[.C2040]" office:value-type="float" office:value="0.00165196759259259" calcext:value-type="float">
            <text:p>0,00165196759259259000</text:p>
          </table:table-cell>
          <table:table-cell table:formula="of:=[.D2041]-[.D204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[.B2040]+7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2041]/[.C2041]" office:value-type="float" office:value="0.00165277777777778" calcext:value-type="float">
            <text:p>0,00165277777777778000</text:p>
          </table:table-cell>
          <table:table-cell table:formula="of:=[.D2042]-[.D204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[.B2041]+7" office:value-type="float" office:value="14287" calcext:value-type="float">
            <text:p>14287</text:p>
          </table:table-cell>
          <table:table-cell office:value-type="float" office:value="8640000" calcext:value-type="float">
            <text:p>8640000</text:p>
          </table:table-cell>
          <table:table-cell table:formula="of:=[.B2042]/[.C2042]" office:value-type="float" office:value="0.00165358796296296" calcext:value-type="float">
            <text:p>0,00165358796296296000</text:p>
          </table:table-cell>
          <table:table-cell table:formula="of:=[.D2043]-[.D204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[.B2042]+7" office:value-type="float" office:value="14294" calcext:value-type="float">
            <text:p>14294</text:p>
          </table:table-cell>
          <table:table-cell office:value-type="float" office:value="8640000" calcext:value-type="float">
            <text:p>8640000</text:p>
          </table:table-cell>
          <table:table-cell table:formula="of:=[.B2043]/[.C2043]" office:value-type="float" office:value="0.00165439814814815" calcext:value-type="float">
            <text:p>0,00165439814814815000</text:p>
          </table:table-cell>
          <table:table-cell table:formula="of:=[.D2044]-[.D204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[.B2043]+7" office:value-type="float" office:value="14301" calcext:value-type="float">
            <text:p>14301</text:p>
          </table:table-cell>
          <table:table-cell office:value-type="float" office:value="8640000" calcext:value-type="float">
            <text:p>8640000</text:p>
          </table:table-cell>
          <table:table-cell table:formula="of:=[.B2044]/[.C2044]" office:value-type="float" office:value="0.00165520833333333" calcext:value-type="float">
            <text:p>0,00165520833333333000</text:p>
          </table:table-cell>
          <table:table-cell table:formula="of:=[.D2045]-[.D204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[.B2044]+7" office:value-type="float" office:value="14308" calcext:value-type="float">
            <text:p>14308</text:p>
          </table:table-cell>
          <table:table-cell office:value-type="float" office:value="8640000" calcext:value-type="float">
            <text:p>8640000</text:p>
          </table:table-cell>
          <table:table-cell table:formula="of:=[.B2045]/[.C2045]" office:value-type="float" office:value="0.00165601851851852" calcext:value-type="float">
            <text:p>0,00165601851851852000</text:p>
          </table:table-cell>
          <table:table-cell table:formula="of:=[.D2046]-[.D204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[.B2045]+7" office:value-type="float" office:value="14315" calcext:value-type="float">
            <text:p>14315</text:p>
          </table:table-cell>
          <table:table-cell office:value-type="float" office:value="8640000" calcext:value-type="float">
            <text:p>8640000</text:p>
          </table:table-cell>
          <table:table-cell table:formula="of:=[.B2046]/[.C2046]" office:value-type="float" office:value="0.0016568287037037" calcext:value-type="float">
            <text:p>0,00165682870370370000</text:p>
          </table:table-cell>
          <table:table-cell table:formula="of:=[.D2047]-[.D204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[.B2046]+7" office:value-type="float" office:value="14322" calcext:value-type="float">
            <text:p>14322</text:p>
          </table:table-cell>
          <table:table-cell office:value-type="float" office:value="8640000" calcext:value-type="float">
            <text:p>8640000</text:p>
          </table:table-cell>
          <table:table-cell table:formula="of:=[.B2047]/[.C2047]" office:value-type="float" office:value="0.00165763888888889" calcext:value-type="float">
            <text:p>0,00165763888888889000</text:p>
          </table:table-cell>
          <table:table-cell table:formula="of:=[.D2048]-[.D204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[.B2047]+7" office:value-type="float" office:value="14329" calcext:value-type="float">
            <text:p>14329</text:p>
          </table:table-cell>
          <table:table-cell office:value-type="float" office:value="8640000" calcext:value-type="float">
            <text:p>8640000</text:p>
          </table:table-cell>
          <table:table-cell table:formula="of:=[.B2048]/[.C2048]" office:value-type="float" office:value="0.00165844907407407" calcext:value-type="float">
            <text:p>0,00165844907407407000</text:p>
          </table:table-cell>
          <table:table-cell table:formula="of:=[.D2049]-[.D204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B2048]+7" office:value-type="float" office:value="14336" calcext:value-type="float">
            <text:p>14336</text:p>
          </table:table-cell>
          <table:table-cell office:value-type="float" office:value="8640000" calcext:value-type="float">
            <text:p>8640000</text:p>
          </table:table-cell>
          <table:table-cell table:formula="of:=[.B2049]/[.C2049]" office:value-type="float" office:value="0.00165925925925926" calcext:value-type="float">
            <text:p>0,00165925925925926000</text:p>
          </table:table-cell>
          <table:table-cell table:formula="of:=[.D2050]-[.D204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[.B2049]+7" office:value-type="float" office:value="14343" calcext:value-type="float">
            <text:p>14343</text:p>
          </table:table-cell>
          <table:table-cell office:value-type="float" office:value="8640000" calcext:value-type="float">
            <text:p>8640000</text:p>
          </table:table-cell>
          <table:table-cell table:formula="of:=[.B2050]/[.C2050]" office:value-type="float" office:value="0.00166006944444444" calcext:value-type="float">
            <text:p>0,00166006944444444000</text:p>
          </table:table-cell>
          <table:table-cell table:formula="of:=[.D2051]-[.D205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[.B2050]+7" office:value-type="float" office:value="14350" calcext:value-type="float">
            <text:p>14350</text:p>
          </table:table-cell>
          <table:table-cell office:value-type="float" office:value="8640000" calcext:value-type="float">
            <text:p>8640000</text:p>
          </table:table-cell>
          <table:table-cell table:formula="of:=[.B2051]/[.C2051]" office:value-type="float" office:value="0.00166087962962963" calcext:value-type="float">
            <text:p>0,00166087962962963000</text:p>
          </table:table-cell>
          <table:table-cell table:formula="of:=[.D2052]-[.D205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[.B2051]+7" office:value-type="float" office:value="14357" calcext:value-type="float">
            <text:p>14357</text:p>
          </table:table-cell>
          <table:table-cell office:value-type="float" office:value="8640000" calcext:value-type="float">
            <text:p>8640000</text:p>
          </table:table-cell>
          <table:table-cell table:formula="of:=[.B2052]/[.C2052]" office:value-type="float" office:value="0.00166168981481481" calcext:value-type="float">
            <text:p>0,00166168981481481000</text:p>
          </table:table-cell>
          <table:table-cell table:formula="of:=[.D2053]-[.D205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[.B2052]+7" office:value-type="float" office:value="14364" calcext:value-type="float">
            <text:p>14364</text:p>
          </table:table-cell>
          <table:table-cell office:value-type="float" office:value="8640000" calcext:value-type="float">
            <text:p>8640000</text:p>
          </table:table-cell>
          <table:table-cell table:formula="of:=[.B2053]/[.C2053]" office:value-type="float" office:value="0.0016625" calcext:value-type="float">
            <text:p>0,00166250000000000000</text:p>
          </table:table-cell>
          <table:table-cell table:formula="of:=[.D2054]-[.D205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[.B2053]+7" office:value-type="float" office:value="14371" calcext:value-type="float">
            <text:p>14371</text:p>
          </table:table-cell>
          <table:table-cell office:value-type="float" office:value="8640000" calcext:value-type="float">
            <text:p>8640000</text:p>
          </table:table-cell>
          <table:table-cell table:formula="of:=[.B2054]/[.C2054]" office:value-type="float" office:value="0.00166331018518519" calcext:value-type="float">
            <text:p>0,00166331018518519000</text:p>
          </table:table-cell>
          <table:table-cell table:formula="of:=[.D2055]-[.D205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[.B2054]+7" office:value-type="float" office:value="14378" calcext:value-type="float">
            <text:p>14378</text:p>
          </table:table-cell>
          <table:table-cell office:value-type="float" office:value="8640000" calcext:value-type="float">
            <text:p>8640000</text:p>
          </table:table-cell>
          <table:table-cell table:formula="of:=[.B2055]/[.C2055]" office:value-type="float" office:value="0.00166412037037037" calcext:value-type="float">
            <text:p>0,00166412037037037000</text:p>
          </table:table-cell>
          <table:table-cell table:formula="of:=[.D2056]-[.D205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[.B2055]+7" office:value-type="float" office:value="14385" calcext:value-type="float">
            <text:p>14385</text:p>
          </table:table-cell>
          <table:table-cell office:value-type="float" office:value="8640000" calcext:value-type="float">
            <text:p>8640000</text:p>
          </table:table-cell>
          <table:table-cell table:formula="of:=[.B2056]/[.C2056]" office:value-type="float" office:value="0.00166493055555556" calcext:value-type="float">
            <text:p>0,00166493055555556000</text:p>
          </table:table-cell>
          <table:table-cell table:formula="of:=[.D2057]-[.D205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B2056]+7" office:value-type="float" office:value="14392" calcext:value-type="float">
            <text:p>14392</text:p>
          </table:table-cell>
          <table:table-cell office:value-type="float" office:value="8640000" calcext:value-type="float">
            <text:p>8640000</text:p>
          </table:table-cell>
          <table:table-cell table:formula="of:=[.B2057]/[.C2057]" office:value-type="float" office:value="0.00166574074074074" calcext:value-type="float">
            <text:p>0,00166574074074074000</text:p>
          </table:table-cell>
          <table:table-cell table:formula="of:=[.D2058]-[.D205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[.B2057]+7" office:value-type="float" office:value="14399" calcext:value-type="float">
            <text:p>14399</text:p>
          </table:table-cell>
          <table:table-cell office:value-type="float" office:value="8640000" calcext:value-type="float">
            <text:p>8640000</text:p>
          </table:table-cell>
          <table:table-cell table:formula="of:=[.B2058]/[.C2058]" office:value-type="float" office:value="0.00166655092592593" calcext:value-type="float">
            <text:p>0,00166655092592593000</text:p>
          </table:table-cell>
          <table:table-cell table:formula="of:=[.D2059]-[.D205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B2058]+7" office:value-type="float" office:value="14406" calcext:value-type="float">
            <text:p>14406</text:p>
          </table:table-cell>
          <table:table-cell office:value-type="float" office:value="8640000" calcext:value-type="float">
            <text:p>8640000</text:p>
          </table:table-cell>
          <table:table-cell table:formula="of:=[.B2059]/[.C2059]" office:value-type="float" office:value="0.00166736111111111" calcext:value-type="float">
            <text:p>0,00166736111111111000</text:p>
          </table:table-cell>
          <table:table-cell table:formula="of:=[.D2060]-[.D205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B2059]+7" office:value-type="float" office:value="14413" calcext:value-type="float">
            <text:p>14413</text:p>
          </table:table-cell>
          <table:table-cell office:value-type="float" office:value="8640000" calcext:value-type="float">
            <text:p>8640000</text:p>
          </table:table-cell>
          <table:table-cell table:formula="of:=[.B2060]/[.C2060]" office:value-type="float" office:value="0.0016681712962963" calcext:value-type="float">
            <text:p>0,00166817129629630000</text:p>
          </table:table-cell>
          <table:table-cell table:formula="of:=[.D2061]-[.D206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B2060]+7" office:value-type="float" office:value="14420" calcext:value-type="float">
            <text:p>14420</text:p>
          </table:table-cell>
          <table:table-cell office:value-type="float" office:value="8640000" calcext:value-type="float">
            <text:p>8640000</text:p>
          </table:table-cell>
          <table:table-cell table:formula="of:=[.B2061]/[.C2061]" office:value-type="float" office:value="0.00166898148148148" calcext:value-type="float">
            <text:p>0,00166898148148148000</text:p>
          </table:table-cell>
          <table:table-cell table:formula="of:=[.D2062]-[.D206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B2061]+7" office:value-type="float" office:value="14427" calcext:value-type="float">
            <text:p>14427</text:p>
          </table:table-cell>
          <table:table-cell office:value-type="float" office:value="8640000" calcext:value-type="float">
            <text:p>8640000</text:p>
          </table:table-cell>
          <table:table-cell table:formula="of:=[.B2062]/[.C2062]" office:value-type="float" office:value="0.00166979166666667" calcext:value-type="float">
            <text:p>0,00166979166666667000</text:p>
          </table:table-cell>
          <table:table-cell table:formula="of:=[.D2063]-[.D206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B2062]+7" office:value-type="float" office:value="14434" calcext:value-type="float">
            <text:p>14434</text:p>
          </table:table-cell>
          <table:table-cell office:value-type="float" office:value="8640000" calcext:value-type="float">
            <text:p>8640000</text:p>
          </table:table-cell>
          <table:table-cell table:formula="of:=[.B2063]/[.C2063]" office:value-type="float" office:value="0.00167060185185185" calcext:value-type="float">
            <text:p>0,00167060185185185000</text:p>
          </table:table-cell>
          <table:table-cell table:formula="of:=[.D2064]-[.D206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B2063]+7" office:value-type="float" office:value="14441" calcext:value-type="float">
            <text:p>14441</text:p>
          </table:table-cell>
          <table:table-cell office:value-type="float" office:value="8640000" calcext:value-type="float">
            <text:p>8640000</text:p>
          </table:table-cell>
          <table:table-cell table:formula="of:=[.B2064]/[.C2064]" office:value-type="float" office:value="0.00167141203703704" calcext:value-type="float">
            <text:p>0,00167141203703704000</text:p>
          </table:table-cell>
          <table:table-cell table:formula="of:=[.D2065]-[.D206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B2064]+7" office:value-type="float" office:value="14448" calcext:value-type="float">
            <text:p>14448</text:p>
          </table:table-cell>
          <table:table-cell office:value-type="float" office:value="8640000" calcext:value-type="float">
            <text:p>8640000</text:p>
          </table:table-cell>
          <table:table-cell table:formula="of:=[.B2065]/[.C2065]" office:value-type="float" office:value="0.00167222222222222" calcext:value-type="float">
            <text:p>0,00167222222222222000</text:p>
          </table:table-cell>
          <table:table-cell table:formula="of:=[.D2066]-[.D206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B2065]+7" office:value-type="float" office:value="14455" calcext:value-type="float">
            <text:p>14455</text:p>
          </table:table-cell>
          <table:table-cell office:value-type="float" office:value="8640000" calcext:value-type="float">
            <text:p>8640000</text:p>
          </table:table-cell>
          <table:table-cell table:formula="of:=[.B2066]/[.C2066]" office:value-type="float" office:value="0.00167303240740741" calcext:value-type="float">
            <text:p>0,00167303240740741000</text:p>
          </table:table-cell>
          <table:table-cell table:formula="of:=[.D2067]-[.D206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B2066]+7" office:value-type="float" office:value="14462" calcext:value-type="float">
            <text:p>14462</text:p>
          </table:table-cell>
          <table:table-cell office:value-type="float" office:value="8640000" calcext:value-type="float">
            <text:p>8640000</text:p>
          </table:table-cell>
          <table:table-cell table:formula="of:=[.B2067]/[.C2067]" office:value-type="float" office:value="0.00167384259259259" calcext:value-type="float">
            <text:p>0,00167384259259259000</text:p>
          </table:table-cell>
          <table:table-cell table:formula="of:=[.D2068]-[.D206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B2067]+7" office:value-type="float" office:value="14469" calcext:value-type="float">
            <text:p>14469</text:p>
          </table:table-cell>
          <table:table-cell office:value-type="float" office:value="8640000" calcext:value-type="float">
            <text:p>8640000</text:p>
          </table:table-cell>
          <table:table-cell table:formula="of:=[.B2068]/[.C2068]" office:value-type="float" office:value="0.00167465277777778" calcext:value-type="float">
            <text:p>0,00167465277777778000</text:p>
          </table:table-cell>
          <table:table-cell table:formula="of:=[.D2069]-[.D206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B2068]+7" office:value-type="float" office:value="14476" calcext:value-type="float">
            <text:p>14476</text:p>
          </table:table-cell>
          <table:table-cell office:value-type="float" office:value="8640000" calcext:value-type="float">
            <text:p>8640000</text:p>
          </table:table-cell>
          <table:table-cell table:formula="of:=[.B2069]/[.C2069]" office:value-type="float" office:value="0.00167546296296296" calcext:value-type="float">
            <text:p>0,00167546296296296000</text:p>
          </table:table-cell>
          <table:table-cell table:formula="of:=[.D2070]-[.D206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B2069]+7" office:value-type="float" office:value="14483" calcext:value-type="float">
            <text:p>14483</text:p>
          </table:table-cell>
          <table:table-cell office:value-type="float" office:value="8640000" calcext:value-type="float">
            <text:p>8640000</text:p>
          </table:table-cell>
          <table:table-cell table:formula="of:=[.B2070]/[.C2070]" office:value-type="float" office:value="0.00167627314814815" calcext:value-type="float">
            <text:p>0,00167627314814815000</text:p>
          </table:table-cell>
          <table:table-cell table:formula="of:=[.D2071]-[.D207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B2070]+7" office:value-type="float" office:value="14490" calcext:value-type="float">
            <text:p>14490</text:p>
          </table:table-cell>
          <table:table-cell office:value-type="float" office:value="8640000" calcext:value-type="float">
            <text:p>8640000</text:p>
          </table:table-cell>
          <table:table-cell table:formula="of:=[.B2071]/[.C2071]" office:value-type="float" office:value="0.00167708333333333" calcext:value-type="float">
            <text:p>0,00167708333333333000</text:p>
          </table:table-cell>
          <table:table-cell table:formula="of:=[.D2072]-[.D207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B2071]+7" office:value-type="float" office:value="14497" calcext:value-type="float">
            <text:p>14497</text:p>
          </table:table-cell>
          <table:table-cell office:value-type="float" office:value="8640000" calcext:value-type="float">
            <text:p>8640000</text:p>
          </table:table-cell>
          <table:table-cell table:formula="of:=[.B2072]/[.C2072]" office:value-type="float" office:value="0.00167789351851852" calcext:value-type="float">
            <text:p>0,00167789351851852000</text:p>
          </table:table-cell>
          <table:table-cell table:formula="of:=[.D2073]-[.D207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B2072]+7" office:value-type="float" office:value="14504" calcext:value-type="float">
            <text:p>14504</text:p>
          </table:table-cell>
          <table:table-cell office:value-type="float" office:value="8640000" calcext:value-type="float">
            <text:p>8640000</text:p>
          </table:table-cell>
          <table:table-cell table:formula="of:=[.B2073]/[.C2073]" office:value-type="float" office:value="0.0016787037037037" calcext:value-type="float">
            <text:p>0,00167870370370370000</text:p>
          </table:table-cell>
          <table:table-cell table:formula="of:=[.D2074]-[.D207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B2073]+7" office:value-type="float" office:value="14511" calcext:value-type="float">
            <text:p>14511</text:p>
          </table:table-cell>
          <table:table-cell office:value-type="float" office:value="8640000" calcext:value-type="float">
            <text:p>8640000</text:p>
          </table:table-cell>
          <table:table-cell table:formula="of:=[.B2074]/[.C2074]" office:value-type="float" office:value="0.00167951388888889" calcext:value-type="float">
            <text:p>0,00167951388888889000</text:p>
          </table:table-cell>
          <table:table-cell table:formula="of:=[.D2075]-[.D207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B2074]+7" office:value-type="float" office:value="14518" calcext:value-type="float">
            <text:p>14518</text:p>
          </table:table-cell>
          <table:table-cell office:value-type="float" office:value="8640000" calcext:value-type="float">
            <text:p>8640000</text:p>
          </table:table-cell>
          <table:table-cell table:formula="of:=[.B2075]/[.C2075]" office:value-type="float" office:value="0.00168032407407407" calcext:value-type="float">
            <text:p>0,00168032407407407000</text:p>
          </table:table-cell>
          <table:table-cell table:formula="of:=[.D2076]-[.D207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B2075]+7" office:value-type="float" office:value="14525" calcext:value-type="float">
            <text:p>14525</text:p>
          </table:table-cell>
          <table:table-cell office:value-type="float" office:value="8640000" calcext:value-type="float">
            <text:p>8640000</text:p>
          </table:table-cell>
          <table:table-cell table:formula="of:=[.B2076]/[.C2076]" office:value-type="float" office:value="0.00168113425925926" calcext:value-type="float">
            <text:p>0,00168113425925926000</text:p>
          </table:table-cell>
          <table:table-cell table:formula="of:=[.D2077]-[.D207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B2076]+7" office:value-type="float" office:value="14532" calcext:value-type="float">
            <text:p>14532</text:p>
          </table:table-cell>
          <table:table-cell office:value-type="float" office:value="8640000" calcext:value-type="float">
            <text:p>8640000</text:p>
          </table:table-cell>
          <table:table-cell table:formula="of:=[.B2077]/[.C2077]" office:value-type="float" office:value="0.00168194444444444" calcext:value-type="float">
            <text:p>0,00168194444444444000</text:p>
          </table:table-cell>
          <table:table-cell table:formula="of:=[.D2078]-[.D207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[.B2077]+7" office:value-type="float" office:value="14539" calcext:value-type="float">
            <text:p>14539</text:p>
          </table:table-cell>
          <table:table-cell office:value-type="float" office:value="8640000" calcext:value-type="float">
            <text:p>8640000</text:p>
          </table:table-cell>
          <table:table-cell table:formula="of:=[.B2078]/[.C2078]" office:value-type="float" office:value="0.00168275462962963" calcext:value-type="float">
            <text:p>0,00168275462962963000</text:p>
          </table:table-cell>
          <table:table-cell table:formula="of:=[.D2079]-[.D207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[.B2078]+7" office:value-type="float" office:value="14546" calcext:value-type="float">
            <text:p>14546</text:p>
          </table:table-cell>
          <table:table-cell office:value-type="float" office:value="8640000" calcext:value-type="float">
            <text:p>8640000</text:p>
          </table:table-cell>
          <table:table-cell table:formula="of:=[.B2079]/[.C2079]" office:value-type="float" office:value="0.00168356481481481" calcext:value-type="float">
            <text:p>0,00168356481481481000</text:p>
          </table:table-cell>
          <table:table-cell table:formula="of:=[.D2080]-[.D207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[.B2079]+7" office:value-type="float" office:value="14553" calcext:value-type="float">
            <text:p>14553</text:p>
          </table:table-cell>
          <table:table-cell office:value-type="float" office:value="8640000" calcext:value-type="float">
            <text:p>8640000</text:p>
          </table:table-cell>
          <table:table-cell table:formula="of:=[.B2080]/[.C2080]" office:value-type="float" office:value="0.001684375" calcext:value-type="float">
            <text:p>0,00168437500000000000</text:p>
          </table:table-cell>
          <table:table-cell table:formula="of:=[.D2081]-[.D208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formula="of:=[.B2080]+7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2081]/[.C2081]" office:value-type="float" office:value="0.00168518518518519" calcext:value-type="float">
            <text:p>0,00168518518518519000</text:p>
          </table:table-cell>
          <table:table-cell table:formula="of:=[.D2082]-[.D208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[.B2081]+7" office:value-type="float" office:value="14567" calcext:value-type="float">
            <text:p>14567</text:p>
          </table:table-cell>
          <table:table-cell office:value-type="float" office:value="8640000" calcext:value-type="float">
            <text:p>8640000</text:p>
          </table:table-cell>
          <table:table-cell table:formula="of:=[.B2082]/[.C2082]" office:value-type="float" office:value="0.00168599537037037" calcext:value-type="float">
            <text:p>0,00168599537037037000</text:p>
          </table:table-cell>
          <table:table-cell table:formula="of:=[.D2083]-[.D208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[.B2082]+7" office:value-type="float" office:value="14574" calcext:value-type="float">
            <text:p>14574</text:p>
          </table:table-cell>
          <table:table-cell office:value-type="float" office:value="8640000" calcext:value-type="float">
            <text:p>8640000</text:p>
          </table:table-cell>
          <table:table-cell table:formula="of:=[.B2083]/[.C2083]" office:value-type="float" office:value="0.00168680555555556" calcext:value-type="float">
            <text:p>0,00168680555555556000</text:p>
          </table:table-cell>
          <table:table-cell table:formula="of:=[.D2084]-[.D208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table:formula="of:=[.B2083]+7" office:value-type="float" office:value="14581" calcext:value-type="float">
            <text:p>14581</text:p>
          </table:table-cell>
          <table:table-cell office:value-type="float" office:value="8640000" calcext:value-type="float">
            <text:p>8640000</text:p>
          </table:table-cell>
          <table:table-cell table:formula="of:=[.B2084]/[.C2084]" office:value-type="float" office:value="0.00168761574074074" calcext:value-type="float">
            <text:p>0,00168761574074074000</text:p>
          </table:table-cell>
          <table:table-cell table:formula="of:=[.D2085]-[.D208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[.B2084]+7" office:value-type="float" office:value="14588" calcext:value-type="float">
            <text:p>14588</text:p>
          </table:table-cell>
          <table:table-cell office:value-type="float" office:value="8640000" calcext:value-type="float">
            <text:p>8640000</text:p>
          </table:table-cell>
          <table:table-cell table:formula="of:=[.B2085]/[.C2085]" office:value-type="float" office:value="0.00168842592592593" calcext:value-type="float">
            <text:p>0,00168842592592593000</text:p>
          </table:table-cell>
          <table:table-cell table:formula="of:=[.D2086]-[.D208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[.B2085]+7" office:value-type="float" office:value="14595" calcext:value-type="float">
            <text:p>14595</text:p>
          </table:table-cell>
          <table:table-cell office:value-type="float" office:value="8640000" calcext:value-type="float">
            <text:p>8640000</text:p>
          </table:table-cell>
          <table:table-cell table:formula="of:=[.B2086]/[.C2086]" office:value-type="float" office:value="0.00168923611111111" calcext:value-type="float">
            <text:p>0,00168923611111111000</text:p>
          </table:table-cell>
          <table:table-cell table:formula="of:=[.D2087]-[.D208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[.B2086]+7" office:value-type="float" office:value="14602" calcext:value-type="float">
            <text:p>14602</text:p>
          </table:table-cell>
          <table:table-cell office:value-type="float" office:value="8640000" calcext:value-type="float">
            <text:p>8640000</text:p>
          </table:table-cell>
          <table:table-cell table:formula="of:=[.B2087]/[.C2087]" office:value-type="float" office:value="0.0016900462962963" calcext:value-type="float">
            <text:p>0,00169004629629630000</text:p>
          </table:table-cell>
          <table:table-cell table:formula="of:=[.D2088]-[.D208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[.B2087]+7" office:value-type="float" office:value="14609" calcext:value-type="float">
            <text:p>14609</text:p>
          </table:table-cell>
          <table:table-cell office:value-type="float" office:value="8640000" calcext:value-type="float">
            <text:p>8640000</text:p>
          </table:table-cell>
          <table:table-cell table:formula="of:=[.B2088]/[.C2088]" office:value-type="float" office:value="0.00169085648148148" calcext:value-type="float">
            <text:p>0,00169085648148148000</text:p>
          </table:table-cell>
          <table:table-cell table:formula="of:=[.D2089]-[.D208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[.B2088]+7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2089]/[.C2089]" office:value-type="float" office:value="0.00169166666666667" calcext:value-type="float">
            <text:p>0,00169166666666667000</text:p>
          </table:table-cell>
          <table:table-cell table:formula="of:=[.D2090]-[.D208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[.B2089]+7" office:value-type="float" office:value="14623" calcext:value-type="float">
            <text:p>14623</text:p>
          </table:table-cell>
          <table:table-cell office:value-type="float" office:value="8640000" calcext:value-type="float">
            <text:p>8640000</text:p>
          </table:table-cell>
          <table:table-cell table:formula="of:=[.B2090]/[.C2090]" office:value-type="float" office:value="0.00169247685185185" calcext:value-type="float">
            <text:p>0,00169247685185185000</text:p>
          </table:table-cell>
          <table:table-cell table:formula="of:=[.D2091]-[.D209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table:formula="of:=[.B2090]+7" office:value-type="float" office:value="14630" calcext:value-type="float">
            <text:p>14630</text:p>
          </table:table-cell>
          <table:table-cell office:value-type="float" office:value="8640000" calcext:value-type="float">
            <text:p>8640000</text:p>
          </table:table-cell>
          <table:table-cell table:formula="of:=[.B2091]/[.C2091]" office:value-type="float" office:value="0.00169328703703704" calcext:value-type="float">
            <text:p>0,00169328703703704000</text:p>
          </table:table-cell>
          <table:table-cell table:formula="of:=[.D2092]-[.D209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[.B2091]+7" office:value-type="float" office:value="14637" calcext:value-type="float">
            <text:p>14637</text:p>
          </table:table-cell>
          <table:table-cell office:value-type="float" office:value="8640000" calcext:value-type="float">
            <text:p>8640000</text:p>
          </table:table-cell>
          <table:table-cell table:formula="of:=[.B2092]/[.C2092]" office:value-type="float" office:value="0.00169409722222222" calcext:value-type="float">
            <text:p>0,00169409722222222000</text:p>
          </table:table-cell>
          <table:table-cell table:formula="of:=[.D2093]-[.D209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[.B2092]+7" office:value-type="float" office:value="14644" calcext:value-type="float">
            <text:p>14644</text:p>
          </table:table-cell>
          <table:table-cell office:value-type="float" office:value="8640000" calcext:value-type="float">
            <text:p>8640000</text:p>
          </table:table-cell>
          <table:table-cell table:formula="of:=[.B2093]/[.C2093]" office:value-type="float" office:value="0.00169490740740741" calcext:value-type="float">
            <text:p>0,00169490740740741000</text:p>
          </table:table-cell>
          <table:table-cell table:formula="of:=[.D2094]-[.D209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[.B2093]+7" office:value-type="float" office:value="14651" calcext:value-type="float">
            <text:p>14651</text:p>
          </table:table-cell>
          <table:table-cell office:value-type="float" office:value="8640000" calcext:value-type="float">
            <text:p>8640000</text:p>
          </table:table-cell>
          <table:table-cell table:formula="of:=[.B2094]/[.C2094]" office:value-type="float" office:value="0.00169571759259259" calcext:value-type="float">
            <text:p>0,00169571759259259000</text:p>
          </table:table-cell>
          <table:table-cell table:formula="of:=[.D2095]-[.D209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[.B2094]+7" office:value-type="float" office:value="14658" calcext:value-type="float">
            <text:p>14658</text:p>
          </table:table-cell>
          <table:table-cell office:value-type="float" office:value="8640000" calcext:value-type="float">
            <text:p>8640000</text:p>
          </table:table-cell>
          <table:table-cell table:formula="of:=[.B2095]/[.C2095]" office:value-type="float" office:value="0.00169652777777778" calcext:value-type="float">
            <text:p>0,00169652777777778000</text:p>
          </table:table-cell>
          <table:table-cell table:formula="of:=[.D2096]-[.D209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table:formula="of:=[.B2095]+7" office:value-type="float" office:value="14665" calcext:value-type="float">
            <text:p>14665</text:p>
          </table:table-cell>
          <table:table-cell office:value-type="float" office:value="8640000" calcext:value-type="float">
            <text:p>8640000</text:p>
          </table:table-cell>
          <table:table-cell table:formula="of:=[.B2096]/[.C2096]" office:value-type="float" office:value="0.00169733796296296" calcext:value-type="float">
            <text:p>0,00169733796296296000</text:p>
          </table:table-cell>
          <table:table-cell table:formula="of:=[.D2097]-[.D209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[.B2096]+7" office:value-type="float" office:value="14672" calcext:value-type="float">
            <text:p>14672</text:p>
          </table:table-cell>
          <table:table-cell office:value-type="float" office:value="8640000" calcext:value-type="float">
            <text:p>8640000</text:p>
          </table:table-cell>
          <table:table-cell table:formula="of:=[.B2097]/[.C2097]" office:value-type="float" office:value="0.00169814814814815" calcext:value-type="float">
            <text:p>0,00169814814814815000</text:p>
          </table:table-cell>
          <table:table-cell table:formula="of:=[.D2098]-[.D209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[.B2097]+7" office:value-type="float" office:value="14679" calcext:value-type="float">
            <text:p>14679</text:p>
          </table:table-cell>
          <table:table-cell office:value-type="float" office:value="8640000" calcext:value-type="float">
            <text:p>8640000</text:p>
          </table:table-cell>
          <table:table-cell table:formula="of:=[.B2098]/[.C2098]" office:value-type="float" office:value="0.00169895833333333" calcext:value-type="float">
            <text:p>0,00169895833333333000</text:p>
          </table:table-cell>
          <table:table-cell table:formula="of:=[.D2099]-[.D209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[.B2098]+7" office:value-type="float" office:value="14686" calcext:value-type="float">
            <text:p>14686</text:p>
          </table:table-cell>
          <table:table-cell office:value-type="float" office:value="8640000" calcext:value-type="float">
            <text:p>8640000</text:p>
          </table:table-cell>
          <table:table-cell table:formula="of:=[.B2099]/[.C2099]" office:value-type="float" office:value="0.00169976851851852" calcext:value-type="float">
            <text:p>0,00169976851851852000</text:p>
          </table:table-cell>
          <table:table-cell table:formula="of:=[.D2100]-[.D209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[.B2099]+7" office:value-type="float" office:value="14693" calcext:value-type="float">
            <text:p>14693</text:p>
          </table:table-cell>
          <table:table-cell office:value-type="float" office:value="8640000" calcext:value-type="float">
            <text:p>8640000</text:p>
          </table:table-cell>
          <table:table-cell table:formula="of:=[.B2100]/[.C2100]" office:value-type="float" office:value="0.0017005787037037" calcext:value-type="float">
            <text:p>0,00170057870370370000</text:p>
          </table:table-cell>
          <table:table-cell table:formula="of:=[.D2101]-[.D210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.B2100]+7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2101]/[.C2101]" office:value-type="float" office:value="0.00170138888888889" calcext:value-type="float">
            <text:p>0,00170138888888889000</text:p>
          </table:table-cell>
          <table:table-cell table:formula="of:=[.D2102]-[.D210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[.B2101]+7" office:value-type="float" office:value="14707" calcext:value-type="float">
            <text:p>14707</text:p>
          </table:table-cell>
          <table:table-cell office:value-type="float" office:value="8640000" calcext:value-type="float">
            <text:p>8640000</text:p>
          </table:table-cell>
          <table:table-cell table:formula="of:=[.B2102]/[.C2102]" office:value-type="float" office:value="0.00170219907407407" calcext:value-type="float">
            <text:p>0,00170219907407407000</text:p>
          </table:table-cell>
          <table:table-cell table:formula="of:=[.D2103]-[.D210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[.B2102]+7" office:value-type="float" office:value="14714" calcext:value-type="float">
            <text:p>14714</text:p>
          </table:table-cell>
          <table:table-cell office:value-type="float" office:value="8640000" calcext:value-type="float">
            <text:p>8640000</text:p>
          </table:table-cell>
          <table:table-cell table:formula="of:=[.B2103]/[.C2103]" office:value-type="float" office:value="0.00170300925925926" calcext:value-type="float">
            <text:p>0,00170300925925926000</text:p>
          </table:table-cell>
          <table:table-cell table:formula="of:=[.D2104]-[.D210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[.B2103]+7" office:value-type="float" office:value="14721" calcext:value-type="float">
            <text:p>14721</text:p>
          </table:table-cell>
          <table:table-cell office:value-type="float" office:value="8640000" calcext:value-type="float">
            <text:p>8640000</text:p>
          </table:table-cell>
          <table:table-cell table:formula="of:=[.B2104]/[.C2104]" office:value-type="float" office:value="0.00170381944444444" calcext:value-type="float">
            <text:p>0,00170381944444444000</text:p>
          </table:table-cell>
          <table:table-cell table:formula="of:=[.D2105]-[.D210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[.B2104]+7" office:value-type="float" office:value="14728" calcext:value-type="float">
            <text:p>14728</text:p>
          </table:table-cell>
          <table:table-cell office:value-type="float" office:value="8640000" calcext:value-type="float">
            <text:p>8640000</text:p>
          </table:table-cell>
          <table:table-cell table:formula="of:=[.B2105]/[.C2105]" office:value-type="float" office:value="0.00170462962962963" calcext:value-type="float">
            <text:p>0,00170462962962963000</text:p>
          </table:table-cell>
          <table:table-cell table:formula="of:=[.D2106]-[.D210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table:formula="of:=[.B2105]+7" office:value-type="float" office:value="14735" calcext:value-type="float">
            <text:p>14735</text:p>
          </table:table-cell>
          <table:table-cell office:value-type="float" office:value="8640000" calcext:value-type="float">
            <text:p>8640000</text:p>
          </table:table-cell>
          <table:table-cell table:formula="of:=[.B2106]/[.C2106]" office:value-type="float" office:value="0.00170543981481481" calcext:value-type="float">
            <text:p>0,00170543981481481000</text:p>
          </table:table-cell>
          <table:table-cell table:formula="of:=[.D2107]-[.D210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table:formula="of:=[.B2106]+7" office:value-type="float" office:value="14742" calcext:value-type="float">
            <text:p>14742</text:p>
          </table:table-cell>
          <table:table-cell office:value-type="float" office:value="8640000" calcext:value-type="float">
            <text:p>8640000</text:p>
          </table:table-cell>
          <table:table-cell table:formula="of:=[.B2107]/[.C2107]" office:value-type="float" office:value="0.00170625" calcext:value-type="float">
            <text:p>0,00170625000000000000</text:p>
          </table:table-cell>
          <table:table-cell table:formula="of:=[.D2108]-[.D210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[.B2107]+7" office:value-type="float" office:value="14749" calcext:value-type="float">
            <text:p>14749</text:p>
          </table:table-cell>
          <table:table-cell office:value-type="float" office:value="8640000" calcext:value-type="float">
            <text:p>8640000</text:p>
          </table:table-cell>
          <table:table-cell table:formula="of:=[.B2108]/[.C2108]" office:value-type="float" office:value="0.00170706018518519" calcext:value-type="float">
            <text:p>0,00170706018518519000</text:p>
          </table:table-cell>
          <table:table-cell table:formula="of:=[.D2109]-[.D210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table:formula="of:=[.B2108]+7" office:value-type="float" office:value="14756" calcext:value-type="float">
            <text:p>14756</text:p>
          </table:table-cell>
          <table:table-cell office:value-type="float" office:value="8640000" calcext:value-type="float">
            <text:p>8640000</text:p>
          </table:table-cell>
          <table:table-cell table:formula="of:=[.B2109]/[.C2109]" office:value-type="float" office:value="0.00170787037037037" calcext:value-type="float">
            <text:p>0,00170787037037037000</text:p>
          </table:table-cell>
          <table:table-cell table:formula="of:=[.D2110]-[.D210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table:formula="of:=[.B2109]+7" office:value-type="float" office:value="14763" calcext:value-type="float">
            <text:p>14763</text:p>
          </table:table-cell>
          <table:table-cell office:value-type="float" office:value="8640000" calcext:value-type="float">
            <text:p>8640000</text:p>
          </table:table-cell>
          <table:table-cell table:formula="of:=[.B2110]/[.C2110]" office:value-type="float" office:value="0.00170868055555556" calcext:value-type="float">
            <text:p>0,00170868055555556000</text:p>
          </table:table-cell>
          <table:table-cell table:formula="of:=[.D2111]-[.D211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[.B2110]+7" office:value-type="float" office:value="14770" calcext:value-type="float">
            <text:p>14770</text:p>
          </table:table-cell>
          <table:table-cell office:value-type="float" office:value="8640000" calcext:value-type="float">
            <text:p>8640000</text:p>
          </table:table-cell>
          <table:table-cell table:formula="of:=[.B2111]/[.C2111]" office:value-type="float" office:value="0.00170949074074074" calcext:value-type="float">
            <text:p>0,00170949074074074000</text:p>
          </table:table-cell>
          <table:table-cell table:formula="of:=[.D2112]-[.D211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[.B2111]+7" office:value-type="float" office:value="14777" calcext:value-type="float">
            <text:p>14777</text:p>
          </table:table-cell>
          <table:table-cell office:value-type="float" office:value="8640000" calcext:value-type="float">
            <text:p>8640000</text:p>
          </table:table-cell>
          <table:table-cell table:formula="of:=[.B2112]/[.C2112]" office:value-type="float" office:value="0.00171030092592593" calcext:value-type="float">
            <text:p>0,00171030092592593000</text:p>
          </table:table-cell>
          <table:table-cell table:formula="of:=[.D2113]-[.D211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[.B2112]+7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2113]/[.C2113]" office:value-type="float" office:value="0.00171111111111111" calcext:value-type="float">
            <text:p>0,00171111111111111000</text:p>
          </table:table-cell>
          <table:table-cell table:formula="of:=[.D2114]-[.D211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table:formula="of:=[.B2113]+7" office:value-type="float" office:value="14791" calcext:value-type="float">
            <text:p>14791</text:p>
          </table:table-cell>
          <table:table-cell office:value-type="float" office:value="8640000" calcext:value-type="float">
            <text:p>8640000</text:p>
          </table:table-cell>
          <table:table-cell table:formula="of:=[.B2114]/[.C2114]" office:value-type="float" office:value="0.0017119212962963" calcext:value-type="float">
            <text:p>0,00171192129629630000</text:p>
          </table:table-cell>
          <table:table-cell table:formula="of:=[.D2115]-[.D211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table:formula="of:=[.B2114]+7" office:value-type="float" office:value="14798" calcext:value-type="float">
            <text:p>14798</text:p>
          </table:table-cell>
          <table:table-cell office:value-type="float" office:value="8640000" calcext:value-type="float">
            <text:p>8640000</text:p>
          </table:table-cell>
          <table:table-cell table:formula="of:=[.B2115]/[.C2115]" office:value-type="float" office:value="0.00171273148148148" calcext:value-type="float">
            <text:p>0,00171273148148148000</text:p>
          </table:table-cell>
          <table:table-cell table:formula="of:=[.D2116]-[.D211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table:formula="of:=[.B2115]+7" office:value-type="float" office:value="14805" calcext:value-type="float">
            <text:p>14805</text:p>
          </table:table-cell>
          <table:table-cell office:value-type="float" office:value="8640000" calcext:value-type="float">
            <text:p>8640000</text:p>
          </table:table-cell>
          <table:table-cell table:formula="of:=[.B2116]/[.C2116]" office:value-type="float" office:value="0.00171354166666667" calcext:value-type="float">
            <text:p>0,00171354166666667000</text:p>
          </table:table-cell>
          <table:table-cell table:formula="of:=[.D2117]-[.D211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[.B2116]+7" office:value-type="float" office:value="14812" calcext:value-type="float">
            <text:p>14812</text:p>
          </table:table-cell>
          <table:table-cell office:value-type="float" office:value="8640000" calcext:value-type="float">
            <text:p>8640000</text:p>
          </table:table-cell>
          <table:table-cell table:formula="of:=[.B2117]/[.C2117]" office:value-type="float" office:value="0.00171435185185185" calcext:value-type="float">
            <text:p>0,00171435185185185000</text:p>
          </table:table-cell>
          <table:table-cell table:formula="of:=[.D2118]-[.D211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[.B2117]+7" office:value-type="float" office:value="14819" calcext:value-type="float">
            <text:p>14819</text:p>
          </table:table-cell>
          <table:table-cell office:value-type="float" office:value="8640000" calcext:value-type="float">
            <text:p>8640000</text:p>
          </table:table-cell>
          <table:table-cell table:formula="of:=[.B2118]/[.C2118]" office:value-type="float" office:value="0.00171516203703704" calcext:value-type="float">
            <text:p>0,00171516203703704000</text:p>
          </table:table-cell>
          <table:table-cell table:formula="of:=[.D2119]-[.D211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[.B2118]+7" office:value-type="float" office:value="14826" calcext:value-type="float">
            <text:p>14826</text:p>
          </table:table-cell>
          <table:table-cell office:value-type="float" office:value="8640000" calcext:value-type="float">
            <text:p>8640000</text:p>
          </table:table-cell>
          <table:table-cell table:formula="of:=[.B2119]/[.C2119]" office:value-type="float" office:value="0.00171597222222222" calcext:value-type="float">
            <text:p>0,00171597222222222000</text:p>
          </table:table-cell>
          <table:table-cell table:formula="of:=[.D2120]-[.D211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[.B2119]+7" office:value-type="float" office:value="14833" calcext:value-type="float">
            <text:p>14833</text:p>
          </table:table-cell>
          <table:table-cell office:value-type="float" office:value="8640000" calcext:value-type="float">
            <text:p>8640000</text:p>
          </table:table-cell>
          <table:table-cell table:formula="of:=[.B2120]/[.C2120]" office:value-type="float" office:value="0.00171678240740741" calcext:value-type="float">
            <text:p>0,00171678240740741000</text:p>
          </table:table-cell>
          <table:table-cell table:formula="of:=[.D2121]-[.D212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[.B2120]+7" office:value-type="float" office:value="14840" calcext:value-type="float">
            <text:p>14840</text:p>
          </table:table-cell>
          <table:table-cell office:value-type="float" office:value="8640000" calcext:value-type="float">
            <text:p>8640000</text:p>
          </table:table-cell>
          <table:table-cell table:formula="of:=[.B2121]/[.C2121]" office:value-type="float" office:value="0.00171759259259259" calcext:value-type="float">
            <text:p>0,00171759259259259000</text:p>
          </table:table-cell>
          <table:table-cell table:formula="of:=[.D2122]-[.D212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table:formula="of:=[.B2121]+7" office:value-type="float" office:value="14847" calcext:value-type="float">
            <text:p>14847</text:p>
          </table:table-cell>
          <table:table-cell office:value-type="float" office:value="8640000" calcext:value-type="float">
            <text:p>8640000</text:p>
          </table:table-cell>
          <table:table-cell table:formula="of:=[.B2122]/[.C2122]" office:value-type="float" office:value="0.00171840277777778" calcext:value-type="float">
            <text:p>0,00171840277777778000</text:p>
          </table:table-cell>
          <table:table-cell table:formula="of:=[.D2123]-[.D212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[.B2122]+7" office:value-type="float" office:value="14854" calcext:value-type="float">
            <text:p>14854</text:p>
          </table:table-cell>
          <table:table-cell office:value-type="float" office:value="8640000" calcext:value-type="float">
            <text:p>8640000</text:p>
          </table:table-cell>
          <table:table-cell table:formula="of:=[.B2123]/[.C2123]" office:value-type="float" office:value="0.00171921296296296" calcext:value-type="float">
            <text:p>0,00171921296296296000</text:p>
          </table:table-cell>
          <table:table-cell table:formula="of:=[.D2124]-[.D212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table:formula="of:=[.B2123]+7" office:value-type="float" office:value="14861" calcext:value-type="float">
            <text:p>14861</text:p>
          </table:table-cell>
          <table:table-cell office:value-type="float" office:value="8640000" calcext:value-type="float">
            <text:p>8640000</text:p>
          </table:table-cell>
          <table:table-cell table:formula="of:=[.B2124]/[.C2124]" office:value-type="float" office:value="0.00172002314814815" calcext:value-type="float">
            <text:p>0,00172002314814815000</text:p>
          </table:table-cell>
          <table:table-cell table:formula="of:=[.D2125]-[.D212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[.B2124]+7" office:value-type="float" office:value="14868" calcext:value-type="float">
            <text:p>14868</text:p>
          </table:table-cell>
          <table:table-cell office:value-type="float" office:value="8640000" calcext:value-type="float">
            <text:p>8640000</text:p>
          </table:table-cell>
          <table:table-cell table:formula="of:=[.B2125]/[.C2125]" office:value-type="float" office:value="0.00172083333333333" calcext:value-type="float">
            <text:p>0,00172083333333333000</text:p>
          </table:table-cell>
          <table:table-cell table:formula="of:=[.D2126]-[.D212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[.B2125]+7" office:value-type="float" office:value="14875" calcext:value-type="float">
            <text:p>14875</text:p>
          </table:table-cell>
          <table:table-cell office:value-type="float" office:value="8640000" calcext:value-type="float">
            <text:p>8640000</text:p>
          </table:table-cell>
          <table:table-cell table:formula="of:=[.B2126]/[.C2126]" office:value-type="float" office:value="0.00172164351851852" calcext:value-type="float">
            <text:p>0,00172164351851852000</text:p>
          </table:table-cell>
          <table:table-cell table:formula="of:=[.D2127]-[.D212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table:formula="of:=[.B2126]+7" office:value-type="float" office:value="14882" calcext:value-type="float">
            <text:p>14882</text:p>
          </table:table-cell>
          <table:table-cell office:value-type="float" office:value="8640000" calcext:value-type="float">
            <text:p>8640000</text:p>
          </table:table-cell>
          <table:table-cell table:formula="of:=[.B2127]/[.C2127]" office:value-type="float" office:value="0.0017224537037037" calcext:value-type="float">
            <text:p>0,00172245370370370000</text:p>
          </table:table-cell>
          <table:table-cell table:formula="of:=[.D2128]-[.D212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[.B2127]+7" office:value-type="float" office:value="14889" calcext:value-type="float">
            <text:p>14889</text:p>
          </table:table-cell>
          <table:table-cell office:value-type="float" office:value="8640000" calcext:value-type="float">
            <text:p>8640000</text:p>
          </table:table-cell>
          <table:table-cell table:formula="of:=[.B2128]/[.C2128]" office:value-type="float" office:value="0.00172326388888889" calcext:value-type="float">
            <text:p>0,00172326388888889000</text:p>
          </table:table-cell>
          <table:table-cell table:formula="of:=[.D2129]-[.D212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[.B2128]+7" office:value-type="float" office:value="14896" calcext:value-type="float">
            <text:p>14896</text:p>
          </table:table-cell>
          <table:table-cell office:value-type="float" office:value="8640000" calcext:value-type="float">
            <text:p>8640000</text:p>
          </table:table-cell>
          <table:table-cell table:formula="of:=[.B2129]/[.C2129]" office:value-type="float" office:value="0.00172407407407407" calcext:value-type="float">
            <text:p>0,00172407407407407000</text:p>
          </table:table-cell>
          <table:table-cell table:formula="of:=[.D2130]-[.D212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[.B2129]+7" office:value-type="float" office:value="14903" calcext:value-type="float">
            <text:p>14903</text:p>
          </table:table-cell>
          <table:table-cell office:value-type="float" office:value="8640000" calcext:value-type="float">
            <text:p>8640000</text:p>
          </table:table-cell>
          <table:table-cell table:formula="of:=[.B2130]/[.C2130]" office:value-type="float" office:value="0.00172488425925926" calcext:value-type="float">
            <text:p>0,00172488425925926000</text:p>
          </table:table-cell>
          <table:table-cell table:formula="of:=[.D2131]-[.D213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[.B2130]+7" office:value-type="float" office:value="14910" calcext:value-type="float">
            <text:p>14910</text:p>
          </table:table-cell>
          <table:table-cell office:value-type="float" office:value="8640000" calcext:value-type="float">
            <text:p>8640000</text:p>
          </table:table-cell>
          <table:table-cell table:formula="of:=[.B2131]/[.C2131]" office:value-type="float" office:value="0.00172569444444444" calcext:value-type="float">
            <text:p>0,00172569444444444000</text:p>
          </table:table-cell>
          <table:table-cell table:formula="of:=[.D2132]-[.D213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[.B2131]+7" office:value-type="float" office:value="14917" calcext:value-type="float">
            <text:p>14917</text:p>
          </table:table-cell>
          <table:table-cell office:value-type="float" office:value="8640000" calcext:value-type="float">
            <text:p>8640000</text:p>
          </table:table-cell>
          <table:table-cell table:formula="of:=[.B2132]/[.C2132]" office:value-type="float" office:value="0.00172650462962963" calcext:value-type="float">
            <text:p>0,00172650462962963000</text:p>
          </table:table-cell>
          <table:table-cell table:formula="of:=[.D2133]-[.D213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table:formula="of:=[.B2132]+7" office:value-type="float" office:value="14924" calcext:value-type="float">
            <text:p>14924</text:p>
          </table:table-cell>
          <table:table-cell office:value-type="float" office:value="8640000" calcext:value-type="float">
            <text:p>8640000</text:p>
          </table:table-cell>
          <table:table-cell table:formula="of:=[.B2133]/[.C2133]" office:value-type="float" office:value="0.00172731481481481" calcext:value-type="float">
            <text:p>0,00172731481481481000</text:p>
          </table:table-cell>
          <table:table-cell table:formula="of:=[.D2134]-[.D213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[.B2133]+7" office:value-type="float" office:value="14931" calcext:value-type="float">
            <text:p>14931</text:p>
          </table:table-cell>
          <table:table-cell office:value-type="float" office:value="8640000" calcext:value-type="float">
            <text:p>8640000</text:p>
          </table:table-cell>
          <table:table-cell table:formula="of:=[.B2134]/[.C2134]" office:value-type="float" office:value="0.001728125" calcext:value-type="float">
            <text:p>0,00172812500000000000</text:p>
          </table:table-cell>
          <table:table-cell table:formula="of:=[.D2135]-[.D213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[.B2134]+7" office:value-type="float" office:value="14938" calcext:value-type="float">
            <text:p>14938</text:p>
          </table:table-cell>
          <table:table-cell office:value-type="float" office:value="8640000" calcext:value-type="float">
            <text:p>8640000</text:p>
          </table:table-cell>
          <table:table-cell table:formula="of:=[.B2135]/[.C2135]" office:value-type="float" office:value="0.00172893518518519" calcext:value-type="float">
            <text:p>0,00172893518518519000</text:p>
          </table:table-cell>
          <table:table-cell table:formula="of:=[.D2136]-[.D213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[.B2135]+7" office:value-type="float" office:value="14945" calcext:value-type="float">
            <text:p>14945</text:p>
          </table:table-cell>
          <table:table-cell office:value-type="float" office:value="8640000" calcext:value-type="float">
            <text:p>8640000</text:p>
          </table:table-cell>
          <table:table-cell table:formula="of:=[.B2136]/[.C2136]" office:value-type="float" office:value="0.00172974537037037" calcext:value-type="float">
            <text:p>0,00172974537037037000</text:p>
          </table:table-cell>
          <table:table-cell table:formula="of:=[.D2137]-[.D213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[.B2136]+7" office:value-type="float" office:value="14952" calcext:value-type="float">
            <text:p>14952</text:p>
          </table:table-cell>
          <table:table-cell office:value-type="float" office:value="8640000" calcext:value-type="float">
            <text:p>8640000</text:p>
          </table:table-cell>
          <table:table-cell table:formula="of:=[.B2137]/[.C2137]" office:value-type="float" office:value="0.00173055555555556" calcext:value-type="float">
            <text:p>0,00173055555555556000</text:p>
          </table:table-cell>
          <table:table-cell table:formula="of:=[.D2138]-[.D213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[.B2137]+7" office:value-type="float" office:value="14959" calcext:value-type="float">
            <text:p>14959</text:p>
          </table:table-cell>
          <table:table-cell office:value-type="float" office:value="8640000" calcext:value-type="float">
            <text:p>8640000</text:p>
          </table:table-cell>
          <table:table-cell table:formula="of:=[.B2138]/[.C2138]" office:value-type="float" office:value="0.00173136574074074" calcext:value-type="float">
            <text:p>0,00173136574074074000</text:p>
          </table:table-cell>
          <table:table-cell table:formula="of:=[.D2139]-[.D213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table:formula="of:=[.B2138]+7" office:value-type="float" office:value="14966" calcext:value-type="float">
            <text:p>14966</text:p>
          </table:table-cell>
          <table:table-cell office:value-type="float" office:value="8640000" calcext:value-type="float">
            <text:p>8640000</text:p>
          </table:table-cell>
          <table:table-cell table:formula="of:=[.B2139]/[.C2139]" office:value-type="float" office:value="0.00173217592592593" calcext:value-type="float">
            <text:p>0,00173217592592593000</text:p>
          </table:table-cell>
          <table:table-cell table:formula="of:=[.D2140]-[.D213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[.B2139]+7" office:value-type="float" office:value="14973" calcext:value-type="float">
            <text:p>14973</text:p>
          </table:table-cell>
          <table:table-cell office:value-type="float" office:value="8640000" calcext:value-type="float">
            <text:p>8640000</text:p>
          </table:table-cell>
          <table:table-cell table:formula="of:=[.B2140]/[.C2140]" office:value-type="float" office:value="0.00173298611111111" calcext:value-type="float">
            <text:p>0,00173298611111111000</text:p>
          </table:table-cell>
          <table:table-cell table:formula="of:=[.D2141]-[.D214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[.B2140]+7" office:value-type="float" office:value="14980" calcext:value-type="float">
            <text:p>14980</text:p>
          </table:table-cell>
          <table:table-cell office:value-type="float" office:value="8640000" calcext:value-type="float">
            <text:p>8640000</text:p>
          </table:table-cell>
          <table:table-cell table:formula="of:=[.B2141]/[.C2141]" office:value-type="float" office:value="0.0017337962962963" calcext:value-type="float">
            <text:p>0,00173379629629630000</text:p>
          </table:table-cell>
          <table:table-cell table:formula="of:=[.D2142]-[.D214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table:formula="of:=[.B2141]+7" office:value-type="float" office:value="14987" calcext:value-type="float">
            <text:p>14987</text:p>
          </table:table-cell>
          <table:table-cell office:value-type="float" office:value="8640000" calcext:value-type="float">
            <text:p>8640000</text:p>
          </table:table-cell>
          <table:table-cell table:formula="of:=[.B2142]/[.C2142]" office:value-type="float" office:value="0.00173460648148148" calcext:value-type="float">
            <text:p>0,00173460648148148000</text:p>
          </table:table-cell>
          <table:table-cell table:formula="of:=[.D2143]-[.D214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table:formula="of:=[.B2142]+7" office:value-type="float" office:value="14994" calcext:value-type="float">
            <text:p>14994</text:p>
          </table:table-cell>
          <table:table-cell office:value-type="float" office:value="8640000" calcext:value-type="float">
            <text:p>8640000</text:p>
          </table:table-cell>
          <table:table-cell table:formula="of:=[.B2143]/[.C2143]" office:value-type="float" office:value="0.00173541666666667" calcext:value-type="float">
            <text:p>0,00173541666666667000</text:p>
          </table:table-cell>
          <table:table-cell table:formula="of:=[.D2144]-[.D214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[.B2143]+7" office:value-type="float" office:value="15001" calcext:value-type="float">
            <text:p>15001</text:p>
          </table:table-cell>
          <table:table-cell office:value-type="float" office:value="8640000" calcext:value-type="float">
            <text:p>8640000</text:p>
          </table:table-cell>
          <table:table-cell table:formula="of:=[.B2144]/[.C2144]" office:value-type="float" office:value="0.00173622685185185" calcext:value-type="float">
            <text:p>0,00173622685185185000</text:p>
          </table:table-cell>
          <table:table-cell table:formula="of:=[.D2145]-[.D214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[.B2144]+7" office:value-type="float" office:value="15008" calcext:value-type="float">
            <text:p>15008</text:p>
          </table:table-cell>
          <table:table-cell office:value-type="float" office:value="8640000" calcext:value-type="float">
            <text:p>8640000</text:p>
          </table:table-cell>
          <table:table-cell table:formula="of:=[.B2145]/[.C2145]" office:value-type="float" office:value="0.00173703703703704" calcext:value-type="float">
            <text:p>0,00173703703703704000</text:p>
          </table:table-cell>
          <table:table-cell table:formula="of:=[.D2146]-[.D214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table:formula="of:=[.B2145]+7" office:value-type="float" office:value="15015" calcext:value-type="float">
            <text:p>15015</text:p>
          </table:table-cell>
          <table:table-cell office:value-type="float" office:value="8640000" calcext:value-type="float">
            <text:p>8640000</text:p>
          </table:table-cell>
          <table:table-cell table:formula="of:=[.B2146]/[.C2146]" office:value-type="float" office:value="0.00173784722222222" calcext:value-type="float">
            <text:p>0,00173784722222222000</text:p>
          </table:table-cell>
          <table:table-cell table:formula="of:=[.D2147]-[.D214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table:formula="of:=[.B2146]+7" office:value-type="float" office:value="15022" calcext:value-type="float">
            <text:p>15022</text:p>
          </table:table-cell>
          <table:table-cell office:value-type="float" office:value="8640000" calcext:value-type="float">
            <text:p>8640000</text:p>
          </table:table-cell>
          <table:table-cell table:formula="of:=[.B2147]/[.C2147]" office:value-type="float" office:value="0.00173865740740741" calcext:value-type="float">
            <text:p>0,00173865740740741000</text:p>
          </table:table-cell>
          <table:table-cell table:formula="of:=[.D2148]-[.D214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[.B2147]+7" office:value-type="float" office:value="15029" calcext:value-type="float">
            <text:p>15029</text:p>
          </table:table-cell>
          <table:table-cell office:value-type="float" office:value="8640000" calcext:value-type="float">
            <text:p>8640000</text:p>
          </table:table-cell>
          <table:table-cell table:formula="of:=[.B2148]/[.C2148]" office:value-type="float" office:value="0.00173946759259259" calcext:value-type="float">
            <text:p>0,00173946759259259000</text:p>
          </table:table-cell>
          <table:table-cell table:formula="of:=[.D2149]-[.D214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[.B2148]+7" office:value-type="float" office:value="15036" calcext:value-type="float">
            <text:p>15036</text:p>
          </table:table-cell>
          <table:table-cell office:value-type="float" office:value="8640000" calcext:value-type="float">
            <text:p>8640000</text:p>
          </table:table-cell>
          <table:table-cell table:formula="of:=[.B2149]/[.C2149]" office:value-type="float" office:value="0.00174027777777778" calcext:value-type="float">
            <text:p>0,00174027777777778000</text:p>
          </table:table-cell>
          <table:table-cell table:formula="of:=[.D2150]-[.D214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[.B2149]+7" office:value-type="float" office:value="15043" calcext:value-type="float">
            <text:p>15043</text:p>
          </table:table-cell>
          <table:table-cell office:value-type="float" office:value="8640000" calcext:value-type="float">
            <text:p>8640000</text:p>
          </table:table-cell>
          <table:table-cell table:formula="of:=[.B2150]/[.C2150]" office:value-type="float" office:value="0.00174108796296296" calcext:value-type="float">
            <text:p>0,00174108796296296000</text:p>
          </table:table-cell>
          <table:table-cell table:formula="of:=[.D2151]-[.D215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[.B2150]+7" office:value-type="float" office:value="15050" calcext:value-type="float">
            <text:p>15050</text:p>
          </table:table-cell>
          <table:table-cell office:value-type="float" office:value="8640000" calcext:value-type="float">
            <text:p>8640000</text:p>
          </table:table-cell>
          <table:table-cell table:formula="of:=[.B2151]/[.C2151]" office:value-type="float" office:value="0.00174189814814815" calcext:value-type="float">
            <text:p>0,00174189814814815000</text:p>
          </table:table-cell>
          <table:table-cell table:formula="of:=[.D2152]-[.D215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[.B2151]+7" office:value-type="float" office:value="15057" calcext:value-type="float">
            <text:p>15057</text:p>
          </table:table-cell>
          <table:table-cell office:value-type="float" office:value="8640000" calcext:value-type="float">
            <text:p>8640000</text:p>
          </table:table-cell>
          <table:table-cell table:formula="of:=[.B2152]/[.C2152]" office:value-type="float" office:value="0.00174270833333333" calcext:value-type="float">
            <text:p>0,00174270833333333000</text:p>
          </table:table-cell>
          <table:table-cell table:formula="of:=[.D2153]-[.D215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[.B2152]+7" office:value-type="float" office:value="15064" calcext:value-type="float">
            <text:p>15064</text:p>
          </table:table-cell>
          <table:table-cell office:value-type="float" office:value="8640000" calcext:value-type="float">
            <text:p>8640000</text:p>
          </table:table-cell>
          <table:table-cell table:formula="of:=[.B2153]/[.C2153]" office:value-type="float" office:value="0.00174351851851852" calcext:value-type="float">
            <text:p>0,00174351851851852000</text:p>
          </table:table-cell>
          <table:table-cell table:formula="of:=[.D2154]-[.D215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table:formula="of:=[.B2153]+7" office:value-type="float" office:value="15071" calcext:value-type="float">
            <text:p>15071</text:p>
          </table:table-cell>
          <table:table-cell office:value-type="float" office:value="8640000" calcext:value-type="float">
            <text:p>8640000</text:p>
          </table:table-cell>
          <table:table-cell table:formula="of:=[.B2154]/[.C2154]" office:value-type="float" office:value="0.0017443287037037" calcext:value-type="float">
            <text:p>0,00174432870370370000</text:p>
          </table:table-cell>
          <table:table-cell table:formula="of:=[.D2155]-[.D215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table:formula="of:=[.B2154]+7" office:value-type="float" office:value="15078" calcext:value-type="float">
            <text:p>15078</text:p>
          </table:table-cell>
          <table:table-cell office:value-type="float" office:value="8640000" calcext:value-type="float">
            <text:p>8640000</text:p>
          </table:table-cell>
          <table:table-cell table:formula="of:=[.B2155]/[.C2155]" office:value-type="float" office:value="0.00174513888888889" calcext:value-type="float">
            <text:p>0,00174513888888889000</text:p>
          </table:table-cell>
          <table:table-cell table:formula="of:=[.D2156]-[.D215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[.B2155]+7" office:value-type="float" office:value="15085" calcext:value-type="float">
            <text:p>15085</text:p>
          </table:table-cell>
          <table:table-cell office:value-type="float" office:value="8640000" calcext:value-type="float">
            <text:p>8640000</text:p>
          </table:table-cell>
          <table:table-cell table:formula="of:=[.B2156]/[.C2156]" office:value-type="float" office:value="0.00174594907407407" calcext:value-type="float">
            <text:p>0,00174594907407407000</text:p>
          </table:table-cell>
          <table:table-cell table:formula="of:=[.D2157]-[.D215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table:formula="of:=[.B2156]+7" office:value-type="float" office:value="15092" calcext:value-type="float">
            <text:p>15092</text:p>
          </table:table-cell>
          <table:table-cell office:value-type="float" office:value="8640000" calcext:value-type="float">
            <text:p>8640000</text:p>
          </table:table-cell>
          <table:table-cell table:formula="of:=[.B2157]/[.C2157]" office:value-type="float" office:value="0.00174675925925926" calcext:value-type="float">
            <text:p>0,00174675925925926000</text:p>
          </table:table-cell>
          <table:table-cell table:formula="of:=[.D2158]-[.D215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[.B2157]+7" office:value-type="float" office:value="15099" calcext:value-type="float">
            <text:p>15099</text:p>
          </table:table-cell>
          <table:table-cell office:value-type="float" office:value="8640000" calcext:value-type="float">
            <text:p>8640000</text:p>
          </table:table-cell>
          <table:table-cell table:formula="of:=[.B2158]/[.C2158]" office:value-type="float" office:value="0.00174756944444444" calcext:value-type="float">
            <text:p>0,00174756944444444000</text:p>
          </table:table-cell>
          <table:table-cell table:formula="of:=[.D2159]-[.D215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[.B2158]+7" office:value-type="float" office:value="15106" calcext:value-type="float">
            <text:p>15106</text:p>
          </table:table-cell>
          <table:table-cell office:value-type="float" office:value="8640000" calcext:value-type="float">
            <text:p>8640000</text:p>
          </table:table-cell>
          <table:table-cell table:formula="of:=[.B2159]/[.C2159]" office:value-type="float" office:value="0.00174837962962963" calcext:value-type="float">
            <text:p>0,00174837962962963000</text:p>
          </table:table-cell>
          <table:table-cell table:formula="of:=[.D2160]-[.D215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[.B2159]+7" office:value-type="float" office:value="15113" calcext:value-type="float">
            <text:p>15113</text:p>
          </table:table-cell>
          <table:table-cell office:value-type="float" office:value="8640000" calcext:value-type="float">
            <text:p>8640000</text:p>
          </table:table-cell>
          <table:table-cell table:formula="of:=[.B2160]/[.C2160]" office:value-type="float" office:value="0.00174918981481481" calcext:value-type="float">
            <text:p>0,00174918981481481000</text:p>
          </table:table-cell>
          <table:table-cell table:formula="of:=[.D2161]-[.D216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[.B2160]+7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2161]/[.C2161]" office:value-type="float" office:value="0.00175" calcext:value-type="float">
            <text:p>0,00175000000000000000</text:p>
          </table:table-cell>
          <table:table-cell table:formula="of:=[.D2162]-[.D216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[.B2161]+7" office:value-type="float" office:value="15127" calcext:value-type="float">
            <text:p>15127</text:p>
          </table:table-cell>
          <table:table-cell office:value-type="float" office:value="8640000" calcext:value-type="float">
            <text:p>8640000</text:p>
          </table:table-cell>
          <table:table-cell table:formula="of:=[.B2162]/[.C2162]" office:value-type="float" office:value="0.00175081018518519" calcext:value-type="float">
            <text:p>0,00175081018518518000</text:p>
          </table:table-cell>
          <table:table-cell table:formula="of:=[.D2163]-[.D216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[.B2162]+7" office:value-type="float" office:value="15134" calcext:value-type="float">
            <text:p>15134</text:p>
          </table:table-cell>
          <table:table-cell office:value-type="float" office:value="8640000" calcext:value-type="float">
            <text:p>8640000</text:p>
          </table:table-cell>
          <table:table-cell table:formula="of:=[.B2163]/[.C2163]" office:value-type="float" office:value="0.00175162037037037" calcext:value-type="float">
            <text:p>0,00175162037037037000</text:p>
          </table:table-cell>
          <table:table-cell table:formula="of:=[.D2164]-[.D216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[.B2163]+7" office:value-type="float" office:value="15141" calcext:value-type="float">
            <text:p>15141</text:p>
          </table:table-cell>
          <table:table-cell office:value-type="float" office:value="8640000" calcext:value-type="float">
            <text:p>8640000</text:p>
          </table:table-cell>
          <table:table-cell table:formula="of:=[.B2164]/[.C2164]" office:value-type="float" office:value="0.00175243055555556" calcext:value-type="float">
            <text:p>0,00175243055555556000</text:p>
          </table:table-cell>
          <table:table-cell table:formula="of:=[.D2165]-[.D216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[.B2164]+7" office:value-type="float" office:value="15148" calcext:value-type="float">
            <text:p>15148</text:p>
          </table:table-cell>
          <table:table-cell office:value-type="float" office:value="8640000" calcext:value-type="float">
            <text:p>8640000</text:p>
          </table:table-cell>
          <table:table-cell table:formula="of:=[.B2165]/[.C2165]" office:value-type="float" office:value="0.00175324074074074" calcext:value-type="float">
            <text:p>0,00175324074074074000</text:p>
          </table:table-cell>
          <table:table-cell table:formula="of:=[.D2166]-[.D216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[.B2165]+7" office:value-type="float" office:value="15155" calcext:value-type="float">
            <text:p>15155</text:p>
          </table:table-cell>
          <table:table-cell office:value-type="float" office:value="8640000" calcext:value-type="float">
            <text:p>8640000</text:p>
          </table:table-cell>
          <table:table-cell table:formula="of:=[.B2166]/[.C2166]" office:value-type="float" office:value="0.00175405092592593" calcext:value-type="float">
            <text:p>0,00175405092592593000</text:p>
          </table:table-cell>
          <table:table-cell table:formula="of:=[.D2167]-[.D216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[.B2166]+7" office:value-type="float" office:value="15162" calcext:value-type="float">
            <text:p>15162</text:p>
          </table:table-cell>
          <table:table-cell office:value-type="float" office:value="8640000" calcext:value-type="float">
            <text:p>8640000</text:p>
          </table:table-cell>
          <table:table-cell table:formula="of:=[.B2167]/[.C2167]" office:value-type="float" office:value="0.00175486111111111" calcext:value-type="float">
            <text:p>0,00175486111111111000</text:p>
          </table:table-cell>
          <table:table-cell table:formula="of:=[.D2168]-[.D216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[.B2167]+7" office:value-type="float" office:value="15169" calcext:value-type="float">
            <text:p>15169</text:p>
          </table:table-cell>
          <table:table-cell office:value-type="float" office:value="8640000" calcext:value-type="float">
            <text:p>8640000</text:p>
          </table:table-cell>
          <table:table-cell table:formula="of:=[.B2168]/[.C2168]" office:value-type="float" office:value="0.0017556712962963" calcext:value-type="float">
            <text:p>0,00175567129629630000</text:p>
          </table:table-cell>
          <table:table-cell table:formula="of:=[.D2169]-[.D216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[.B2168]+7" office:value-type="float" office:value="15176" calcext:value-type="float">
            <text:p>15176</text:p>
          </table:table-cell>
          <table:table-cell office:value-type="float" office:value="8640000" calcext:value-type="float">
            <text:p>8640000</text:p>
          </table:table-cell>
          <table:table-cell table:formula="of:=[.B2169]/[.C2169]" office:value-type="float" office:value="0.00175648148148148" calcext:value-type="float">
            <text:p>0,00175648148148148000</text:p>
          </table:table-cell>
          <table:table-cell table:formula="of:=[.D2170]-[.D216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[.B2169]+7" office:value-type="float" office:value="15183" calcext:value-type="float">
            <text:p>15183</text:p>
          </table:table-cell>
          <table:table-cell office:value-type="float" office:value="8640000" calcext:value-type="float">
            <text:p>8640000</text:p>
          </table:table-cell>
          <table:table-cell table:formula="of:=[.B2170]/[.C2170]" office:value-type="float" office:value="0.00175729166666667" calcext:value-type="float">
            <text:p>0,00175729166666667000</text:p>
          </table:table-cell>
          <table:table-cell table:formula="of:=[.D2171]-[.D217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[.B2170]+7" office:value-type="float" office:value="15190" calcext:value-type="float">
            <text:p>15190</text:p>
          </table:table-cell>
          <table:table-cell office:value-type="float" office:value="8640000" calcext:value-type="float">
            <text:p>8640000</text:p>
          </table:table-cell>
          <table:table-cell table:formula="of:=[.B2171]/[.C2171]" office:value-type="float" office:value="0.00175810185185185" calcext:value-type="float">
            <text:p>0,00175810185185185000</text:p>
          </table:table-cell>
          <table:table-cell table:formula="of:=[.D2172]-[.D217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table:formula="of:=[.B2171]+7" office:value-type="float" office:value="15197" calcext:value-type="float">
            <text:p>15197</text:p>
          </table:table-cell>
          <table:table-cell office:value-type="float" office:value="8640000" calcext:value-type="float">
            <text:p>8640000</text:p>
          </table:table-cell>
          <table:table-cell table:formula="of:=[.B2172]/[.C2172]" office:value-type="float" office:value="0.00175891203703704" calcext:value-type="float">
            <text:p>0,00175891203703704000</text:p>
          </table:table-cell>
          <table:table-cell table:formula="of:=[.D2173]-[.D217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[.B2172]+7" office:value-type="float" office:value="15204" calcext:value-type="float">
            <text:p>15204</text:p>
          </table:table-cell>
          <table:table-cell office:value-type="float" office:value="8640000" calcext:value-type="float">
            <text:p>8640000</text:p>
          </table:table-cell>
          <table:table-cell table:formula="of:=[.B2173]/[.C2173]" office:value-type="float" office:value="0.00175972222222222" calcext:value-type="float">
            <text:p>0,00175972222222222000</text:p>
          </table:table-cell>
          <table:table-cell table:formula="of:=[.D2174]-[.D217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[.B2173]+7" office:value-type="float" office:value="15211" calcext:value-type="float">
            <text:p>15211</text:p>
          </table:table-cell>
          <table:table-cell office:value-type="float" office:value="8640000" calcext:value-type="float">
            <text:p>8640000</text:p>
          </table:table-cell>
          <table:table-cell table:formula="of:=[.B2174]/[.C2174]" office:value-type="float" office:value="0.00176053240740741" calcext:value-type="float">
            <text:p>0,00176053240740741000</text:p>
          </table:table-cell>
          <table:table-cell table:formula="of:=[.D2175]-[.D217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[.B2174]+7" office:value-type="float" office:value="15218" calcext:value-type="float">
            <text:p>15218</text:p>
          </table:table-cell>
          <table:table-cell office:value-type="float" office:value="8640000" calcext:value-type="float">
            <text:p>8640000</text:p>
          </table:table-cell>
          <table:table-cell table:formula="of:=[.B2175]/[.C2175]" office:value-type="float" office:value="0.00176134259259259" calcext:value-type="float">
            <text:p>0,00176134259259259000</text:p>
          </table:table-cell>
          <table:table-cell table:formula="of:=[.D2176]-[.D217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[.B2175]+7" office:value-type="float" office:value="15225" calcext:value-type="float">
            <text:p>15225</text:p>
          </table:table-cell>
          <table:table-cell office:value-type="float" office:value="8640000" calcext:value-type="float">
            <text:p>8640000</text:p>
          </table:table-cell>
          <table:table-cell table:formula="of:=[.B2176]/[.C2176]" office:value-type="float" office:value="0.00176215277777778" calcext:value-type="float">
            <text:p>0,00176215277777778000</text:p>
          </table:table-cell>
          <table:table-cell table:formula="of:=[.D2177]-[.D217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[.B2176]+7" office:value-type="float" office:value="15232" calcext:value-type="float">
            <text:p>15232</text:p>
          </table:table-cell>
          <table:table-cell office:value-type="float" office:value="8640000" calcext:value-type="float">
            <text:p>8640000</text:p>
          </table:table-cell>
          <table:table-cell table:formula="of:=[.B2177]/[.C2177]" office:value-type="float" office:value="0.00176296296296296" calcext:value-type="float">
            <text:p>0,00176296296296296000</text:p>
          </table:table-cell>
          <table:table-cell table:formula="of:=[.D2178]-[.D217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table:formula="of:=[.B2177]+7" office:value-type="float" office:value="15239" calcext:value-type="float">
            <text:p>15239</text:p>
          </table:table-cell>
          <table:table-cell office:value-type="float" office:value="8640000" calcext:value-type="float">
            <text:p>8640000</text:p>
          </table:table-cell>
          <table:table-cell table:formula="of:=[.B2178]/[.C2178]" office:value-type="float" office:value="0.00176377314814815" calcext:value-type="float">
            <text:p>0,00176377314814815000</text:p>
          </table:table-cell>
          <table:table-cell table:formula="of:=[.D2179]-[.D217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[.B2178]+7" office:value-type="float" office:value="15246" calcext:value-type="float">
            <text:p>15246</text:p>
          </table:table-cell>
          <table:table-cell office:value-type="float" office:value="8640000" calcext:value-type="float">
            <text:p>8640000</text:p>
          </table:table-cell>
          <table:table-cell table:formula="of:=[.B2179]/[.C2179]" office:value-type="float" office:value="0.00176458333333333" calcext:value-type="float">
            <text:p>0,00176458333333333000</text:p>
          </table:table-cell>
          <table:table-cell table:formula="of:=[.D2180]-[.D217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table:formula="of:=[.B2179]+7" office:value-type="float" office:value="15253" calcext:value-type="float">
            <text:p>15253</text:p>
          </table:table-cell>
          <table:table-cell office:value-type="float" office:value="8640000" calcext:value-type="float">
            <text:p>8640000</text:p>
          </table:table-cell>
          <table:table-cell table:formula="of:=[.B2180]/[.C2180]" office:value-type="float" office:value="0.00176539351851852" calcext:value-type="float">
            <text:p>0,00176539351851852000</text:p>
          </table:table-cell>
          <table:table-cell table:formula="of:=[.D2181]-[.D218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[.B2180]+7" office:value-type="float" office:value="15260" calcext:value-type="float">
            <text:p>15260</text:p>
          </table:table-cell>
          <table:table-cell office:value-type="float" office:value="8640000" calcext:value-type="float">
            <text:p>8640000</text:p>
          </table:table-cell>
          <table:table-cell table:formula="of:=[.B2181]/[.C2181]" office:value-type="float" office:value="0.0017662037037037" calcext:value-type="float">
            <text:p>0,00176620370370370000</text:p>
          </table:table-cell>
          <table:table-cell table:formula="of:=[.D2182]-[.D218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table:formula="of:=[.B2181]+7" office:value-type="float" office:value="15267" calcext:value-type="float">
            <text:p>15267</text:p>
          </table:table-cell>
          <table:table-cell office:value-type="float" office:value="8640000" calcext:value-type="float">
            <text:p>8640000</text:p>
          </table:table-cell>
          <table:table-cell table:formula="of:=[.B2182]/[.C2182]" office:value-type="float" office:value="0.00176701388888889" calcext:value-type="float">
            <text:p>0,00176701388888889000</text:p>
          </table:table-cell>
          <table:table-cell table:formula="of:=[.D2183]-[.D218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table:formula="of:=[.B2182]+7" office:value-type="float" office:value="15274" calcext:value-type="float">
            <text:p>15274</text:p>
          </table:table-cell>
          <table:table-cell office:value-type="float" office:value="8640000" calcext:value-type="float">
            <text:p>8640000</text:p>
          </table:table-cell>
          <table:table-cell table:formula="of:=[.B2183]/[.C2183]" office:value-type="float" office:value="0.00176782407407407" calcext:value-type="float">
            <text:p>0,00176782407407407000</text:p>
          </table:table-cell>
          <table:table-cell table:formula="of:=[.D2184]-[.D218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[.B2183]+7" office:value-type="float" office:value="15281" calcext:value-type="float">
            <text:p>15281</text:p>
          </table:table-cell>
          <table:table-cell office:value-type="float" office:value="8640000" calcext:value-type="float">
            <text:p>8640000</text:p>
          </table:table-cell>
          <table:table-cell table:formula="of:=[.B2184]/[.C2184]" office:value-type="float" office:value="0.00176863425925926" calcext:value-type="float">
            <text:p>0,00176863425925926000</text:p>
          </table:table-cell>
          <table:table-cell table:formula="of:=[.D2185]-[.D218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[.B2184]+7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2185]/[.C2185]" office:value-type="float" office:value="0.00176944444444444" calcext:value-type="float">
            <text:p>0,00176944444444444000</text:p>
          </table:table-cell>
          <table:table-cell table:formula="of:=[.D2186]-[.D218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[.B2185]+7" office:value-type="float" office:value="15295" calcext:value-type="float">
            <text:p>15295</text:p>
          </table:table-cell>
          <table:table-cell office:value-type="float" office:value="8640000" calcext:value-type="float">
            <text:p>8640000</text:p>
          </table:table-cell>
          <table:table-cell table:formula="of:=[.B2186]/[.C2186]" office:value-type="float" office:value="0.00177025462962963" calcext:value-type="float">
            <text:p>0,00177025462962963000</text:p>
          </table:table-cell>
          <table:table-cell table:formula="of:=[.D2187]-[.D218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[.B2186]+7" office:value-type="float" office:value="15302" calcext:value-type="float">
            <text:p>15302</text:p>
          </table:table-cell>
          <table:table-cell office:value-type="float" office:value="8640000" calcext:value-type="float">
            <text:p>8640000</text:p>
          </table:table-cell>
          <table:table-cell table:formula="of:=[.B2187]/[.C2187]" office:value-type="float" office:value="0.00177106481481481" calcext:value-type="float">
            <text:p>0,00177106481481481000</text:p>
          </table:table-cell>
          <table:table-cell table:formula="of:=[.D2188]-[.D218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table:formula="of:=[.B2187]+7" office:value-type="float" office:value="15309" calcext:value-type="float">
            <text:p>15309</text:p>
          </table:table-cell>
          <table:table-cell office:value-type="float" office:value="8640000" calcext:value-type="float">
            <text:p>8640000</text:p>
          </table:table-cell>
          <table:table-cell table:formula="of:=[.B2188]/[.C2188]" office:value-type="float" office:value="0.001771875" calcext:value-type="float">
            <text:p>0,00177187500000000000</text:p>
          </table:table-cell>
          <table:table-cell table:formula="of:=[.D2189]-[.D218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table:formula="of:=[.B2188]+7" office:value-type="float" office:value="15316" calcext:value-type="float">
            <text:p>15316</text:p>
          </table:table-cell>
          <table:table-cell office:value-type="float" office:value="8640000" calcext:value-type="float">
            <text:p>8640000</text:p>
          </table:table-cell>
          <table:table-cell table:formula="of:=[.B2189]/[.C2189]" office:value-type="float" office:value="0.00177268518518519" calcext:value-type="float">
            <text:p>0,00177268518518518000</text:p>
          </table:table-cell>
          <table:table-cell table:formula="of:=[.D2190]-[.D218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table:formula="of:=[.B2189]+7" office:value-type="float" office:value="15323" calcext:value-type="float">
            <text:p>15323</text:p>
          </table:table-cell>
          <table:table-cell office:value-type="float" office:value="8640000" calcext:value-type="float">
            <text:p>8640000</text:p>
          </table:table-cell>
          <table:table-cell table:formula="of:=[.B2190]/[.C2190]" office:value-type="float" office:value="0.00177349537037037" calcext:value-type="float">
            <text:p>0,00177349537037037000</text:p>
          </table:table-cell>
          <table:table-cell table:formula="of:=[.D2191]-[.D219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[.B2190]+7" office:value-type="float" office:value="15330" calcext:value-type="float">
            <text:p>15330</text:p>
          </table:table-cell>
          <table:table-cell office:value-type="float" office:value="8640000" calcext:value-type="float">
            <text:p>8640000</text:p>
          </table:table-cell>
          <table:table-cell table:formula="of:=[.B2191]/[.C2191]" office:value-type="float" office:value="0.00177430555555556" calcext:value-type="float">
            <text:p>0,00177430555555556000</text:p>
          </table:table-cell>
          <table:table-cell table:formula="of:=[.D2192]-[.D219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table:formula="of:=[.B2191]+7" office:value-type="float" office:value="15337" calcext:value-type="float">
            <text:p>15337</text:p>
          </table:table-cell>
          <table:table-cell office:value-type="float" office:value="8640000" calcext:value-type="float">
            <text:p>8640000</text:p>
          </table:table-cell>
          <table:table-cell table:formula="of:=[.B2192]/[.C2192]" office:value-type="float" office:value="0.00177511574074074" calcext:value-type="float">
            <text:p>0,00177511574074074000</text:p>
          </table:table-cell>
          <table:table-cell table:formula="of:=[.D2193]-[.D219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[.B2192]+7" office:value-type="float" office:value="15344" calcext:value-type="float">
            <text:p>15344</text:p>
          </table:table-cell>
          <table:table-cell office:value-type="float" office:value="8640000" calcext:value-type="float">
            <text:p>8640000</text:p>
          </table:table-cell>
          <table:table-cell table:formula="of:=[.B2193]/[.C2193]" office:value-type="float" office:value="0.00177592592592593" calcext:value-type="float">
            <text:p>0,00177592592592593000</text:p>
          </table:table-cell>
          <table:table-cell table:formula="of:=[.D2194]-[.D219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table:formula="of:=[.B2193]+7" office:value-type="float" office:value="15351" calcext:value-type="float">
            <text:p>15351</text:p>
          </table:table-cell>
          <table:table-cell office:value-type="float" office:value="8640000" calcext:value-type="float">
            <text:p>8640000</text:p>
          </table:table-cell>
          <table:table-cell table:formula="of:=[.B2194]/[.C2194]" office:value-type="float" office:value="0.00177673611111111" calcext:value-type="float">
            <text:p>0,00177673611111111000</text:p>
          </table:table-cell>
          <table:table-cell table:formula="of:=[.D2195]-[.D219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table:formula="of:=[.B2194]+7" office:value-type="float" office:value="15358" calcext:value-type="float">
            <text:p>15358</text:p>
          </table:table-cell>
          <table:table-cell office:value-type="float" office:value="8640000" calcext:value-type="float">
            <text:p>8640000</text:p>
          </table:table-cell>
          <table:table-cell table:formula="of:=[.B2195]/[.C2195]" office:value-type="float" office:value="0.0017775462962963" calcext:value-type="float">
            <text:p>0,00177754629629630000</text:p>
          </table:table-cell>
          <table:table-cell table:formula="of:=[.D2196]-[.D219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table:formula="of:=[.B2195]+7" office:value-type="float" office:value="15365" calcext:value-type="float">
            <text:p>15365</text:p>
          </table:table-cell>
          <table:table-cell office:value-type="float" office:value="8640000" calcext:value-type="float">
            <text:p>8640000</text:p>
          </table:table-cell>
          <table:table-cell table:formula="of:=[.B2196]/[.C2196]" office:value-type="float" office:value="0.00177835648148148" calcext:value-type="float">
            <text:p>0,00177835648148148000</text:p>
          </table:table-cell>
          <table:table-cell table:formula="of:=[.D2197]-[.D219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table:formula="of:=[.B2196]+7" office:value-type="float" office:value="15372" calcext:value-type="float">
            <text:p>15372</text:p>
          </table:table-cell>
          <table:table-cell office:value-type="float" office:value="8640000" calcext:value-type="float">
            <text:p>8640000</text:p>
          </table:table-cell>
          <table:table-cell table:formula="of:=[.B2197]/[.C2197]" office:value-type="float" office:value="0.00177916666666667" calcext:value-type="float">
            <text:p>0,00177916666666667000</text:p>
          </table:table-cell>
          <table:table-cell table:formula="of:=[.D2198]-[.D219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[.B2197]+7" office:value-type="float" office:value="15379" calcext:value-type="float">
            <text:p>15379</text:p>
          </table:table-cell>
          <table:table-cell office:value-type="float" office:value="8640000" calcext:value-type="float">
            <text:p>8640000</text:p>
          </table:table-cell>
          <table:table-cell table:formula="of:=[.B2198]/[.C2198]" office:value-type="float" office:value="0.00177997685185185" calcext:value-type="float">
            <text:p>0,00177997685185185000</text:p>
          </table:table-cell>
          <table:table-cell table:formula="of:=[.D2199]-[.D219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[.B2198]+7" office:value-type="float" office:value="15386" calcext:value-type="float">
            <text:p>15386</text:p>
          </table:table-cell>
          <table:table-cell office:value-type="float" office:value="8640000" calcext:value-type="float">
            <text:p>8640000</text:p>
          </table:table-cell>
          <table:table-cell table:formula="of:=[.B2199]/[.C2199]" office:value-type="float" office:value="0.00178078703703704" calcext:value-type="float">
            <text:p>0,00178078703703704000</text:p>
          </table:table-cell>
          <table:table-cell table:formula="of:=[.D2200]-[.D219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[.B2199]+7" office:value-type="float" office:value="15393" calcext:value-type="float">
            <text:p>15393</text:p>
          </table:table-cell>
          <table:table-cell office:value-type="float" office:value="8640000" calcext:value-type="float">
            <text:p>8640000</text:p>
          </table:table-cell>
          <table:table-cell table:formula="of:=[.B2200]/[.C2200]" office:value-type="float" office:value="0.00178159722222222" calcext:value-type="float">
            <text:p>0,00178159722222222000</text:p>
          </table:table-cell>
          <table:table-cell table:formula="of:=[.D2201]-[.D220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B2200]+7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2201]/[.C2201]" office:value-type="float" office:value="0.00178240740740741" calcext:value-type="float">
            <text:p>0,00178240740740741000</text:p>
          </table:table-cell>
          <table:table-cell table:formula="of:=[.D2202]-[.D220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table:formula="of:=[.B2201]+7" office:value-type="float" office:value="15407" calcext:value-type="float">
            <text:p>15407</text:p>
          </table:table-cell>
          <table:table-cell office:value-type="float" office:value="8640000" calcext:value-type="float">
            <text:p>8640000</text:p>
          </table:table-cell>
          <table:table-cell table:formula="of:=[.B2202]/[.C2202]" office:value-type="float" office:value="0.00178321759259259" calcext:value-type="float">
            <text:p>0,00178321759259259000</text:p>
          </table:table-cell>
          <table:table-cell table:formula="of:=[.D2203]-[.D220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[.B2202]+7" office:value-type="float" office:value="15414" calcext:value-type="float">
            <text:p>15414</text:p>
          </table:table-cell>
          <table:table-cell office:value-type="float" office:value="8640000" calcext:value-type="float">
            <text:p>8640000</text:p>
          </table:table-cell>
          <table:table-cell table:formula="of:=[.B2203]/[.C2203]" office:value-type="float" office:value="0.00178402777777778" calcext:value-type="float">
            <text:p>0,00178402777777778000</text:p>
          </table:table-cell>
          <table:table-cell table:formula="of:=[.D2204]-[.D220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[.B2203]+7" office:value-type="float" office:value="15421" calcext:value-type="float">
            <text:p>15421</text:p>
          </table:table-cell>
          <table:table-cell office:value-type="float" office:value="8640000" calcext:value-type="float">
            <text:p>8640000</text:p>
          </table:table-cell>
          <table:table-cell table:formula="of:=[.B2204]/[.C2204]" office:value-type="float" office:value="0.00178483796296296" calcext:value-type="float">
            <text:p>0,00178483796296296000</text:p>
          </table:table-cell>
          <table:table-cell table:formula="of:=[.D2205]-[.D220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table:formula="of:=[.B2204]+7" office:value-type="float" office:value="15428" calcext:value-type="float">
            <text:p>15428</text:p>
          </table:table-cell>
          <table:table-cell office:value-type="float" office:value="8640000" calcext:value-type="float">
            <text:p>8640000</text:p>
          </table:table-cell>
          <table:table-cell table:formula="of:=[.B2205]/[.C2205]" office:value-type="float" office:value="0.00178564814814815" calcext:value-type="float">
            <text:p>0,00178564814814815000</text:p>
          </table:table-cell>
          <table:table-cell table:formula="of:=[.D2206]-[.D220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[.B2205]+7" office:value-type="float" office:value="15435" calcext:value-type="float">
            <text:p>15435</text:p>
          </table:table-cell>
          <table:table-cell office:value-type="float" office:value="8640000" calcext:value-type="float">
            <text:p>8640000</text:p>
          </table:table-cell>
          <table:table-cell table:formula="of:=[.B2206]/[.C2206]" office:value-type="float" office:value="0.00178645833333333" calcext:value-type="float">
            <text:p>0,00178645833333333000</text:p>
          </table:table-cell>
          <table:table-cell table:formula="of:=[.D2207]-[.D220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[.B2206]+7" office:value-type="float" office:value="15442" calcext:value-type="float">
            <text:p>15442</text:p>
          </table:table-cell>
          <table:table-cell office:value-type="float" office:value="8640000" calcext:value-type="float">
            <text:p>8640000</text:p>
          </table:table-cell>
          <table:table-cell table:formula="of:=[.B2207]/[.C2207]" office:value-type="float" office:value="0.00178726851851852" calcext:value-type="float">
            <text:p>0,00178726851851852000</text:p>
          </table:table-cell>
          <table:table-cell table:formula="of:=[.D2208]-[.D220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[.B2207]+7" office:value-type="float" office:value="15449" calcext:value-type="float">
            <text:p>15449</text:p>
          </table:table-cell>
          <table:table-cell office:value-type="float" office:value="8640000" calcext:value-type="float">
            <text:p>8640000</text:p>
          </table:table-cell>
          <table:table-cell table:formula="of:=[.B2208]/[.C2208]" office:value-type="float" office:value="0.0017880787037037" calcext:value-type="float">
            <text:p>0,00178807870370370000</text:p>
          </table:table-cell>
          <table:table-cell table:formula="of:=[.D2209]-[.D220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table:formula="of:=[.B2208]+7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2209]/[.C2209]" office:value-type="float" office:value="0.00178888888888889" calcext:value-type="float">
            <text:p>0,00178888888888889000</text:p>
          </table:table-cell>
          <table:table-cell table:formula="of:=[.D2210]-[.D220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[.B2209]+7" office:value-type="float" office:value="15463" calcext:value-type="float">
            <text:p>15463</text:p>
          </table:table-cell>
          <table:table-cell office:value-type="float" office:value="8640000" calcext:value-type="float">
            <text:p>8640000</text:p>
          </table:table-cell>
          <table:table-cell table:formula="of:=[.B2210]/[.C2210]" office:value-type="float" office:value="0.00178969907407407" calcext:value-type="float">
            <text:p>0,00178969907407407000</text:p>
          </table:table-cell>
          <table:table-cell table:formula="of:=[.D2211]-[.D221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table:formula="of:=[.B2210]+7" office:value-type="float" office:value="15470" calcext:value-type="float">
            <text:p>15470</text:p>
          </table:table-cell>
          <table:table-cell office:value-type="float" office:value="8640000" calcext:value-type="float">
            <text:p>8640000</text:p>
          </table:table-cell>
          <table:table-cell table:formula="of:=[.B2211]/[.C2211]" office:value-type="float" office:value="0.00179050925925926" calcext:value-type="float">
            <text:p>0,00179050925925926000</text:p>
          </table:table-cell>
          <table:table-cell table:formula="of:=[.D2212]-[.D221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[.B2211]+7" office:value-type="float" office:value="15477" calcext:value-type="float">
            <text:p>15477</text:p>
          </table:table-cell>
          <table:table-cell office:value-type="float" office:value="8640000" calcext:value-type="float">
            <text:p>8640000</text:p>
          </table:table-cell>
          <table:table-cell table:formula="of:=[.B2212]/[.C2212]" office:value-type="float" office:value="0.00179131944444444" calcext:value-type="float">
            <text:p>0,00179131944444444000</text:p>
          </table:table-cell>
          <table:table-cell table:formula="of:=[.D2213]-[.D221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[.B2212]+7" office:value-type="float" office:value="15484" calcext:value-type="float">
            <text:p>15484</text:p>
          </table:table-cell>
          <table:table-cell office:value-type="float" office:value="8640000" calcext:value-type="float">
            <text:p>8640000</text:p>
          </table:table-cell>
          <table:table-cell table:formula="of:=[.B2213]/[.C2213]" office:value-type="float" office:value="0.00179212962962963" calcext:value-type="float">
            <text:p>0,00179212962962963000</text:p>
          </table:table-cell>
          <table:table-cell table:formula="of:=[.D2214]-[.D221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table:formula="of:=[.B2213]+7" office:value-type="float" office:value="15491" calcext:value-type="float">
            <text:p>15491</text:p>
          </table:table-cell>
          <table:table-cell office:value-type="float" office:value="8640000" calcext:value-type="float">
            <text:p>8640000</text:p>
          </table:table-cell>
          <table:table-cell table:formula="of:=[.B2214]/[.C2214]" office:value-type="float" office:value="0.00179293981481482" calcext:value-type="float">
            <text:p>0,00179293981481482000</text:p>
          </table:table-cell>
          <table:table-cell table:formula="of:=[.D2215]-[.D221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[.B2214]+7" office:value-type="float" office:value="15498" calcext:value-type="float">
            <text:p>15498</text:p>
          </table:table-cell>
          <table:table-cell office:value-type="float" office:value="8640000" calcext:value-type="float">
            <text:p>8640000</text:p>
          </table:table-cell>
          <table:table-cell table:formula="of:=[.B2215]/[.C2215]" office:value-type="float" office:value="0.00179375" calcext:value-type="float">
            <text:p>0,00179375000000000000</text:p>
          </table:table-cell>
          <table:table-cell table:formula="of:=[.D2216]-[.D221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[.B2215]+7" office:value-type="float" office:value="15505" calcext:value-type="float">
            <text:p>15505</text:p>
          </table:table-cell>
          <table:table-cell office:value-type="float" office:value="8640000" calcext:value-type="float">
            <text:p>8640000</text:p>
          </table:table-cell>
          <table:table-cell table:formula="of:=[.B2216]/[.C2216]" office:value-type="float" office:value="0.00179456018518519" calcext:value-type="float">
            <text:p>0,00179456018518519000</text:p>
          </table:table-cell>
          <table:table-cell table:formula="of:=[.D2217]-[.D221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[.B2216]+7" office:value-type="float" office:value="15512" calcext:value-type="float">
            <text:p>15512</text:p>
          </table:table-cell>
          <table:table-cell office:value-type="float" office:value="8640000" calcext:value-type="float">
            <text:p>8640000</text:p>
          </table:table-cell>
          <table:table-cell table:formula="of:=[.B2217]/[.C2217]" office:value-type="float" office:value="0.00179537037037037" calcext:value-type="float">
            <text:p>0,00179537037037037000</text:p>
          </table:table-cell>
          <table:table-cell table:formula="of:=[.D2218]-[.D221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table:formula="of:=[.B2217]+7" office:value-type="float" office:value="15519" calcext:value-type="float">
            <text:p>15519</text:p>
          </table:table-cell>
          <table:table-cell office:value-type="float" office:value="8640000" calcext:value-type="float">
            <text:p>8640000</text:p>
          </table:table-cell>
          <table:table-cell table:formula="of:=[.B2218]/[.C2218]" office:value-type="float" office:value="0.00179618055555556" calcext:value-type="float">
            <text:p>0,00179618055555556000</text:p>
          </table:table-cell>
          <table:table-cell table:formula="of:=[.D2219]-[.D221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table:formula="of:=[.B2218]+7" office:value-type="float" office:value="15526" calcext:value-type="float">
            <text:p>15526</text:p>
          </table:table-cell>
          <table:table-cell office:value-type="float" office:value="8640000" calcext:value-type="float">
            <text:p>8640000</text:p>
          </table:table-cell>
          <table:table-cell table:formula="of:=[.B2219]/[.C2219]" office:value-type="float" office:value="0.00179699074074074" calcext:value-type="float">
            <text:p>0,00179699074074074000</text:p>
          </table:table-cell>
          <table:table-cell table:formula="of:=[.D2220]-[.D221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table:formula="of:=[.B2219]+7" office:value-type="float" office:value="15533" calcext:value-type="float">
            <text:p>15533</text:p>
          </table:table-cell>
          <table:table-cell office:value-type="float" office:value="8640000" calcext:value-type="float">
            <text:p>8640000</text:p>
          </table:table-cell>
          <table:table-cell table:formula="of:=[.B2220]/[.C2220]" office:value-type="float" office:value="0.00179780092592593" calcext:value-type="float">
            <text:p>0,00179780092592593000</text:p>
          </table:table-cell>
          <table:table-cell table:formula="of:=[.D2221]-[.D222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[.B2220]+7" office:value-type="float" office:value="15540" calcext:value-type="float">
            <text:p>15540</text:p>
          </table:table-cell>
          <table:table-cell office:value-type="float" office:value="8640000" calcext:value-type="float">
            <text:p>8640000</text:p>
          </table:table-cell>
          <table:table-cell table:formula="of:=[.B2221]/[.C2221]" office:value-type="float" office:value="0.00179861111111111" calcext:value-type="float">
            <text:p>0,00179861111111111000</text:p>
          </table:table-cell>
          <table:table-cell table:formula="of:=[.D2222]-[.D222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[.B2221]+7" office:value-type="float" office:value="15547" calcext:value-type="float">
            <text:p>15547</text:p>
          </table:table-cell>
          <table:table-cell office:value-type="float" office:value="8640000" calcext:value-type="float">
            <text:p>8640000</text:p>
          </table:table-cell>
          <table:table-cell table:formula="of:=[.B2222]/[.C2222]" office:value-type="float" office:value="0.0017994212962963" calcext:value-type="float">
            <text:p>0,00179942129629630000</text:p>
          </table:table-cell>
          <table:table-cell table:formula="of:=[.D2223]-[.D222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table:formula="of:=[.B2222]+7" office:value-type="float" office:value="15554" calcext:value-type="float">
            <text:p>15554</text:p>
          </table:table-cell>
          <table:table-cell office:value-type="float" office:value="8640000" calcext:value-type="float">
            <text:p>8640000</text:p>
          </table:table-cell>
          <table:table-cell table:formula="of:=[.B2223]/[.C2223]" office:value-type="float" office:value="0.00180023148148148" calcext:value-type="float">
            <text:p>0,00180023148148148000</text:p>
          </table:table-cell>
          <table:table-cell table:formula="of:=[.D2224]-[.D222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[.B2223]+7" office:value-type="float" office:value="15561" calcext:value-type="float">
            <text:p>15561</text:p>
          </table:table-cell>
          <table:table-cell office:value-type="float" office:value="8640000" calcext:value-type="float">
            <text:p>8640000</text:p>
          </table:table-cell>
          <table:table-cell table:formula="of:=[.B2224]/[.C2224]" office:value-type="float" office:value="0.00180104166666667" calcext:value-type="float">
            <text:p>0,00180104166666667000</text:p>
          </table:table-cell>
          <table:table-cell table:formula="of:=[.D2225]-[.D222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table:formula="of:=[.B2224]+7" office:value-type="float" office:value="15568" calcext:value-type="float">
            <text:p>15568</text:p>
          </table:table-cell>
          <table:table-cell office:value-type="float" office:value="8640000" calcext:value-type="float">
            <text:p>8640000</text:p>
          </table:table-cell>
          <table:table-cell table:formula="of:=[.B2225]/[.C2225]" office:value-type="float" office:value="0.00180185185185185" calcext:value-type="float">
            <text:p>0,00180185185185185000</text:p>
          </table:table-cell>
          <table:table-cell table:formula="of:=[.D2226]-[.D222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[.B2225]+7" office:value-type="float" office:value="15575" calcext:value-type="float">
            <text:p>15575</text:p>
          </table:table-cell>
          <table:table-cell office:value-type="float" office:value="8640000" calcext:value-type="float">
            <text:p>8640000</text:p>
          </table:table-cell>
          <table:table-cell table:formula="of:=[.B2226]/[.C2226]" office:value-type="float" office:value="0.00180266203703704" calcext:value-type="float">
            <text:p>0,00180266203703704000</text:p>
          </table:table-cell>
          <table:table-cell table:formula="of:=[.D2227]-[.D222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[.B2226]+7" office:value-type="float" office:value="15582" calcext:value-type="float">
            <text:p>15582</text:p>
          </table:table-cell>
          <table:table-cell office:value-type="float" office:value="8640000" calcext:value-type="float">
            <text:p>8640000</text:p>
          </table:table-cell>
          <table:table-cell table:formula="of:=[.B2227]/[.C2227]" office:value-type="float" office:value="0.00180347222222222" calcext:value-type="float">
            <text:p>0,00180347222222222000</text:p>
          </table:table-cell>
          <table:table-cell table:formula="of:=[.D2228]-[.D222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table:formula="of:=[.B2227]+7" office:value-type="float" office:value="15589" calcext:value-type="float">
            <text:p>15589</text:p>
          </table:table-cell>
          <table:table-cell office:value-type="float" office:value="8640000" calcext:value-type="float">
            <text:p>8640000</text:p>
          </table:table-cell>
          <table:table-cell table:formula="of:=[.B2228]/[.C2228]" office:value-type="float" office:value="0.00180428240740741" calcext:value-type="float">
            <text:p>0,00180428240740741000</text:p>
          </table:table-cell>
          <table:table-cell table:formula="of:=[.D2229]-[.D222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[.B2228]+7" office:value-type="float" office:value="15596" calcext:value-type="float">
            <text:p>15596</text:p>
          </table:table-cell>
          <table:table-cell office:value-type="float" office:value="8640000" calcext:value-type="float">
            <text:p>8640000</text:p>
          </table:table-cell>
          <table:table-cell table:formula="of:=[.B2229]/[.C2229]" office:value-type="float" office:value="0.00180509259259259" calcext:value-type="float">
            <text:p>0,00180509259259259000</text:p>
          </table:table-cell>
          <table:table-cell table:formula="of:=[.D2230]-[.D222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[.B2229]+7" office:value-type="float" office:value="15603" calcext:value-type="float">
            <text:p>15603</text:p>
          </table:table-cell>
          <table:table-cell office:value-type="float" office:value="8640000" calcext:value-type="float">
            <text:p>8640000</text:p>
          </table:table-cell>
          <table:table-cell table:formula="of:=[.B2230]/[.C2230]" office:value-type="float" office:value="0.00180590277777778" calcext:value-type="float">
            <text:p>0,00180590277777778000</text:p>
          </table:table-cell>
          <table:table-cell table:formula="of:=[.D2231]-[.D223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[.B2230]+7" office:value-type="float" office:value="15610" calcext:value-type="float">
            <text:p>15610</text:p>
          </table:table-cell>
          <table:table-cell office:value-type="float" office:value="8640000" calcext:value-type="float">
            <text:p>8640000</text:p>
          </table:table-cell>
          <table:table-cell table:formula="of:=[.B2231]/[.C2231]" office:value-type="float" office:value="0.00180671296296296" calcext:value-type="float">
            <text:p>0,00180671296296296000</text:p>
          </table:table-cell>
          <table:table-cell table:formula="of:=[.D2232]-[.D223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[.B2231]+7" office:value-type="float" office:value="15617" calcext:value-type="float">
            <text:p>15617</text:p>
          </table:table-cell>
          <table:table-cell office:value-type="float" office:value="8640000" calcext:value-type="float">
            <text:p>8640000</text:p>
          </table:table-cell>
          <table:table-cell table:formula="of:=[.B2232]/[.C2232]" office:value-type="float" office:value="0.00180752314814815" calcext:value-type="float">
            <text:p>0,00180752314814815000</text:p>
          </table:table-cell>
          <table:table-cell table:formula="of:=[.D2233]-[.D223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table:formula="of:=[.B2232]+7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2233]/[.C2233]" office:value-type="float" office:value="0.00180833333333333" calcext:value-type="float">
            <text:p>0,00180833333333333000</text:p>
          </table:table-cell>
          <table:table-cell table:formula="of:=[.D2234]-[.D223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[.B2233]+7" office:value-type="float" office:value="15631" calcext:value-type="float">
            <text:p>15631</text:p>
          </table:table-cell>
          <table:table-cell office:value-type="float" office:value="8640000" calcext:value-type="float">
            <text:p>8640000</text:p>
          </table:table-cell>
          <table:table-cell table:formula="of:=[.B2234]/[.C2234]" office:value-type="float" office:value="0.00180914351851852" calcext:value-type="float">
            <text:p>0,00180914351851852000</text:p>
          </table:table-cell>
          <table:table-cell table:formula="of:=[.D2235]-[.D223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[.B2234]+7" office:value-type="float" office:value="15638" calcext:value-type="float">
            <text:p>15638</text:p>
          </table:table-cell>
          <table:table-cell office:value-type="float" office:value="8640000" calcext:value-type="float">
            <text:p>8640000</text:p>
          </table:table-cell>
          <table:table-cell table:formula="of:=[.B2235]/[.C2235]" office:value-type="float" office:value="0.0018099537037037" calcext:value-type="float">
            <text:p>0,00180995370370370000</text:p>
          </table:table-cell>
          <table:table-cell table:formula="of:=[.D2236]-[.D223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[.B2235]+7" office:value-type="float" office:value="15645" calcext:value-type="float">
            <text:p>15645</text:p>
          </table:table-cell>
          <table:table-cell office:value-type="float" office:value="8640000" calcext:value-type="float">
            <text:p>8640000</text:p>
          </table:table-cell>
          <table:table-cell table:formula="of:=[.B2236]/[.C2236]" office:value-type="float" office:value="0.00181076388888889" calcext:value-type="float">
            <text:p>0,00181076388888889000</text:p>
          </table:table-cell>
          <table:table-cell table:formula="of:=[.D2237]-[.D223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table:formula="of:=[.B2236]+7" office:value-type="float" office:value="15652" calcext:value-type="float">
            <text:p>15652</text:p>
          </table:table-cell>
          <table:table-cell office:value-type="float" office:value="8640000" calcext:value-type="float">
            <text:p>8640000</text:p>
          </table:table-cell>
          <table:table-cell table:formula="of:=[.B2237]/[.C2237]" office:value-type="float" office:value="0.00181157407407407" calcext:value-type="float">
            <text:p>0,00181157407407407000</text:p>
          </table:table-cell>
          <table:table-cell table:formula="of:=[.D2238]-[.D223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table:formula="of:=[.B2237]+7" office:value-type="float" office:value="15659" calcext:value-type="float">
            <text:p>15659</text:p>
          </table:table-cell>
          <table:table-cell office:value-type="float" office:value="8640000" calcext:value-type="float">
            <text:p>8640000</text:p>
          </table:table-cell>
          <table:table-cell table:formula="of:=[.B2238]/[.C2238]" office:value-type="float" office:value="0.00181238425925926" calcext:value-type="float">
            <text:p>0,00181238425925926000</text:p>
          </table:table-cell>
          <table:table-cell table:formula="of:=[.D2239]-[.D223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table:formula="of:=[.B2238]+7" office:value-type="float" office:value="15666" calcext:value-type="float">
            <text:p>15666</text:p>
          </table:table-cell>
          <table:table-cell office:value-type="float" office:value="8640000" calcext:value-type="float">
            <text:p>8640000</text:p>
          </table:table-cell>
          <table:table-cell table:formula="of:=[.B2239]/[.C2239]" office:value-type="float" office:value="0.00181319444444444" calcext:value-type="float">
            <text:p>0,00181319444444444000</text:p>
          </table:table-cell>
          <table:table-cell table:formula="of:=[.D2240]-[.D223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table:formula="of:=[.B2239]+7" office:value-type="float" office:value="15673" calcext:value-type="float">
            <text:p>15673</text:p>
          </table:table-cell>
          <table:table-cell office:value-type="float" office:value="8640000" calcext:value-type="float">
            <text:p>8640000</text:p>
          </table:table-cell>
          <table:table-cell table:formula="of:=[.B2240]/[.C2240]" office:value-type="float" office:value="0.00181400462962963" calcext:value-type="float">
            <text:p>0,00181400462962963000</text:p>
          </table:table-cell>
          <table:table-cell table:formula="of:=[.D2241]-[.D224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table:formula="of:=[.B2240]+7" office:value-type="float" office:value="15680" calcext:value-type="float">
            <text:p>15680</text:p>
          </table:table-cell>
          <table:table-cell office:value-type="float" office:value="8640000" calcext:value-type="float">
            <text:p>8640000</text:p>
          </table:table-cell>
          <table:table-cell table:formula="of:=[.B2241]/[.C2241]" office:value-type="float" office:value="0.00181481481481482" calcext:value-type="float">
            <text:p>0,00181481481481482000</text:p>
          </table:table-cell>
          <table:table-cell table:formula="of:=[.D2242]-[.D224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[.B2241]+7" office:value-type="float" office:value="15687" calcext:value-type="float">
            <text:p>15687</text:p>
          </table:table-cell>
          <table:table-cell office:value-type="float" office:value="8640000" calcext:value-type="float">
            <text:p>8640000</text:p>
          </table:table-cell>
          <table:table-cell table:formula="of:=[.B2242]/[.C2242]" office:value-type="float" office:value="0.001815625" calcext:value-type="float">
            <text:p>0,00181562500000000000</text:p>
          </table:table-cell>
          <table:table-cell table:formula="of:=[.D2243]-[.D224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[.B2242]+7" office:value-type="float" office:value="15694" calcext:value-type="float">
            <text:p>15694</text:p>
          </table:table-cell>
          <table:table-cell office:value-type="float" office:value="8640000" calcext:value-type="float">
            <text:p>8640000</text:p>
          </table:table-cell>
          <table:table-cell table:formula="of:=[.B2243]/[.C2243]" office:value-type="float" office:value="0.00181643518518519" calcext:value-type="float">
            <text:p>0,00181643518518519000</text:p>
          </table:table-cell>
          <table:table-cell table:formula="of:=[.D2244]-[.D224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[.B2243]+7" office:value-type="float" office:value="15701" calcext:value-type="float">
            <text:p>15701</text:p>
          </table:table-cell>
          <table:table-cell office:value-type="float" office:value="8640000" calcext:value-type="float">
            <text:p>8640000</text:p>
          </table:table-cell>
          <table:table-cell table:formula="of:=[.B2244]/[.C2244]" office:value-type="float" office:value="0.00181724537037037" calcext:value-type="float">
            <text:p>0,00181724537037037000</text:p>
          </table:table-cell>
          <table:table-cell table:formula="of:=[.D2245]-[.D224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[.B2244]+7" office:value-type="float" office:value="15708" calcext:value-type="float">
            <text:p>15708</text:p>
          </table:table-cell>
          <table:table-cell office:value-type="float" office:value="8640000" calcext:value-type="float">
            <text:p>8640000</text:p>
          </table:table-cell>
          <table:table-cell table:formula="of:=[.B2245]/[.C2245]" office:value-type="float" office:value="0.00181805555555556" calcext:value-type="float">
            <text:p>0,00181805555555556000</text:p>
          </table:table-cell>
          <table:table-cell table:formula="of:=[.D2246]-[.D224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table:formula="of:=[.B2245]+7" office:value-type="float" office:value="15715" calcext:value-type="float">
            <text:p>15715</text:p>
          </table:table-cell>
          <table:table-cell office:value-type="float" office:value="8640000" calcext:value-type="float">
            <text:p>8640000</text:p>
          </table:table-cell>
          <table:table-cell table:formula="of:=[.B2246]/[.C2246]" office:value-type="float" office:value="0.00181886574074074" calcext:value-type="float">
            <text:p>0,00181886574074074000</text:p>
          </table:table-cell>
          <table:table-cell table:formula="of:=[.D2247]-[.D224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table:formula="of:=[.B2246]+7" office:value-type="float" office:value="15722" calcext:value-type="float">
            <text:p>15722</text:p>
          </table:table-cell>
          <table:table-cell office:value-type="float" office:value="8640000" calcext:value-type="float">
            <text:p>8640000</text:p>
          </table:table-cell>
          <table:table-cell table:formula="of:=[.B2247]/[.C2247]" office:value-type="float" office:value="0.00181967592592593" calcext:value-type="float">
            <text:p>0,00181967592592593000</text:p>
          </table:table-cell>
          <table:table-cell table:formula="of:=[.D2248]-[.D224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table:formula="of:=[.B2247]+7" office:value-type="float" office:value="15729" calcext:value-type="float">
            <text:p>15729</text:p>
          </table:table-cell>
          <table:table-cell office:value-type="float" office:value="8640000" calcext:value-type="float">
            <text:p>8640000</text:p>
          </table:table-cell>
          <table:table-cell table:formula="of:=[.B2248]/[.C2248]" office:value-type="float" office:value="0.00182048611111111" calcext:value-type="float">
            <text:p>0,00182048611111111000</text:p>
          </table:table-cell>
          <table:table-cell table:formula="of:=[.D2249]-[.D224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table:formula="of:=[.B2248]+7" office:value-type="float" office:value="15736" calcext:value-type="float">
            <text:p>15736</text:p>
          </table:table-cell>
          <table:table-cell office:value-type="float" office:value="8640000" calcext:value-type="float">
            <text:p>8640000</text:p>
          </table:table-cell>
          <table:table-cell table:formula="of:=[.B2249]/[.C2249]" office:value-type="float" office:value="0.0018212962962963" calcext:value-type="float">
            <text:p>0,00182129629629630000</text:p>
          </table:table-cell>
          <table:table-cell table:formula="of:=[.D2250]-[.D224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table:formula="of:=[.B2249]+7" office:value-type="float" office:value="15743" calcext:value-type="float">
            <text:p>15743</text:p>
          </table:table-cell>
          <table:table-cell office:value-type="float" office:value="8640000" calcext:value-type="float">
            <text:p>8640000</text:p>
          </table:table-cell>
          <table:table-cell table:formula="of:=[.B2250]/[.C2250]" office:value-type="float" office:value="0.00182210648148148" calcext:value-type="float">
            <text:p>0,00182210648148148000</text:p>
          </table:table-cell>
          <table:table-cell table:formula="of:=[.D2251]-[.D225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[.B2250]+7" office:value-type="float" office:value="15750" calcext:value-type="float">
            <text:p>15750</text:p>
          </table:table-cell>
          <table:table-cell office:value-type="float" office:value="8640000" calcext:value-type="float">
            <text:p>8640000</text:p>
          </table:table-cell>
          <table:table-cell table:formula="of:=[.B2251]/[.C2251]" office:value-type="float" office:value="0.00182291666666667" calcext:value-type="float">
            <text:p>0,00182291666666667000</text:p>
          </table:table-cell>
          <table:table-cell table:formula="of:=[.D2252]-[.D225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table:formula="of:=[.B2251]+7" office:value-type="float" office:value="15757" calcext:value-type="float">
            <text:p>15757</text:p>
          </table:table-cell>
          <table:table-cell office:value-type="float" office:value="8640000" calcext:value-type="float">
            <text:p>8640000</text:p>
          </table:table-cell>
          <table:table-cell table:formula="of:=[.B2252]/[.C2252]" office:value-type="float" office:value="0.00182372685185185" calcext:value-type="float">
            <text:p>0,00182372685185185000</text:p>
          </table:table-cell>
          <table:table-cell table:formula="of:=[.D2253]-[.D225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table:formula="of:=[.B2252]+7" office:value-type="float" office:value="15764" calcext:value-type="float">
            <text:p>15764</text:p>
          </table:table-cell>
          <table:table-cell office:value-type="float" office:value="8640000" calcext:value-type="float">
            <text:p>8640000</text:p>
          </table:table-cell>
          <table:table-cell table:formula="of:=[.B2253]/[.C2253]" office:value-type="float" office:value="0.00182453703703704" calcext:value-type="float">
            <text:p>0,00182453703703704000</text:p>
          </table:table-cell>
          <table:table-cell table:formula="of:=[.D2254]-[.D225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table:formula="of:=[.B2253]+7" office:value-type="float" office:value="15771" calcext:value-type="float">
            <text:p>15771</text:p>
          </table:table-cell>
          <table:table-cell office:value-type="float" office:value="8640000" calcext:value-type="float">
            <text:p>8640000</text:p>
          </table:table-cell>
          <table:table-cell table:formula="of:=[.B2254]/[.C2254]" office:value-type="float" office:value="0.00182534722222222" calcext:value-type="float">
            <text:p>0,00182534722222222000</text:p>
          </table:table-cell>
          <table:table-cell table:formula="of:=[.D2255]-[.D225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table:formula="of:=[.B2254]+7" office:value-type="float" office:value="15778" calcext:value-type="float">
            <text:p>15778</text:p>
          </table:table-cell>
          <table:table-cell office:value-type="float" office:value="8640000" calcext:value-type="float">
            <text:p>8640000</text:p>
          </table:table-cell>
          <table:table-cell table:formula="of:=[.B2255]/[.C2255]" office:value-type="float" office:value="0.00182615740740741" calcext:value-type="float">
            <text:p>0,00182615740740741000</text:p>
          </table:table-cell>
          <table:table-cell table:formula="of:=[.D2256]-[.D225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table:formula="of:=[.B2255]+7" office:value-type="float" office:value="15785" calcext:value-type="float">
            <text:p>15785</text:p>
          </table:table-cell>
          <table:table-cell office:value-type="float" office:value="8640000" calcext:value-type="float">
            <text:p>8640000</text:p>
          </table:table-cell>
          <table:table-cell table:formula="of:=[.B2256]/[.C2256]" office:value-type="float" office:value="0.00182696759259259" calcext:value-type="float">
            <text:p>0,00182696759259259000</text:p>
          </table:table-cell>
          <table:table-cell table:formula="of:=[.D2257]-[.D225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[.B2256]+7" office:value-type="float" office:value="15792" calcext:value-type="float">
            <text:p>15792</text:p>
          </table:table-cell>
          <table:table-cell office:value-type="float" office:value="8640000" calcext:value-type="float">
            <text:p>8640000</text:p>
          </table:table-cell>
          <table:table-cell table:formula="of:=[.B2257]/[.C2257]" office:value-type="float" office:value="0.00182777777777778" calcext:value-type="float">
            <text:p>0,00182777777777778000</text:p>
          </table:table-cell>
          <table:table-cell table:formula="of:=[.D2258]-[.D225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table:formula="of:=[.B2257]+7" office:value-type="float" office:value="15799" calcext:value-type="float">
            <text:p>15799</text:p>
          </table:table-cell>
          <table:table-cell office:value-type="float" office:value="8640000" calcext:value-type="float">
            <text:p>8640000</text:p>
          </table:table-cell>
          <table:table-cell table:formula="of:=[.B2258]/[.C2258]" office:value-type="float" office:value="0.00182858796296296" calcext:value-type="float">
            <text:p>0,00182858796296296000</text:p>
          </table:table-cell>
          <table:table-cell table:formula="of:=[.D2259]-[.D225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table:formula="of:=[.B2258]+7" office:value-type="float" office:value="15806" calcext:value-type="float">
            <text:p>15806</text:p>
          </table:table-cell>
          <table:table-cell office:value-type="float" office:value="8640000" calcext:value-type="float">
            <text:p>8640000</text:p>
          </table:table-cell>
          <table:table-cell table:formula="of:=[.B2259]/[.C2259]" office:value-type="float" office:value="0.00182939814814815" calcext:value-type="float">
            <text:p>0,00182939814814815000</text:p>
          </table:table-cell>
          <table:table-cell table:formula="of:=[.D2260]-[.D225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table:formula="of:=[.B2259]+7" office:value-type="float" office:value="15813" calcext:value-type="float">
            <text:p>15813</text:p>
          </table:table-cell>
          <table:table-cell office:value-type="float" office:value="8640000" calcext:value-type="float">
            <text:p>8640000</text:p>
          </table:table-cell>
          <table:table-cell table:formula="of:=[.B2260]/[.C2260]" office:value-type="float" office:value="0.00183020833333333" calcext:value-type="float">
            <text:p>0,00183020833333333000</text:p>
          </table:table-cell>
          <table:table-cell table:formula="of:=[.D2261]-[.D226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table:formula="of:=[.B2260]+7" office:value-type="float" office:value="15820" calcext:value-type="float">
            <text:p>15820</text:p>
          </table:table-cell>
          <table:table-cell office:value-type="float" office:value="8640000" calcext:value-type="float">
            <text:p>8640000</text:p>
          </table:table-cell>
          <table:table-cell table:formula="of:=[.B2261]/[.C2261]" office:value-type="float" office:value="0.00183101851851852" calcext:value-type="float">
            <text:p>0,00183101851851852000</text:p>
          </table:table-cell>
          <table:table-cell table:formula="of:=[.D2262]-[.D226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table:formula="of:=[.B2261]+7" office:value-type="float" office:value="15827" calcext:value-type="float">
            <text:p>15827</text:p>
          </table:table-cell>
          <table:table-cell office:value-type="float" office:value="8640000" calcext:value-type="float">
            <text:p>8640000</text:p>
          </table:table-cell>
          <table:table-cell table:formula="of:=[.B2262]/[.C2262]" office:value-type="float" office:value="0.0018318287037037" calcext:value-type="float">
            <text:p>0,00183182870370370000</text:p>
          </table:table-cell>
          <table:table-cell table:formula="of:=[.D2263]-[.D226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table:formula="of:=[.B2262]+7" office:value-type="float" office:value="15834" calcext:value-type="float">
            <text:p>15834</text:p>
          </table:table-cell>
          <table:table-cell office:value-type="float" office:value="8640000" calcext:value-type="float">
            <text:p>8640000</text:p>
          </table:table-cell>
          <table:table-cell table:formula="of:=[.B2263]/[.C2263]" office:value-type="float" office:value="0.00183263888888889" calcext:value-type="float">
            <text:p>0,00183263888888889000</text:p>
          </table:table-cell>
          <table:table-cell table:formula="of:=[.D2264]-[.D226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[.B2263]+7" office:value-type="float" office:value="15841" calcext:value-type="float">
            <text:p>15841</text:p>
          </table:table-cell>
          <table:table-cell office:value-type="float" office:value="8640000" calcext:value-type="float">
            <text:p>8640000</text:p>
          </table:table-cell>
          <table:table-cell table:formula="of:=[.B2264]/[.C2264]" office:value-type="float" office:value="0.00183344907407407" calcext:value-type="float">
            <text:p>0,00183344907407407000</text:p>
          </table:table-cell>
          <table:table-cell table:formula="of:=[.D2265]-[.D226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[.B2264]+7" office:value-type="float" office:value="15848" calcext:value-type="float">
            <text:p>15848</text:p>
          </table:table-cell>
          <table:table-cell office:value-type="float" office:value="8640000" calcext:value-type="float">
            <text:p>8640000</text:p>
          </table:table-cell>
          <table:table-cell table:formula="of:=[.B2265]/[.C2265]" office:value-type="float" office:value="0.00183425925925926" calcext:value-type="float">
            <text:p>0,00183425925925926000</text:p>
          </table:table-cell>
          <table:table-cell table:formula="of:=[.D2266]-[.D226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table:formula="of:=[.B2265]+7" office:value-type="float" office:value="15855" calcext:value-type="float">
            <text:p>15855</text:p>
          </table:table-cell>
          <table:table-cell office:value-type="float" office:value="8640000" calcext:value-type="float">
            <text:p>8640000</text:p>
          </table:table-cell>
          <table:table-cell table:formula="of:=[.B2266]/[.C2266]" office:value-type="float" office:value="0.00183506944444444" calcext:value-type="float">
            <text:p>0,00183506944444444000</text:p>
          </table:table-cell>
          <table:table-cell table:formula="of:=[.D2267]-[.D226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[.B2266]+7" office:value-type="float" office:value="15862" calcext:value-type="float">
            <text:p>15862</text:p>
          </table:table-cell>
          <table:table-cell office:value-type="float" office:value="8640000" calcext:value-type="float">
            <text:p>8640000</text:p>
          </table:table-cell>
          <table:table-cell table:formula="of:=[.B2267]/[.C2267]" office:value-type="float" office:value="0.00183587962962963" calcext:value-type="float">
            <text:p>0,00183587962962963000</text:p>
          </table:table-cell>
          <table:table-cell table:formula="of:=[.D2268]-[.D226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[.B2267]+7" office:value-type="float" office:value="15869" calcext:value-type="float">
            <text:p>15869</text:p>
          </table:table-cell>
          <table:table-cell office:value-type="float" office:value="8640000" calcext:value-type="float">
            <text:p>8640000</text:p>
          </table:table-cell>
          <table:table-cell table:formula="of:=[.B2268]/[.C2268]" office:value-type="float" office:value="0.00183668981481481" calcext:value-type="float">
            <text:p>0,00183668981481481000</text:p>
          </table:table-cell>
          <table:table-cell table:formula="of:=[.D2269]-[.D226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[.B2268]+7" office:value-type="float" office:value="15876" calcext:value-type="float">
            <text:p>15876</text:p>
          </table:table-cell>
          <table:table-cell office:value-type="float" office:value="8640000" calcext:value-type="float">
            <text:p>8640000</text:p>
          </table:table-cell>
          <table:table-cell table:formula="of:=[.B2269]/[.C2269]" office:value-type="float" office:value="0.0018375" calcext:value-type="float">
            <text:p>0,00183750000000000000</text:p>
          </table:table-cell>
          <table:table-cell table:formula="of:=[.D2270]-[.D226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[.B2269]+7" office:value-type="float" office:value="15883" calcext:value-type="float">
            <text:p>15883</text:p>
          </table:table-cell>
          <table:table-cell office:value-type="float" office:value="8640000" calcext:value-type="float">
            <text:p>8640000</text:p>
          </table:table-cell>
          <table:table-cell table:formula="of:=[.B2270]/[.C2270]" office:value-type="float" office:value="0.00183831018518519" calcext:value-type="float">
            <text:p>0,00183831018518519000</text:p>
          </table:table-cell>
          <table:table-cell table:formula="of:=[.D2271]-[.D227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[.B2270]+7" office:value-type="float" office:value="15890" calcext:value-type="float">
            <text:p>15890</text:p>
          </table:table-cell>
          <table:table-cell office:value-type="float" office:value="8640000" calcext:value-type="float">
            <text:p>8640000</text:p>
          </table:table-cell>
          <table:table-cell table:formula="of:=[.B2271]/[.C2271]" office:value-type="float" office:value="0.00183912037037037" calcext:value-type="float">
            <text:p>0,00183912037037037000</text:p>
          </table:table-cell>
          <table:table-cell table:formula="of:=[.D2272]-[.D227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table:formula="of:=[.B2271]+7" office:value-type="float" office:value="15897" calcext:value-type="float">
            <text:p>15897</text:p>
          </table:table-cell>
          <table:table-cell office:value-type="float" office:value="8640000" calcext:value-type="float">
            <text:p>8640000</text:p>
          </table:table-cell>
          <table:table-cell table:formula="of:=[.B2272]/[.C2272]" office:value-type="float" office:value="0.00183993055555556" calcext:value-type="float">
            <text:p>0,00183993055555556000</text:p>
          </table:table-cell>
          <table:table-cell table:formula="of:=[.D2273]-[.D227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[.B2272]+7" office:value-type="float" office:value="15904" calcext:value-type="float">
            <text:p>15904</text:p>
          </table:table-cell>
          <table:table-cell office:value-type="float" office:value="8640000" calcext:value-type="float">
            <text:p>8640000</text:p>
          </table:table-cell>
          <table:table-cell table:formula="of:=[.B2273]/[.C2273]" office:value-type="float" office:value="0.00184074074074074" calcext:value-type="float">
            <text:p>0,00184074074074074000</text:p>
          </table:table-cell>
          <table:table-cell table:formula="of:=[.D2274]-[.D227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[.B2273]+7" office:value-type="float" office:value="15911" calcext:value-type="float">
            <text:p>15911</text:p>
          </table:table-cell>
          <table:table-cell office:value-type="float" office:value="8640000" calcext:value-type="float">
            <text:p>8640000</text:p>
          </table:table-cell>
          <table:table-cell table:formula="of:=[.B2274]/[.C2274]" office:value-type="float" office:value="0.00184155092592593" calcext:value-type="float">
            <text:p>0,00184155092592593000</text:p>
          </table:table-cell>
          <table:table-cell table:formula="of:=[.D2275]-[.D227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[.B2274]+7" office:value-type="float" office:value="15918" calcext:value-type="float">
            <text:p>15918</text:p>
          </table:table-cell>
          <table:table-cell office:value-type="float" office:value="8640000" calcext:value-type="float">
            <text:p>8640000</text:p>
          </table:table-cell>
          <table:table-cell table:formula="of:=[.B2275]/[.C2275]" office:value-type="float" office:value="0.00184236111111111" calcext:value-type="float">
            <text:p>0,00184236111111111000</text:p>
          </table:table-cell>
          <table:table-cell table:formula="of:=[.D2276]-[.D227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table:formula="of:=[.B2275]+7" office:value-type="float" office:value="15925" calcext:value-type="float">
            <text:p>15925</text:p>
          </table:table-cell>
          <table:table-cell office:value-type="float" office:value="8640000" calcext:value-type="float">
            <text:p>8640000</text:p>
          </table:table-cell>
          <table:table-cell table:formula="of:=[.B2276]/[.C2276]" office:value-type="float" office:value="0.0018431712962963" calcext:value-type="float">
            <text:p>0,00184317129629630000</text:p>
          </table:table-cell>
          <table:table-cell table:formula="of:=[.D2277]-[.D227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[.B2276]+7" office:value-type="float" office:value="15932" calcext:value-type="float">
            <text:p>15932</text:p>
          </table:table-cell>
          <table:table-cell office:value-type="float" office:value="8640000" calcext:value-type="float">
            <text:p>8640000</text:p>
          </table:table-cell>
          <table:table-cell table:formula="of:=[.B2277]/[.C2277]" office:value-type="float" office:value="0.00184398148148148" calcext:value-type="float">
            <text:p>0,00184398148148148000</text:p>
          </table:table-cell>
          <table:table-cell table:formula="of:=[.D2278]-[.D227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[.B2277]+7" office:value-type="float" office:value="15939" calcext:value-type="float">
            <text:p>15939</text:p>
          </table:table-cell>
          <table:table-cell office:value-type="float" office:value="8640000" calcext:value-type="float">
            <text:p>8640000</text:p>
          </table:table-cell>
          <table:table-cell table:formula="of:=[.B2278]/[.C2278]" office:value-type="float" office:value="0.00184479166666667" calcext:value-type="float">
            <text:p>0,00184479166666667000</text:p>
          </table:table-cell>
          <table:table-cell table:formula="of:=[.D2279]-[.D227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[.B2278]+7" office:value-type="float" office:value="15946" calcext:value-type="float">
            <text:p>15946</text:p>
          </table:table-cell>
          <table:table-cell office:value-type="float" office:value="8640000" calcext:value-type="float">
            <text:p>8640000</text:p>
          </table:table-cell>
          <table:table-cell table:formula="of:=[.B2279]/[.C2279]" office:value-type="float" office:value="0.00184560185185185" calcext:value-type="float">
            <text:p>0,00184560185185185000</text:p>
          </table:table-cell>
          <table:table-cell table:formula="of:=[.D2280]-[.D227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[.B2279]+7" office:value-type="float" office:value="15953" calcext:value-type="float">
            <text:p>15953</text:p>
          </table:table-cell>
          <table:table-cell office:value-type="float" office:value="8640000" calcext:value-type="float">
            <text:p>8640000</text:p>
          </table:table-cell>
          <table:table-cell table:formula="of:=[.B2280]/[.C2280]" office:value-type="float" office:value="0.00184641203703704" calcext:value-type="float">
            <text:p>0,00184641203703704000</text:p>
          </table:table-cell>
          <table:table-cell table:formula="of:=[.D2281]-[.D228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[.B2280]+7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2281]/[.C2281]" office:value-type="float" office:value="0.00184722222222222" calcext:value-type="float">
            <text:p>0,00184722222222222000</text:p>
          </table:table-cell>
          <table:table-cell table:formula="of:=[.D2282]-[.D228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[.B2281]+7" office:value-type="float" office:value="15967" calcext:value-type="float">
            <text:p>15967</text:p>
          </table:table-cell>
          <table:table-cell office:value-type="float" office:value="8640000" calcext:value-type="float">
            <text:p>8640000</text:p>
          </table:table-cell>
          <table:table-cell table:formula="of:=[.B2282]/[.C2282]" office:value-type="float" office:value="0.00184803240740741" calcext:value-type="float">
            <text:p>0,00184803240740741000</text:p>
          </table:table-cell>
          <table:table-cell table:formula="of:=[.D2283]-[.D228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table:formula="of:=[.B2282]+7" office:value-type="float" office:value="15974" calcext:value-type="float">
            <text:p>15974</text:p>
          </table:table-cell>
          <table:table-cell office:value-type="float" office:value="8640000" calcext:value-type="float">
            <text:p>8640000</text:p>
          </table:table-cell>
          <table:table-cell table:formula="of:=[.B2283]/[.C2283]" office:value-type="float" office:value="0.00184884259259259" calcext:value-type="float">
            <text:p>0,00184884259259259000</text:p>
          </table:table-cell>
          <table:table-cell table:formula="of:=[.D2284]-[.D228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table:formula="of:=[.B2283]+7" office:value-type="float" office:value="15981" calcext:value-type="float">
            <text:p>15981</text:p>
          </table:table-cell>
          <table:table-cell office:value-type="float" office:value="8640000" calcext:value-type="float">
            <text:p>8640000</text:p>
          </table:table-cell>
          <table:table-cell table:formula="of:=[.B2284]/[.C2284]" office:value-type="float" office:value="0.00184965277777778" calcext:value-type="float">
            <text:p>0,00184965277777778000</text:p>
          </table:table-cell>
          <table:table-cell table:formula="of:=[.D2285]-[.D228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table:formula="of:=[.B2284]+7" office:value-type="float" office:value="15988" calcext:value-type="float">
            <text:p>15988</text:p>
          </table:table-cell>
          <table:table-cell office:value-type="float" office:value="8640000" calcext:value-type="float">
            <text:p>8640000</text:p>
          </table:table-cell>
          <table:table-cell table:formula="of:=[.B2285]/[.C2285]" office:value-type="float" office:value="0.00185046296296296" calcext:value-type="float">
            <text:p>0,00185046296296296000</text:p>
          </table:table-cell>
          <table:table-cell table:formula="of:=[.D2286]-[.D228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[.B2285]+7" office:value-type="float" office:value="15995" calcext:value-type="float">
            <text:p>15995</text:p>
          </table:table-cell>
          <table:table-cell office:value-type="float" office:value="8640000" calcext:value-type="float">
            <text:p>8640000</text:p>
          </table:table-cell>
          <table:table-cell table:formula="of:=[.B2286]/[.C2286]" office:value-type="float" office:value="0.00185127314814815" calcext:value-type="float">
            <text:p>0,00185127314814815000</text:p>
          </table:table-cell>
          <table:table-cell table:formula="of:=[.D2287]-[.D228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[.B2286]+7" office:value-type="float" office:value="16002" calcext:value-type="float">
            <text:p>16002</text:p>
          </table:table-cell>
          <table:table-cell office:value-type="float" office:value="8640000" calcext:value-type="float">
            <text:p>8640000</text:p>
          </table:table-cell>
          <table:table-cell table:formula="of:=[.B2287]/[.C2287]" office:value-type="float" office:value="0.00185208333333333" calcext:value-type="float">
            <text:p>0,00185208333333333000</text:p>
          </table:table-cell>
          <table:table-cell table:formula="of:=[.D2288]-[.D228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[.B2287]+7" office:value-type="float" office:value="16009" calcext:value-type="float">
            <text:p>16009</text:p>
          </table:table-cell>
          <table:table-cell office:value-type="float" office:value="8640000" calcext:value-type="float">
            <text:p>8640000</text:p>
          </table:table-cell>
          <table:table-cell table:formula="of:=[.B2288]/[.C2288]" office:value-type="float" office:value="0.00185289351851852" calcext:value-type="float">
            <text:p>0,00185289351851852000</text:p>
          </table:table-cell>
          <table:table-cell table:formula="of:=[.D2289]-[.D228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formula="of:=[.B2288]+7" office:value-type="float" office:value="16016" calcext:value-type="float">
            <text:p>16016</text:p>
          </table:table-cell>
          <table:table-cell office:value-type="float" office:value="8640000" calcext:value-type="float">
            <text:p>8640000</text:p>
          </table:table-cell>
          <table:table-cell table:formula="of:=[.B2289]/[.C2289]" office:value-type="float" office:value="0.0018537037037037" calcext:value-type="float">
            <text:p>0,00185370370370370000</text:p>
          </table:table-cell>
          <table:table-cell table:formula="of:=[.D2290]-[.D228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table:formula="of:=[.B2289]+7" office:value-type="float" office:value="16023" calcext:value-type="float">
            <text:p>16023</text:p>
          </table:table-cell>
          <table:table-cell office:value-type="float" office:value="8640000" calcext:value-type="float">
            <text:p>8640000</text:p>
          </table:table-cell>
          <table:table-cell table:formula="of:=[.B2290]/[.C2290]" office:value-type="float" office:value="0.00185451388888889" calcext:value-type="float">
            <text:p>0,00185451388888889000</text:p>
          </table:table-cell>
          <table:table-cell table:formula="of:=[.D2291]-[.D229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[.B2290]+7" office:value-type="float" office:value="16030" calcext:value-type="float">
            <text:p>16030</text:p>
          </table:table-cell>
          <table:table-cell office:value-type="float" office:value="8640000" calcext:value-type="float">
            <text:p>8640000</text:p>
          </table:table-cell>
          <table:table-cell table:formula="of:=[.B2291]/[.C2291]" office:value-type="float" office:value="0.00185532407407407" calcext:value-type="float">
            <text:p>0,00185532407407407000</text:p>
          </table:table-cell>
          <table:table-cell table:formula="of:=[.D2292]-[.D229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[.B2291]+7" office:value-type="float" office:value="16037" calcext:value-type="float">
            <text:p>16037</text:p>
          </table:table-cell>
          <table:table-cell office:value-type="float" office:value="8640000" calcext:value-type="float">
            <text:p>8640000</text:p>
          </table:table-cell>
          <table:table-cell table:formula="of:=[.B2292]/[.C2292]" office:value-type="float" office:value="0.00185613425925926" calcext:value-type="float">
            <text:p>0,00185613425925926000</text:p>
          </table:table-cell>
          <table:table-cell table:formula="of:=[.D2293]-[.D229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table:formula="of:=[.B2292]+7" office:value-type="float" office:value="16044" calcext:value-type="float">
            <text:p>16044</text:p>
          </table:table-cell>
          <table:table-cell office:value-type="float" office:value="8640000" calcext:value-type="float">
            <text:p>8640000</text:p>
          </table:table-cell>
          <table:table-cell table:formula="of:=[.B2293]/[.C2293]" office:value-type="float" office:value="0.00185694444444444" calcext:value-type="float">
            <text:p>0,00185694444444444000</text:p>
          </table:table-cell>
          <table:table-cell table:formula="of:=[.D2294]-[.D229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table:formula="of:=[.B2293]+7" office:value-type="float" office:value="16051" calcext:value-type="float">
            <text:p>16051</text:p>
          </table:table-cell>
          <table:table-cell office:value-type="float" office:value="8640000" calcext:value-type="float">
            <text:p>8640000</text:p>
          </table:table-cell>
          <table:table-cell table:formula="of:=[.B2294]/[.C2294]" office:value-type="float" office:value="0.00185775462962963" calcext:value-type="float">
            <text:p>0,00185775462962963000</text:p>
          </table:table-cell>
          <table:table-cell table:formula="of:=[.D2295]-[.D229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table:formula="of:=[.B2294]+7" office:value-type="float" office:value="16058" calcext:value-type="float">
            <text:p>16058</text:p>
          </table:table-cell>
          <table:table-cell office:value-type="float" office:value="8640000" calcext:value-type="float">
            <text:p>8640000</text:p>
          </table:table-cell>
          <table:table-cell table:formula="of:=[.B2295]/[.C2295]" office:value-type="float" office:value="0.00185856481481481" calcext:value-type="float">
            <text:p>0,00185856481481481000</text:p>
          </table:table-cell>
          <table:table-cell table:formula="of:=[.D2296]-[.D229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[.B2295]+7" office:value-type="float" office:value="16065" calcext:value-type="float">
            <text:p>16065</text:p>
          </table:table-cell>
          <table:table-cell office:value-type="float" office:value="8640000" calcext:value-type="float">
            <text:p>8640000</text:p>
          </table:table-cell>
          <table:table-cell table:formula="of:=[.B2296]/[.C2296]" office:value-type="float" office:value="0.001859375" calcext:value-type="float">
            <text:p>0,00185937500000000000</text:p>
          </table:table-cell>
          <table:table-cell table:formula="of:=[.D2297]-[.D229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[.B2296]+7" office:value-type="float" office:value="16072" calcext:value-type="float">
            <text:p>16072</text:p>
          </table:table-cell>
          <table:table-cell office:value-type="float" office:value="8640000" calcext:value-type="float">
            <text:p>8640000</text:p>
          </table:table-cell>
          <table:table-cell table:formula="of:=[.B2297]/[.C2297]" office:value-type="float" office:value="0.00186018518518519" calcext:value-type="float">
            <text:p>0,00186018518518519000</text:p>
          </table:table-cell>
          <table:table-cell table:formula="of:=[.D2298]-[.D229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[.B2297]+7" office:value-type="float" office:value="16079" calcext:value-type="float">
            <text:p>16079</text:p>
          </table:table-cell>
          <table:table-cell office:value-type="float" office:value="8640000" calcext:value-type="float">
            <text:p>8640000</text:p>
          </table:table-cell>
          <table:table-cell table:formula="of:=[.B2298]/[.C2298]" office:value-type="float" office:value="0.00186099537037037" calcext:value-type="float">
            <text:p>0,00186099537037037000</text:p>
          </table:table-cell>
          <table:table-cell table:formula="of:=[.D2299]-[.D229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[.B2298]+7" office:value-type="float" office:value="16086" calcext:value-type="float">
            <text:p>16086</text:p>
          </table:table-cell>
          <table:table-cell office:value-type="float" office:value="8640000" calcext:value-type="float">
            <text:p>8640000</text:p>
          </table:table-cell>
          <table:table-cell table:formula="of:=[.B2299]/[.C2299]" office:value-type="float" office:value="0.00186180555555556" calcext:value-type="float">
            <text:p>0,00186180555555556000</text:p>
          </table:table-cell>
          <table:table-cell table:formula="of:=[.D2300]-[.D229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[.B2299]+7" office:value-type="float" office:value="16093" calcext:value-type="float">
            <text:p>16093</text:p>
          </table:table-cell>
          <table:table-cell office:value-type="float" office:value="8640000" calcext:value-type="float">
            <text:p>8640000</text:p>
          </table:table-cell>
          <table:table-cell table:formula="of:=[.B2300]/[.C2300]" office:value-type="float" office:value="0.00186261574074074" calcext:value-type="float">
            <text:p>0,00186261574074074000</text:p>
          </table:table-cell>
          <table:table-cell table:formula="of:=[.D2301]-[.D230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[.B2300]+7" office:value-type="float" office:value="16100" calcext:value-type="float">
            <text:p>16100</text:p>
          </table:table-cell>
          <table:table-cell office:value-type="float" office:value="8640000" calcext:value-type="float">
            <text:p>8640000</text:p>
          </table:table-cell>
          <table:table-cell table:formula="of:=[.B2301]/[.C2301]" office:value-type="float" office:value="0.00186342592592593" calcext:value-type="float">
            <text:p>0,00186342592592593000</text:p>
          </table:table-cell>
          <table:table-cell table:formula="of:=[.D2302]-[.D230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table:formula="of:=[.B2301]+7" office:value-type="float" office:value="16107" calcext:value-type="float">
            <text:p>16107</text:p>
          </table:table-cell>
          <table:table-cell office:value-type="float" office:value="8640000" calcext:value-type="float">
            <text:p>8640000</text:p>
          </table:table-cell>
          <table:table-cell table:formula="of:=[.B2302]/[.C2302]" office:value-type="float" office:value="0.00186423611111111" calcext:value-type="float">
            <text:p>0,00186423611111111000</text:p>
          </table:table-cell>
          <table:table-cell table:formula="of:=[.D2303]-[.D230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[.B2302]+7" office:value-type="float" office:value="16114" calcext:value-type="float">
            <text:p>16114</text:p>
          </table:table-cell>
          <table:table-cell office:value-type="float" office:value="8640000" calcext:value-type="float">
            <text:p>8640000</text:p>
          </table:table-cell>
          <table:table-cell table:formula="of:=[.B2303]/[.C2303]" office:value-type="float" office:value="0.0018650462962963" calcext:value-type="float">
            <text:p>0,00186504629629630000</text:p>
          </table:table-cell>
          <table:table-cell table:formula="of:=[.D2304]-[.D230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table:formula="of:=[.B2303]+7" office:value-type="float" office:value="16121" calcext:value-type="float">
            <text:p>16121</text:p>
          </table:table-cell>
          <table:table-cell office:value-type="float" office:value="8640000" calcext:value-type="float">
            <text:p>8640000</text:p>
          </table:table-cell>
          <table:table-cell table:formula="of:=[.B2304]/[.C2304]" office:value-type="float" office:value="0.00186585648148148" calcext:value-type="float">
            <text:p>0,00186585648148148000</text:p>
          </table:table-cell>
          <table:table-cell table:formula="of:=[.D2305]-[.D230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[.B2304]+7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2305]/[.C2305]" office:value-type="float" office:value="0.00186666666666667" calcext:value-type="float">
            <text:p>0,00186666666666667000</text:p>
          </table:table-cell>
          <table:table-cell table:formula="of:=[.D2306]-[.D230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[.B2305]+7" office:value-type="float" office:value="16135" calcext:value-type="float">
            <text:p>16135</text:p>
          </table:table-cell>
          <table:table-cell office:value-type="float" office:value="8640000" calcext:value-type="float">
            <text:p>8640000</text:p>
          </table:table-cell>
          <table:table-cell table:formula="of:=[.B2306]/[.C2306]" office:value-type="float" office:value="0.00186747685185185" calcext:value-type="float">
            <text:p>0,00186747685185185000</text:p>
          </table:table-cell>
          <table:table-cell table:formula="of:=[.D2307]-[.D230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[.B2306]+7" office:value-type="float" office:value="16142" calcext:value-type="float">
            <text:p>16142</text:p>
          </table:table-cell>
          <table:table-cell office:value-type="float" office:value="8640000" calcext:value-type="float">
            <text:p>8640000</text:p>
          </table:table-cell>
          <table:table-cell table:formula="of:=[.B2307]/[.C2307]" office:value-type="float" office:value="0.00186828703703704" calcext:value-type="float">
            <text:p>0,00186828703703704000</text:p>
          </table:table-cell>
          <table:table-cell table:formula="of:=[.D2308]-[.D230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table:formula="of:=[.B2307]+7" office:value-type="float" office:value="16149" calcext:value-type="float">
            <text:p>16149</text:p>
          </table:table-cell>
          <table:table-cell office:value-type="float" office:value="8640000" calcext:value-type="float">
            <text:p>8640000</text:p>
          </table:table-cell>
          <table:table-cell table:formula="of:=[.B2308]/[.C2308]" office:value-type="float" office:value="0.00186909722222222" calcext:value-type="float">
            <text:p>0,00186909722222222000</text:p>
          </table:table-cell>
          <table:table-cell table:formula="of:=[.D2309]-[.D230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table:formula="of:=[.B2308]+7" office:value-type="float" office:value="16156" calcext:value-type="float">
            <text:p>16156</text:p>
          </table:table-cell>
          <table:table-cell office:value-type="float" office:value="8640000" calcext:value-type="float">
            <text:p>8640000</text:p>
          </table:table-cell>
          <table:table-cell table:formula="of:=[.B2309]/[.C2309]" office:value-type="float" office:value="0.00186990740740741" calcext:value-type="float">
            <text:p>0,00186990740740741000</text:p>
          </table:table-cell>
          <table:table-cell table:formula="of:=[.D2310]-[.D230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table:formula="of:=[.B2309]+7" office:value-type="float" office:value="16163" calcext:value-type="float">
            <text:p>16163</text:p>
          </table:table-cell>
          <table:table-cell office:value-type="float" office:value="8640000" calcext:value-type="float">
            <text:p>8640000</text:p>
          </table:table-cell>
          <table:table-cell table:formula="of:=[.B2310]/[.C2310]" office:value-type="float" office:value="0.00187071759259259" calcext:value-type="float">
            <text:p>0,00187071759259259000</text:p>
          </table:table-cell>
          <table:table-cell table:formula="of:=[.D2311]-[.D231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[.B2310]+7" office:value-type="float" office:value="16170" calcext:value-type="float">
            <text:p>16170</text:p>
          </table:table-cell>
          <table:table-cell office:value-type="float" office:value="8640000" calcext:value-type="float">
            <text:p>8640000</text:p>
          </table:table-cell>
          <table:table-cell table:formula="of:=[.B2311]/[.C2311]" office:value-type="float" office:value="0.00187152777777778" calcext:value-type="float">
            <text:p>0,00187152777777778000</text:p>
          </table:table-cell>
          <table:table-cell table:formula="of:=[.D2312]-[.D231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[.B2311]+7" office:value-type="float" office:value="16177" calcext:value-type="float">
            <text:p>16177</text:p>
          </table:table-cell>
          <table:table-cell office:value-type="float" office:value="8640000" calcext:value-type="float">
            <text:p>8640000</text:p>
          </table:table-cell>
          <table:table-cell table:formula="of:=[.B2312]/[.C2312]" office:value-type="float" office:value="0.00187233796296296" calcext:value-type="float">
            <text:p>0,00187233796296296000</text:p>
          </table:table-cell>
          <table:table-cell table:formula="of:=[.D2313]-[.D231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[.B2312]+7" office:value-type="float" office:value="16184" calcext:value-type="float">
            <text:p>16184</text:p>
          </table:table-cell>
          <table:table-cell office:value-type="float" office:value="8640000" calcext:value-type="float">
            <text:p>8640000</text:p>
          </table:table-cell>
          <table:table-cell table:formula="of:=[.B2313]/[.C2313]" office:value-type="float" office:value="0.00187314814814815" calcext:value-type="float">
            <text:p>0,00187314814814815000</text:p>
          </table:table-cell>
          <table:table-cell table:formula="of:=[.D2314]-[.D231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table:formula="of:=[.B2313]+7" office:value-type="float" office:value="16191" calcext:value-type="float">
            <text:p>16191</text:p>
          </table:table-cell>
          <table:table-cell office:value-type="float" office:value="8640000" calcext:value-type="float">
            <text:p>8640000</text:p>
          </table:table-cell>
          <table:table-cell table:formula="of:=[.B2314]/[.C2314]" office:value-type="float" office:value="0.00187395833333333" calcext:value-type="float">
            <text:p>0,00187395833333333000</text:p>
          </table:table-cell>
          <table:table-cell table:formula="of:=[.D2315]-[.D231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formula="of:=[.B2314]+7" office:value-type="float" office:value="16198" calcext:value-type="float">
            <text:p>16198</text:p>
          </table:table-cell>
          <table:table-cell office:value-type="float" office:value="8640000" calcext:value-type="float">
            <text:p>8640000</text:p>
          </table:table-cell>
          <table:table-cell table:formula="of:=[.B2315]/[.C2315]" office:value-type="float" office:value="0.00187476851851852" calcext:value-type="float">
            <text:p>0,00187476851851852000</text:p>
          </table:table-cell>
          <table:table-cell table:formula="of:=[.D2316]-[.D231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[.B2315]+7" office:value-type="float" office:value="16205" calcext:value-type="float">
            <text:p>16205</text:p>
          </table:table-cell>
          <table:table-cell office:value-type="float" office:value="8640000" calcext:value-type="float">
            <text:p>8640000</text:p>
          </table:table-cell>
          <table:table-cell table:formula="of:=[.B2316]/[.C2316]" office:value-type="float" office:value="0.0018755787037037" calcext:value-type="float">
            <text:p>0,00187557870370370000</text:p>
          </table:table-cell>
          <table:table-cell table:formula="of:=[.D2317]-[.D231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table:formula="of:=[.B2316]+7" office:value-type="float" office:value="16212" calcext:value-type="float">
            <text:p>16212</text:p>
          </table:table-cell>
          <table:table-cell office:value-type="float" office:value="8640000" calcext:value-type="float">
            <text:p>8640000</text:p>
          </table:table-cell>
          <table:table-cell table:formula="of:=[.B2317]/[.C2317]" office:value-type="float" office:value="0.00187638888888889" calcext:value-type="float">
            <text:p>0,00187638888888889000</text:p>
          </table:table-cell>
          <table:table-cell table:formula="of:=[.D2318]-[.D231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[.B2317]+7" office:value-type="float" office:value="16219" calcext:value-type="float">
            <text:p>16219</text:p>
          </table:table-cell>
          <table:table-cell office:value-type="float" office:value="8640000" calcext:value-type="float">
            <text:p>8640000</text:p>
          </table:table-cell>
          <table:table-cell table:formula="of:=[.B2318]/[.C2318]" office:value-type="float" office:value="0.00187719907407407" calcext:value-type="float">
            <text:p>0,00187719907407407000</text:p>
          </table:table-cell>
          <table:table-cell table:formula="of:=[.D2319]-[.D231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[.B2318]+7" office:value-type="float" office:value="16226" calcext:value-type="float">
            <text:p>16226</text:p>
          </table:table-cell>
          <table:table-cell office:value-type="float" office:value="8640000" calcext:value-type="float">
            <text:p>8640000</text:p>
          </table:table-cell>
          <table:table-cell table:formula="of:=[.B2319]/[.C2319]" office:value-type="float" office:value="0.00187800925925926" calcext:value-type="float">
            <text:p>0,00187800925925926000</text:p>
          </table:table-cell>
          <table:table-cell table:formula="of:=[.D2320]-[.D231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[.B2319]+7" office:value-type="float" office:value="16233" calcext:value-type="float">
            <text:p>16233</text:p>
          </table:table-cell>
          <table:table-cell office:value-type="float" office:value="8640000" calcext:value-type="float">
            <text:p>8640000</text:p>
          </table:table-cell>
          <table:table-cell table:formula="of:=[.B2320]/[.C2320]" office:value-type="float" office:value="0.00187881944444444" calcext:value-type="float">
            <text:p>0,00187881944444444000</text:p>
          </table:table-cell>
          <table:table-cell table:formula="of:=[.D2321]-[.D232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[.B2320]+7" office:value-type="float" office:value="16240" calcext:value-type="float">
            <text:p>16240</text:p>
          </table:table-cell>
          <table:table-cell office:value-type="float" office:value="8640000" calcext:value-type="float">
            <text:p>8640000</text:p>
          </table:table-cell>
          <table:table-cell table:formula="of:=[.B2321]/[.C2321]" office:value-type="float" office:value="0.00187962962962963" calcext:value-type="float">
            <text:p>0,00187962962962963000</text:p>
          </table:table-cell>
          <table:table-cell table:formula="of:=[.D2322]-[.D232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[.B2321]+7" office:value-type="float" office:value="16247" calcext:value-type="float">
            <text:p>16247</text:p>
          </table:table-cell>
          <table:table-cell office:value-type="float" office:value="8640000" calcext:value-type="float">
            <text:p>8640000</text:p>
          </table:table-cell>
          <table:table-cell table:formula="of:=[.B2322]/[.C2322]" office:value-type="float" office:value="0.00188043981481481" calcext:value-type="float">
            <text:p>0,00188043981481481000</text:p>
          </table:table-cell>
          <table:table-cell table:formula="of:=[.D2323]-[.D232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[.B2322]+7" office:value-type="float" office:value="16254" calcext:value-type="float">
            <text:p>16254</text:p>
          </table:table-cell>
          <table:table-cell office:value-type="float" office:value="8640000" calcext:value-type="float">
            <text:p>8640000</text:p>
          </table:table-cell>
          <table:table-cell table:formula="of:=[.B2323]/[.C2323]" office:value-type="float" office:value="0.00188125" calcext:value-type="float">
            <text:p>0,00188125000000000000</text:p>
          </table:table-cell>
          <table:table-cell table:formula="of:=[.D2324]-[.D232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[.B2323]+7" office:value-type="float" office:value="16261" calcext:value-type="float">
            <text:p>16261</text:p>
          </table:table-cell>
          <table:table-cell office:value-type="float" office:value="8640000" calcext:value-type="float">
            <text:p>8640000</text:p>
          </table:table-cell>
          <table:table-cell table:formula="of:=[.B2324]/[.C2324]" office:value-type="float" office:value="0.00188206018518519" calcext:value-type="float">
            <text:p>0,00188206018518519000</text:p>
          </table:table-cell>
          <table:table-cell table:formula="of:=[.D2325]-[.D232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[.B2324]+7" office:value-type="float" office:value="16268" calcext:value-type="float">
            <text:p>16268</text:p>
          </table:table-cell>
          <table:table-cell office:value-type="float" office:value="8640000" calcext:value-type="float">
            <text:p>8640000</text:p>
          </table:table-cell>
          <table:table-cell table:formula="of:=[.B2325]/[.C2325]" office:value-type="float" office:value="0.00188287037037037" calcext:value-type="float">
            <text:p>0,00188287037037037000</text:p>
          </table:table-cell>
          <table:table-cell table:formula="of:=[.D2326]-[.D232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[.B2325]+7" office:value-type="float" office:value="16275" calcext:value-type="float">
            <text:p>16275</text:p>
          </table:table-cell>
          <table:table-cell office:value-type="float" office:value="8640000" calcext:value-type="float">
            <text:p>8640000</text:p>
          </table:table-cell>
          <table:table-cell table:formula="of:=[.B2326]/[.C2326]" office:value-type="float" office:value="0.00188368055555556" calcext:value-type="float">
            <text:p>0,00188368055555556000</text:p>
          </table:table-cell>
          <table:table-cell table:formula="of:=[.D2327]-[.D232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[.B2326]+7" office:value-type="float" office:value="16282" calcext:value-type="float">
            <text:p>16282</text:p>
          </table:table-cell>
          <table:table-cell office:value-type="float" office:value="8640000" calcext:value-type="float">
            <text:p>8640000</text:p>
          </table:table-cell>
          <table:table-cell table:formula="of:=[.B2327]/[.C2327]" office:value-type="float" office:value="0.00188449074074074" calcext:value-type="float">
            <text:p>0,00188449074074074000</text:p>
          </table:table-cell>
          <table:table-cell table:formula="of:=[.D2328]-[.D232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[.B2327]+7" office:value-type="float" office:value="16289" calcext:value-type="float">
            <text:p>16289</text:p>
          </table:table-cell>
          <table:table-cell office:value-type="float" office:value="8640000" calcext:value-type="float">
            <text:p>8640000</text:p>
          </table:table-cell>
          <table:table-cell table:formula="of:=[.B2328]/[.C2328]" office:value-type="float" office:value="0.00188530092592593" calcext:value-type="float">
            <text:p>0,00188530092592593000</text:p>
          </table:table-cell>
          <table:table-cell table:formula="of:=[.D2329]-[.D232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table:formula="of:=[.B2328]+7" office:value-type="float" office:value="16296" calcext:value-type="float">
            <text:p>16296</text:p>
          </table:table-cell>
          <table:table-cell office:value-type="float" office:value="8640000" calcext:value-type="float">
            <text:p>8640000</text:p>
          </table:table-cell>
          <table:table-cell table:formula="of:=[.B2329]/[.C2329]" office:value-type="float" office:value="0.00188611111111111" calcext:value-type="float">
            <text:p>0,00188611111111111000</text:p>
          </table:table-cell>
          <table:table-cell table:formula="of:=[.D2330]-[.D232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table:formula="of:=[.B2329]+7" office:value-type="float" office:value="16303" calcext:value-type="float">
            <text:p>16303</text:p>
          </table:table-cell>
          <table:table-cell office:value-type="float" office:value="8640000" calcext:value-type="float">
            <text:p>8640000</text:p>
          </table:table-cell>
          <table:table-cell table:formula="of:=[.B2330]/[.C2330]" office:value-type="float" office:value="0.0018869212962963" calcext:value-type="float">
            <text:p>0,00188692129629630000</text:p>
          </table:table-cell>
          <table:table-cell table:formula="of:=[.D2331]-[.D233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table:formula="of:=[.B2330]+7" office:value-type="float" office:value="16310" calcext:value-type="float">
            <text:p>16310</text:p>
          </table:table-cell>
          <table:table-cell office:value-type="float" office:value="8640000" calcext:value-type="float">
            <text:p>8640000</text:p>
          </table:table-cell>
          <table:table-cell table:formula="of:=[.B2331]/[.C2331]" office:value-type="float" office:value="0.00188773148148148" calcext:value-type="float">
            <text:p>0,00188773148148148000</text:p>
          </table:table-cell>
          <table:table-cell table:formula="of:=[.D2332]-[.D233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table:formula="of:=[.B2331]+7" office:value-type="float" office:value="16317" calcext:value-type="float">
            <text:p>16317</text:p>
          </table:table-cell>
          <table:table-cell office:value-type="float" office:value="8640000" calcext:value-type="float">
            <text:p>8640000</text:p>
          </table:table-cell>
          <table:table-cell table:formula="of:=[.B2332]/[.C2332]" office:value-type="float" office:value="0.00188854166666667" calcext:value-type="float">
            <text:p>0,00188854166666667000</text:p>
          </table:table-cell>
          <table:table-cell table:formula="of:=[.D2333]-[.D233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[.B2332]+7" office:value-type="float" office:value="16324" calcext:value-type="float">
            <text:p>16324</text:p>
          </table:table-cell>
          <table:table-cell office:value-type="float" office:value="8640000" calcext:value-type="float">
            <text:p>8640000</text:p>
          </table:table-cell>
          <table:table-cell table:formula="of:=[.B2333]/[.C2333]" office:value-type="float" office:value="0.00188935185185185" calcext:value-type="float">
            <text:p>0,00188935185185185000</text:p>
          </table:table-cell>
          <table:table-cell table:formula="of:=[.D2334]-[.D233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table:formula="of:=[.B2333]+7" office:value-type="float" office:value="16331" calcext:value-type="float">
            <text:p>16331</text:p>
          </table:table-cell>
          <table:table-cell office:value-type="float" office:value="8640000" calcext:value-type="float">
            <text:p>8640000</text:p>
          </table:table-cell>
          <table:table-cell table:formula="of:=[.B2334]/[.C2334]" office:value-type="float" office:value="0.00189016203703704" calcext:value-type="float">
            <text:p>0,00189016203703704000</text:p>
          </table:table-cell>
          <table:table-cell table:formula="of:=[.D2335]-[.D233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[.B2334]+7" office:value-type="float" office:value="16338" calcext:value-type="float">
            <text:p>16338</text:p>
          </table:table-cell>
          <table:table-cell office:value-type="float" office:value="8640000" calcext:value-type="float">
            <text:p>8640000</text:p>
          </table:table-cell>
          <table:table-cell table:formula="of:=[.B2335]/[.C2335]" office:value-type="float" office:value="0.00189097222222222" calcext:value-type="float">
            <text:p>0,00189097222222222000</text:p>
          </table:table-cell>
          <table:table-cell table:formula="of:=[.D2336]-[.D233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[.B2335]+7" office:value-type="float" office:value="16345" calcext:value-type="float">
            <text:p>16345</text:p>
          </table:table-cell>
          <table:table-cell office:value-type="float" office:value="8640000" calcext:value-type="float">
            <text:p>8640000</text:p>
          </table:table-cell>
          <table:table-cell table:formula="of:=[.B2336]/[.C2336]" office:value-type="float" office:value="0.00189178240740741" calcext:value-type="float">
            <text:p>0,00189178240740741000</text:p>
          </table:table-cell>
          <table:table-cell table:formula="of:=[.D2337]-[.D233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[.B2336]+7" office:value-type="float" office:value="16352" calcext:value-type="float">
            <text:p>16352</text:p>
          </table:table-cell>
          <table:table-cell office:value-type="float" office:value="8640000" calcext:value-type="float">
            <text:p>8640000</text:p>
          </table:table-cell>
          <table:table-cell table:formula="of:=[.B2337]/[.C2337]" office:value-type="float" office:value="0.00189259259259259" calcext:value-type="float">
            <text:p>0,00189259259259259000</text:p>
          </table:table-cell>
          <table:table-cell table:formula="of:=[.D2338]-[.D233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[.B2337]+7" office:value-type="float" office:value="16359" calcext:value-type="float">
            <text:p>16359</text:p>
          </table:table-cell>
          <table:table-cell office:value-type="float" office:value="8640000" calcext:value-type="float">
            <text:p>8640000</text:p>
          </table:table-cell>
          <table:table-cell table:formula="of:=[.B2338]/[.C2338]" office:value-type="float" office:value="0.00189340277777778" calcext:value-type="float">
            <text:p>0,00189340277777778000</text:p>
          </table:table-cell>
          <table:table-cell table:formula="of:=[.D2339]-[.D233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[.B2338]+7" office:value-type="float" office:value="16366" calcext:value-type="float">
            <text:p>16366</text:p>
          </table:table-cell>
          <table:table-cell office:value-type="float" office:value="8640000" calcext:value-type="float">
            <text:p>8640000</text:p>
          </table:table-cell>
          <table:table-cell table:formula="of:=[.B2339]/[.C2339]" office:value-type="float" office:value="0.00189421296296296" calcext:value-type="float">
            <text:p>0,00189421296296296000</text:p>
          </table:table-cell>
          <table:table-cell table:formula="of:=[.D2340]-[.D233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[.B2339]+7" office:value-type="float" office:value="16373" calcext:value-type="float">
            <text:p>16373</text:p>
          </table:table-cell>
          <table:table-cell office:value-type="float" office:value="8640000" calcext:value-type="float">
            <text:p>8640000</text:p>
          </table:table-cell>
          <table:table-cell table:formula="of:=[.B2340]/[.C2340]" office:value-type="float" office:value="0.00189502314814815" calcext:value-type="float">
            <text:p>0,00189502314814815000</text:p>
          </table:table-cell>
          <table:table-cell table:formula="of:=[.D2341]-[.D234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[.B2340]+7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2341]/[.C2341]" office:value-type="float" office:value="0.00189583333333333" calcext:value-type="float">
            <text:p>0,00189583333333333000</text:p>
          </table:table-cell>
          <table:table-cell table:formula="of:=[.D2342]-[.D234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[.B2341]+7" office:value-type="float" office:value="16387" calcext:value-type="float">
            <text:p>16387</text:p>
          </table:table-cell>
          <table:table-cell office:value-type="float" office:value="8640000" calcext:value-type="float">
            <text:p>8640000</text:p>
          </table:table-cell>
          <table:table-cell table:formula="of:=[.B2342]/[.C2342]" office:value-type="float" office:value="0.00189664351851852" calcext:value-type="float">
            <text:p>0,00189664351851852000</text:p>
          </table:table-cell>
          <table:table-cell table:formula="of:=[.D2343]-[.D234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[.B2342]+7" office:value-type="float" office:value="16394" calcext:value-type="float">
            <text:p>16394</text:p>
          </table:table-cell>
          <table:table-cell office:value-type="float" office:value="8640000" calcext:value-type="float">
            <text:p>8640000</text:p>
          </table:table-cell>
          <table:table-cell table:formula="of:=[.B2343]/[.C2343]" office:value-type="float" office:value="0.0018974537037037" calcext:value-type="float">
            <text:p>0,00189745370370370000</text:p>
          </table:table-cell>
          <table:table-cell table:formula="of:=[.D2344]-[.D234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[.B2343]+7" office:value-type="float" office:value="16401" calcext:value-type="float">
            <text:p>16401</text:p>
          </table:table-cell>
          <table:table-cell office:value-type="float" office:value="8640000" calcext:value-type="float">
            <text:p>8640000</text:p>
          </table:table-cell>
          <table:table-cell table:formula="of:=[.B2344]/[.C2344]" office:value-type="float" office:value="0.00189826388888889" calcext:value-type="float">
            <text:p>0,00189826388888889000</text:p>
          </table:table-cell>
          <table:table-cell table:formula="of:=[.D2345]-[.D234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[.B2344]+7" office:value-type="float" office:value="16408" calcext:value-type="float">
            <text:p>16408</text:p>
          </table:table-cell>
          <table:table-cell office:value-type="float" office:value="8640000" calcext:value-type="float">
            <text:p>8640000</text:p>
          </table:table-cell>
          <table:table-cell table:formula="of:=[.B2345]/[.C2345]" office:value-type="float" office:value="0.00189907407407407" calcext:value-type="float">
            <text:p>0,00189907407407407000</text:p>
          </table:table-cell>
          <table:table-cell table:formula="of:=[.D2346]-[.D234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[.B2345]+7" office:value-type="float" office:value="16415" calcext:value-type="float">
            <text:p>16415</text:p>
          </table:table-cell>
          <table:table-cell office:value-type="float" office:value="8640000" calcext:value-type="float">
            <text:p>8640000</text:p>
          </table:table-cell>
          <table:table-cell table:formula="of:=[.B2346]/[.C2346]" office:value-type="float" office:value="0.00189988425925926" calcext:value-type="float">
            <text:p>0,00189988425925926000</text:p>
          </table:table-cell>
          <table:table-cell table:formula="of:=[.D2347]-[.D234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[.B2346]+7" office:value-type="float" office:value="16422" calcext:value-type="float">
            <text:p>16422</text:p>
          </table:table-cell>
          <table:table-cell office:value-type="float" office:value="8640000" calcext:value-type="float">
            <text:p>8640000</text:p>
          </table:table-cell>
          <table:table-cell table:formula="of:=[.B2347]/[.C2347]" office:value-type="float" office:value="0.00190069444444444" calcext:value-type="float">
            <text:p>0,00190069444444444000</text:p>
          </table:table-cell>
          <table:table-cell table:formula="of:=[.D2348]-[.D234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[.B2347]+7" office:value-type="float" office:value="16429" calcext:value-type="float">
            <text:p>16429</text:p>
          </table:table-cell>
          <table:table-cell office:value-type="float" office:value="8640000" calcext:value-type="float">
            <text:p>8640000</text:p>
          </table:table-cell>
          <table:table-cell table:formula="of:=[.B2348]/[.C2348]" office:value-type="float" office:value="0.00190150462962963" calcext:value-type="float">
            <text:p>0,00190150462962963000</text:p>
          </table:table-cell>
          <table:table-cell table:formula="of:=[.D2349]-[.D234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[.B2348]+7" office:value-type="float" office:value="16436" calcext:value-type="float">
            <text:p>16436</text:p>
          </table:table-cell>
          <table:table-cell office:value-type="float" office:value="8640000" calcext:value-type="float">
            <text:p>8640000</text:p>
          </table:table-cell>
          <table:table-cell table:formula="of:=[.B2349]/[.C2349]" office:value-type="float" office:value="0.00190231481481481" calcext:value-type="float">
            <text:p>0,00190231481481481000</text:p>
          </table:table-cell>
          <table:table-cell table:formula="of:=[.D2350]-[.D234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table:formula="of:=[.B2349]+7" office:value-type="float" office:value="16443" calcext:value-type="float">
            <text:p>16443</text:p>
          </table:table-cell>
          <table:table-cell office:value-type="float" office:value="8640000" calcext:value-type="float">
            <text:p>8640000</text:p>
          </table:table-cell>
          <table:table-cell table:formula="of:=[.B2350]/[.C2350]" office:value-type="float" office:value="0.001903125" calcext:value-type="float">
            <text:p>0,00190312500000000000</text:p>
          </table:table-cell>
          <table:table-cell table:formula="of:=[.D2351]-[.D235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[.B2350]+7" office:value-type="float" office:value="16450" calcext:value-type="float">
            <text:p>16450</text:p>
          </table:table-cell>
          <table:table-cell office:value-type="float" office:value="8640000" calcext:value-type="float">
            <text:p>8640000</text:p>
          </table:table-cell>
          <table:table-cell table:formula="of:=[.B2351]/[.C2351]" office:value-type="float" office:value="0.00190393518518519" calcext:value-type="float">
            <text:p>0,00190393518518519000</text:p>
          </table:table-cell>
          <table:table-cell table:formula="of:=[.D2352]-[.D235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table:formula="of:=[.B2351]+7" office:value-type="float" office:value="16457" calcext:value-type="float">
            <text:p>16457</text:p>
          </table:table-cell>
          <table:table-cell office:value-type="float" office:value="8640000" calcext:value-type="float">
            <text:p>8640000</text:p>
          </table:table-cell>
          <table:table-cell table:formula="of:=[.B2352]/[.C2352]" office:value-type="float" office:value="0.00190474537037037" calcext:value-type="float">
            <text:p>0,00190474537037037000</text:p>
          </table:table-cell>
          <table:table-cell table:formula="of:=[.D2353]-[.D235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[.B2352]+7" office:value-type="float" office:value="16464" calcext:value-type="float">
            <text:p>16464</text:p>
          </table:table-cell>
          <table:table-cell office:value-type="float" office:value="8640000" calcext:value-type="float">
            <text:p>8640000</text:p>
          </table:table-cell>
          <table:table-cell table:formula="of:=[.B2353]/[.C2353]" office:value-type="float" office:value="0.00190555555555556" calcext:value-type="float">
            <text:p>0,00190555555555556000</text:p>
          </table:table-cell>
          <table:table-cell table:formula="of:=[.D2354]-[.D235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[.B2353]+7" office:value-type="float" office:value="16471" calcext:value-type="float">
            <text:p>16471</text:p>
          </table:table-cell>
          <table:table-cell office:value-type="float" office:value="8640000" calcext:value-type="float">
            <text:p>8640000</text:p>
          </table:table-cell>
          <table:table-cell table:formula="of:=[.B2354]/[.C2354]" office:value-type="float" office:value="0.00190636574074074" calcext:value-type="float">
            <text:p>0,00190636574074074000</text:p>
          </table:table-cell>
          <table:table-cell table:formula="of:=[.D2355]-[.D235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[.B2354]+7" office:value-type="float" office:value="16478" calcext:value-type="float">
            <text:p>16478</text:p>
          </table:table-cell>
          <table:table-cell office:value-type="float" office:value="8640000" calcext:value-type="float">
            <text:p>8640000</text:p>
          </table:table-cell>
          <table:table-cell table:formula="of:=[.B2355]/[.C2355]" office:value-type="float" office:value="0.00190717592592593" calcext:value-type="float">
            <text:p>0,00190717592592593000</text:p>
          </table:table-cell>
          <table:table-cell table:formula="of:=[.D2356]-[.D235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[.B2355]+7" office:value-type="float" office:value="16485" calcext:value-type="float">
            <text:p>16485</text:p>
          </table:table-cell>
          <table:table-cell office:value-type="float" office:value="8640000" calcext:value-type="float">
            <text:p>8640000</text:p>
          </table:table-cell>
          <table:table-cell table:formula="of:=[.B2356]/[.C2356]" office:value-type="float" office:value="0.00190798611111111" calcext:value-type="float">
            <text:p>0,00190798611111111000</text:p>
          </table:table-cell>
          <table:table-cell table:formula="of:=[.D2357]-[.D235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[.B2356]+7" office:value-type="float" office:value="16492" calcext:value-type="float">
            <text:p>16492</text:p>
          </table:table-cell>
          <table:table-cell office:value-type="float" office:value="8640000" calcext:value-type="float">
            <text:p>8640000</text:p>
          </table:table-cell>
          <table:table-cell table:formula="of:=[.B2357]/[.C2357]" office:value-type="float" office:value="0.0019087962962963" calcext:value-type="float">
            <text:p>0,00190879629629630000</text:p>
          </table:table-cell>
          <table:table-cell table:formula="of:=[.D2358]-[.D235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[.B2357]+7" office:value-type="float" office:value="16499" calcext:value-type="float">
            <text:p>16499</text:p>
          </table:table-cell>
          <table:table-cell office:value-type="float" office:value="8640000" calcext:value-type="float">
            <text:p>8640000</text:p>
          </table:table-cell>
          <table:table-cell table:formula="of:=[.B2358]/[.C2358]" office:value-type="float" office:value="0.00190960648148148" calcext:value-type="float">
            <text:p>0,00190960648148148000</text:p>
          </table:table-cell>
          <table:table-cell table:formula="of:=[.D2359]-[.D235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[.B2358]+7" office:value-type="float" office:value="16506" calcext:value-type="float">
            <text:p>16506</text:p>
          </table:table-cell>
          <table:table-cell office:value-type="float" office:value="8640000" calcext:value-type="float">
            <text:p>8640000</text:p>
          </table:table-cell>
          <table:table-cell table:formula="of:=[.B2359]/[.C2359]" office:value-type="float" office:value="0.00191041666666667" calcext:value-type="float">
            <text:p>0,00191041666666667000</text:p>
          </table:table-cell>
          <table:table-cell table:formula="of:=[.D2360]-[.D235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[.B2359]+7" office:value-type="float" office:value="16513" calcext:value-type="float">
            <text:p>16513</text:p>
          </table:table-cell>
          <table:table-cell office:value-type="float" office:value="8640000" calcext:value-type="float">
            <text:p>8640000</text:p>
          </table:table-cell>
          <table:table-cell table:formula="of:=[.B2360]/[.C2360]" office:value-type="float" office:value="0.00191122685185185" calcext:value-type="float">
            <text:p>0,00191122685185185000</text:p>
          </table:table-cell>
          <table:table-cell table:formula="of:=[.D2361]-[.D236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[.B2360]+7" office:value-type="float" office:value="16520" calcext:value-type="float">
            <text:p>16520</text:p>
          </table:table-cell>
          <table:table-cell office:value-type="float" office:value="8640000" calcext:value-type="float">
            <text:p>8640000</text:p>
          </table:table-cell>
          <table:table-cell table:formula="of:=[.B2361]/[.C2361]" office:value-type="float" office:value="0.00191203703703704" calcext:value-type="float">
            <text:p>0,00191203703703704000</text:p>
          </table:table-cell>
          <table:table-cell table:formula="of:=[.D2362]-[.D236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[.B2361]+7" office:value-type="float" office:value="16527" calcext:value-type="float">
            <text:p>16527</text:p>
          </table:table-cell>
          <table:table-cell office:value-type="float" office:value="8640000" calcext:value-type="float">
            <text:p>8640000</text:p>
          </table:table-cell>
          <table:table-cell table:formula="of:=[.B2362]/[.C2362]" office:value-type="float" office:value="0.00191284722222222" calcext:value-type="float">
            <text:p>0,00191284722222222000</text:p>
          </table:table-cell>
          <table:table-cell table:formula="of:=[.D2363]-[.D236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table:formula="of:=[.B2362]+7" office:value-type="float" office:value="16534" calcext:value-type="float">
            <text:p>16534</text:p>
          </table:table-cell>
          <table:table-cell office:value-type="float" office:value="8640000" calcext:value-type="float">
            <text:p>8640000</text:p>
          </table:table-cell>
          <table:table-cell table:formula="of:=[.B2363]/[.C2363]" office:value-type="float" office:value="0.00191365740740741" calcext:value-type="float">
            <text:p>0,00191365740740741000</text:p>
          </table:table-cell>
          <table:table-cell table:formula="of:=[.D2364]-[.D236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table:formula="of:=[.B2363]+7" office:value-type="float" office:value="16541" calcext:value-type="float">
            <text:p>16541</text:p>
          </table:table-cell>
          <table:table-cell office:value-type="float" office:value="8640000" calcext:value-type="float">
            <text:p>8640000</text:p>
          </table:table-cell>
          <table:table-cell table:formula="of:=[.B2364]/[.C2364]" office:value-type="float" office:value="0.00191446759259259" calcext:value-type="float">
            <text:p>0,00191446759259259000</text:p>
          </table:table-cell>
          <table:table-cell table:formula="of:=[.D2365]-[.D236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formula="of:=[.B2364]+7" office:value-type="float" office:value="16548" calcext:value-type="float">
            <text:p>16548</text:p>
          </table:table-cell>
          <table:table-cell office:value-type="float" office:value="8640000" calcext:value-type="float">
            <text:p>8640000</text:p>
          </table:table-cell>
          <table:table-cell table:formula="of:=[.B2365]/[.C2365]" office:value-type="float" office:value="0.00191527777777778" calcext:value-type="float">
            <text:p>0,00191527777777778000</text:p>
          </table:table-cell>
          <table:table-cell table:formula="of:=[.D2366]-[.D236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table:formula="of:=[.B2365]+7" office:value-type="float" office:value="16555" calcext:value-type="float">
            <text:p>16555</text:p>
          </table:table-cell>
          <table:table-cell office:value-type="float" office:value="8640000" calcext:value-type="float">
            <text:p>8640000</text:p>
          </table:table-cell>
          <table:table-cell table:formula="of:=[.B2366]/[.C2366]" office:value-type="float" office:value="0.00191608796296296" calcext:value-type="float">
            <text:p>0,00191608796296296000</text:p>
          </table:table-cell>
          <table:table-cell table:formula="of:=[.D2367]-[.D236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formula="of:=[.B2366]+7" office:value-type="float" office:value="16562" calcext:value-type="float">
            <text:p>16562</text:p>
          </table:table-cell>
          <table:table-cell office:value-type="float" office:value="8640000" calcext:value-type="float">
            <text:p>8640000</text:p>
          </table:table-cell>
          <table:table-cell table:formula="of:=[.B2367]/[.C2367]" office:value-type="float" office:value="0.00191689814814815" calcext:value-type="float">
            <text:p>0,00191689814814815000</text:p>
          </table:table-cell>
          <table:table-cell table:formula="of:=[.D2368]-[.D236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table:formula="of:=[.B2367]+7" office:value-type="float" office:value="16569" calcext:value-type="float">
            <text:p>16569</text:p>
          </table:table-cell>
          <table:table-cell office:value-type="float" office:value="8640000" calcext:value-type="float">
            <text:p>8640000</text:p>
          </table:table-cell>
          <table:table-cell table:formula="of:=[.B2368]/[.C2368]" office:value-type="float" office:value="0.00191770833333333" calcext:value-type="float">
            <text:p>0,00191770833333333000</text:p>
          </table:table-cell>
          <table:table-cell table:formula="of:=[.D2369]-[.D236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table:formula="of:=[.B2368]+7" office:value-type="float" office:value="16576" calcext:value-type="float">
            <text:p>16576</text:p>
          </table:table-cell>
          <table:table-cell office:value-type="float" office:value="8640000" calcext:value-type="float">
            <text:p>8640000</text:p>
          </table:table-cell>
          <table:table-cell table:formula="of:=[.B2369]/[.C2369]" office:value-type="float" office:value="0.00191851851851852" calcext:value-type="float">
            <text:p>0,00191851851851852000</text:p>
          </table:table-cell>
          <table:table-cell table:formula="of:=[.D2370]-[.D236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formula="of:=[.B2369]+7" office:value-type="float" office:value="16583" calcext:value-type="float">
            <text:p>16583</text:p>
          </table:table-cell>
          <table:table-cell office:value-type="float" office:value="8640000" calcext:value-type="float">
            <text:p>8640000</text:p>
          </table:table-cell>
          <table:table-cell table:formula="of:=[.B2370]/[.C2370]" office:value-type="float" office:value="0.0019193287037037" calcext:value-type="float">
            <text:p>0,00191932870370370000</text:p>
          </table:table-cell>
          <table:table-cell table:formula="of:=[.D2371]-[.D237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[.B2370]+7" office:value-type="float" office:value="16590" calcext:value-type="float">
            <text:p>16590</text:p>
          </table:table-cell>
          <table:table-cell office:value-type="float" office:value="8640000" calcext:value-type="float">
            <text:p>8640000</text:p>
          </table:table-cell>
          <table:table-cell table:formula="of:=[.B2371]/[.C2371]" office:value-type="float" office:value="0.00192013888888889" calcext:value-type="float">
            <text:p>0,00192013888888889000</text:p>
          </table:table-cell>
          <table:table-cell table:formula="of:=[.D2372]-[.D237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[.B2371]+7" office:value-type="float" office:value="16597" calcext:value-type="float">
            <text:p>16597</text:p>
          </table:table-cell>
          <table:table-cell office:value-type="float" office:value="8640000" calcext:value-type="float">
            <text:p>8640000</text:p>
          </table:table-cell>
          <table:table-cell table:formula="of:=[.B2372]/[.C2372]" office:value-type="float" office:value="0.00192094907407407" calcext:value-type="float">
            <text:p>0,00192094907407407000</text:p>
          </table:table-cell>
          <table:table-cell table:formula="of:=[.D2373]-[.D237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[.B2372]+7" office:value-type="float" office:value="16604" calcext:value-type="float">
            <text:p>16604</text:p>
          </table:table-cell>
          <table:table-cell office:value-type="float" office:value="8640000" calcext:value-type="float">
            <text:p>8640000</text:p>
          </table:table-cell>
          <table:table-cell table:formula="of:=[.B2373]/[.C2373]" office:value-type="float" office:value="0.00192175925925926" calcext:value-type="float">
            <text:p>0,00192175925925926000</text:p>
          </table:table-cell>
          <table:table-cell table:formula="of:=[.D2374]-[.D237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[.B2373]+7" office:value-type="float" office:value="16611" calcext:value-type="float">
            <text:p>16611</text:p>
          </table:table-cell>
          <table:table-cell office:value-type="float" office:value="8640000" calcext:value-type="float">
            <text:p>8640000</text:p>
          </table:table-cell>
          <table:table-cell table:formula="of:=[.B2374]/[.C2374]" office:value-type="float" office:value="0.00192256944444444" calcext:value-type="float">
            <text:p>0,00192256944444444000</text:p>
          </table:table-cell>
          <table:table-cell table:formula="of:=[.D2375]-[.D237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table:formula="of:=[.B2374]+7" office:value-type="float" office:value="16618" calcext:value-type="float">
            <text:p>16618</text:p>
          </table:table-cell>
          <table:table-cell office:value-type="float" office:value="8640000" calcext:value-type="float">
            <text:p>8640000</text:p>
          </table:table-cell>
          <table:table-cell table:formula="of:=[.B2375]/[.C2375]" office:value-type="float" office:value="0.00192337962962963" calcext:value-type="float">
            <text:p>0,00192337962962963000</text:p>
          </table:table-cell>
          <table:table-cell table:formula="of:=[.D2376]-[.D237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table:formula="of:=[.B2375]+7" office:value-type="float" office:value="16625" calcext:value-type="float">
            <text:p>16625</text:p>
          </table:table-cell>
          <table:table-cell office:value-type="float" office:value="8640000" calcext:value-type="float">
            <text:p>8640000</text:p>
          </table:table-cell>
          <table:table-cell table:formula="of:=[.B2376]/[.C2376]" office:value-type="float" office:value="0.00192418981481481" calcext:value-type="float">
            <text:p>0,00192418981481481000</text:p>
          </table:table-cell>
          <table:table-cell table:formula="of:=[.D2377]-[.D237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formula="of:=[.B2376]+7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2377]/[.C2377]" office:value-type="float" office:value="0.001925" calcext:value-type="float">
            <text:p>0,00192500000000000000</text:p>
          </table:table-cell>
          <table:table-cell table:formula="of:=[.D2378]-[.D237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[.B2377]+7" office:value-type="float" office:value="16639" calcext:value-type="float">
            <text:p>16639</text:p>
          </table:table-cell>
          <table:table-cell office:value-type="float" office:value="8640000" calcext:value-type="float">
            <text:p>8640000</text:p>
          </table:table-cell>
          <table:table-cell table:formula="of:=[.B2378]/[.C2378]" office:value-type="float" office:value="0.00192581018518519" calcext:value-type="float">
            <text:p>0,00192581018518519000</text:p>
          </table:table-cell>
          <table:table-cell table:formula="of:=[.D2379]-[.D237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table:formula="of:=[.B2378]+7" office:value-type="float" office:value="16646" calcext:value-type="float">
            <text:p>16646</text:p>
          </table:table-cell>
          <table:table-cell office:value-type="float" office:value="8640000" calcext:value-type="float">
            <text:p>8640000</text:p>
          </table:table-cell>
          <table:table-cell table:formula="of:=[.B2379]/[.C2379]" office:value-type="float" office:value="0.00192662037037037" calcext:value-type="float">
            <text:p>0,00192662037037037000</text:p>
          </table:table-cell>
          <table:table-cell table:formula="of:=[.D2380]-[.D2379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table:formula="of:=[.B2379]+7" office:value-type="float" office:value="16653" calcext:value-type="float">
            <text:p>16653</text:p>
          </table:table-cell>
          <table:table-cell office:value-type="float" office:value="8640000" calcext:value-type="float">
            <text:p>8640000</text:p>
          </table:table-cell>
          <table:table-cell table:formula="of:=[.B2380]/[.C2380]" office:value-type="float" office:value="0.00192743055555556" calcext:value-type="float">
            <text:p>0,00192743055555556000</text:p>
          </table:table-cell>
          <table:table-cell table:formula="of:=[.D2381]-[.D238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formula="of:=[.B2380]+7" office:value-type="float" office:value="16660" calcext:value-type="float">
            <text:p>16660</text:p>
          </table:table-cell>
          <table:table-cell office:value-type="float" office:value="8640000" calcext:value-type="float">
            <text:p>8640000</text:p>
          </table:table-cell>
          <table:table-cell table:formula="of:=[.B2381]/[.C2381]" office:value-type="float" office:value="0.00192824074074074" calcext:value-type="float">
            <text:p>0,00192824074074074000</text:p>
          </table:table-cell>
          <table:table-cell table:formula="of:=[.D2382]-[.D2381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table:formula="of:=[.B2381]+7" office:value-type="float" office:value="16667" calcext:value-type="float">
            <text:p>16667</text:p>
          </table:table-cell>
          <table:table-cell office:value-type="float" office:value="8640000" calcext:value-type="float">
            <text:p>8640000</text:p>
          </table:table-cell>
          <table:table-cell table:formula="of:=[.B2382]/[.C2382]" office:value-type="float" office:value="0.00192905092592593" calcext:value-type="float">
            <text:p>0,00192905092592593000</text:p>
          </table:table-cell>
          <table:table-cell table:formula="of:=[.D2383]-[.D238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table:formula="of:=[.B2382]+7" office:value-type="float" office:value="16674" calcext:value-type="float">
            <text:p>16674</text:p>
          </table:table-cell>
          <table:table-cell office:value-type="float" office:value="8640000" calcext:value-type="float">
            <text:p>8640000</text:p>
          </table:table-cell>
          <table:table-cell table:formula="of:=[.B2383]/[.C2383]" office:value-type="float" office:value="0.00192986111111111" calcext:value-type="float">
            <text:p>0,00192986111111111000</text:p>
          </table:table-cell>
          <table:table-cell table:formula="of:=[.D2384]-[.D2383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table:formula="of:=[.B2383]+7" office:value-type="float" office:value="16681" calcext:value-type="float">
            <text:p>16681</text:p>
          </table:table-cell>
          <table:table-cell office:value-type="float" office:value="8640000" calcext:value-type="float">
            <text:p>8640000</text:p>
          </table:table-cell>
          <table:table-cell table:formula="of:=[.B2384]/[.C2384]" office:value-type="float" office:value="0.0019306712962963" calcext:value-type="float">
            <text:p>0,00193067129629630000</text:p>
          </table:table-cell>
          <table:table-cell table:formula="of:=[.D2385]-[.D238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table:formula="of:=[.B2384]+7" office:value-type="float" office:value="16688" calcext:value-type="float">
            <text:p>16688</text:p>
          </table:table-cell>
          <table:table-cell office:value-type="float" office:value="8640000" calcext:value-type="float">
            <text:p>8640000</text:p>
          </table:table-cell>
          <table:table-cell table:formula="of:=[.B2385]/[.C2385]" office:value-type="float" office:value="0.00193148148148148" calcext:value-type="float">
            <text:p>0,00193148148148148000</text:p>
          </table:table-cell>
          <table:table-cell table:formula="of:=[.D2386]-[.D2385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formula="of:=[.B2385]+7" office:value-type="float" office:value="16695" calcext:value-type="float">
            <text:p>16695</text:p>
          </table:table-cell>
          <table:table-cell office:value-type="float" office:value="8640000" calcext:value-type="float">
            <text:p>8640000</text:p>
          </table:table-cell>
          <table:table-cell table:formula="of:=[.B2386]/[.C2386]" office:value-type="float" office:value="0.00193229166666667" calcext:value-type="float">
            <text:p>0,00193229166666667000</text:p>
          </table:table-cell>
          <table:table-cell table:formula="of:=[.D2387]-[.D238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[.B2386]+7" office:value-type="float" office:value="16702" calcext:value-type="float">
            <text:p>16702</text:p>
          </table:table-cell>
          <table:table-cell office:value-type="float" office:value="8640000" calcext:value-type="float">
            <text:p>8640000</text:p>
          </table:table-cell>
          <table:table-cell table:formula="of:=[.B2387]/[.C2387]" office:value-type="float" office:value="0.00193310185185185" calcext:value-type="float">
            <text:p>0,00193310185185185000</text:p>
          </table:table-cell>
          <table:table-cell table:formula="of:=[.D2388]-[.D2387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[.B2387]+7" office:value-type="float" office:value="16709" calcext:value-type="float">
            <text:p>16709</text:p>
          </table:table-cell>
          <table:table-cell office:value-type="float" office:value="8640000" calcext:value-type="float">
            <text:p>8640000</text:p>
          </table:table-cell>
          <table:table-cell table:formula="of:=[.B2388]/[.C2388]" office:value-type="float" office:value="0.00193391203703704" calcext:value-type="float">
            <text:p>0,00193391203703704000</text:p>
          </table:table-cell>
          <table:table-cell table:formula="of:=[.D2389]-[.D238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formula="of:=[.B2388]+7" office:value-type="float" office:value="16716" calcext:value-type="float">
            <text:p>16716</text:p>
          </table:table-cell>
          <table:table-cell office:value-type="float" office:value="8640000" calcext:value-type="float">
            <text:p>8640000</text:p>
          </table:table-cell>
          <table:table-cell table:formula="of:=[.B2389]/[.C2389]" office:value-type="float" office:value="0.00193472222222222" calcext:value-type="float">
            <text:p>0,00193472222222222000</text:p>
          </table:table-cell>
          <table:table-cell table:formula="of:=[.D2390]-[.D238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[.B2389]+7" office:value-type="float" office:value="16723" calcext:value-type="float">
            <text:p>16723</text:p>
          </table:table-cell>
          <table:table-cell office:value-type="float" office:value="8640000" calcext:value-type="float">
            <text:p>8640000</text:p>
          </table:table-cell>
          <table:table-cell table:formula="of:=[.B2390]/[.C2390]" office:value-type="float" office:value="0.00193553240740741" calcext:value-type="float">
            <text:p>0,00193553240740741000</text:p>
          </table:table-cell>
          <table:table-cell table:formula="of:=[.D2391]-[.D239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[.B2390]+7" office:value-type="float" office:value="16730" calcext:value-type="float">
            <text:p>16730</text:p>
          </table:table-cell>
          <table:table-cell office:value-type="float" office:value="8640000" calcext:value-type="float">
            <text:p>8640000</text:p>
          </table:table-cell>
          <table:table-cell table:formula="of:=[.B2391]/[.C2391]" office:value-type="float" office:value="0.00193634259259259" calcext:value-type="float">
            <text:p>0,00193634259259259000</text:p>
          </table:table-cell>
          <table:table-cell table:formula="of:=[.D2392]-[.D239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table:formula="of:=[.B2391]+7" office:value-type="float" office:value="16737" calcext:value-type="float">
            <text:p>16737</text:p>
          </table:table-cell>
          <table:table-cell office:value-type="float" office:value="8640000" calcext:value-type="float">
            <text:p>8640000</text:p>
          </table:table-cell>
          <table:table-cell table:formula="of:=[.B2392]/[.C2392]" office:value-type="float" office:value="0.00193715277777778" calcext:value-type="float">
            <text:p>0,00193715277777778000</text:p>
          </table:table-cell>
          <table:table-cell table:formula="of:=[.D2393]-[.D239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[.B2392]+7" office:value-type="float" office:value="16744" calcext:value-type="float">
            <text:p>16744</text:p>
          </table:table-cell>
          <table:table-cell office:value-type="float" office:value="8640000" calcext:value-type="float">
            <text:p>8640000</text:p>
          </table:table-cell>
          <table:table-cell table:formula="of:=[.B2393]/[.C2393]" office:value-type="float" office:value="0.00193796296296296" calcext:value-type="float">
            <text:p>0,00193796296296296000</text:p>
          </table:table-cell>
          <table:table-cell table:formula="of:=[.D2394]-[.D239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table:formula="of:=[.B2393]+7" office:value-type="float" office:value="16751" calcext:value-type="float">
            <text:p>16751</text:p>
          </table:table-cell>
          <table:table-cell office:value-type="float" office:value="8640000" calcext:value-type="float">
            <text:p>8640000</text:p>
          </table:table-cell>
          <table:table-cell table:formula="of:=[.B2394]/[.C2394]" office:value-type="float" office:value="0.00193877314814815" calcext:value-type="float">
            <text:p>0,00193877314814815000</text:p>
          </table:table-cell>
          <table:table-cell table:formula="of:=[.D2395]-[.D239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[.B2394]+7" office:value-type="float" office:value="16758" calcext:value-type="float">
            <text:p>16758</text:p>
          </table:table-cell>
          <table:table-cell office:value-type="float" office:value="8640000" calcext:value-type="float">
            <text:p>8640000</text:p>
          </table:table-cell>
          <table:table-cell table:formula="of:=[.B2395]/[.C2395]" office:value-type="float" office:value="0.00193958333333333" calcext:value-type="float">
            <text:p>0,00193958333333333000</text:p>
          </table:table-cell>
          <table:table-cell table:formula="of:=[.D2396]-[.D239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[.B2395]+7" office:value-type="float" office:value="16765" calcext:value-type="float">
            <text:p>16765</text:p>
          </table:table-cell>
          <table:table-cell office:value-type="float" office:value="8640000" calcext:value-type="float">
            <text:p>8640000</text:p>
          </table:table-cell>
          <table:table-cell table:formula="of:=[.B2396]/[.C2396]" office:value-type="float" office:value="0.00194039351851852" calcext:value-type="float">
            <text:p>0,00194039351851852000</text:p>
          </table:table-cell>
          <table:table-cell table:formula="of:=[.D2397]-[.D239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[.B2396]+7" office:value-type="float" office:value="16772" calcext:value-type="float">
            <text:p>16772</text:p>
          </table:table-cell>
          <table:table-cell office:value-type="float" office:value="8640000" calcext:value-type="float">
            <text:p>8640000</text:p>
          </table:table-cell>
          <table:table-cell table:formula="of:=[.B2397]/[.C2397]" office:value-type="float" office:value="0.0019412037037037" calcext:value-type="float">
            <text:p>0,00194120370370370000</text:p>
          </table:table-cell>
          <table:table-cell table:formula="of:=[.D2398]-[.D239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[.B2397]+7" office:value-type="float" office:value="16779" calcext:value-type="float">
            <text:p>16779</text:p>
          </table:table-cell>
          <table:table-cell office:value-type="float" office:value="8640000" calcext:value-type="float">
            <text:p>8640000</text:p>
          </table:table-cell>
          <table:table-cell table:formula="of:=[.B2398]/[.C2398]" office:value-type="float" office:value="0.00194201388888889" calcext:value-type="float">
            <text:p>0,00194201388888889000</text:p>
          </table:table-cell>
          <table:table-cell table:formula="of:=[.D2399]-[.D239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[.B2398]+7" office:value-type="float" office:value="16786" calcext:value-type="float">
            <text:p>16786</text:p>
          </table:table-cell>
          <table:table-cell office:value-type="float" office:value="8640000" calcext:value-type="float">
            <text:p>8640000</text:p>
          </table:table-cell>
          <table:table-cell table:formula="of:=[.B2399]/[.C2399]" office:value-type="float" office:value="0.00194282407407407" calcext:value-type="float">
            <text:p>0,00194282407407407000</text:p>
          </table:table-cell>
          <table:table-cell table:formula="of:=[.D2400]-[.D239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[.B2399]+7" office:value-type="float" office:value="16793" calcext:value-type="float">
            <text:p>16793</text:p>
          </table:table-cell>
          <table:table-cell office:value-type="float" office:value="8640000" calcext:value-type="float">
            <text:p>8640000</text:p>
          </table:table-cell>
          <table:table-cell table:formula="of:=[.B2400]/[.C2400]" office:value-type="float" office:value="0.00194363425925926" calcext:value-type="float">
            <text:p>0,00194363425925926000</text:p>
          </table:table-cell>
          <table:table-cell table:formula="of:=[.D2401]-[.D240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B2400]+7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2401]/[.C2401]" office:value-type="float" office:value="0.00194444444444444" calcext:value-type="float">
            <text:p>0,00194444444444444000</text:p>
          </table:table-cell>
          <table:table-cell table:formula="of:=[.D2402]-[.D240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[.B2401]+7" office:value-type="float" office:value="16807" calcext:value-type="float">
            <text:p>16807</text:p>
          </table:table-cell>
          <table:table-cell office:value-type="float" office:value="8640000" calcext:value-type="float">
            <text:p>8640000</text:p>
          </table:table-cell>
          <table:table-cell table:formula="of:=[.B2402]/[.C2402]" office:value-type="float" office:value="0.00194525462962963" calcext:value-type="float">
            <text:p>0,00194525462962963000</text:p>
          </table:table-cell>
          <table:table-cell table:formula="of:=[.D2403]-[.D2402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table:formula="of:=[.B2402]+7" office:value-type="float" office:value="16814" calcext:value-type="float">
            <text:p>16814</text:p>
          </table:table-cell>
          <table:table-cell office:value-type="float" office:value="8640000" calcext:value-type="float">
            <text:p>8640000</text:p>
          </table:table-cell>
          <table:table-cell table:formula="of:=[.B2403]/[.C2403]" office:value-type="float" office:value="0.00194606481481481" calcext:value-type="float">
            <text:p>0,00194606481481481000</text:p>
          </table:table-cell>
          <table:table-cell table:formula="of:=[.D2404]-[.D240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[.B2403]+7" office:value-type="float" office:value="16821" calcext:value-type="float">
            <text:p>16821</text:p>
          </table:table-cell>
          <table:table-cell office:value-type="float" office:value="8640000" calcext:value-type="float">
            <text:p>8640000</text:p>
          </table:table-cell>
          <table:table-cell table:formula="of:=[.B2404]/[.C2404]" office:value-type="float" office:value="0.001946875" calcext:value-type="float">
            <text:p>0,00194687500000000000</text:p>
          </table:table-cell>
          <table:table-cell table:formula="of:=[.D2405]-[.D2404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table:formula="of:=[.B2404]+7" office:value-type="float" office:value="16828" calcext:value-type="float">
            <text:p>16828</text:p>
          </table:table-cell>
          <table:table-cell office:value-type="float" office:value="8640000" calcext:value-type="float">
            <text:p>8640000</text:p>
          </table:table-cell>
          <table:table-cell table:formula="of:=[.B2405]/[.C2405]" office:value-type="float" office:value="0.00194768518518519" calcext:value-type="float">
            <text:p>0,00194768518518519000</text:p>
          </table:table-cell>
          <table:table-cell table:formula="of:=[.D2406]-[.D240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[.B2405]+7" office:value-type="float" office:value="16835" calcext:value-type="float">
            <text:p>16835</text:p>
          </table:table-cell>
          <table:table-cell office:value-type="float" office:value="8640000" calcext:value-type="float">
            <text:p>8640000</text:p>
          </table:table-cell>
          <table:table-cell table:formula="of:=[.B2406]/[.C2406]" office:value-type="float" office:value="0.00194849537037037" calcext:value-type="float">
            <text:p>0,00194849537037037000</text:p>
          </table:table-cell>
          <table:table-cell table:formula="of:=[.D2407]-[.D2406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[.B2406]+7" office:value-type="float" office:value="16842" calcext:value-type="float">
            <text:p>16842</text:p>
          </table:table-cell>
          <table:table-cell office:value-type="float" office:value="8640000" calcext:value-type="float">
            <text:p>8640000</text:p>
          </table:table-cell>
          <table:table-cell table:formula="of:=[.B2407]/[.C2407]" office:value-type="float" office:value="0.00194930555555556" calcext:value-type="float">
            <text:p>0,00194930555555556000</text:p>
          </table:table-cell>
          <table:table-cell table:formula="of:=[.D2408]-[.D240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[.B2407]+7" office:value-type="float" office:value="16849" calcext:value-type="float">
            <text:p>16849</text:p>
          </table:table-cell>
          <table:table-cell office:value-type="float" office:value="8640000" calcext:value-type="float">
            <text:p>8640000</text:p>
          </table:table-cell>
          <table:table-cell table:formula="of:=[.B2408]/[.C2408]" office:value-type="float" office:value="0.00195011574074074" calcext:value-type="float">
            <text:p>0,00195011574074074000</text:p>
          </table:table-cell>
          <table:table-cell table:formula="of:=[.D2409]-[.D2408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table:formula="of:=[.B2408]+7" office:value-type="float" office:value="16856" calcext:value-type="float">
            <text:p>16856</text:p>
          </table:table-cell>
          <table:table-cell office:value-type="float" office:value="8640000" calcext:value-type="float">
            <text:p>8640000</text:p>
          </table:table-cell>
          <table:table-cell table:formula="of:=[.B2409]/[.C2409]" office:value-type="float" office:value="0.00195092592592593" calcext:value-type="float">
            <text:p>0,00195092592592593000</text:p>
          </table:table-cell>
          <table:table-cell table:formula="of:=[.D2410]-[.D240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table:formula="of:=[.B2409]+7" office:value-type="float" office:value="16863" calcext:value-type="float">
            <text:p>16863</text:p>
          </table:table-cell>
          <table:table-cell office:value-type="float" office:value="8640000" calcext:value-type="float">
            <text:p>8640000</text:p>
          </table:table-cell>
          <table:table-cell table:formula="of:=[.B2410]/[.C2410]" office:value-type="float" office:value="0.00195173611111111" calcext:value-type="float">
            <text:p>0,00195173611111111000</text:p>
          </table:table-cell>
          <table:table-cell table:formula="of:=[.D2411]-[.D2410]" office:value-type="float" office:value="0.000000810185185185072" calcext:value-type="float">
            <text:p>0,00000081018518518507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[.B2410]+7" office:value-type="float" office:value="16870" calcext:value-type="float">
            <text:p>16870</text:p>
          </table:table-cell>
          <table:table-cell office:value-type="float" office:value="8640000" calcext:value-type="float">
            <text:p>8640000</text:p>
          </table:table-cell>
          <table:table-cell table:formula="of:=[.B2411]/[.C2411]" office:value-type="float" office:value="0.0019525462962963" calcext:value-type="float">
            <text:p>0,00195254629629630000</text:p>
          </table:table-cell>
          <table:table-cell table:formula="of:=[.D2412]-[.D2411]" office:value-type="float" office:value="0.000000810185185185506" calcext:value-type="float">
            <text:p>0,00000081018518518551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formula="of:=[.B2411]+7" office:value-type="float" office:value="16877" calcext:value-type="float">
            <text:p>16877</text:p>
          </table:table-cell>
          <table:table-cell office:value-type="float" office:value="8640000" calcext:value-type="float">
            <text:p>8640000</text:p>
          </table:table-cell>
          <table:table-cell table:formula="of:=[.B2412]/[.C2412]" office:value-type="float" office:value="0.00195335648148148" calcext:value-type="float">
            <text:p>0,00195335648148148000</text:p>
          </table:table-cell>
          <table:table-cell table:formula="of:=[.D2413]-[.D241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[.B2412]+7" office:value-type="float" office:value="16884" calcext:value-type="float">
            <text:p>16884</text:p>
          </table:table-cell>
          <table:table-cell office:value-type="float" office:value="8640000" calcext:value-type="float">
            <text:p>8640000</text:p>
          </table:table-cell>
          <table:table-cell table:formula="of:=[.B2413]/[.C2413]" office:value-type="float" office:value="0.00195416666666667" calcext:value-type="float">
            <text:p>0,00195416666666667000</text:p>
          </table:table-cell>
          <table:table-cell table:formula="of:=[.D2414]-[.D241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table:formula="of:=[.B2413]+7" office:value-type="float" office:value="16891" calcext:value-type="float">
            <text:p>16891</text:p>
          </table:table-cell>
          <table:table-cell office:value-type="float" office:value="8640000" calcext:value-type="float">
            <text:p>8640000</text:p>
          </table:table-cell>
          <table:table-cell table:formula="of:=[.B2414]/[.C2414]" office:value-type="float" office:value="0.00195497685185185" calcext:value-type="float">
            <text:p>0,00195497685185185000</text:p>
          </table:table-cell>
          <table:table-cell table:formula="of:=[.D2415]-[.D241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[.B2414]+7" office:value-type="float" office:value="16898" calcext:value-type="float">
            <text:p>16898</text:p>
          </table:table-cell>
          <table:table-cell office:value-type="float" office:value="8640000" calcext:value-type="float">
            <text:p>8640000</text:p>
          </table:table-cell>
          <table:table-cell table:formula="of:=[.B2415]/[.C2415]" office:value-type="float" office:value="0.00195578703703704" calcext:value-type="float">
            <text:p>0,00195578703703704000</text:p>
          </table:table-cell>
          <table:table-cell table:formula="of:=[.D2416]-[.D241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[.B2415]+7" office:value-type="float" office:value="16905" calcext:value-type="float">
            <text:p>16905</text:p>
          </table:table-cell>
          <table:table-cell office:value-type="float" office:value="8640000" calcext:value-type="float">
            <text:p>8640000</text:p>
          </table:table-cell>
          <table:table-cell table:formula="of:=[.B2416]/[.C2416]" office:value-type="float" office:value="0.00195659722222222" calcext:value-type="float">
            <text:p>0,00195659722222222000</text:p>
          </table:table-cell>
          <table:table-cell table:formula="of:=[.D2417]-[.D241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table:formula="of:=[.B2416]+7" office:value-type="float" office:value="16912" calcext:value-type="float">
            <text:p>16912</text:p>
          </table:table-cell>
          <table:table-cell office:value-type="float" office:value="8640000" calcext:value-type="float">
            <text:p>8640000</text:p>
          </table:table-cell>
          <table:table-cell table:formula="of:=[.B2417]/[.C2417]" office:value-type="float" office:value="0.00195740740740741" calcext:value-type="float">
            <text:p>0,00195740740740741000</text:p>
          </table:table-cell>
          <table:table-cell table:formula="of:=[.D2418]-[.D241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[.B2417]+7" office:value-type="float" office:value="16919" calcext:value-type="float">
            <text:p>16919</text:p>
          </table:table-cell>
          <table:table-cell office:value-type="float" office:value="8640000" calcext:value-type="float">
            <text:p>8640000</text:p>
          </table:table-cell>
          <table:table-cell table:formula="of:=[.B2418]/[.C2418]" office:value-type="float" office:value="0.00195821759259259" calcext:value-type="float">
            <text:p>0,00195821759259259000</text:p>
          </table:table-cell>
          <table:table-cell table:formula="of:=[.D2419]-[.D241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table:formula="of:=[.B2418]+7" office:value-type="float" office:value="16926" calcext:value-type="float">
            <text:p>16926</text:p>
          </table:table-cell>
          <table:table-cell office:value-type="float" office:value="8640000" calcext:value-type="float">
            <text:p>8640000</text:p>
          </table:table-cell>
          <table:table-cell table:formula="of:=[.B2419]/[.C2419]" office:value-type="float" office:value="0.00195902777777778" calcext:value-type="float">
            <text:p>0,00195902777777778000</text:p>
          </table:table-cell>
          <table:table-cell table:formula="of:=[.D2420]-[.D241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[.B2419]+7" office:value-type="float" office:value="16933" calcext:value-type="float">
            <text:p>16933</text:p>
          </table:table-cell>
          <table:table-cell office:value-type="float" office:value="8640000" calcext:value-type="float">
            <text:p>8640000</text:p>
          </table:table-cell>
          <table:table-cell table:formula="of:=[.B2420]/[.C2420]" office:value-type="float" office:value="0.00195983796296296" calcext:value-type="float">
            <text:p>0,00195983796296296000</text:p>
          </table:table-cell>
          <table:table-cell table:formula="of:=[.D2421]-[.D242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[.B2420]+7" office:value-type="float" office:value="16940" calcext:value-type="float">
            <text:p>16940</text:p>
          </table:table-cell>
          <table:table-cell office:value-type="float" office:value="8640000" calcext:value-type="float">
            <text:p>8640000</text:p>
          </table:table-cell>
          <table:table-cell table:formula="of:=[.B2421]/[.C2421]" office:value-type="float" office:value="0.00196064814814815" calcext:value-type="float">
            <text:p>0,00196064814814815000</text:p>
          </table:table-cell>
          <table:table-cell table:formula="of:=[.D2422]-[.D242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[.B2421]+7" office:value-type="float" office:value="16947" calcext:value-type="float">
            <text:p>16947</text:p>
          </table:table-cell>
          <table:table-cell office:value-type="float" office:value="8640000" calcext:value-type="float">
            <text:p>8640000</text:p>
          </table:table-cell>
          <table:table-cell table:formula="of:=[.B2422]/[.C2422]" office:value-type="float" office:value="0.00196145833333333" calcext:value-type="float">
            <text:p>0,00196145833333333000</text:p>
          </table:table-cell>
          <table:table-cell table:formula="of:=[.D2423]-[.D242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[.B2422]+7" office:value-type="float" office:value="16954" calcext:value-type="float">
            <text:p>16954</text:p>
          </table:table-cell>
          <table:table-cell office:value-type="float" office:value="8640000" calcext:value-type="float">
            <text:p>8640000</text:p>
          </table:table-cell>
          <table:table-cell table:formula="of:=[.B2423]/[.C2423]" office:value-type="float" office:value="0.00196226851851852" calcext:value-type="float">
            <text:p>0,00196226851851852000</text:p>
          </table:table-cell>
          <table:table-cell table:formula="of:=[.D2424]-[.D242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table:formula="of:=[.B2423]+7" office:value-type="float" office:value="16961" calcext:value-type="float">
            <text:p>16961</text:p>
          </table:table-cell>
          <table:table-cell office:value-type="float" office:value="8640000" calcext:value-type="float">
            <text:p>8640000</text:p>
          </table:table-cell>
          <table:table-cell table:formula="of:=[.B2424]/[.C2424]" office:value-type="float" office:value="0.0019630787037037" calcext:value-type="float">
            <text:p>0,00196307870370370000</text:p>
          </table:table-cell>
          <table:table-cell table:formula="of:=[.D2425]-[.D242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[.B2424]+7" office:value-type="float" office:value="16968" calcext:value-type="float">
            <text:p>16968</text:p>
          </table:table-cell>
          <table:table-cell office:value-type="float" office:value="8640000" calcext:value-type="float">
            <text:p>8640000</text:p>
          </table:table-cell>
          <table:table-cell table:formula="of:=[.B2425]/[.C2425]" office:value-type="float" office:value="0.00196388888888889" calcext:value-type="float">
            <text:p>0,00196388888888889000</text:p>
          </table:table-cell>
          <table:table-cell table:formula="of:=[.D2426]-[.D242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[.B2425]+7" office:value-type="float" office:value="16975" calcext:value-type="float">
            <text:p>16975</text:p>
          </table:table-cell>
          <table:table-cell office:value-type="float" office:value="8640000" calcext:value-type="float">
            <text:p>8640000</text:p>
          </table:table-cell>
          <table:table-cell table:formula="of:=[.B2426]/[.C2426]" office:value-type="float" office:value="0.00196469907407407" calcext:value-type="float">
            <text:p>0,00196469907407407000</text:p>
          </table:table-cell>
          <table:table-cell table:formula="of:=[.D2427]-[.D242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table:formula="of:=[.B2426]+7" office:value-type="float" office:value="16982" calcext:value-type="float">
            <text:p>16982</text:p>
          </table:table-cell>
          <table:table-cell office:value-type="float" office:value="8640000" calcext:value-type="float">
            <text:p>8640000</text:p>
          </table:table-cell>
          <table:table-cell table:formula="of:=[.B2427]/[.C2427]" office:value-type="float" office:value="0.00196550925925926" calcext:value-type="float">
            <text:p>0,00196550925925926000</text:p>
          </table:table-cell>
          <table:table-cell table:formula="of:=[.D2428]-[.D242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table:formula="of:=[.B2427]+7" office:value-type="float" office:value="16989" calcext:value-type="float">
            <text:p>16989</text:p>
          </table:table-cell>
          <table:table-cell office:value-type="float" office:value="8640000" calcext:value-type="float">
            <text:p>8640000</text:p>
          </table:table-cell>
          <table:table-cell table:formula="of:=[.B2428]/[.C2428]" office:value-type="float" office:value="0.00196631944444444" calcext:value-type="float">
            <text:p>0,00196631944444444000</text:p>
          </table:table-cell>
          <table:table-cell table:formula="of:=[.D2429]-[.D242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[.B2428]+7" office:value-type="float" office:value="16996" calcext:value-type="float">
            <text:p>16996</text:p>
          </table:table-cell>
          <table:table-cell office:value-type="float" office:value="8640000" calcext:value-type="float">
            <text:p>8640000</text:p>
          </table:table-cell>
          <table:table-cell table:formula="of:=[.B2429]/[.C2429]" office:value-type="float" office:value="0.00196712962962963" calcext:value-type="float">
            <text:p>0,00196712962962963000</text:p>
          </table:table-cell>
          <table:table-cell table:formula="of:=[.D2430]-[.D242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table:formula="of:=[.B2429]+7" office:value-type="float" office:value="17003" calcext:value-type="float">
            <text:p>17003</text:p>
          </table:table-cell>
          <table:table-cell office:value-type="float" office:value="8640000" calcext:value-type="float">
            <text:p>8640000</text:p>
          </table:table-cell>
          <table:table-cell table:formula="of:=[.B2430]/[.C2430]" office:value-type="float" office:value="0.00196793981481481" calcext:value-type="float">
            <text:p>0,00196793981481481000</text:p>
          </table:table-cell>
          <table:table-cell table:formula="of:=[.D2431]-[.D243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table:formula="of:=[.B2430]+7" office:value-type="float" office:value="17010" calcext:value-type="float">
            <text:p>17010</text:p>
          </table:table-cell>
          <table:table-cell office:value-type="float" office:value="8640000" calcext:value-type="float">
            <text:p>8640000</text:p>
          </table:table-cell>
          <table:table-cell table:formula="of:=[.B2431]/[.C2431]" office:value-type="float" office:value="0.00196875" calcext:value-type="float">
            <text:p>0,00196875000000000000</text:p>
          </table:table-cell>
          <table:table-cell table:formula="of:=[.D2432]-[.D243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table:formula="of:=[.B2431]+7" office:value-type="float" office:value="17017" calcext:value-type="float">
            <text:p>17017</text:p>
          </table:table-cell>
          <table:table-cell office:value-type="float" office:value="8640000" calcext:value-type="float">
            <text:p>8640000</text:p>
          </table:table-cell>
          <table:table-cell table:formula="of:=[.B2432]/[.C2432]" office:value-type="float" office:value="0.00196956018518519" calcext:value-type="float">
            <text:p>0,00196956018518519000</text:p>
          </table:table-cell>
          <table:table-cell table:formula="of:=[.D2433]-[.D243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[.B2432]+7" office:value-type="float" office:value="17024" calcext:value-type="float">
            <text:p>17024</text:p>
          </table:table-cell>
          <table:table-cell office:value-type="float" office:value="8640000" calcext:value-type="float">
            <text:p>8640000</text:p>
          </table:table-cell>
          <table:table-cell table:formula="of:=[.B2433]/[.C2433]" office:value-type="float" office:value="0.00197037037037037" calcext:value-type="float">
            <text:p>0,00197037037037037000</text:p>
          </table:table-cell>
          <table:table-cell table:formula="of:=[.D2434]-[.D243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table:formula="of:=[.B2433]+7" office:value-type="float" office:value="17031" calcext:value-type="float">
            <text:p>17031</text:p>
          </table:table-cell>
          <table:table-cell office:value-type="float" office:value="8640000" calcext:value-type="float">
            <text:p>8640000</text:p>
          </table:table-cell>
          <table:table-cell table:formula="of:=[.B2434]/[.C2434]" office:value-type="float" office:value="0.00197118055555556" calcext:value-type="float">
            <text:p>0,00197118055555556000</text:p>
          </table:table-cell>
          <table:table-cell table:formula="of:=[.D2435]-[.D243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table:formula="of:=[.B2434]+7" office:value-type="float" office:value="17038" calcext:value-type="float">
            <text:p>17038</text:p>
          </table:table-cell>
          <table:table-cell office:value-type="float" office:value="8640000" calcext:value-type="float">
            <text:p>8640000</text:p>
          </table:table-cell>
          <table:table-cell table:formula="of:=[.B2435]/[.C2435]" office:value-type="float" office:value="0.00197199074074074" calcext:value-type="float">
            <text:p>0,00197199074074074000</text:p>
          </table:table-cell>
          <table:table-cell table:formula="of:=[.D2436]-[.D243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table:formula="of:=[.B2435]+7" office:value-type="float" office:value="17045" calcext:value-type="float">
            <text:p>17045</text:p>
          </table:table-cell>
          <table:table-cell office:value-type="float" office:value="8640000" calcext:value-type="float">
            <text:p>8640000</text:p>
          </table:table-cell>
          <table:table-cell table:formula="of:=[.B2436]/[.C2436]" office:value-type="float" office:value="0.00197280092592593" calcext:value-type="float">
            <text:p>0,00197280092592593000</text:p>
          </table:table-cell>
          <table:table-cell table:formula="of:=[.D2437]-[.D243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table:formula="of:=[.B2436]+7" office:value-type="float" office:value="17052" calcext:value-type="float">
            <text:p>17052</text:p>
          </table:table-cell>
          <table:table-cell office:value-type="float" office:value="8640000" calcext:value-type="float">
            <text:p>8640000</text:p>
          </table:table-cell>
          <table:table-cell table:formula="of:=[.B2437]/[.C2437]" office:value-type="float" office:value="0.00197361111111111" calcext:value-type="float">
            <text:p>0,00197361111111111000</text:p>
          </table:table-cell>
          <table:table-cell table:formula="of:=[.D2438]-[.D243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table:formula="of:=[.B2437]+7" office:value-type="float" office:value="17059" calcext:value-type="float">
            <text:p>17059</text:p>
          </table:table-cell>
          <table:table-cell office:value-type="float" office:value="8640000" calcext:value-type="float">
            <text:p>8640000</text:p>
          </table:table-cell>
          <table:table-cell table:formula="of:=[.B2438]/[.C2438]" office:value-type="float" office:value="0.0019744212962963" calcext:value-type="float">
            <text:p>0,00197442129629630000</text:p>
          </table:table-cell>
          <table:table-cell table:formula="of:=[.D2439]-[.D243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table:formula="of:=[.B2438]+7" office:value-type="float" office:value="17066" calcext:value-type="float">
            <text:p>17066</text:p>
          </table:table-cell>
          <table:table-cell office:value-type="float" office:value="8640000" calcext:value-type="float">
            <text:p>8640000</text:p>
          </table:table-cell>
          <table:table-cell table:formula="of:=[.B2439]/[.C2439]" office:value-type="float" office:value="0.00197523148148148" calcext:value-type="float">
            <text:p>0,00197523148148148000</text:p>
          </table:table-cell>
          <table:table-cell table:formula="of:=[.D2440]-[.D243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table:formula="of:=[.B2439]+7" office:value-type="float" office:value="17073" calcext:value-type="float">
            <text:p>17073</text:p>
          </table:table-cell>
          <table:table-cell office:value-type="float" office:value="8640000" calcext:value-type="float">
            <text:p>8640000</text:p>
          </table:table-cell>
          <table:table-cell table:formula="of:=[.B2440]/[.C2440]" office:value-type="float" office:value="0.00197604166666667" calcext:value-type="float">
            <text:p>0,00197604166666667000</text:p>
          </table:table-cell>
          <table:table-cell table:formula="of:=[.D2441]-[.D244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table:formula="of:=[.B2440]+7" office:value-type="float" office:value="17080" calcext:value-type="float">
            <text:p>17080</text:p>
          </table:table-cell>
          <table:table-cell office:value-type="float" office:value="8640000" calcext:value-type="float">
            <text:p>8640000</text:p>
          </table:table-cell>
          <table:table-cell table:formula="of:=[.B2441]/[.C2441]" office:value-type="float" office:value="0.00197685185185185" calcext:value-type="float">
            <text:p>0,00197685185185185000</text:p>
          </table:table-cell>
          <table:table-cell table:formula="of:=[.D2442]-[.D244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table:formula="of:=[.B2441]+7" office:value-type="float" office:value="17087" calcext:value-type="float">
            <text:p>17087</text:p>
          </table:table-cell>
          <table:table-cell office:value-type="float" office:value="8640000" calcext:value-type="float">
            <text:p>8640000</text:p>
          </table:table-cell>
          <table:table-cell table:formula="of:=[.B2442]/[.C2442]" office:value-type="float" office:value="0.00197766203703704" calcext:value-type="float">
            <text:p>0,00197766203703704000</text:p>
          </table:table-cell>
          <table:table-cell table:formula="of:=[.D2443]-[.D244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table:formula="of:=[.B2442]+7" office:value-type="float" office:value="17094" calcext:value-type="float">
            <text:p>17094</text:p>
          </table:table-cell>
          <table:table-cell office:value-type="float" office:value="8640000" calcext:value-type="float">
            <text:p>8640000</text:p>
          </table:table-cell>
          <table:table-cell table:formula="of:=[.B2443]/[.C2443]" office:value-type="float" office:value="0.00197847222222222" calcext:value-type="float">
            <text:p>0,00197847222222222000</text:p>
          </table:table-cell>
          <table:table-cell table:formula="of:=[.D2444]-[.D244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[.B2443]+7" office:value-type="float" office:value="17101" calcext:value-type="float">
            <text:p>17101</text:p>
          </table:table-cell>
          <table:table-cell office:value-type="float" office:value="8640000" calcext:value-type="float">
            <text:p>8640000</text:p>
          </table:table-cell>
          <table:table-cell table:formula="of:=[.B2444]/[.C2444]" office:value-type="float" office:value="0.00197928240740741" calcext:value-type="float">
            <text:p>0,00197928240740741000</text:p>
          </table:table-cell>
          <table:table-cell table:formula="of:=[.D2445]-[.D244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[.B2444]+7" office:value-type="float" office:value="17108" calcext:value-type="float">
            <text:p>17108</text:p>
          </table:table-cell>
          <table:table-cell office:value-type="float" office:value="8640000" calcext:value-type="float">
            <text:p>8640000</text:p>
          </table:table-cell>
          <table:table-cell table:formula="of:=[.B2445]/[.C2445]" office:value-type="float" office:value="0.00198009259259259" calcext:value-type="float">
            <text:p>0,00198009259259259000</text:p>
          </table:table-cell>
          <table:table-cell table:formula="of:=[.D2446]-[.D244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table:formula="of:=[.B2445]+7" office:value-type="float" office:value="17115" calcext:value-type="float">
            <text:p>17115</text:p>
          </table:table-cell>
          <table:table-cell office:value-type="float" office:value="8640000" calcext:value-type="float">
            <text:p>8640000</text:p>
          </table:table-cell>
          <table:table-cell table:formula="of:=[.B2446]/[.C2446]" office:value-type="float" office:value="0.00198090277777778" calcext:value-type="float">
            <text:p>0,00198090277777778000</text:p>
          </table:table-cell>
          <table:table-cell table:formula="of:=[.D2447]-[.D244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table:formula="of:=[.B2446]+7" office:value-type="float" office:value="17122" calcext:value-type="float">
            <text:p>17122</text:p>
          </table:table-cell>
          <table:table-cell office:value-type="float" office:value="8640000" calcext:value-type="float">
            <text:p>8640000</text:p>
          </table:table-cell>
          <table:table-cell table:formula="of:=[.B2447]/[.C2447]" office:value-type="float" office:value="0.00198171296296296" calcext:value-type="float">
            <text:p>0,00198171296296296000</text:p>
          </table:table-cell>
          <table:table-cell table:formula="of:=[.D2448]-[.D244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table:formula="of:=[.B2447]+7" office:value-type="float" office:value="17129" calcext:value-type="float">
            <text:p>17129</text:p>
          </table:table-cell>
          <table:table-cell office:value-type="float" office:value="8640000" calcext:value-type="float">
            <text:p>8640000</text:p>
          </table:table-cell>
          <table:table-cell table:formula="of:=[.B2448]/[.C2448]" office:value-type="float" office:value="0.00198252314814815" calcext:value-type="float">
            <text:p>0,00198252314814815000</text:p>
          </table:table-cell>
          <table:table-cell table:formula="of:=[.D2449]-[.D244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table:formula="of:=[.B2448]+7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2449]/[.C2449]" office:value-type="float" office:value="0.00198333333333333" calcext:value-type="float">
            <text:p>0,00198333333333333000</text:p>
          </table:table-cell>
          <table:table-cell table:formula="of:=[.D2450]-[.D244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table:formula="of:=[.B2449]+7" office:value-type="float" office:value="17143" calcext:value-type="float">
            <text:p>17143</text:p>
          </table:table-cell>
          <table:table-cell office:value-type="float" office:value="8640000" calcext:value-type="float">
            <text:p>8640000</text:p>
          </table:table-cell>
          <table:table-cell table:formula="of:=[.B2450]/[.C2450]" office:value-type="float" office:value="0.00198414351851852" calcext:value-type="float">
            <text:p>0,00198414351851852000</text:p>
          </table:table-cell>
          <table:table-cell table:formula="of:=[.D2451]-[.D245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[.B2450]+7" office:value-type="float" office:value="17150" calcext:value-type="float">
            <text:p>17150</text:p>
          </table:table-cell>
          <table:table-cell office:value-type="float" office:value="8640000" calcext:value-type="float">
            <text:p>8640000</text:p>
          </table:table-cell>
          <table:table-cell table:formula="of:=[.B2451]/[.C2451]" office:value-type="float" office:value="0.0019849537037037" calcext:value-type="float">
            <text:p>0,00198495370370370000</text:p>
          </table:table-cell>
          <table:table-cell table:formula="of:=[.D2452]-[.D245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[.B2451]+7" office:value-type="float" office:value="17157" calcext:value-type="float">
            <text:p>17157</text:p>
          </table:table-cell>
          <table:table-cell office:value-type="float" office:value="8640000" calcext:value-type="float">
            <text:p>8640000</text:p>
          </table:table-cell>
          <table:table-cell table:formula="of:=[.B2452]/[.C2452]" office:value-type="float" office:value="0.00198576388888889" calcext:value-type="float">
            <text:p>0,00198576388888889000</text:p>
          </table:table-cell>
          <table:table-cell table:formula="of:=[.D2453]-[.D245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table:formula="of:=[.B2452]+7" office:value-type="float" office:value="17164" calcext:value-type="float">
            <text:p>17164</text:p>
          </table:table-cell>
          <table:table-cell office:value-type="float" office:value="8640000" calcext:value-type="float">
            <text:p>8640000</text:p>
          </table:table-cell>
          <table:table-cell table:formula="of:=[.B2453]/[.C2453]" office:value-type="float" office:value="0.00198657407407407" calcext:value-type="float">
            <text:p>0,00198657407407407000</text:p>
          </table:table-cell>
          <table:table-cell table:formula="of:=[.D2454]-[.D245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[.B2453]+7" office:value-type="float" office:value="17171" calcext:value-type="float">
            <text:p>17171</text:p>
          </table:table-cell>
          <table:table-cell office:value-type="float" office:value="8640000" calcext:value-type="float">
            <text:p>8640000</text:p>
          </table:table-cell>
          <table:table-cell table:formula="of:=[.B2454]/[.C2454]" office:value-type="float" office:value="0.00198738425925926" calcext:value-type="float">
            <text:p>0,00198738425925926000</text:p>
          </table:table-cell>
          <table:table-cell table:formula="of:=[.D2455]-[.D245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table:formula="of:=[.B2454]+7" office:value-type="float" office:value="17178" calcext:value-type="float">
            <text:p>17178</text:p>
          </table:table-cell>
          <table:table-cell office:value-type="float" office:value="8640000" calcext:value-type="float">
            <text:p>8640000</text:p>
          </table:table-cell>
          <table:table-cell table:formula="of:=[.B2455]/[.C2455]" office:value-type="float" office:value="0.00198819444444444" calcext:value-type="float">
            <text:p>0,00198819444444444000</text:p>
          </table:table-cell>
          <table:table-cell table:formula="of:=[.D2456]-[.D245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table:formula="of:=[.B2455]+7" office:value-type="float" office:value="17185" calcext:value-type="float">
            <text:p>17185</text:p>
          </table:table-cell>
          <table:table-cell office:value-type="float" office:value="8640000" calcext:value-type="float">
            <text:p>8640000</text:p>
          </table:table-cell>
          <table:table-cell table:formula="of:=[.B2456]/[.C2456]" office:value-type="float" office:value="0.00198900462962963" calcext:value-type="float">
            <text:p>0,00198900462962963000</text:p>
          </table:table-cell>
          <table:table-cell table:formula="of:=[.D2457]-[.D245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[.B2456]+7" office:value-type="float" office:value="17192" calcext:value-type="float">
            <text:p>17192</text:p>
          </table:table-cell>
          <table:table-cell office:value-type="float" office:value="8640000" calcext:value-type="float">
            <text:p>8640000</text:p>
          </table:table-cell>
          <table:table-cell table:formula="of:=[.B2457]/[.C2457]" office:value-type="float" office:value="0.00198981481481482" calcext:value-type="float">
            <text:p>0,00198981481481482000</text:p>
          </table:table-cell>
          <table:table-cell table:formula="of:=[.D2458]-[.D245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[.B2457]+7" office:value-type="float" office:value="17199" calcext:value-type="float">
            <text:p>17199</text:p>
          </table:table-cell>
          <table:table-cell office:value-type="float" office:value="8640000" calcext:value-type="float">
            <text:p>8640000</text:p>
          </table:table-cell>
          <table:table-cell table:formula="of:=[.B2458]/[.C2458]" office:value-type="float" office:value="0.001990625" calcext:value-type="float">
            <text:p>0,00199062500000000000</text:p>
          </table:table-cell>
          <table:table-cell table:formula="of:=[.D2459]-[.D245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[.B2458]+7" office:value-type="float" office:value="17206" calcext:value-type="float">
            <text:p>17206</text:p>
          </table:table-cell>
          <table:table-cell office:value-type="float" office:value="8640000" calcext:value-type="float">
            <text:p>8640000</text:p>
          </table:table-cell>
          <table:table-cell table:formula="of:=[.B2459]/[.C2459]" office:value-type="float" office:value="0.00199143518518519" calcext:value-type="float">
            <text:p>0,00199143518518519000</text:p>
          </table:table-cell>
          <table:table-cell table:formula="of:=[.D2460]-[.D245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table:formula="of:=[.B2459]+7" office:value-type="float" office:value="17213" calcext:value-type="float">
            <text:p>17213</text:p>
          </table:table-cell>
          <table:table-cell office:value-type="float" office:value="8640000" calcext:value-type="float">
            <text:p>8640000</text:p>
          </table:table-cell>
          <table:table-cell table:formula="of:=[.B2460]/[.C2460]" office:value-type="float" office:value="0.00199224537037037" calcext:value-type="float">
            <text:p>0,00199224537037037000</text:p>
          </table:table-cell>
          <table:table-cell table:formula="of:=[.D2461]-[.D246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table:formula="of:=[.B2460]+7" office:value-type="float" office:value="17220" calcext:value-type="float">
            <text:p>17220</text:p>
          </table:table-cell>
          <table:table-cell office:value-type="float" office:value="8640000" calcext:value-type="float">
            <text:p>8640000</text:p>
          </table:table-cell>
          <table:table-cell table:formula="of:=[.B2461]/[.C2461]" office:value-type="float" office:value="0.00199305555555556" calcext:value-type="float">
            <text:p>0,00199305555555556000</text:p>
          </table:table-cell>
          <table:table-cell table:formula="of:=[.D2462]-[.D246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table:formula="of:=[.B2461]+7" office:value-type="float" office:value="17227" calcext:value-type="float">
            <text:p>17227</text:p>
          </table:table-cell>
          <table:table-cell office:value-type="float" office:value="8640000" calcext:value-type="float">
            <text:p>8640000</text:p>
          </table:table-cell>
          <table:table-cell table:formula="of:=[.B2462]/[.C2462]" office:value-type="float" office:value="0.00199386574074074" calcext:value-type="float">
            <text:p>0,00199386574074074000</text:p>
          </table:table-cell>
          <table:table-cell table:formula="of:=[.D2463]-[.D246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table:formula="of:=[.B2462]+7" office:value-type="float" office:value="17234" calcext:value-type="float">
            <text:p>17234</text:p>
          </table:table-cell>
          <table:table-cell office:value-type="float" office:value="8640000" calcext:value-type="float">
            <text:p>8640000</text:p>
          </table:table-cell>
          <table:table-cell table:formula="of:=[.B2463]/[.C2463]" office:value-type="float" office:value="0.00199467592592593" calcext:value-type="float">
            <text:p>0,00199467592592593000</text:p>
          </table:table-cell>
          <table:table-cell table:formula="of:=[.D2464]-[.D246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table:formula="of:=[.B2463]+7" office:value-type="float" office:value="17241" calcext:value-type="float">
            <text:p>17241</text:p>
          </table:table-cell>
          <table:table-cell office:value-type="float" office:value="8640000" calcext:value-type="float">
            <text:p>8640000</text:p>
          </table:table-cell>
          <table:table-cell table:formula="of:=[.B2464]/[.C2464]" office:value-type="float" office:value="0.00199548611111111" calcext:value-type="float">
            <text:p>0,00199548611111111000</text:p>
          </table:table-cell>
          <table:table-cell table:formula="of:=[.D2465]-[.D246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table:formula="of:=[.B2464]+7" office:value-type="float" office:value="17248" calcext:value-type="float">
            <text:p>17248</text:p>
          </table:table-cell>
          <table:table-cell office:value-type="float" office:value="8640000" calcext:value-type="float">
            <text:p>8640000</text:p>
          </table:table-cell>
          <table:table-cell table:formula="of:=[.B2465]/[.C2465]" office:value-type="float" office:value="0.0019962962962963" calcext:value-type="float">
            <text:p>0,00199629629629630000</text:p>
          </table:table-cell>
          <table:table-cell table:formula="of:=[.D2466]-[.D246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table:formula="of:=[.B2465]+7" office:value-type="float" office:value="17255" calcext:value-type="float">
            <text:p>17255</text:p>
          </table:table-cell>
          <table:table-cell office:value-type="float" office:value="8640000" calcext:value-type="float">
            <text:p>8640000</text:p>
          </table:table-cell>
          <table:table-cell table:formula="of:=[.B2466]/[.C2466]" office:value-type="float" office:value="0.00199710648148148" calcext:value-type="float">
            <text:p>0,00199710648148148000</text:p>
          </table:table-cell>
          <table:table-cell table:formula="of:=[.D2467]-[.D246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[.B2466]+7" office:value-type="float" office:value="17262" calcext:value-type="float">
            <text:p>17262</text:p>
          </table:table-cell>
          <table:table-cell office:value-type="float" office:value="8640000" calcext:value-type="float">
            <text:p>8640000</text:p>
          </table:table-cell>
          <table:table-cell table:formula="of:=[.B2467]/[.C2467]" office:value-type="float" office:value="0.00199791666666667" calcext:value-type="float">
            <text:p>0,00199791666666667000</text:p>
          </table:table-cell>
          <table:table-cell table:formula="of:=[.D2468]-[.D246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table:formula="of:=[.B2467]+7" office:value-type="float" office:value="17269" calcext:value-type="float">
            <text:p>17269</text:p>
          </table:table-cell>
          <table:table-cell office:value-type="float" office:value="8640000" calcext:value-type="float">
            <text:p>8640000</text:p>
          </table:table-cell>
          <table:table-cell table:formula="of:=[.B2468]/[.C2468]" office:value-type="float" office:value="0.00199872685185185" calcext:value-type="float">
            <text:p>0,00199872685185185000</text:p>
          </table:table-cell>
          <table:table-cell table:formula="of:=[.D2469]-[.D246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table:formula="of:=[.B2468]+7" office:value-type="float" office:value="17276" calcext:value-type="float">
            <text:p>17276</text:p>
          </table:table-cell>
          <table:table-cell office:value-type="float" office:value="8640000" calcext:value-type="float">
            <text:p>8640000</text:p>
          </table:table-cell>
          <table:table-cell table:formula="of:=[.B2469]/[.C2469]" office:value-type="float" office:value="0.00199953703703704" calcext:value-type="float">
            <text:p>0,00199953703703704000</text:p>
          </table:table-cell>
          <table:table-cell table:formula="of:=[.D2470]-[.D246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[.B2469]+7" office:value-type="float" office:value="17283" calcext:value-type="float">
            <text:p>17283</text:p>
          </table:table-cell>
          <table:table-cell office:value-type="float" office:value="8640000" calcext:value-type="float">
            <text:p>8640000</text:p>
          </table:table-cell>
          <table:table-cell table:formula="of:=[.B2470]/[.C2470]" office:value-type="float" office:value="0.00200034722222222" calcext:value-type="float">
            <text:p>0,00200034722222222000</text:p>
          </table:table-cell>
          <table:table-cell table:formula="of:=[.D2471]-[.D247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[.B2470]+7" office:value-type="float" office:value="17290" calcext:value-type="float">
            <text:p>17290</text:p>
          </table:table-cell>
          <table:table-cell office:value-type="float" office:value="8640000" calcext:value-type="float">
            <text:p>8640000</text:p>
          </table:table-cell>
          <table:table-cell table:formula="of:=[.B2471]/[.C2471]" office:value-type="float" office:value="0.00200115740740741" calcext:value-type="float">
            <text:p>0,00200115740740741000</text:p>
          </table:table-cell>
          <table:table-cell table:formula="of:=[.D2472]-[.D247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[.B2471]+7" office:value-type="float" office:value="17297" calcext:value-type="float">
            <text:p>17297</text:p>
          </table:table-cell>
          <table:table-cell office:value-type="float" office:value="8640000" calcext:value-type="float">
            <text:p>8640000</text:p>
          </table:table-cell>
          <table:table-cell table:formula="of:=[.B2472]/[.C2472]" office:value-type="float" office:value="0.00200196759259259" calcext:value-type="float">
            <text:p>0,00200196759259259000</text:p>
          </table:table-cell>
          <table:table-cell table:formula="of:=[.D2473]-[.D247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[.B2472]+7" office:value-type="float" office:value="17304" calcext:value-type="float">
            <text:p>17304</text:p>
          </table:table-cell>
          <table:table-cell office:value-type="float" office:value="8640000" calcext:value-type="float">
            <text:p>8640000</text:p>
          </table:table-cell>
          <table:table-cell table:formula="of:=[.B2473]/[.C2473]" office:value-type="float" office:value="0.00200277777777778" calcext:value-type="float">
            <text:p>0,00200277777777778000</text:p>
          </table:table-cell>
          <table:table-cell table:formula="of:=[.D2474]-[.D247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table:formula="of:=[.B2473]+7" office:value-type="float" office:value="17311" calcext:value-type="float">
            <text:p>17311</text:p>
          </table:table-cell>
          <table:table-cell office:value-type="float" office:value="8640000" calcext:value-type="float">
            <text:p>8640000</text:p>
          </table:table-cell>
          <table:table-cell table:formula="of:=[.B2474]/[.C2474]" office:value-type="float" office:value="0.00200358796296296" calcext:value-type="float">
            <text:p>0,00200358796296296000</text:p>
          </table:table-cell>
          <table:table-cell table:formula="of:=[.D2475]-[.D247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table:formula="of:=[.B2474]+7" office:value-type="float" office:value="17318" calcext:value-type="float">
            <text:p>17318</text:p>
          </table:table-cell>
          <table:table-cell office:value-type="float" office:value="8640000" calcext:value-type="float">
            <text:p>8640000</text:p>
          </table:table-cell>
          <table:table-cell table:formula="of:=[.B2475]/[.C2475]" office:value-type="float" office:value="0.00200439814814815" calcext:value-type="float">
            <text:p>0,00200439814814815000</text:p>
          </table:table-cell>
          <table:table-cell table:formula="of:=[.D2476]-[.D247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table:formula="of:=[.B2475]+7" office:value-type="float" office:value="17325" calcext:value-type="float">
            <text:p>17325</text:p>
          </table:table-cell>
          <table:table-cell office:value-type="float" office:value="8640000" calcext:value-type="float">
            <text:p>8640000</text:p>
          </table:table-cell>
          <table:table-cell table:formula="of:=[.B2476]/[.C2476]" office:value-type="float" office:value="0.00200520833333333" calcext:value-type="float">
            <text:p>0,00200520833333333000</text:p>
          </table:table-cell>
          <table:table-cell table:formula="of:=[.D2477]-[.D247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table:formula="of:=[.B2476]+7" office:value-type="float" office:value="17332" calcext:value-type="float">
            <text:p>17332</text:p>
          </table:table-cell>
          <table:table-cell office:value-type="float" office:value="8640000" calcext:value-type="float">
            <text:p>8640000</text:p>
          </table:table-cell>
          <table:table-cell table:formula="of:=[.B2477]/[.C2477]" office:value-type="float" office:value="0.00200601851851852" calcext:value-type="float">
            <text:p>0,00200601851851852000</text:p>
          </table:table-cell>
          <table:table-cell table:formula="of:=[.D2478]-[.D247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[.B2477]+7" office:value-type="float" office:value="17339" calcext:value-type="float">
            <text:p>17339</text:p>
          </table:table-cell>
          <table:table-cell office:value-type="float" office:value="8640000" calcext:value-type="float">
            <text:p>8640000</text:p>
          </table:table-cell>
          <table:table-cell table:formula="of:=[.B2478]/[.C2478]" office:value-type="float" office:value="0.0020068287037037" calcext:value-type="float">
            <text:p>0,00200682870370370000</text:p>
          </table:table-cell>
          <table:table-cell table:formula="of:=[.D2479]-[.D247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[.B2478]+7" office:value-type="float" office:value="17346" calcext:value-type="float">
            <text:p>17346</text:p>
          </table:table-cell>
          <table:table-cell office:value-type="float" office:value="8640000" calcext:value-type="float">
            <text:p>8640000</text:p>
          </table:table-cell>
          <table:table-cell table:formula="of:=[.B2479]/[.C2479]" office:value-type="float" office:value="0.00200763888888889" calcext:value-type="float">
            <text:p>0,00200763888888889000</text:p>
          </table:table-cell>
          <table:table-cell table:formula="of:=[.D2480]-[.D247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[.B2479]+7" office:value-type="float" office:value="17353" calcext:value-type="float">
            <text:p>17353</text:p>
          </table:table-cell>
          <table:table-cell office:value-type="float" office:value="8640000" calcext:value-type="float">
            <text:p>8640000</text:p>
          </table:table-cell>
          <table:table-cell table:formula="of:=[.B2480]/[.C2480]" office:value-type="float" office:value="0.00200844907407407" calcext:value-type="float">
            <text:p>0,00200844907407407000</text:p>
          </table:table-cell>
          <table:table-cell table:formula="of:=[.D2481]-[.D248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[.B2480]+7" office:value-type="float" office:value="17360" calcext:value-type="float">
            <text:p>17360</text:p>
          </table:table-cell>
          <table:table-cell office:value-type="float" office:value="8640000" calcext:value-type="float">
            <text:p>8640000</text:p>
          </table:table-cell>
          <table:table-cell table:formula="of:=[.B2481]/[.C2481]" office:value-type="float" office:value="0.00200925925925926" calcext:value-type="float">
            <text:p>0,00200925925925926000</text:p>
          </table:table-cell>
          <table:table-cell table:formula="of:=[.D2482]-[.D248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table:formula="of:=[.B2481]+7" office:value-type="float" office:value="17367" calcext:value-type="float">
            <text:p>17367</text:p>
          </table:table-cell>
          <table:table-cell office:value-type="float" office:value="8640000" calcext:value-type="float">
            <text:p>8640000</text:p>
          </table:table-cell>
          <table:table-cell table:formula="of:=[.B2482]/[.C2482]" office:value-type="float" office:value="0.00201006944444444" calcext:value-type="float">
            <text:p>0,00201006944444444000</text:p>
          </table:table-cell>
          <table:table-cell table:formula="of:=[.D2483]-[.D248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[.B2482]+7" office:value-type="float" office:value="17374" calcext:value-type="float">
            <text:p>17374</text:p>
          </table:table-cell>
          <table:table-cell office:value-type="float" office:value="8640000" calcext:value-type="float">
            <text:p>8640000</text:p>
          </table:table-cell>
          <table:table-cell table:formula="of:=[.B2483]/[.C2483]" office:value-type="float" office:value="0.00201087962962963" calcext:value-type="float">
            <text:p>0,00201087962962963000</text:p>
          </table:table-cell>
          <table:table-cell table:formula="of:=[.D2484]-[.D248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[.B2483]+7" office:value-type="float" office:value="17381" calcext:value-type="float">
            <text:p>17381</text:p>
          </table:table-cell>
          <table:table-cell office:value-type="float" office:value="8640000" calcext:value-type="float">
            <text:p>8640000</text:p>
          </table:table-cell>
          <table:table-cell table:formula="of:=[.B2484]/[.C2484]" office:value-type="float" office:value="0.00201168981481481" calcext:value-type="float">
            <text:p>0,00201168981481481000</text:p>
          </table:table-cell>
          <table:table-cell table:formula="of:=[.D2485]-[.D248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table:formula="of:=[.B2484]+7" office:value-type="float" office:value="17388" calcext:value-type="float">
            <text:p>17388</text:p>
          </table:table-cell>
          <table:table-cell office:value-type="float" office:value="8640000" calcext:value-type="float">
            <text:p>8640000</text:p>
          </table:table-cell>
          <table:table-cell table:formula="of:=[.B2485]/[.C2485]" office:value-type="float" office:value="0.0020125" calcext:value-type="float">
            <text:p>0,00201250000000000000</text:p>
          </table:table-cell>
          <table:table-cell table:formula="of:=[.D2486]-[.D248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table:formula="of:=[.B2485]+7" office:value-type="float" office:value="17395" calcext:value-type="float">
            <text:p>17395</text:p>
          </table:table-cell>
          <table:table-cell office:value-type="float" office:value="8640000" calcext:value-type="float">
            <text:p>8640000</text:p>
          </table:table-cell>
          <table:table-cell table:formula="of:=[.B2486]/[.C2486]" office:value-type="float" office:value="0.00201331018518519" calcext:value-type="float">
            <text:p>0,00201331018518519000</text:p>
          </table:table-cell>
          <table:table-cell table:formula="of:=[.D2487]-[.D248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[.B2486]+7" office:value-type="float" office:value="17402" calcext:value-type="float">
            <text:p>17402</text:p>
          </table:table-cell>
          <table:table-cell office:value-type="float" office:value="8640000" calcext:value-type="float">
            <text:p>8640000</text:p>
          </table:table-cell>
          <table:table-cell table:formula="of:=[.B2487]/[.C2487]" office:value-type="float" office:value="0.00201412037037037" calcext:value-type="float">
            <text:p>0,00201412037037037000</text:p>
          </table:table-cell>
          <table:table-cell table:formula="of:=[.D2488]-[.D248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table:formula="of:=[.B2487]+7" office:value-type="float" office:value="17409" calcext:value-type="float">
            <text:p>17409</text:p>
          </table:table-cell>
          <table:table-cell office:value-type="float" office:value="8640000" calcext:value-type="float">
            <text:p>8640000</text:p>
          </table:table-cell>
          <table:table-cell table:formula="of:=[.B2488]/[.C2488]" office:value-type="float" office:value="0.00201493055555556" calcext:value-type="float">
            <text:p>0,00201493055555556000</text:p>
          </table:table-cell>
          <table:table-cell table:formula="of:=[.D2489]-[.D248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[.B2488]+7" office:value-type="float" office:value="17416" calcext:value-type="float">
            <text:p>17416</text:p>
          </table:table-cell>
          <table:table-cell office:value-type="float" office:value="8640000" calcext:value-type="float">
            <text:p>8640000</text:p>
          </table:table-cell>
          <table:table-cell table:formula="of:=[.B2489]/[.C2489]" office:value-type="float" office:value="0.00201574074074074" calcext:value-type="float">
            <text:p>0,00201574074074074000</text:p>
          </table:table-cell>
          <table:table-cell table:formula="of:=[.D2490]-[.D248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table:formula="of:=[.B2489]+7" office:value-type="float" office:value="17423" calcext:value-type="float">
            <text:p>17423</text:p>
          </table:table-cell>
          <table:table-cell office:value-type="float" office:value="8640000" calcext:value-type="float">
            <text:p>8640000</text:p>
          </table:table-cell>
          <table:table-cell table:formula="of:=[.B2490]/[.C2490]" office:value-type="float" office:value="0.00201655092592593" calcext:value-type="float">
            <text:p>0,00201655092592593000</text:p>
          </table:table-cell>
          <table:table-cell table:formula="of:=[.D2491]-[.D249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[.B2490]+7" office:value-type="float" office:value="17430" calcext:value-type="float">
            <text:p>17430</text:p>
          </table:table-cell>
          <table:table-cell office:value-type="float" office:value="8640000" calcext:value-type="float">
            <text:p>8640000</text:p>
          </table:table-cell>
          <table:table-cell table:formula="of:=[.B2491]/[.C2491]" office:value-type="float" office:value="0.00201736111111111" calcext:value-type="float">
            <text:p>0,00201736111111111000</text:p>
          </table:table-cell>
          <table:table-cell table:formula="of:=[.D2492]-[.D249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table:formula="of:=[.B2491]+7" office:value-type="float" office:value="17437" calcext:value-type="float">
            <text:p>17437</text:p>
          </table:table-cell>
          <table:table-cell office:value-type="float" office:value="8640000" calcext:value-type="float">
            <text:p>8640000</text:p>
          </table:table-cell>
          <table:table-cell table:formula="of:=[.B2492]/[.C2492]" office:value-type="float" office:value="0.0020181712962963" calcext:value-type="float">
            <text:p>0,00201817129629630000</text:p>
          </table:table-cell>
          <table:table-cell table:formula="of:=[.D2493]-[.D249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[.B2492]+7" office:value-type="float" office:value="17444" calcext:value-type="float">
            <text:p>17444</text:p>
          </table:table-cell>
          <table:table-cell office:value-type="float" office:value="8640000" calcext:value-type="float">
            <text:p>8640000</text:p>
          </table:table-cell>
          <table:table-cell table:formula="of:=[.B2493]/[.C2493]" office:value-type="float" office:value="0.00201898148148148" calcext:value-type="float">
            <text:p>0,00201898148148148000</text:p>
          </table:table-cell>
          <table:table-cell table:formula="of:=[.D2494]-[.D249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table:formula="of:=[.B2493]+7" office:value-type="float" office:value="17451" calcext:value-type="float">
            <text:p>17451</text:p>
          </table:table-cell>
          <table:table-cell office:value-type="float" office:value="8640000" calcext:value-type="float">
            <text:p>8640000</text:p>
          </table:table-cell>
          <table:table-cell table:formula="of:=[.B2494]/[.C2494]" office:value-type="float" office:value="0.00201979166666667" calcext:value-type="float">
            <text:p>0,00201979166666667000</text:p>
          </table:table-cell>
          <table:table-cell table:formula="of:=[.D2495]-[.D249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[.B2494]+7" office:value-type="float" office:value="17458" calcext:value-type="float">
            <text:p>17458</text:p>
          </table:table-cell>
          <table:table-cell office:value-type="float" office:value="8640000" calcext:value-type="float">
            <text:p>8640000</text:p>
          </table:table-cell>
          <table:table-cell table:formula="of:=[.B2495]/[.C2495]" office:value-type="float" office:value="0.00202060185185185" calcext:value-type="float">
            <text:p>0,00202060185185185000</text:p>
          </table:table-cell>
          <table:table-cell table:formula="of:=[.D2496]-[.D249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[.B2495]+7" office:value-type="float" office:value="17465" calcext:value-type="float">
            <text:p>17465</text:p>
          </table:table-cell>
          <table:table-cell office:value-type="float" office:value="8640000" calcext:value-type="float">
            <text:p>8640000</text:p>
          </table:table-cell>
          <table:table-cell table:formula="of:=[.B2496]/[.C2496]" office:value-type="float" office:value="0.00202141203703704" calcext:value-type="float">
            <text:p>0,00202141203703704000</text:p>
          </table:table-cell>
          <table:table-cell table:formula="of:=[.D2497]-[.D249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table:formula="of:=[.B2496]+7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2497]/[.C2497]" office:value-type="float" office:value="0.00202222222222222" calcext:value-type="float">
            <text:p>0,00202222222222222000</text:p>
          </table:table-cell>
          <table:table-cell table:formula="of:=[.D2498]-[.D249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table:formula="of:=[.B2497]+7" office:value-type="float" office:value="17479" calcext:value-type="float">
            <text:p>17479</text:p>
          </table:table-cell>
          <table:table-cell office:value-type="float" office:value="8640000" calcext:value-type="float">
            <text:p>8640000</text:p>
          </table:table-cell>
          <table:table-cell table:formula="of:=[.B2498]/[.C2498]" office:value-type="float" office:value="0.00202303240740741" calcext:value-type="float">
            <text:p>0,00202303240740741000</text:p>
          </table:table-cell>
          <table:table-cell table:formula="of:=[.D2499]-[.D249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table:formula="of:=[.B2498]+7" office:value-type="float" office:value="17486" calcext:value-type="float">
            <text:p>17486</text:p>
          </table:table-cell>
          <table:table-cell office:value-type="float" office:value="8640000" calcext:value-type="float">
            <text:p>8640000</text:p>
          </table:table-cell>
          <table:table-cell table:formula="of:=[.B2499]/[.C2499]" office:value-type="float" office:value="0.00202384259259259" calcext:value-type="float">
            <text:p>0,00202384259259259000</text:p>
          </table:table-cell>
          <table:table-cell table:formula="of:=[.D2500]-[.D249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table:formula="of:=[.B2499]+7" office:value-type="float" office:value="17493" calcext:value-type="float">
            <text:p>17493</text:p>
          </table:table-cell>
          <table:table-cell office:value-type="float" office:value="8640000" calcext:value-type="float">
            <text:p>8640000</text:p>
          </table:table-cell>
          <table:table-cell table:formula="of:=[.B2500]/[.C2500]" office:value-type="float" office:value="0.00202465277777778" calcext:value-type="float">
            <text:p>0,00202465277777778000</text:p>
          </table:table-cell>
          <table:table-cell table:formula="of:=[.D2501]-[.D250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B2500]+7" office:value-type="float" office:value="17500" calcext:value-type="float">
            <text:p>17500</text:p>
          </table:table-cell>
          <table:table-cell office:value-type="float" office:value="8640000" calcext:value-type="float">
            <text:p>8640000</text:p>
          </table:table-cell>
          <table:table-cell table:formula="of:=[.B2501]/[.C2501]" office:value-type="float" office:value="0.00202546296296296" calcext:value-type="float">
            <text:p>0,00202546296296296000</text:p>
          </table:table-cell>
          <table:table-cell table:formula="of:=[.D2502]-[.D250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table:formula="of:=[.B2501]+7" office:value-type="float" office:value="17507" calcext:value-type="float">
            <text:p>17507</text:p>
          </table:table-cell>
          <table:table-cell office:value-type="float" office:value="8640000" calcext:value-type="float">
            <text:p>8640000</text:p>
          </table:table-cell>
          <table:table-cell table:formula="of:=[.B2502]/[.C2502]" office:value-type="float" office:value="0.00202627314814815" calcext:value-type="float">
            <text:p>0,00202627314814815000</text:p>
          </table:table-cell>
          <table:table-cell table:formula="of:=[.D2503]-[.D250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table:formula="of:=[.B2502]+7" office:value-type="float" office:value="17514" calcext:value-type="float">
            <text:p>17514</text:p>
          </table:table-cell>
          <table:table-cell office:value-type="float" office:value="8640000" calcext:value-type="float">
            <text:p>8640000</text:p>
          </table:table-cell>
          <table:table-cell table:formula="of:=[.B2503]/[.C2503]" office:value-type="float" office:value="0.00202708333333333" calcext:value-type="float">
            <text:p>0,00202708333333333000</text:p>
          </table:table-cell>
          <table:table-cell table:formula="of:=[.D2504]-[.D250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table:formula="of:=[.B2503]+7" office:value-type="float" office:value="17521" calcext:value-type="float">
            <text:p>17521</text:p>
          </table:table-cell>
          <table:table-cell office:value-type="float" office:value="8640000" calcext:value-type="float">
            <text:p>8640000</text:p>
          </table:table-cell>
          <table:table-cell table:formula="of:=[.B2504]/[.C2504]" office:value-type="float" office:value="0.00202789351851852" calcext:value-type="float">
            <text:p>0,00202789351851852000</text:p>
          </table:table-cell>
          <table:table-cell table:formula="of:=[.D2505]-[.D250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table:formula="of:=[.B2504]+7" office:value-type="float" office:value="17528" calcext:value-type="float">
            <text:p>17528</text:p>
          </table:table-cell>
          <table:table-cell office:value-type="float" office:value="8640000" calcext:value-type="float">
            <text:p>8640000</text:p>
          </table:table-cell>
          <table:table-cell table:formula="of:=[.B2505]/[.C2505]" office:value-type="float" office:value="0.0020287037037037" calcext:value-type="float">
            <text:p>0,00202870370370370000</text:p>
          </table:table-cell>
          <table:table-cell table:formula="of:=[.D2506]-[.D250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table:formula="of:=[.B2505]+7" office:value-type="float" office:value="17535" calcext:value-type="float">
            <text:p>17535</text:p>
          </table:table-cell>
          <table:table-cell office:value-type="float" office:value="8640000" calcext:value-type="float">
            <text:p>8640000</text:p>
          </table:table-cell>
          <table:table-cell table:formula="of:=[.B2506]/[.C2506]" office:value-type="float" office:value="0.00202951388888889" calcext:value-type="float">
            <text:p>0,00202951388888889000</text:p>
          </table:table-cell>
          <table:table-cell table:formula="of:=[.D2507]-[.D250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table:formula="of:=[.B2506]+7" office:value-type="float" office:value="17542" calcext:value-type="float">
            <text:p>17542</text:p>
          </table:table-cell>
          <table:table-cell office:value-type="float" office:value="8640000" calcext:value-type="float">
            <text:p>8640000</text:p>
          </table:table-cell>
          <table:table-cell table:formula="of:=[.B2507]/[.C2507]" office:value-type="float" office:value="0.00203032407407407" calcext:value-type="float">
            <text:p>0,00203032407407407000</text:p>
          </table:table-cell>
          <table:table-cell table:formula="of:=[.D2508]-[.D250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table:formula="of:=[.B2507]+7" office:value-type="float" office:value="17549" calcext:value-type="float">
            <text:p>17549</text:p>
          </table:table-cell>
          <table:table-cell office:value-type="float" office:value="8640000" calcext:value-type="float">
            <text:p>8640000</text:p>
          </table:table-cell>
          <table:table-cell table:formula="of:=[.B2508]/[.C2508]" office:value-type="float" office:value="0.00203113425925926" calcext:value-type="float">
            <text:p>0,00203113425925926000</text:p>
          </table:table-cell>
          <table:table-cell table:formula="of:=[.D2509]-[.D250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table:formula="of:=[.B2508]+7" office:value-type="float" office:value="17556" calcext:value-type="float">
            <text:p>17556</text:p>
          </table:table-cell>
          <table:table-cell office:value-type="float" office:value="8640000" calcext:value-type="float">
            <text:p>8640000</text:p>
          </table:table-cell>
          <table:table-cell table:formula="of:=[.B2509]/[.C2509]" office:value-type="float" office:value="0.00203194444444444" calcext:value-type="float">
            <text:p>0,00203194444444444000</text:p>
          </table:table-cell>
          <table:table-cell table:formula="of:=[.D2510]-[.D250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table:formula="of:=[.B2509]+7" office:value-type="float" office:value="17563" calcext:value-type="float">
            <text:p>17563</text:p>
          </table:table-cell>
          <table:table-cell office:value-type="float" office:value="8640000" calcext:value-type="float">
            <text:p>8640000</text:p>
          </table:table-cell>
          <table:table-cell table:formula="of:=[.B2510]/[.C2510]" office:value-type="float" office:value="0.00203275462962963" calcext:value-type="float">
            <text:p>0,00203275462962963000</text:p>
          </table:table-cell>
          <table:table-cell table:formula="of:=[.D2511]-[.D251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table:formula="of:=[.B2510]+7" office:value-type="float" office:value="17570" calcext:value-type="float">
            <text:p>17570</text:p>
          </table:table-cell>
          <table:table-cell office:value-type="float" office:value="8640000" calcext:value-type="float">
            <text:p>8640000</text:p>
          </table:table-cell>
          <table:table-cell table:formula="of:=[.B2511]/[.C2511]" office:value-type="float" office:value="0.00203356481481482" calcext:value-type="float">
            <text:p>0,00203356481481482000</text:p>
          </table:table-cell>
          <table:table-cell table:formula="of:=[.D2512]-[.D251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table:formula="of:=[.B2511]+7" office:value-type="float" office:value="17577" calcext:value-type="float">
            <text:p>17577</text:p>
          </table:table-cell>
          <table:table-cell office:value-type="float" office:value="8640000" calcext:value-type="float">
            <text:p>8640000</text:p>
          </table:table-cell>
          <table:table-cell table:formula="of:=[.B2512]/[.C2512]" office:value-type="float" office:value="0.002034375" calcext:value-type="float">
            <text:p>0,00203437500000000000</text:p>
          </table:table-cell>
          <table:table-cell table:formula="of:=[.D2513]-[.D251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table:formula="of:=[.B2512]+7" office:value-type="float" office:value="17584" calcext:value-type="float">
            <text:p>17584</text:p>
          </table:table-cell>
          <table:table-cell office:value-type="float" office:value="8640000" calcext:value-type="float">
            <text:p>8640000</text:p>
          </table:table-cell>
          <table:table-cell table:formula="of:=[.B2513]/[.C2513]" office:value-type="float" office:value="0.00203518518518519" calcext:value-type="float">
            <text:p>0,00203518518518519000</text:p>
          </table:table-cell>
          <table:table-cell table:formula="of:=[.D2514]-[.D251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table:formula="of:=[.B2513]+7" office:value-type="float" office:value="17591" calcext:value-type="float">
            <text:p>17591</text:p>
          </table:table-cell>
          <table:table-cell office:value-type="float" office:value="8640000" calcext:value-type="float">
            <text:p>8640000</text:p>
          </table:table-cell>
          <table:table-cell table:formula="of:=[.B2514]/[.C2514]" office:value-type="float" office:value="0.00203599537037037" calcext:value-type="float">
            <text:p>0,00203599537037037000</text:p>
          </table:table-cell>
          <table:table-cell table:formula="of:=[.D2515]-[.D251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[.B2514]+7" office:value-type="float" office:value="17598" calcext:value-type="float">
            <text:p>17598</text:p>
          </table:table-cell>
          <table:table-cell office:value-type="float" office:value="8640000" calcext:value-type="float">
            <text:p>8640000</text:p>
          </table:table-cell>
          <table:table-cell table:formula="of:=[.B2515]/[.C2515]" office:value-type="float" office:value="0.00203680555555556" calcext:value-type="float">
            <text:p>0,00203680555555556000</text:p>
          </table:table-cell>
          <table:table-cell table:formula="of:=[.D2516]-[.D251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table:formula="of:=[.B2515]+7" office:value-type="float" office:value="17605" calcext:value-type="float">
            <text:p>17605</text:p>
          </table:table-cell>
          <table:table-cell office:value-type="float" office:value="8640000" calcext:value-type="float">
            <text:p>8640000</text:p>
          </table:table-cell>
          <table:table-cell table:formula="of:=[.B2516]/[.C2516]" office:value-type="float" office:value="0.00203761574074074" calcext:value-type="float">
            <text:p>0,00203761574074074000</text:p>
          </table:table-cell>
          <table:table-cell table:formula="of:=[.D2517]-[.D251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table:formula="of:=[.B2516]+7" office:value-type="float" office:value="17612" calcext:value-type="float">
            <text:p>17612</text:p>
          </table:table-cell>
          <table:table-cell office:value-type="float" office:value="8640000" calcext:value-type="float">
            <text:p>8640000</text:p>
          </table:table-cell>
          <table:table-cell table:formula="of:=[.B2517]/[.C2517]" office:value-type="float" office:value="0.00203842592592593" calcext:value-type="float">
            <text:p>0,00203842592592593000</text:p>
          </table:table-cell>
          <table:table-cell table:formula="of:=[.D2518]-[.D251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table:formula="of:=[.B2517]+7" office:value-type="float" office:value="17619" calcext:value-type="float">
            <text:p>17619</text:p>
          </table:table-cell>
          <table:table-cell office:value-type="float" office:value="8640000" calcext:value-type="float">
            <text:p>8640000</text:p>
          </table:table-cell>
          <table:table-cell table:formula="of:=[.B2518]/[.C2518]" office:value-type="float" office:value="0.00203923611111111" calcext:value-type="float">
            <text:p>0,00203923611111111000</text:p>
          </table:table-cell>
          <table:table-cell table:formula="of:=[.D2519]-[.D251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table:formula="of:=[.B2518]+7" office:value-type="float" office:value="17626" calcext:value-type="float">
            <text:p>17626</text:p>
          </table:table-cell>
          <table:table-cell office:value-type="float" office:value="8640000" calcext:value-type="float">
            <text:p>8640000</text:p>
          </table:table-cell>
          <table:table-cell table:formula="of:=[.B2519]/[.C2519]" office:value-type="float" office:value="0.0020400462962963" calcext:value-type="float">
            <text:p>0,00204004629629630000</text:p>
          </table:table-cell>
          <table:table-cell table:formula="of:=[.D2520]-[.D251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table:formula="of:=[.B2519]+7" office:value-type="float" office:value="17633" calcext:value-type="float">
            <text:p>17633</text:p>
          </table:table-cell>
          <table:table-cell office:value-type="float" office:value="8640000" calcext:value-type="float">
            <text:p>8640000</text:p>
          </table:table-cell>
          <table:table-cell table:formula="of:=[.B2520]/[.C2520]" office:value-type="float" office:value="0.00204085648148148" calcext:value-type="float">
            <text:p>0,00204085648148148000</text:p>
          </table:table-cell>
          <table:table-cell table:formula="of:=[.D2521]-[.D252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table:formula="of:=[.B2520]+7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2521]/[.C2521]" office:value-type="float" office:value="0.00204166666666667" calcext:value-type="float">
            <text:p>0,00204166666666667000</text:p>
          </table:table-cell>
          <table:table-cell table:formula="of:=[.D2522]-[.D252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table:formula="of:=[.B2521]+7" office:value-type="float" office:value="17647" calcext:value-type="float">
            <text:p>17647</text:p>
          </table:table-cell>
          <table:table-cell office:value-type="float" office:value="8640000" calcext:value-type="float">
            <text:p>8640000</text:p>
          </table:table-cell>
          <table:table-cell table:formula="of:=[.B2522]/[.C2522]" office:value-type="float" office:value="0.00204247685185185" calcext:value-type="float">
            <text:p>0,00204247685185185000</text:p>
          </table:table-cell>
          <table:table-cell table:formula="of:=[.D2523]-[.D252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[.B2522]+7" office:value-type="float" office:value="17654" calcext:value-type="float">
            <text:p>17654</text:p>
          </table:table-cell>
          <table:table-cell office:value-type="float" office:value="8640000" calcext:value-type="float">
            <text:p>8640000</text:p>
          </table:table-cell>
          <table:table-cell table:formula="of:=[.B2523]/[.C2523]" office:value-type="float" office:value="0.00204328703703704" calcext:value-type="float">
            <text:p>0,00204328703703704000</text:p>
          </table:table-cell>
          <table:table-cell table:formula="of:=[.D2524]-[.D252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table:formula="of:=[.B2523]+7" office:value-type="float" office:value="17661" calcext:value-type="float">
            <text:p>17661</text:p>
          </table:table-cell>
          <table:table-cell office:value-type="float" office:value="8640000" calcext:value-type="float">
            <text:p>8640000</text:p>
          </table:table-cell>
          <table:table-cell table:formula="of:=[.B2524]/[.C2524]" office:value-type="float" office:value="0.00204409722222222" calcext:value-type="float">
            <text:p>0,00204409722222222000</text:p>
          </table:table-cell>
          <table:table-cell table:formula="of:=[.D2525]-[.D252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table:formula="of:=[.B2524]+7" office:value-type="float" office:value="17668" calcext:value-type="float">
            <text:p>17668</text:p>
          </table:table-cell>
          <table:table-cell office:value-type="float" office:value="8640000" calcext:value-type="float">
            <text:p>8640000</text:p>
          </table:table-cell>
          <table:table-cell table:formula="of:=[.B2525]/[.C2525]" office:value-type="float" office:value="0.00204490740740741" calcext:value-type="float">
            <text:p>0,00204490740740741000</text:p>
          </table:table-cell>
          <table:table-cell table:formula="of:=[.D2526]-[.D252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table:formula="of:=[.B2525]+7" office:value-type="float" office:value="17675" calcext:value-type="float">
            <text:p>17675</text:p>
          </table:table-cell>
          <table:table-cell office:value-type="float" office:value="8640000" calcext:value-type="float">
            <text:p>8640000</text:p>
          </table:table-cell>
          <table:table-cell table:formula="of:=[.B2526]/[.C2526]" office:value-type="float" office:value="0.00204571759259259" calcext:value-type="float">
            <text:p>0,00204571759259259000</text:p>
          </table:table-cell>
          <table:table-cell table:formula="of:=[.D2527]-[.D252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[.B2526]+7" office:value-type="float" office:value="17682" calcext:value-type="float">
            <text:p>17682</text:p>
          </table:table-cell>
          <table:table-cell office:value-type="float" office:value="8640000" calcext:value-type="float">
            <text:p>8640000</text:p>
          </table:table-cell>
          <table:table-cell table:formula="of:=[.B2527]/[.C2527]" office:value-type="float" office:value="0.00204652777777778" calcext:value-type="float">
            <text:p>0,00204652777777778000</text:p>
          </table:table-cell>
          <table:table-cell table:formula="of:=[.D2528]-[.D252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table:formula="of:=[.B2527]+7" office:value-type="float" office:value="17689" calcext:value-type="float">
            <text:p>17689</text:p>
          </table:table-cell>
          <table:table-cell office:value-type="float" office:value="8640000" calcext:value-type="float">
            <text:p>8640000</text:p>
          </table:table-cell>
          <table:table-cell table:formula="of:=[.B2528]/[.C2528]" office:value-type="float" office:value="0.00204733796296296" calcext:value-type="float">
            <text:p>0,00204733796296296000</text:p>
          </table:table-cell>
          <table:table-cell table:formula="of:=[.D2529]-[.D252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[.B2528]+7" office:value-type="float" office:value="17696" calcext:value-type="float">
            <text:p>17696</text:p>
          </table:table-cell>
          <table:table-cell office:value-type="float" office:value="8640000" calcext:value-type="float">
            <text:p>8640000</text:p>
          </table:table-cell>
          <table:table-cell table:formula="of:=[.B2529]/[.C2529]" office:value-type="float" office:value="0.00204814814814815" calcext:value-type="float">
            <text:p>0,00204814814814815000</text:p>
          </table:table-cell>
          <table:table-cell table:formula="of:=[.D2530]-[.D252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table:formula="of:=[.B2529]+7" office:value-type="float" office:value="17703" calcext:value-type="float">
            <text:p>17703</text:p>
          </table:table-cell>
          <table:table-cell office:value-type="float" office:value="8640000" calcext:value-type="float">
            <text:p>8640000</text:p>
          </table:table-cell>
          <table:table-cell table:formula="of:=[.B2530]/[.C2530]" office:value-type="float" office:value="0.00204895833333333" calcext:value-type="float">
            <text:p>0,00204895833333333000</text:p>
          </table:table-cell>
          <table:table-cell table:formula="of:=[.D2531]-[.D253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[.B2530]+7" office:value-type="float" office:value="17710" calcext:value-type="float">
            <text:p>17710</text:p>
          </table:table-cell>
          <table:table-cell office:value-type="float" office:value="8640000" calcext:value-type="float">
            <text:p>8640000</text:p>
          </table:table-cell>
          <table:table-cell table:formula="of:=[.B2531]/[.C2531]" office:value-type="float" office:value="0.00204976851851852" calcext:value-type="float">
            <text:p>0,00204976851851852000</text:p>
          </table:table-cell>
          <table:table-cell table:formula="of:=[.D2532]-[.D253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table:formula="of:=[.B2531]+7" office:value-type="float" office:value="17717" calcext:value-type="float">
            <text:p>17717</text:p>
          </table:table-cell>
          <table:table-cell office:value-type="float" office:value="8640000" calcext:value-type="float">
            <text:p>8640000</text:p>
          </table:table-cell>
          <table:table-cell table:formula="of:=[.B2532]/[.C2532]" office:value-type="float" office:value="0.0020505787037037" calcext:value-type="float">
            <text:p>0,00205057870370370000</text:p>
          </table:table-cell>
          <table:table-cell table:formula="of:=[.D2533]-[.D253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[.B2532]+7" office:value-type="float" office:value="17724" calcext:value-type="float">
            <text:p>17724</text:p>
          </table:table-cell>
          <table:table-cell office:value-type="float" office:value="8640000" calcext:value-type="float">
            <text:p>8640000</text:p>
          </table:table-cell>
          <table:table-cell table:formula="of:=[.B2533]/[.C2533]" office:value-type="float" office:value="0.00205138888888889" calcext:value-type="float">
            <text:p>0,00205138888888889000</text:p>
          </table:table-cell>
          <table:table-cell table:formula="of:=[.D2534]-[.D253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table:formula="of:=[.B2533]+7" office:value-type="float" office:value="17731" calcext:value-type="float">
            <text:p>17731</text:p>
          </table:table-cell>
          <table:table-cell office:value-type="float" office:value="8640000" calcext:value-type="float">
            <text:p>8640000</text:p>
          </table:table-cell>
          <table:table-cell table:formula="of:=[.B2534]/[.C2534]" office:value-type="float" office:value="0.00205219907407407" calcext:value-type="float">
            <text:p>0,00205219907407407000</text:p>
          </table:table-cell>
          <table:table-cell table:formula="of:=[.D2535]-[.D253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[.B2534]+7" office:value-type="float" office:value="17738" calcext:value-type="float">
            <text:p>17738</text:p>
          </table:table-cell>
          <table:table-cell office:value-type="float" office:value="8640000" calcext:value-type="float">
            <text:p>8640000</text:p>
          </table:table-cell>
          <table:table-cell table:formula="of:=[.B2535]/[.C2535]" office:value-type="float" office:value="0.00205300925925926" calcext:value-type="float">
            <text:p>0,00205300925925926000</text:p>
          </table:table-cell>
          <table:table-cell table:formula="of:=[.D2536]-[.D253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[.B2535]+7" office:value-type="float" office:value="17745" calcext:value-type="float">
            <text:p>17745</text:p>
          </table:table-cell>
          <table:table-cell office:value-type="float" office:value="8640000" calcext:value-type="float">
            <text:p>8640000</text:p>
          </table:table-cell>
          <table:table-cell table:formula="of:=[.B2536]/[.C2536]" office:value-type="float" office:value="0.00205381944444444" calcext:value-type="float">
            <text:p>0,00205381944444444000</text:p>
          </table:table-cell>
          <table:table-cell table:formula="of:=[.D2537]-[.D253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table:formula="of:=[.B2536]+7" office:value-type="float" office:value="17752" calcext:value-type="float">
            <text:p>17752</text:p>
          </table:table-cell>
          <table:table-cell office:value-type="float" office:value="8640000" calcext:value-type="float">
            <text:p>8640000</text:p>
          </table:table-cell>
          <table:table-cell table:formula="of:=[.B2537]/[.C2537]" office:value-type="float" office:value="0.00205462962962963" calcext:value-type="float">
            <text:p>0,00205462962962963000</text:p>
          </table:table-cell>
          <table:table-cell table:formula="of:=[.D2538]-[.D253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table:formula="of:=[.B2537]+7" office:value-type="float" office:value="17759" calcext:value-type="float">
            <text:p>17759</text:p>
          </table:table-cell>
          <table:table-cell office:value-type="float" office:value="8640000" calcext:value-type="float">
            <text:p>8640000</text:p>
          </table:table-cell>
          <table:table-cell table:formula="of:=[.B2538]/[.C2538]" office:value-type="float" office:value="0.00205543981481481" calcext:value-type="float">
            <text:p>0,00205543981481481000</text:p>
          </table:table-cell>
          <table:table-cell table:formula="of:=[.D2539]-[.D253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table:formula="of:=[.B2538]+7" office:value-type="float" office:value="17766" calcext:value-type="float">
            <text:p>17766</text:p>
          </table:table-cell>
          <table:table-cell office:value-type="float" office:value="8640000" calcext:value-type="float">
            <text:p>8640000</text:p>
          </table:table-cell>
          <table:table-cell table:formula="of:=[.B2539]/[.C2539]" office:value-type="float" office:value="0.00205625" calcext:value-type="float">
            <text:p>0,00205625000000000000</text:p>
          </table:table-cell>
          <table:table-cell table:formula="of:=[.D2540]-[.D253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[.B2539]+7" office:value-type="float" office:value="17773" calcext:value-type="float">
            <text:p>17773</text:p>
          </table:table-cell>
          <table:table-cell office:value-type="float" office:value="8640000" calcext:value-type="float">
            <text:p>8640000</text:p>
          </table:table-cell>
          <table:table-cell table:formula="of:=[.B2540]/[.C2540]" office:value-type="float" office:value="0.00205706018518519" calcext:value-type="float">
            <text:p>0,00205706018518519000</text:p>
          </table:table-cell>
          <table:table-cell table:formula="of:=[.D2541]-[.D254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table:formula="of:=[.B2540]+7" office:value-type="float" office:value="17780" calcext:value-type="float">
            <text:p>17780</text:p>
          </table:table-cell>
          <table:table-cell office:value-type="float" office:value="8640000" calcext:value-type="float">
            <text:p>8640000</text:p>
          </table:table-cell>
          <table:table-cell table:formula="of:=[.B2541]/[.C2541]" office:value-type="float" office:value="0.00205787037037037" calcext:value-type="float">
            <text:p>0,00205787037037037000</text:p>
          </table:table-cell>
          <table:table-cell table:formula="of:=[.D2542]-[.D254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[.B2541]+7" office:value-type="float" office:value="17787" calcext:value-type="float">
            <text:p>17787</text:p>
          </table:table-cell>
          <table:table-cell office:value-type="float" office:value="8640000" calcext:value-type="float">
            <text:p>8640000</text:p>
          </table:table-cell>
          <table:table-cell table:formula="of:=[.B2542]/[.C2542]" office:value-type="float" office:value="0.00205868055555556" calcext:value-type="float">
            <text:p>0,00205868055555556000</text:p>
          </table:table-cell>
          <table:table-cell table:formula="of:=[.D2543]-[.D254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[.B2542]+7" office:value-type="float" office:value="17794" calcext:value-type="float">
            <text:p>17794</text:p>
          </table:table-cell>
          <table:table-cell office:value-type="float" office:value="8640000" calcext:value-type="float">
            <text:p>8640000</text:p>
          </table:table-cell>
          <table:table-cell table:formula="of:=[.B2543]/[.C2543]" office:value-type="float" office:value="0.00205949074074074" calcext:value-type="float">
            <text:p>0,00205949074074074000</text:p>
          </table:table-cell>
          <table:table-cell table:formula="of:=[.D2544]-[.D254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table:formula="of:=[.B2543]+7" office:value-type="float" office:value="17801" calcext:value-type="float">
            <text:p>17801</text:p>
          </table:table-cell>
          <table:table-cell office:value-type="float" office:value="8640000" calcext:value-type="float">
            <text:p>8640000</text:p>
          </table:table-cell>
          <table:table-cell table:formula="of:=[.B2544]/[.C2544]" office:value-type="float" office:value="0.00206030092592593" calcext:value-type="float">
            <text:p>0,00206030092592593000</text:p>
          </table:table-cell>
          <table:table-cell table:formula="of:=[.D2545]-[.D254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table:formula="of:=[.B2544]+7" office:value-type="float" office:value="17808" calcext:value-type="float">
            <text:p>17808</text:p>
          </table:table-cell>
          <table:table-cell office:value-type="float" office:value="8640000" calcext:value-type="float">
            <text:p>8640000</text:p>
          </table:table-cell>
          <table:table-cell table:formula="of:=[.B2545]/[.C2545]" office:value-type="float" office:value="0.00206111111111111" calcext:value-type="float">
            <text:p>0,00206111111111111000</text:p>
          </table:table-cell>
          <table:table-cell table:formula="of:=[.D2546]-[.D254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table:formula="of:=[.B2545]+7" office:value-type="float" office:value="17815" calcext:value-type="float">
            <text:p>17815</text:p>
          </table:table-cell>
          <table:table-cell office:value-type="float" office:value="8640000" calcext:value-type="float">
            <text:p>8640000</text:p>
          </table:table-cell>
          <table:table-cell table:formula="of:=[.B2546]/[.C2546]" office:value-type="float" office:value="0.0020619212962963" calcext:value-type="float">
            <text:p>0,00206192129629630000</text:p>
          </table:table-cell>
          <table:table-cell table:formula="of:=[.D2547]-[.D254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table:formula="of:=[.B2546]+7" office:value-type="float" office:value="17822" calcext:value-type="float">
            <text:p>17822</text:p>
          </table:table-cell>
          <table:table-cell office:value-type="float" office:value="8640000" calcext:value-type="float">
            <text:p>8640000</text:p>
          </table:table-cell>
          <table:table-cell table:formula="of:=[.B2547]/[.C2547]" office:value-type="float" office:value="0.00206273148148148" calcext:value-type="float">
            <text:p>0,00206273148148148000</text:p>
          </table:table-cell>
          <table:table-cell table:formula="of:=[.D2548]-[.D254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table:formula="of:=[.B2547]+7" office:value-type="float" office:value="17829" calcext:value-type="float">
            <text:p>17829</text:p>
          </table:table-cell>
          <table:table-cell office:value-type="float" office:value="8640000" calcext:value-type="float">
            <text:p>8640000</text:p>
          </table:table-cell>
          <table:table-cell table:formula="of:=[.B2548]/[.C2548]" office:value-type="float" office:value="0.00206354166666667" calcext:value-type="float">
            <text:p>0,00206354166666667000</text:p>
          </table:table-cell>
          <table:table-cell table:formula="of:=[.D2549]-[.D254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table:formula="of:=[.B2548]+7" office:value-type="float" office:value="17836" calcext:value-type="float">
            <text:p>17836</text:p>
          </table:table-cell>
          <table:table-cell office:value-type="float" office:value="8640000" calcext:value-type="float">
            <text:p>8640000</text:p>
          </table:table-cell>
          <table:table-cell table:formula="of:=[.B2549]/[.C2549]" office:value-type="float" office:value="0.00206435185185185" calcext:value-type="float">
            <text:p>0,00206435185185185000</text:p>
          </table:table-cell>
          <table:table-cell table:formula="of:=[.D2550]-[.D254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table:formula="of:=[.B2549]+7" office:value-type="float" office:value="17843" calcext:value-type="float">
            <text:p>17843</text:p>
          </table:table-cell>
          <table:table-cell office:value-type="float" office:value="8640000" calcext:value-type="float">
            <text:p>8640000</text:p>
          </table:table-cell>
          <table:table-cell table:formula="of:=[.B2550]/[.C2550]" office:value-type="float" office:value="0.00206516203703704" calcext:value-type="float">
            <text:p>0,00206516203703704000</text:p>
          </table:table-cell>
          <table:table-cell table:formula="of:=[.D2551]-[.D255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[.B2550]+7" office:value-type="float" office:value="17850" calcext:value-type="float">
            <text:p>17850</text:p>
          </table:table-cell>
          <table:table-cell office:value-type="float" office:value="8640000" calcext:value-type="float">
            <text:p>8640000</text:p>
          </table:table-cell>
          <table:table-cell table:formula="of:=[.B2551]/[.C2551]" office:value-type="float" office:value="0.00206597222222222" calcext:value-type="float">
            <text:p>0,00206597222222222000</text:p>
          </table:table-cell>
          <table:table-cell table:formula="of:=[.D2552]-[.D255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[.B2551]+7" office:value-type="float" office:value="17857" calcext:value-type="float">
            <text:p>17857</text:p>
          </table:table-cell>
          <table:table-cell office:value-type="float" office:value="8640000" calcext:value-type="float">
            <text:p>8640000</text:p>
          </table:table-cell>
          <table:table-cell table:formula="of:=[.B2552]/[.C2552]" office:value-type="float" office:value="0.00206678240740741" calcext:value-type="float">
            <text:p>0,00206678240740741000</text:p>
          </table:table-cell>
          <table:table-cell table:formula="of:=[.D2553]-[.D255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table:formula="of:=[.B2552]+7" office:value-type="float" office:value="17864" calcext:value-type="float">
            <text:p>17864</text:p>
          </table:table-cell>
          <table:table-cell office:value-type="float" office:value="8640000" calcext:value-type="float">
            <text:p>8640000</text:p>
          </table:table-cell>
          <table:table-cell table:formula="of:=[.B2553]/[.C2553]" office:value-type="float" office:value="0.00206759259259259" calcext:value-type="float">
            <text:p>0,00206759259259259000</text:p>
          </table:table-cell>
          <table:table-cell table:formula="of:=[.D2554]-[.D255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table:formula="of:=[.B2553]+7" office:value-type="float" office:value="17871" calcext:value-type="float">
            <text:p>17871</text:p>
          </table:table-cell>
          <table:table-cell office:value-type="float" office:value="8640000" calcext:value-type="float">
            <text:p>8640000</text:p>
          </table:table-cell>
          <table:table-cell table:formula="of:=[.B2554]/[.C2554]" office:value-type="float" office:value="0.00206840277777778" calcext:value-type="float">
            <text:p>0,00206840277777778000</text:p>
          </table:table-cell>
          <table:table-cell table:formula="of:=[.D2555]-[.D255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table:formula="of:=[.B2554]+7" office:value-type="float" office:value="17878" calcext:value-type="float">
            <text:p>17878</text:p>
          </table:table-cell>
          <table:table-cell office:value-type="float" office:value="8640000" calcext:value-type="float">
            <text:p>8640000</text:p>
          </table:table-cell>
          <table:table-cell table:formula="of:=[.B2555]/[.C2555]" office:value-type="float" office:value="0.00206921296296296" calcext:value-type="float">
            <text:p>0,00206921296296296000</text:p>
          </table:table-cell>
          <table:table-cell table:formula="of:=[.D2556]-[.D255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[.B2555]+7" office:value-type="float" office:value="17885" calcext:value-type="float">
            <text:p>17885</text:p>
          </table:table-cell>
          <table:table-cell office:value-type="float" office:value="8640000" calcext:value-type="float">
            <text:p>8640000</text:p>
          </table:table-cell>
          <table:table-cell table:formula="of:=[.B2556]/[.C2556]" office:value-type="float" office:value="0.00207002314814815" calcext:value-type="float">
            <text:p>0,00207002314814815000</text:p>
          </table:table-cell>
          <table:table-cell table:formula="of:=[.D2557]-[.D255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table:formula="of:=[.B2556]+7" office:value-type="float" office:value="17892" calcext:value-type="float">
            <text:p>17892</text:p>
          </table:table-cell>
          <table:table-cell office:value-type="float" office:value="8640000" calcext:value-type="float">
            <text:p>8640000</text:p>
          </table:table-cell>
          <table:table-cell table:formula="of:=[.B2557]/[.C2557]" office:value-type="float" office:value="0.00207083333333333" calcext:value-type="float">
            <text:p>0,00207083333333333000</text:p>
          </table:table-cell>
          <table:table-cell table:formula="of:=[.D2558]-[.D255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[.B2557]+7" office:value-type="float" office:value="17899" calcext:value-type="float">
            <text:p>17899</text:p>
          </table:table-cell>
          <table:table-cell office:value-type="float" office:value="8640000" calcext:value-type="float">
            <text:p>8640000</text:p>
          </table:table-cell>
          <table:table-cell table:formula="of:=[.B2558]/[.C2558]" office:value-type="float" office:value="0.00207164351851852" calcext:value-type="float">
            <text:p>0,00207164351851852000</text:p>
          </table:table-cell>
          <table:table-cell table:formula="of:=[.D2559]-[.D255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[.B2558]+7" office:value-type="float" office:value="17906" calcext:value-type="float">
            <text:p>17906</text:p>
          </table:table-cell>
          <table:table-cell office:value-type="float" office:value="8640000" calcext:value-type="float">
            <text:p>8640000</text:p>
          </table:table-cell>
          <table:table-cell table:formula="of:=[.B2559]/[.C2559]" office:value-type="float" office:value="0.0020724537037037" calcext:value-type="float">
            <text:p>0,00207245370370370000</text:p>
          </table:table-cell>
          <table:table-cell table:formula="of:=[.D2560]-[.D255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table:formula="of:=[.B2559]+7" office:value-type="float" office:value="17913" calcext:value-type="float">
            <text:p>17913</text:p>
          </table:table-cell>
          <table:table-cell office:value-type="float" office:value="8640000" calcext:value-type="float">
            <text:p>8640000</text:p>
          </table:table-cell>
          <table:table-cell table:formula="of:=[.B2560]/[.C2560]" office:value-type="float" office:value="0.00207326388888889" calcext:value-type="float">
            <text:p>0,00207326388888889000</text:p>
          </table:table-cell>
          <table:table-cell table:formula="of:=[.D2561]-[.D256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[.B2560]+7" office:value-type="float" office:value="17920" calcext:value-type="float">
            <text:p>17920</text:p>
          </table:table-cell>
          <table:table-cell office:value-type="float" office:value="8640000" calcext:value-type="float">
            <text:p>8640000</text:p>
          </table:table-cell>
          <table:table-cell table:formula="of:=[.B2561]/[.C2561]" office:value-type="float" office:value="0.00207407407407407" calcext:value-type="float">
            <text:p>0,00207407407407407000</text:p>
          </table:table-cell>
          <table:table-cell table:formula="of:=[.D2562]-[.D256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[.B2561]+7" office:value-type="float" office:value="17927" calcext:value-type="float">
            <text:p>17927</text:p>
          </table:table-cell>
          <table:table-cell office:value-type="float" office:value="8640000" calcext:value-type="float">
            <text:p>8640000</text:p>
          </table:table-cell>
          <table:table-cell table:formula="of:=[.B2562]/[.C2562]" office:value-type="float" office:value="0.00207488425925926" calcext:value-type="float">
            <text:p>0,00207488425925926000</text:p>
          </table:table-cell>
          <table:table-cell table:formula="of:=[.D2563]-[.D256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table:formula="of:=[.B2562]+7" office:value-type="float" office:value="17934" calcext:value-type="float">
            <text:p>17934</text:p>
          </table:table-cell>
          <table:table-cell office:value-type="float" office:value="8640000" calcext:value-type="float">
            <text:p>8640000</text:p>
          </table:table-cell>
          <table:table-cell table:formula="of:=[.B2563]/[.C2563]" office:value-type="float" office:value="0.00207569444444444" calcext:value-type="float">
            <text:p>0,00207569444444444000</text:p>
          </table:table-cell>
          <table:table-cell table:formula="of:=[.D2564]-[.D256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table:formula="of:=[.B2563]+7" office:value-type="float" office:value="17941" calcext:value-type="float">
            <text:p>17941</text:p>
          </table:table-cell>
          <table:table-cell office:value-type="float" office:value="8640000" calcext:value-type="float">
            <text:p>8640000</text:p>
          </table:table-cell>
          <table:table-cell table:formula="of:=[.B2564]/[.C2564]" office:value-type="float" office:value="0.00207650462962963" calcext:value-type="float">
            <text:p>0,00207650462962963000</text:p>
          </table:table-cell>
          <table:table-cell table:formula="of:=[.D2565]-[.D256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table:formula="of:=[.B2564]+7" office:value-type="float" office:value="17948" calcext:value-type="float">
            <text:p>17948</text:p>
          </table:table-cell>
          <table:table-cell office:value-type="float" office:value="8640000" calcext:value-type="float">
            <text:p>8640000</text:p>
          </table:table-cell>
          <table:table-cell table:formula="of:=[.B2565]/[.C2565]" office:value-type="float" office:value="0.00207731481481482" calcext:value-type="float">
            <text:p>0,00207731481481482000</text:p>
          </table:table-cell>
          <table:table-cell table:formula="of:=[.D2566]-[.D256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table:formula="of:=[.B2565]+7" office:value-type="float" office:value="17955" calcext:value-type="float">
            <text:p>17955</text:p>
          </table:table-cell>
          <table:table-cell office:value-type="float" office:value="8640000" calcext:value-type="float">
            <text:p>8640000</text:p>
          </table:table-cell>
          <table:table-cell table:formula="of:=[.B2566]/[.C2566]" office:value-type="float" office:value="0.002078125" calcext:value-type="float">
            <text:p>0,00207812500000000000</text:p>
          </table:table-cell>
          <table:table-cell table:formula="of:=[.D2567]-[.D256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[.B2566]+7" office:value-type="float" office:value="17962" calcext:value-type="float">
            <text:p>17962</text:p>
          </table:table-cell>
          <table:table-cell office:value-type="float" office:value="8640000" calcext:value-type="float">
            <text:p>8640000</text:p>
          </table:table-cell>
          <table:table-cell table:formula="of:=[.B2567]/[.C2567]" office:value-type="float" office:value="0.00207893518518519" calcext:value-type="float">
            <text:p>0,00207893518518519000</text:p>
          </table:table-cell>
          <table:table-cell table:formula="of:=[.D2568]-[.D256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[.B2567]+7" office:value-type="float" office:value="17969" calcext:value-type="float">
            <text:p>17969</text:p>
          </table:table-cell>
          <table:table-cell office:value-type="float" office:value="8640000" calcext:value-type="float">
            <text:p>8640000</text:p>
          </table:table-cell>
          <table:table-cell table:formula="of:=[.B2568]/[.C2568]" office:value-type="float" office:value="0.00207974537037037" calcext:value-type="float">
            <text:p>0,00207974537037037000</text:p>
          </table:table-cell>
          <table:table-cell table:formula="of:=[.D2569]-[.D256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table:formula="of:=[.B2568]+7" office:value-type="float" office:value="17976" calcext:value-type="float">
            <text:p>17976</text:p>
          </table:table-cell>
          <table:table-cell office:value-type="float" office:value="8640000" calcext:value-type="float">
            <text:p>8640000</text:p>
          </table:table-cell>
          <table:table-cell table:formula="of:=[.B2569]/[.C2569]" office:value-type="float" office:value="0.00208055555555556" calcext:value-type="float">
            <text:p>0,00208055555555556000</text:p>
          </table:table-cell>
          <table:table-cell table:formula="of:=[.D2570]-[.D256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[.B2569]+7" office:value-type="float" office:value="17983" calcext:value-type="float">
            <text:p>17983</text:p>
          </table:table-cell>
          <table:table-cell office:value-type="float" office:value="8640000" calcext:value-type="float">
            <text:p>8640000</text:p>
          </table:table-cell>
          <table:table-cell table:formula="of:=[.B2570]/[.C2570]" office:value-type="float" office:value="0.00208136574074074" calcext:value-type="float">
            <text:p>0,00208136574074074000</text:p>
          </table:table-cell>
          <table:table-cell table:formula="of:=[.D2571]-[.D257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[.B2570]+7" office:value-type="float" office:value="17990" calcext:value-type="float">
            <text:p>17990</text:p>
          </table:table-cell>
          <table:table-cell office:value-type="float" office:value="8640000" calcext:value-type="float">
            <text:p>8640000</text:p>
          </table:table-cell>
          <table:table-cell table:formula="of:=[.B2571]/[.C2571]" office:value-type="float" office:value="0.00208217592592593" calcext:value-type="float">
            <text:p>0,00208217592592593000</text:p>
          </table:table-cell>
          <table:table-cell table:formula="of:=[.D2572]-[.D257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[.B2571]+7" office:value-type="float" office:value="17997" calcext:value-type="float">
            <text:p>17997</text:p>
          </table:table-cell>
          <table:table-cell office:value-type="float" office:value="8640000" calcext:value-type="float">
            <text:p>8640000</text:p>
          </table:table-cell>
          <table:table-cell table:formula="of:=[.B2572]/[.C2572]" office:value-type="float" office:value="0.00208298611111111" calcext:value-type="float">
            <text:p>0,00208298611111111000</text:p>
          </table:table-cell>
          <table:table-cell table:formula="of:=[.D2573]-[.D257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[.B2572]+7" office:value-type="float" office:value="18004" calcext:value-type="float">
            <text:p>18004</text:p>
          </table:table-cell>
          <table:table-cell office:value-type="float" office:value="8640000" calcext:value-type="float">
            <text:p>8640000</text:p>
          </table:table-cell>
          <table:table-cell table:formula="of:=[.B2573]/[.C2573]" office:value-type="float" office:value="0.0020837962962963" calcext:value-type="float">
            <text:p>0,00208379629629630000</text:p>
          </table:table-cell>
          <table:table-cell table:formula="of:=[.D2574]-[.D257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[.B2573]+7" office:value-type="float" office:value="18011" calcext:value-type="float">
            <text:p>18011</text:p>
          </table:table-cell>
          <table:table-cell office:value-type="float" office:value="8640000" calcext:value-type="float">
            <text:p>8640000</text:p>
          </table:table-cell>
          <table:table-cell table:formula="of:=[.B2574]/[.C2574]" office:value-type="float" office:value="0.00208460648148148" calcext:value-type="float">
            <text:p>0,00208460648148148000</text:p>
          </table:table-cell>
          <table:table-cell table:formula="of:=[.D2575]-[.D257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[.B2574]+7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2575]/[.C2575]" office:value-type="float" office:value="0.00208541666666667" calcext:value-type="float">
            <text:p>0,00208541666666667000</text:p>
          </table:table-cell>
          <table:table-cell table:formula="of:=[.D2576]-[.D257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[.B2575]+7" office:value-type="float" office:value="18025" calcext:value-type="float">
            <text:p>18025</text:p>
          </table:table-cell>
          <table:table-cell office:value-type="float" office:value="8640000" calcext:value-type="float">
            <text:p>8640000</text:p>
          </table:table-cell>
          <table:table-cell table:formula="of:=[.B2576]/[.C2576]" office:value-type="float" office:value="0.00208622685185185" calcext:value-type="float">
            <text:p>0,00208622685185185000</text:p>
          </table:table-cell>
          <table:table-cell table:formula="of:=[.D2577]-[.D257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table:formula="of:=[.B2576]+7" office:value-type="float" office:value="18032" calcext:value-type="float">
            <text:p>18032</text:p>
          </table:table-cell>
          <table:table-cell office:value-type="float" office:value="8640000" calcext:value-type="float">
            <text:p>8640000</text:p>
          </table:table-cell>
          <table:table-cell table:formula="of:=[.B2577]/[.C2577]" office:value-type="float" office:value="0.00208703703703704" calcext:value-type="float">
            <text:p>0,00208703703703704000</text:p>
          </table:table-cell>
          <table:table-cell table:formula="of:=[.D2578]-[.D257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[.B2577]+7" office:value-type="float" office:value="18039" calcext:value-type="float">
            <text:p>18039</text:p>
          </table:table-cell>
          <table:table-cell office:value-type="float" office:value="8640000" calcext:value-type="float">
            <text:p>8640000</text:p>
          </table:table-cell>
          <table:table-cell table:formula="of:=[.B2578]/[.C2578]" office:value-type="float" office:value="0.00208784722222222" calcext:value-type="float">
            <text:p>0,00208784722222222000</text:p>
          </table:table-cell>
          <table:table-cell table:formula="of:=[.D2579]-[.D257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table:formula="of:=[.B2578]+7" office:value-type="float" office:value="18046" calcext:value-type="float">
            <text:p>18046</text:p>
          </table:table-cell>
          <table:table-cell office:value-type="float" office:value="8640000" calcext:value-type="float">
            <text:p>8640000</text:p>
          </table:table-cell>
          <table:table-cell table:formula="of:=[.B2579]/[.C2579]" office:value-type="float" office:value="0.00208865740740741" calcext:value-type="float">
            <text:p>0,00208865740740741000</text:p>
          </table:table-cell>
          <table:table-cell table:formula="of:=[.D2580]-[.D257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table:formula="of:=[.B2579]+7" office:value-type="float" office:value="18053" calcext:value-type="float">
            <text:p>18053</text:p>
          </table:table-cell>
          <table:table-cell office:value-type="float" office:value="8640000" calcext:value-type="float">
            <text:p>8640000</text:p>
          </table:table-cell>
          <table:table-cell table:formula="of:=[.B2580]/[.C2580]" office:value-type="float" office:value="0.00208946759259259" calcext:value-type="float">
            <text:p>0,00208946759259259000</text:p>
          </table:table-cell>
          <table:table-cell table:formula="of:=[.D2581]-[.D258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table:formula="of:=[.B2580]+7" office:value-type="float" office:value="18060" calcext:value-type="float">
            <text:p>18060</text:p>
          </table:table-cell>
          <table:table-cell office:value-type="float" office:value="8640000" calcext:value-type="float">
            <text:p>8640000</text:p>
          </table:table-cell>
          <table:table-cell table:formula="of:=[.B2581]/[.C2581]" office:value-type="float" office:value="0.00209027777777778" calcext:value-type="float">
            <text:p>0,00209027777777778000</text:p>
          </table:table-cell>
          <table:table-cell table:formula="of:=[.D2582]-[.D258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table:formula="of:=[.B2581]+7" office:value-type="float" office:value="18067" calcext:value-type="float">
            <text:p>18067</text:p>
          </table:table-cell>
          <table:table-cell office:value-type="float" office:value="8640000" calcext:value-type="float">
            <text:p>8640000</text:p>
          </table:table-cell>
          <table:table-cell table:formula="of:=[.B2582]/[.C2582]" office:value-type="float" office:value="0.00209108796296296" calcext:value-type="float">
            <text:p>0,00209108796296296000</text:p>
          </table:table-cell>
          <table:table-cell table:formula="of:=[.D2583]-[.D258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formula="of:=[.B2582]+7" office:value-type="float" office:value="18074" calcext:value-type="float">
            <text:p>18074</text:p>
          </table:table-cell>
          <table:table-cell office:value-type="float" office:value="8640000" calcext:value-type="float">
            <text:p>8640000</text:p>
          </table:table-cell>
          <table:table-cell table:formula="of:=[.B2583]/[.C2583]" office:value-type="float" office:value="0.00209189814814815" calcext:value-type="float">
            <text:p>0,00209189814814815000</text:p>
          </table:table-cell>
          <table:table-cell table:formula="of:=[.D2584]-[.D258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[.B2583]+7" office:value-type="float" office:value="18081" calcext:value-type="float">
            <text:p>18081</text:p>
          </table:table-cell>
          <table:table-cell office:value-type="float" office:value="8640000" calcext:value-type="float">
            <text:p>8640000</text:p>
          </table:table-cell>
          <table:table-cell table:formula="of:=[.B2584]/[.C2584]" office:value-type="float" office:value="0.00209270833333333" calcext:value-type="float">
            <text:p>0,00209270833333333000</text:p>
          </table:table-cell>
          <table:table-cell table:formula="of:=[.D2585]-[.D258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table:formula="of:=[.B2584]+7" office:value-type="float" office:value="18088" calcext:value-type="float">
            <text:p>18088</text:p>
          </table:table-cell>
          <table:table-cell office:value-type="float" office:value="8640000" calcext:value-type="float">
            <text:p>8640000</text:p>
          </table:table-cell>
          <table:table-cell table:formula="of:=[.B2585]/[.C2585]" office:value-type="float" office:value="0.00209351851851852" calcext:value-type="float">
            <text:p>0,00209351851851852000</text:p>
          </table:table-cell>
          <table:table-cell table:formula="of:=[.D2586]-[.D258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[.B2585]+7" office:value-type="float" office:value="18095" calcext:value-type="float">
            <text:p>18095</text:p>
          </table:table-cell>
          <table:table-cell office:value-type="float" office:value="8640000" calcext:value-type="float">
            <text:p>8640000</text:p>
          </table:table-cell>
          <table:table-cell table:formula="of:=[.B2586]/[.C2586]" office:value-type="float" office:value="0.0020943287037037" calcext:value-type="float">
            <text:p>0,00209432870370370000</text:p>
          </table:table-cell>
          <table:table-cell table:formula="of:=[.D2587]-[.D258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table:formula="of:=[.B2586]+7" office:value-type="float" office:value="18102" calcext:value-type="float">
            <text:p>18102</text:p>
          </table:table-cell>
          <table:table-cell office:value-type="float" office:value="8640000" calcext:value-type="float">
            <text:p>8640000</text:p>
          </table:table-cell>
          <table:table-cell table:formula="of:=[.B2587]/[.C2587]" office:value-type="float" office:value="0.00209513888888889" calcext:value-type="float">
            <text:p>0,00209513888888889000</text:p>
          </table:table-cell>
          <table:table-cell table:formula="of:=[.D2588]-[.D258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table:formula="of:=[.B2587]+7" office:value-type="float" office:value="18109" calcext:value-type="float">
            <text:p>18109</text:p>
          </table:table-cell>
          <table:table-cell office:value-type="float" office:value="8640000" calcext:value-type="float">
            <text:p>8640000</text:p>
          </table:table-cell>
          <table:table-cell table:formula="of:=[.B2588]/[.C2588]" office:value-type="float" office:value="0.00209594907407407" calcext:value-type="float">
            <text:p>0,00209594907407407000</text:p>
          </table:table-cell>
          <table:table-cell table:formula="of:=[.D2589]-[.D258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table:formula="of:=[.B2588]+7" office:value-type="float" office:value="18116" calcext:value-type="float">
            <text:p>18116</text:p>
          </table:table-cell>
          <table:table-cell office:value-type="float" office:value="8640000" calcext:value-type="float">
            <text:p>8640000</text:p>
          </table:table-cell>
          <table:table-cell table:formula="of:=[.B2589]/[.C2589]" office:value-type="float" office:value="0.00209675925925926" calcext:value-type="float">
            <text:p>0,00209675925925926000</text:p>
          </table:table-cell>
          <table:table-cell table:formula="of:=[.D2590]-[.D258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[.B2589]+7" office:value-type="float" office:value="18123" calcext:value-type="float">
            <text:p>18123</text:p>
          </table:table-cell>
          <table:table-cell office:value-type="float" office:value="8640000" calcext:value-type="float">
            <text:p>8640000</text:p>
          </table:table-cell>
          <table:table-cell table:formula="of:=[.B2590]/[.C2590]" office:value-type="float" office:value="0.00209756944444444" calcext:value-type="float">
            <text:p>0,00209756944444444000</text:p>
          </table:table-cell>
          <table:table-cell table:formula="of:=[.D2591]-[.D259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[.B2590]+7" office:value-type="float" office:value="18130" calcext:value-type="float">
            <text:p>18130</text:p>
          </table:table-cell>
          <table:table-cell office:value-type="float" office:value="8640000" calcext:value-type="float">
            <text:p>8640000</text:p>
          </table:table-cell>
          <table:table-cell table:formula="of:=[.B2591]/[.C2591]" office:value-type="float" office:value="0.00209837962962963" calcext:value-type="float">
            <text:p>0,00209837962962963000</text:p>
          </table:table-cell>
          <table:table-cell table:formula="of:=[.D2592]-[.D259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table:formula="of:=[.B2591]+7" office:value-type="float" office:value="18137" calcext:value-type="float">
            <text:p>18137</text:p>
          </table:table-cell>
          <table:table-cell office:value-type="float" office:value="8640000" calcext:value-type="float">
            <text:p>8640000</text:p>
          </table:table-cell>
          <table:table-cell table:formula="of:=[.B2592]/[.C2592]" office:value-type="float" office:value="0.00209918981481482" calcext:value-type="float">
            <text:p>0,00209918981481482000</text:p>
          </table:table-cell>
          <table:table-cell table:formula="of:=[.D2593]-[.D259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table:formula="of:=[.B2592]+7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2593]/[.C2593]" office:value-type="float" office:value="0.0021" calcext:value-type="float">
            <text:p>0,00210000000000000000</text:p>
          </table:table-cell>
          <table:table-cell table:formula="of:=[.D2594]-[.D259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[.B2593]+7" office:value-type="float" office:value="18151" calcext:value-type="float">
            <text:p>18151</text:p>
          </table:table-cell>
          <table:table-cell office:value-type="float" office:value="8640000" calcext:value-type="float">
            <text:p>8640000</text:p>
          </table:table-cell>
          <table:table-cell table:formula="of:=[.B2594]/[.C2594]" office:value-type="float" office:value="0.00210081018518519" calcext:value-type="float">
            <text:p>0,00210081018518519000</text:p>
          </table:table-cell>
          <table:table-cell table:formula="of:=[.D2595]-[.D259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table:formula="of:=[.B2594]+7" office:value-type="float" office:value="18158" calcext:value-type="float">
            <text:p>18158</text:p>
          </table:table-cell>
          <table:table-cell office:value-type="float" office:value="8640000" calcext:value-type="float">
            <text:p>8640000</text:p>
          </table:table-cell>
          <table:table-cell table:formula="of:=[.B2595]/[.C2595]" office:value-type="float" office:value="0.00210162037037037" calcext:value-type="float">
            <text:p>0,00210162037037037000</text:p>
          </table:table-cell>
          <table:table-cell table:formula="of:=[.D2596]-[.D259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table:formula="of:=[.B2595]+7" office:value-type="float" office:value="18165" calcext:value-type="float">
            <text:p>18165</text:p>
          </table:table-cell>
          <table:table-cell office:value-type="float" office:value="8640000" calcext:value-type="float">
            <text:p>8640000</text:p>
          </table:table-cell>
          <table:table-cell table:formula="of:=[.B2596]/[.C2596]" office:value-type="float" office:value="0.00210243055555556" calcext:value-type="float">
            <text:p>0,00210243055555556000</text:p>
          </table:table-cell>
          <table:table-cell table:formula="of:=[.D2597]-[.D259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table:formula="of:=[.B2596]+7" office:value-type="float" office:value="18172" calcext:value-type="float">
            <text:p>18172</text:p>
          </table:table-cell>
          <table:table-cell office:value-type="float" office:value="8640000" calcext:value-type="float">
            <text:p>8640000</text:p>
          </table:table-cell>
          <table:table-cell table:formula="of:=[.B2597]/[.C2597]" office:value-type="float" office:value="0.00210324074074074" calcext:value-type="float">
            <text:p>0,00210324074074074000</text:p>
          </table:table-cell>
          <table:table-cell table:formula="of:=[.D2598]-[.D259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table:formula="of:=[.B2597]+7" office:value-type="float" office:value="18179" calcext:value-type="float">
            <text:p>18179</text:p>
          </table:table-cell>
          <table:table-cell office:value-type="float" office:value="8640000" calcext:value-type="float">
            <text:p>8640000</text:p>
          </table:table-cell>
          <table:table-cell table:formula="of:=[.B2598]/[.C2598]" office:value-type="float" office:value="0.00210405092592593" calcext:value-type="float">
            <text:p>0,00210405092592593000</text:p>
          </table:table-cell>
          <table:table-cell table:formula="of:=[.D2599]-[.D259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table:formula="of:=[.B2598]+7" office:value-type="float" office:value="18186" calcext:value-type="float">
            <text:p>18186</text:p>
          </table:table-cell>
          <table:table-cell office:value-type="float" office:value="8640000" calcext:value-type="float">
            <text:p>8640000</text:p>
          </table:table-cell>
          <table:table-cell table:formula="of:=[.B2599]/[.C2599]" office:value-type="float" office:value="0.00210486111111111" calcext:value-type="float">
            <text:p>0,00210486111111111000</text:p>
          </table:table-cell>
          <table:table-cell table:formula="of:=[.D2600]-[.D259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table:formula="of:=[.B2599]+7" office:value-type="float" office:value="18193" calcext:value-type="float">
            <text:p>18193</text:p>
          </table:table-cell>
          <table:table-cell office:value-type="float" office:value="8640000" calcext:value-type="float">
            <text:p>8640000</text:p>
          </table:table-cell>
          <table:table-cell table:formula="of:=[.B2600]/[.C2600]" office:value-type="float" office:value="0.0021056712962963" calcext:value-type="float">
            <text:p>0,00210567129629630000</text:p>
          </table:table-cell>
          <table:table-cell table:formula="of:=[.D2601]-[.D260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[.B2600]+7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2601]/[.C2601]" office:value-type="float" office:value="0.00210648148148148" calcext:value-type="float">
            <text:p>0,00210648148148148000</text:p>
          </table:table-cell>
          <table:table-cell table:formula="of:=[.D2602]-[.D260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table:formula="of:=[.B2601]+7" office:value-type="float" office:value="18207" calcext:value-type="float">
            <text:p>18207</text:p>
          </table:table-cell>
          <table:table-cell office:value-type="float" office:value="8640000" calcext:value-type="float">
            <text:p>8640000</text:p>
          </table:table-cell>
          <table:table-cell table:formula="of:=[.B2602]/[.C2602]" office:value-type="float" office:value="0.00210729166666667" calcext:value-type="float">
            <text:p>0,00210729166666667000</text:p>
          </table:table-cell>
          <table:table-cell table:formula="of:=[.D2603]-[.D260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[.B2602]+7" office:value-type="float" office:value="18214" calcext:value-type="float">
            <text:p>18214</text:p>
          </table:table-cell>
          <table:table-cell office:value-type="float" office:value="8640000" calcext:value-type="float">
            <text:p>8640000</text:p>
          </table:table-cell>
          <table:table-cell table:formula="of:=[.B2603]/[.C2603]" office:value-type="float" office:value="0.00210810185185185" calcext:value-type="float">
            <text:p>0,00210810185185185000</text:p>
          </table:table-cell>
          <table:table-cell table:formula="of:=[.D2604]-[.D260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table:formula="of:=[.B2603]+7" office:value-type="float" office:value="18221" calcext:value-type="float">
            <text:p>18221</text:p>
          </table:table-cell>
          <table:table-cell office:value-type="float" office:value="8640000" calcext:value-type="float">
            <text:p>8640000</text:p>
          </table:table-cell>
          <table:table-cell table:formula="of:=[.B2604]/[.C2604]" office:value-type="float" office:value="0.00210891203703704" calcext:value-type="float">
            <text:p>0,00210891203703704000</text:p>
          </table:table-cell>
          <table:table-cell table:formula="of:=[.D2605]-[.D260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[.B2604]+7" office:value-type="float" office:value="18228" calcext:value-type="float">
            <text:p>18228</text:p>
          </table:table-cell>
          <table:table-cell office:value-type="float" office:value="8640000" calcext:value-type="float">
            <text:p>8640000</text:p>
          </table:table-cell>
          <table:table-cell table:formula="of:=[.B2605]/[.C2605]" office:value-type="float" office:value="0.00210972222222222" calcext:value-type="float">
            <text:p>0,00210972222222222000</text:p>
          </table:table-cell>
          <table:table-cell table:formula="of:=[.D2606]-[.D260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[.B2605]+7" office:value-type="float" office:value="18235" calcext:value-type="float">
            <text:p>18235</text:p>
          </table:table-cell>
          <table:table-cell office:value-type="float" office:value="8640000" calcext:value-type="float">
            <text:p>8640000</text:p>
          </table:table-cell>
          <table:table-cell table:formula="of:=[.B2606]/[.C2606]" office:value-type="float" office:value="0.00211053240740741" calcext:value-type="float">
            <text:p>0,00211053240740741000</text:p>
          </table:table-cell>
          <table:table-cell table:formula="of:=[.D2607]-[.D260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table:formula="of:=[.B2606]+7" office:value-type="float" office:value="18242" calcext:value-type="float">
            <text:p>18242</text:p>
          </table:table-cell>
          <table:table-cell office:value-type="float" office:value="8640000" calcext:value-type="float">
            <text:p>8640000</text:p>
          </table:table-cell>
          <table:table-cell table:formula="of:=[.B2607]/[.C2607]" office:value-type="float" office:value="0.00211134259259259" calcext:value-type="float">
            <text:p>0,00211134259259259000</text:p>
          </table:table-cell>
          <table:table-cell table:formula="of:=[.D2608]-[.D260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table:formula="of:=[.B2607]+7" office:value-type="float" office:value="18249" calcext:value-type="float">
            <text:p>18249</text:p>
          </table:table-cell>
          <table:table-cell office:value-type="float" office:value="8640000" calcext:value-type="float">
            <text:p>8640000</text:p>
          </table:table-cell>
          <table:table-cell table:formula="of:=[.B2608]/[.C2608]" office:value-type="float" office:value="0.00211215277777778" calcext:value-type="float">
            <text:p>0,00211215277777778000</text:p>
          </table:table-cell>
          <table:table-cell table:formula="of:=[.D2609]-[.D260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table:formula="of:=[.B2608]+7" office:value-type="float" office:value="18256" calcext:value-type="float">
            <text:p>18256</text:p>
          </table:table-cell>
          <table:table-cell office:value-type="float" office:value="8640000" calcext:value-type="float">
            <text:p>8640000</text:p>
          </table:table-cell>
          <table:table-cell table:formula="of:=[.B2609]/[.C2609]" office:value-type="float" office:value="0.00211296296296296" calcext:value-type="float">
            <text:p>0,00211296296296296000</text:p>
          </table:table-cell>
          <table:table-cell table:formula="of:=[.D2610]-[.D260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table:formula="of:=[.B2609]+7" office:value-type="float" office:value="18263" calcext:value-type="float">
            <text:p>18263</text:p>
          </table:table-cell>
          <table:table-cell office:value-type="float" office:value="8640000" calcext:value-type="float">
            <text:p>8640000</text:p>
          </table:table-cell>
          <table:table-cell table:formula="of:=[.B2610]/[.C2610]" office:value-type="float" office:value="0.00211377314814815" calcext:value-type="float">
            <text:p>0,00211377314814815000</text:p>
          </table:table-cell>
          <table:table-cell table:formula="of:=[.D2611]-[.D261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[.B2610]+7" office:value-type="float" office:value="18270" calcext:value-type="float">
            <text:p>18270</text:p>
          </table:table-cell>
          <table:table-cell office:value-type="float" office:value="8640000" calcext:value-type="float">
            <text:p>8640000</text:p>
          </table:table-cell>
          <table:table-cell table:formula="of:=[.B2611]/[.C2611]" office:value-type="float" office:value="0.00211458333333333" calcext:value-type="float">
            <text:p>0,00211458333333333000</text:p>
          </table:table-cell>
          <table:table-cell table:formula="of:=[.D2612]-[.D261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table:formula="of:=[.B2611]+7" office:value-type="float" office:value="18277" calcext:value-type="float">
            <text:p>18277</text:p>
          </table:table-cell>
          <table:table-cell office:value-type="float" office:value="8640000" calcext:value-type="float">
            <text:p>8640000</text:p>
          </table:table-cell>
          <table:table-cell table:formula="of:=[.B2612]/[.C2612]" office:value-type="float" office:value="0.00211539351851852" calcext:value-type="float">
            <text:p>0,00211539351851852000</text:p>
          </table:table-cell>
          <table:table-cell table:formula="of:=[.D2613]-[.D261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table:formula="of:=[.B2612]+7" office:value-type="float" office:value="18284" calcext:value-type="float">
            <text:p>18284</text:p>
          </table:table-cell>
          <table:table-cell office:value-type="float" office:value="8640000" calcext:value-type="float">
            <text:p>8640000</text:p>
          </table:table-cell>
          <table:table-cell table:formula="of:=[.B2613]/[.C2613]" office:value-type="float" office:value="0.0021162037037037" calcext:value-type="float">
            <text:p>0,00211620370370370000</text:p>
          </table:table-cell>
          <table:table-cell table:formula="of:=[.D2614]-[.D261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[.B2613]+7" office:value-type="float" office:value="18291" calcext:value-type="float">
            <text:p>18291</text:p>
          </table:table-cell>
          <table:table-cell office:value-type="float" office:value="8640000" calcext:value-type="float">
            <text:p>8640000</text:p>
          </table:table-cell>
          <table:table-cell table:formula="of:=[.B2614]/[.C2614]" office:value-type="float" office:value="0.00211701388888889" calcext:value-type="float">
            <text:p>0,00211701388888889000</text:p>
          </table:table-cell>
          <table:table-cell table:formula="of:=[.D2615]-[.D261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table:formula="of:=[.B2614]+7" office:value-type="float" office:value="18298" calcext:value-type="float">
            <text:p>18298</text:p>
          </table:table-cell>
          <table:table-cell office:value-type="float" office:value="8640000" calcext:value-type="float">
            <text:p>8640000</text:p>
          </table:table-cell>
          <table:table-cell table:formula="of:=[.B2615]/[.C2615]" office:value-type="float" office:value="0.00211782407407407" calcext:value-type="float">
            <text:p>0,00211782407407407000</text:p>
          </table:table-cell>
          <table:table-cell table:formula="of:=[.D2616]-[.D261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table:formula="of:=[.B2615]+7" office:value-type="float" office:value="18305" calcext:value-type="float">
            <text:p>18305</text:p>
          </table:table-cell>
          <table:table-cell office:value-type="float" office:value="8640000" calcext:value-type="float">
            <text:p>8640000</text:p>
          </table:table-cell>
          <table:table-cell table:formula="of:=[.B2616]/[.C2616]" office:value-type="float" office:value="0.00211863425925926" calcext:value-type="float">
            <text:p>0,00211863425925926000</text:p>
          </table:table-cell>
          <table:table-cell table:formula="of:=[.D2617]-[.D261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table:formula="of:=[.B2616]+7" office:value-type="float" office:value="18312" calcext:value-type="float">
            <text:p>18312</text:p>
          </table:table-cell>
          <table:table-cell office:value-type="float" office:value="8640000" calcext:value-type="float">
            <text:p>8640000</text:p>
          </table:table-cell>
          <table:table-cell table:formula="of:=[.B2617]/[.C2617]" office:value-type="float" office:value="0.00211944444444444" calcext:value-type="float">
            <text:p>0,00211944444444444000</text:p>
          </table:table-cell>
          <table:table-cell table:formula="of:=[.D2618]-[.D261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table:formula="of:=[.B2617]+7" office:value-type="float" office:value="18319" calcext:value-type="float">
            <text:p>18319</text:p>
          </table:table-cell>
          <table:table-cell office:value-type="float" office:value="8640000" calcext:value-type="float">
            <text:p>8640000</text:p>
          </table:table-cell>
          <table:table-cell table:formula="of:=[.B2618]/[.C2618]" office:value-type="float" office:value="0.00212025462962963" calcext:value-type="float">
            <text:p>0,00212025462962963000</text:p>
          </table:table-cell>
          <table:table-cell table:formula="of:=[.D2619]-[.D261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table:formula="of:=[.B2618]+7" office:value-type="float" office:value="18326" calcext:value-type="float">
            <text:p>18326</text:p>
          </table:table-cell>
          <table:table-cell office:value-type="float" office:value="8640000" calcext:value-type="float">
            <text:p>8640000</text:p>
          </table:table-cell>
          <table:table-cell table:formula="of:=[.B2619]/[.C2619]" office:value-type="float" office:value="0.00212106481481481" calcext:value-type="float">
            <text:p>0,00212106481481481000</text:p>
          </table:table-cell>
          <table:table-cell table:formula="of:=[.D2620]-[.D261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table:formula="of:=[.B2619]+7" office:value-type="float" office:value="18333" calcext:value-type="float">
            <text:p>18333</text:p>
          </table:table-cell>
          <table:table-cell office:value-type="float" office:value="8640000" calcext:value-type="float">
            <text:p>8640000</text:p>
          </table:table-cell>
          <table:table-cell table:formula="of:=[.B2620]/[.C2620]" office:value-type="float" office:value="0.002121875" calcext:value-type="float">
            <text:p>0,00212187500000000000</text:p>
          </table:table-cell>
          <table:table-cell table:formula="of:=[.D2621]-[.D262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table:formula="of:=[.B2620]+7" office:value-type="float" office:value="18340" calcext:value-type="float">
            <text:p>18340</text:p>
          </table:table-cell>
          <table:table-cell office:value-type="float" office:value="8640000" calcext:value-type="float">
            <text:p>8640000</text:p>
          </table:table-cell>
          <table:table-cell table:formula="of:=[.B2621]/[.C2621]" office:value-type="float" office:value="0.00212268518518519" calcext:value-type="float">
            <text:p>0,00212268518518519000</text:p>
          </table:table-cell>
          <table:table-cell table:formula="of:=[.D2622]-[.D262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table:formula="of:=[.B2621]+7" office:value-type="float" office:value="18347" calcext:value-type="float">
            <text:p>18347</text:p>
          </table:table-cell>
          <table:table-cell office:value-type="float" office:value="8640000" calcext:value-type="float">
            <text:p>8640000</text:p>
          </table:table-cell>
          <table:table-cell table:formula="of:=[.B2622]/[.C2622]" office:value-type="float" office:value="0.00212349537037037" calcext:value-type="float">
            <text:p>0,00212349537037037000</text:p>
          </table:table-cell>
          <table:table-cell table:formula="of:=[.D2623]-[.D262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table:formula="of:=[.B2622]+7" office:value-type="float" office:value="18354" calcext:value-type="float">
            <text:p>18354</text:p>
          </table:table-cell>
          <table:table-cell office:value-type="float" office:value="8640000" calcext:value-type="float">
            <text:p>8640000</text:p>
          </table:table-cell>
          <table:table-cell table:formula="of:=[.B2623]/[.C2623]" office:value-type="float" office:value="0.00212430555555556" calcext:value-type="float">
            <text:p>0,00212430555555556000</text:p>
          </table:table-cell>
          <table:table-cell table:formula="of:=[.D2624]-[.D262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table:formula="of:=[.B2623]+7" office:value-type="float" office:value="18361" calcext:value-type="float">
            <text:p>18361</text:p>
          </table:table-cell>
          <table:table-cell office:value-type="float" office:value="8640000" calcext:value-type="float">
            <text:p>8640000</text:p>
          </table:table-cell>
          <table:table-cell table:formula="of:=[.B2624]/[.C2624]" office:value-type="float" office:value="0.00212511574074074" calcext:value-type="float">
            <text:p>0,00212511574074074000</text:p>
          </table:table-cell>
          <table:table-cell table:formula="of:=[.D2625]-[.D262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table:formula="of:=[.B2624]+7" office:value-type="float" office:value="18368" calcext:value-type="float">
            <text:p>18368</text:p>
          </table:table-cell>
          <table:table-cell office:value-type="float" office:value="8640000" calcext:value-type="float">
            <text:p>8640000</text:p>
          </table:table-cell>
          <table:table-cell table:formula="of:=[.B2625]/[.C2625]" office:value-type="float" office:value="0.00212592592592593" calcext:value-type="float">
            <text:p>0,00212592592592593000</text:p>
          </table:table-cell>
          <table:table-cell table:formula="of:=[.D2626]-[.D262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table:formula="of:=[.B2625]+7" office:value-type="float" office:value="18375" calcext:value-type="float">
            <text:p>18375</text:p>
          </table:table-cell>
          <table:table-cell office:value-type="float" office:value="8640000" calcext:value-type="float">
            <text:p>8640000</text:p>
          </table:table-cell>
          <table:table-cell table:formula="of:=[.B2626]/[.C2626]" office:value-type="float" office:value="0.00212673611111111" calcext:value-type="float">
            <text:p>0,00212673611111111000</text:p>
          </table:table-cell>
          <table:table-cell table:formula="of:=[.D2627]-[.D262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table:formula="of:=[.B2626]+7" office:value-type="float" office:value="18382" calcext:value-type="float">
            <text:p>18382</text:p>
          </table:table-cell>
          <table:table-cell office:value-type="float" office:value="8640000" calcext:value-type="float">
            <text:p>8640000</text:p>
          </table:table-cell>
          <table:table-cell table:formula="of:=[.B2627]/[.C2627]" office:value-type="float" office:value="0.0021275462962963" calcext:value-type="float">
            <text:p>0,00212754629629630000</text:p>
          </table:table-cell>
          <table:table-cell table:formula="of:=[.D2628]-[.D262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table:formula="of:=[.B2627]+7" office:value-type="float" office:value="18389" calcext:value-type="float">
            <text:p>18389</text:p>
          </table:table-cell>
          <table:table-cell office:value-type="float" office:value="8640000" calcext:value-type="float">
            <text:p>8640000</text:p>
          </table:table-cell>
          <table:table-cell table:formula="of:=[.B2628]/[.C2628]" office:value-type="float" office:value="0.00212835648148148" calcext:value-type="float">
            <text:p>0,00212835648148148000</text:p>
          </table:table-cell>
          <table:table-cell table:formula="of:=[.D2629]-[.D262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[.B2628]+7" office:value-type="float" office:value="18396" calcext:value-type="float">
            <text:p>18396</text:p>
          </table:table-cell>
          <table:table-cell office:value-type="float" office:value="8640000" calcext:value-type="float">
            <text:p>8640000</text:p>
          </table:table-cell>
          <table:table-cell table:formula="of:=[.B2629]/[.C2629]" office:value-type="float" office:value="0.00212916666666667" calcext:value-type="float">
            <text:p>0,00212916666666667000</text:p>
          </table:table-cell>
          <table:table-cell table:formula="of:=[.D2630]-[.D262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table:formula="of:=[.B2629]+7" office:value-type="float" office:value="18403" calcext:value-type="float">
            <text:p>18403</text:p>
          </table:table-cell>
          <table:table-cell office:value-type="float" office:value="8640000" calcext:value-type="float">
            <text:p>8640000</text:p>
          </table:table-cell>
          <table:table-cell table:formula="of:=[.B2630]/[.C2630]" office:value-type="float" office:value="0.00212997685185185" calcext:value-type="float">
            <text:p>0,00212997685185185000</text:p>
          </table:table-cell>
          <table:table-cell table:formula="of:=[.D2631]-[.D263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table:formula="of:=[.B2630]+7" office:value-type="float" office:value="18410" calcext:value-type="float">
            <text:p>18410</text:p>
          </table:table-cell>
          <table:table-cell office:value-type="float" office:value="8640000" calcext:value-type="float">
            <text:p>8640000</text:p>
          </table:table-cell>
          <table:table-cell table:formula="of:=[.B2631]/[.C2631]" office:value-type="float" office:value="0.00213078703703704" calcext:value-type="float">
            <text:p>0,00213078703703704000</text:p>
          </table:table-cell>
          <table:table-cell table:formula="of:=[.D2632]-[.D263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table:formula="of:=[.B2631]+7" office:value-type="float" office:value="18417" calcext:value-type="float">
            <text:p>18417</text:p>
          </table:table-cell>
          <table:table-cell office:value-type="float" office:value="8640000" calcext:value-type="float">
            <text:p>8640000</text:p>
          </table:table-cell>
          <table:table-cell table:formula="of:=[.B2632]/[.C2632]" office:value-type="float" office:value="0.00213159722222222" calcext:value-type="float">
            <text:p>0,00213159722222222000</text:p>
          </table:table-cell>
          <table:table-cell table:formula="of:=[.D2633]-[.D263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table:formula="of:=[.B2632]+7" office:value-type="float" office:value="18424" calcext:value-type="float">
            <text:p>18424</text:p>
          </table:table-cell>
          <table:table-cell office:value-type="float" office:value="8640000" calcext:value-type="float">
            <text:p>8640000</text:p>
          </table:table-cell>
          <table:table-cell table:formula="of:=[.B2633]/[.C2633]" office:value-type="float" office:value="0.00213240740740741" calcext:value-type="float">
            <text:p>0,00213240740740741000</text:p>
          </table:table-cell>
          <table:table-cell table:formula="of:=[.D2634]-[.D263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table:formula="of:=[.B2633]+7" office:value-type="float" office:value="18431" calcext:value-type="float">
            <text:p>18431</text:p>
          </table:table-cell>
          <table:table-cell office:value-type="float" office:value="8640000" calcext:value-type="float">
            <text:p>8640000</text:p>
          </table:table-cell>
          <table:table-cell table:formula="of:=[.B2634]/[.C2634]" office:value-type="float" office:value="0.00213321759259259" calcext:value-type="float">
            <text:p>0,00213321759259259000</text:p>
          </table:table-cell>
          <table:table-cell table:formula="of:=[.D2635]-[.D263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table:formula="of:=[.B2634]+7" office:value-type="float" office:value="18438" calcext:value-type="float">
            <text:p>18438</text:p>
          </table:table-cell>
          <table:table-cell office:value-type="float" office:value="8640000" calcext:value-type="float">
            <text:p>8640000</text:p>
          </table:table-cell>
          <table:table-cell table:formula="of:=[.B2635]/[.C2635]" office:value-type="float" office:value="0.00213402777777778" calcext:value-type="float">
            <text:p>0,00213402777777778000</text:p>
          </table:table-cell>
          <table:table-cell table:formula="of:=[.D2636]-[.D263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table:formula="of:=[.B2635]+7" office:value-type="float" office:value="18445" calcext:value-type="float">
            <text:p>18445</text:p>
          </table:table-cell>
          <table:table-cell office:value-type="float" office:value="8640000" calcext:value-type="float">
            <text:p>8640000</text:p>
          </table:table-cell>
          <table:table-cell table:formula="of:=[.B2636]/[.C2636]" office:value-type="float" office:value="0.00213483796296296" calcext:value-type="float">
            <text:p>0,00213483796296296000</text:p>
          </table:table-cell>
          <table:table-cell table:formula="of:=[.D2637]-[.D263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[.B2636]+7" office:value-type="float" office:value="18452" calcext:value-type="float">
            <text:p>18452</text:p>
          </table:table-cell>
          <table:table-cell office:value-type="float" office:value="8640000" calcext:value-type="float">
            <text:p>8640000</text:p>
          </table:table-cell>
          <table:table-cell table:formula="of:=[.B2637]/[.C2637]" office:value-type="float" office:value="0.00213564814814815" calcext:value-type="float">
            <text:p>0,00213564814814815000</text:p>
          </table:table-cell>
          <table:table-cell table:formula="of:=[.D2638]-[.D263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table:formula="of:=[.B2637]+7" office:value-type="float" office:value="18459" calcext:value-type="float">
            <text:p>18459</text:p>
          </table:table-cell>
          <table:table-cell office:value-type="float" office:value="8640000" calcext:value-type="float">
            <text:p>8640000</text:p>
          </table:table-cell>
          <table:table-cell table:formula="of:=[.B2638]/[.C2638]" office:value-type="float" office:value="0.00213645833333333" calcext:value-type="float">
            <text:p>0,00213645833333333000</text:p>
          </table:table-cell>
          <table:table-cell table:formula="of:=[.D2639]-[.D263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table:formula="of:=[.B2638]+7" office:value-type="float" office:value="18466" calcext:value-type="float">
            <text:p>18466</text:p>
          </table:table-cell>
          <table:table-cell office:value-type="float" office:value="8640000" calcext:value-type="float">
            <text:p>8640000</text:p>
          </table:table-cell>
          <table:table-cell table:formula="of:=[.B2639]/[.C2639]" office:value-type="float" office:value="0.00213726851851852" calcext:value-type="float">
            <text:p>0,00213726851851852000</text:p>
          </table:table-cell>
          <table:table-cell table:formula="of:=[.D2640]-[.D263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table:formula="of:=[.B2639]+7" office:value-type="float" office:value="18473" calcext:value-type="float">
            <text:p>18473</text:p>
          </table:table-cell>
          <table:table-cell office:value-type="float" office:value="8640000" calcext:value-type="float">
            <text:p>8640000</text:p>
          </table:table-cell>
          <table:table-cell table:formula="of:=[.B2640]/[.C2640]" office:value-type="float" office:value="0.0021380787037037" calcext:value-type="float">
            <text:p>0,00213807870370370000</text:p>
          </table:table-cell>
          <table:table-cell table:formula="of:=[.D2641]-[.D264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[.B2640]+7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2641]/[.C2641]" office:value-type="float" office:value="0.00213888888888889" calcext:value-type="float">
            <text:p>0,00213888888888889000</text:p>
          </table:table-cell>
          <table:table-cell table:formula="of:=[.D2642]-[.D264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table:formula="of:=[.B2641]+7" office:value-type="float" office:value="18487" calcext:value-type="float">
            <text:p>18487</text:p>
          </table:table-cell>
          <table:table-cell office:value-type="float" office:value="8640000" calcext:value-type="float">
            <text:p>8640000</text:p>
          </table:table-cell>
          <table:table-cell table:formula="of:=[.B2642]/[.C2642]" office:value-type="float" office:value="0.00213969907407407" calcext:value-type="float">
            <text:p>0,00213969907407407000</text:p>
          </table:table-cell>
          <table:table-cell table:formula="of:=[.D2643]-[.D264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table:formula="of:=[.B2642]+7" office:value-type="float" office:value="18494" calcext:value-type="float">
            <text:p>18494</text:p>
          </table:table-cell>
          <table:table-cell office:value-type="float" office:value="8640000" calcext:value-type="float">
            <text:p>8640000</text:p>
          </table:table-cell>
          <table:table-cell table:formula="of:=[.B2643]/[.C2643]" office:value-type="float" office:value="0.00214050925925926" calcext:value-type="float">
            <text:p>0,00214050925925926000</text:p>
          </table:table-cell>
          <table:table-cell table:formula="of:=[.D2644]-[.D264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table:formula="of:=[.B2643]+7" office:value-type="float" office:value="18501" calcext:value-type="float">
            <text:p>18501</text:p>
          </table:table-cell>
          <table:table-cell office:value-type="float" office:value="8640000" calcext:value-type="float">
            <text:p>8640000</text:p>
          </table:table-cell>
          <table:table-cell table:formula="of:=[.B2644]/[.C2644]" office:value-type="float" office:value="0.00214131944444444" calcext:value-type="float">
            <text:p>0,00214131944444444000</text:p>
          </table:table-cell>
          <table:table-cell table:formula="of:=[.D2645]-[.D264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table:formula="of:=[.B2644]+7" office:value-type="float" office:value="18508" calcext:value-type="float">
            <text:p>18508</text:p>
          </table:table-cell>
          <table:table-cell office:value-type="float" office:value="8640000" calcext:value-type="float">
            <text:p>8640000</text:p>
          </table:table-cell>
          <table:table-cell table:formula="of:=[.B2645]/[.C2645]" office:value-type="float" office:value="0.00214212962962963" calcext:value-type="float">
            <text:p>0,00214212962962963000</text:p>
          </table:table-cell>
          <table:table-cell table:formula="of:=[.D2646]-[.D264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table:formula="of:=[.B2645]+7" office:value-type="float" office:value="18515" calcext:value-type="float">
            <text:p>18515</text:p>
          </table:table-cell>
          <table:table-cell office:value-type="float" office:value="8640000" calcext:value-type="float">
            <text:p>8640000</text:p>
          </table:table-cell>
          <table:table-cell table:formula="of:=[.B2646]/[.C2646]" office:value-type="float" office:value="0.00214293981481482" calcext:value-type="float">
            <text:p>0,00214293981481482000</text:p>
          </table:table-cell>
          <table:table-cell table:formula="of:=[.D2647]-[.D264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table:formula="of:=[.B2646]+7" office:value-type="float" office:value="18522" calcext:value-type="float">
            <text:p>18522</text:p>
          </table:table-cell>
          <table:table-cell office:value-type="float" office:value="8640000" calcext:value-type="float">
            <text:p>8640000</text:p>
          </table:table-cell>
          <table:table-cell table:formula="of:=[.B2647]/[.C2647]" office:value-type="float" office:value="0.00214375" calcext:value-type="float">
            <text:p>0,00214375000000000000</text:p>
          </table:table-cell>
          <table:table-cell table:formula="of:=[.D2648]-[.D264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table:formula="of:=[.B2647]+7" office:value-type="float" office:value="18529" calcext:value-type="float">
            <text:p>18529</text:p>
          </table:table-cell>
          <table:table-cell office:value-type="float" office:value="8640000" calcext:value-type="float">
            <text:p>8640000</text:p>
          </table:table-cell>
          <table:table-cell table:formula="of:=[.B2648]/[.C2648]" office:value-type="float" office:value="0.00214456018518519" calcext:value-type="float">
            <text:p>0,00214456018518519000</text:p>
          </table:table-cell>
          <table:table-cell table:formula="of:=[.D2649]-[.D264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table:formula="of:=[.B2648]+7" office:value-type="float" office:value="18536" calcext:value-type="float">
            <text:p>18536</text:p>
          </table:table-cell>
          <table:table-cell office:value-type="float" office:value="8640000" calcext:value-type="float">
            <text:p>8640000</text:p>
          </table:table-cell>
          <table:table-cell table:formula="of:=[.B2649]/[.C2649]" office:value-type="float" office:value="0.00214537037037037" calcext:value-type="float">
            <text:p>0,00214537037037037000</text:p>
          </table:table-cell>
          <table:table-cell table:formula="of:=[.D2650]-[.D264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table:formula="of:=[.B2649]+7" office:value-type="float" office:value="18543" calcext:value-type="float">
            <text:p>18543</text:p>
          </table:table-cell>
          <table:table-cell office:value-type="float" office:value="8640000" calcext:value-type="float">
            <text:p>8640000</text:p>
          </table:table-cell>
          <table:table-cell table:formula="of:=[.B2650]/[.C2650]" office:value-type="float" office:value="0.00214618055555556" calcext:value-type="float">
            <text:p>0,00214618055555556000</text:p>
          </table:table-cell>
          <table:table-cell table:formula="of:=[.D2651]-[.D265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table:formula="of:=[.B2650]+7" office:value-type="float" office:value="18550" calcext:value-type="float">
            <text:p>18550</text:p>
          </table:table-cell>
          <table:table-cell office:value-type="float" office:value="8640000" calcext:value-type="float">
            <text:p>8640000</text:p>
          </table:table-cell>
          <table:table-cell table:formula="of:=[.B2651]/[.C2651]" office:value-type="float" office:value="0.00214699074074074" calcext:value-type="float">
            <text:p>0,00214699074074074000</text:p>
          </table:table-cell>
          <table:table-cell table:formula="of:=[.D2652]-[.D265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table:formula="of:=[.B2651]+7" office:value-type="float" office:value="18557" calcext:value-type="float">
            <text:p>18557</text:p>
          </table:table-cell>
          <table:table-cell office:value-type="float" office:value="8640000" calcext:value-type="float">
            <text:p>8640000</text:p>
          </table:table-cell>
          <table:table-cell table:formula="of:=[.B2652]/[.C2652]" office:value-type="float" office:value="0.00214780092592593" calcext:value-type="float">
            <text:p>0,00214780092592593000</text:p>
          </table:table-cell>
          <table:table-cell table:formula="of:=[.D2653]-[.D265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table:formula="of:=[.B2652]+7" office:value-type="float" office:value="18564" calcext:value-type="float">
            <text:p>18564</text:p>
          </table:table-cell>
          <table:table-cell office:value-type="float" office:value="8640000" calcext:value-type="float">
            <text:p>8640000</text:p>
          </table:table-cell>
          <table:table-cell table:formula="of:=[.B2653]/[.C2653]" office:value-type="float" office:value="0.00214861111111111" calcext:value-type="float">
            <text:p>0,00214861111111111000</text:p>
          </table:table-cell>
          <table:table-cell table:formula="of:=[.D2654]-[.D265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table:formula="of:=[.B2653]+7" office:value-type="float" office:value="18571" calcext:value-type="float">
            <text:p>18571</text:p>
          </table:table-cell>
          <table:table-cell office:value-type="float" office:value="8640000" calcext:value-type="float">
            <text:p>8640000</text:p>
          </table:table-cell>
          <table:table-cell table:formula="of:=[.B2654]/[.C2654]" office:value-type="float" office:value="0.0021494212962963" calcext:value-type="float">
            <text:p>0,00214942129629630000</text:p>
          </table:table-cell>
          <table:table-cell table:formula="of:=[.D2655]-[.D265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table:formula="of:=[.B2654]+7" office:value-type="float" office:value="18578" calcext:value-type="float">
            <text:p>18578</text:p>
          </table:table-cell>
          <table:table-cell office:value-type="float" office:value="8640000" calcext:value-type="float">
            <text:p>8640000</text:p>
          </table:table-cell>
          <table:table-cell table:formula="of:=[.B2655]/[.C2655]" office:value-type="float" office:value="0.00215023148148148" calcext:value-type="float">
            <text:p>0,00215023148148148000</text:p>
          </table:table-cell>
          <table:table-cell table:formula="of:=[.D2656]-[.D265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table:formula="of:=[.B2655]+7" office:value-type="float" office:value="18585" calcext:value-type="float">
            <text:p>18585</text:p>
          </table:table-cell>
          <table:table-cell office:value-type="float" office:value="8640000" calcext:value-type="float">
            <text:p>8640000</text:p>
          </table:table-cell>
          <table:table-cell table:formula="of:=[.B2656]/[.C2656]" office:value-type="float" office:value="0.00215104166666667" calcext:value-type="float">
            <text:p>0,00215104166666667000</text:p>
          </table:table-cell>
          <table:table-cell table:formula="of:=[.D2657]-[.D265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table:formula="of:=[.B2656]+7" office:value-type="float" office:value="18592" calcext:value-type="float">
            <text:p>18592</text:p>
          </table:table-cell>
          <table:table-cell office:value-type="float" office:value="8640000" calcext:value-type="float">
            <text:p>8640000</text:p>
          </table:table-cell>
          <table:table-cell table:formula="of:=[.B2657]/[.C2657]" office:value-type="float" office:value="0.00215185185185185" calcext:value-type="float">
            <text:p>0,00215185185185185000</text:p>
          </table:table-cell>
          <table:table-cell table:formula="of:=[.D2658]-[.D265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table:formula="of:=[.B2657]+7" office:value-type="float" office:value="18599" calcext:value-type="float">
            <text:p>18599</text:p>
          </table:table-cell>
          <table:table-cell office:value-type="float" office:value="8640000" calcext:value-type="float">
            <text:p>8640000</text:p>
          </table:table-cell>
          <table:table-cell table:formula="of:=[.B2658]/[.C2658]" office:value-type="float" office:value="0.00215266203703704" calcext:value-type="float">
            <text:p>0,00215266203703704000</text:p>
          </table:table-cell>
          <table:table-cell table:formula="of:=[.D2659]-[.D265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table:formula="of:=[.B2658]+7" office:value-type="float" office:value="18606" calcext:value-type="float">
            <text:p>18606</text:p>
          </table:table-cell>
          <table:table-cell office:value-type="float" office:value="8640000" calcext:value-type="float">
            <text:p>8640000</text:p>
          </table:table-cell>
          <table:table-cell table:formula="of:=[.B2659]/[.C2659]" office:value-type="float" office:value="0.00215347222222222" calcext:value-type="float">
            <text:p>0,00215347222222222000</text:p>
          </table:table-cell>
          <table:table-cell table:formula="of:=[.D2660]-[.D265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[.B2659]+7" office:value-type="float" office:value="18613" calcext:value-type="float">
            <text:p>18613</text:p>
          </table:table-cell>
          <table:table-cell office:value-type="float" office:value="8640000" calcext:value-type="float">
            <text:p>8640000</text:p>
          </table:table-cell>
          <table:table-cell table:formula="of:=[.B2660]/[.C2660]" office:value-type="float" office:value="0.00215428240740741" calcext:value-type="float">
            <text:p>0,00215428240740741000</text:p>
          </table:table-cell>
          <table:table-cell table:formula="of:=[.D2661]-[.D266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[.B2660]+7" office:value-type="float" office:value="18620" calcext:value-type="float">
            <text:p>18620</text:p>
          </table:table-cell>
          <table:table-cell office:value-type="float" office:value="8640000" calcext:value-type="float">
            <text:p>8640000</text:p>
          </table:table-cell>
          <table:table-cell table:formula="of:=[.B2661]/[.C2661]" office:value-type="float" office:value="0.00215509259259259" calcext:value-type="float">
            <text:p>0,00215509259259259000</text:p>
          </table:table-cell>
          <table:table-cell table:formula="of:=[.D2662]-[.D266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table:formula="of:=[.B2661]+7" office:value-type="float" office:value="18627" calcext:value-type="float">
            <text:p>18627</text:p>
          </table:table-cell>
          <table:table-cell office:value-type="float" office:value="8640000" calcext:value-type="float">
            <text:p>8640000</text:p>
          </table:table-cell>
          <table:table-cell table:formula="of:=[.B2662]/[.C2662]" office:value-type="float" office:value="0.00215590277777778" calcext:value-type="float">
            <text:p>0,00215590277777778000</text:p>
          </table:table-cell>
          <table:table-cell table:formula="of:=[.D2663]-[.D266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[.B2662]+7" office:value-type="float" office:value="18634" calcext:value-type="float">
            <text:p>18634</text:p>
          </table:table-cell>
          <table:table-cell office:value-type="float" office:value="8640000" calcext:value-type="float">
            <text:p>8640000</text:p>
          </table:table-cell>
          <table:table-cell table:formula="of:=[.B2663]/[.C2663]" office:value-type="float" office:value="0.00215671296296296" calcext:value-type="float">
            <text:p>0,00215671296296296000</text:p>
          </table:table-cell>
          <table:table-cell table:formula="of:=[.D2664]-[.D266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[.B2663]+7" office:value-type="float" office:value="18641" calcext:value-type="float">
            <text:p>18641</text:p>
          </table:table-cell>
          <table:table-cell office:value-type="float" office:value="8640000" calcext:value-type="float">
            <text:p>8640000</text:p>
          </table:table-cell>
          <table:table-cell table:formula="of:=[.B2664]/[.C2664]" office:value-type="float" office:value="0.00215752314814815" calcext:value-type="float">
            <text:p>0,00215752314814815000</text:p>
          </table:table-cell>
          <table:table-cell table:formula="of:=[.D2665]-[.D266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[.B2664]+7" office:value-type="float" office:value="18648" calcext:value-type="float">
            <text:p>18648</text:p>
          </table:table-cell>
          <table:table-cell office:value-type="float" office:value="8640000" calcext:value-type="float">
            <text:p>8640000</text:p>
          </table:table-cell>
          <table:table-cell table:formula="of:=[.B2665]/[.C2665]" office:value-type="float" office:value="0.00215833333333333" calcext:value-type="float">
            <text:p>0,00215833333333333000</text:p>
          </table:table-cell>
          <table:table-cell table:formula="of:=[.D2666]-[.D266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table:formula="of:=[.B2665]+7" office:value-type="float" office:value="18655" calcext:value-type="float">
            <text:p>18655</text:p>
          </table:table-cell>
          <table:table-cell office:value-type="float" office:value="8640000" calcext:value-type="float">
            <text:p>8640000</text:p>
          </table:table-cell>
          <table:table-cell table:formula="of:=[.B2666]/[.C2666]" office:value-type="float" office:value="0.00215914351851852" calcext:value-type="float">
            <text:p>0,00215914351851852000</text:p>
          </table:table-cell>
          <table:table-cell table:formula="of:=[.D2667]-[.D266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table:formula="of:=[.B2666]+7" office:value-type="float" office:value="18662" calcext:value-type="float">
            <text:p>18662</text:p>
          </table:table-cell>
          <table:table-cell office:value-type="float" office:value="8640000" calcext:value-type="float">
            <text:p>8640000</text:p>
          </table:table-cell>
          <table:table-cell table:formula="of:=[.B2667]/[.C2667]" office:value-type="float" office:value="0.0021599537037037" calcext:value-type="float">
            <text:p>0,00215995370370370000</text:p>
          </table:table-cell>
          <table:table-cell table:formula="of:=[.D2668]-[.D266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table:formula="of:=[.B2667]+7" office:value-type="float" office:value="18669" calcext:value-type="float">
            <text:p>18669</text:p>
          </table:table-cell>
          <table:table-cell office:value-type="float" office:value="8640000" calcext:value-type="float">
            <text:p>8640000</text:p>
          </table:table-cell>
          <table:table-cell table:formula="of:=[.B2668]/[.C2668]" office:value-type="float" office:value="0.00216076388888889" calcext:value-type="float">
            <text:p>0,00216076388888889000</text:p>
          </table:table-cell>
          <table:table-cell table:formula="of:=[.D2669]-[.D266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table:formula="of:=[.B2668]+7" office:value-type="float" office:value="18676" calcext:value-type="float">
            <text:p>18676</text:p>
          </table:table-cell>
          <table:table-cell office:value-type="float" office:value="8640000" calcext:value-type="float">
            <text:p>8640000</text:p>
          </table:table-cell>
          <table:table-cell table:formula="of:=[.B2669]/[.C2669]" office:value-type="float" office:value="0.00216157407407407" calcext:value-type="float">
            <text:p>0,00216157407407407000</text:p>
          </table:table-cell>
          <table:table-cell table:formula="of:=[.D2670]-[.D266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table:formula="of:=[.B2669]+7" office:value-type="float" office:value="18683" calcext:value-type="float">
            <text:p>18683</text:p>
          </table:table-cell>
          <table:table-cell office:value-type="float" office:value="8640000" calcext:value-type="float">
            <text:p>8640000</text:p>
          </table:table-cell>
          <table:table-cell table:formula="of:=[.B2670]/[.C2670]" office:value-type="float" office:value="0.00216238425925926" calcext:value-type="float">
            <text:p>0,00216238425925926000</text:p>
          </table:table-cell>
          <table:table-cell table:formula="of:=[.D2671]-[.D267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table:formula="of:=[.B2670]+7" office:value-type="float" office:value="18690" calcext:value-type="float">
            <text:p>18690</text:p>
          </table:table-cell>
          <table:table-cell office:value-type="float" office:value="8640000" calcext:value-type="float">
            <text:p>8640000</text:p>
          </table:table-cell>
          <table:table-cell table:formula="of:=[.B2671]/[.C2671]" office:value-type="float" office:value="0.00216319444444444" calcext:value-type="float">
            <text:p>0,00216319444444444000</text:p>
          </table:table-cell>
          <table:table-cell table:formula="of:=[.D2672]-[.D267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table:formula="of:=[.B2671]+7" office:value-type="float" office:value="18697" calcext:value-type="float">
            <text:p>18697</text:p>
          </table:table-cell>
          <table:table-cell office:value-type="float" office:value="8640000" calcext:value-type="float">
            <text:p>8640000</text:p>
          </table:table-cell>
          <table:table-cell table:formula="of:=[.B2672]/[.C2672]" office:value-type="float" office:value="0.00216400462962963" calcext:value-type="float">
            <text:p>0,00216400462962963000</text:p>
          </table:table-cell>
          <table:table-cell table:formula="of:=[.D2673]-[.D267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table:formula="of:=[.B2672]+7" office:value-type="float" office:value="18704" calcext:value-type="float">
            <text:p>18704</text:p>
          </table:table-cell>
          <table:table-cell office:value-type="float" office:value="8640000" calcext:value-type="float">
            <text:p>8640000</text:p>
          </table:table-cell>
          <table:table-cell table:formula="of:=[.B2673]/[.C2673]" office:value-type="float" office:value="0.00216481481481481" calcext:value-type="float">
            <text:p>0,00216481481481481000</text:p>
          </table:table-cell>
          <table:table-cell table:formula="of:=[.D2674]-[.D267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table:formula="of:=[.B2673]+7" office:value-type="float" office:value="18711" calcext:value-type="float">
            <text:p>18711</text:p>
          </table:table-cell>
          <table:table-cell office:value-type="float" office:value="8640000" calcext:value-type="float">
            <text:p>8640000</text:p>
          </table:table-cell>
          <table:table-cell table:formula="of:=[.B2674]/[.C2674]" office:value-type="float" office:value="0.002165625" calcext:value-type="float">
            <text:p>0,00216562500000000000</text:p>
          </table:table-cell>
          <table:table-cell table:formula="of:=[.D2675]-[.D267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table:formula="of:=[.B2674]+7" office:value-type="float" office:value="18718" calcext:value-type="float">
            <text:p>18718</text:p>
          </table:table-cell>
          <table:table-cell office:value-type="float" office:value="8640000" calcext:value-type="float">
            <text:p>8640000</text:p>
          </table:table-cell>
          <table:table-cell table:formula="of:=[.B2675]/[.C2675]" office:value-type="float" office:value="0.00216643518518519" calcext:value-type="float">
            <text:p>0,00216643518518519000</text:p>
          </table:table-cell>
          <table:table-cell table:formula="of:=[.D2676]-[.D267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table:formula="of:=[.B2675]+7" office:value-type="float" office:value="18725" calcext:value-type="float">
            <text:p>18725</text:p>
          </table:table-cell>
          <table:table-cell office:value-type="float" office:value="8640000" calcext:value-type="float">
            <text:p>8640000</text:p>
          </table:table-cell>
          <table:table-cell table:formula="of:=[.B2676]/[.C2676]" office:value-type="float" office:value="0.00216724537037037" calcext:value-type="float">
            <text:p>0,00216724537037037000</text:p>
          </table:table-cell>
          <table:table-cell table:formula="of:=[.D2677]-[.D267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table:formula="of:=[.B2676]+7" office:value-type="float" office:value="18732" calcext:value-type="float">
            <text:p>18732</text:p>
          </table:table-cell>
          <table:table-cell office:value-type="float" office:value="8640000" calcext:value-type="float">
            <text:p>8640000</text:p>
          </table:table-cell>
          <table:table-cell table:formula="of:=[.B2677]/[.C2677]" office:value-type="float" office:value="0.00216805555555556" calcext:value-type="float">
            <text:p>0,00216805555555556000</text:p>
          </table:table-cell>
          <table:table-cell table:formula="of:=[.D2678]-[.D267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table:formula="of:=[.B2677]+7" office:value-type="float" office:value="18739" calcext:value-type="float">
            <text:p>18739</text:p>
          </table:table-cell>
          <table:table-cell office:value-type="float" office:value="8640000" calcext:value-type="float">
            <text:p>8640000</text:p>
          </table:table-cell>
          <table:table-cell table:formula="of:=[.B2678]/[.C2678]" office:value-type="float" office:value="0.00216886574074074" calcext:value-type="float">
            <text:p>0,00216886574074074000</text:p>
          </table:table-cell>
          <table:table-cell table:formula="of:=[.D2679]-[.D267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[.B2678]+7" office:value-type="float" office:value="18746" calcext:value-type="float">
            <text:p>18746</text:p>
          </table:table-cell>
          <table:table-cell office:value-type="float" office:value="8640000" calcext:value-type="float">
            <text:p>8640000</text:p>
          </table:table-cell>
          <table:table-cell table:formula="of:=[.B2679]/[.C2679]" office:value-type="float" office:value="0.00216967592592593" calcext:value-type="float">
            <text:p>0,00216967592592593000</text:p>
          </table:table-cell>
          <table:table-cell table:formula="of:=[.D2680]-[.D267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table:formula="of:=[.B2679]+7" office:value-type="float" office:value="18753" calcext:value-type="float">
            <text:p>18753</text:p>
          </table:table-cell>
          <table:table-cell office:value-type="float" office:value="8640000" calcext:value-type="float">
            <text:p>8640000</text:p>
          </table:table-cell>
          <table:table-cell table:formula="of:=[.B2680]/[.C2680]" office:value-type="float" office:value="0.00217048611111111" calcext:value-type="float">
            <text:p>0,00217048611111111000</text:p>
          </table:table-cell>
          <table:table-cell table:formula="of:=[.D2681]-[.D268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[.B2680]+7" office:value-type="float" office:value="18760" calcext:value-type="float">
            <text:p>18760</text:p>
          </table:table-cell>
          <table:table-cell office:value-type="float" office:value="8640000" calcext:value-type="float">
            <text:p>8640000</text:p>
          </table:table-cell>
          <table:table-cell table:formula="of:=[.B2681]/[.C2681]" office:value-type="float" office:value="0.0021712962962963" calcext:value-type="float">
            <text:p>0,00217129629629630000</text:p>
          </table:table-cell>
          <table:table-cell table:formula="of:=[.D2682]-[.D268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table:formula="of:=[.B2681]+7" office:value-type="float" office:value="18767" calcext:value-type="float">
            <text:p>18767</text:p>
          </table:table-cell>
          <table:table-cell office:value-type="float" office:value="8640000" calcext:value-type="float">
            <text:p>8640000</text:p>
          </table:table-cell>
          <table:table-cell table:formula="of:=[.B2682]/[.C2682]" office:value-type="float" office:value="0.00217210648148148" calcext:value-type="float">
            <text:p>0,00217210648148148000</text:p>
          </table:table-cell>
          <table:table-cell table:formula="of:=[.D2683]-[.D268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table:formula="of:=[.B2682]+7" office:value-type="float" office:value="18774" calcext:value-type="float">
            <text:p>18774</text:p>
          </table:table-cell>
          <table:table-cell office:value-type="float" office:value="8640000" calcext:value-type="float">
            <text:p>8640000</text:p>
          </table:table-cell>
          <table:table-cell table:formula="of:=[.B2683]/[.C2683]" office:value-type="float" office:value="0.00217291666666667" calcext:value-type="float">
            <text:p>0,00217291666666667000</text:p>
          </table:table-cell>
          <table:table-cell table:formula="of:=[.D2684]-[.D268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table:formula="of:=[.B2683]+7" office:value-type="float" office:value="18781" calcext:value-type="float">
            <text:p>18781</text:p>
          </table:table-cell>
          <table:table-cell office:value-type="float" office:value="8640000" calcext:value-type="float">
            <text:p>8640000</text:p>
          </table:table-cell>
          <table:table-cell table:formula="of:=[.B2684]/[.C2684]" office:value-type="float" office:value="0.00217372685185185" calcext:value-type="float">
            <text:p>0,00217372685185185000</text:p>
          </table:table-cell>
          <table:table-cell table:formula="of:=[.D2685]-[.D268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table:formula="of:=[.B2684]+7" office:value-type="float" office:value="18788" calcext:value-type="float">
            <text:p>18788</text:p>
          </table:table-cell>
          <table:table-cell office:value-type="float" office:value="8640000" calcext:value-type="float">
            <text:p>8640000</text:p>
          </table:table-cell>
          <table:table-cell table:formula="of:=[.B2685]/[.C2685]" office:value-type="float" office:value="0.00217453703703704" calcext:value-type="float">
            <text:p>0,00217453703703704000</text:p>
          </table:table-cell>
          <table:table-cell table:formula="of:=[.D2686]-[.D268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table:formula="of:=[.B2685]+7" office:value-type="float" office:value="18795" calcext:value-type="float">
            <text:p>18795</text:p>
          </table:table-cell>
          <table:table-cell office:value-type="float" office:value="8640000" calcext:value-type="float">
            <text:p>8640000</text:p>
          </table:table-cell>
          <table:table-cell table:formula="of:=[.B2686]/[.C2686]" office:value-type="float" office:value="0.00217534722222222" calcext:value-type="float">
            <text:p>0,00217534722222222000</text:p>
          </table:table-cell>
          <table:table-cell table:formula="of:=[.D2687]-[.D268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table:formula="of:=[.B2686]+7" office:value-type="float" office:value="18802" calcext:value-type="float">
            <text:p>18802</text:p>
          </table:table-cell>
          <table:table-cell office:value-type="float" office:value="8640000" calcext:value-type="float">
            <text:p>8640000</text:p>
          </table:table-cell>
          <table:table-cell table:formula="of:=[.B2687]/[.C2687]" office:value-type="float" office:value="0.00217615740740741" calcext:value-type="float">
            <text:p>0,00217615740740741000</text:p>
          </table:table-cell>
          <table:table-cell table:formula="of:=[.D2688]-[.D268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table:formula="of:=[.B2687]+7" office:value-type="float" office:value="18809" calcext:value-type="float">
            <text:p>18809</text:p>
          </table:table-cell>
          <table:table-cell office:value-type="float" office:value="8640000" calcext:value-type="float">
            <text:p>8640000</text:p>
          </table:table-cell>
          <table:table-cell table:formula="of:=[.B2688]/[.C2688]" office:value-type="float" office:value="0.00217696759259259" calcext:value-type="float">
            <text:p>0,00217696759259259000</text:p>
          </table:table-cell>
          <table:table-cell table:formula="of:=[.D2689]-[.D268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table:formula="of:=[.B2688]+7" office:value-type="float" office:value="18816" calcext:value-type="float">
            <text:p>18816</text:p>
          </table:table-cell>
          <table:table-cell office:value-type="float" office:value="8640000" calcext:value-type="float">
            <text:p>8640000</text:p>
          </table:table-cell>
          <table:table-cell table:formula="of:=[.B2689]/[.C2689]" office:value-type="float" office:value="0.00217777777777778" calcext:value-type="float">
            <text:p>0,00217777777777778000</text:p>
          </table:table-cell>
          <table:table-cell table:formula="of:=[.D2690]-[.D268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table:formula="of:=[.B2689]+7" office:value-type="float" office:value="18823" calcext:value-type="float">
            <text:p>18823</text:p>
          </table:table-cell>
          <table:table-cell office:value-type="float" office:value="8640000" calcext:value-type="float">
            <text:p>8640000</text:p>
          </table:table-cell>
          <table:table-cell table:formula="of:=[.B2690]/[.C2690]" office:value-type="float" office:value="0.00217858796296296" calcext:value-type="float">
            <text:p>0,00217858796296296000</text:p>
          </table:table-cell>
          <table:table-cell table:formula="of:=[.D2691]-[.D269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table:formula="of:=[.B2690]+7" office:value-type="float" office:value="18830" calcext:value-type="float">
            <text:p>18830</text:p>
          </table:table-cell>
          <table:table-cell office:value-type="float" office:value="8640000" calcext:value-type="float">
            <text:p>8640000</text:p>
          </table:table-cell>
          <table:table-cell table:formula="of:=[.B2691]/[.C2691]" office:value-type="float" office:value="0.00217939814814815" calcext:value-type="float">
            <text:p>0,00217939814814815000</text:p>
          </table:table-cell>
          <table:table-cell table:formula="of:=[.D2692]-[.D269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table:formula="of:=[.B2691]+7" office:value-type="float" office:value="18837" calcext:value-type="float">
            <text:p>18837</text:p>
          </table:table-cell>
          <table:table-cell office:value-type="float" office:value="8640000" calcext:value-type="float">
            <text:p>8640000</text:p>
          </table:table-cell>
          <table:table-cell table:formula="of:=[.B2692]/[.C2692]" office:value-type="float" office:value="0.00218020833333333" calcext:value-type="float">
            <text:p>0,00218020833333333000</text:p>
          </table:table-cell>
          <table:table-cell table:formula="of:=[.D2693]-[.D269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table:formula="of:=[.B2692]+7" office:value-type="float" office:value="18844" calcext:value-type="float">
            <text:p>18844</text:p>
          </table:table-cell>
          <table:table-cell office:value-type="float" office:value="8640000" calcext:value-type="float">
            <text:p>8640000</text:p>
          </table:table-cell>
          <table:table-cell table:formula="of:=[.B2693]/[.C2693]" office:value-type="float" office:value="0.00218101851851852" calcext:value-type="float">
            <text:p>0,00218101851851852000</text:p>
          </table:table-cell>
          <table:table-cell table:formula="of:=[.D2694]-[.D269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table:formula="of:=[.B2693]+7" office:value-type="float" office:value="18851" calcext:value-type="float">
            <text:p>18851</text:p>
          </table:table-cell>
          <table:table-cell office:value-type="float" office:value="8640000" calcext:value-type="float">
            <text:p>8640000</text:p>
          </table:table-cell>
          <table:table-cell table:formula="of:=[.B2694]/[.C2694]" office:value-type="float" office:value="0.0021818287037037" calcext:value-type="float">
            <text:p>0,00218182870370370000</text:p>
          </table:table-cell>
          <table:table-cell table:formula="of:=[.D2695]-[.D269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table:formula="of:=[.B2694]+7" office:value-type="float" office:value="18858" calcext:value-type="float">
            <text:p>18858</text:p>
          </table:table-cell>
          <table:table-cell office:value-type="float" office:value="8640000" calcext:value-type="float">
            <text:p>8640000</text:p>
          </table:table-cell>
          <table:table-cell table:formula="of:=[.B2695]/[.C2695]" office:value-type="float" office:value="0.00218263888888889" calcext:value-type="float">
            <text:p>0,00218263888888889000</text:p>
          </table:table-cell>
          <table:table-cell table:formula="of:=[.D2696]-[.D269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table:formula="of:=[.B2695]+7" office:value-type="float" office:value="18865" calcext:value-type="float">
            <text:p>18865</text:p>
          </table:table-cell>
          <table:table-cell office:value-type="float" office:value="8640000" calcext:value-type="float">
            <text:p>8640000</text:p>
          </table:table-cell>
          <table:table-cell table:formula="of:=[.B2696]/[.C2696]" office:value-type="float" office:value="0.00218344907407407" calcext:value-type="float">
            <text:p>0,00218344907407407000</text:p>
          </table:table-cell>
          <table:table-cell table:formula="of:=[.D2697]-[.D269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table:formula="of:=[.B2696]+7" office:value-type="float" office:value="18872" calcext:value-type="float">
            <text:p>18872</text:p>
          </table:table-cell>
          <table:table-cell office:value-type="float" office:value="8640000" calcext:value-type="float">
            <text:p>8640000</text:p>
          </table:table-cell>
          <table:table-cell table:formula="of:=[.B2697]/[.C2697]" office:value-type="float" office:value="0.00218425925925926" calcext:value-type="float">
            <text:p>0,00218425925925926000</text:p>
          </table:table-cell>
          <table:table-cell table:formula="of:=[.D2698]-[.D269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table:formula="of:=[.B2697]+7" office:value-type="float" office:value="18879" calcext:value-type="float">
            <text:p>18879</text:p>
          </table:table-cell>
          <table:table-cell office:value-type="float" office:value="8640000" calcext:value-type="float">
            <text:p>8640000</text:p>
          </table:table-cell>
          <table:table-cell table:formula="of:=[.B2698]/[.C2698]" office:value-type="float" office:value="0.00218506944444444" calcext:value-type="float">
            <text:p>0,00218506944444444000</text:p>
          </table:table-cell>
          <table:table-cell table:formula="of:=[.D2699]-[.D269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table:formula="of:=[.B2698]+7" office:value-type="float" office:value="18886" calcext:value-type="float">
            <text:p>18886</text:p>
          </table:table-cell>
          <table:table-cell office:value-type="float" office:value="8640000" calcext:value-type="float">
            <text:p>8640000</text:p>
          </table:table-cell>
          <table:table-cell table:formula="of:=[.B2699]/[.C2699]" office:value-type="float" office:value="0.00218587962962963" calcext:value-type="float">
            <text:p>0,00218587962962963000</text:p>
          </table:table-cell>
          <table:table-cell table:formula="of:=[.D2700]-[.D269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table:formula="of:=[.B2699]+7" office:value-type="float" office:value="18893" calcext:value-type="float">
            <text:p>18893</text:p>
          </table:table-cell>
          <table:table-cell office:value-type="float" office:value="8640000" calcext:value-type="float">
            <text:p>8640000</text:p>
          </table:table-cell>
          <table:table-cell table:formula="of:=[.B2700]/[.C2700]" office:value-type="float" office:value="0.00218668981481482" calcext:value-type="float">
            <text:p>0,00218668981481482000</text:p>
          </table:table-cell>
          <table:table-cell table:formula="of:=[.D2701]-[.D270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.B2700]+7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2701]/[.C2701]" office:value-type="float" office:value="0.0021875" calcext:value-type="float">
            <text:p>0,00218750000000000000</text:p>
          </table:table-cell>
          <table:table-cell table:formula="of:=[.D2702]-[.D270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table:formula="of:=[.B2701]+7" office:value-type="float" office:value="18907" calcext:value-type="float">
            <text:p>18907</text:p>
          </table:table-cell>
          <table:table-cell office:value-type="float" office:value="8640000" calcext:value-type="float">
            <text:p>8640000</text:p>
          </table:table-cell>
          <table:table-cell table:formula="of:=[.B2702]/[.C2702]" office:value-type="float" office:value="0.00218831018518519" calcext:value-type="float">
            <text:p>0,00218831018518519000</text:p>
          </table:table-cell>
          <table:table-cell table:formula="of:=[.D2703]-[.D270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table:formula="of:=[.B2702]+7" office:value-type="float" office:value="18914" calcext:value-type="float">
            <text:p>18914</text:p>
          </table:table-cell>
          <table:table-cell office:value-type="float" office:value="8640000" calcext:value-type="float">
            <text:p>8640000</text:p>
          </table:table-cell>
          <table:table-cell table:formula="of:=[.B2703]/[.C2703]" office:value-type="float" office:value="0.00218912037037037" calcext:value-type="float">
            <text:p>0,00218912037037037000</text:p>
          </table:table-cell>
          <table:table-cell table:formula="of:=[.D2704]-[.D270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table:formula="of:=[.B2703]+7" office:value-type="float" office:value="18921" calcext:value-type="float">
            <text:p>18921</text:p>
          </table:table-cell>
          <table:table-cell office:value-type="float" office:value="8640000" calcext:value-type="float">
            <text:p>8640000</text:p>
          </table:table-cell>
          <table:table-cell table:formula="of:=[.B2704]/[.C2704]" office:value-type="float" office:value="0.00218993055555556" calcext:value-type="float">
            <text:p>0,00218993055555556000</text:p>
          </table:table-cell>
          <table:table-cell table:formula="of:=[.D2705]-[.D270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table:formula="of:=[.B2704]+7" office:value-type="float" office:value="18928" calcext:value-type="float">
            <text:p>18928</text:p>
          </table:table-cell>
          <table:table-cell office:value-type="float" office:value="8640000" calcext:value-type="float">
            <text:p>8640000</text:p>
          </table:table-cell>
          <table:table-cell table:formula="of:=[.B2705]/[.C2705]" office:value-type="float" office:value="0.00219074074074074" calcext:value-type="float">
            <text:p>0,00219074074074074000</text:p>
          </table:table-cell>
          <table:table-cell table:formula="of:=[.D2706]-[.D270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table:formula="of:=[.B2705]+7" office:value-type="float" office:value="18935" calcext:value-type="float">
            <text:p>18935</text:p>
          </table:table-cell>
          <table:table-cell office:value-type="float" office:value="8640000" calcext:value-type="float">
            <text:p>8640000</text:p>
          </table:table-cell>
          <table:table-cell table:formula="of:=[.B2706]/[.C2706]" office:value-type="float" office:value="0.00219155092592593" calcext:value-type="float">
            <text:p>0,00219155092592593000</text:p>
          </table:table-cell>
          <table:table-cell table:formula="of:=[.D2707]-[.D270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table:formula="of:=[.B2706]+7" office:value-type="float" office:value="18942" calcext:value-type="float">
            <text:p>18942</text:p>
          </table:table-cell>
          <table:table-cell office:value-type="float" office:value="8640000" calcext:value-type="float">
            <text:p>8640000</text:p>
          </table:table-cell>
          <table:table-cell table:formula="of:=[.B2707]/[.C2707]" office:value-type="float" office:value="0.00219236111111111" calcext:value-type="float">
            <text:p>0,00219236111111111000</text:p>
          </table:table-cell>
          <table:table-cell table:formula="of:=[.D2708]-[.D270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table:formula="of:=[.B2707]+7" office:value-type="float" office:value="18949" calcext:value-type="float">
            <text:p>18949</text:p>
          </table:table-cell>
          <table:table-cell office:value-type="float" office:value="8640000" calcext:value-type="float">
            <text:p>8640000</text:p>
          </table:table-cell>
          <table:table-cell table:formula="of:=[.B2708]/[.C2708]" office:value-type="float" office:value="0.0021931712962963" calcext:value-type="float">
            <text:p>0,00219317129629630000</text:p>
          </table:table-cell>
          <table:table-cell table:formula="of:=[.D2709]-[.D270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table:formula="of:=[.B2708]+7" office:value-type="float" office:value="18956" calcext:value-type="float">
            <text:p>18956</text:p>
          </table:table-cell>
          <table:table-cell office:value-type="float" office:value="8640000" calcext:value-type="float">
            <text:p>8640000</text:p>
          </table:table-cell>
          <table:table-cell table:formula="of:=[.B2709]/[.C2709]" office:value-type="float" office:value="0.00219398148148148" calcext:value-type="float">
            <text:p>0,00219398148148148000</text:p>
          </table:table-cell>
          <table:table-cell table:formula="of:=[.D2710]-[.D270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table:formula="of:=[.B2709]+7" office:value-type="float" office:value="18963" calcext:value-type="float">
            <text:p>18963</text:p>
          </table:table-cell>
          <table:table-cell office:value-type="float" office:value="8640000" calcext:value-type="float">
            <text:p>8640000</text:p>
          </table:table-cell>
          <table:table-cell table:formula="of:=[.B2710]/[.C2710]" office:value-type="float" office:value="0.00219479166666667" calcext:value-type="float">
            <text:p>0,00219479166666667000</text:p>
          </table:table-cell>
          <table:table-cell table:formula="of:=[.D2711]-[.D271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table:formula="of:=[.B2710]+7" office:value-type="float" office:value="18970" calcext:value-type="float">
            <text:p>18970</text:p>
          </table:table-cell>
          <table:table-cell office:value-type="float" office:value="8640000" calcext:value-type="float">
            <text:p>8640000</text:p>
          </table:table-cell>
          <table:table-cell table:formula="of:=[.B2711]/[.C2711]" office:value-type="float" office:value="0.00219560185185185" calcext:value-type="float">
            <text:p>0,00219560185185185000</text:p>
          </table:table-cell>
          <table:table-cell table:formula="of:=[.D2712]-[.D271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table:formula="of:=[.B2711]+7" office:value-type="float" office:value="18977" calcext:value-type="float">
            <text:p>18977</text:p>
          </table:table-cell>
          <table:table-cell office:value-type="float" office:value="8640000" calcext:value-type="float">
            <text:p>8640000</text:p>
          </table:table-cell>
          <table:table-cell table:formula="of:=[.B2712]/[.C2712]" office:value-type="float" office:value="0.00219641203703704" calcext:value-type="float">
            <text:p>0,00219641203703704000</text:p>
          </table:table-cell>
          <table:table-cell table:formula="of:=[.D2713]-[.D271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table:formula="of:=[.B2712]+7" office:value-type="float" office:value="18984" calcext:value-type="float">
            <text:p>18984</text:p>
          </table:table-cell>
          <table:table-cell office:value-type="float" office:value="8640000" calcext:value-type="float">
            <text:p>8640000</text:p>
          </table:table-cell>
          <table:table-cell table:formula="of:=[.B2713]/[.C2713]" office:value-type="float" office:value="0.00219722222222222" calcext:value-type="float">
            <text:p>0,00219722222222222000</text:p>
          </table:table-cell>
          <table:table-cell table:formula="of:=[.D2714]-[.D271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table:formula="of:=[.B2713]+7" office:value-type="float" office:value="18991" calcext:value-type="float">
            <text:p>18991</text:p>
          </table:table-cell>
          <table:table-cell office:value-type="float" office:value="8640000" calcext:value-type="float">
            <text:p>8640000</text:p>
          </table:table-cell>
          <table:table-cell table:formula="of:=[.B2714]/[.C2714]" office:value-type="float" office:value="0.00219803240740741" calcext:value-type="float">
            <text:p>0,00219803240740741000</text:p>
          </table:table-cell>
          <table:table-cell table:formula="of:=[.D2715]-[.D271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table:formula="of:=[.B2714]+7" office:value-type="float" office:value="18998" calcext:value-type="float">
            <text:p>18998</text:p>
          </table:table-cell>
          <table:table-cell office:value-type="float" office:value="8640000" calcext:value-type="float">
            <text:p>8640000</text:p>
          </table:table-cell>
          <table:table-cell table:formula="of:=[.B2715]/[.C2715]" office:value-type="float" office:value="0.00219884259259259" calcext:value-type="float">
            <text:p>0,00219884259259259000</text:p>
          </table:table-cell>
          <table:table-cell table:formula="of:=[.D2716]-[.D271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table:formula="of:=[.B2715]+7" office:value-type="float" office:value="19005" calcext:value-type="float">
            <text:p>19005</text:p>
          </table:table-cell>
          <table:table-cell office:value-type="float" office:value="8640000" calcext:value-type="float">
            <text:p>8640000</text:p>
          </table:table-cell>
          <table:table-cell table:formula="of:=[.B2716]/[.C2716]" office:value-type="float" office:value="0.00219965277777778" calcext:value-type="float">
            <text:p>0,00219965277777778000</text:p>
          </table:table-cell>
          <table:table-cell table:formula="of:=[.D2717]-[.D271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table:formula="of:=[.B2716]+7" office:value-type="float" office:value="19012" calcext:value-type="float">
            <text:p>19012</text:p>
          </table:table-cell>
          <table:table-cell office:value-type="float" office:value="8640000" calcext:value-type="float">
            <text:p>8640000</text:p>
          </table:table-cell>
          <table:table-cell table:formula="of:=[.B2717]/[.C2717]" office:value-type="float" office:value="0.00220046296296296" calcext:value-type="float">
            <text:p>0,00220046296296296000</text:p>
          </table:table-cell>
          <table:table-cell table:formula="of:=[.D2718]-[.D271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table:formula="of:=[.B2717]+7" office:value-type="float" office:value="19019" calcext:value-type="float">
            <text:p>19019</text:p>
          </table:table-cell>
          <table:table-cell office:value-type="float" office:value="8640000" calcext:value-type="float">
            <text:p>8640000</text:p>
          </table:table-cell>
          <table:table-cell table:formula="of:=[.B2718]/[.C2718]" office:value-type="float" office:value="0.00220127314814815" calcext:value-type="float">
            <text:p>0,00220127314814815000</text:p>
          </table:table-cell>
          <table:table-cell table:formula="of:=[.D2719]-[.D271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table:formula="of:=[.B2718]+7" office:value-type="float" office:value="19026" calcext:value-type="float">
            <text:p>19026</text:p>
          </table:table-cell>
          <table:table-cell office:value-type="float" office:value="8640000" calcext:value-type="float">
            <text:p>8640000</text:p>
          </table:table-cell>
          <table:table-cell table:formula="of:=[.B2719]/[.C2719]" office:value-type="float" office:value="0.00220208333333333" calcext:value-type="float">
            <text:p>0,00220208333333333000</text:p>
          </table:table-cell>
          <table:table-cell table:formula="of:=[.D2720]-[.D271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table:formula="of:=[.B2719]+7" office:value-type="float" office:value="19033" calcext:value-type="float">
            <text:p>19033</text:p>
          </table:table-cell>
          <table:table-cell office:value-type="float" office:value="8640000" calcext:value-type="float">
            <text:p>8640000</text:p>
          </table:table-cell>
          <table:table-cell table:formula="of:=[.B2720]/[.C2720]" office:value-type="float" office:value="0.00220289351851852" calcext:value-type="float">
            <text:p>0,00220289351851852000</text:p>
          </table:table-cell>
          <table:table-cell table:formula="of:=[.D2721]-[.D272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[.B2720]+7" office:value-type="float" office:value="19040" calcext:value-type="float">
            <text:p>19040</text:p>
          </table:table-cell>
          <table:table-cell office:value-type="float" office:value="8640000" calcext:value-type="float">
            <text:p>8640000</text:p>
          </table:table-cell>
          <table:table-cell table:formula="of:=[.B2721]/[.C2721]" office:value-type="float" office:value="0.0022037037037037" calcext:value-type="float">
            <text:p>0,00220370370370370000</text:p>
          </table:table-cell>
          <table:table-cell table:formula="of:=[.D2722]-[.D272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table:formula="of:=[.B2721]+7" office:value-type="float" office:value="19047" calcext:value-type="float">
            <text:p>19047</text:p>
          </table:table-cell>
          <table:table-cell office:value-type="float" office:value="8640000" calcext:value-type="float">
            <text:p>8640000</text:p>
          </table:table-cell>
          <table:table-cell table:formula="of:=[.B2722]/[.C2722]" office:value-type="float" office:value="0.00220451388888889" calcext:value-type="float">
            <text:p>0,00220451388888889000</text:p>
          </table:table-cell>
          <table:table-cell table:formula="of:=[.D2723]-[.D272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table:formula="of:=[.B2722]+7" office:value-type="float" office:value="19054" calcext:value-type="float">
            <text:p>19054</text:p>
          </table:table-cell>
          <table:table-cell office:value-type="float" office:value="8640000" calcext:value-type="float">
            <text:p>8640000</text:p>
          </table:table-cell>
          <table:table-cell table:formula="of:=[.B2723]/[.C2723]" office:value-type="float" office:value="0.00220532407407407" calcext:value-type="float">
            <text:p>0,00220532407407407000</text:p>
          </table:table-cell>
          <table:table-cell table:formula="of:=[.D2724]-[.D272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table:formula="of:=[.B2723]+7" office:value-type="float" office:value="19061" calcext:value-type="float">
            <text:p>19061</text:p>
          </table:table-cell>
          <table:table-cell office:value-type="float" office:value="8640000" calcext:value-type="float">
            <text:p>8640000</text:p>
          </table:table-cell>
          <table:table-cell table:formula="of:=[.B2724]/[.C2724]" office:value-type="float" office:value="0.00220613425925926" calcext:value-type="float">
            <text:p>0,00220613425925926000</text:p>
          </table:table-cell>
          <table:table-cell table:formula="of:=[.D2725]-[.D272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table:formula="of:=[.B2724]+7" office:value-type="float" office:value="19068" calcext:value-type="float">
            <text:p>19068</text:p>
          </table:table-cell>
          <table:table-cell office:value-type="float" office:value="8640000" calcext:value-type="float">
            <text:p>8640000</text:p>
          </table:table-cell>
          <table:table-cell table:formula="of:=[.B2725]/[.C2725]" office:value-type="float" office:value="0.00220694444444444" calcext:value-type="float">
            <text:p>0,00220694444444444000</text:p>
          </table:table-cell>
          <table:table-cell table:formula="of:=[.D2726]-[.D272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table:formula="of:=[.B2725]+7" office:value-type="float" office:value="19075" calcext:value-type="float">
            <text:p>19075</text:p>
          </table:table-cell>
          <table:table-cell office:value-type="float" office:value="8640000" calcext:value-type="float">
            <text:p>8640000</text:p>
          </table:table-cell>
          <table:table-cell table:formula="of:=[.B2726]/[.C2726]" office:value-type="float" office:value="0.00220775462962963" calcext:value-type="float">
            <text:p>0,00220775462962963000</text:p>
          </table:table-cell>
          <table:table-cell table:formula="of:=[.D2727]-[.D272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table:formula="of:=[.B2726]+7" office:value-type="float" office:value="19082" calcext:value-type="float">
            <text:p>19082</text:p>
          </table:table-cell>
          <table:table-cell office:value-type="float" office:value="8640000" calcext:value-type="float">
            <text:p>8640000</text:p>
          </table:table-cell>
          <table:table-cell table:formula="of:=[.B2727]/[.C2727]" office:value-type="float" office:value="0.00220856481481481" calcext:value-type="float">
            <text:p>0,00220856481481481000</text:p>
          </table:table-cell>
          <table:table-cell table:formula="of:=[.D2728]-[.D272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table:formula="of:=[.B2727]+7" office:value-type="float" office:value="19089" calcext:value-type="float">
            <text:p>19089</text:p>
          </table:table-cell>
          <table:table-cell office:value-type="float" office:value="8640000" calcext:value-type="float">
            <text:p>8640000</text:p>
          </table:table-cell>
          <table:table-cell table:formula="of:=[.B2728]/[.C2728]" office:value-type="float" office:value="0.002209375" calcext:value-type="float">
            <text:p>0,00220937500000000000</text:p>
          </table:table-cell>
          <table:table-cell table:formula="of:=[.D2729]-[.D272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table:formula="of:=[.B2728]+7" office:value-type="float" office:value="19096" calcext:value-type="float">
            <text:p>19096</text:p>
          </table:table-cell>
          <table:table-cell office:value-type="float" office:value="8640000" calcext:value-type="float">
            <text:p>8640000</text:p>
          </table:table-cell>
          <table:table-cell table:formula="of:=[.B2729]/[.C2729]" office:value-type="float" office:value="0.00221018518518519" calcext:value-type="float">
            <text:p>0,00221018518518519000</text:p>
          </table:table-cell>
          <table:table-cell table:formula="of:=[.D2730]-[.D272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table:formula="of:=[.B2729]+7" office:value-type="float" office:value="19103" calcext:value-type="float">
            <text:p>19103</text:p>
          </table:table-cell>
          <table:table-cell office:value-type="float" office:value="8640000" calcext:value-type="float">
            <text:p>8640000</text:p>
          </table:table-cell>
          <table:table-cell table:formula="of:=[.B2730]/[.C2730]" office:value-type="float" office:value="0.00221099537037037" calcext:value-type="float">
            <text:p>0,00221099537037037000</text:p>
          </table:table-cell>
          <table:table-cell table:formula="of:=[.D2731]-[.D273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table:formula="of:=[.B2730]+7" office:value-type="float" office:value="19110" calcext:value-type="float">
            <text:p>19110</text:p>
          </table:table-cell>
          <table:table-cell office:value-type="float" office:value="8640000" calcext:value-type="float">
            <text:p>8640000</text:p>
          </table:table-cell>
          <table:table-cell table:formula="of:=[.B2731]/[.C2731]" office:value-type="float" office:value="0.00221180555555556" calcext:value-type="float">
            <text:p>0,00221180555555556000</text:p>
          </table:table-cell>
          <table:table-cell table:formula="of:=[.D2732]-[.D273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table:formula="of:=[.B2731]+7" office:value-type="float" office:value="19117" calcext:value-type="float">
            <text:p>19117</text:p>
          </table:table-cell>
          <table:table-cell office:value-type="float" office:value="8640000" calcext:value-type="float">
            <text:p>8640000</text:p>
          </table:table-cell>
          <table:table-cell table:formula="of:=[.B2732]/[.C2732]" office:value-type="float" office:value="0.00221261574074074" calcext:value-type="float">
            <text:p>0,00221261574074074000</text:p>
          </table:table-cell>
          <table:table-cell table:formula="of:=[.D2733]-[.D273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table:formula="of:=[.B2732]+7" office:value-type="float" office:value="19124" calcext:value-type="float">
            <text:p>19124</text:p>
          </table:table-cell>
          <table:table-cell office:value-type="float" office:value="8640000" calcext:value-type="float">
            <text:p>8640000</text:p>
          </table:table-cell>
          <table:table-cell table:formula="of:=[.B2733]/[.C2733]" office:value-type="float" office:value="0.00221342592592593" calcext:value-type="float">
            <text:p>0,00221342592592593000</text:p>
          </table:table-cell>
          <table:table-cell table:formula="of:=[.D2734]-[.D273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table:formula="of:=[.B2733]+7" office:value-type="float" office:value="19131" calcext:value-type="float">
            <text:p>19131</text:p>
          </table:table-cell>
          <table:table-cell office:value-type="float" office:value="8640000" calcext:value-type="float">
            <text:p>8640000</text:p>
          </table:table-cell>
          <table:table-cell table:formula="of:=[.B2734]/[.C2734]" office:value-type="float" office:value="0.00221423611111111" calcext:value-type="float">
            <text:p>0,00221423611111111000</text:p>
          </table:table-cell>
          <table:table-cell table:formula="of:=[.D2735]-[.D273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table:formula="of:=[.B2734]+7" office:value-type="float" office:value="19138" calcext:value-type="float">
            <text:p>19138</text:p>
          </table:table-cell>
          <table:table-cell office:value-type="float" office:value="8640000" calcext:value-type="float">
            <text:p>8640000</text:p>
          </table:table-cell>
          <table:table-cell table:formula="of:=[.B2735]/[.C2735]" office:value-type="float" office:value="0.0022150462962963" calcext:value-type="float">
            <text:p>0,00221504629629630000</text:p>
          </table:table-cell>
          <table:table-cell table:formula="of:=[.D2736]-[.D273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table:formula="of:=[.B2735]+7" office:value-type="float" office:value="19145" calcext:value-type="float">
            <text:p>19145</text:p>
          </table:table-cell>
          <table:table-cell office:value-type="float" office:value="8640000" calcext:value-type="float">
            <text:p>8640000</text:p>
          </table:table-cell>
          <table:table-cell table:formula="of:=[.B2736]/[.C2736]" office:value-type="float" office:value="0.00221585648148148" calcext:value-type="float">
            <text:p>0,00221585648148148000</text:p>
          </table:table-cell>
          <table:table-cell table:formula="of:=[.D2737]-[.D273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table:formula="of:=[.B2736]+7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2737]/[.C2737]" office:value-type="float" office:value="0.00221666666666667" calcext:value-type="float">
            <text:p>0,00221666666666667000</text:p>
          </table:table-cell>
          <table:table-cell table:formula="of:=[.D2738]-[.D273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table:formula="of:=[.B2737]+7" office:value-type="float" office:value="19159" calcext:value-type="float">
            <text:p>19159</text:p>
          </table:table-cell>
          <table:table-cell office:value-type="float" office:value="8640000" calcext:value-type="float">
            <text:p>8640000</text:p>
          </table:table-cell>
          <table:table-cell table:formula="of:=[.B2738]/[.C2738]" office:value-type="float" office:value="0.00221747685185185" calcext:value-type="float">
            <text:p>0,00221747685185185000</text:p>
          </table:table-cell>
          <table:table-cell table:formula="of:=[.D2739]-[.D273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[.B2738]+7" office:value-type="float" office:value="19166" calcext:value-type="float">
            <text:p>19166</text:p>
          </table:table-cell>
          <table:table-cell office:value-type="float" office:value="8640000" calcext:value-type="float">
            <text:p>8640000</text:p>
          </table:table-cell>
          <table:table-cell table:formula="of:=[.B2739]/[.C2739]" office:value-type="float" office:value="0.00221828703703704" calcext:value-type="float">
            <text:p>0,00221828703703704000</text:p>
          </table:table-cell>
          <table:table-cell table:formula="of:=[.D2740]-[.D273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[.B2739]+7" office:value-type="float" office:value="19173" calcext:value-type="float">
            <text:p>19173</text:p>
          </table:table-cell>
          <table:table-cell office:value-type="float" office:value="8640000" calcext:value-type="float">
            <text:p>8640000</text:p>
          </table:table-cell>
          <table:table-cell table:formula="of:=[.B2740]/[.C2740]" office:value-type="float" office:value="0.00221909722222222" calcext:value-type="float">
            <text:p>0,00221909722222222000</text:p>
          </table:table-cell>
          <table:table-cell table:formula="of:=[.D2741]-[.D274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[.B2740]+7" office:value-type="float" office:value="19180" calcext:value-type="float">
            <text:p>19180</text:p>
          </table:table-cell>
          <table:table-cell office:value-type="float" office:value="8640000" calcext:value-type="float">
            <text:p>8640000</text:p>
          </table:table-cell>
          <table:table-cell table:formula="of:=[.B2741]/[.C2741]" office:value-type="float" office:value="0.00221990740740741" calcext:value-type="float">
            <text:p>0,00221990740740741000</text:p>
          </table:table-cell>
          <table:table-cell table:formula="of:=[.D2742]-[.D274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formula="of:=[.B2741]+7" office:value-type="float" office:value="19187" calcext:value-type="float">
            <text:p>19187</text:p>
          </table:table-cell>
          <table:table-cell office:value-type="float" office:value="8640000" calcext:value-type="float">
            <text:p>8640000</text:p>
          </table:table-cell>
          <table:table-cell table:formula="of:=[.B2742]/[.C2742]" office:value-type="float" office:value="0.00222071759259259" calcext:value-type="float">
            <text:p>0,00222071759259259000</text:p>
          </table:table-cell>
          <table:table-cell table:formula="of:=[.D2743]-[.D274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table:formula="of:=[.B2742]+7" office:value-type="float" office:value="19194" calcext:value-type="float">
            <text:p>19194</text:p>
          </table:table-cell>
          <table:table-cell office:value-type="float" office:value="8640000" calcext:value-type="float">
            <text:p>8640000</text:p>
          </table:table-cell>
          <table:table-cell table:formula="of:=[.B2743]/[.C2743]" office:value-type="float" office:value="0.00222152777777778" calcext:value-type="float">
            <text:p>0,00222152777777778000</text:p>
          </table:table-cell>
          <table:table-cell table:formula="of:=[.D2744]-[.D274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table:formula="of:=[.B2743]+7" office:value-type="float" office:value="19201" calcext:value-type="float">
            <text:p>19201</text:p>
          </table:table-cell>
          <table:table-cell office:value-type="float" office:value="8640000" calcext:value-type="float">
            <text:p>8640000</text:p>
          </table:table-cell>
          <table:table-cell table:formula="of:=[.B2744]/[.C2744]" office:value-type="float" office:value="0.00222233796296296" calcext:value-type="float">
            <text:p>0,00222233796296296000</text:p>
          </table:table-cell>
          <table:table-cell table:formula="of:=[.D2745]-[.D274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table:formula="of:=[.B2744]+7" office:value-type="float" office:value="19208" calcext:value-type="float">
            <text:p>19208</text:p>
          </table:table-cell>
          <table:table-cell office:value-type="float" office:value="8640000" calcext:value-type="float">
            <text:p>8640000</text:p>
          </table:table-cell>
          <table:table-cell table:formula="of:=[.B2745]/[.C2745]" office:value-type="float" office:value="0.00222314814814815" calcext:value-type="float">
            <text:p>0,00222314814814815000</text:p>
          </table:table-cell>
          <table:table-cell table:formula="of:=[.D2746]-[.D274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[.B2745]+7" office:value-type="float" office:value="19215" calcext:value-type="float">
            <text:p>19215</text:p>
          </table:table-cell>
          <table:table-cell office:value-type="float" office:value="8640000" calcext:value-type="float">
            <text:p>8640000</text:p>
          </table:table-cell>
          <table:table-cell table:formula="of:=[.B2746]/[.C2746]" office:value-type="float" office:value="0.00222395833333333" calcext:value-type="float">
            <text:p>0,00222395833333333000</text:p>
          </table:table-cell>
          <table:table-cell table:formula="of:=[.D2747]-[.D274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[.B2746]+7" office:value-type="float" office:value="19222" calcext:value-type="float">
            <text:p>19222</text:p>
          </table:table-cell>
          <table:table-cell office:value-type="float" office:value="8640000" calcext:value-type="float">
            <text:p>8640000</text:p>
          </table:table-cell>
          <table:table-cell table:formula="of:=[.B2747]/[.C2747]" office:value-type="float" office:value="0.00222476851851852" calcext:value-type="float">
            <text:p>0,00222476851851852000</text:p>
          </table:table-cell>
          <table:table-cell table:formula="of:=[.D2748]-[.D274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table:formula="of:=[.B2747]+7" office:value-type="float" office:value="19229" calcext:value-type="float">
            <text:p>19229</text:p>
          </table:table-cell>
          <table:table-cell office:value-type="float" office:value="8640000" calcext:value-type="float">
            <text:p>8640000</text:p>
          </table:table-cell>
          <table:table-cell table:formula="of:=[.B2748]/[.C2748]" office:value-type="float" office:value="0.0022255787037037" calcext:value-type="float">
            <text:p>0,00222557870370370000</text:p>
          </table:table-cell>
          <table:table-cell table:formula="of:=[.D2749]-[.D274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table:formula="of:=[.B2748]+7" office:value-type="float" office:value="19236" calcext:value-type="float">
            <text:p>19236</text:p>
          </table:table-cell>
          <table:table-cell office:value-type="float" office:value="8640000" calcext:value-type="float">
            <text:p>8640000</text:p>
          </table:table-cell>
          <table:table-cell table:formula="of:=[.B2749]/[.C2749]" office:value-type="float" office:value="0.00222638888888889" calcext:value-type="float">
            <text:p>0,00222638888888889000</text:p>
          </table:table-cell>
          <table:table-cell table:formula="of:=[.D2750]-[.D274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table:formula="of:=[.B2749]+7" office:value-type="float" office:value="19243" calcext:value-type="float">
            <text:p>19243</text:p>
          </table:table-cell>
          <table:table-cell office:value-type="float" office:value="8640000" calcext:value-type="float">
            <text:p>8640000</text:p>
          </table:table-cell>
          <table:table-cell table:formula="of:=[.B2750]/[.C2750]" office:value-type="float" office:value="0.00222719907407407" calcext:value-type="float">
            <text:p>0,00222719907407407000</text:p>
          </table:table-cell>
          <table:table-cell table:formula="of:=[.D2751]-[.D275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[.B2750]+7" office:value-type="float" office:value="19250" calcext:value-type="float">
            <text:p>19250</text:p>
          </table:table-cell>
          <table:table-cell office:value-type="float" office:value="8640000" calcext:value-type="float">
            <text:p>8640000</text:p>
          </table:table-cell>
          <table:table-cell table:formula="of:=[.B2751]/[.C2751]" office:value-type="float" office:value="0.00222800925925926" calcext:value-type="float">
            <text:p>0,00222800925925926000</text:p>
          </table:table-cell>
          <table:table-cell table:formula="of:=[.D2752]-[.D275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table:formula="of:=[.B2751]+7" office:value-type="float" office:value="19257" calcext:value-type="float">
            <text:p>19257</text:p>
          </table:table-cell>
          <table:table-cell office:value-type="float" office:value="8640000" calcext:value-type="float">
            <text:p>8640000</text:p>
          </table:table-cell>
          <table:table-cell table:formula="of:=[.B2752]/[.C2752]" office:value-type="float" office:value="0.00222881944444444" calcext:value-type="float">
            <text:p>0,00222881944444444000</text:p>
          </table:table-cell>
          <table:table-cell table:formula="of:=[.D2753]-[.D275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table:formula="of:=[.B2752]+7" office:value-type="float" office:value="19264" calcext:value-type="float">
            <text:p>19264</text:p>
          </table:table-cell>
          <table:table-cell office:value-type="float" office:value="8640000" calcext:value-type="float">
            <text:p>8640000</text:p>
          </table:table-cell>
          <table:table-cell table:formula="of:=[.B2753]/[.C2753]" office:value-type="float" office:value="0.00222962962962963" calcext:value-type="float">
            <text:p>0,00222962962962963000</text:p>
          </table:table-cell>
          <table:table-cell table:formula="of:=[.D2754]-[.D275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table:formula="of:=[.B2753]+7" office:value-type="float" office:value="19271" calcext:value-type="float">
            <text:p>19271</text:p>
          </table:table-cell>
          <table:table-cell office:value-type="float" office:value="8640000" calcext:value-type="float">
            <text:p>8640000</text:p>
          </table:table-cell>
          <table:table-cell table:formula="of:=[.B2754]/[.C2754]" office:value-type="float" office:value="0.00223043981481482" calcext:value-type="float">
            <text:p>0,00223043981481482000</text:p>
          </table:table-cell>
          <table:table-cell table:formula="of:=[.D2755]-[.D275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table:formula="of:=[.B2754]+7" office:value-type="float" office:value="19278" calcext:value-type="float">
            <text:p>19278</text:p>
          </table:table-cell>
          <table:table-cell office:value-type="float" office:value="8640000" calcext:value-type="float">
            <text:p>8640000</text:p>
          </table:table-cell>
          <table:table-cell table:formula="of:=[.B2755]/[.C2755]" office:value-type="float" office:value="0.00223125" calcext:value-type="float">
            <text:p>0,00223125000000000000</text:p>
          </table:table-cell>
          <table:table-cell table:formula="of:=[.D2756]-[.D275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table:formula="of:=[.B2755]+7" office:value-type="float" office:value="19285" calcext:value-type="float">
            <text:p>19285</text:p>
          </table:table-cell>
          <table:table-cell office:value-type="float" office:value="8640000" calcext:value-type="float">
            <text:p>8640000</text:p>
          </table:table-cell>
          <table:table-cell table:formula="of:=[.B2756]/[.C2756]" office:value-type="float" office:value="0.00223206018518519" calcext:value-type="float">
            <text:p>0,00223206018518519000</text:p>
          </table:table-cell>
          <table:table-cell table:formula="of:=[.D2757]-[.D275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table:formula="of:=[.B2756]+7" office:value-type="float" office:value="19292" calcext:value-type="float">
            <text:p>19292</text:p>
          </table:table-cell>
          <table:table-cell office:value-type="float" office:value="8640000" calcext:value-type="float">
            <text:p>8640000</text:p>
          </table:table-cell>
          <table:table-cell table:formula="of:=[.B2757]/[.C2757]" office:value-type="float" office:value="0.00223287037037037" calcext:value-type="float">
            <text:p>0,00223287037037037000</text:p>
          </table:table-cell>
          <table:table-cell table:formula="of:=[.D2758]-[.D275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table:formula="of:=[.B2757]+7" office:value-type="float" office:value="19299" calcext:value-type="float">
            <text:p>19299</text:p>
          </table:table-cell>
          <table:table-cell office:value-type="float" office:value="8640000" calcext:value-type="float">
            <text:p>8640000</text:p>
          </table:table-cell>
          <table:table-cell table:formula="of:=[.B2758]/[.C2758]" office:value-type="float" office:value="0.00223368055555556" calcext:value-type="float">
            <text:p>0,00223368055555556000</text:p>
          </table:table-cell>
          <table:table-cell table:formula="of:=[.D2759]-[.D275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table:formula="of:=[.B2758]+7" office:value-type="float" office:value="19306" calcext:value-type="float">
            <text:p>19306</text:p>
          </table:table-cell>
          <table:table-cell office:value-type="float" office:value="8640000" calcext:value-type="float">
            <text:p>8640000</text:p>
          </table:table-cell>
          <table:table-cell table:formula="of:=[.B2759]/[.C2759]" office:value-type="float" office:value="0.00223449074074074" calcext:value-type="float">
            <text:p>0,00223449074074074000</text:p>
          </table:table-cell>
          <table:table-cell table:formula="of:=[.D2760]-[.D275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table:formula="of:=[.B2759]+7" office:value-type="float" office:value="19313" calcext:value-type="float">
            <text:p>19313</text:p>
          </table:table-cell>
          <table:table-cell office:value-type="float" office:value="8640000" calcext:value-type="float">
            <text:p>8640000</text:p>
          </table:table-cell>
          <table:table-cell table:formula="of:=[.B2760]/[.C2760]" office:value-type="float" office:value="0.00223530092592593" calcext:value-type="float">
            <text:p>0,00223530092592593000</text:p>
          </table:table-cell>
          <table:table-cell table:formula="of:=[.D2761]-[.D276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table:formula="of:=[.B2760]+7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2761]/[.C2761]" office:value-type="float" office:value="0.00223611111111111" calcext:value-type="float">
            <text:p>0,00223611111111111000</text:p>
          </table:table-cell>
          <table:table-cell table:formula="of:=[.D2762]-[.D276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table:formula="of:=[.B2761]+7" office:value-type="float" office:value="19327" calcext:value-type="float">
            <text:p>19327</text:p>
          </table:table-cell>
          <table:table-cell office:value-type="float" office:value="8640000" calcext:value-type="float">
            <text:p>8640000</text:p>
          </table:table-cell>
          <table:table-cell table:formula="of:=[.B2762]/[.C2762]" office:value-type="float" office:value="0.0022369212962963" calcext:value-type="float">
            <text:p>0,00223692129629630000</text:p>
          </table:table-cell>
          <table:table-cell table:formula="of:=[.D2763]-[.D276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[.B2762]+7" office:value-type="float" office:value="19334" calcext:value-type="float">
            <text:p>19334</text:p>
          </table:table-cell>
          <table:table-cell office:value-type="float" office:value="8640000" calcext:value-type="float">
            <text:p>8640000</text:p>
          </table:table-cell>
          <table:table-cell table:formula="of:=[.B2763]/[.C2763]" office:value-type="float" office:value="0.00223773148148148" calcext:value-type="float">
            <text:p>0,00223773148148148000</text:p>
          </table:table-cell>
          <table:table-cell table:formula="of:=[.D2764]-[.D276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table:formula="of:=[.B2763]+7" office:value-type="float" office:value="19341" calcext:value-type="float">
            <text:p>19341</text:p>
          </table:table-cell>
          <table:table-cell office:value-type="float" office:value="8640000" calcext:value-type="float">
            <text:p>8640000</text:p>
          </table:table-cell>
          <table:table-cell table:formula="of:=[.B2764]/[.C2764]" office:value-type="float" office:value="0.00223854166666667" calcext:value-type="float">
            <text:p>0,00223854166666667000</text:p>
          </table:table-cell>
          <table:table-cell table:formula="of:=[.D2765]-[.D276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table:formula="of:=[.B2764]+7" office:value-type="float" office:value="19348" calcext:value-type="float">
            <text:p>19348</text:p>
          </table:table-cell>
          <table:table-cell office:value-type="float" office:value="8640000" calcext:value-type="float">
            <text:p>8640000</text:p>
          </table:table-cell>
          <table:table-cell table:formula="of:=[.B2765]/[.C2765]" office:value-type="float" office:value="0.00223935185185185" calcext:value-type="float">
            <text:p>0,00223935185185185000</text:p>
          </table:table-cell>
          <table:table-cell table:formula="of:=[.D2766]-[.D276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[.B2765]+7" office:value-type="float" office:value="19355" calcext:value-type="float">
            <text:p>19355</text:p>
          </table:table-cell>
          <table:table-cell office:value-type="float" office:value="8640000" calcext:value-type="float">
            <text:p>8640000</text:p>
          </table:table-cell>
          <table:table-cell table:formula="of:=[.B2766]/[.C2766]" office:value-type="float" office:value="0.00224016203703704" calcext:value-type="float">
            <text:p>0,00224016203703704000</text:p>
          </table:table-cell>
          <table:table-cell table:formula="of:=[.D2767]-[.D276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table:formula="of:=[.B2766]+7" office:value-type="float" office:value="19362" calcext:value-type="float">
            <text:p>19362</text:p>
          </table:table-cell>
          <table:table-cell office:value-type="float" office:value="8640000" calcext:value-type="float">
            <text:p>8640000</text:p>
          </table:table-cell>
          <table:table-cell table:formula="of:=[.B2767]/[.C2767]" office:value-type="float" office:value="0.00224097222222222" calcext:value-type="float">
            <text:p>0,00224097222222222000</text:p>
          </table:table-cell>
          <table:table-cell table:formula="of:=[.D2768]-[.D276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table:formula="of:=[.B2767]+7" office:value-type="float" office:value="19369" calcext:value-type="float">
            <text:p>19369</text:p>
          </table:table-cell>
          <table:table-cell office:value-type="float" office:value="8640000" calcext:value-type="float">
            <text:p>8640000</text:p>
          </table:table-cell>
          <table:table-cell table:formula="of:=[.B2768]/[.C2768]" office:value-type="float" office:value="0.00224178240740741" calcext:value-type="float">
            <text:p>0,00224178240740741000</text:p>
          </table:table-cell>
          <table:table-cell table:formula="of:=[.D2769]-[.D276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table:formula="of:=[.B2768]+7" office:value-type="float" office:value="19376" calcext:value-type="float">
            <text:p>19376</text:p>
          </table:table-cell>
          <table:table-cell office:value-type="float" office:value="8640000" calcext:value-type="float">
            <text:p>8640000</text:p>
          </table:table-cell>
          <table:table-cell table:formula="of:=[.B2769]/[.C2769]" office:value-type="float" office:value="0.00224259259259259" calcext:value-type="float">
            <text:p>0,00224259259259259000</text:p>
          </table:table-cell>
          <table:table-cell table:formula="of:=[.D2770]-[.D276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table:formula="of:=[.B2769]+7" office:value-type="float" office:value="19383" calcext:value-type="float">
            <text:p>19383</text:p>
          </table:table-cell>
          <table:table-cell office:value-type="float" office:value="8640000" calcext:value-type="float">
            <text:p>8640000</text:p>
          </table:table-cell>
          <table:table-cell table:formula="of:=[.B2770]/[.C2770]" office:value-type="float" office:value="0.00224340277777778" calcext:value-type="float">
            <text:p>0,00224340277777778000</text:p>
          </table:table-cell>
          <table:table-cell table:formula="of:=[.D2771]-[.D277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table:formula="of:=[.B2770]+7" office:value-type="float" office:value="19390" calcext:value-type="float">
            <text:p>19390</text:p>
          </table:table-cell>
          <table:table-cell office:value-type="float" office:value="8640000" calcext:value-type="float">
            <text:p>8640000</text:p>
          </table:table-cell>
          <table:table-cell table:formula="of:=[.B2771]/[.C2771]" office:value-type="float" office:value="0.00224421296296296" calcext:value-type="float">
            <text:p>0,00224421296296296000</text:p>
          </table:table-cell>
          <table:table-cell table:formula="of:=[.D2772]-[.D277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table:formula="of:=[.B2771]+7" office:value-type="float" office:value="19397" calcext:value-type="float">
            <text:p>19397</text:p>
          </table:table-cell>
          <table:table-cell office:value-type="float" office:value="8640000" calcext:value-type="float">
            <text:p>8640000</text:p>
          </table:table-cell>
          <table:table-cell table:formula="of:=[.B2772]/[.C2772]" office:value-type="float" office:value="0.00224502314814815" calcext:value-type="float">
            <text:p>0,00224502314814815000</text:p>
          </table:table-cell>
          <table:table-cell table:formula="of:=[.D2773]-[.D277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table:formula="of:=[.B2772]+7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2773]/[.C2773]" office:value-type="float" office:value="0.00224583333333333" calcext:value-type="float">
            <text:p>0,00224583333333333000</text:p>
          </table:table-cell>
          <table:table-cell table:formula="of:=[.D2774]-[.D277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table:formula="of:=[.B2773]+7" office:value-type="float" office:value="19411" calcext:value-type="float">
            <text:p>19411</text:p>
          </table:table-cell>
          <table:table-cell office:value-type="float" office:value="8640000" calcext:value-type="float">
            <text:p>8640000</text:p>
          </table:table-cell>
          <table:table-cell table:formula="of:=[.B2774]/[.C2774]" office:value-type="float" office:value="0.00224664351851852" calcext:value-type="float">
            <text:p>0,00224664351851852000</text:p>
          </table:table-cell>
          <table:table-cell table:formula="of:=[.D2775]-[.D277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table:formula="of:=[.B2774]+7" office:value-type="float" office:value="19418" calcext:value-type="float">
            <text:p>19418</text:p>
          </table:table-cell>
          <table:table-cell office:value-type="float" office:value="8640000" calcext:value-type="float">
            <text:p>8640000</text:p>
          </table:table-cell>
          <table:table-cell table:formula="of:=[.B2775]/[.C2775]" office:value-type="float" office:value="0.0022474537037037" calcext:value-type="float">
            <text:p>0,00224745370370370000</text:p>
          </table:table-cell>
          <table:table-cell table:formula="of:=[.D2776]-[.D277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table:formula="of:=[.B2775]+7" office:value-type="float" office:value="19425" calcext:value-type="float">
            <text:p>19425</text:p>
          </table:table-cell>
          <table:table-cell office:value-type="float" office:value="8640000" calcext:value-type="float">
            <text:p>8640000</text:p>
          </table:table-cell>
          <table:table-cell table:formula="of:=[.B2776]/[.C2776]" office:value-type="float" office:value="0.00224826388888889" calcext:value-type="float">
            <text:p>0,00224826388888889000</text:p>
          </table:table-cell>
          <table:table-cell table:formula="of:=[.D2777]-[.D277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table:formula="of:=[.B2776]+7" office:value-type="float" office:value="19432" calcext:value-type="float">
            <text:p>19432</text:p>
          </table:table-cell>
          <table:table-cell office:value-type="float" office:value="8640000" calcext:value-type="float">
            <text:p>8640000</text:p>
          </table:table-cell>
          <table:table-cell table:formula="of:=[.B2777]/[.C2777]" office:value-type="float" office:value="0.00224907407407407" calcext:value-type="float">
            <text:p>0,00224907407407407000</text:p>
          </table:table-cell>
          <table:table-cell table:formula="of:=[.D2778]-[.D277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table:formula="of:=[.B2777]+7" office:value-type="float" office:value="19439" calcext:value-type="float">
            <text:p>19439</text:p>
          </table:table-cell>
          <table:table-cell office:value-type="float" office:value="8640000" calcext:value-type="float">
            <text:p>8640000</text:p>
          </table:table-cell>
          <table:table-cell table:formula="of:=[.B2778]/[.C2778]" office:value-type="float" office:value="0.00224988425925926" calcext:value-type="float">
            <text:p>0,00224988425925926000</text:p>
          </table:table-cell>
          <table:table-cell table:formula="of:=[.D2779]-[.D277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[.B2778]+7" office:value-type="float" office:value="19446" calcext:value-type="float">
            <text:p>19446</text:p>
          </table:table-cell>
          <table:table-cell office:value-type="float" office:value="8640000" calcext:value-type="float">
            <text:p>8640000</text:p>
          </table:table-cell>
          <table:table-cell table:formula="of:=[.B2779]/[.C2779]" office:value-type="float" office:value="0.00225069444444444" calcext:value-type="float">
            <text:p>0,00225069444444444000</text:p>
          </table:table-cell>
          <table:table-cell table:formula="of:=[.D2780]-[.D277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table:formula="of:=[.B2779]+7" office:value-type="float" office:value="19453" calcext:value-type="float">
            <text:p>19453</text:p>
          </table:table-cell>
          <table:table-cell office:value-type="float" office:value="8640000" calcext:value-type="float">
            <text:p>8640000</text:p>
          </table:table-cell>
          <table:table-cell table:formula="of:=[.B2780]/[.C2780]" office:value-type="float" office:value="0.00225150462962963" calcext:value-type="float">
            <text:p>0,00225150462962963000</text:p>
          </table:table-cell>
          <table:table-cell table:formula="of:=[.D2781]-[.D278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[.B2780]+7" office:value-type="float" office:value="19460" calcext:value-type="float">
            <text:p>19460</text:p>
          </table:table-cell>
          <table:table-cell office:value-type="float" office:value="8640000" calcext:value-type="float">
            <text:p>8640000</text:p>
          </table:table-cell>
          <table:table-cell table:formula="of:=[.B2781]/[.C2781]" office:value-type="float" office:value="0.00225231481481481" calcext:value-type="float">
            <text:p>0,00225231481481481000</text:p>
          </table:table-cell>
          <table:table-cell table:formula="of:=[.D2782]-[.D278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table:formula="of:=[.B2781]+7" office:value-type="float" office:value="19467" calcext:value-type="float">
            <text:p>19467</text:p>
          </table:table-cell>
          <table:table-cell office:value-type="float" office:value="8640000" calcext:value-type="float">
            <text:p>8640000</text:p>
          </table:table-cell>
          <table:table-cell table:formula="of:=[.B2782]/[.C2782]" office:value-type="float" office:value="0.002253125" calcext:value-type="float">
            <text:p>0,00225312500000000000</text:p>
          </table:table-cell>
          <table:table-cell table:formula="of:=[.D2783]-[.D278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table:formula="of:=[.B2782]+7" office:value-type="float" office:value="19474" calcext:value-type="float">
            <text:p>19474</text:p>
          </table:table-cell>
          <table:table-cell office:value-type="float" office:value="8640000" calcext:value-type="float">
            <text:p>8640000</text:p>
          </table:table-cell>
          <table:table-cell table:formula="of:=[.B2783]/[.C2783]" office:value-type="float" office:value="0.00225393518518519" calcext:value-type="float">
            <text:p>0,00225393518518519000</text:p>
          </table:table-cell>
          <table:table-cell table:formula="of:=[.D2784]-[.D278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table:formula="of:=[.B2783]+7" office:value-type="float" office:value="19481" calcext:value-type="float">
            <text:p>19481</text:p>
          </table:table-cell>
          <table:table-cell office:value-type="float" office:value="8640000" calcext:value-type="float">
            <text:p>8640000</text:p>
          </table:table-cell>
          <table:table-cell table:formula="of:=[.B2784]/[.C2784]" office:value-type="float" office:value="0.00225474537037037" calcext:value-type="float">
            <text:p>0,00225474537037037000</text:p>
          </table:table-cell>
          <table:table-cell table:formula="of:=[.D2785]-[.D278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table:formula="of:=[.B2784]+7" office:value-type="float" office:value="19488" calcext:value-type="float">
            <text:p>19488</text:p>
          </table:table-cell>
          <table:table-cell office:value-type="float" office:value="8640000" calcext:value-type="float">
            <text:p>8640000</text:p>
          </table:table-cell>
          <table:table-cell table:formula="of:=[.B2785]/[.C2785]" office:value-type="float" office:value="0.00225555555555556" calcext:value-type="float">
            <text:p>0,00225555555555556000</text:p>
          </table:table-cell>
          <table:table-cell table:formula="of:=[.D2786]-[.D278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table:formula="of:=[.B2785]+7" office:value-type="float" office:value="19495" calcext:value-type="float">
            <text:p>19495</text:p>
          </table:table-cell>
          <table:table-cell office:value-type="float" office:value="8640000" calcext:value-type="float">
            <text:p>8640000</text:p>
          </table:table-cell>
          <table:table-cell table:formula="of:=[.B2786]/[.C2786]" office:value-type="float" office:value="0.00225636574074074" calcext:value-type="float">
            <text:p>0,00225636574074074000</text:p>
          </table:table-cell>
          <table:table-cell table:formula="of:=[.D2787]-[.D278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table:formula="of:=[.B2786]+7" office:value-type="float" office:value="19502" calcext:value-type="float">
            <text:p>19502</text:p>
          </table:table-cell>
          <table:table-cell office:value-type="float" office:value="8640000" calcext:value-type="float">
            <text:p>8640000</text:p>
          </table:table-cell>
          <table:table-cell table:formula="of:=[.B2787]/[.C2787]" office:value-type="float" office:value="0.00225717592592593" calcext:value-type="float">
            <text:p>0,00225717592592593000</text:p>
          </table:table-cell>
          <table:table-cell table:formula="of:=[.D2788]-[.D278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table:formula="of:=[.B2787]+7" office:value-type="float" office:value="19509" calcext:value-type="float">
            <text:p>19509</text:p>
          </table:table-cell>
          <table:table-cell office:value-type="float" office:value="8640000" calcext:value-type="float">
            <text:p>8640000</text:p>
          </table:table-cell>
          <table:table-cell table:formula="of:=[.B2788]/[.C2788]" office:value-type="float" office:value="0.00225798611111111" calcext:value-type="float">
            <text:p>0,00225798611111111000</text:p>
          </table:table-cell>
          <table:table-cell table:formula="of:=[.D2789]-[.D278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table:formula="of:=[.B2788]+7" office:value-type="float" office:value="19516" calcext:value-type="float">
            <text:p>19516</text:p>
          </table:table-cell>
          <table:table-cell office:value-type="float" office:value="8640000" calcext:value-type="float">
            <text:p>8640000</text:p>
          </table:table-cell>
          <table:table-cell table:formula="of:=[.B2789]/[.C2789]" office:value-type="float" office:value="0.0022587962962963" calcext:value-type="float">
            <text:p>0,00225879629629630000</text:p>
          </table:table-cell>
          <table:table-cell table:formula="of:=[.D2790]-[.D278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[.B2789]+7" office:value-type="float" office:value="19523" calcext:value-type="float">
            <text:p>19523</text:p>
          </table:table-cell>
          <table:table-cell office:value-type="float" office:value="8640000" calcext:value-type="float">
            <text:p>8640000</text:p>
          </table:table-cell>
          <table:table-cell table:formula="of:=[.B2790]/[.C2790]" office:value-type="float" office:value="0.00225960648148148" calcext:value-type="float">
            <text:p>0,00225960648148148000</text:p>
          </table:table-cell>
          <table:table-cell table:formula="of:=[.D2791]-[.D279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table:formula="of:=[.B2790]+7" office:value-type="float" office:value="19530" calcext:value-type="float">
            <text:p>19530</text:p>
          </table:table-cell>
          <table:table-cell office:value-type="float" office:value="8640000" calcext:value-type="float">
            <text:p>8640000</text:p>
          </table:table-cell>
          <table:table-cell table:formula="of:=[.B2791]/[.C2791]" office:value-type="float" office:value="0.00226041666666667" calcext:value-type="float">
            <text:p>0,00226041666666667000</text:p>
          </table:table-cell>
          <table:table-cell table:formula="of:=[.D2792]-[.D279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table:formula="of:=[.B2791]+7" office:value-type="float" office:value="19537" calcext:value-type="float">
            <text:p>19537</text:p>
          </table:table-cell>
          <table:table-cell office:value-type="float" office:value="8640000" calcext:value-type="float">
            <text:p>8640000</text:p>
          </table:table-cell>
          <table:table-cell table:formula="of:=[.B2792]/[.C2792]" office:value-type="float" office:value="0.00226122685185185" calcext:value-type="float">
            <text:p>0,00226122685185185000</text:p>
          </table:table-cell>
          <table:table-cell table:formula="of:=[.D2793]-[.D279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table:formula="of:=[.B2792]+7" office:value-type="float" office:value="19544" calcext:value-type="float">
            <text:p>19544</text:p>
          </table:table-cell>
          <table:table-cell office:value-type="float" office:value="8640000" calcext:value-type="float">
            <text:p>8640000</text:p>
          </table:table-cell>
          <table:table-cell table:formula="of:=[.B2793]/[.C2793]" office:value-type="float" office:value="0.00226203703703704" calcext:value-type="float">
            <text:p>0,00226203703703704000</text:p>
          </table:table-cell>
          <table:table-cell table:formula="of:=[.D2794]-[.D279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table:formula="of:=[.B2793]+7" office:value-type="float" office:value="19551" calcext:value-type="float">
            <text:p>19551</text:p>
          </table:table-cell>
          <table:table-cell office:value-type="float" office:value="8640000" calcext:value-type="float">
            <text:p>8640000</text:p>
          </table:table-cell>
          <table:table-cell table:formula="of:=[.B2794]/[.C2794]" office:value-type="float" office:value="0.00226284722222222" calcext:value-type="float">
            <text:p>0,00226284722222222000</text:p>
          </table:table-cell>
          <table:table-cell table:formula="of:=[.D2795]-[.D279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table:formula="of:=[.B2794]+7" office:value-type="float" office:value="19558" calcext:value-type="float">
            <text:p>19558</text:p>
          </table:table-cell>
          <table:table-cell office:value-type="float" office:value="8640000" calcext:value-type="float">
            <text:p>8640000</text:p>
          </table:table-cell>
          <table:table-cell table:formula="of:=[.B2795]/[.C2795]" office:value-type="float" office:value="0.00226365740740741" calcext:value-type="float">
            <text:p>0,00226365740740741000</text:p>
          </table:table-cell>
          <table:table-cell table:formula="of:=[.D2796]-[.D279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formula="of:=[.B2795]+7" office:value-type="float" office:value="19565" calcext:value-type="float">
            <text:p>19565</text:p>
          </table:table-cell>
          <table:table-cell office:value-type="float" office:value="8640000" calcext:value-type="float">
            <text:p>8640000</text:p>
          </table:table-cell>
          <table:table-cell table:formula="of:=[.B2796]/[.C2796]" office:value-type="float" office:value="0.00226446759259259" calcext:value-type="float">
            <text:p>0,00226446759259259000</text:p>
          </table:table-cell>
          <table:table-cell table:formula="of:=[.D2797]-[.D279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table:formula="of:=[.B2796]+7" office:value-type="float" office:value="19572" calcext:value-type="float">
            <text:p>19572</text:p>
          </table:table-cell>
          <table:table-cell office:value-type="float" office:value="8640000" calcext:value-type="float">
            <text:p>8640000</text:p>
          </table:table-cell>
          <table:table-cell table:formula="of:=[.B2797]/[.C2797]" office:value-type="float" office:value="0.00226527777777778" calcext:value-type="float">
            <text:p>0,00226527777777778000</text:p>
          </table:table-cell>
          <table:table-cell table:formula="of:=[.D2798]-[.D279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table:formula="of:=[.B2797]+7" office:value-type="float" office:value="19579" calcext:value-type="float">
            <text:p>19579</text:p>
          </table:table-cell>
          <table:table-cell office:value-type="float" office:value="8640000" calcext:value-type="float">
            <text:p>8640000</text:p>
          </table:table-cell>
          <table:table-cell table:formula="of:=[.B2798]/[.C2798]" office:value-type="float" office:value="0.00226608796296296" calcext:value-type="float">
            <text:p>0,00226608796296296000</text:p>
          </table:table-cell>
          <table:table-cell table:formula="of:=[.D2799]-[.D279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table:formula="of:=[.B2798]+7" office:value-type="float" office:value="19586" calcext:value-type="float">
            <text:p>19586</text:p>
          </table:table-cell>
          <table:table-cell office:value-type="float" office:value="8640000" calcext:value-type="float">
            <text:p>8640000</text:p>
          </table:table-cell>
          <table:table-cell table:formula="of:=[.B2799]/[.C2799]" office:value-type="float" office:value="0.00226689814814815" calcext:value-type="float">
            <text:p>0,00226689814814815000</text:p>
          </table:table-cell>
          <table:table-cell table:formula="of:=[.D2800]-[.D279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table:formula="of:=[.B2799]+7" office:value-type="float" office:value="19593" calcext:value-type="float">
            <text:p>19593</text:p>
          </table:table-cell>
          <table:table-cell office:value-type="float" office:value="8640000" calcext:value-type="float">
            <text:p>8640000</text:p>
          </table:table-cell>
          <table:table-cell table:formula="of:=[.B2800]/[.C2800]" office:value-type="float" office:value="0.00226770833333333" calcext:value-type="float">
            <text:p>0,00226770833333333000</text:p>
          </table:table-cell>
          <table:table-cell table:formula="of:=[.D2801]-[.D280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.B2800]+7" office:value-type="float" office:value="19600" calcext:value-type="float">
            <text:p>19600</text:p>
          </table:table-cell>
          <table:table-cell office:value-type="float" office:value="8640000" calcext:value-type="float">
            <text:p>8640000</text:p>
          </table:table-cell>
          <table:table-cell table:formula="of:=[.B2801]/[.C2801]" office:value-type="float" office:value="0.00226851851851852" calcext:value-type="float">
            <text:p>0,00226851851851852000</text:p>
          </table:table-cell>
          <table:table-cell table:formula="of:=[.D2802]-[.D280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table:formula="of:=[.B2801]+7" office:value-type="float" office:value="19607" calcext:value-type="float">
            <text:p>19607</text:p>
          </table:table-cell>
          <table:table-cell office:value-type="float" office:value="8640000" calcext:value-type="float">
            <text:p>8640000</text:p>
          </table:table-cell>
          <table:table-cell table:formula="of:=[.B2802]/[.C2802]" office:value-type="float" office:value="0.0022693287037037" calcext:value-type="float">
            <text:p>0,00226932870370370000</text:p>
          </table:table-cell>
          <table:table-cell table:formula="of:=[.D2803]-[.D280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table:formula="of:=[.B2802]+7" office:value-type="float" office:value="19614" calcext:value-type="float">
            <text:p>19614</text:p>
          </table:table-cell>
          <table:table-cell office:value-type="float" office:value="8640000" calcext:value-type="float">
            <text:p>8640000</text:p>
          </table:table-cell>
          <table:table-cell table:formula="of:=[.B2803]/[.C2803]" office:value-type="float" office:value="0.00227013888888889" calcext:value-type="float">
            <text:p>0,00227013888888889000</text:p>
          </table:table-cell>
          <table:table-cell table:formula="of:=[.D2804]-[.D280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[.B2803]+7" office:value-type="float" office:value="19621" calcext:value-type="float">
            <text:p>19621</text:p>
          </table:table-cell>
          <table:table-cell office:value-type="float" office:value="8640000" calcext:value-type="float">
            <text:p>8640000</text:p>
          </table:table-cell>
          <table:table-cell table:formula="of:=[.B2804]/[.C2804]" office:value-type="float" office:value="0.00227094907407407" calcext:value-type="float">
            <text:p>0,00227094907407407000</text:p>
          </table:table-cell>
          <table:table-cell table:formula="of:=[.D2805]-[.D280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[.B2804]+7" office:value-type="float" office:value="19628" calcext:value-type="float">
            <text:p>19628</text:p>
          </table:table-cell>
          <table:table-cell office:value-type="float" office:value="8640000" calcext:value-type="float">
            <text:p>8640000</text:p>
          </table:table-cell>
          <table:table-cell table:formula="of:=[.B2805]/[.C2805]" office:value-type="float" office:value="0.00227175925925926" calcext:value-type="float">
            <text:p>0,00227175925925926000</text:p>
          </table:table-cell>
          <table:table-cell table:formula="of:=[.D2806]-[.D280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table:formula="of:=[.B2805]+7" office:value-type="float" office:value="19635" calcext:value-type="float">
            <text:p>19635</text:p>
          </table:table-cell>
          <table:table-cell office:value-type="float" office:value="8640000" calcext:value-type="float">
            <text:p>8640000</text:p>
          </table:table-cell>
          <table:table-cell table:formula="of:=[.B2806]/[.C2806]" office:value-type="float" office:value="0.00227256944444444" calcext:value-type="float">
            <text:p>0,00227256944444444000</text:p>
          </table:table-cell>
          <table:table-cell table:formula="of:=[.D2807]-[.D280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table:formula="of:=[.B2806]+7" office:value-type="float" office:value="19642" calcext:value-type="float">
            <text:p>19642</text:p>
          </table:table-cell>
          <table:table-cell office:value-type="float" office:value="8640000" calcext:value-type="float">
            <text:p>8640000</text:p>
          </table:table-cell>
          <table:table-cell table:formula="of:=[.B2807]/[.C2807]" office:value-type="float" office:value="0.00227337962962963" calcext:value-type="float">
            <text:p>0,00227337962962963000</text:p>
          </table:table-cell>
          <table:table-cell table:formula="of:=[.D2808]-[.D280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table:formula="of:=[.B2807]+7" office:value-type="float" office:value="19649" calcext:value-type="float">
            <text:p>19649</text:p>
          </table:table-cell>
          <table:table-cell office:value-type="float" office:value="8640000" calcext:value-type="float">
            <text:p>8640000</text:p>
          </table:table-cell>
          <table:table-cell table:formula="of:=[.B2808]/[.C2808]" office:value-type="float" office:value="0.00227418981481482" calcext:value-type="float">
            <text:p>0,00227418981481482000</text:p>
          </table:table-cell>
          <table:table-cell table:formula="of:=[.D2809]-[.D280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table:formula="of:=[.B2808]+7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2809]/[.C2809]" office:value-type="float" office:value="0.002275" calcext:value-type="float">
            <text:p>0,00227500000000000000</text:p>
          </table:table-cell>
          <table:table-cell table:formula="of:=[.D2810]-[.D280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table:formula="of:=[.B2809]+7" office:value-type="float" office:value="19663" calcext:value-type="float">
            <text:p>19663</text:p>
          </table:table-cell>
          <table:table-cell office:value-type="float" office:value="8640000" calcext:value-type="float">
            <text:p>8640000</text:p>
          </table:table-cell>
          <table:table-cell table:formula="of:=[.B2810]/[.C2810]" office:value-type="float" office:value="0.00227581018518519" calcext:value-type="float">
            <text:p>0,00227581018518519000</text:p>
          </table:table-cell>
          <table:table-cell table:formula="of:=[.D2811]-[.D281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table:formula="of:=[.B2810]+7" office:value-type="float" office:value="19670" calcext:value-type="float">
            <text:p>19670</text:p>
          </table:table-cell>
          <table:table-cell office:value-type="float" office:value="8640000" calcext:value-type="float">
            <text:p>8640000</text:p>
          </table:table-cell>
          <table:table-cell table:formula="of:=[.B2811]/[.C2811]" office:value-type="float" office:value="0.00227662037037037" calcext:value-type="float">
            <text:p>0,00227662037037037000</text:p>
          </table:table-cell>
          <table:table-cell table:formula="of:=[.D2812]-[.D281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table:formula="of:=[.B2811]+7" office:value-type="float" office:value="19677" calcext:value-type="float">
            <text:p>19677</text:p>
          </table:table-cell>
          <table:table-cell office:value-type="float" office:value="8640000" calcext:value-type="float">
            <text:p>8640000</text:p>
          </table:table-cell>
          <table:table-cell table:formula="of:=[.B2812]/[.C2812]" office:value-type="float" office:value="0.00227743055555556" calcext:value-type="float">
            <text:p>0,00227743055555556000</text:p>
          </table:table-cell>
          <table:table-cell table:formula="of:=[.D2813]-[.D281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table:formula="of:=[.B2812]+7" office:value-type="float" office:value="19684" calcext:value-type="float">
            <text:p>19684</text:p>
          </table:table-cell>
          <table:table-cell office:value-type="float" office:value="8640000" calcext:value-type="float">
            <text:p>8640000</text:p>
          </table:table-cell>
          <table:table-cell table:formula="of:=[.B2813]/[.C2813]" office:value-type="float" office:value="0.00227824074074074" calcext:value-type="float">
            <text:p>0,00227824074074074000</text:p>
          </table:table-cell>
          <table:table-cell table:formula="of:=[.D2814]-[.D281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table:formula="of:=[.B2813]+7" office:value-type="float" office:value="19691" calcext:value-type="float">
            <text:p>19691</text:p>
          </table:table-cell>
          <table:table-cell office:value-type="float" office:value="8640000" calcext:value-type="float">
            <text:p>8640000</text:p>
          </table:table-cell>
          <table:table-cell table:formula="of:=[.B2814]/[.C2814]" office:value-type="float" office:value="0.00227905092592593" calcext:value-type="float">
            <text:p>0,00227905092592593000</text:p>
          </table:table-cell>
          <table:table-cell table:formula="of:=[.D2815]-[.D281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table:formula="of:=[.B2814]+7" office:value-type="float" office:value="19698" calcext:value-type="float">
            <text:p>19698</text:p>
          </table:table-cell>
          <table:table-cell office:value-type="float" office:value="8640000" calcext:value-type="float">
            <text:p>8640000</text:p>
          </table:table-cell>
          <table:table-cell table:formula="of:=[.B2815]/[.C2815]" office:value-type="float" office:value="0.00227986111111111" calcext:value-type="float">
            <text:p>0,00227986111111111000</text:p>
          </table:table-cell>
          <table:table-cell table:formula="of:=[.D2816]-[.D281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table:formula="of:=[.B2815]+7" office:value-type="float" office:value="19705" calcext:value-type="float">
            <text:p>19705</text:p>
          </table:table-cell>
          <table:table-cell office:value-type="float" office:value="8640000" calcext:value-type="float">
            <text:p>8640000</text:p>
          </table:table-cell>
          <table:table-cell table:formula="of:=[.B2816]/[.C2816]" office:value-type="float" office:value="0.0022806712962963" calcext:value-type="float">
            <text:p>0,00228067129629630000</text:p>
          </table:table-cell>
          <table:table-cell table:formula="of:=[.D2817]-[.D281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table:formula="of:=[.B2816]+7" office:value-type="float" office:value="19712" calcext:value-type="float">
            <text:p>19712</text:p>
          </table:table-cell>
          <table:table-cell office:value-type="float" office:value="8640000" calcext:value-type="float">
            <text:p>8640000</text:p>
          </table:table-cell>
          <table:table-cell table:formula="of:=[.B2817]/[.C2817]" office:value-type="float" office:value="0.00228148148148148" calcext:value-type="float">
            <text:p>0,00228148148148148000</text:p>
          </table:table-cell>
          <table:table-cell table:formula="of:=[.D2818]-[.D281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table:formula="of:=[.B2817]+7" office:value-type="float" office:value="19719" calcext:value-type="float">
            <text:p>19719</text:p>
          </table:table-cell>
          <table:table-cell office:value-type="float" office:value="8640000" calcext:value-type="float">
            <text:p>8640000</text:p>
          </table:table-cell>
          <table:table-cell table:formula="of:=[.B2818]/[.C2818]" office:value-type="float" office:value="0.00228229166666667" calcext:value-type="float">
            <text:p>0,00228229166666667000</text:p>
          </table:table-cell>
          <table:table-cell table:formula="of:=[.D2819]-[.D281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table:formula="of:=[.B2818]+7" office:value-type="float" office:value="19726" calcext:value-type="float">
            <text:p>19726</text:p>
          </table:table-cell>
          <table:table-cell office:value-type="float" office:value="8640000" calcext:value-type="float">
            <text:p>8640000</text:p>
          </table:table-cell>
          <table:table-cell table:formula="of:=[.B2819]/[.C2819]" office:value-type="float" office:value="0.00228310185185185" calcext:value-type="float">
            <text:p>0,00228310185185185000</text:p>
          </table:table-cell>
          <table:table-cell table:formula="of:=[.D2820]-[.D281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table:formula="of:=[.B2819]+7" office:value-type="float" office:value="19733" calcext:value-type="float">
            <text:p>19733</text:p>
          </table:table-cell>
          <table:table-cell office:value-type="float" office:value="8640000" calcext:value-type="float">
            <text:p>8640000</text:p>
          </table:table-cell>
          <table:table-cell table:formula="of:=[.B2820]/[.C2820]" office:value-type="float" office:value="0.00228391203703704" calcext:value-type="float">
            <text:p>0,00228391203703704000</text:p>
          </table:table-cell>
          <table:table-cell table:formula="of:=[.D2821]-[.D282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table:formula="of:=[.B2820]+7" office:value-type="float" office:value="19740" calcext:value-type="float">
            <text:p>19740</text:p>
          </table:table-cell>
          <table:table-cell office:value-type="float" office:value="8640000" calcext:value-type="float">
            <text:p>8640000</text:p>
          </table:table-cell>
          <table:table-cell table:formula="of:=[.B2821]/[.C2821]" office:value-type="float" office:value="0.00228472222222222" calcext:value-type="float">
            <text:p>0,00228472222222222000</text:p>
          </table:table-cell>
          <table:table-cell table:formula="of:=[.D2822]-[.D282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[.B2821]+7" office:value-type="float" office:value="19747" calcext:value-type="float">
            <text:p>19747</text:p>
          </table:table-cell>
          <table:table-cell office:value-type="float" office:value="8640000" calcext:value-type="float">
            <text:p>8640000</text:p>
          </table:table-cell>
          <table:table-cell table:formula="of:=[.B2822]/[.C2822]" office:value-type="float" office:value="0.00228553240740741" calcext:value-type="float">
            <text:p>0,00228553240740741000</text:p>
          </table:table-cell>
          <table:table-cell table:formula="of:=[.D2823]-[.D282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table:formula="of:=[.B2822]+7" office:value-type="float" office:value="19754" calcext:value-type="float">
            <text:p>19754</text:p>
          </table:table-cell>
          <table:table-cell office:value-type="float" office:value="8640000" calcext:value-type="float">
            <text:p>8640000</text:p>
          </table:table-cell>
          <table:table-cell table:formula="of:=[.B2823]/[.C2823]" office:value-type="float" office:value="0.00228634259259259" calcext:value-type="float">
            <text:p>0,00228634259259259000</text:p>
          </table:table-cell>
          <table:table-cell table:formula="of:=[.D2824]-[.D282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table:formula="of:=[.B2823]+7" office:value-type="float" office:value="19761" calcext:value-type="float">
            <text:p>19761</text:p>
          </table:table-cell>
          <table:table-cell office:value-type="float" office:value="8640000" calcext:value-type="float">
            <text:p>8640000</text:p>
          </table:table-cell>
          <table:table-cell table:formula="of:=[.B2824]/[.C2824]" office:value-type="float" office:value="0.00228715277777778" calcext:value-type="float">
            <text:p>0,00228715277777778000</text:p>
          </table:table-cell>
          <table:table-cell table:formula="of:=[.D2825]-[.D282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table:formula="of:=[.B2824]+7" office:value-type="float" office:value="19768" calcext:value-type="float">
            <text:p>19768</text:p>
          </table:table-cell>
          <table:table-cell office:value-type="float" office:value="8640000" calcext:value-type="float">
            <text:p>8640000</text:p>
          </table:table-cell>
          <table:table-cell table:formula="of:=[.B2825]/[.C2825]" office:value-type="float" office:value="0.00228796296296296" calcext:value-type="float">
            <text:p>0,00228796296296296000</text:p>
          </table:table-cell>
          <table:table-cell table:formula="of:=[.D2826]-[.D282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table:formula="of:=[.B2825]+7" office:value-type="float" office:value="19775" calcext:value-type="float">
            <text:p>19775</text:p>
          </table:table-cell>
          <table:table-cell office:value-type="float" office:value="8640000" calcext:value-type="float">
            <text:p>8640000</text:p>
          </table:table-cell>
          <table:table-cell table:formula="of:=[.B2826]/[.C2826]" office:value-type="float" office:value="0.00228877314814815" calcext:value-type="float">
            <text:p>0,00228877314814815000</text:p>
          </table:table-cell>
          <table:table-cell table:formula="of:=[.D2827]-[.D282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table:formula="of:=[.B2826]+7" office:value-type="float" office:value="19782" calcext:value-type="float">
            <text:p>19782</text:p>
          </table:table-cell>
          <table:table-cell office:value-type="float" office:value="8640000" calcext:value-type="float">
            <text:p>8640000</text:p>
          </table:table-cell>
          <table:table-cell table:formula="of:=[.B2827]/[.C2827]" office:value-type="float" office:value="0.00228958333333333" calcext:value-type="float">
            <text:p>0,00228958333333333000</text:p>
          </table:table-cell>
          <table:table-cell table:formula="of:=[.D2828]-[.D282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table:formula="of:=[.B2827]+7" office:value-type="float" office:value="19789" calcext:value-type="float">
            <text:p>19789</text:p>
          </table:table-cell>
          <table:table-cell office:value-type="float" office:value="8640000" calcext:value-type="float">
            <text:p>8640000</text:p>
          </table:table-cell>
          <table:table-cell table:formula="of:=[.B2828]/[.C2828]" office:value-type="float" office:value="0.00229039351851852" calcext:value-type="float">
            <text:p>0,00229039351851852000</text:p>
          </table:table-cell>
          <table:table-cell table:formula="of:=[.D2829]-[.D282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table:formula="of:=[.B2828]+7" office:value-type="float" office:value="19796" calcext:value-type="float">
            <text:p>19796</text:p>
          </table:table-cell>
          <table:table-cell office:value-type="float" office:value="8640000" calcext:value-type="float">
            <text:p>8640000</text:p>
          </table:table-cell>
          <table:table-cell table:formula="of:=[.B2829]/[.C2829]" office:value-type="float" office:value="0.0022912037037037" calcext:value-type="float">
            <text:p>0,00229120370370370000</text:p>
          </table:table-cell>
          <table:table-cell table:formula="of:=[.D2830]-[.D282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table:formula="of:=[.B2829]+7" office:value-type="float" office:value="19803" calcext:value-type="float">
            <text:p>19803</text:p>
          </table:table-cell>
          <table:table-cell office:value-type="float" office:value="8640000" calcext:value-type="float">
            <text:p>8640000</text:p>
          </table:table-cell>
          <table:table-cell table:formula="of:=[.B2830]/[.C2830]" office:value-type="float" office:value="0.00229201388888889" calcext:value-type="float">
            <text:p>0,00229201388888889000</text:p>
          </table:table-cell>
          <table:table-cell table:formula="of:=[.D2831]-[.D283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table:formula="of:=[.B2830]+7" office:value-type="float" office:value="19810" calcext:value-type="float">
            <text:p>19810</text:p>
          </table:table-cell>
          <table:table-cell office:value-type="float" office:value="8640000" calcext:value-type="float">
            <text:p>8640000</text:p>
          </table:table-cell>
          <table:table-cell table:formula="of:=[.B2831]/[.C2831]" office:value-type="float" office:value="0.00229282407407407" calcext:value-type="float">
            <text:p>0,00229282407407407000</text:p>
          </table:table-cell>
          <table:table-cell table:formula="of:=[.D2832]-[.D283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[.B2831]+7" office:value-type="float" office:value="19817" calcext:value-type="float">
            <text:p>19817</text:p>
          </table:table-cell>
          <table:table-cell office:value-type="float" office:value="8640000" calcext:value-type="float">
            <text:p>8640000</text:p>
          </table:table-cell>
          <table:table-cell table:formula="of:=[.B2832]/[.C2832]" office:value-type="float" office:value="0.00229363425925926" calcext:value-type="float">
            <text:p>0,00229363425925926000</text:p>
          </table:table-cell>
          <table:table-cell table:formula="of:=[.D2833]-[.D283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table:formula="of:=[.B2832]+7" office:value-type="float" office:value="19824" calcext:value-type="float">
            <text:p>19824</text:p>
          </table:table-cell>
          <table:table-cell office:value-type="float" office:value="8640000" calcext:value-type="float">
            <text:p>8640000</text:p>
          </table:table-cell>
          <table:table-cell table:formula="of:=[.B2833]/[.C2833]" office:value-type="float" office:value="0.00229444444444444" calcext:value-type="float">
            <text:p>0,00229444444444444000</text:p>
          </table:table-cell>
          <table:table-cell table:formula="of:=[.D2834]-[.D283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table:formula="of:=[.B2833]+7" office:value-type="float" office:value="19831" calcext:value-type="float">
            <text:p>19831</text:p>
          </table:table-cell>
          <table:table-cell office:value-type="float" office:value="8640000" calcext:value-type="float">
            <text:p>8640000</text:p>
          </table:table-cell>
          <table:table-cell table:formula="of:=[.B2834]/[.C2834]" office:value-type="float" office:value="0.00229525462962963" calcext:value-type="float">
            <text:p>0,00229525462962963000</text:p>
          </table:table-cell>
          <table:table-cell table:formula="of:=[.D2835]-[.D283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table:formula="of:=[.B2834]+7" office:value-type="float" office:value="19838" calcext:value-type="float">
            <text:p>19838</text:p>
          </table:table-cell>
          <table:table-cell office:value-type="float" office:value="8640000" calcext:value-type="float">
            <text:p>8640000</text:p>
          </table:table-cell>
          <table:table-cell table:formula="of:=[.B2835]/[.C2835]" office:value-type="float" office:value="0.00229606481481482" calcext:value-type="float">
            <text:p>0,00229606481481482000</text:p>
          </table:table-cell>
          <table:table-cell table:formula="of:=[.D2836]-[.D283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table:formula="of:=[.B2835]+7" office:value-type="float" office:value="19845" calcext:value-type="float">
            <text:p>19845</text:p>
          </table:table-cell>
          <table:table-cell office:value-type="float" office:value="8640000" calcext:value-type="float">
            <text:p>8640000</text:p>
          </table:table-cell>
          <table:table-cell table:formula="of:=[.B2836]/[.C2836]" office:value-type="float" office:value="0.002296875" calcext:value-type="float">
            <text:p>0,00229687500000000000</text:p>
          </table:table-cell>
          <table:table-cell table:formula="of:=[.D2837]-[.D283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table:formula="of:=[.B2836]+7" office:value-type="float" office:value="19852" calcext:value-type="float">
            <text:p>19852</text:p>
          </table:table-cell>
          <table:table-cell office:value-type="float" office:value="8640000" calcext:value-type="float">
            <text:p>8640000</text:p>
          </table:table-cell>
          <table:table-cell table:formula="of:=[.B2837]/[.C2837]" office:value-type="float" office:value="0.00229768518518519" calcext:value-type="float">
            <text:p>0,00229768518518519000</text:p>
          </table:table-cell>
          <table:table-cell table:formula="of:=[.D2838]-[.D283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[.B2837]+7" office:value-type="float" office:value="19859" calcext:value-type="float">
            <text:p>19859</text:p>
          </table:table-cell>
          <table:table-cell office:value-type="float" office:value="8640000" calcext:value-type="float">
            <text:p>8640000</text:p>
          </table:table-cell>
          <table:table-cell table:formula="of:=[.B2838]/[.C2838]" office:value-type="float" office:value="0.00229849537037037" calcext:value-type="float">
            <text:p>0,00229849537037037000</text:p>
          </table:table-cell>
          <table:table-cell table:formula="of:=[.D2839]-[.D283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table:formula="of:=[.B2838]+7" office:value-type="float" office:value="19866" calcext:value-type="float">
            <text:p>19866</text:p>
          </table:table-cell>
          <table:table-cell office:value-type="float" office:value="8640000" calcext:value-type="float">
            <text:p>8640000</text:p>
          </table:table-cell>
          <table:table-cell table:formula="of:=[.B2839]/[.C2839]" office:value-type="float" office:value="0.00229930555555556" calcext:value-type="float">
            <text:p>0,00229930555555556000</text:p>
          </table:table-cell>
          <table:table-cell table:formula="of:=[.D2840]-[.D283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table:formula="of:=[.B2839]+7" office:value-type="float" office:value="19873" calcext:value-type="float">
            <text:p>19873</text:p>
          </table:table-cell>
          <table:table-cell office:value-type="float" office:value="8640000" calcext:value-type="float">
            <text:p>8640000</text:p>
          </table:table-cell>
          <table:table-cell table:formula="of:=[.B2840]/[.C2840]" office:value-type="float" office:value="0.00230011574074074" calcext:value-type="float">
            <text:p>0,00230011574074074000</text:p>
          </table:table-cell>
          <table:table-cell table:formula="of:=[.D2841]-[.D284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table:formula="of:=[.B2840]+7" office:value-type="float" office:value="19880" calcext:value-type="float">
            <text:p>19880</text:p>
          </table:table-cell>
          <table:table-cell office:value-type="float" office:value="8640000" calcext:value-type="float">
            <text:p>8640000</text:p>
          </table:table-cell>
          <table:table-cell table:formula="of:=[.B2841]/[.C2841]" office:value-type="float" office:value="0.00230092592592593" calcext:value-type="float">
            <text:p>0,00230092592592593000</text:p>
          </table:table-cell>
          <table:table-cell table:formula="of:=[.D2842]-[.D284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table:formula="of:=[.B2841]+7" office:value-type="float" office:value="19887" calcext:value-type="float">
            <text:p>19887</text:p>
          </table:table-cell>
          <table:table-cell office:value-type="float" office:value="8640000" calcext:value-type="float">
            <text:p>8640000</text:p>
          </table:table-cell>
          <table:table-cell table:formula="of:=[.B2842]/[.C2842]" office:value-type="float" office:value="0.00230173611111111" calcext:value-type="float">
            <text:p>0,00230173611111111000</text:p>
          </table:table-cell>
          <table:table-cell table:formula="of:=[.D2843]-[.D284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table:formula="of:=[.B2842]+7" office:value-type="float" office:value="19894" calcext:value-type="float">
            <text:p>19894</text:p>
          </table:table-cell>
          <table:table-cell office:value-type="float" office:value="8640000" calcext:value-type="float">
            <text:p>8640000</text:p>
          </table:table-cell>
          <table:table-cell table:formula="of:=[.B2843]/[.C2843]" office:value-type="float" office:value="0.0023025462962963" calcext:value-type="float">
            <text:p>0,00230254629629630000</text:p>
          </table:table-cell>
          <table:table-cell table:formula="of:=[.D2844]-[.D284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table:formula="of:=[.B2843]+7" office:value-type="float" office:value="19901" calcext:value-type="float">
            <text:p>19901</text:p>
          </table:table-cell>
          <table:table-cell office:value-type="float" office:value="8640000" calcext:value-type="float">
            <text:p>8640000</text:p>
          </table:table-cell>
          <table:table-cell table:formula="of:=[.B2844]/[.C2844]" office:value-type="float" office:value="0.00230335648148148" calcext:value-type="float">
            <text:p>0,00230335648148148000</text:p>
          </table:table-cell>
          <table:table-cell table:formula="of:=[.D2845]-[.D284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table:formula="of:=[.B2844]+7" office:value-type="float" office:value="19908" calcext:value-type="float">
            <text:p>19908</text:p>
          </table:table-cell>
          <table:table-cell office:value-type="float" office:value="8640000" calcext:value-type="float">
            <text:p>8640000</text:p>
          </table:table-cell>
          <table:table-cell table:formula="of:=[.B2845]/[.C2845]" office:value-type="float" office:value="0.00230416666666667" calcext:value-type="float">
            <text:p>0,00230416666666667000</text:p>
          </table:table-cell>
          <table:table-cell table:formula="of:=[.D2846]-[.D284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table:formula="of:=[.B2845]+7" office:value-type="float" office:value="19915" calcext:value-type="float">
            <text:p>19915</text:p>
          </table:table-cell>
          <table:table-cell office:value-type="float" office:value="8640000" calcext:value-type="float">
            <text:p>8640000</text:p>
          </table:table-cell>
          <table:table-cell table:formula="of:=[.B2846]/[.C2846]" office:value-type="float" office:value="0.00230497685185185" calcext:value-type="float">
            <text:p>0,00230497685185185000</text:p>
          </table:table-cell>
          <table:table-cell table:formula="of:=[.D2847]-[.D284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table:formula="of:=[.B2846]+7" office:value-type="float" office:value="19922" calcext:value-type="float">
            <text:p>19922</text:p>
          </table:table-cell>
          <table:table-cell office:value-type="float" office:value="8640000" calcext:value-type="float">
            <text:p>8640000</text:p>
          </table:table-cell>
          <table:table-cell table:formula="of:=[.B2847]/[.C2847]" office:value-type="float" office:value="0.00230578703703704" calcext:value-type="float">
            <text:p>0,00230578703703704000</text:p>
          </table:table-cell>
          <table:table-cell table:formula="of:=[.D2848]-[.D284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table:formula="of:=[.B2847]+7" office:value-type="float" office:value="19929" calcext:value-type="float">
            <text:p>19929</text:p>
          </table:table-cell>
          <table:table-cell office:value-type="float" office:value="8640000" calcext:value-type="float">
            <text:p>8640000</text:p>
          </table:table-cell>
          <table:table-cell table:formula="of:=[.B2848]/[.C2848]" office:value-type="float" office:value="0.00230659722222222" calcext:value-type="float">
            <text:p>0,00230659722222222000</text:p>
          </table:table-cell>
          <table:table-cell table:formula="of:=[.D2849]-[.D284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table:formula="of:=[.B2848]+7" office:value-type="float" office:value="19936" calcext:value-type="float">
            <text:p>19936</text:p>
          </table:table-cell>
          <table:table-cell office:value-type="float" office:value="8640000" calcext:value-type="float">
            <text:p>8640000</text:p>
          </table:table-cell>
          <table:table-cell table:formula="of:=[.B2849]/[.C2849]" office:value-type="float" office:value="0.00230740740740741" calcext:value-type="float">
            <text:p>0,00230740740740741000</text:p>
          </table:table-cell>
          <table:table-cell table:formula="of:=[.D2850]-[.D284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table:formula="of:=[.B2849]+7" office:value-type="float" office:value="19943" calcext:value-type="float">
            <text:p>19943</text:p>
          </table:table-cell>
          <table:table-cell office:value-type="float" office:value="8640000" calcext:value-type="float">
            <text:p>8640000</text:p>
          </table:table-cell>
          <table:table-cell table:formula="of:=[.B2850]/[.C2850]" office:value-type="float" office:value="0.00230821759259259" calcext:value-type="float">
            <text:p>0,00230821759259259000</text:p>
          </table:table-cell>
          <table:table-cell table:formula="of:=[.D2851]-[.D285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table:formula="of:=[.B2850]+7" office:value-type="float" office:value="19950" calcext:value-type="float">
            <text:p>19950</text:p>
          </table:table-cell>
          <table:table-cell office:value-type="float" office:value="8640000" calcext:value-type="float">
            <text:p>8640000</text:p>
          </table:table-cell>
          <table:table-cell table:formula="of:=[.B2851]/[.C2851]" office:value-type="float" office:value="0.00230902777777778" calcext:value-type="float">
            <text:p>0,00230902777777778000</text:p>
          </table:table-cell>
          <table:table-cell table:formula="of:=[.D2852]-[.D285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table:formula="of:=[.B2851]+7" office:value-type="float" office:value="19957" calcext:value-type="float">
            <text:p>19957</text:p>
          </table:table-cell>
          <table:table-cell office:value-type="float" office:value="8640000" calcext:value-type="float">
            <text:p>8640000</text:p>
          </table:table-cell>
          <table:table-cell table:formula="of:=[.B2852]/[.C2852]" office:value-type="float" office:value="0.00230983796296296" calcext:value-type="float">
            <text:p>0,00230983796296296000</text:p>
          </table:table-cell>
          <table:table-cell table:formula="of:=[.D2853]-[.D285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table:formula="of:=[.B2852]+7" office:value-type="float" office:value="19964" calcext:value-type="float">
            <text:p>19964</text:p>
          </table:table-cell>
          <table:table-cell office:value-type="float" office:value="8640000" calcext:value-type="float">
            <text:p>8640000</text:p>
          </table:table-cell>
          <table:table-cell table:formula="of:=[.B2853]/[.C2853]" office:value-type="float" office:value="0.00231064814814815" calcext:value-type="float">
            <text:p>0,00231064814814815000</text:p>
          </table:table-cell>
          <table:table-cell table:formula="of:=[.D2854]-[.D285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table:formula="of:=[.B2853]+7" office:value-type="float" office:value="19971" calcext:value-type="float">
            <text:p>19971</text:p>
          </table:table-cell>
          <table:table-cell office:value-type="float" office:value="8640000" calcext:value-type="float">
            <text:p>8640000</text:p>
          </table:table-cell>
          <table:table-cell table:formula="of:=[.B2854]/[.C2854]" office:value-type="float" office:value="0.00231145833333333" calcext:value-type="float">
            <text:p>0,00231145833333333000</text:p>
          </table:table-cell>
          <table:table-cell table:formula="of:=[.D2855]-[.D285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table:formula="of:=[.B2854]+7" office:value-type="float" office:value="19978" calcext:value-type="float">
            <text:p>19978</text:p>
          </table:table-cell>
          <table:table-cell office:value-type="float" office:value="8640000" calcext:value-type="float">
            <text:p>8640000</text:p>
          </table:table-cell>
          <table:table-cell table:formula="of:=[.B2855]/[.C2855]" office:value-type="float" office:value="0.00231226851851852" calcext:value-type="float">
            <text:p>0,00231226851851852000</text:p>
          </table:table-cell>
          <table:table-cell table:formula="of:=[.D2856]-[.D285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table:formula="of:=[.B2855]+7" office:value-type="float" office:value="19985" calcext:value-type="float">
            <text:p>19985</text:p>
          </table:table-cell>
          <table:table-cell office:value-type="float" office:value="8640000" calcext:value-type="float">
            <text:p>8640000</text:p>
          </table:table-cell>
          <table:table-cell table:formula="of:=[.B2856]/[.C2856]" office:value-type="float" office:value="0.0023130787037037" calcext:value-type="float">
            <text:p>0,00231307870370370000</text:p>
          </table:table-cell>
          <table:table-cell table:formula="of:=[.D2857]-[.D285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table:formula="of:=[.B2856]+7" office:value-type="float" office:value="19992" calcext:value-type="float">
            <text:p>19992</text:p>
          </table:table-cell>
          <table:table-cell office:value-type="float" office:value="8640000" calcext:value-type="float">
            <text:p>8640000</text:p>
          </table:table-cell>
          <table:table-cell table:formula="of:=[.B2857]/[.C2857]" office:value-type="float" office:value="0.00231388888888889" calcext:value-type="float">
            <text:p>0,00231388888888889000</text:p>
          </table:table-cell>
          <table:table-cell table:formula="of:=[.D2858]-[.D285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table:formula="of:=[.B2857]+7" office:value-type="float" office:value="19999" calcext:value-type="float">
            <text:p>19999</text:p>
          </table:table-cell>
          <table:table-cell office:value-type="float" office:value="8640000" calcext:value-type="float">
            <text:p>8640000</text:p>
          </table:table-cell>
          <table:table-cell table:formula="of:=[.B2858]/[.C2858]" office:value-type="float" office:value="0.00231469907407407" calcext:value-type="float">
            <text:p>0,00231469907407407000</text:p>
          </table:table-cell>
          <table:table-cell table:formula="of:=[.D2859]-[.D285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table:formula="of:=[.B2858]+7" office:value-type="float" office:value="20006" calcext:value-type="float">
            <text:p>20006</text:p>
          </table:table-cell>
          <table:table-cell office:value-type="float" office:value="8640000" calcext:value-type="float">
            <text:p>8640000</text:p>
          </table:table-cell>
          <table:table-cell table:formula="of:=[.B2859]/[.C2859]" office:value-type="float" office:value="0.00231550925925926" calcext:value-type="float">
            <text:p>0,00231550925925926000</text:p>
          </table:table-cell>
          <table:table-cell table:formula="of:=[.D2860]-[.D285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table:formula="of:=[.B2859]+7" office:value-type="float" office:value="20013" calcext:value-type="float">
            <text:p>20013</text:p>
          </table:table-cell>
          <table:table-cell office:value-type="float" office:value="8640000" calcext:value-type="float">
            <text:p>8640000</text:p>
          </table:table-cell>
          <table:table-cell table:formula="of:=[.B2860]/[.C2860]" office:value-type="float" office:value="0.00231631944444444" calcext:value-type="float">
            <text:p>0,00231631944444444000</text:p>
          </table:table-cell>
          <table:table-cell table:formula="of:=[.D2861]-[.D286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table:formula="of:=[.B2860]+7" office:value-type="float" office:value="20020" calcext:value-type="float">
            <text:p>20020</text:p>
          </table:table-cell>
          <table:table-cell office:value-type="float" office:value="8640000" calcext:value-type="float">
            <text:p>8640000</text:p>
          </table:table-cell>
          <table:table-cell table:formula="of:=[.B2861]/[.C2861]" office:value-type="float" office:value="0.00231712962962963" calcext:value-type="float">
            <text:p>0,00231712962962963000</text:p>
          </table:table-cell>
          <table:table-cell table:formula="of:=[.D2862]-[.D286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table:formula="of:=[.B2861]+7" office:value-type="float" office:value="20027" calcext:value-type="float">
            <text:p>20027</text:p>
          </table:table-cell>
          <table:table-cell office:value-type="float" office:value="8640000" calcext:value-type="float">
            <text:p>8640000</text:p>
          </table:table-cell>
          <table:table-cell table:formula="of:=[.B2862]/[.C2862]" office:value-type="float" office:value="0.00231793981481481" calcext:value-type="float">
            <text:p>0,00231793981481481000</text:p>
          </table:table-cell>
          <table:table-cell table:formula="of:=[.D2863]-[.D286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table:formula="of:=[.B2862]+7" office:value-type="float" office:value="20034" calcext:value-type="float">
            <text:p>20034</text:p>
          </table:table-cell>
          <table:table-cell office:value-type="float" office:value="8640000" calcext:value-type="float">
            <text:p>8640000</text:p>
          </table:table-cell>
          <table:table-cell table:formula="of:=[.B2863]/[.C2863]" office:value-type="float" office:value="0.00231875" calcext:value-type="float">
            <text:p>0,00231875000000000000</text:p>
          </table:table-cell>
          <table:table-cell table:formula="of:=[.D2864]-[.D286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table:formula="of:=[.B2863]+7" office:value-type="float" office:value="20041" calcext:value-type="float">
            <text:p>20041</text:p>
          </table:table-cell>
          <table:table-cell office:value-type="float" office:value="8640000" calcext:value-type="float">
            <text:p>8640000</text:p>
          </table:table-cell>
          <table:table-cell table:formula="of:=[.B2864]/[.C2864]" office:value-type="float" office:value="0.00231956018518519" calcext:value-type="float">
            <text:p>0,00231956018518519000</text:p>
          </table:table-cell>
          <table:table-cell table:formula="of:=[.D2865]-[.D286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table:formula="of:=[.B2864]+7" office:value-type="float" office:value="20048" calcext:value-type="float">
            <text:p>20048</text:p>
          </table:table-cell>
          <table:table-cell office:value-type="float" office:value="8640000" calcext:value-type="float">
            <text:p>8640000</text:p>
          </table:table-cell>
          <table:table-cell table:formula="of:=[.B2865]/[.C2865]" office:value-type="float" office:value="0.00232037037037037" calcext:value-type="float">
            <text:p>0,00232037037037037000</text:p>
          </table:table-cell>
          <table:table-cell table:formula="of:=[.D2866]-[.D286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table:formula="of:=[.B2865]+7" office:value-type="float" office:value="20055" calcext:value-type="float">
            <text:p>20055</text:p>
          </table:table-cell>
          <table:table-cell office:value-type="float" office:value="8640000" calcext:value-type="float">
            <text:p>8640000</text:p>
          </table:table-cell>
          <table:table-cell table:formula="of:=[.B2866]/[.C2866]" office:value-type="float" office:value="0.00232118055555556" calcext:value-type="float">
            <text:p>0,00232118055555556000</text:p>
          </table:table-cell>
          <table:table-cell table:formula="of:=[.D2867]-[.D286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table:formula="of:=[.B2866]+7" office:value-type="float" office:value="20062" calcext:value-type="float">
            <text:p>20062</text:p>
          </table:table-cell>
          <table:table-cell office:value-type="float" office:value="8640000" calcext:value-type="float">
            <text:p>8640000</text:p>
          </table:table-cell>
          <table:table-cell table:formula="of:=[.B2867]/[.C2867]" office:value-type="float" office:value="0.00232199074074074" calcext:value-type="float">
            <text:p>0,00232199074074074000</text:p>
          </table:table-cell>
          <table:table-cell table:formula="of:=[.D2868]-[.D286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table:formula="of:=[.B2867]+7" office:value-type="float" office:value="20069" calcext:value-type="float">
            <text:p>20069</text:p>
          </table:table-cell>
          <table:table-cell office:value-type="float" office:value="8640000" calcext:value-type="float">
            <text:p>8640000</text:p>
          </table:table-cell>
          <table:table-cell table:formula="of:=[.B2868]/[.C2868]" office:value-type="float" office:value="0.00232280092592593" calcext:value-type="float">
            <text:p>0,00232280092592593000</text:p>
          </table:table-cell>
          <table:table-cell table:formula="of:=[.D2869]-[.D286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table:formula="of:=[.B2868]+7" office:value-type="float" office:value="20076" calcext:value-type="float">
            <text:p>20076</text:p>
          </table:table-cell>
          <table:table-cell office:value-type="float" office:value="8640000" calcext:value-type="float">
            <text:p>8640000</text:p>
          </table:table-cell>
          <table:table-cell table:formula="of:=[.B2869]/[.C2869]" office:value-type="float" office:value="0.00232361111111111" calcext:value-type="float">
            <text:p>0,00232361111111111000</text:p>
          </table:table-cell>
          <table:table-cell table:formula="of:=[.D2870]-[.D286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table:formula="of:=[.B2869]+7" office:value-type="float" office:value="20083" calcext:value-type="float">
            <text:p>20083</text:p>
          </table:table-cell>
          <table:table-cell office:value-type="float" office:value="8640000" calcext:value-type="float">
            <text:p>8640000</text:p>
          </table:table-cell>
          <table:table-cell table:formula="of:=[.B2870]/[.C2870]" office:value-type="float" office:value="0.0023244212962963" calcext:value-type="float">
            <text:p>0,00232442129629630000</text:p>
          </table:table-cell>
          <table:table-cell table:formula="of:=[.D2871]-[.D287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table:formula="of:=[.B2870]+7" office:value-type="float" office:value="20090" calcext:value-type="float">
            <text:p>20090</text:p>
          </table:table-cell>
          <table:table-cell office:value-type="float" office:value="8640000" calcext:value-type="float">
            <text:p>8640000</text:p>
          </table:table-cell>
          <table:table-cell table:formula="of:=[.B2871]/[.C2871]" office:value-type="float" office:value="0.00232523148148148" calcext:value-type="float">
            <text:p>0,00232523148148148000</text:p>
          </table:table-cell>
          <table:table-cell table:formula="of:=[.D2872]-[.D287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table:formula="of:=[.B2871]+7" office:value-type="float" office:value="20097" calcext:value-type="float">
            <text:p>20097</text:p>
          </table:table-cell>
          <table:table-cell office:value-type="float" office:value="8640000" calcext:value-type="float">
            <text:p>8640000</text:p>
          </table:table-cell>
          <table:table-cell table:formula="of:=[.B2872]/[.C2872]" office:value-type="float" office:value="0.00232604166666667" calcext:value-type="float">
            <text:p>0,00232604166666667000</text:p>
          </table:table-cell>
          <table:table-cell table:formula="of:=[.D2873]-[.D287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table:formula="of:=[.B2872]+7" office:value-type="float" office:value="20104" calcext:value-type="float">
            <text:p>20104</text:p>
          </table:table-cell>
          <table:table-cell office:value-type="float" office:value="8640000" calcext:value-type="float">
            <text:p>8640000</text:p>
          </table:table-cell>
          <table:table-cell table:formula="of:=[.B2873]/[.C2873]" office:value-type="float" office:value="0.00232685185185185" calcext:value-type="float">
            <text:p>0,00232685185185185000</text:p>
          </table:table-cell>
          <table:table-cell table:formula="of:=[.D2874]-[.D287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table:formula="of:=[.B2873]+7" office:value-type="float" office:value="20111" calcext:value-type="float">
            <text:p>20111</text:p>
          </table:table-cell>
          <table:table-cell office:value-type="float" office:value="8640000" calcext:value-type="float">
            <text:p>8640000</text:p>
          </table:table-cell>
          <table:table-cell table:formula="of:=[.B2874]/[.C2874]" office:value-type="float" office:value="0.00232766203703704" calcext:value-type="float">
            <text:p>0,00232766203703704000</text:p>
          </table:table-cell>
          <table:table-cell table:formula="of:=[.D2875]-[.D287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table:formula="of:=[.B2874]+7" office:value-type="float" office:value="20118" calcext:value-type="float">
            <text:p>20118</text:p>
          </table:table-cell>
          <table:table-cell office:value-type="float" office:value="8640000" calcext:value-type="float">
            <text:p>8640000</text:p>
          </table:table-cell>
          <table:table-cell table:formula="of:=[.B2875]/[.C2875]" office:value-type="float" office:value="0.00232847222222222" calcext:value-type="float">
            <text:p>0,00232847222222222000</text:p>
          </table:table-cell>
          <table:table-cell table:formula="of:=[.D2876]-[.D287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table:formula="of:=[.B2875]+7" office:value-type="float" office:value="20125" calcext:value-type="float">
            <text:p>20125</text:p>
          </table:table-cell>
          <table:table-cell office:value-type="float" office:value="8640000" calcext:value-type="float">
            <text:p>8640000</text:p>
          </table:table-cell>
          <table:table-cell table:formula="of:=[.B2876]/[.C2876]" office:value-type="float" office:value="0.00232928240740741" calcext:value-type="float">
            <text:p>0,00232928240740741000</text:p>
          </table:table-cell>
          <table:table-cell table:formula="of:=[.D2877]-[.D287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table:formula="of:=[.B2876]+7" office:value-type="float" office:value="20132" calcext:value-type="float">
            <text:p>20132</text:p>
          </table:table-cell>
          <table:table-cell office:value-type="float" office:value="8640000" calcext:value-type="float">
            <text:p>8640000</text:p>
          </table:table-cell>
          <table:table-cell table:formula="of:=[.B2877]/[.C2877]" office:value-type="float" office:value="0.00233009259259259" calcext:value-type="float">
            <text:p>0,00233009259259259000</text:p>
          </table:table-cell>
          <table:table-cell table:formula="of:=[.D2878]-[.D287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table:formula="of:=[.B2877]+7" office:value-type="float" office:value="20139" calcext:value-type="float">
            <text:p>20139</text:p>
          </table:table-cell>
          <table:table-cell office:value-type="float" office:value="8640000" calcext:value-type="float">
            <text:p>8640000</text:p>
          </table:table-cell>
          <table:table-cell table:formula="of:=[.B2878]/[.C2878]" office:value-type="float" office:value="0.00233090277777778" calcext:value-type="float">
            <text:p>0,00233090277777778000</text:p>
          </table:table-cell>
          <table:table-cell table:formula="of:=[.D2879]-[.D287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table:formula="of:=[.B2878]+7" office:value-type="float" office:value="20146" calcext:value-type="float">
            <text:p>20146</text:p>
          </table:table-cell>
          <table:table-cell office:value-type="float" office:value="8640000" calcext:value-type="float">
            <text:p>8640000</text:p>
          </table:table-cell>
          <table:table-cell table:formula="of:=[.B2879]/[.C2879]" office:value-type="float" office:value="0.00233171296296296" calcext:value-type="float">
            <text:p>0,00233171296296296000</text:p>
          </table:table-cell>
          <table:table-cell table:formula="of:=[.D2880]-[.D287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table:formula="of:=[.B2879]+7" office:value-type="float" office:value="20153" calcext:value-type="float">
            <text:p>20153</text:p>
          </table:table-cell>
          <table:table-cell office:value-type="float" office:value="8640000" calcext:value-type="float">
            <text:p>8640000</text:p>
          </table:table-cell>
          <table:table-cell table:formula="of:=[.B2880]/[.C2880]" office:value-type="float" office:value="0.00233252314814815" calcext:value-type="float">
            <text:p>0,00233252314814815000</text:p>
          </table:table-cell>
          <table:table-cell table:formula="of:=[.D2881]-[.D288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table:formula="of:=[.B2880]+7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2881]/[.C2881]" office:value-type="float" office:value="0.00233333333333333" calcext:value-type="float">
            <text:p>0,00233333333333333000</text:p>
          </table:table-cell>
          <table:table-cell table:formula="of:=[.D2882]-[.D288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table:formula="of:=[.B2881]+7" office:value-type="float" office:value="20167" calcext:value-type="float">
            <text:p>20167</text:p>
          </table:table-cell>
          <table:table-cell office:value-type="float" office:value="8640000" calcext:value-type="float">
            <text:p>8640000</text:p>
          </table:table-cell>
          <table:table-cell table:formula="of:=[.B2882]/[.C2882]" office:value-type="float" office:value="0.00233414351851852" calcext:value-type="float">
            <text:p>0,00233414351851852000</text:p>
          </table:table-cell>
          <table:table-cell table:formula="of:=[.D2883]-[.D288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table:formula="of:=[.B2882]+7" office:value-type="float" office:value="20174" calcext:value-type="float">
            <text:p>20174</text:p>
          </table:table-cell>
          <table:table-cell office:value-type="float" office:value="8640000" calcext:value-type="float">
            <text:p>8640000</text:p>
          </table:table-cell>
          <table:table-cell table:formula="of:=[.B2883]/[.C2883]" office:value-type="float" office:value="0.0023349537037037" calcext:value-type="float">
            <text:p>0,00233495370370370000</text:p>
          </table:table-cell>
          <table:table-cell table:formula="of:=[.D2884]-[.D288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table:formula="of:=[.B2883]+7" office:value-type="float" office:value="20181" calcext:value-type="float">
            <text:p>20181</text:p>
          </table:table-cell>
          <table:table-cell office:value-type="float" office:value="8640000" calcext:value-type="float">
            <text:p>8640000</text:p>
          </table:table-cell>
          <table:table-cell table:formula="of:=[.B2884]/[.C2884]" office:value-type="float" office:value="0.00233576388888889" calcext:value-type="float">
            <text:p>0,00233576388888889000</text:p>
          </table:table-cell>
          <table:table-cell table:formula="of:=[.D2885]-[.D288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table:formula="of:=[.B2884]+7" office:value-type="float" office:value="20188" calcext:value-type="float">
            <text:p>20188</text:p>
          </table:table-cell>
          <table:table-cell office:value-type="float" office:value="8640000" calcext:value-type="float">
            <text:p>8640000</text:p>
          </table:table-cell>
          <table:table-cell table:formula="of:=[.B2885]/[.C2885]" office:value-type="float" office:value="0.00233657407407407" calcext:value-type="float">
            <text:p>0,00233657407407407000</text:p>
          </table:table-cell>
          <table:table-cell table:formula="of:=[.D2886]-[.D288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[.B2885]+7" office:value-type="float" office:value="20195" calcext:value-type="float">
            <text:p>20195</text:p>
          </table:table-cell>
          <table:table-cell office:value-type="float" office:value="8640000" calcext:value-type="float">
            <text:p>8640000</text:p>
          </table:table-cell>
          <table:table-cell table:formula="of:=[.B2886]/[.C2886]" office:value-type="float" office:value="0.00233738425925926" calcext:value-type="float">
            <text:p>0,00233738425925926000</text:p>
          </table:table-cell>
          <table:table-cell table:formula="of:=[.D2887]-[.D288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table:formula="of:=[.B2886]+7" office:value-type="float" office:value="20202" calcext:value-type="float">
            <text:p>20202</text:p>
          </table:table-cell>
          <table:table-cell office:value-type="float" office:value="8640000" calcext:value-type="float">
            <text:p>8640000</text:p>
          </table:table-cell>
          <table:table-cell table:formula="of:=[.B2887]/[.C2887]" office:value-type="float" office:value="0.00233819444444444" calcext:value-type="float">
            <text:p>0,00233819444444444000</text:p>
          </table:table-cell>
          <table:table-cell table:formula="of:=[.D2888]-[.D288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table:formula="of:=[.B2887]+7" office:value-type="float" office:value="20209" calcext:value-type="float">
            <text:p>20209</text:p>
          </table:table-cell>
          <table:table-cell office:value-type="float" office:value="8640000" calcext:value-type="float">
            <text:p>8640000</text:p>
          </table:table-cell>
          <table:table-cell table:formula="of:=[.B2888]/[.C2888]" office:value-type="float" office:value="0.00233900462962963" calcext:value-type="float">
            <text:p>0,00233900462962963000</text:p>
          </table:table-cell>
          <table:table-cell table:formula="of:=[.D2889]-[.D288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table:formula="of:=[.B2888]+7" office:value-type="float" office:value="20216" calcext:value-type="float">
            <text:p>20216</text:p>
          </table:table-cell>
          <table:table-cell office:value-type="float" office:value="8640000" calcext:value-type="float">
            <text:p>8640000</text:p>
          </table:table-cell>
          <table:table-cell table:formula="of:=[.B2889]/[.C2889]" office:value-type="float" office:value="0.00233981481481482" calcext:value-type="float">
            <text:p>0,00233981481481482000</text:p>
          </table:table-cell>
          <table:table-cell table:formula="of:=[.D2890]-[.D288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table:formula="of:=[.B2889]+7" office:value-type="float" office:value="20223" calcext:value-type="float">
            <text:p>20223</text:p>
          </table:table-cell>
          <table:table-cell office:value-type="float" office:value="8640000" calcext:value-type="float">
            <text:p>8640000</text:p>
          </table:table-cell>
          <table:table-cell table:formula="of:=[.B2890]/[.C2890]" office:value-type="float" office:value="0.002340625" calcext:value-type="float">
            <text:p>0,00234062500000000000</text:p>
          </table:table-cell>
          <table:table-cell table:formula="of:=[.D2891]-[.D289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table:formula="of:=[.B2890]+7" office:value-type="float" office:value="20230" calcext:value-type="float">
            <text:p>20230</text:p>
          </table:table-cell>
          <table:table-cell office:value-type="float" office:value="8640000" calcext:value-type="float">
            <text:p>8640000</text:p>
          </table:table-cell>
          <table:table-cell table:formula="of:=[.B2891]/[.C2891]" office:value-type="float" office:value="0.00234143518518519" calcext:value-type="float">
            <text:p>0,00234143518518519000</text:p>
          </table:table-cell>
          <table:table-cell table:formula="of:=[.D2892]-[.D289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table:formula="of:=[.B2891]+7" office:value-type="float" office:value="20237" calcext:value-type="float">
            <text:p>20237</text:p>
          </table:table-cell>
          <table:table-cell office:value-type="float" office:value="8640000" calcext:value-type="float">
            <text:p>8640000</text:p>
          </table:table-cell>
          <table:table-cell table:formula="of:=[.B2892]/[.C2892]" office:value-type="float" office:value="0.00234224537037037" calcext:value-type="float">
            <text:p>0,00234224537037037000</text:p>
          </table:table-cell>
          <table:table-cell table:formula="of:=[.D2893]-[.D289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[.B2892]+7" office:value-type="float" office:value="20244" calcext:value-type="float">
            <text:p>20244</text:p>
          </table:table-cell>
          <table:table-cell office:value-type="float" office:value="8640000" calcext:value-type="float">
            <text:p>8640000</text:p>
          </table:table-cell>
          <table:table-cell table:formula="of:=[.B2893]/[.C2893]" office:value-type="float" office:value="0.00234305555555556" calcext:value-type="float">
            <text:p>0,00234305555555556000</text:p>
          </table:table-cell>
          <table:table-cell table:formula="of:=[.D2894]-[.D289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table:formula="of:=[.B2893]+7" office:value-type="float" office:value="20251" calcext:value-type="float">
            <text:p>20251</text:p>
          </table:table-cell>
          <table:table-cell office:value-type="float" office:value="8640000" calcext:value-type="float">
            <text:p>8640000</text:p>
          </table:table-cell>
          <table:table-cell table:formula="of:=[.B2894]/[.C2894]" office:value-type="float" office:value="0.00234386574074074" calcext:value-type="float">
            <text:p>0,00234386574074074000</text:p>
          </table:table-cell>
          <table:table-cell table:formula="of:=[.D2895]-[.D289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table:formula="of:=[.B2894]+7" office:value-type="float" office:value="20258" calcext:value-type="float">
            <text:p>20258</text:p>
          </table:table-cell>
          <table:table-cell office:value-type="float" office:value="8640000" calcext:value-type="float">
            <text:p>8640000</text:p>
          </table:table-cell>
          <table:table-cell table:formula="of:=[.B2895]/[.C2895]" office:value-type="float" office:value="0.00234467592592593" calcext:value-type="float">
            <text:p>0,00234467592592593000</text:p>
          </table:table-cell>
          <table:table-cell table:formula="of:=[.D2896]-[.D289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table:formula="of:=[.B2895]+7" office:value-type="float" office:value="20265" calcext:value-type="float">
            <text:p>20265</text:p>
          </table:table-cell>
          <table:table-cell office:value-type="float" office:value="8640000" calcext:value-type="float">
            <text:p>8640000</text:p>
          </table:table-cell>
          <table:table-cell table:formula="of:=[.B2896]/[.C2896]" office:value-type="float" office:value="0.00234548611111111" calcext:value-type="float">
            <text:p>0,00234548611111111000</text:p>
          </table:table-cell>
          <table:table-cell table:formula="of:=[.D2897]-[.D289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table:formula="of:=[.B2896]+7" office:value-type="float" office:value="20272" calcext:value-type="float">
            <text:p>20272</text:p>
          </table:table-cell>
          <table:table-cell office:value-type="float" office:value="8640000" calcext:value-type="float">
            <text:p>8640000</text:p>
          </table:table-cell>
          <table:table-cell table:formula="of:=[.B2897]/[.C2897]" office:value-type="float" office:value="0.0023462962962963" calcext:value-type="float">
            <text:p>0,00234629629629630000</text:p>
          </table:table-cell>
          <table:table-cell table:formula="of:=[.D2898]-[.D289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table:formula="of:=[.B2897]+7" office:value-type="float" office:value="20279" calcext:value-type="float">
            <text:p>20279</text:p>
          </table:table-cell>
          <table:table-cell office:value-type="float" office:value="8640000" calcext:value-type="float">
            <text:p>8640000</text:p>
          </table:table-cell>
          <table:table-cell table:formula="of:=[.B2898]/[.C2898]" office:value-type="float" office:value="0.00234710648148148" calcext:value-type="float">
            <text:p>0,00234710648148148000</text:p>
          </table:table-cell>
          <table:table-cell table:formula="of:=[.D2899]-[.D289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table:formula="of:=[.B2898]+7" office:value-type="float" office:value="20286" calcext:value-type="float">
            <text:p>20286</text:p>
          </table:table-cell>
          <table:table-cell office:value-type="float" office:value="8640000" calcext:value-type="float">
            <text:p>8640000</text:p>
          </table:table-cell>
          <table:table-cell table:formula="of:=[.B2899]/[.C2899]" office:value-type="float" office:value="0.00234791666666667" calcext:value-type="float">
            <text:p>0,00234791666666667000</text:p>
          </table:table-cell>
          <table:table-cell table:formula="of:=[.D2900]-[.D289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table:formula="of:=[.B2899]+7" office:value-type="float" office:value="20293" calcext:value-type="float">
            <text:p>20293</text:p>
          </table:table-cell>
          <table:table-cell office:value-type="float" office:value="8640000" calcext:value-type="float">
            <text:p>8640000</text:p>
          </table:table-cell>
          <table:table-cell table:formula="of:=[.B2900]/[.C2900]" office:value-type="float" office:value="0.00234872685185185" calcext:value-type="float">
            <text:p>0,00234872685185185000</text:p>
          </table:table-cell>
          <table:table-cell table:formula="of:=[.D2901]-[.D290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formula="of:=[.B2900]+7" office:value-type="float" office:value="20300" calcext:value-type="float">
            <text:p>20300</text:p>
          </table:table-cell>
          <table:table-cell office:value-type="float" office:value="8640000" calcext:value-type="float">
            <text:p>8640000</text:p>
          </table:table-cell>
          <table:table-cell table:formula="of:=[.B2901]/[.C2901]" office:value-type="float" office:value="0.00234953703703704" calcext:value-type="float">
            <text:p>0,00234953703703704000</text:p>
          </table:table-cell>
          <table:table-cell table:formula="of:=[.D2902]-[.D290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table:formula="of:=[.B2901]+7" office:value-type="float" office:value="20307" calcext:value-type="float">
            <text:p>20307</text:p>
          </table:table-cell>
          <table:table-cell office:value-type="float" office:value="8640000" calcext:value-type="float">
            <text:p>8640000</text:p>
          </table:table-cell>
          <table:table-cell table:formula="of:=[.B2902]/[.C2902]" office:value-type="float" office:value="0.00235034722222222" calcext:value-type="float">
            <text:p>0,00235034722222222000</text:p>
          </table:table-cell>
          <table:table-cell table:formula="of:=[.D2903]-[.D290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table:formula="of:=[.B2902]+7" office:value-type="float" office:value="20314" calcext:value-type="float">
            <text:p>20314</text:p>
          </table:table-cell>
          <table:table-cell office:value-type="float" office:value="8640000" calcext:value-type="float">
            <text:p>8640000</text:p>
          </table:table-cell>
          <table:table-cell table:formula="of:=[.B2903]/[.C2903]" office:value-type="float" office:value="0.00235115740740741" calcext:value-type="float">
            <text:p>0,00235115740740741000</text:p>
          </table:table-cell>
          <table:table-cell table:formula="of:=[.D2904]-[.D290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table:formula="of:=[.B2903]+7" office:value-type="float" office:value="20321" calcext:value-type="float">
            <text:p>20321</text:p>
          </table:table-cell>
          <table:table-cell office:value-type="float" office:value="8640000" calcext:value-type="float">
            <text:p>8640000</text:p>
          </table:table-cell>
          <table:table-cell table:formula="of:=[.B2904]/[.C2904]" office:value-type="float" office:value="0.00235196759259259" calcext:value-type="float">
            <text:p>0,00235196759259259000</text:p>
          </table:table-cell>
          <table:table-cell table:formula="of:=[.D2905]-[.D290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table:formula="of:=[.B2904]+7" office:value-type="float" office:value="20328" calcext:value-type="float">
            <text:p>20328</text:p>
          </table:table-cell>
          <table:table-cell office:value-type="float" office:value="8640000" calcext:value-type="float">
            <text:p>8640000</text:p>
          </table:table-cell>
          <table:table-cell table:formula="of:=[.B2905]/[.C2905]" office:value-type="float" office:value="0.00235277777777778" calcext:value-type="float">
            <text:p>0,00235277777777778000</text:p>
          </table:table-cell>
          <table:table-cell table:formula="of:=[.D2906]-[.D290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table:formula="of:=[.B2905]+7" office:value-type="float" office:value="20335" calcext:value-type="float">
            <text:p>20335</text:p>
          </table:table-cell>
          <table:table-cell office:value-type="float" office:value="8640000" calcext:value-type="float">
            <text:p>8640000</text:p>
          </table:table-cell>
          <table:table-cell table:formula="of:=[.B2906]/[.C2906]" office:value-type="float" office:value="0.00235358796296296" calcext:value-type="float">
            <text:p>0,00235358796296296000</text:p>
          </table:table-cell>
          <table:table-cell table:formula="of:=[.D2907]-[.D290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table:formula="of:=[.B2906]+7" office:value-type="float" office:value="20342" calcext:value-type="float">
            <text:p>20342</text:p>
          </table:table-cell>
          <table:table-cell office:value-type="float" office:value="8640000" calcext:value-type="float">
            <text:p>8640000</text:p>
          </table:table-cell>
          <table:table-cell table:formula="of:=[.B2907]/[.C2907]" office:value-type="float" office:value="0.00235439814814815" calcext:value-type="float">
            <text:p>0,00235439814814815000</text:p>
          </table:table-cell>
          <table:table-cell table:formula="of:=[.D2908]-[.D290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table:formula="of:=[.B2907]+7" office:value-type="float" office:value="20349" calcext:value-type="float">
            <text:p>20349</text:p>
          </table:table-cell>
          <table:table-cell office:value-type="float" office:value="8640000" calcext:value-type="float">
            <text:p>8640000</text:p>
          </table:table-cell>
          <table:table-cell table:formula="of:=[.B2908]/[.C2908]" office:value-type="float" office:value="0.00235520833333333" calcext:value-type="float">
            <text:p>0,00235520833333333000</text:p>
          </table:table-cell>
          <table:table-cell table:formula="of:=[.D2909]-[.D290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table:formula="of:=[.B2908]+7" office:value-type="float" office:value="20356" calcext:value-type="float">
            <text:p>20356</text:p>
          </table:table-cell>
          <table:table-cell office:value-type="float" office:value="8640000" calcext:value-type="float">
            <text:p>8640000</text:p>
          </table:table-cell>
          <table:table-cell table:formula="of:=[.B2909]/[.C2909]" office:value-type="float" office:value="0.00235601851851852" calcext:value-type="float">
            <text:p>0,00235601851851852000</text:p>
          </table:table-cell>
          <table:table-cell table:formula="of:=[.D2910]-[.D290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table:formula="of:=[.B2909]+7" office:value-type="float" office:value="20363" calcext:value-type="float">
            <text:p>20363</text:p>
          </table:table-cell>
          <table:table-cell office:value-type="float" office:value="8640000" calcext:value-type="float">
            <text:p>8640000</text:p>
          </table:table-cell>
          <table:table-cell table:formula="of:=[.B2910]/[.C2910]" office:value-type="float" office:value="0.0023568287037037" calcext:value-type="float">
            <text:p>0,00235682870370370000</text:p>
          </table:table-cell>
          <table:table-cell table:formula="of:=[.D2911]-[.D291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table:formula="of:=[.B2910]+7" office:value-type="float" office:value="20370" calcext:value-type="float">
            <text:p>20370</text:p>
          </table:table-cell>
          <table:table-cell office:value-type="float" office:value="8640000" calcext:value-type="float">
            <text:p>8640000</text:p>
          </table:table-cell>
          <table:table-cell table:formula="of:=[.B2911]/[.C2911]" office:value-type="float" office:value="0.00235763888888889" calcext:value-type="float">
            <text:p>0,00235763888888889000</text:p>
          </table:table-cell>
          <table:table-cell table:formula="of:=[.D2912]-[.D291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table:formula="of:=[.B2911]+7" office:value-type="float" office:value="20377" calcext:value-type="float">
            <text:p>20377</text:p>
          </table:table-cell>
          <table:table-cell office:value-type="float" office:value="8640000" calcext:value-type="float">
            <text:p>8640000</text:p>
          </table:table-cell>
          <table:table-cell table:formula="of:=[.B2912]/[.C2912]" office:value-type="float" office:value="0.00235844907407407" calcext:value-type="float">
            <text:p>0,00235844907407407000</text:p>
          </table:table-cell>
          <table:table-cell table:formula="of:=[.D2913]-[.D291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table:formula="of:=[.B2912]+7" office:value-type="float" office:value="20384" calcext:value-type="float">
            <text:p>20384</text:p>
          </table:table-cell>
          <table:table-cell office:value-type="float" office:value="8640000" calcext:value-type="float">
            <text:p>8640000</text:p>
          </table:table-cell>
          <table:table-cell table:formula="of:=[.B2913]/[.C2913]" office:value-type="float" office:value="0.00235925925925926" calcext:value-type="float">
            <text:p>0,00235925925925926000</text:p>
          </table:table-cell>
          <table:table-cell table:formula="of:=[.D2914]-[.D291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table:formula="of:=[.B2913]+7" office:value-type="float" office:value="20391" calcext:value-type="float">
            <text:p>20391</text:p>
          </table:table-cell>
          <table:table-cell office:value-type="float" office:value="8640000" calcext:value-type="float">
            <text:p>8640000</text:p>
          </table:table-cell>
          <table:table-cell table:formula="of:=[.B2914]/[.C2914]" office:value-type="float" office:value="0.00236006944444444" calcext:value-type="float">
            <text:p>0,00236006944444444000</text:p>
          </table:table-cell>
          <table:table-cell table:formula="of:=[.D2915]-[.D291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[.B2914]+7" office:value-type="float" office:value="20398" calcext:value-type="float">
            <text:p>20398</text:p>
          </table:table-cell>
          <table:table-cell office:value-type="float" office:value="8640000" calcext:value-type="float">
            <text:p>8640000</text:p>
          </table:table-cell>
          <table:table-cell table:formula="of:=[.B2915]/[.C2915]" office:value-type="float" office:value="0.00236087962962963" calcext:value-type="float">
            <text:p>0,00236087962962963000</text:p>
          </table:table-cell>
          <table:table-cell table:formula="of:=[.D2916]-[.D291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table:formula="of:=[.B2915]+7" office:value-type="float" office:value="20405" calcext:value-type="float">
            <text:p>20405</text:p>
          </table:table-cell>
          <table:table-cell office:value-type="float" office:value="8640000" calcext:value-type="float">
            <text:p>8640000</text:p>
          </table:table-cell>
          <table:table-cell table:formula="of:=[.B2916]/[.C2916]" office:value-type="float" office:value="0.00236168981481481" calcext:value-type="float">
            <text:p>0,00236168981481481000</text:p>
          </table:table-cell>
          <table:table-cell table:formula="of:=[.D2917]-[.D291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table:formula="of:=[.B2916]+7" office:value-type="float" office:value="20412" calcext:value-type="float">
            <text:p>20412</text:p>
          </table:table-cell>
          <table:table-cell office:value-type="float" office:value="8640000" calcext:value-type="float">
            <text:p>8640000</text:p>
          </table:table-cell>
          <table:table-cell table:formula="of:=[.B2917]/[.C2917]" office:value-type="float" office:value="0.0023625" calcext:value-type="float">
            <text:p>0,00236250000000000000</text:p>
          </table:table-cell>
          <table:table-cell table:formula="of:=[.D2918]-[.D291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table:formula="of:=[.B2917]+7" office:value-type="float" office:value="20419" calcext:value-type="float">
            <text:p>20419</text:p>
          </table:table-cell>
          <table:table-cell office:value-type="float" office:value="8640000" calcext:value-type="float">
            <text:p>8640000</text:p>
          </table:table-cell>
          <table:table-cell table:formula="of:=[.B2918]/[.C2918]" office:value-type="float" office:value="0.00236331018518519" calcext:value-type="float">
            <text:p>0,00236331018518519000</text:p>
          </table:table-cell>
          <table:table-cell table:formula="of:=[.D2919]-[.D291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table:formula="of:=[.B2918]+7" office:value-type="float" office:value="20426" calcext:value-type="float">
            <text:p>20426</text:p>
          </table:table-cell>
          <table:table-cell office:value-type="float" office:value="8640000" calcext:value-type="float">
            <text:p>8640000</text:p>
          </table:table-cell>
          <table:table-cell table:formula="of:=[.B2919]/[.C2919]" office:value-type="float" office:value="0.00236412037037037" calcext:value-type="float">
            <text:p>0,00236412037037037000</text:p>
          </table:table-cell>
          <table:table-cell table:formula="of:=[.D2920]-[.D291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table:formula="of:=[.B2919]+7" office:value-type="float" office:value="20433" calcext:value-type="float">
            <text:p>20433</text:p>
          </table:table-cell>
          <table:table-cell office:value-type="float" office:value="8640000" calcext:value-type="float">
            <text:p>8640000</text:p>
          </table:table-cell>
          <table:table-cell table:formula="of:=[.B2920]/[.C2920]" office:value-type="float" office:value="0.00236493055555556" calcext:value-type="float">
            <text:p>0,00236493055555556000</text:p>
          </table:table-cell>
          <table:table-cell table:formula="of:=[.D2921]-[.D292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table:formula="of:=[.B2920]+7" office:value-type="float" office:value="20440" calcext:value-type="float">
            <text:p>20440</text:p>
          </table:table-cell>
          <table:table-cell office:value-type="float" office:value="8640000" calcext:value-type="float">
            <text:p>8640000</text:p>
          </table:table-cell>
          <table:table-cell table:formula="of:=[.B2921]/[.C2921]" office:value-type="float" office:value="0.00236574074074074" calcext:value-type="float">
            <text:p>0,00236574074074074000</text:p>
          </table:table-cell>
          <table:table-cell table:formula="of:=[.D2922]-[.D292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table:formula="of:=[.B2921]+7" office:value-type="float" office:value="20447" calcext:value-type="float">
            <text:p>20447</text:p>
          </table:table-cell>
          <table:table-cell office:value-type="float" office:value="8640000" calcext:value-type="float">
            <text:p>8640000</text:p>
          </table:table-cell>
          <table:table-cell table:formula="of:=[.B2922]/[.C2922]" office:value-type="float" office:value="0.00236655092592593" calcext:value-type="float">
            <text:p>0,00236655092592593000</text:p>
          </table:table-cell>
          <table:table-cell table:formula="of:=[.D2923]-[.D292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table:formula="of:=[.B2922]+7" office:value-type="float" office:value="20454" calcext:value-type="float">
            <text:p>20454</text:p>
          </table:table-cell>
          <table:table-cell office:value-type="float" office:value="8640000" calcext:value-type="float">
            <text:p>8640000</text:p>
          </table:table-cell>
          <table:table-cell table:formula="of:=[.B2923]/[.C2923]" office:value-type="float" office:value="0.00236736111111111" calcext:value-type="float">
            <text:p>0,00236736111111111000</text:p>
          </table:table-cell>
          <table:table-cell table:formula="of:=[.D2924]-[.D292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table:formula="of:=[.B2923]+7" office:value-type="float" office:value="20461" calcext:value-type="float">
            <text:p>20461</text:p>
          </table:table-cell>
          <table:table-cell office:value-type="float" office:value="8640000" calcext:value-type="float">
            <text:p>8640000</text:p>
          </table:table-cell>
          <table:table-cell table:formula="of:=[.B2924]/[.C2924]" office:value-type="float" office:value="0.0023681712962963" calcext:value-type="float">
            <text:p>0,00236817129629630000</text:p>
          </table:table-cell>
          <table:table-cell table:formula="of:=[.D2925]-[.D292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table:formula="of:=[.B2924]+7" office:value-type="float" office:value="20468" calcext:value-type="float">
            <text:p>20468</text:p>
          </table:table-cell>
          <table:table-cell office:value-type="float" office:value="8640000" calcext:value-type="float">
            <text:p>8640000</text:p>
          </table:table-cell>
          <table:table-cell table:formula="of:=[.B2925]/[.C2925]" office:value-type="float" office:value="0.00236898148148148" calcext:value-type="float">
            <text:p>0,00236898148148148000</text:p>
          </table:table-cell>
          <table:table-cell table:formula="of:=[.D2926]-[.D292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table:formula="of:=[.B2925]+7" office:value-type="float" office:value="20475" calcext:value-type="float">
            <text:p>20475</text:p>
          </table:table-cell>
          <table:table-cell office:value-type="float" office:value="8640000" calcext:value-type="float">
            <text:p>8640000</text:p>
          </table:table-cell>
          <table:table-cell table:formula="of:=[.B2926]/[.C2926]" office:value-type="float" office:value="0.00236979166666667" calcext:value-type="float">
            <text:p>0,00236979166666667000</text:p>
          </table:table-cell>
          <table:table-cell table:formula="of:=[.D2927]-[.D292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table:formula="of:=[.B2926]+7" office:value-type="float" office:value="20482" calcext:value-type="float">
            <text:p>20482</text:p>
          </table:table-cell>
          <table:table-cell office:value-type="float" office:value="8640000" calcext:value-type="float">
            <text:p>8640000</text:p>
          </table:table-cell>
          <table:table-cell table:formula="of:=[.B2927]/[.C2927]" office:value-type="float" office:value="0.00237060185185185" calcext:value-type="float">
            <text:p>0,00237060185185185000</text:p>
          </table:table-cell>
          <table:table-cell table:formula="of:=[.D2928]-[.D292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table:formula="of:=[.B2927]+7" office:value-type="float" office:value="20489" calcext:value-type="float">
            <text:p>20489</text:p>
          </table:table-cell>
          <table:table-cell office:value-type="float" office:value="8640000" calcext:value-type="float">
            <text:p>8640000</text:p>
          </table:table-cell>
          <table:table-cell table:formula="of:=[.B2928]/[.C2928]" office:value-type="float" office:value="0.00237141203703704" calcext:value-type="float">
            <text:p>0,00237141203703704000</text:p>
          </table:table-cell>
          <table:table-cell table:formula="of:=[.D2929]-[.D292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table:formula="of:=[.B2928]+7" office:value-type="float" office:value="20496" calcext:value-type="float">
            <text:p>20496</text:p>
          </table:table-cell>
          <table:table-cell office:value-type="float" office:value="8640000" calcext:value-type="float">
            <text:p>8640000</text:p>
          </table:table-cell>
          <table:table-cell table:formula="of:=[.B2929]/[.C2929]" office:value-type="float" office:value="0.00237222222222222" calcext:value-type="float">
            <text:p>0,00237222222222222000</text:p>
          </table:table-cell>
          <table:table-cell table:formula="of:=[.D2930]-[.D292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table:formula="of:=[.B2929]+7" office:value-type="float" office:value="20503" calcext:value-type="float">
            <text:p>20503</text:p>
          </table:table-cell>
          <table:table-cell office:value-type="float" office:value="8640000" calcext:value-type="float">
            <text:p>8640000</text:p>
          </table:table-cell>
          <table:table-cell table:formula="of:=[.B2930]/[.C2930]" office:value-type="float" office:value="0.00237303240740741" calcext:value-type="float">
            <text:p>0,00237303240740741000</text:p>
          </table:table-cell>
          <table:table-cell table:formula="of:=[.D2931]-[.D293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table:formula="of:=[.B2930]+7" office:value-type="float" office:value="20510" calcext:value-type="float">
            <text:p>20510</text:p>
          </table:table-cell>
          <table:table-cell office:value-type="float" office:value="8640000" calcext:value-type="float">
            <text:p>8640000</text:p>
          </table:table-cell>
          <table:table-cell table:formula="of:=[.B2931]/[.C2931]" office:value-type="float" office:value="0.00237384259259259" calcext:value-type="float">
            <text:p>0,00237384259259259000</text:p>
          </table:table-cell>
          <table:table-cell table:formula="of:=[.D2932]-[.D293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table:formula="of:=[.B2931]+7" office:value-type="float" office:value="20517" calcext:value-type="float">
            <text:p>20517</text:p>
          </table:table-cell>
          <table:table-cell office:value-type="float" office:value="8640000" calcext:value-type="float">
            <text:p>8640000</text:p>
          </table:table-cell>
          <table:table-cell table:formula="of:=[.B2932]/[.C2932]" office:value-type="float" office:value="0.00237465277777778" calcext:value-type="float">
            <text:p>0,00237465277777778000</text:p>
          </table:table-cell>
          <table:table-cell table:formula="of:=[.D2933]-[.D293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table:formula="of:=[.B2932]+7" office:value-type="float" office:value="20524" calcext:value-type="float">
            <text:p>20524</text:p>
          </table:table-cell>
          <table:table-cell office:value-type="float" office:value="8640000" calcext:value-type="float">
            <text:p>8640000</text:p>
          </table:table-cell>
          <table:table-cell table:formula="of:=[.B2933]/[.C2933]" office:value-type="float" office:value="0.00237546296296296" calcext:value-type="float">
            <text:p>0,00237546296296296000</text:p>
          </table:table-cell>
          <table:table-cell table:formula="of:=[.D2934]-[.D293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table:formula="of:=[.B2933]+7" office:value-type="float" office:value="20531" calcext:value-type="float">
            <text:p>20531</text:p>
          </table:table-cell>
          <table:table-cell office:value-type="float" office:value="8640000" calcext:value-type="float">
            <text:p>8640000</text:p>
          </table:table-cell>
          <table:table-cell table:formula="of:=[.B2934]/[.C2934]" office:value-type="float" office:value="0.00237627314814815" calcext:value-type="float">
            <text:p>0,00237627314814815000</text:p>
          </table:table-cell>
          <table:table-cell table:formula="of:=[.D2935]-[.D293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table:formula="of:=[.B2934]+7" office:value-type="float" office:value="20538" calcext:value-type="float">
            <text:p>20538</text:p>
          </table:table-cell>
          <table:table-cell office:value-type="float" office:value="8640000" calcext:value-type="float">
            <text:p>8640000</text:p>
          </table:table-cell>
          <table:table-cell table:formula="of:=[.B2935]/[.C2935]" office:value-type="float" office:value="0.00237708333333333" calcext:value-type="float">
            <text:p>0,00237708333333333000</text:p>
          </table:table-cell>
          <table:table-cell table:formula="of:=[.D2936]-[.D293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table:formula="of:=[.B2935]+7" office:value-type="float" office:value="20545" calcext:value-type="float">
            <text:p>20545</text:p>
          </table:table-cell>
          <table:table-cell office:value-type="float" office:value="8640000" calcext:value-type="float">
            <text:p>8640000</text:p>
          </table:table-cell>
          <table:table-cell table:formula="of:=[.B2936]/[.C2936]" office:value-type="float" office:value="0.00237789351851852" calcext:value-type="float">
            <text:p>0,00237789351851852000</text:p>
          </table:table-cell>
          <table:table-cell table:formula="of:=[.D2937]-[.D293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table:formula="of:=[.B2936]+7" office:value-type="float" office:value="20552" calcext:value-type="float">
            <text:p>20552</text:p>
          </table:table-cell>
          <table:table-cell office:value-type="float" office:value="8640000" calcext:value-type="float">
            <text:p>8640000</text:p>
          </table:table-cell>
          <table:table-cell table:formula="of:=[.B2937]/[.C2937]" office:value-type="float" office:value="0.0023787037037037" calcext:value-type="float">
            <text:p>0,00237870370370370000</text:p>
          </table:table-cell>
          <table:table-cell table:formula="of:=[.D2938]-[.D293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table:formula="of:=[.B2937]+7" office:value-type="float" office:value="20559" calcext:value-type="float">
            <text:p>20559</text:p>
          </table:table-cell>
          <table:table-cell office:value-type="float" office:value="8640000" calcext:value-type="float">
            <text:p>8640000</text:p>
          </table:table-cell>
          <table:table-cell table:formula="of:=[.B2938]/[.C2938]" office:value-type="float" office:value="0.00237951388888889" calcext:value-type="float">
            <text:p>0,00237951388888889000</text:p>
          </table:table-cell>
          <table:table-cell table:formula="of:=[.D2939]-[.D293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table:formula="of:=[.B2938]+7" office:value-type="float" office:value="20566" calcext:value-type="float">
            <text:p>20566</text:p>
          </table:table-cell>
          <table:table-cell office:value-type="float" office:value="8640000" calcext:value-type="float">
            <text:p>8640000</text:p>
          </table:table-cell>
          <table:table-cell table:formula="of:=[.B2939]/[.C2939]" office:value-type="float" office:value="0.00238032407407407" calcext:value-type="float">
            <text:p>0,00238032407407407000</text:p>
          </table:table-cell>
          <table:table-cell table:formula="of:=[.D2940]-[.D293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table:formula="of:=[.B2939]+7" office:value-type="float" office:value="20573" calcext:value-type="float">
            <text:p>20573</text:p>
          </table:table-cell>
          <table:table-cell office:value-type="float" office:value="8640000" calcext:value-type="float">
            <text:p>8640000</text:p>
          </table:table-cell>
          <table:table-cell table:formula="of:=[.B2940]/[.C2940]" office:value-type="float" office:value="0.00238113425925926" calcext:value-type="float">
            <text:p>0,00238113425925926000</text:p>
          </table:table-cell>
          <table:table-cell table:formula="of:=[.D2941]-[.D294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[.B2940]+7" office:value-type="float" office:value="20580" calcext:value-type="float">
            <text:p>20580</text:p>
          </table:table-cell>
          <table:table-cell office:value-type="float" office:value="8640000" calcext:value-type="float">
            <text:p>8640000</text:p>
          </table:table-cell>
          <table:table-cell table:formula="of:=[.B2941]/[.C2941]" office:value-type="float" office:value="0.00238194444444444" calcext:value-type="float">
            <text:p>0,00238194444444444000</text:p>
          </table:table-cell>
          <table:table-cell table:formula="of:=[.D2942]-[.D294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table:formula="of:=[.B2941]+7" office:value-type="float" office:value="20587" calcext:value-type="float">
            <text:p>20587</text:p>
          </table:table-cell>
          <table:table-cell office:value-type="float" office:value="8640000" calcext:value-type="float">
            <text:p>8640000</text:p>
          </table:table-cell>
          <table:table-cell table:formula="of:=[.B2942]/[.C2942]" office:value-type="float" office:value="0.00238275462962963" calcext:value-type="float">
            <text:p>0,00238275462962963000</text:p>
          </table:table-cell>
          <table:table-cell table:formula="of:=[.D2943]-[.D294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table:formula="of:=[.B2942]+7" office:value-type="float" office:value="20594" calcext:value-type="float">
            <text:p>20594</text:p>
          </table:table-cell>
          <table:table-cell office:value-type="float" office:value="8640000" calcext:value-type="float">
            <text:p>8640000</text:p>
          </table:table-cell>
          <table:table-cell table:formula="of:=[.B2943]/[.C2943]" office:value-type="float" office:value="0.00238356481481482" calcext:value-type="float">
            <text:p>0,00238356481481482000</text:p>
          </table:table-cell>
          <table:table-cell table:formula="of:=[.D2944]-[.D294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table:formula="of:=[.B2943]+7" office:value-type="float" office:value="20601" calcext:value-type="float">
            <text:p>20601</text:p>
          </table:table-cell>
          <table:table-cell office:value-type="float" office:value="8640000" calcext:value-type="float">
            <text:p>8640000</text:p>
          </table:table-cell>
          <table:table-cell table:formula="of:=[.B2944]/[.C2944]" office:value-type="float" office:value="0.002384375" calcext:value-type="float">
            <text:p>0,00238437500000000000</text:p>
          </table:table-cell>
          <table:table-cell table:formula="of:=[.D2945]-[.D294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table:formula="of:=[.B2944]+7" office:value-type="float" office:value="20608" calcext:value-type="float">
            <text:p>20608</text:p>
          </table:table-cell>
          <table:table-cell office:value-type="float" office:value="8640000" calcext:value-type="float">
            <text:p>8640000</text:p>
          </table:table-cell>
          <table:table-cell table:formula="of:=[.B2945]/[.C2945]" office:value-type="float" office:value="0.00238518518518519" calcext:value-type="float">
            <text:p>0,00238518518518519000</text:p>
          </table:table-cell>
          <table:table-cell table:formula="of:=[.D2946]-[.D294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table:formula="of:=[.B2945]+7" office:value-type="float" office:value="20615" calcext:value-type="float">
            <text:p>20615</text:p>
          </table:table-cell>
          <table:table-cell office:value-type="float" office:value="8640000" calcext:value-type="float">
            <text:p>8640000</text:p>
          </table:table-cell>
          <table:table-cell table:formula="of:=[.B2946]/[.C2946]" office:value-type="float" office:value="0.00238599537037037" calcext:value-type="float">
            <text:p>0,00238599537037037000</text:p>
          </table:table-cell>
          <table:table-cell table:formula="of:=[.D2947]-[.D294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[.B2946]+7" office:value-type="float" office:value="20622" calcext:value-type="float">
            <text:p>20622</text:p>
          </table:table-cell>
          <table:table-cell office:value-type="float" office:value="8640000" calcext:value-type="float">
            <text:p>8640000</text:p>
          </table:table-cell>
          <table:table-cell table:formula="of:=[.B2947]/[.C2947]" office:value-type="float" office:value="0.00238680555555556" calcext:value-type="float">
            <text:p>0,00238680555555556000</text:p>
          </table:table-cell>
          <table:table-cell table:formula="of:=[.D2948]-[.D294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table:formula="of:=[.B2947]+7" office:value-type="float" office:value="20629" calcext:value-type="float">
            <text:p>20629</text:p>
          </table:table-cell>
          <table:table-cell office:value-type="float" office:value="8640000" calcext:value-type="float">
            <text:p>8640000</text:p>
          </table:table-cell>
          <table:table-cell table:formula="of:=[.B2948]/[.C2948]" office:value-type="float" office:value="0.00238761574074074" calcext:value-type="float">
            <text:p>0,00238761574074074000</text:p>
          </table:table-cell>
          <table:table-cell table:formula="of:=[.D2949]-[.D294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[.B2948]+7" office:value-type="float" office:value="20636" calcext:value-type="float">
            <text:p>20636</text:p>
          </table:table-cell>
          <table:table-cell office:value-type="float" office:value="8640000" calcext:value-type="float">
            <text:p>8640000</text:p>
          </table:table-cell>
          <table:table-cell table:formula="of:=[.B2949]/[.C2949]" office:value-type="float" office:value="0.00238842592592593" calcext:value-type="float">
            <text:p>0,00238842592592593000</text:p>
          </table:table-cell>
          <table:table-cell table:formula="of:=[.D2950]-[.D294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table:formula="of:=[.B2949]+7" office:value-type="float" office:value="20643" calcext:value-type="float">
            <text:p>20643</text:p>
          </table:table-cell>
          <table:table-cell office:value-type="float" office:value="8640000" calcext:value-type="float">
            <text:p>8640000</text:p>
          </table:table-cell>
          <table:table-cell table:formula="of:=[.B2950]/[.C2950]" office:value-type="float" office:value="0.00238923611111111" calcext:value-type="float">
            <text:p>0,00238923611111111000</text:p>
          </table:table-cell>
          <table:table-cell table:formula="of:=[.D2951]-[.D295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table:formula="of:=[.B2950]+7" office:value-type="float" office:value="20650" calcext:value-type="float">
            <text:p>20650</text:p>
          </table:table-cell>
          <table:table-cell office:value-type="float" office:value="8640000" calcext:value-type="float">
            <text:p>8640000</text:p>
          </table:table-cell>
          <table:table-cell table:formula="of:=[.B2951]/[.C2951]" office:value-type="float" office:value="0.0023900462962963" calcext:value-type="float">
            <text:p>0,00239004629629630000</text:p>
          </table:table-cell>
          <table:table-cell table:formula="of:=[.D2952]-[.D295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table:formula="of:=[.B2951]+7" office:value-type="float" office:value="20657" calcext:value-type="float">
            <text:p>20657</text:p>
          </table:table-cell>
          <table:table-cell office:value-type="float" office:value="8640000" calcext:value-type="float">
            <text:p>8640000</text:p>
          </table:table-cell>
          <table:table-cell table:formula="of:=[.B2952]/[.C2952]" office:value-type="float" office:value="0.00239085648148148" calcext:value-type="float">
            <text:p>0,00239085648148148000</text:p>
          </table:table-cell>
          <table:table-cell table:formula="of:=[.D2953]-[.D295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table:formula="of:=[.B2952]+7" office:value-type="float" office:value="20664" calcext:value-type="float">
            <text:p>20664</text:p>
          </table:table-cell>
          <table:table-cell office:value-type="float" office:value="8640000" calcext:value-type="float">
            <text:p>8640000</text:p>
          </table:table-cell>
          <table:table-cell table:formula="of:=[.B2953]/[.C2953]" office:value-type="float" office:value="0.00239166666666667" calcext:value-type="float">
            <text:p>0,00239166666666667000</text:p>
          </table:table-cell>
          <table:table-cell table:formula="of:=[.D2954]-[.D295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table:formula="of:=[.B2953]+7" office:value-type="float" office:value="20671" calcext:value-type="float">
            <text:p>20671</text:p>
          </table:table-cell>
          <table:table-cell office:value-type="float" office:value="8640000" calcext:value-type="float">
            <text:p>8640000</text:p>
          </table:table-cell>
          <table:table-cell table:formula="of:=[.B2954]/[.C2954]" office:value-type="float" office:value="0.00239247685185185" calcext:value-type="float">
            <text:p>0,00239247685185185000</text:p>
          </table:table-cell>
          <table:table-cell table:formula="of:=[.D2955]-[.D295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table:formula="of:=[.B2954]+7" office:value-type="float" office:value="20678" calcext:value-type="float">
            <text:p>20678</text:p>
          </table:table-cell>
          <table:table-cell office:value-type="float" office:value="8640000" calcext:value-type="float">
            <text:p>8640000</text:p>
          </table:table-cell>
          <table:table-cell table:formula="of:=[.B2955]/[.C2955]" office:value-type="float" office:value="0.00239328703703704" calcext:value-type="float">
            <text:p>0,00239328703703704000</text:p>
          </table:table-cell>
          <table:table-cell table:formula="of:=[.D2956]-[.D295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table:formula="of:=[.B2955]+7" office:value-type="float" office:value="20685" calcext:value-type="float">
            <text:p>20685</text:p>
          </table:table-cell>
          <table:table-cell office:value-type="float" office:value="8640000" calcext:value-type="float">
            <text:p>8640000</text:p>
          </table:table-cell>
          <table:table-cell table:formula="of:=[.B2956]/[.C2956]" office:value-type="float" office:value="0.00239409722222222" calcext:value-type="float">
            <text:p>0,00239409722222222000</text:p>
          </table:table-cell>
          <table:table-cell table:formula="of:=[.D2957]-[.D295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table:formula="of:=[.B2956]+7" office:value-type="float" office:value="20692" calcext:value-type="float">
            <text:p>20692</text:p>
          </table:table-cell>
          <table:table-cell office:value-type="float" office:value="8640000" calcext:value-type="float">
            <text:p>8640000</text:p>
          </table:table-cell>
          <table:table-cell table:formula="of:=[.B2957]/[.C2957]" office:value-type="float" office:value="0.00239490740740741" calcext:value-type="float">
            <text:p>0,00239490740740741000</text:p>
          </table:table-cell>
          <table:table-cell table:formula="of:=[.D2958]-[.D295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table:formula="of:=[.B2957]+7" office:value-type="float" office:value="20699" calcext:value-type="float">
            <text:p>20699</text:p>
          </table:table-cell>
          <table:table-cell office:value-type="float" office:value="8640000" calcext:value-type="float">
            <text:p>8640000</text:p>
          </table:table-cell>
          <table:table-cell table:formula="of:=[.B2958]/[.C2958]" office:value-type="float" office:value="0.00239571759259259" calcext:value-type="float">
            <text:p>0,00239571759259259000</text:p>
          </table:table-cell>
          <table:table-cell table:formula="of:=[.D2959]-[.D295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table:formula="of:=[.B2958]+7" office:value-type="float" office:value="20706" calcext:value-type="float">
            <text:p>20706</text:p>
          </table:table-cell>
          <table:table-cell office:value-type="float" office:value="8640000" calcext:value-type="float">
            <text:p>8640000</text:p>
          </table:table-cell>
          <table:table-cell table:formula="of:=[.B2959]/[.C2959]" office:value-type="float" office:value="0.00239652777777778" calcext:value-type="float">
            <text:p>0,00239652777777778000</text:p>
          </table:table-cell>
          <table:table-cell table:formula="of:=[.D2960]-[.D295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table:formula="of:=[.B2959]+7" office:value-type="float" office:value="20713" calcext:value-type="float">
            <text:p>20713</text:p>
          </table:table-cell>
          <table:table-cell office:value-type="float" office:value="8640000" calcext:value-type="float">
            <text:p>8640000</text:p>
          </table:table-cell>
          <table:table-cell table:formula="of:=[.B2960]/[.C2960]" office:value-type="float" office:value="0.00239733796296296" calcext:value-type="float">
            <text:p>0,00239733796296296000</text:p>
          </table:table-cell>
          <table:table-cell table:formula="of:=[.D2961]-[.D296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table:formula="of:=[.B2960]+7" office:value-type="float" office:value="20720" calcext:value-type="float">
            <text:p>20720</text:p>
          </table:table-cell>
          <table:table-cell office:value-type="float" office:value="8640000" calcext:value-type="float">
            <text:p>8640000</text:p>
          </table:table-cell>
          <table:table-cell table:formula="of:=[.B2961]/[.C2961]" office:value-type="float" office:value="0.00239814814814815" calcext:value-type="float">
            <text:p>0,00239814814814815000</text:p>
          </table:table-cell>
          <table:table-cell table:formula="of:=[.D2962]-[.D296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[.B2961]+7" office:value-type="float" office:value="20727" calcext:value-type="float">
            <text:p>20727</text:p>
          </table:table-cell>
          <table:table-cell office:value-type="float" office:value="8640000" calcext:value-type="float">
            <text:p>8640000</text:p>
          </table:table-cell>
          <table:table-cell table:formula="of:=[.B2962]/[.C2962]" office:value-type="float" office:value="0.00239895833333333" calcext:value-type="float">
            <text:p>0,00239895833333333000</text:p>
          </table:table-cell>
          <table:table-cell table:formula="of:=[.D2963]-[.D296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table:formula="of:=[.B2962]+7" office:value-type="float" office:value="20734" calcext:value-type="float">
            <text:p>20734</text:p>
          </table:table-cell>
          <table:table-cell office:value-type="float" office:value="8640000" calcext:value-type="float">
            <text:p>8640000</text:p>
          </table:table-cell>
          <table:table-cell table:formula="of:=[.B2963]/[.C2963]" office:value-type="float" office:value="0.00239976851851852" calcext:value-type="float">
            <text:p>0,00239976851851852000</text:p>
          </table:table-cell>
          <table:table-cell table:formula="of:=[.D2964]-[.D296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table:formula="of:=[.B2963]+7" office:value-type="float" office:value="20741" calcext:value-type="float">
            <text:p>20741</text:p>
          </table:table-cell>
          <table:table-cell office:value-type="float" office:value="8640000" calcext:value-type="float">
            <text:p>8640000</text:p>
          </table:table-cell>
          <table:table-cell table:formula="of:=[.B2964]/[.C2964]" office:value-type="float" office:value="0.0024005787037037" calcext:value-type="float">
            <text:p>0,00240057870370370000</text:p>
          </table:table-cell>
          <table:table-cell table:formula="of:=[.D2965]-[.D296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table:formula="of:=[.B2964]+7" office:value-type="float" office:value="20748" calcext:value-type="float">
            <text:p>20748</text:p>
          </table:table-cell>
          <table:table-cell office:value-type="float" office:value="8640000" calcext:value-type="float">
            <text:p>8640000</text:p>
          </table:table-cell>
          <table:table-cell table:formula="of:=[.B2965]/[.C2965]" office:value-type="float" office:value="0.00240138888888889" calcext:value-type="float">
            <text:p>0,00240138888888889000</text:p>
          </table:table-cell>
          <table:table-cell table:formula="of:=[.D2966]-[.D296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table:formula="of:=[.B2965]+7" office:value-type="float" office:value="20755" calcext:value-type="float">
            <text:p>20755</text:p>
          </table:table-cell>
          <table:table-cell office:value-type="float" office:value="8640000" calcext:value-type="float">
            <text:p>8640000</text:p>
          </table:table-cell>
          <table:table-cell table:formula="of:=[.B2966]/[.C2966]" office:value-type="float" office:value="0.00240219907407407" calcext:value-type="float">
            <text:p>0,00240219907407407000</text:p>
          </table:table-cell>
          <table:table-cell table:formula="of:=[.D2967]-[.D296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table:formula="of:=[.B2966]+7" office:value-type="float" office:value="20762" calcext:value-type="float">
            <text:p>20762</text:p>
          </table:table-cell>
          <table:table-cell office:value-type="float" office:value="8640000" calcext:value-type="float">
            <text:p>8640000</text:p>
          </table:table-cell>
          <table:table-cell table:formula="of:=[.B2967]/[.C2967]" office:value-type="float" office:value="0.00240300925925926" calcext:value-type="float">
            <text:p>0,00240300925925926000</text:p>
          </table:table-cell>
          <table:table-cell table:formula="of:=[.D2968]-[.D296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table:formula="of:=[.B2967]+7" office:value-type="float" office:value="20769" calcext:value-type="float">
            <text:p>20769</text:p>
          </table:table-cell>
          <table:table-cell office:value-type="float" office:value="8640000" calcext:value-type="float">
            <text:p>8640000</text:p>
          </table:table-cell>
          <table:table-cell table:formula="of:=[.B2968]/[.C2968]" office:value-type="float" office:value="0.00240381944444444" calcext:value-type="float">
            <text:p>0,00240381944444444000</text:p>
          </table:table-cell>
          <table:table-cell table:formula="of:=[.D2969]-[.D296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table:formula="of:=[.B2968]+7" office:value-type="float" office:value="20776" calcext:value-type="float">
            <text:p>20776</text:p>
          </table:table-cell>
          <table:table-cell office:value-type="float" office:value="8640000" calcext:value-type="float">
            <text:p>8640000</text:p>
          </table:table-cell>
          <table:table-cell table:formula="of:=[.B2969]/[.C2969]" office:value-type="float" office:value="0.00240462962962963" calcext:value-type="float">
            <text:p>0,00240462962962963000</text:p>
          </table:table-cell>
          <table:table-cell table:formula="of:=[.D2970]-[.D296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table:formula="of:=[.B2969]+7" office:value-type="float" office:value="20783" calcext:value-type="float">
            <text:p>20783</text:p>
          </table:table-cell>
          <table:table-cell office:value-type="float" office:value="8640000" calcext:value-type="float">
            <text:p>8640000</text:p>
          </table:table-cell>
          <table:table-cell table:formula="of:=[.B2970]/[.C2970]" office:value-type="float" office:value="0.00240543981481481" calcext:value-type="float">
            <text:p>0,00240543981481481000</text:p>
          </table:table-cell>
          <table:table-cell table:formula="of:=[.D2971]-[.D297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table:formula="of:=[.B2970]+7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2971]/[.C2971]" office:value-type="float" office:value="0.00240625" calcext:value-type="float">
            <text:p>0,00240625000000000000</text:p>
          </table:table-cell>
          <table:table-cell table:formula="of:=[.D2972]-[.D297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table:formula="of:=[.B2971]+7" office:value-type="float" office:value="20797" calcext:value-type="float">
            <text:p>20797</text:p>
          </table:table-cell>
          <table:table-cell office:value-type="float" office:value="8640000" calcext:value-type="float">
            <text:p>8640000</text:p>
          </table:table-cell>
          <table:table-cell table:formula="of:=[.B2972]/[.C2972]" office:value-type="float" office:value="0.00240706018518519" calcext:value-type="float">
            <text:p>0,00240706018518519000</text:p>
          </table:table-cell>
          <table:table-cell table:formula="of:=[.D2973]-[.D297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table:formula="of:=[.B2972]+7" office:value-type="float" office:value="20804" calcext:value-type="float">
            <text:p>20804</text:p>
          </table:table-cell>
          <table:table-cell office:value-type="float" office:value="8640000" calcext:value-type="float">
            <text:p>8640000</text:p>
          </table:table-cell>
          <table:table-cell table:formula="of:=[.B2973]/[.C2973]" office:value-type="float" office:value="0.00240787037037037" calcext:value-type="float">
            <text:p>0,00240787037037037000</text:p>
          </table:table-cell>
          <table:table-cell table:formula="of:=[.D2974]-[.D297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table:formula="of:=[.B2973]+7" office:value-type="float" office:value="20811" calcext:value-type="float">
            <text:p>20811</text:p>
          </table:table-cell>
          <table:table-cell office:value-type="float" office:value="8640000" calcext:value-type="float">
            <text:p>8640000</text:p>
          </table:table-cell>
          <table:table-cell table:formula="of:=[.B2974]/[.C2974]" office:value-type="float" office:value="0.00240868055555556" calcext:value-type="float">
            <text:p>0,00240868055555556000</text:p>
          </table:table-cell>
          <table:table-cell table:formula="of:=[.D2975]-[.D297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[.B2974]+7" office:value-type="float" office:value="20818" calcext:value-type="float">
            <text:p>20818</text:p>
          </table:table-cell>
          <table:table-cell office:value-type="float" office:value="8640000" calcext:value-type="float">
            <text:p>8640000</text:p>
          </table:table-cell>
          <table:table-cell table:formula="of:=[.B2975]/[.C2975]" office:value-type="float" office:value="0.00240949074074074" calcext:value-type="float">
            <text:p>0,00240949074074074000</text:p>
          </table:table-cell>
          <table:table-cell table:formula="of:=[.D2976]-[.D297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table:formula="of:=[.B2975]+7" office:value-type="float" office:value="20825" calcext:value-type="float">
            <text:p>20825</text:p>
          </table:table-cell>
          <table:table-cell office:value-type="float" office:value="8640000" calcext:value-type="float">
            <text:p>8640000</text:p>
          </table:table-cell>
          <table:table-cell table:formula="of:=[.B2976]/[.C2976]" office:value-type="float" office:value="0.00241030092592593" calcext:value-type="float">
            <text:p>0,00241030092592593000</text:p>
          </table:table-cell>
          <table:table-cell table:formula="of:=[.D2977]-[.D297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table:formula="of:=[.B2976]+7" office:value-type="float" office:value="20832" calcext:value-type="float">
            <text:p>20832</text:p>
          </table:table-cell>
          <table:table-cell office:value-type="float" office:value="8640000" calcext:value-type="float">
            <text:p>8640000</text:p>
          </table:table-cell>
          <table:table-cell table:formula="of:=[.B2977]/[.C2977]" office:value-type="float" office:value="0.00241111111111111" calcext:value-type="float">
            <text:p>0,00241111111111111000</text:p>
          </table:table-cell>
          <table:table-cell table:formula="of:=[.D2978]-[.D297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table:formula="of:=[.B2977]+7" office:value-type="float" office:value="20839" calcext:value-type="float">
            <text:p>20839</text:p>
          </table:table-cell>
          <table:table-cell office:value-type="float" office:value="8640000" calcext:value-type="float">
            <text:p>8640000</text:p>
          </table:table-cell>
          <table:table-cell table:formula="of:=[.B2978]/[.C2978]" office:value-type="float" office:value="0.0024119212962963" calcext:value-type="float">
            <text:p>0,00241192129629630000</text:p>
          </table:table-cell>
          <table:table-cell table:formula="of:=[.D2979]-[.D297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[.B2978]+7" office:value-type="float" office:value="20846" calcext:value-type="float">
            <text:p>20846</text:p>
          </table:table-cell>
          <table:table-cell office:value-type="float" office:value="8640000" calcext:value-type="float">
            <text:p>8640000</text:p>
          </table:table-cell>
          <table:table-cell table:formula="of:=[.B2979]/[.C2979]" office:value-type="float" office:value="0.00241273148148148" calcext:value-type="float">
            <text:p>0,00241273148148148000</text:p>
          </table:table-cell>
          <table:table-cell table:formula="of:=[.D2980]-[.D297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table:formula="of:=[.B2979]+7" office:value-type="float" office:value="20853" calcext:value-type="float">
            <text:p>20853</text:p>
          </table:table-cell>
          <table:table-cell office:value-type="float" office:value="8640000" calcext:value-type="float">
            <text:p>8640000</text:p>
          </table:table-cell>
          <table:table-cell table:formula="of:=[.B2980]/[.C2980]" office:value-type="float" office:value="0.00241354166666667" calcext:value-type="float">
            <text:p>0,00241354166666667000</text:p>
          </table:table-cell>
          <table:table-cell table:formula="of:=[.D2981]-[.D298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[.B2980]+7" office:value-type="float" office:value="20860" calcext:value-type="float">
            <text:p>20860</text:p>
          </table:table-cell>
          <table:table-cell office:value-type="float" office:value="8640000" calcext:value-type="float">
            <text:p>8640000</text:p>
          </table:table-cell>
          <table:table-cell table:formula="of:=[.B2981]/[.C2981]" office:value-type="float" office:value="0.00241435185185185" calcext:value-type="float">
            <text:p>0,00241435185185185000</text:p>
          </table:table-cell>
          <table:table-cell table:formula="of:=[.D2982]-[.D298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table:formula="of:=[.B2981]+7" office:value-type="float" office:value="20867" calcext:value-type="float">
            <text:p>20867</text:p>
          </table:table-cell>
          <table:table-cell office:value-type="float" office:value="8640000" calcext:value-type="float">
            <text:p>8640000</text:p>
          </table:table-cell>
          <table:table-cell table:formula="of:=[.B2982]/[.C2982]" office:value-type="float" office:value="0.00241516203703704" calcext:value-type="float">
            <text:p>0,00241516203703704000</text:p>
          </table:table-cell>
          <table:table-cell table:formula="of:=[.D2983]-[.D298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table:formula="of:=[.B2982]+7" office:value-type="float" office:value="20874" calcext:value-type="float">
            <text:p>20874</text:p>
          </table:table-cell>
          <table:table-cell office:value-type="float" office:value="8640000" calcext:value-type="float">
            <text:p>8640000</text:p>
          </table:table-cell>
          <table:table-cell table:formula="of:=[.B2983]/[.C2983]" office:value-type="float" office:value="0.00241597222222222" calcext:value-type="float">
            <text:p>0,00241597222222222000</text:p>
          </table:table-cell>
          <table:table-cell table:formula="of:=[.D2984]-[.D298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table:formula="of:=[.B2983]+7" office:value-type="float" office:value="20881" calcext:value-type="float">
            <text:p>20881</text:p>
          </table:table-cell>
          <table:table-cell office:value-type="float" office:value="8640000" calcext:value-type="float">
            <text:p>8640000</text:p>
          </table:table-cell>
          <table:table-cell table:formula="of:=[.B2984]/[.C2984]" office:value-type="float" office:value="0.00241678240740741" calcext:value-type="float">
            <text:p>0,00241678240740741000</text:p>
          </table:table-cell>
          <table:table-cell table:formula="of:=[.D2985]-[.D298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table:formula="of:=[.B2984]+7" office:value-type="float" office:value="20888" calcext:value-type="float">
            <text:p>20888</text:p>
          </table:table-cell>
          <table:table-cell office:value-type="float" office:value="8640000" calcext:value-type="float">
            <text:p>8640000</text:p>
          </table:table-cell>
          <table:table-cell table:formula="of:=[.B2985]/[.C2985]" office:value-type="float" office:value="0.00241759259259259" calcext:value-type="float">
            <text:p>0,00241759259259259000</text:p>
          </table:table-cell>
          <table:table-cell table:formula="of:=[.D2986]-[.D298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table:formula="of:=[.B2985]+7" office:value-type="float" office:value="20895" calcext:value-type="float">
            <text:p>20895</text:p>
          </table:table-cell>
          <table:table-cell office:value-type="float" office:value="8640000" calcext:value-type="float">
            <text:p>8640000</text:p>
          </table:table-cell>
          <table:table-cell table:formula="of:=[.B2986]/[.C2986]" office:value-type="float" office:value="0.00241840277777778" calcext:value-type="float">
            <text:p>0,00241840277777778000</text:p>
          </table:table-cell>
          <table:table-cell table:formula="of:=[.D2987]-[.D298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table:formula="of:=[.B2986]+7" office:value-type="float" office:value="20902" calcext:value-type="float">
            <text:p>20902</text:p>
          </table:table-cell>
          <table:table-cell office:value-type="float" office:value="8640000" calcext:value-type="float">
            <text:p>8640000</text:p>
          </table:table-cell>
          <table:table-cell table:formula="of:=[.B2987]/[.C2987]" office:value-type="float" office:value="0.00241921296296296" calcext:value-type="float">
            <text:p>0,00241921296296296000</text:p>
          </table:table-cell>
          <table:table-cell table:formula="of:=[.D2988]-[.D298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table:formula="of:=[.B2987]+7" office:value-type="float" office:value="20909" calcext:value-type="float">
            <text:p>20909</text:p>
          </table:table-cell>
          <table:table-cell office:value-type="float" office:value="8640000" calcext:value-type="float">
            <text:p>8640000</text:p>
          </table:table-cell>
          <table:table-cell table:formula="of:=[.B2988]/[.C2988]" office:value-type="float" office:value="0.00242002314814815" calcext:value-type="float">
            <text:p>0,00242002314814815000</text:p>
          </table:table-cell>
          <table:table-cell table:formula="of:=[.D2989]-[.D298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table:formula="of:=[.B2988]+7" office:value-type="float" office:value="20916" calcext:value-type="float">
            <text:p>20916</text:p>
          </table:table-cell>
          <table:table-cell office:value-type="float" office:value="8640000" calcext:value-type="float">
            <text:p>8640000</text:p>
          </table:table-cell>
          <table:table-cell table:formula="of:=[.B2989]/[.C2989]" office:value-type="float" office:value="0.00242083333333333" calcext:value-type="float">
            <text:p>0,00242083333333333000</text:p>
          </table:table-cell>
          <table:table-cell table:formula="of:=[.D2990]-[.D298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table:formula="of:=[.B2989]+7" office:value-type="float" office:value="20923" calcext:value-type="float">
            <text:p>20923</text:p>
          </table:table-cell>
          <table:table-cell office:value-type="float" office:value="8640000" calcext:value-type="float">
            <text:p>8640000</text:p>
          </table:table-cell>
          <table:table-cell table:formula="of:=[.B2990]/[.C2990]" office:value-type="float" office:value="0.00242164351851852" calcext:value-type="float">
            <text:p>0,00242164351851852000</text:p>
          </table:table-cell>
          <table:table-cell table:formula="of:=[.D2991]-[.D299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table:formula="of:=[.B2990]+7" office:value-type="float" office:value="20930" calcext:value-type="float">
            <text:p>20930</text:p>
          </table:table-cell>
          <table:table-cell office:value-type="float" office:value="8640000" calcext:value-type="float">
            <text:p>8640000</text:p>
          </table:table-cell>
          <table:table-cell table:formula="of:=[.B2991]/[.C2991]" office:value-type="float" office:value="0.0024224537037037" calcext:value-type="float">
            <text:p>0,00242245370370370000</text:p>
          </table:table-cell>
          <table:table-cell table:formula="of:=[.D2992]-[.D299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table:formula="of:=[.B2991]+7" office:value-type="float" office:value="20937" calcext:value-type="float">
            <text:p>20937</text:p>
          </table:table-cell>
          <table:table-cell office:value-type="float" office:value="8640000" calcext:value-type="float">
            <text:p>8640000</text:p>
          </table:table-cell>
          <table:table-cell table:formula="of:=[.B2992]/[.C2992]" office:value-type="float" office:value="0.00242326388888889" calcext:value-type="float">
            <text:p>0,00242326388888889000</text:p>
          </table:table-cell>
          <table:table-cell table:formula="of:=[.D2993]-[.D299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table:formula="of:=[.B2992]+7" office:value-type="float" office:value="20944" calcext:value-type="float">
            <text:p>20944</text:p>
          </table:table-cell>
          <table:table-cell office:value-type="float" office:value="8640000" calcext:value-type="float">
            <text:p>8640000</text:p>
          </table:table-cell>
          <table:table-cell table:formula="of:=[.B2993]/[.C2993]" office:value-type="float" office:value="0.00242407407407407" calcext:value-type="float">
            <text:p>0,00242407407407407000</text:p>
          </table:table-cell>
          <table:table-cell table:formula="of:=[.D2994]-[.D299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table:formula="of:=[.B2993]+7" office:value-type="float" office:value="20951" calcext:value-type="float">
            <text:p>20951</text:p>
          </table:table-cell>
          <table:table-cell office:value-type="float" office:value="8640000" calcext:value-type="float">
            <text:p>8640000</text:p>
          </table:table-cell>
          <table:table-cell table:formula="of:=[.B2994]/[.C2994]" office:value-type="float" office:value="0.00242488425925926" calcext:value-type="float">
            <text:p>0,00242488425925926000</text:p>
          </table:table-cell>
          <table:table-cell table:formula="of:=[.D2995]-[.D299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table:formula="of:=[.B2994]+7" office:value-type="float" office:value="20958" calcext:value-type="float">
            <text:p>20958</text:p>
          </table:table-cell>
          <table:table-cell office:value-type="float" office:value="8640000" calcext:value-type="float">
            <text:p>8640000</text:p>
          </table:table-cell>
          <table:table-cell table:formula="of:=[.B2995]/[.C2995]" office:value-type="float" office:value="0.00242569444444444" calcext:value-type="float">
            <text:p>0,00242569444444444000</text:p>
          </table:table-cell>
          <table:table-cell table:formula="of:=[.D2996]-[.D299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table:formula="of:=[.B2995]+7" office:value-type="float" office:value="20965" calcext:value-type="float">
            <text:p>20965</text:p>
          </table:table-cell>
          <table:table-cell office:value-type="float" office:value="8640000" calcext:value-type="float">
            <text:p>8640000</text:p>
          </table:table-cell>
          <table:table-cell table:formula="of:=[.B2996]/[.C2996]" office:value-type="float" office:value="0.00242650462962963" calcext:value-type="float">
            <text:p>0,00242650462962963000</text:p>
          </table:table-cell>
          <table:table-cell table:formula="of:=[.D2997]-[.D299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table:formula="of:=[.B2996]+7" office:value-type="float" office:value="20972" calcext:value-type="float">
            <text:p>20972</text:p>
          </table:table-cell>
          <table:table-cell office:value-type="float" office:value="8640000" calcext:value-type="float">
            <text:p>8640000</text:p>
          </table:table-cell>
          <table:table-cell table:formula="of:=[.B2997]/[.C2997]" office:value-type="float" office:value="0.00242731481481482" calcext:value-type="float">
            <text:p>0,00242731481481482000</text:p>
          </table:table-cell>
          <table:table-cell table:formula="of:=[.D2998]-[.D299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table:formula="of:=[.B2997]+7" office:value-type="float" office:value="20979" calcext:value-type="float">
            <text:p>20979</text:p>
          </table:table-cell>
          <table:table-cell office:value-type="float" office:value="8640000" calcext:value-type="float">
            <text:p>8640000</text:p>
          </table:table-cell>
          <table:table-cell table:formula="of:=[.B2998]/[.C2998]" office:value-type="float" office:value="0.002428125" calcext:value-type="float">
            <text:p>0,00242812500000000000</text:p>
          </table:table-cell>
          <table:table-cell table:formula="of:=[.D2999]-[.D299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table:formula="of:=[.B2998]+7" office:value-type="float" office:value="20986" calcext:value-type="float">
            <text:p>20986</text:p>
          </table:table-cell>
          <table:table-cell office:value-type="float" office:value="8640000" calcext:value-type="float">
            <text:p>8640000</text:p>
          </table:table-cell>
          <table:table-cell table:formula="of:=[.B2999]/[.C2999]" office:value-type="float" office:value="0.00242893518518519" calcext:value-type="float">
            <text:p>0,00242893518518519000</text:p>
          </table:table-cell>
          <table:table-cell table:formula="of:=[.D3000]-[.D299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table:formula="of:=[.B2999]+7" office:value-type="float" office:value="20993" calcext:value-type="float">
            <text:p>20993</text:p>
          </table:table-cell>
          <table:table-cell office:value-type="float" office:value="8640000" calcext:value-type="float">
            <text:p>8640000</text:p>
          </table:table-cell>
          <table:table-cell table:formula="of:=[.B3000]/[.C3000]" office:value-type="float" office:value="0.00242974537037037" calcext:value-type="float">
            <text:p>0,00242974537037037000</text:p>
          </table:table-cell>
          <table:table-cell table:formula="of:=[.D3001]-[.D300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3000]+7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3001]/[.C3001]" office:value-type="float" office:value="0.00243055555555556" calcext:value-type="float">
            <text:p>0,00243055555555556000</text:p>
          </table:table-cell>
          <table:table-cell table:formula="of:=[.D3002]-[.D300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table:formula="of:=[.B3001]+7" office:value-type="float" office:value="21007" calcext:value-type="float">
            <text:p>21007</text:p>
          </table:table-cell>
          <table:table-cell office:value-type="float" office:value="8640000" calcext:value-type="float">
            <text:p>8640000</text:p>
          </table:table-cell>
          <table:table-cell table:formula="of:=[.B3002]/[.C3002]" office:value-type="float" office:value="0.00243136574074074" calcext:value-type="float">
            <text:p>0,00243136574074074000</text:p>
          </table:table-cell>
          <table:table-cell table:formula="of:=[.D3003]-[.D300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table:formula="of:=[.B3002]+7" office:value-type="float" office:value="21014" calcext:value-type="float">
            <text:p>21014</text:p>
          </table:table-cell>
          <table:table-cell office:value-type="float" office:value="8640000" calcext:value-type="float">
            <text:p>8640000</text:p>
          </table:table-cell>
          <table:table-cell table:formula="of:=[.B3003]/[.C3003]" office:value-type="float" office:value="0.00243217592592593" calcext:value-type="float">
            <text:p>0,00243217592592593000</text:p>
          </table:table-cell>
          <table:table-cell table:formula="of:=[.D3004]-[.D300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table:formula="of:=[.B3003]+7" office:value-type="float" office:value="21021" calcext:value-type="float">
            <text:p>21021</text:p>
          </table:table-cell>
          <table:table-cell office:value-type="float" office:value="8640000" calcext:value-type="float">
            <text:p>8640000</text:p>
          </table:table-cell>
          <table:table-cell table:formula="of:=[.B3004]/[.C3004]" office:value-type="float" office:value="0.00243298611111111" calcext:value-type="float">
            <text:p>0,00243298611111111000</text:p>
          </table:table-cell>
          <table:table-cell table:formula="of:=[.D3005]-[.D300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table:formula="of:=[.B3004]+7" office:value-type="float" office:value="21028" calcext:value-type="float">
            <text:p>21028</text:p>
          </table:table-cell>
          <table:table-cell office:value-type="float" office:value="8640000" calcext:value-type="float">
            <text:p>8640000</text:p>
          </table:table-cell>
          <table:table-cell table:formula="of:=[.B3005]/[.C3005]" office:value-type="float" office:value="0.0024337962962963" calcext:value-type="float">
            <text:p>0,00243379629629630000</text:p>
          </table:table-cell>
          <table:table-cell table:formula="of:=[.D3006]-[.D300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table:formula="of:=[.B3005]+7" office:value-type="float" office:value="21035" calcext:value-type="float">
            <text:p>21035</text:p>
          </table:table-cell>
          <table:table-cell office:value-type="float" office:value="8640000" calcext:value-type="float">
            <text:p>8640000</text:p>
          </table:table-cell>
          <table:table-cell table:formula="of:=[.B3006]/[.C3006]" office:value-type="float" office:value="0.00243460648148148" calcext:value-type="float">
            <text:p>0,00243460648148148000</text:p>
          </table:table-cell>
          <table:table-cell table:formula="of:=[.D3007]-[.D300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table:formula="of:=[.B3006]+7" office:value-type="float" office:value="21042" calcext:value-type="float">
            <text:p>21042</text:p>
          </table:table-cell>
          <table:table-cell office:value-type="float" office:value="8640000" calcext:value-type="float">
            <text:p>8640000</text:p>
          </table:table-cell>
          <table:table-cell table:formula="of:=[.B3007]/[.C3007]" office:value-type="float" office:value="0.00243541666666667" calcext:value-type="float">
            <text:p>0,00243541666666667000</text:p>
          </table:table-cell>
          <table:table-cell table:formula="of:=[.D3008]-[.D300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table:formula="of:=[.B3007]+7" office:value-type="float" office:value="21049" calcext:value-type="float">
            <text:p>21049</text:p>
          </table:table-cell>
          <table:table-cell office:value-type="float" office:value="8640000" calcext:value-type="float">
            <text:p>8640000</text:p>
          </table:table-cell>
          <table:table-cell table:formula="of:=[.B3008]/[.C3008]" office:value-type="float" office:value="0.00243622685185185" calcext:value-type="float">
            <text:p>0,00243622685185185000</text:p>
          </table:table-cell>
          <table:table-cell table:formula="of:=[.D3009]-[.D300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table:formula="of:=[.B3008]+7" office:value-type="float" office:value="21056" calcext:value-type="float">
            <text:p>21056</text:p>
          </table:table-cell>
          <table:table-cell office:value-type="float" office:value="8640000" calcext:value-type="float">
            <text:p>8640000</text:p>
          </table:table-cell>
          <table:table-cell table:formula="of:=[.B3009]/[.C3009]" office:value-type="float" office:value="0.00243703703703704" calcext:value-type="float">
            <text:p>0,00243703703703704000</text:p>
          </table:table-cell>
          <table:table-cell table:formula="of:=[.D3010]-[.D300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table:formula="of:=[.B3009]+7" office:value-type="float" office:value="21063" calcext:value-type="float">
            <text:p>21063</text:p>
          </table:table-cell>
          <table:table-cell office:value-type="float" office:value="8640000" calcext:value-type="float">
            <text:p>8640000</text:p>
          </table:table-cell>
          <table:table-cell table:formula="of:=[.B3010]/[.C3010]" office:value-type="float" office:value="0.00243784722222222" calcext:value-type="float">
            <text:p>0,00243784722222222000</text:p>
          </table:table-cell>
          <table:table-cell table:formula="of:=[.D3011]-[.D301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table:formula="of:=[.B3010]+7" office:value-type="float" office:value="21070" calcext:value-type="float">
            <text:p>21070</text:p>
          </table:table-cell>
          <table:table-cell office:value-type="float" office:value="8640000" calcext:value-type="float">
            <text:p>8640000</text:p>
          </table:table-cell>
          <table:table-cell table:formula="of:=[.B3011]/[.C3011]" office:value-type="float" office:value="0.00243865740740741" calcext:value-type="float">
            <text:p>0,00243865740740741000</text:p>
          </table:table-cell>
          <table:table-cell table:formula="of:=[.D3012]-[.D301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table:formula="of:=[.B3011]+7" office:value-type="float" office:value="21077" calcext:value-type="float">
            <text:p>21077</text:p>
          </table:table-cell>
          <table:table-cell office:value-type="float" office:value="8640000" calcext:value-type="float">
            <text:p>8640000</text:p>
          </table:table-cell>
          <table:table-cell table:formula="of:=[.B3012]/[.C3012]" office:value-type="float" office:value="0.00243946759259259" calcext:value-type="float">
            <text:p>0,00243946759259259000</text:p>
          </table:table-cell>
          <table:table-cell table:formula="of:=[.D3013]-[.D301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table:formula="of:=[.B3012]+7" office:value-type="float" office:value="21084" calcext:value-type="float">
            <text:p>21084</text:p>
          </table:table-cell>
          <table:table-cell office:value-type="float" office:value="8640000" calcext:value-type="float">
            <text:p>8640000</text:p>
          </table:table-cell>
          <table:table-cell table:formula="of:=[.B3013]/[.C3013]" office:value-type="float" office:value="0.00244027777777778" calcext:value-type="float">
            <text:p>0,00244027777777778000</text:p>
          </table:table-cell>
          <table:table-cell table:formula="of:=[.D3014]-[.D301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[.B3013]+7" office:value-type="float" office:value="21091" calcext:value-type="float">
            <text:p>21091</text:p>
          </table:table-cell>
          <table:table-cell office:value-type="float" office:value="8640000" calcext:value-type="float">
            <text:p>8640000</text:p>
          </table:table-cell>
          <table:table-cell table:formula="of:=[.B3014]/[.C3014]" office:value-type="float" office:value="0.00244108796296296" calcext:value-type="float">
            <text:p>0,00244108796296296000</text:p>
          </table:table-cell>
          <table:table-cell table:formula="of:=[.D3015]-[.D301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table:formula="of:=[.B3014]+7" office:value-type="float" office:value="21098" calcext:value-type="float">
            <text:p>21098</text:p>
          </table:table-cell>
          <table:table-cell office:value-type="float" office:value="8640000" calcext:value-type="float">
            <text:p>8640000</text:p>
          </table:table-cell>
          <table:table-cell table:formula="of:=[.B3015]/[.C3015]" office:value-type="float" office:value="0.00244189814814815" calcext:value-type="float">
            <text:p>0,00244189814814815000</text:p>
          </table:table-cell>
          <table:table-cell table:formula="of:=[.D3016]-[.D301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table:formula="of:=[.B3015]+7" office:value-type="float" office:value="21105" calcext:value-type="float">
            <text:p>21105</text:p>
          </table:table-cell>
          <table:table-cell office:value-type="float" office:value="8640000" calcext:value-type="float">
            <text:p>8640000</text:p>
          </table:table-cell>
          <table:table-cell table:formula="of:=[.B3016]/[.C3016]" office:value-type="float" office:value="0.00244270833333333" calcext:value-type="float">
            <text:p>0,00244270833333333000</text:p>
          </table:table-cell>
          <table:table-cell table:formula="of:=[.D3017]-[.D301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table:formula="of:=[.B3016]+7" office:value-type="float" office:value="21112" calcext:value-type="float">
            <text:p>21112</text:p>
          </table:table-cell>
          <table:table-cell office:value-type="float" office:value="8640000" calcext:value-type="float">
            <text:p>8640000</text:p>
          </table:table-cell>
          <table:table-cell table:formula="of:=[.B3017]/[.C3017]" office:value-type="float" office:value="0.00244351851851852" calcext:value-type="float">
            <text:p>0,00244351851851852000</text:p>
          </table:table-cell>
          <table:table-cell table:formula="of:=[.D3018]-[.D301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table:formula="of:=[.B3017]+7" office:value-type="float" office:value="21119" calcext:value-type="float">
            <text:p>21119</text:p>
          </table:table-cell>
          <table:table-cell office:value-type="float" office:value="8640000" calcext:value-type="float">
            <text:p>8640000</text:p>
          </table:table-cell>
          <table:table-cell table:formula="of:=[.B3018]/[.C3018]" office:value-type="float" office:value="0.0024443287037037" calcext:value-type="float">
            <text:p>0,00244432870370370000</text:p>
          </table:table-cell>
          <table:table-cell table:formula="of:=[.D3019]-[.D301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table:formula="of:=[.B3018]+7" office:value-type="float" office:value="21126" calcext:value-type="float">
            <text:p>21126</text:p>
          </table:table-cell>
          <table:table-cell office:value-type="float" office:value="8640000" calcext:value-type="float">
            <text:p>8640000</text:p>
          </table:table-cell>
          <table:table-cell table:formula="of:=[.B3019]/[.C3019]" office:value-type="float" office:value="0.00244513888888889" calcext:value-type="float">
            <text:p>0,00244513888888889000</text:p>
          </table:table-cell>
          <table:table-cell table:formula="of:=[.D3020]-[.D301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table:formula="of:=[.B3019]+7" office:value-type="float" office:value="21133" calcext:value-type="float">
            <text:p>21133</text:p>
          </table:table-cell>
          <table:table-cell office:value-type="float" office:value="8640000" calcext:value-type="float">
            <text:p>8640000</text:p>
          </table:table-cell>
          <table:table-cell table:formula="of:=[.B3020]/[.C3020]" office:value-type="float" office:value="0.00244594907407407" calcext:value-type="float">
            <text:p>0,00244594907407407000</text:p>
          </table:table-cell>
          <table:table-cell table:formula="of:=[.D3021]-[.D302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table:formula="of:=[.B3020]+7" office:value-type="float" office:value="21140" calcext:value-type="float">
            <text:p>21140</text:p>
          </table:table-cell>
          <table:table-cell office:value-type="float" office:value="8640000" calcext:value-type="float">
            <text:p>8640000</text:p>
          </table:table-cell>
          <table:table-cell table:formula="of:=[.B3021]/[.C3021]" office:value-type="float" office:value="0.00244675925925926" calcext:value-type="float">
            <text:p>0,00244675925925926000</text:p>
          </table:table-cell>
          <table:table-cell table:formula="of:=[.D3022]-[.D302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[.B3021]+7" office:value-type="float" office:value="21147" calcext:value-type="float">
            <text:p>21147</text:p>
          </table:table-cell>
          <table:table-cell office:value-type="float" office:value="8640000" calcext:value-type="float">
            <text:p>8640000</text:p>
          </table:table-cell>
          <table:table-cell table:formula="of:=[.B3022]/[.C3022]" office:value-type="float" office:value="0.00244756944444444" calcext:value-type="float">
            <text:p>0,00244756944444444000</text:p>
          </table:table-cell>
          <table:table-cell table:formula="of:=[.D3023]-[.D302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table:formula="of:=[.B3022]+7" office:value-type="float" office:value="21154" calcext:value-type="float">
            <text:p>21154</text:p>
          </table:table-cell>
          <table:table-cell office:value-type="float" office:value="8640000" calcext:value-type="float">
            <text:p>8640000</text:p>
          </table:table-cell>
          <table:table-cell table:formula="of:=[.B3023]/[.C3023]" office:value-type="float" office:value="0.00244837962962963" calcext:value-type="float">
            <text:p>0,00244837962962963000</text:p>
          </table:table-cell>
          <table:table-cell table:formula="of:=[.D3024]-[.D302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table:formula="of:=[.B3023]+7" office:value-type="float" office:value="21161" calcext:value-type="float">
            <text:p>21161</text:p>
          </table:table-cell>
          <table:table-cell office:value-type="float" office:value="8640000" calcext:value-type="float">
            <text:p>8640000</text:p>
          </table:table-cell>
          <table:table-cell table:formula="of:=[.B3024]/[.C3024]" office:value-type="float" office:value="0.00244918981481481" calcext:value-type="float">
            <text:p>0,00244918981481481000</text:p>
          </table:table-cell>
          <table:table-cell table:formula="of:=[.D3025]-[.D302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[.B3024]+7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3025]/[.C3025]" office:value-type="float" office:value="0.00245" calcext:value-type="float">
            <text:p>0,00245000000000000000</text:p>
          </table:table-cell>
          <table:table-cell table:formula="of:=[.D3026]-[.D302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formula="of:=[.B3025]+7" office:value-type="float" office:value="21175" calcext:value-type="float">
            <text:p>21175</text:p>
          </table:table-cell>
          <table:table-cell office:value-type="float" office:value="8640000" calcext:value-type="float">
            <text:p>8640000</text:p>
          </table:table-cell>
          <table:table-cell table:formula="of:=[.B3026]/[.C3026]" office:value-type="float" office:value="0.00245081018518519" calcext:value-type="float">
            <text:p>0,00245081018518519000</text:p>
          </table:table-cell>
          <table:table-cell table:formula="of:=[.D3027]-[.D302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table:formula="of:=[.B3026]+7" office:value-type="float" office:value="21182" calcext:value-type="float">
            <text:p>21182</text:p>
          </table:table-cell>
          <table:table-cell office:value-type="float" office:value="8640000" calcext:value-type="float">
            <text:p>8640000</text:p>
          </table:table-cell>
          <table:table-cell table:formula="of:=[.B3027]/[.C3027]" office:value-type="float" office:value="0.00245162037037037" calcext:value-type="float">
            <text:p>0,00245162037037037000</text:p>
          </table:table-cell>
          <table:table-cell table:formula="of:=[.D3028]-[.D302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table:formula="of:=[.B3027]+7" office:value-type="float" office:value="21189" calcext:value-type="float">
            <text:p>21189</text:p>
          </table:table-cell>
          <table:table-cell office:value-type="float" office:value="8640000" calcext:value-type="float">
            <text:p>8640000</text:p>
          </table:table-cell>
          <table:table-cell table:formula="of:=[.B3028]/[.C3028]" office:value-type="float" office:value="0.00245243055555556" calcext:value-type="float">
            <text:p>0,00245243055555556000</text:p>
          </table:table-cell>
          <table:table-cell table:formula="of:=[.D3029]-[.D302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table:formula="of:=[.B3028]+7" office:value-type="float" office:value="21196" calcext:value-type="float">
            <text:p>21196</text:p>
          </table:table-cell>
          <table:table-cell office:value-type="float" office:value="8640000" calcext:value-type="float">
            <text:p>8640000</text:p>
          </table:table-cell>
          <table:table-cell table:formula="of:=[.B3029]/[.C3029]" office:value-type="float" office:value="0.00245324074074074" calcext:value-type="float">
            <text:p>0,00245324074074074000</text:p>
          </table:table-cell>
          <table:table-cell table:formula="of:=[.D3030]-[.D302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table:formula="of:=[.B3029]+7" office:value-type="float" office:value="21203" calcext:value-type="float">
            <text:p>21203</text:p>
          </table:table-cell>
          <table:table-cell office:value-type="float" office:value="8640000" calcext:value-type="float">
            <text:p>8640000</text:p>
          </table:table-cell>
          <table:table-cell table:formula="of:=[.B3030]/[.C3030]" office:value-type="float" office:value="0.00245405092592593" calcext:value-type="float">
            <text:p>0,00245405092592593000</text:p>
          </table:table-cell>
          <table:table-cell table:formula="of:=[.D3031]-[.D303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table:formula="of:=[.B3030]+7" office:value-type="float" office:value="21210" calcext:value-type="float">
            <text:p>21210</text:p>
          </table:table-cell>
          <table:table-cell office:value-type="float" office:value="8640000" calcext:value-type="float">
            <text:p>8640000</text:p>
          </table:table-cell>
          <table:table-cell table:formula="of:=[.B3031]/[.C3031]" office:value-type="float" office:value="0.00245486111111111" calcext:value-type="float">
            <text:p>0,00245486111111111000</text:p>
          </table:table-cell>
          <table:table-cell table:formula="of:=[.D3032]-[.D303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table:formula="of:=[.B3031]+7" office:value-type="float" office:value="21217" calcext:value-type="float">
            <text:p>21217</text:p>
          </table:table-cell>
          <table:table-cell office:value-type="float" office:value="8640000" calcext:value-type="float">
            <text:p>8640000</text:p>
          </table:table-cell>
          <table:table-cell table:formula="of:=[.B3032]/[.C3032]" office:value-type="float" office:value="0.0024556712962963" calcext:value-type="float">
            <text:p>0,00245567129629630000</text:p>
          </table:table-cell>
          <table:table-cell table:formula="of:=[.D3033]-[.D303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table:formula="of:=[.B3032]+7" office:value-type="float" office:value="21224" calcext:value-type="float">
            <text:p>21224</text:p>
          </table:table-cell>
          <table:table-cell office:value-type="float" office:value="8640000" calcext:value-type="float">
            <text:p>8640000</text:p>
          </table:table-cell>
          <table:table-cell table:formula="of:=[.B3033]/[.C3033]" office:value-type="float" office:value="0.00245648148148148" calcext:value-type="float">
            <text:p>0,00245648148148148000</text:p>
          </table:table-cell>
          <table:table-cell table:formula="of:=[.D3034]-[.D303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formula="of:=[.B3033]+7" office:value-type="float" office:value="21231" calcext:value-type="float">
            <text:p>21231</text:p>
          </table:table-cell>
          <table:table-cell office:value-type="float" office:value="8640000" calcext:value-type="float">
            <text:p>8640000</text:p>
          </table:table-cell>
          <table:table-cell table:formula="of:=[.B3034]/[.C3034]" office:value-type="float" office:value="0.00245729166666667" calcext:value-type="float">
            <text:p>0,00245729166666667000</text:p>
          </table:table-cell>
          <table:table-cell table:formula="of:=[.D3035]-[.D303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table:formula="of:=[.B3034]+7" office:value-type="float" office:value="21238" calcext:value-type="float">
            <text:p>21238</text:p>
          </table:table-cell>
          <table:table-cell office:value-type="float" office:value="8640000" calcext:value-type="float">
            <text:p>8640000</text:p>
          </table:table-cell>
          <table:table-cell table:formula="of:=[.B3035]/[.C3035]" office:value-type="float" office:value="0.00245810185185185" calcext:value-type="float">
            <text:p>0,00245810185185185000</text:p>
          </table:table-cell>
          <table:table-cell table:formula="of:=[.D3036]-[.D303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table:formula="of:=[.B3035]+7" office:value-type="float" office:value="21245" calcext:value-type="float">
            <text:p>21245</text:p>
          </table:table-cell>
          <table:table-cell office:value-type="float" office:value="8640000" calcext:value-type="float">
            <text:p>8640000</text:p>
          </table:table-cell>
          <table:table-cell table:formula="of:=[.B3036]/[.C3036]" office:value-type="float" office:value="0.00245891203703704" calcext:value-type="float">
            <text:p>0,00245891203703704000</text:p>
          </table:table-cell>
          <table:table-cell table:formula="of:=[.D3037]-[.D303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table:formula="of:=[.B3036]+7" office:value-type="float" office:value="21252" calcext:value-type="float">
            <text:p>21252</text:p>
          </table:table-cell>
          <table:table-cell office:value-type="float" office:value="8640000" calcext:value-type="float">
            <text:p>8640000</text:p>
          </table:table-cell>
          <table:table-cell table:formula="of:=[.B3037]/[.C3037]" office:value-type="float" office:value="0.00245972222222222" calcext:value-type="float">
            <text:p>0,00245972222222222000</text:p>
          </table:table-cell>
          <table:table-cell table:formula="of:=[.D3038]-[.D303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[.B3037]+7" office:value-type="float" office:value="21259" calcext:value-type="float">
            <text:p>21259</text:p>
          </table:table-cell>
          <table:table-cell office:value-type="float" office:value="8640000" calcext:value-type="float">
            <text:p>8640000</text:p>
          </table:table-cell>
          <table:table-cell table:formula="of:=[.B3038]/[.C3038]" office:value-type="float" office:value="0.00246053240740741" calcext:value-type="float">
            <text:p>0,00246053240740741000</text:p>
          </table:table-cell>
          <table:table-cell table:formula="of:=[.D3039]-[.D303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table:formula="of:=[.B3038]+7" office:value-type="float" office:value="21266" calcext:value-type="float">
            <text:p>21266</text:p>
          </table:table-cell>
          <table:table-cell office:value-type="float" office:value="8640000" calcext:value-type="float">
            <text:p>8640000</text:p>
          </table:table-cell>
          <table:table-cell table:formula="of:=[.B3039]/[.C3039]" office:value-type="float" office:value="0.00246134259259259" calcext:value-type="float">
            <text:p>0,00246134259259259000</text:p>
          </table:table-cell>
          <table:table-cell table:formula="of:=[.D3040]-[.D303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table:formula="of:=[.B3039]+7" office:value-type="float" office:value="21273" calcext:value-type="float">
            <text:p>21273</text:p>
          </table:table-cell>
          <table:table-cell office:value-type="float" office:value="8640000" calcext:value-type="float">
            <text:p>8640000</text:p>
          </table:table-cell>
          <table:table-cell table:formula="of:=[.B3040]/[.C3040]" office:value-type="float" office:value="0.00246215277777778" calcext:value-type="float">
            <text:p>0,00246215277777778000</text:p>
          </table:table-cell>
          <table:table-cell table:formula="of:=[.D3041]-[.D304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table:formula="of:=[.B3040]+7" office:value-type="float" office:value="21280" calcext:value-type="float">
            <text:p>21280</text:p>
          </table:table-cell>
          <table:table-cell office:value-type="float" office:value="8640000" calcext:value-type="float">
            <text:p>8640000</text:p>
          </table:table-cell>
          <table:table-cell table:formula="of:=[.B3041]/[.C3041]" office:value-type="float" office:value="0.00246296296296296" calcext:value-type="float">
            <text:p>0,00246296296296296000</text:p>
          </table:table-cell>
          <table:table-cell table:formula="of:=[.D3042]-[.D304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[.B3041]+7" office:value-type="float" office:value="21287" calcext:value-type="float">
            <text:p>21287</text:p>
          </table:table-cell>
          <table:table-cell office:value-type="float" office:value="8640000" calcext:value-type="float">
            <text:p>8640000</text:p>
          </table:table-cell>
          <table:table-cell table:formula="of:=[.B3042]/[.C3042]" office:value-type="float" office:value="0.00246377314814815" calcext:value-type="float">
            <text:p>0,00246377314814815000</text:p>
          </table:table-cell>
          <table:table-cell table:formula="of:=[.D3043]-[.D304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table:formula="of:=[.B3042]+7" office:value-type="float" office:value="21294" calcext:value-type="float">
            <text:p>21294</text:p>
          </table:table-cell>
          <table:table-cell office:value-type="float" office:value="8640000" calcext:value-type="float">
            <text:p>8640000</text:p>
          </table:table-cell>
          <table:table-cell table:formula="of:=[.B3043]/[.C3043]" office:value-type="float" office:value="0.00246458333333333" calcext:value-type="float">
            <text:p>0,00246458333333333000</text:p>
          </table:table-cell>
          <table:table-cell table:formula="of:=[.D3044]-[.D304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[.B3043]+7" office:value-type="float" office:value="21301" calcext:value-type="float">
            <text:p>21301</text:p>
          </table:table-cell>
          <table:table-cell office:value-type="float" office:value="8640000" calcext:value-type="float">
            <text:p>8640000</text:p>
          </table:table-cell>
          <table:table-cell table:formula="of:=[.B3044]/[.C3044]" office:value-type="float" office:value="0.00246539351851852" calcext:value-type="float">
            <text:p>0,00246539351851852000</text:p>
          </table:table-cell>
          <table:table-cell table:formula="of:=[.D3045]-[.D304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table:formula="of:=[.B3044]+7" office:value-type="float" office:value="21308" calcext:value-type="float">
            <text:p>21308</text:p>
          </table:table-cell>
          <table:table-cell office:value-type="float" office:value="8640000" calcext:value-type="float">
            <text:p>8640000</text:p>
          </table:table-cell>
          <table:table-cell table:formula="of:=[.B3045]/[.C3045]" office:value-type="float" office:value="0.0024662037037037" calcext:value-type="float">
            <text:p>0,00246620370370370000</text:p>
          </table:table-cell>
          <table:table-cell table:formula="of:=[.D3046]-[.D304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table:formula="of:=[.B3045]+7" office:value-type="float" office:value="21315" calcext:value-type="float">
            <text:p>21315</text:p>
          </table:table-cell>
          <table:table-cell office:value-type="float" office:value="8640000" calcext:value-type="float">
            <text:p>8640000</text:p>
          </table:table-cell>
          <table:table-cell table:formula="of:=[.B3046]/[.C3046]" office:value-type="float" office:value="0.00246701388888889" calcext:value-type="float">
            <text:p>0,00246701388888889000</text:p>
          </table:table-cell>
          <table:table-cell table:formula="of:=[.D3047]-[.D304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table:formula="of:=[.B3046]+7" office:value-type="float" office:value="21322" calcext:value-type="float">
            <text:p>21322</text:p>
          </table:table-cell>
          <table:table-cell office:value-type="float" office:value="8640000" calcext:value-type="float">
            <text:p>8640000</text:p>
          </table:table-cell>
          <table:table-cell table:formula="of:=[.B3047]/[.C3047]" office:value-type="float" office:value="0.00246782407407407" calcext:value-type="float">
            <text:p>0,00246782407407407000</text:p>
          </table:table-cell>
          <table:table-cell table:formula="of:=[.D3048]-[.D304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table:formula="of:=[.B3047]+7" office:value-type="float" office:value="21329" calcext:value-type="float">
            <text:p>21329</text:p>
          </table:table-cell>
          <table:table-cell office:value-type="float" office:value="8640000" calcext:value-type="float">
            <text:p>8640000</text:p>
          </table:table-cell>
          <table:table-cell table:formula="of:=[.B3048]/[.C3048]" office:value-type="float" office:value="0.00246863425925926" calcext:value-type="float">
            <text:p>0,00246863425925926000</text:p>
          </table:table-cell>
          <table:table-cell table:formula="of:=[.D3049]-[.D304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table:formula="of:=[.B3048]+7" office:value-type="float" office:value="21336" calcext:value-type="float">
            <text:p>21336</text:p>
          </table:table-cell>
          <table:table-cell office:value-type="float" office:value="8640000" calcext:value-type="float">
            <text:p>8640000</text:p>
          </table:table-cell>
          <table:table-cell table:formula="of:=[.B3049]/[.C3049]" office:value-type="float" office:value="0.00246944444444444" calcext:value-type="float">
            <text:p>0,00246944444444444000</text:p>
          </table:table-cell>
          <table:table-cell table:formula="of:=[.D3050]-[.D304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table:formula="of:=[.B3049]+7" office:value-type="float" office:value="21343" calcext:value-type="float">
            <text:p>21343</text:p>
          </table:table-cell>
          <table:table-cell office:value-type="float" office:value="8640000" calcext:value-type="float">
            <text:p>8640000</text:p>
          </table:table-cell>
          <table:table-cell table:formula="of:=[.B3050]/[.C3050]" office:value-type="float" office:value="0.00247025462962963" calcext:value-type="float">
            <text:p>0,00247025462962963000</text:p>
          </table:table-cell>
          <table:table-cell table:formula="of:=[.D3051]-[.D305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formula="of:=[.B3050]+7" office:value-type="float" office:value="21350" calcext:value-type="float">
            <text:p>21350</text:p>
          </table:table-cell>
          <table:table-cell office:value-type="float" office:value="8640000" calcext:value-type="float">
            <text:p>8640000</text:p>
          </table:table-cell>
          <table:table-cell table:formula="of:=[.B3051]/[.C3051]" office:value-type="float" office:value="0.00247106481481482" calcext:value-type="float">
            <text:p>0,00247106481481482000</text:p>
          </table:table-cell>
          <table:table-cell table:formula="of:=[.D3052]-[.D305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table:formula="of:=[.B3051]+7" office:value-type="float" office:value="21357" calcext:value-type="float">
            <text:p>21357</text:p>
          </table:table-cell>
          <table:table-cell office:value-type="float" office:value="8640000" calcext:value-type="float">
            <text:p>8640000</text:p>
          </table:table-cell>
          <table:table-cell table:formula="of:=[.B3052]/[.C3052]" office:value-type="float" office:value="0.002471875" calcext:value-type="float">
            <text:p>0,00247187500000000000</text:p>
          </table:table-cell>
          <table:table-cell table:formula="of:=[.D3053]-[.D305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table:formula="of:=[.B3052]+7" office:value-type="float" office:value="21364" calcext:value-type="float">
            <text:p>21364</text:p>
          </table:table-cell>
          <table:table-cell office:value-type="float" office:value="8640000" calcext:value-type="float">
            <text:p>8640000</text:p>
          </table:table-cell>
          <table:table-cell table:formula="of:=[.B3053]/[.C3053]" office:value-type="float" office:value="0.00247268518518519" calcext:value-type="float">
            <text:p>0,00247268518518519000</text:p>
          </table:table-cell>
          <table:table-cell table:formula="of:=[.D3054]-[.D305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table:formula="of:=[.B3053]+7" office:value-type="float" office:value="21371" calcext:value-type="float">
            <text:p>21371</text:p>
          </table:table-cell>
          <table:table-cell office:value-type="float" office:value="8640000" calcext:value-type="float">
            <text:p>8640000</text:p>
          </table:table-cell>
          <table:table-cell table:formula="of:=[.B3054]/[.C3054]" office:value-type="float" office:value="0.00247349537037037" calcext:value-type="float">
            <text:p>0,00247349537037037000</text:p>
          </table:table-cell>
          <table:table-cell table:formula="of:=[.D3055]-[.D305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table:formula="of:=[.B3054]+7" office:value-type="float" office:value="21378" calcext:value-type="float">
            <text:p>21378</text:p>
          </table:table-cell>
          <table:table-cell office:value-type="float" office:value="8640000" calcext:value-type="float">
            <text:p>8640000</text:p>
          </table:table-cell>
          <table:table-cell table:formula="of:=[.B3055]/[.C3055]" office:value-type="float" office:value="0.00247430555555556" calcext:value-type="float">
            <text:p>0,00247430555555556000</text:p>
          </table:table-cell>
          <table:table-cell table:formula="of:=[.D3056]-[.D305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table:formula="of:=[.B3055]+7" office:value-type="float" office:value="21385" calcext:value-type="float">
            <text:p>21385</text:p>
          </table:table-cell>
          <table:table-cell office:value-type="float" office:value="8640000" calcext:value-type="float">
            <text:p>8640000</text:p>
          </table:table-cell>
          <table:table-cell table:formula="of:=[.B3056]/[.C3056]" office:value-type="float" office:value="0.00247511574074074" calcext:value-type="float">
            <text:p>0,00247511574074074000</text:p>
          </table:table-cell>
          <table:table-cell table:formula="of:=[.D3057]-[.D305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formula="of:=[.B3056]+7" office:value-type="float" office:value="21392" calcext:value-type="float">
            <text:p>21392</text:p>
          </table:table-cell>
          <table:table-cell office:value-type="float" office:value="8640000" calcext:value-type="float">
            <text:p>8640000</text:p>
          </table:table-cell>
          <table:table-cell table:formula="of:=[.B3057]/[.C3057]" office:value-type="float" office:value="0.00247592592592593" calcext:value-type="float">
            <text:p>0,00247592592592593000</text:p>
          </table:table-cell>
          <table:table-cell table:formula="of:=[.D3058]-[.D305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table:formula="of:=[.B3057]+7" office:value-type="float" office:value="21399" calcext:value-type="float">
            <text:p>21399</text:p>
          </table:table-cell>
          <table:table-cell office:value-type="float" office:value="8640000" calcext:value-type="float">
            <text:p>8640000</text:p>
          </table:table-cell>
          <table:table-cell table:formula="of:=[.B3058]/[.C3058]" office:value-type="float" office:value="0.00247673611111111" calcext:value-type="float">
            <text:p>0,00247673611111111000</text:p>
          </table:table-cell>
          <table:table-cell table:formula="of:=[.D3059]-[.D305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table:formula="of:=[.B3058]+7" office:value-type="float" office:value="21406" calcext:value-type="float">
            <text:p>21406</text:p>
          </table:table-cell>
          <table:table-cell office:value-type="float" office:value="8640000" calcext:value-type="float">
            <text:p>8640000</text:p>
          </table:table-cell>
          <table:table-cell table:formula="of:=[.B3059]/[.C3059]" office:value-type="float" office:value="0.0024775462962963" calcext:value-type="float">
            <text:p>0,00247754629629630000</text:p>
          </table:table-cell>
          <table:table-cell table:formula="of:=[.D3060]-[.D305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table:formula="of:=[.B3059]+7" office:value-type="float" office:value="21413" calcext:value-type="float">
            <text:p>21413</text:p>
          </table:table-cell>
          <table:table-cell office:value-type="float" office:value="8640000" calcext:value-type="float">
            <text:p>8640000</text:p>
          </table:table-cell>
          <table:table-cell table:formula="of:=[.B3060]/[.C3060]" office:value-type="float" office:value="0.00247835648148148" calcext:value-type="float">
            <text:p>0,00247835648148148000</text:p>
          </table:table-cell>
          <table:table-cell table:formula="of:=[.D3061]-[.D306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[.B3060]+7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3061]/[.C3061]" office:value-type="float" office:value="0.00247916666666667" calcext:value-type="float">
            <text:p>0,00247916666666667000</text:p>
          </table:table-cell>
          <table:table-cell table:formula="of:=[.D3062]-[.D306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table:formula="of:=[.B3061]+7" office:value-type="float" office:value="21427" calcext:value-type="float">
            <text:p>21427</text:p>
          </table:table-cell>
          <table:table-cell office:value-type="float" office:value="8640000" calcext:value-type="float">
            <text:p>8640000</text:p>
          </table:table-cell>
          <table:table-cell table:formula="of:=[.B3062]/[.C3062]" office:value-type="float" office:value="0.00247997685185185" calcext:value-type="float">
            <text:p>0,00247997685185185000</text:p>
          </table:table-cell>
          <table:table-cell table:formula="of:=[.D3063]-[.D306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table:formula="of:=[.B3062]+7" office:value-type="float" office:value="21434" calcext:value-type="float">
            <text:p>21434</text:p>
          </table:table-cell>
          <table:table-cell office:value-type="float" office:value="8640000" calcext:value-type="float">
            <text:p>8640000</text:p>
          </table:table-cell>
          <table:table-cell table:formula="of:=[.B3063]/[.C3063]" office:value-type="float" office:value="0.00248078703703704" calcext:value-type="float">
            <text:p>0,00248078703703704000</text:p>
          </table:table-cell>
          <table:table-cell table:formula="of:=[.D3064]-[.D306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table:formula="of:=[.B3063]+7" office:value-type="float" office:value="21441" calcext:value-type="float">
            <text:p>21441</text:p>
          </table:table-cell>
          <table:table-cell office:value-type="float" office:value="8640000" calcext:value-type="float">
            <text:p>8640000</text:p>
          </table:table-cell>
          <table:table-cell table:formula="of:=[.B3064]/[.C3064]" office:value-type="float" office:value="0.00248159722222222" calcext:value-type="float">
            <text:p>0,00248159722222222000</text:p>
          </table:table-cell>
          <table:table-cell table:formula="of:=[.D3065]-[.D306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table:formula="of:=[.B3064]+7" office:value-type="float" office:value="21448" calcext:value-type="float">
            <text:p>21448</text:p>
          </table:table-cell>
          <table:table-cell office:value-type="float" office:value="8640000" calcext:value-type="float">
            <text:p>8640000</text:p>
          </table:table-cell>
          <table:table-cell table:formula="of:=[.B3065]/[.C3065]" office:value-type="float" office:value="0.00248240740740741" calcext:value-type="float">
            <text:p>0,00248240740740741000</text:p>
          </table:table-cell>
          <table:table-cell table:formula="of:=[.D3066]-[.D306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table:formula="of:=[.B3065]+7" office:value-type="float" office:value="21455" calcext:value-type="float">
            <text:p>21455</text:p>
          </table:table-cell>
          <table:table-cell office:value-type="float" office:value="8640000" calcext:value-type="float">
            <text:p>8640000</text:p>
          </table:table-cell>
          <table:table-cell table:formula="of:=[.B3066]/[.C3066]" office:value-type="float" office:value="0.00248321759259259" calcext:value-type="float">
            <text:p>0,00248321759259259000</text:p>
          </table:table-cell>
          <table:table-cell table:formula="of:=[.D3067]-[.D306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table:formula="of:=[.B3066]+7" office:value-type="float" office:value="21462" calcext:value-type="float">
            <text:p>21462</text:p>
          </table:table-cell>
          <table:table-cell office:value-type="float" office:value="8640000" calcext:value-type="float">
            <text:p>8640000</text:p>
          </table:table-cell>
          <table:table-cell table:formula="of:=[.B3067]/[.C3067]" office:value-type="float" office:value="0.00248402777777778" calcext:value-type="float">
            <text:p>0,00248402777777778000</text:p>
          </table:table-cell>
          <table:table-cell table:formula="of:=[.D3068]-[.D306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table:formula="of:=[.B3067]+7" office:value-type="float" office:value="21469" calcext:value-type="float">
            <text:p>21469</text:p>
          </table:table-cell>
          <table:table-cell office:value-type="float" office:value="8640000" calcext:value-type="float">
            <text:p>8640000</text:p>
          </table:table-cell>
          <table:table-cell table:formula="of:=[.B3068]/[.C3068]" office:value-type="float" office:value="0.00248483796296296" calcext:value-type="float">
            <text:p>0,00248483796296296000</text:p>
          </table:table-cell>
          <table:table-cell table:formula="of:=[.D3069]-[.D306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table:formula="of:=[.B3068]+7" office:value-type="float" office:value="21476" calcext:value-type="float">
            <text:p>21476</text:p>
          </table:table-cell>
          <table:table-cell office:value-type="float" office:value="8640000" calcext:value-type="float">
            <text:p>8640000</text:p>
          </table:table-cell>
          <table:table-cell table:formula="of:=[.B3069]/[.C3069]" office:value-type="float" office:value="0.00248564814814815" calcext:value-type="float">
            <text:p>0,00248564814814815000</text:p>
          </table:table-cell>
          <table:table-cell table:formula="of:=[.D3070]-[.D306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table:formula="of:=[.B3069]+7" office:value-type="float" office:value="21483" calcext:value-type="float">
            <text:p>21483</text:p>
          </table:table-cell>
          <table:table-cell office:value-type="float" office:value="8640000" calcext:value-type="float">
            <text:p>8640000</text:p>
          </table:table-cell>
          <table:table-cell table:formula="of:=[.B3070]/[.C3070]" office:value-type="float" office:value="0.00248645833333333" calcext:value-type="float">
            <text:p>0,00248645833333333000</text:p>
          </table:table-cell>
          <table:table-cell table:formula="of:=[.D3071]-[.D307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table:formula="of:=[.B3070]+7" office:value-type="float" office:value="21490" calcext:value-type="float">
            <text:p>21490</text:p>
          </table:table-cell>
          <table:table-cell office:value-type="float" office:value="8640000" calcext:value-type="float">
            <text:p>8640000</text:p>
          </table:table-cell>
          <table:table-cell table:formula="of:=[.B3071]/[.C3071]" office:value-type="float" office:value="0.00248726851851852" calcext:value-type="float">
            <text:p>0,00248726851851852000</text:p>
          </table:table-cell>
          <table:table-cell table:formula="of:=[.D3072]-[.D307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table:formula="of:=[.B3071]+7" office:value-type="float" office:value="21497" calcext:value-type="float">
            <text:p>21497</text:p>
          </table:table-cell>
          <table:table-cell office:value-type="float" office:value="8640000" calcext:value-type="float">
            <text:p>8640000</text:p>
          </table:table-cell>
          <table:table-cell table:formula="of:=[.B3072]/[.C3072]" office:value-type="float" office:value="0.0024880787037037" calcext:value-type="float">
            <text:p>0,00248807870370370000</text:p>
          </table:table-cell>
          <table:table-cell table:formula="of:=[.D3073]-[.D307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table:formula="of:=[.B3072]+7" office:value-type="float" office:value="21504" calcext:value-type="float">
            <text:p>21504</text:p>
          </table:table-cell>
          <table:table-cell office:value-type="float" office:value="8640000" calcext:value-type="float">
            <text:p>8640000</text:p>
          </table:table-cell>
          <table:table-cell table:formula="of:=[.B3073]/[.C3073]" office:value-type="float" office:value="0.00248888888888889" calcext:value-type="float">
            <text:p>0,00248888888888889000</text:p>
          </table:table-cell>
          <table:table-cell table:formula="of:=[.D3074]-[.D307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table:formula="of:=[.B3073]+7" office:value-type="float" office:value="21511" calcext:value-type="float">
            <text:p>21511</text:p>
          </table:table-cell>
          <table:table-cell office:value-type="float" office:value="8640000" calcext:value-type="float">
            <text:p>8640000</text:p>
          </table:table-cell>
          <table:table-cell table:formula="of:=[.B3074]/[.C3074]" office:value-type="float" office:value="0.00248969907407407" calcext:value-type="float">
            <text:p>0,00248969907407407000</text:p>
          </table:table-cell>
          <table:table-cell table:formula="of:=[.D3075]-[.D307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table:formula="of:=[.B3074]+7" office:value-type="float" office:value="21518" calcext:value-type="float">
            <text:p>21518</text:p>
          </table:table-cell>
          <table:table-cell office:value-type="float" office:value="8640000" calcext:value-type="float">
            <text:p>8640000</text:p>
          </table:table-cell>
          <table:table-cell table:formula="of:=[.B3075]/[.C3075]" office:value-type="float" office:value="0.00249050925925926" calcext:value-type="float">
            <text:p>0,00249050925925926000</text:p>
          </table:table-cell>
          <table:table-cell table:formula="of:=[.D3076]-[.D307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formula="of:=[.B3075]+7" office:value-type="float" office:value="21525" calcext:value-type="float">
            <text:p>21525</text:p>
          </table:table-cell>
          <table:table-cell office:value-type="float" office:value="8640000" calcext:value-type="float">
            <text:p>8640000</text:p>
          </table:table-cell>
          <table:table-cell table:formula="of:=[.B3076]/[.C3076]" office:value-type="float" office:value="0.00249131944444444" calcext:value-type="float">
            <text:p>0,00249131944444444000</text:p>
          </table:table-cell>
          <table:table-cell table:formula="of:=[.D3077]-[.D307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table:formula="of:=[.B3076]+7" office:value-type="float" office:value="21532" calcext:value-type="float">
            <text:p>21532</text:p>
          </table:table-cell>
          <table:table-cell office:value-type="float" office:value="8640000" calcext:value-type="float">
            <text:p>8640000</text:p>
          </table:table-cell>
          <table:table-cell table:formula="of:=[.B3077]/[.C3077]" office:value-type="float" office:value="0.00249212962962963" calcext:value-type="float">
            <text:p>0,00249212962962963000</text:p>
          </table:table-cell>
          <table:table-cell table:formula="of:=[.D3078]-[.D307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table:formula="of:=[.B3077]+7" office:value-type="float" office:value="21539" calcext:value-type="float">
            <text:p>21539</text:p>
          </table:table-cell>
          <table:table-cell office:value-type="float" office:value="8640000" calcext:value-type="float">
            <text:p>8640000</text:p>
          </table:table-cell>
          <table:table-cell table:formula="of:=[.B3078]/[.C3078]" office:value-type="float" office:value="0.00249293981481482" calcext:value-type="float">
            <text:p>0,00249293981481482000</text:p>
          </table:table-cell>
          <table:table-cell table:formula="of:=[.D3079]-[.D307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table:formula="of:=[.B3078]+7" office:value-type="float" office:value="21546" calcext:value-type="float">
            <text:p>21546</text:p>
          </table:table-cell>
          <table:table-cell office:value-type="float" office:value="8640000" calcext:value-type="float">
            <text:p>8640000</text:p>
          </table:table-cell>
          <table:table-cell table:formula="of:=[.B3079]/[.C3079]" office:value-type="float" office:value="0.00249375" calcext:value-type="float">
            <text:p>0,00249375000000000000</text:p>
          </table:table-cell>
          <table:table-cell table:formula="of:=[.D3080]-[.D307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table:formula="of:=[.B3079]+7" office:value-type="float" office:value="21553" calcext:value-type="float">
            <text:p>21553</text:p>
          </table:table-cell>
          <table:table-cell office:value-type="float" office:value="8640000" calcext:value-type="float">
            <text:p>8640000</text:p>
          </table:table-cell>
          <table:table-cell table:formula="of:=[.B3080]/[.C3080]" office:value-type="float" office:value="0.00249456018518519" calcext:value-type="float">
            <text:p>0,00249456018518519000</text:p>
          </table:table-cell>
          <table:table-cell table:formula="of:=[.D3081]-[.D308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table:formula="of:=[.B3080]+7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3081]/[.C3081]" office:value-type="float" office:value="0.00249537037037037" calcext:value-type="float">
            <text:p>0,00249537037037037000</text:p>
          </table:table-cell>
          <table:table-cell table:formula="of:=[.D3082]-[.D308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table:formula="of:=[.B3081]+7" office:value-type="float" office:value="21567" calcext:value-type="float">
            <text:p>21567</text:p>
          </table:table-cell>
          <table:table-cell office:value-type="float" office:value="8640000" calcext:value-type="float">
            <text:p>8640000</text:p>
          </table:table-cell>
          <table:table-cell table:formula="of:=[.B3082]/[.C3082]" office:value-type="float" office:value="0.00249618055555556" calcext:value-type="float">
            <text:p>0,00249618055555556000</text:p>
          </table:table-cell>
          <table:table-cell table:formula="of:=[.D3083]-[.D308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table:formula="of:=[.B3082]+7" office:value-type="float" office:value="21574" calcext:value-type="float">
            <text:p>21574</text:p>
          </table:table-cell>
          <table:table-cell office:value-type="float" office:value="8640000" calcext:value-type="float">
            <text:p>8640000</text:p>
          </table:table-cell>
          <table:table-cell table:formula="of:=[.B3083]/[.C3083]" office:value-type="float" office:value="0.00249699074074074" calcext:value-type="float">
            <text:p>0,00249699074074074000</text:p>
          </table:table-cell>
          <table:table-cell table:formula="of:=[.D3084]-[.D308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table:formula="of:=[.B3083]+7" office:value-type="float" office:value="21581" calcext:value-type="float">
            <text:p>21581</text:p>
          </table:table-cell>
          <table:table-cell office:value-type="float" office:value="8640000" calcext:value-type="float">
            <text:p>8640000</text:p>
          </table:table-cell>
          <table:table-cell table:formula="of:=[.B3084]/[.C3084]" office:value-type="float" office:value="0.00249780092592593" calcext:value-type="float">
            <text:p>0,00249780092592593000</text:p>
          </table:table-cell>
          <table:table-cell table:formula="of:=[.D3085]-[.D308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table:formula="of:=[.B3084]+7" office:value-type="float" office:value="21588" calcext:value-type="float">
            <text:p>21588</text:p>
          </table:table-cell>
          <table:table-cell office:value-type="float" office:value="8640000" calcext:value-type="float">
            <text:p>8640000</text:p>
          </table:table-cell>
          <table:table-cell table:formula="of:=[.B3085]/[.C3085]" office:value-type="float" office:value="0.00249861111111111" calcext:value-type="float">
            <text:p>0,00249861111111111000</text:p>
          </table:table-cell>
          <table:table-cell table:formula="of:=[.D3086]-[.D308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table:formula="of:=[.B3085]+7" office:value-type="float" office:value="21595" calcext:value-type="float">
            <text:p>21595</text:p>
          </table:table-cell>
          <table:table-cell office:value-type="float" office:value="8640000" calcext:value-type="float">
            <text:p>8640000</text:p>
          </table:table-cell>
          <table:table-cell table:formula="of:=[.B3086]/[.C3086]" office:value-type="float" office:value="0.0024994212962963" calcext:value-type="float">
            <text:p>0,00249942129629630000</text:p>
          </table:table-cell>
          <table:table-cell table:formula="of:=[.D3087]-[.D308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table:formula="of:=[.B3086]+7" office:value-type="float" office:value="21602" calcext:value-type="float">
            <text:p>21602</text:p>
          </table:table-cell>
          <table:table-cell office:value-type="float" office:value="8640000" calcext:value-type="float">
            <text:p>8640000</text:p>
          </table:table-cell>
          <table:table-cell table:formula="of:=[.B3087]/[.C3087]" office:value-type="float" office:value="0.00250023148148148" calcext:value-type="float">
            <text:p>0,00250023148148148000</text:p>
          </table:table-cell>
          <table:table-cell table:formula="of:=[.D3088]-[.D308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table:formula="of:=[.B3087]+7" office:value-type="float" office:value="21609" calcext:value-type="float">
            <text:p>21609</text:p>
          </table:table-cell>
          <table:table-cell office:value-type="float" office:value="8640000" calcext:value-type="float">
            <text:p>8640000</text:p>
          </table:table-cell>
          <table:table-cell table:formula="of:=[.B3088]/[.C3088]" office:value-type="float" office:value="0.00250104166666667" calcext:value-type="float">
            <text:p>0,00250104166666667000</text:p>
          </table:table-cell>
          <table:table-cell table:formula="of:=[.D3089]-[.D308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table:formula="of:=[.B3088]+7" office:value-type="float" office:value="21616" calcext:value-type="float">
            <text:p>21616</text:p>
          </table:table-cell>
          <table:table-cell office:value-type="float" office:value="8640000" calcext:value-type="float">
            <text:p>8640000</text:p>
          </table:table-cell>
          <table:table-cell table:formula="of:=[.B3089]/[.C3089]" office:value-type="float" office:value="0.00250185185185185" calcext:value-type="float">
            <text:p>0,00250185185185185000</text:p>
          </table:table-cell>
          <table:table-cell table:formula="of:=[.D3090]-[.D308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table:formula="of:=[.B3089]+7" office:value-type="float" office:value="21623" calcext:value-type="float">
            <text:p>21623</text:p>
          </table:table-cell>
          <table:table-cell office:value-type="float" office:value="8640000" calcext:value-type="float">
            <text:p>8640000</text:p>
          </table:table-cell>
          <table:table-cell table:formula="of:=[.B3090]/[.C3090]" office:value-type="float" office:value="0.00250266203703704" calcext:value-type="float">
            <text:p>0,00250266203703704000</text:p>
          </table:table-cell>
          <table:table-cell table:formula="of:=[.D3091]-[.D309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[.B3090]+7" office:value-type="float" office:value="21630" calcext:value-type="float">
            <text:p>21630</text:p>
          </table:table-cell>
          <table:table-cell office:value-type="float" office:value="8640000" calcext:value-type="float">
            <text:p>8640000</text:p>
          </table:table-cell>
          <table:table-cell table:formula="of:=[.B3091]/[.C3091]" office:value-type="float" office:value="0.00250347222222222" calcext:value-type="float">
            <text:p>0,00250347222222222000</text:p>
          </table:table-cell>
          <table:table-cell table:formula="of:=[.D3092]-[.D309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table:formula="of:=[.B3091]+7" office:value-type="float" office:value="21637" calcext:value-type="float">
            <text:p>21637</text:p>
          </table:table-cell>
          <table:table-cell office:value-type="float" office:value="8640000" calcext:value-type="float">
            <text:p>8640000</text:p>
          </table:table-cell>
          <table:table-cell table:formula="of:=[.B3092]/[.C3092]" office:value-type="float" office:value="0.00250428240740741" calcext:value-type="float">
            <text:p>0,00250428240740741000</text:p>
          </table:table-cell>
          <table:table-cell table:formula="of:=[.D3093]-[.D309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table:formula="of:=[.B3092]+7" office:value-type="float" office:value="21644" calcext:value-type="float">
            <text:p>21644</text:p>
          </table:table-cell>
          <table:table-cell office:value-type="float" office:value="8640000" calcext:value-type="float">
            <text:p>8640000</text:p>
          </table:table-cell>
          <table:table-cell table:formula="of:=[.B3093]/[.C3093]" office:value-type="float" office:value="0.00250509259259259" calcext:value-type="float">
            <text:p>0,00250509259259259000</text:p>
          </table:table-cell>
          <table:table-cell table:formula="of:=[.D3094]-[.D309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table:formula="of:=[.B3093]+7" office:value-type="float" office:value="21651" calcext:value-type="float">
            <text:p>21651</text:p>
          </table:table-cell>
          <table:table-cell office:value-type="float" office:value="8640000" calcext:value-type="float">
            <text:p>8640000</text:p>
          </table:table-cell>
          <table:table-cell table:formula="of:=[.B3094]/[.C3094]" office:value-type="float" office:value="0.00250590277777778" calcext:value-type="float">
            <text:p>0,00250590277777778000</text:p>
          </table:table-cell>
          <table:table-cell table:formula="of:=[.D3095]-[.D309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table:formula="of:=[.B3094]+7" office:value-type="float" office:value="21658" calcext:value-type="float">
            <text:p>21658</text:p>
          </table:table-cell>
          <table:table-cell office:value-type="float" office:value="8640000" calcext:value-type="float">
            <text:p>8640000</text:p>
          </table:table-cell>
          <table:table-cell table:formula="of:=[.B3095]/[.C3095]" office:value-type="float" office:value="0.00250671296296296" calcext:value-type="float">
            <text:p>0,00250671296296296000</text:p>
          </table:table-cell>
          <table:table-cell table:formula="of:=[.D3096]-[.D309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table:formula="of:=[.B3095]+7" office:value-type="float" office:value="21665" calcext:value-type="float">
            <text:p>21665</text:p>
          </table:table-cell>
          <table:table-cell office:value-type="float" office:value="8640000" calcext:value-type="float">
            <text:p>8640000</text:p>
          </table:table-cell>
          <table:table-cell table:formula="of:=[.B3096]/[.C3096]" office:value-type="float" office:value="0.00250752314814815" calcext:value-type="float">
            <text:p>0,00250752314814815000</text:p>
          </table:table-cell>
          <table:table-cell table:formula="of:=[.D3097]-[.D309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table:formula="of:=[.B3096]+7" office:value-type="float" office:value="21672" calcext:value-type="float">
            <text:p>21672</text:p>
          </table:table-cell>
          <table:table-cell office:value-type="float" office:value="8640000" calcext:value-type="float">
            <text:p>8640000</text:p>
          </table:table-cell>
          <table:table-cell table:formula="of:=[.B3097]/[.C3097]" office:value-type="float" office:value="0.00250833333333333" calcext:value-type="float">
            <text:p>0,00250833333333333000</text:p>
          </table:table-cell>
          <table:table-cell table:formula="of:=[.D3098]-[.D309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[.B3097]+7" office:value-type="float" office:value="21679" calcext:value-type="float">
            <text:p>21679</text:p>
          </table:table-cell>
          <table:table-cell office:value-type="float" office:value="8640000" calcext:value-type="float">
            <text:p>8640000</text:p>
          </table:table-cell>
          <table:table-cell table:formula="of:=[.B3098]/[.C3098]" office:value-type="float" office:value="0.00250914351851852" calcext:value-type="float">
            <text:p>0,00250914351851852000</text:p>
          </table:table-cell>
          <table:table-cell table:formula="of:=[.D3099]-[.D309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table:formula="of:=[.B3098]+7" office:value-type="float" office:value="21686" calcext:value-type="float">
            <text:p>21686</text:p>
          </table:table-cell>
          <table:table-cell office:value-type="float" office:value="8640000" calcext:value-type="float">
            <text:p>8640000</text:p>
          </table:table-cell>
          <table:table-cell table:formula="of:=[.B3099]/[.C3099]" office:value-type="float" office:value="0.0025099537037037" calcext:value-type="float">
            <text:p>0,00250995370370370000</text:p>
          </table:table-cell>
          <table:table-cell table:formula="of:=[.D3100]-[.D309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table:formula="of:=[.B3099]+7" office:value-type="float" office:value="21693" calcext:value-type="float">
            <text:p>21693</text:p>
          </table:table-cell>
          <table:table-cell office:value-type="float" office:value="8640000" calcext:value-type="float">
            <text:p>8640000</text:p>
          </table:table-cell>
          <table:table-cell table:formula="of:=[.B3100]/[.C3100]" office:value-type="float" office:value="0.00251076388888889" calcext:value-type="float">
            <text:p>0,00251076388888889000</text:p>
          </table:table-cell>
          <table:table-cell table:formula="of:=[.D3101]-[.D310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[.B3100]+7" office:value-type="float" office:value="21700" calcext:value-type="float">
            <text:p>21700</text:p>
          </table:table-cell>
          <table:table-cell office:value-type="float" office:value="8640000" calcext:value-type="float">
            <text:p>8640000</text:p>
          </table:table-cell>
          <table:table-cell table:formula="of:=[.B3101]/[.C3101]" office:value-type="float" office:value="0.00251157407407407" calcext:value-type="float">
            <text:p>0,00251157407407407000</text:p>
          </table:table-cell>
          <table:table-cell table:formula="of:=[.D3102]-[.D310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table:formula="of:=[.B3101]+7" office:value-type="float" office:value="21707" calcext:value-type="float">
            <text:p>21707</text:p>
          </table:table-cell>
          <table:table-cell office:value-type="float" office:value="8640000" calcext:value-type="float">
            <text:p>8640000</text:p>
          </table:table-cell>
          <table:table-cell table:formula="of:=[.B3102]/[.C3102]" office:value-type="float" office:value="0.00251238425925926" calcext:value-type="float">
            <text:p>0,00251238425925926000</text:p>
          </table:table-cell>
          <table:table-cell table:formula="of:=[.D3103]-[.D310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table:formula="of:=[.B3102]+7" office:value-type="float" office:value="21714" calcext:value-type="float">
            <text:p>21714</text:p>
          </table:table-cell>
          <table:table-cell office:value-type="float" office:value="8640000" calcext:value-type="float">
            <text:p>8640000</text:p>
          </table:table-cell>
          <table:table-cell table:formula="of:=[.B3103]/[.C3103]" office:value-type="float" office:value="0.00251319444444444" calcext:value-type="float">
            <text:p>0,00251319444444444000</text:p>
          </table:table-cell>
          <table:table-cell table:formula="of:=[.D3104]-[.D310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table:formula="of:=[.B3103]+7" office:value-type="float" office:value="21721" calcext:value-type="float">
            <text:p>21721</text:p>
          </table:table-cell>
          <table:table-cell office:value-type="float" office:value="8640000" calcext:value-type="float">
            <text:p>8640000</text:p>
          </table:table-cell>
          <table:table-cell table:formula="of:=[.B3104]/[.C3104]" office:value-type="float" office:value="0.00251400462962963" calcext:value-type="float">
            <text:p>0,00251400462962963000</text:p>
          </table:table-cell>
          <table:table-cell table:formula="of:=[.D3105]-[.D310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[.B3104]+7" office:value-type="float" office:value="21728" calcext:value-type="float">
            <text:p>21728</text:p>
          </table:table-cell>
          <table:table-cell office:value-type="float" office:value="8640000" calcext:value-type="float">
            <text:p>8640000</text:p>
          </table:table-cell>
          <table:table-cell table:formula="of:=[.B3105]/[.C3105]" office:value-type="float" office:value="0.00251481481481481" calcext:value-type="float">
            <text:p>0,00251481481481481000</text:p>
          </table:table-cell>
          <table:table-cell table:formula="of:=[.D3106]-[.D310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table:formula="of:=[.B3105]+7" office:value-type="float" office:value="21735" calcext:value-type="float">
            <text:p>21735</text:p>
          </table:table-cell>
          <table:table-cell office:value-type="float" office:value="8640000" calcext:value-type="float">
            <text:p>8640000</text:p>
          </table:table-cell>
          <table:table-cell table:formula="of:=[.B3106]/[.C3106]" office:value-type="float" office:value="0.002515625" calcext:value-type="float">
            <text:p>0,00251562500000000000</text:p>
          </table:table-cell>
          <table:table-cell table:formula="of:=[.D3107]-[.D310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[.B3106]+7" office:value-type="float" office:value="21742" calcext:value-type="float">
            <text:p>21742</text:p>
          </table:table-cell>
          <table:table-cell office:value-type="float" office:value="8640000" calcext:value-type="float">
            <text:p>8640000</text:p>
          </table:table-cell>
          <table:table-cell table:formula="of:=[.B3107]/[.C3107]" office:value-type="float" office:value="0.00251643518518519" calcext:value-type="float">
            <text:p>0,00251643518518519000</text:p>
          </table:table-cell>
          <table:table-cell table:formula="of:=[.D3108]-[.D310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table:formula="of:=[.B3107]+7" office:value-type="float" office:value="21749" calcext:value-type="float">
            <text:p>21749</text:p>
          </table:table-cell>
          <table:table-cell office:value-type="float" office:value="8640000" calcext:value-type="float">
            <text:p>8640000</text:p>
          </table:table-cell>
          <table:table-cell table:formula="of:=[.B3108]/[.C3108]" office:value-type="float" office:value="0.00251724537037037" calcext:value-type="float">
            <text:p>0,00251724537037037000</text:p>
          </table:table-cell>
          <table:table-cell table:formula="of:=[.D3109]-[.D310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table:formula="of:=[.B3108]+7" office:value-type="float" office:value="21756" calcext:value-type="float">
            <text:p>21756</text:p>
          </table:table-cell>
          <table:table-cell office:value-type="float" office:value="8640000" calcext:value-type="float">
            <text:p>8640000</text:p>
          </table:table-cell>
          <table:table-cell table:formula="of:=[.B3109]/[.C3109]" office:value-type="float" office:value="0.00251805555555556" calcext:value-type="float">
            <text:p>0,00251805555555556000</text:p>
          </table:table-cell>
          <table:table-cell table:formula="of:=[.D3110]-[.D310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[.B3109]+7" office:value-type="float" office:value="21763" calcext:value-type="float">
            <text:p>21763</text:p>
          </table:table-cell>
          <table:table-cell office:value-type="float" office:value="8640000" calcext:value-type="float">
            <text:p>8640000</text:p>
          </table:table-cell>
          <table:table-cell table:formula="of:=[.B3110]/[.C3110]" office:value-type="float" office:value="0.00251886574074074" calcext:value-type="float">
            <text:p>0,00251886574074074000</text:p>
          </table:table-cell>
          <table:table-cell table:formula="of:=[.D3111]-[.D311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table:formula="of:=[.B3110]+7" office:value-type="float" office:value="21770" calcext:value-type="float">
            <text:p>21770</text:p>
          </table:table-cell>
          <table:table-cell office:value-type="float" office:value="8640000" calcext:value-type="float">
            <text:p>8640000</text:p>
          </table:table-cell>
          <table:table-cell table:formula="of:=[.B3111]/[.C3111]" office:value-type="float" office:value="0.00251967592592593" calcext:value-type="float">
            <text:p>0,00251967592592593000</text:p>
          </table:table-cell>
          <table:table-cell table:formula="of:=[.D3112]-[.D311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table:formula="of:=[.B3111]+7" office:value-type="float" office:value="21777" calcext:value-type="float">
            <text:p>21777</text:p>
          </table:table-cell>
          <table:table-cell office:value-type="float" office:value="8640000" calcext:value-type="float">
            <text:p>8640000</text:p>
          </table:table-cell>
          <table:table-cell table:formula="of:=[.B3112]/[.C3112]" office:value-type="float" office:value="0.00252048611111111" calcext:value-type="float">
            <text:p>0,00252048611111111000</text:p>
          </table:table-cell>
          <table:table-cell table:formula="of:=[.D3113]-[.D311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table:formula="of:=[.B3112]+7" office:value-type="float" office:value="21784" calcext:value-type="float">
            <text:p>21784</text:p>
          </table:table-cell>
          <table:table-cell office:value-type="float" office:value="8640000" calcext:value-type="float">
            <text:p>8640000</text:p>
          </table:table-cell>
          <table:table-cell table:formula="of:=[.B3113]/[.C3113]" office:value-type="float" office:value="0.0025212962962963" calcext:value-type="float">
            <text:p>0,00252129629629630000</text:p>
          </table:table-cell>
          <table:table-cell table:formula="of:=[.D3114]-[.D311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table:formula="of:=[.B3113]+7" office:value-type="float" office:value="21791" calcext:value-type="float">
            <text:p>21791</text:p>
          </table:table-cell>
          <table:table-cell office:value-type="float" office:value="8640000" calcext:value-type="float">
            <text:p>8640000</text:p>
          </table:table-cell>
          <table:table-cell table:formula="of:=[.B3114]/[.C3114]" office:value-type="float" office:value="0.00252210648148148" calcext:value-type="float">
            <text:p>0,00252210648148148000</text:p>
          </table:table-cell>
          <table:table-cell table:formula="of:=[.D3115]-[.D311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table:formula="of:=[.B3114]+7" office:value-type="float" office:value="21798" calcext:value-type="float">
            <text:p>21798</text:p>
          </table:table-cell>
          <table:table-cell office:value-type="float" office:value="8640000" calcext:value-type="float">
            <text:p>8640000</text:p>
          </table:table-cell>
          <table:table-cell table:formula="of:=[.B3115]/[.C3115]" office:value-type="float" office:value="0.00252291666666667" calcext:value-type="float">
            <text:p>0,00252291666666667000</text:p>
          </table:table-cell>
          <table:table-cell table:formula="of:=[.D3116]-[.D311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table:formula="of:=[.B3115]+7" office:value-type="float" office:value="21805" calcext:value-type="float">
            <text:p>21805</text:p>
          </table:table-cell>
          <table:table-cell office:value-type="float" office:value="8640000" calcext:value-type="float">
            <text:p>8640000</text:p>
          </table:table-cell>
          <table:table-cell table:formula="of:=[.B3116]/[.C3116]" office:value-type="float" office:value="0.00252372685185185" calcext:value-type="float">
            <text:p>0,00252372685185185000</text:p>
          </table:table-cell>
          <table:table-cell table:formula="of:=[.D3117]-[.D311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table:formula="of:=[.B3116]+7" office:value-type="float" office:value="21812" calcext:value-type="float">
            <text:p>21812</text:p>
          </table:table-cell>
          <table:table-cell office:value-type="float" office:value="8640000" calcext:value-type="float">
            <text:p>8640000</text:p>
          </table:table-cell>
          <table:table-cell table:formula="of:=[.B3117]/[.C3117]" office:value-type="float" office:value="0.00252453703703704" calcext:value-type="float">
            <text:p>0,00252453703703704000</text:p>
          </table:table-cell>
          <table:table-cell table:formula="of:=[.D3118]-[.D311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table:formula="of:=[.B3117]+7" office:value-type="float" office:value="21819" calcext:value-type="float">
            <text:p>21819</text:p>
          </table:table-cell>
          <table:table-cell office:value-type="float" office:value="8640000" calcext:value-type="float">
            <text:p>8640000</text:p>
          </table:table-cell>
          <table:table-cell table:formula="of:=[.B3118]/[.C3118]" office:value-type="float" office:value="0.00252534722222222" calcext:value-type="float">
            <text:p>0,00252534722222222000</text:p>
          </table:table-cell>
          <table:table-cell table:formula="of:=[.D3119]-[.D311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table:formula="of:=[.B3118]+7" office:value-type="float" office:value="21826" calcext:value-type="float">
            <text:p>21826</text:p>
          </table:table-cell>
          <table:table-cell office:value-type="float" office:value="8640000" calcext:value-type="float">
            <text:p>8640000</text:p>
          </table:table-cell>
          <table:table-cell table:formula="of:=[.B3119]/[.C3119]" office:value-type="float" office:value="0.00252615740740741" calcext:value-type="float">
            <text:p>0,00252615740740741000</text:p>
          </table:table-cell>
          <table:table-cell table:formula="of:=[.D3120]-[.D311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[.B3119]+7" office:value-type="float" office:value="21833" calcext:value-type="float">
            <text:p>21833</text:p>
          </table:table-cell>
          <table:table-cell office:value-type="float" office:value="8640000" calcext:value-type="float">
            <text:p>8640000</text:p>
          </table:table-cell>
          <table:table-cell table:formula="of:=[.B3120]/[.C3120]" office:value-type="float" office:value="0.00252696759259259" calcext:value-type="float">
            <text:p>0,00252696759259259000</text:p>
          </table:table-cell>
          <table:table-cell table:formula="of:=[.D3121]-[.D312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table:formula="of:=[.B3120]+7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3121]/[.C3121]" office:value-type="float" office:value="0.00252777777777778" calcext:value-type="float">
            <text:p>0,00252777777777778000</text:p>
          </table:table-cell>
          <table:table-cell table:formula="of:=[.D3122]-[.D312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table:formula="of:=[.B3121]+7" office:value-type="float" office:value="21847" calcext:value-type="float">
            <text:p>21847</text:p>
          </table:table-cell>
          <table:table-cell office:value-type="float" office:value="8640000" calcext:value-type="float">
            <text:p>8640000</text:p>
          </table:table-cell>
          <table:table-cell table:formula="of:=[.B3122]/[.C3122]" office:value-type="float" office:value="0.00252858796296296" calcext:value-type="float">
            <text:p>0,00252858796296296000</text:p>
          </table:table-cell>
          <table:table-cell table:formula="of:=[.D3123]-[.D312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table:formula="of:=[.B3122]+7" office:value-type="float" office:value="21854" calcext:value-type="float">
            <text:p>21854</text:p>
          </table:table-cell>
          <table:table-cell office:value-type="float" office:value="8640000" calcext:value-type="float">
            <text:p>8640000</text:p>
          </table:table-cell>
          <table:table-cell table:formula="of:=[.B3123]/[.C3123]" office:value-type="float" office:value="0.00252939814814815" calcext:value-type="float">
            <text:p>0,00252939814814815000</text:p>
          </table:table-cell>
          <table:table-cell table:formula="of:=[.D3124]-[.D312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table:formula="of:=[.B3123]+7" office:value-type="float" office:value="21861" calcext:value-type="float">
            <text:p>21861</text:p>
          </table:table-cell>
          <table:table-cell office:value-type="float" office:value="8640000" calcext:value-type="float">
            <text:p>8640000</text:p>
          </table:table-cell>
          <table:table-cell table:formula="of:=[.B3124]/[.C3124]" office:value-type="float" office:value="0.00253020833333333" calcext:value-type="float">
            <text:p>0,00253020833333333000</text:p>
          </table:table-cell>
          <table:table-cell table:formula="of:=[.D3125]-[.D312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table:formula="of:=[.B3124]+7" office:value-type="float" office:value="21868" calcext:value-type="float">
            <text:p>21868</text:p>
          </table:table-cell>
          <table:table-cell office:value-type="float" office:value="8640000" calcext:value-type="float">
            <text:p>8640000</text:p>
          </table:table-cell>
          <table:table-cell table:formula="of:=[.B3125]/[.C3125]" office:value-type="float" office:value="0.00253101851851852" calcext:value-type="float">
            <text:p>0,00253101851851852000</text:p>
          </table:table-cell>
          <table:table-cell table:formula="of:=[.D3126]-[.D312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formula="of:=[.B3125]+7" office:value-type="float" office:value="21875" calcext:value-type="float">
            <text:p>21875</text:p>
          </table:table-cell>
          <table:table-cell office:value-type="float" office:value="8640000" calcext:value-type="float">
            <text:p>8640000</text:p>
          </table:table-cell>
          <table:table-cell table:formula="of:=[.B3126]/[.C3126]" office:value-type="float" office:value="0.0025318287037037" calcext:value-type="float">
            <text:p>0,00253182870370370000</text:p>
          </table:table-cell>
          <table:table-cell table:formula="of:=[.D3127]-[.D312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table:formula="of:=[.B3126]+7" office:value-type="float" office:value="21882" calcext:value-type="float">
            <text:p>21882</text:p>
          </table:table-cell>
          <table:table-cell office:value-type="float" office:value="8640000" calcext:value-type="float">
            <text:p>8640000</text:p>
          </table:table-cell>
          <table:table-cell table:formula="of:=[.B3127]/[.C3127]" office:value-type="float" office:value="0.00253263888888889" calcext:value-type="float">
            <text:p>0,00253263888888889000</text:p>
          </table:table-cell>
          <table:table-cell table:formula="of:=[.D3128]-[.D312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table:formula="of:=[.B3127]+7" office:value-type="float" office:value="21889" calcext:value-type="float">
            <text:p>21889</text:p>
          </table:table-cell>
          <table:table-cell office:value-type="float" office:value="8640000" calcext:value-type="float">
            <text:p>8640000</text:p>
          </table:table-cell>
          <table:table-cell table:formula="of:=[.B3128]/[.C3128]" office:value-type="float" office:value="0.00253344907407407" calcext:value-type="float">
            <text:p>0,00253344907407407000</text:p>
          </table:table-cell>
          <table:table-cell table:formula="of:=[.D3129]-[.D312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table:formula="of:=[.B3128]+7" office:value-type="float" office:value="21896" calcext:value-type="float">
            <text:p>21896</text:p>
          </table:table-cell>
          <table:table-cell office:value-type="float" office:value="8640000" calcext:value-type="float">
            <text:p>8640000</text:p>
          </table:table-cell>
          <table:table-cell table:formula="of:=[.B3129]/[.C3129]" office:value-type="float" office:value="0.00253425925925926" calcext:value-type="float">
            <text:p>0,00253425925925926000</text:p>
          </table:table-cell>
          <table:table-cell table:formula="of:=[.D3130]-[.D312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table:formula="of:=[.B3129]+7" office:value-type="float" office:value="21903" calcext:value-type="float">
            <text:p>21903</text:p>
          </table:table-cell>
          <table:table-cell office:value-type="float" office:value="8640000" calcext:value-type="float">
            <text:p>8640000</text:p>
          </table:table-cell>
          <table:table-cell table:formula="of:=[.B3130]/[.C3130]" office:value-type="float" office:value="0.00253506944444444" calcext:value-type="float">
            <text:p>0,00253506944444444000</text:p>
          </table:table-cell>
          <table:table-cell table:formula="of:=[.D3131]-[.D313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table:formula="of:=[.B3130]+7" office:value-type="float" office:value="21910" calcext:value-type="float">
            <text:p>21910</text:p>
          </table:table-cell>
          <table:table-cell office:value-type="float" office:value="8640000" calcext:value-type="float">
            <text:p>8640000</text:p>
          </table:table-cell>
          <table:table-cell table:formula="of:=[.B3131]/[.C3131]" office:value-type="float" office:value="0.00253587962962963" calcext:value-type="float">
            <text:p>0,00253587962962963000</text:p>
          </table:table-cell>
          <table:table-cell table:formula="of:=[.D3132]-[.D313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table:formula="of:=[.B3131]+7" office:value-type="float" office:value="21917" calcext:value-type="float">
            <text:p>21917</text:p>
          </table:table-cell>
          <table:table-cell office:value-type="float" office:value="8640000" calcext:value-type="float">
            <text:p>8640000</text:p>
          </table:table-cell>
          <table:table-cell table:formula="of:=[.B3132]/[.C3132]" office:value-type="float" office:value="0.00253668981481482" calcext:value-type="float">
            <text:p>0,00253668981481482000</text:p>
          </table:table-cell>
          <table:table-cell table:formula="of:=[.D3133]-[.D313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table:formula="of:=[.B3132]+7" office:value-type="float" office:value="21924" calcext:value-type="float">
            <text:p>21924</text:p>
          </table:table-cell>
          <table:table-cell office:value-type="float" office:value="8640000" calcext:value-type="float">
            <text:p>8640000</text:p>
          </table:table-cell>
          <table:table-cell table:formula="of:=[.B3133]/[.C3133]" office:value-type="float" office:value="0.0025375" calcext:value-type="float">
            <text:p>0,00253750000000000000</text:p>
          </table:table-cell>
          <table:table-cell table:formula="of:=[.D3134]-[.D313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table:formula="of:=[.B3133]+7" office:value-type="float" office:value="21931" calcext:value-type="float">
            <text:p>21931</text:p>
          </table:table-cell>
          <table:table-cell office:value-type="float" office:value="8640000" calcext:value-type="float">
            <text:p>8640000</text:p>
          </table:table-cell>
          <table:table-cell table:formula="of:=[.B3134]/[.C3134]" office:value-type="float" office:value="0.00253831018518519" calcext:value-type="float">
            <text:p>0,00253831018518519000</text:p>
          </table:table-cell>
          <table:table-cell table:formula="of:=[.D3135]-[.D313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table:formula="of:=[.B3134]+7" office:value-type="float" office:value="21938" calcext:value-type="float">
            <text:p>21938</text:p>
          </table:table-cell>
          <table:table-cell office:value-type="float" office:value="8640000" calcext:value-type="float">
            <text:p>8640000</text:p>
          </table:table-cell>
          <table:table-cell table:formula="of:=[.B3135]/[.C3135]" office:value-type="float" office:value="0.00253912037037037" calcext:value-type="float">
            <text:p>0,00253912037037037000</text:p>
          </table:table-cell>
          <table:table-cell table:formula="of:=[.D3136]-[.D313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table:formula="of:=[.B3135]+7" office:value-type="float" office:value="21945" calcext:value-type="float">
            <text:p>21945</text:p>
          </table:table-cell>
          <table:table-cell office:value-type="float" office:value="8640000" calcext:value-type="float">
            <text:p>8640000</text:p>
          </table:table-cell>
          <table:table-cell table:formula="of:=[.B3136]/[.C3136]" office:value-type="float" office:value="0.00253993055555556" calcext:value-type="float">
            <text:p>0,00253993055555556000</text:p>
          </table:table-cell>
          <table:table-cell table:formula="of:=[.D3137]-[.D313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table:formula="of:=[.B3136]+7" office:value-type="float" office:value="21952" calcext:value-type="float">
            <text:p>21952</text:p>
          </table:table-cell>
          <table:table-cell office:value-type="float" office:value="8640000" calcext:value-type="float">
            <text:p>8640000</text:p>
          </table:table-cell>
          <table:table-cell table:formula="of:=[.B3137]/[.C3137]" office:value-type="float" office:value="0.00254074074074074" calcext:value-type="float">
            <text:p>0,00254074074074074000</text:p>
          </table:table-cell>
          <table:table-cell table:formula="of:=[.D3138]-[.D313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table:formula="of:=[.B3137]+7" office:value-type="float" office:value="21959" calcext:value-type="float">
            <text:p>21959</text:p>
          </table:table-cell>
          <table:table-cell office:value-type="float" office:value="8640000" calcext:value-type="float">
            <text:p>8640000</text:p>
          </table:table-cell>
          <table:table-cell table:formula="of:=[.B3138]/[.C3138]" office:value-type="float" office:value="0.00254155092592593" calcext:value-type="float">
            <text:p>0,00254155092592593000</text:p>
          </table:table-cell>
          <table:table-cell table:formula="of:=[.D3139]-[.D313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table:formula="of:=[.B3138]+7" office:value-type="float" office:value="21966" calcext:value-type="float">
            <text:p>21966</text:p>
          </table:table-cell>
          <table:table-cell office:value-type="float" office:value="8640000" calcext:value-type="float">
            <text:p>8640000</text:p>
          </table:table-cell>
          <table:table-cell table:formula="of:=[.B3139]/[.C3139]" office:value-type="float" office:value="0.00254236111111111" calcext:value-type="float">
            <text:p>0,00254236111111111000</text:p>
          </table:table-cell>
          <table:table-cell table:formula="of:=[.D3140]-[.D313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table:formula="of:=[.B3139]+7" office:value-type="float" office:value="21973" calcext:value-type="float">
            <text:p>21973</text:p>
          </table:table-cell>
          <table:table-cell office:value-type="float" office:value="8640000" calcext:value-type="float">
            <text:p>8640000</text:p>
          </table:table-cell>
          <table:table-cell table:formula="of:=[.B3140]/[.C3140]" office:value-type="float" office:value="0.0025431712962963" calcext:value-type="float">
            <text:p>0,00254317129629630000</text:p>
          </table:table-cell>
          <table:table-cell table:formula="of:=[.D3141]-[.D314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table:formula="of:=[.B3140]+7" office:value-type="float" office:value="21980" calcext:value-type="float">
            <text:p>21980</text:p>
          </table:table-cell>
          <table:table-cell office:value-type="float" office:value="8640000" calcext:value-type="float">
            <text:p>8640000</text:p>
          </table:table-cell>
          <table:table-cell table:formula="of:=[.B3141]/[.C3141]" office:value-type="float" office:value="0.00254398148148148" calcext:value-type="float">
            <text:p>0,00254398148148148000</text:p>
          </table:table-cell>
          <table:table-cell table:formula="of:=[.D3142]-[.D314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table:formula="of:=[.B3141]+7" office:value-type="float" office:value="21987" calcext:value-type="float">
            <text:p>21987</text:p>
          </table:table-cell>
          <table:table-cell office:value-type="float" office:value="8640000" calcext:value-type="float">
            <text:p>8640000</text:p>
          </table:table-cell>
          <table:table-cell table:formula="of:=[.B3142]/[.C3142]" office:value-type="float" office:value="0.00254479166666667" calcext:value-type="float">
            <text:p>0,00254479166666667000</text:p>
          </table:table-cell>
          <table:table-cell table:formula="of:=[.D3143]-[.D314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table:formula="of:=[.B3142]+7" office:value-type="float" office:value="21994" calcext:value-type="float">
            <text:p>21994</text:p>
          </table:table-cell>
          <table:table-cell office:value-type="float" office:value="8640000" calcext:value-type="float">
            <text:p>8640000</text:p>
          </table:table-cell>
          <table:table-cell table:formula="of:=[.B3143]/[.C3143]" office:value-type="float" office:value="0.00254560185185185" calcext:value-type="float">
            <text:p>0,00254560185185185000</text:p>
          </table:table-cell>
          <table:table-cell table:formula="of:=[.D3144]-[.D314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[.B3143]+7" office:value-type="float" office:value="22001" calcext:value-type="float">
            <text:p>22001</text:p>
          </table:table-cell>
          <table:table-cell office:value-type="float" office:value="8640000" calcext:value-type="float">
            <text:p>8640000</text:p>
          </table:table-cell>
          <table:table-cell table:formula="of:=[.B3144]/[.C3144]" office:value-type="float" office:value="0.00254641203703704" calcext:value-type="float">
            <text:p>0,00254641203703704000</text:p>
          </table:table-cell>
          <table:table-cell table:formula="of:=[.D3145]-[.D314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table:formula="of:=[.B3144]+7" office:value-type="float" office:value="22008" calcext:value-type="float">
            <text:p>22008</text:p>
          </table:table-cell>
          <table:table-cell office:value-type="float" office:value="8640000" calcext:value-type="float">
            <text:p>8640000</text:p>
          </table:table-cell>
          <table:table-cell table:formula="of:=[.B3145]/[.C3145]" office:value-type="float" office:value="0.00254722222222222" calcext:value-type="float">
            <text:p>0,00254722222222222000</text:p>
          </table:table-cell>
          <table:table-cell table:formula="of:=[.D3146]-[.D314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table:formula="of:=[.B3145]+7" office:value-type="float" office:value="22015" calcext:value-type="float">
            <text:p>22015</text:p>
          </table:table-cell>
          <table:table-cell office:value-type="float" office:value="8640000" calcext:value-type="float">
            <text:p>8640000</text:p>
          </table:table-cell>
          <table:table-cell table:formula="of:=[.B3146]/[.C3146]" office:value-type="float" office:value="0.00254803240740741" calcext:value-type="float">
            <text:p>0,00254803240740741000</text:p>
          </table:table-cell>
          <table:table-cell table:formula="of:=[.D3147]-[.D314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table:formula="of:=[.B3146]+7" office:value-type="float" office:value="22022" calcext:value-type="float">
            <text:p>22022</text:p>
          </table:table-cell>
          <table:table-cell office:value-type="float" office:value="8640000" calcext:value-type="float">
            <text:p>8640000</text:p>
          </table:table-cell>
          <table:table-cell table:formula="of:=[.B3147]/[.C3147]" office:value-type="float" office:value="0.00254884259259259" calcext:value-type="float">
            <text:p>0,00254884259259259000</text:p>
          </table:table-cell>
          <table:table-cell table:formula="of:=[.D3148]-[.D314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table:formula="of:=[.B3147]+7" office:value-type="float" office:value="22029" calcext:value-type="float">
            <text:p>22029</text:p>
          </table:table-cell>
          <table:table-cell office:value-type="float" office:value="8640000" calcext:value-type="float">
            <text:p>8640000</text:p>
          </table:table-cell>
          <table:table-cell table:formula="of:=[.B3148]/[.C3148]" office:value-type="float" office:value="0.00254965277777778" calcext:value-type="float">
            <text:p>0,00254965277777778000</text:p>
          </table:table-cell>
          <table:table-cell table:formula="of:=[.D3149]-[.D314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table:formula="of:=[.B3148]+7" office:value-type="float" office:value="22036" calcext:value-type="float">
            <text:p>22036</text:p>
          </table:table-cell>
          <table:table-cell office:value-type="float" office:value="8640000" calcext:value-type="float">
            <text:p>8640000</text:p>
          </table:table-cell>
          <table:table-cell table:formula="of:=[.B3149]/[.C3149]" office:value-type="float" office:value="0.00255046296296296" calcext:value-type="float">
            <text:p>0,00255046296296296000</text:p>
          </table:table-cell>
          <table:table-cell table:formula="of:=[.D3150]-[.D314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table:formula="of:=[.B3149]+7" office:value-type="float" office:value="22043" calcext:value-type="float">
            <text:p>22043</text:p>
          </table:table-cell>
          <table:table-cell office:value-type="float" office:value="8640000" calcext:value-type="float">
            <text:p>8640000</text:p>
          </table:table-cell>
          <table:table-cell table:formula="of:=[.B3150]/[.C3150]" office:value-type="float" office:value="0.00255127314814815" calcext:value-type="float">
            <text:p>0,00255127314814815000</text:p>
          </table:table-cell>
          <table:table-cell table:formula="of:=[.D3151]-[.D315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formula="of:=[.B3150]+7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3151]/[.C3151]" office:value-type="float" office:value="0.00255208333333333" calcext:value-type="float">
            <text:p>0,00255208333333333000</text:p>
          </table:table-cell>
          <table:table-cell table:formula="of:=[.D3152]-[.D315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table:formula="of:=[.B3151]+7" office:value-type="float" office:value="22057" calcext:value-type="float">
            <text:p>22057</text:p>
          </table:table-cell>
          <table:table-cell office:value-type="float" office:value="8640000" calcext:value-type="float">
            <text:p>8640000</text:p>
          </table:table-cell>
          <table:table-cell table:formula="of:=[.B3152]/[.C3152]" office:value-type="float" office:value="0.00255289351851852" calcext:value-type="float">
            <text:p>0,00255289351851852000</text:p>
          </table:table-cell>
          <table:table-cell table:formula="of:=[.D3153]-[.D315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table:formula="of:=[.B3152]+7" office:value-type="float" office:value="22064" calcext:value-type="float">
            <text:p>22064</text:p>
          </table:table-cell>
          <table:table-cell office:value-type="float" office:value="8640000" calcext:value-type="float">
            <text:p>8640000</text:p>
          </table:table-cell>
          <table:table-cell table:formula="of:=[.B3153]/[.C3153]" office:value-type="float" office:value="0.0025537037037037" calcext:value-type="float">
            <text:p>0,00255370370370370000</text:p>
          </table:table-cell>
          <table:table-cell table:formula="of:=[.D3154]-[.D315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table:formula="of:=[.B3153]+7" office:value-type="float" office:value="22071" calcext:value-type="float">
            <text:p>22071</text:p>
          </table:table-cell>
          <table:table-cell office:value-type="float" office:value="8640000" calcext:value-type="float">
            <text:p>8640000</text:p>
          </table:table-cell>
          <table:table-cell table:formula="of:=[.B3154]/[.C3154]" office:value-type="float" office:value="0.00255451388888889" calcext:value-type="float">
            <text:p>0,00255451388888889000</text:p>
          </table:table-cell>
          <table:table-cell table:formula="of:=[.D3155]-[.D315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table:formula="of:=[.B3154]+7" office:value-type="float" office:value="22078" calcext:value-type="float">
            <text:p>22078</text:p>
          </table:table-cell>
          <table:table-cell office:value-type="float" office:value="8640000" calcext:value-type="float">
            <text:p>8640000</text:p>
          </table:table-cell>
          <table:table-cell table:formula="of:=[.B3155]/[.C3155]" office:value-type="float" office:value="0.00255532407407407" calcext:value-type="float">
            <text:p>0,00255532407407407000</text:p>
          </table:table-cell>
          <table:table-cell table:formula="of:=[.D3156]-[.D315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table:formula="of:=[.B3155]+7" office:value-type="float" office:value="22085" calcext:value-type="float">
            <text:p>22085</text:p>
          </table:table-cell>
          <table:table-cell office:value-type="float" office:value="8640000" calcext:value-type="float">
            <text:p>8640000</text:p>
          </table:table-cell>
          <table:table-cell table:formula="of:=[.B3156]/[.C3156]" office:value-type="float" office:value="0.00255613425925926" calcext:value-type="float">
            <text:p>0,00255613425925926000</text:p>
          </table:table-cell>
          <table:table-cell table:formula="of:=[.D3157]-[.D315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table:formula="of:=[.B3156]+7" office:value-type="float" office:value="22092" calcext:value-type="float">
            <text:p>22092</text:p>
          </table:table-cell>
          <table:table-cell office:value-type="float" office:value="8640000" calcext:value-type="float">
            <text:p>8640000</text:p>
          </table:table-cell>
          <table:table-cell table:formula="of:=[.B3157]/[.C3157]" office:value-type="float" office:value="0.00255694444444444" calcext:value-type="float">
            <text:p>0,00255694444444444000</text:p>
          </table:table-cell>
          <table:table-cell table:formula="of:=[.D3158]-[.D315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table:formula="of:=[.B3157]+7" office:value-type="float" office:value="22099" calcext:value-type="float">
            <text:p>22099</text:p>
          </table:table-cell>
          <table:table-cell office:value-type="float" office:value="8640000" calcext:value-type="float">
            <text:p>8640000</text:p>
          </table:table-cell>
          <table:table-cell table:formula="of:=[.B3158]/[.C3158]" office:value-type="float" office:value="0.00255775462962963" calcext:value-type="float">
            <text:p>0,00255775462962963000</text:p>
          </table:table-cell>
          <table:table-cell table:formula="of:=[.D3159]-[.D315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table:formula="of:=[.B3158]+7" office:value-type="float" office:value="22106" calcext:value-type="float">
            <text:p>22106</text:p>
          </table:table-cell>
          <table:table-cell office:value-type="float" office:value="8640000" calcext:value-type="float">
            <text:p>8640000</text:p>
          </table:table-cell>
          <table:table-cell table:formula="of:=[.B3159]/[.C3159]" office:value-type="float" office:value="0.00255856481481481" calcext:value-type="float">
            <text:p>0,00255856481481481000</text:p>
          </table:table-cell>
          <table:table-cell table:formula="of:=[.D3160]-[.D315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table:formula="of:=[.B3159]+7" office:value-type="float" office:value="22113" calcext:value-type="float">
            <text:p>22113</text:p>
          </table:table-cell>
          <table:table-cell office:value-type="float" office:value="8640000" calcext:value-type="float">
            <text:p>8640000</text:p>
          </table:table-cell>
          <table:table-cell table:formula="of:=[.B3160]/[.C3160]" office:value-type="float" office:value="0.002559375" calcext:value-type="float">
            <text:p>0,00255937500000000000</text:p>
          </table:table-cell>
          <table:table-cell table:formula="of:=[.D3161]-[.D316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table:formula="of:=[.B3160]+7" office:value-type="float" office:value="22120" calcext:value-type="float">
            <text:p>22120</text:p>
          </table:table-cell>
          <table:table-cell office:value-type="float" office:value="8640000" calcext:value-type="float">
            <text:p>8640000</text:p>
          </table:table-cell>
          <table:table-cell table:formula="of:=[.B3161]/[.C3161]" office:value-type="float" office:value="0.00256018518518519" calcext:value-type="float">
            <text:p>0,00256018518518519000</text:p>
          </table:table-cell>
          <table:table-cell table:formula="of:=[.D3162]-[.D316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table:formula="of:=[.B3161]+7" office:value-type="float" office:value="22127" calcext:value-type="float">
            <text:p>22127</text:p>
          </table:table-cell>
          <table:table-cell office:value-type="float" office:value="8640000" calcext:value-type="float">
            <text:p>8640000</text:p>
          </table:table-cell>
          <table:table-cell table:formula="of:=[.B3162]/[.C3162]" office:value-type="float" office:value="0.00256099537037037" calcext:value-type="float">
            <text:p>0,00256099537037037000</text:p>
          </table:table-cell>
          <table:table-cell table:formula="of:=[.D3163]-[.D316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table:formula="of:=[.B3162]+7" office:value-type="float" office:value="22134" calcext:value-type="float">
            <text:p>22134</text:p>
          </table:table-cell>
          <table:table-cell office:value-type="float" office:value="8640000" calcext:value-type="float">
            <text:p>8640000</text:p>
          </table:table-cell>
          <table:table-cell table:formula="of:=[.B3163]/[.C3163]" office:value-type="float" office:value="0.00256180555555556" calcext:value-type="float">
            <text:p>0,00256180555555556000</text:p>
          </table:table-cell>
          <table:table-cell table:formula="of:=[.D3164]-[.D316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table:formula="of:=[.B3163]+7" office:value-type="float" office:value="22141" calcext:value-type="float">
            <text:p>22141</text:p>
          </table:table-cell>
          <table:table-cell office:value-type="float" office:value="8640000" calcext:value-type="float">
            <text:p>8640000</text:p>
          </table:table-cell>
          <table:table-cell table:formula="of:=[.B3164]/[.C3164]" office:value-type="float" office:value="0.00256261574074074" calcext:value-type="float">
            <text:p>0,00256261574074074000</text:p>
          </table:table-cell>
          <table:table-cell table:formula="of:=[.D3165]-[.D316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table:formula="of:=[.B3164]+7" office:value-type="float" office:value="22148" calcext:value-type="float">
            <text:p>22148</text:p>
          </table:table-cell>
          <table:table-cell office:value-type="float" office:value="8640000" calcext:value-type="float">
            <text:p>8640000</text:p>
          </table:table-cell>
          <table:table-cell table:formula="of:=[.B3165]/[.C3165]" office:value-type="float" office:value="0.00256342592592593" calcext:value-type="float">
            <text:p>0,00256342592592593000</text:p>
          </table:table-cell>
          <table:table-cell table:formula="of:=[.D3166]-[.D316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table:formula="of:=[.B3165]+7" office:value-type="float" office:value="22155" calcext:value-type="float">
            <text:p>22155</text:p>
          </table:table-cell>
          <table:table-cell office:value-type="float" office:value="8640000" calcext:value-type="float">
            <text:p>8640000</text:p>
          </table:table-cell>
          <table:table-cell table:formula="of:=[.B3166]/[.C3166]" office:value-type="float" office:value="0.00256423611111111" calcext:value-type="float">
            <text:p>0,00256423611111111000</text:p>
          </table:table-cell>
          <table:table-cell table:formula="of:=[.D3167]-[.D316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table:formula="of:=[.B3166]+7" office:value-type="float" office:value="22162" calcext:value-type="float">
            <text:p>22162</text:p>
          </table:table-cell>
          <table:table-cell office:value-type="float" office:value="8640000" calcext:value-type="float">
            <text:p>8640000</text:p>
          </table:table-cell>
          <table:table-cell table:formula="of:=[.B3167]/[.C3167]" office:value-type="float" office:value="0.0025650462962963" calcext:value-type="float">
            <text:p>0,00256504629629630000</text:p>
          </table:table-cell>
          <table:table-cell table:formula="of:=[.D3168]-[.D316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table:formula="of:=[.B3167]+7" office:value-type="float" office:value="22169" calcext:value-type="float">
            <text:p>22169</text:p>
          </table:table-cell>
          <table:table-cell office:value-type="float" office:value="8640000" calcext:value-type="float">
            <text:p>8640000</text:p>
          </table:table-cell>
          <table:table-cell table:formula="of:=[.B3168]/[.C3168]" office:value-type="float" office:value="0.00256585648148148" calcext:value-type="float">
            <text:p>0,00256585648148148000</text:p>
          </table:table-cell>
          <table:table-cell table:formula="of:=[.D3169]-[.D316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table:formula="of:=[.B3168]+7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3169]/[.C3169]" office:value-type="float" office:value="0.00256666666666667" calcext:value-type="float">
            <text:p>0,00256666666666667000</text:p>
          </table:table-cell>
          <table:table-cell table:formula="of:=[.D3170]-[.D316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table:formula="of:=[.B3169]+7" office:value-type="float" office:value="22183" calcext:value-type="float">
            <text:p>22183</text:p>
          </table:table-cell>
          <table:table-cell office:value-type="float" office:value="8640000" calcext:value-type="float">
            <text:p>8640000</text:p>
          </table:table-cell>
          <table:table-cell table:formula="of:=[.B3170]/[.C3170]" office:value-type="float" office:value="0.00256747685185185" calcext:value-type="float">
            <text:p>0,00256747685185185000</text:p>
          </table:table-cell>
          <table:table-cell table:formula="of:=[.D3171]-[.D317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table:formula="of:=[.B3170]+7" office:value-type="float" office:value="22190" calcext:value-type="float">
            <text:p>22190</text:p>
          </table:table-cell>
          <table:table-cell office:value-type="float" office:value="8640000" calcext:value-type="float">
            <text:p>8640000</text:p>
          </table:table-cell>
          <table:table-cell table:formula="of:=[.B3171]/[.C3171]" office:value-type="float" office:value="0.00256828703703704" calcext:value-type="float">
            <text:p>0,00256828703703704000</text:p>
          </table:table-cell>
          <table:table-cell table:formula="of:=[.D3172]-[.D317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table:formula="of:=[.B3171]+7" office:value-type="float" office:value="22197" calcext:value-type="float">
            <text:p>22197</text:p>
          </table:table-cell>
          <table:table-cell office:value-type="float" office:value="8640000" calcext:value-type="float">
            <text:p>8640000</text:p>
          </table:table-cell>
          <table:table-cell table:formula="of:=[.B3172]/[.C3172]" office:value-type="float" office:value="0.00256909722222222" calcext:value-type="float">
            <text:p>0,00256909722222222000</text:p>
          </table:table-cell>
          <table:table-cell table:formula="of:=[.D3173]-[.D317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table:formula="of:=[.B3172]+7" office:value-type="float" office:value="22204" calcext:value-type="float">
            <text:p>22204</text:p>
          </table:table-cell>
          <table:table-cell office:value-type="float" office:value="8640000" calcext:value-type="float">
            <text:p>8640000</text:p>
          </table:table-cell>
          <table:table-cell table:formula="of:=[.B3173]/[.C3173]" office:value-type="float" office:value="0.00256990740740741" calcext:value-type="float">
            <text:p>0,00256990740740741000</text:p>
          </table:table-cell>
          <table:table-cell table:formula="of:=[.D3174]-[.D317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table:formula="of:=[.B3173]+7" office:value-type="float" office:value="22211" calcext:value-type="float">
            <text:p>22211</text:p>
          </table:table-cell>
          <table:table-cell office:value-type="float" office:value="8640000" calcext:value-type="float">
            <text:p>8640000</text:p>
          </table:table-cell>
          <table:table-cell table:formula="of:=[.B3174]/[.C3174]" office:value-type="float" office:value="0.00257071759259259" calcext:value-type="float">
            <text:p>0,00257071759259259000</text:p>
          </table:table-cell>
          <table:table-cell table:formula="of:=[.D3175]-[.D317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table:formula="of:=[.B3174]+7" office:value-type="float" office:value="22218" calcext:value-type="float">
            <text:p>22218</text:p>
          </table:table-cell>
          <table:table-cell office:value-type="float" office:value="8640000" calcext:value-type="float">
            <text:p>8640000</text:p>
          </table:table-cell>
          <table:table-cell table:formula="of:=[.B3175]/[.C3175]" office:value-type="float" office:value="0.00257152777777778" calcext:value-type="float">
            <text:p>0,00257152777777778000</text:p>
          </table:table-cell>
          <table:table-cell table:formula="of:=[.D3176]-[.D317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formula="of:=[.B3175]+7" office:value-type="float" office:value="22225" calcext:value-type="float">
            <text:p>22225</text:p>
          </table:table-cell>
          <table:table-cell office:value-type="float" office:value="8640000" calcext:value-type="float">
            <text:p>8640000</text:p>
          </table:table-cell>
          <table:table-cell table:formula="of:=[.B3176]/[.C3176]" office:value-type="float" office:value="0.00257233796296296" calcext:value-type="float">
            <text:p>0,00257233796296296000</text:p>
          </table:table-cell>
          <table:table-cell table:formula="of:=[.D3177]-[.D317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table:formula="of:=[.B3176]+7" office:value-type="float" office:value="22232" calcext:value-type="float">
            <text:p>22232</text:p>
          </table:table-cell>
          <table:table-cell office:value-type="float" office:value="8640000" calcext:value-type="float">
            <text:p>8640000</text:p>
          </table:table-cell>
          <table:table-cell table:formula="of:=[.B3177]/[.C3177]" office:value-type="float" office:value="0.00257314814814815" calcext:value-type="float">
            <text:p>0,00257314814814815000</text:p>
          </table:table-cell>
          <table:table-cell table:formula="of:=[.D3178]-[.D317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table:formula="of:=[.B3177]+7" office:value-type="float" office:value="22239" calcext:value-type="float">
            <text:p>22239</text:p>
          </table:table-cell>
          <table:table-cell office:value-type="float" office:value="8640000" calcext:value-type="float">
            <text:p>8640000</text:p>
          </table:table-cell>
          <table:table-cell table:formula="of:=[.B3178]/[.C3178]" office:value-type="float" office:value="0.00257395833333333" calcext:value-type="float">
            <text:p>0,00257395833333333000</text:p>
          </table:table-cell>
          <table:table-cell table:formula="of:=[.D3179]-[.D317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table:formula="of:=[.B3178]+7" office:value-type="float" office:value="22246" calcext:value-type="float">
            <text:p>22246</text:p>
          </table:table-cell>
          <table:table-cell office:value-type="float" office:value="8640000" calcext:value-type="float">
            <text:p>8640000</text:p>
          </table:table-cell>
          <table:table-cell table:formula="of:=[.B3179]/[.C3179]" office:value-type="float" office:value="0.00257476851851852" calcext:value-type="float">
            <text:p>0,00257476851851852000</text:p>
          </table:table-cell>
          <table:table-cell table:formula="of:=[.D3180]-[.D317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table:formula="of:=[.B3179]+7" office:value-type="float" office:value="22253" calcext:value-type="float">
            <text:p>22253</text:p>
          </table:table-cell>
          <table:table-cell office:value-type="float" office:value="8640000" calcext:value-type="float">
            <text:p>8640000</text:p>
          </table:table-cell>
          <table:table-cell table:formula="of:=[.B3180]/[.C3180]" office:value-type="float" office:value="0.0025755787037037" calcext:value-type="float">
            <text:p>0,00257557870370370000</text:p>
          </table:table-cell>
          <table:table-cell table:formula="of:=[.D3181]-[.D318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table:formula="of:=[.B3180]+7" office:value-type="float" office:value="22260" calcext:value-type="float">
            <text:p>22260</text:p>
          </table:table-cell>
          <table:table-cell office:value-type="float" office:value="8640000" calcext:value-type="float">
            <text:p>8640000</text:p>
          </table:table-cell>
          <table:table-cell table:formula="of:=[.B3181]/[.C3181]" office:value-type="float" office:value="0.00257638888888889" calcext:value-type="float">
            <text:p>0,00257638888888889000</text:p>
          </table:table-cell>
          <table:table-cell table:formula="of:=[.D3182]-[.D318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table:formula="of:=[.B3181]+7" office:value-type="float" office:value="22267" calcext:value-type="float">
            <text:p>22267</text:p>
          </table:table-cell>
          <table:table-cell office:value-type="float" office:value="8640000" calcext:value-type="float">
            <text:p>8640000</text:p>
          </table:table-cell>
          <table:table-cell table:formula="of:=[.B3182]/[.C3182]" office:value-type="float" office:value="0.00257719907407407" calcext:value-type="float">
            <text:p>0,00257719907407407000</text:p>
          </table:table-cell>
          <table:table-cell table:formula="of:=[.D3183]-[.D318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table:formula="of:=[.B3182]+7" office:value-type="float" office:value="22274" calcext:value-type="float">
            <text:p>22274</text:p>
          </table:table-cell>
          <table:table-cell office:value-type="float" office:value="8640000" calcext:value-type="float">
            <text:p>8640000</text:p>
          </table:table-cell>
          <table:table-cell table:formula="of:=[.B3183]/[.C3183]" office:value-type="float" office:value="0.00257800925925926" calcext:value-type="float">
            <text:p>0,00257800925925926000</text:p>
          </table:table-cell>
          <table:table-cell table:formula="of:=[.D3184]-[.D318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table:formula="of:=[.B3183]+7" office:value-type="float" office:value="22281" calcext:value-type="float">
            <text:p>22281</text:p>
          </table:table-cell>
          <table:table-cell office:value-type="float" office:value="8640000" calcext:value-type="float">
            <text:p>8640000</text:p>
          </table:table-cell>
          <table:table-cell table:formula="of:=[.B3184]/[.C3184]" office:value-type="float" office:value="0.00257881944444444" calcext:value-type="float">
            <text:p>0,00257881944444444000</text:p>
          </table:table-cell>
          <table:table-cell table:formula="of:=[.D3185]-[.D318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table:formula="of:=[.B3184]+7" office:value-type="float" office:value="22288" calcext:value-type="float">
            <text:p>22288</text:p>
          </table:table-cell>
          <table:table-cell office:value-type="float" office:value="8640000" calcext:value-type="float">
            <text:p>8640000</text:p>
          </table:table-cell>
          <table:table-cell table:formula="of:=[.B3185]/[.C3185]" office:value-type="float" office:value="0.00257962962962963" calcext:value-type="float">
            <text:p>0,00257962962962963000</text:p>
          </table:table-cell>
          <table:table-cell table:formula="of:=[.D3186]-[.D318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table:formula="of:=[.B3185]+7" office:value-type="float" office:value="22295" calcext:value-type="float">
            <text:p>22295</text:p>
          </table:table-cell>
          <table:table-cell office:value-type="float" office:value="8640000" calcext:value-type="float">
            <text:p>8640000</text:p>
          </table:table-cell>
          <table:table-cell table:formula="of:=[.B3186]/[.C3186]" office:value-type="float" office:value="0.00258043981481482" calcext:value-type="float">
            <text:p>0,00258043981481482000</text:p>
          </table:table-cell>
          <table:table-cell table:formula="of:=[.D3187]-[.D318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table:formula="of:=[.B3186]+7" office:value-type="float" office:value="22302" calcext:value-type="float">
            <text:p>22302</text:p>
          </table:table-cell>
          <table:table-cell office:value-type="float" office:value="8640000" calcext:value-type="float">
            <text:p>8640000</text:p>
          </table:table-cell>
          <table:table-cell table:formula="of:=[.B3187]/[.C3187]" office:value-type="float" office:value="0.00258125" calcext:value-type="float">
            <text:p>0,00258125000000000000</text:p>
          </table:table-cell>
          <table:table-cell table:formula="of:=[.D3188]-[.D318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table:formula="of:=[.B3187]+7" office:value-type="float" office:value="22309" calcext:value-type="float">
            <text:p>22309</text:p>
          </table:table-cell>
          <table:table-cell office:value-type="float" office:value="8640000" calcext:value-type="float">
            <text:p>8640000</text:p>
          </table:table-cell>
          <table:table-cell table:formula="of:=[.B3188]/[.C3188]" office:value-type="float" office:value="0.00258206018518519" calcext:value-type="float">
            <text:p>0,00258206018518519000</text:p>
          </table:table-cell>
          <table:table-cell table:formula="of:=[.D3189]-[.D318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table:formula="of:=[.B3188]+7" office:value-type="float" office:value="22316" calcext:value-type="float">
            <text:p>22316</text:p>
          </table:table-cell>
          <table:table-cell office:value-type="float" office:value="8640000" calcext:value-type="float">
            <text:p>8640000</text:p>
          </table:table-cell>
          <table:table-cell table:formula="of:=[.B3189]/[.C3189]" office:value-type="float" office:value="0.00258287037037037" calcext:value-type="float">
            <text:p>0,00258287037037037000</text:p>
          </table:table-cell>
          <table:table-cell table:formula="of:=[.D3190]-[.D318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table:formula="of:=[.B3189]+7" office:value-type="float" office:value="22323" calcext:value-type="float">
            <text:p>22323</text:p>
          </table:table-cell>
          <table:table-cell office:value-type="float" office:value="8640000" calcext:value-type="float">
            <text:p>8640000</text:p>
          </table:table-cell>
          <table:table-cell table:formula="of:=[.B3190]/[.C3190]" office:value-type="float" office:value="0.00258368055555556" calcext:value-type="float">
            <text:p>0,00258368055555556000</text:p>
          </table:table-cell>
          <table:table-cell table:formula="of:=[.D3191]-[.D319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table:formula="of:=[.B3190]+7" office:value-type="float" office:value="22330" calcext:value-type="float">
            <text:p>22330</text:p>
          </table:table-cell>
          <table:table-cell office:value-type="float" office:value="8640000" calcext:value-type="float">
            <text:p>8640000</text:p>
          </table:table-cell>
          <table:table-cell table:formula="of:=[.B3191]/[.C3191]" office:value-type="float" office:value="0.00258449074074074" calcext:value-type="float">
            <text:p>0,00258449074074074000</text:p>
          </table:table-cell>
          <table:table-cell table:formula="of:=[.D3192]-[.D319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table:formula="of:=[.B3191]+7" office:value-type="float" office:value="22337" calcext:value-type="float">
            <text:p>22337</text:p>
          </table:table-cell>
          <table:table-cell office:value-type="float" office:value="8640000" calcext:value-type="float">
            <text:p>8640000</text:p>
          </table:table-cell>
          <table:table-cell table:formula="of:=[.B3192]/[.C3192]" office:value-type="float" office:value="0.00258530092592593" calcext:value-type="float">
            <text:p>0,00258530092592593000</text:p>
          </table:table-cell>
          <table:table-cell table:formula="of:=[.D3193]-[.D319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table:formula="of:=[.B3192]+7" office:value-type="float" office:value="22344" calcext:value-type="float">
            <text:p>22344</text:p>
          </table:table-cell>
          <table:table-cell office:value-type="float" office:value="8640000" calcext:value-type="float">
            <text:p>8640000</text:p>
          </table:table-cell>
          <table:table-cell table:formula="of:=[.B3193]/[.C3193]" office:value-type="float" office:value="0.00258611111111111" calcext:value-type="float">
            <text:p>0,00258611111111111000</text:p>
          </table:table-cell>
          <table:table-cell table:formula="of:=[.D3194]-[.D319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table:formula="of:=[.B3193]+7" office:value-type="float" office:value="22351" calcext:value-type="float">
            <text:p>22351</text:p>
          </table:table-cell>
          <table:table-cell office:value-type="float" office:value="8640000" calcext:value-type="float">
            <text:p>8640000</text:p>
          </table:table-cell>
          <table:table-cell table:formula="of:=[.B3194]/[.C3194]" office:value-type="float" office:value="0.0025869212962963" calcext:value-type="float">
            <text:p>0,00258692129629630000</text:p>
          </table:table-cell>
          <table:table-cell table:formula="of:=[.D3195]-[.D319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table:formula="of:=[.B3194]+7" office:value-type="float" office:value="22358" calcext:value-type="float">
            <text:p>22358</text:p>
          </table:table-cell>
          <table:table-cell office:value-type="float" office:value="8640000" calcext:value-type="float">
            <text:p>8640000</text:p>
          </table:table-cell>
          <table:table-cell table:formula="of:=[.B3195]/[.C3195]" office:value-type="float" office:value="0.00258773148148148" calcext:value-type="float">
            <text:p>0,00258773148148148000</text:p>
          </table:table-cell>
          <table:table-cell table:formula="of:=[.D3196]-[.D319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table:formula="of:=[.B3195]+7" office:value-type="float" office:value="22365" calcext:value-type="float">
            <text:p>22365</text:p>
          </table:table-cell>
          <table:table-cell office:value-type="float" office:value="8640000" calcext:value-type="float">
            <text:p>8640000</text:p>
          </table:table-cell>
          <table:table-cell table:formula="of:=[.B3196]/[.C3196]" office:value-type="float" office:value="0.00258854166666667" calcext:value-type="float">
            <text:p>0,00258854166666667000</text:p>
          </table:table-cell>
          <table:table-cell table:formula="of:=[.D3197]-[.D319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table:formula="of:=[.B3196]+7" office:value-type="float" office:value="22372" calcext:value-type="float">
            <text:p>22372</text:p>
          </table:table-cell>
          <table:table-cell office:value-type="float" office:value="8640000" calcext:value-type="float">
            <text:p>8640000</text:p>
          </table:table-cell>
          <table:table-cell table:formula="of:=[.B3197]/[.C3197]" office:value-type="float" office:value="0.00258935185185185" calcext:value-type="float">
            <text:p>0,00258935185185185000</text:p>
          </table:table-cell>
          <table:table-cell table:formula="of:=[.D3198]-[.D319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table:formula="of:=[.B3197]+7" office:value-type="float" office:value="22379" calcext:value-type="float">
            <text:p>22379</text:p>
          </table:table-cell>
          <table:table-cell office:value-type="float" office:value="8640000" calcext:value-type="float">
            <text:p>8640000</text:p>
          </table:table-cell>
          <table:table-cell table:formula="of:=[.B3198]/[.C3198]" office:value-type="float" office:value="0.00259016203703704" calcext:value-type="float">
            <text:p>0,00259016203703704000</text:p>
          </table:table-cell>
          <table:table-cell table:formula="of:=[.D3199]-[.D319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table:formula="of:=[.B3198]+7" office:value-type="float" office:value="22386" calcext:value-type="float">
            <text:p>22386</text:p>
          </table:table-cell>
          <table:table-cell office:value-type="float" office:value="8640000" calcext:value-type="float">
            <text:p>8640000</text:p>
          </table:table-cell>
          <table:table-cell table:formula="of:=[.B3199]/[.C3199]" office:value-type="float" office:value="0.00259097222222222" calcext:value-type="float">
            <text:p>0,00259097222222222000</text:p>
          </table:table-cell>
          <table:table-cell table:formula="of:=[.D3200]-[.D319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table:formula="of:=[.B3199]+7" office:value-type="float" office:value="22393" calcext:value-type="float">
            <text:p>22393</text:p>
          </table:table-cell>
          <table:table-cell office:value-type="float" office:value="8640000" calcext:value-type="float">
            <text:p>8640000</text:p>
          </table:table-cell>
          <table:table-cell table:formula="of:=[.B3200]/[.C3200]" office:value-type="float" office:value="0.00259178240740741" calcext:value-type="float">
            <text:p>0,00259178240740741000</text:p>
          </table:table-cell>
          <table:table-cell table:formula="of:=[.D3201]-[.D320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B3200]+7" office:value-type="float" office:value="22400" calcext:value-type="float">
            <text:p>22400</text:p>
          </table:table-cell>
          <table:table-cell office:value-type="float" office:value="8640000" calcext:value-type="float">
            <text:p>8640000</text:p>
          </table:table-cell>
          <table:table-cell table:formula="of:=[.B3201]/[.C3201]" office:value-type="float" office:value="0.00259259259259259" calcext:value-type="float">
            <text:p>0,00259259259259259000</text:p>
          </table:table-cell>
          <table:table-cell table:formula="of:=[.D3202]-[.D320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table:formula="of:=[.B3201]+7" office:value-type="float" office:value="22407" calcext:value-type="float">
            <text:p>22407</text:p>
          </table:table-cell>
          <table:table-cell office:value-type="float" office:value="8640000" calcext:value-type="float">
            <text:p>8640000</text:p>
          </table:table-cell>
          <table:table-cell table:formula="of:=[.B3202]/[.C3202]" office:value-type="float" office:value="0.00259340277777778" calcext:value-type="float">
            <text:p>0,00259340277777778000</text:p>
          </table:table-cell>
          <table:table-cell table:formula="of:=[.D3203]-[.D320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table:formula="of:=[.B3202]+7" office:value-type="float" office:value="22414" calcext:value-type="float">
            <text:p>22414</text:p>
          </table:table-cell>
          <table:table-cell office:value-type="float" office:value="8640000" calcext:value-type="float">
            <text:p>8640000</text:p>
          </table:table-cell>
          <table:table-cell table:formula="of:=[.B3203]/[.C3203]" office:value-type="float" office:value="0.00259421296296296" calcext:value-type="float">
            <text:p>0,00259421296296296000</text:p>
          </table:table-cell>
          <table:table-cell table:formula="of:=[.D3204]-[.D320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table:formula="of:=[.B3203]+7" office:value-type="float" office:value="22421" calcext:value-type="float">
            <text:p>22421</text:p>
          </table:table-cell>
          <table:table-cell office:value-type="float" office:value="8640000" calcext:value-type="float">
            <text:p>8640000</text:p>
          </table:table-cell>
          <table:table-cell table:formula="of:=[.B3204]/[.C3204]" office:value-type="float" office:value="0.00259502314814815" calcext:value-type="float">
            <text:p>0,00259502314814815000</text:p>
          </table:table-cell>
          <table:table-cell table:formula="of:=[.D3205]-[.D320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table:formula="of:=[.B3204]+7" office:value-type="float" office:value="22428" calcext:value-type="float">
            <text:p>22428</text:p>
          </table:table-cell>
          <table:table-cell office:value-type="float" office:value="8640000" calcext:value-type="float">
            <text:p>8640000</text:p>
          </table:table-cell>
          <table:table-cell table:formula="of:=[.B3205]/[.C3205]" office:value-type="float" office:value="0.00259583333333333" calcext:value-type="float">
            <text:p>0,00259583333333333000</text:p>
          </table:table-cell>
          <table:table-cell table:formula="of:=[.D3206]-[.D320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table:formula="of:=[.B3205]+7" office:value-type="float" office:value="22435" calcext:value-type="float">
            <text:p>22435</text:p>
          </table:table-cell>
          <table:table-cell office:value-type="float" office:value="8640000" calcext:value-type="float">
            <text:p>8640000</text:p>
          </table:table-cell>
          <table:table-cell table:formula="of:=[.B3206]/[.C3206]" office:value-type="float" office:value="0.00259664351851852" calcext:value-type="float">
            <text:p>0,00259664351851852000</text:p>
          </table:table-cell>
          <table:table-cell table:formula="of:=[.D3207]-[.D320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table:formula="of:=[.B3206]+7" office:value-type="float" office:value="22442" calcext:value-type="float">
            <text:p>22442</text:p>
          </table:table-cell>
          <table:table-cell office:value-type="float" office:value="8640000" calcext:value-type="float">
            <text:p>8640000</text:p>
          </table:table-cell>
          <table:table-cell table:formula="of:=[.B3207]/[.C3207]" office:value-type="float" office:value="0.0025974537037037" calcext:value-type="float">
            <text:p>0,00259745370370370000</text:p>
          </table:table-cell>
          <table:table-cell table:formula="of:=[.D3208]-[.D320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table:formula="of:=[.B3207]+7" office:value-type="float" office:value="22449" calcext:value-type="float">
            <text:p>22449</text:p>
          </table:table-cell>
          <table:table-cell office:value-type="float" office:value="8640000" calcext:value-type="float">
            <text:p>8640000</text:p>
          </table:table-cell>
          <table:table-cell table:formula="of:=[.B3208]/[.C3208]" office:value-type="float" office:value="0.00259826388888889" calcext:value-type="float">
            <text:p>0,00259826388888889000</text:p>
          </table:table-cell>
          <table:table-cell table:formula="of:=[.D3209]-[.D320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table:formula="of:=[.B3208]+7" office:value-type="float" office:value="22456" calcext:value-type="float">
            <text:p>22456</text:p>
          </table:table-cell>
          <table:table-cell office:value-type="float" office:value="8640000" calcext:value-type="float">
            <text:p>8640000</text:p>
          </table:table-cell>
          <table:table-cell table:formula="of:=[.B3209]/[.C3209]" office:value-type="float" office:value="0.00259907407407407" calcext:value-type="float">
            <text:p>0,00259907407407407000</text:p>
          </table:table-cell>
          <table:table-cell table:formula="of:=[.D3210]-[.D320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table:formula="of:=[.B3209]+7" office:value-type="float" office:value="22463" calcext:value-type="float">
            <text:p>22463</text:p>
          </table:table-cell>
          <table:table-cell office:value-type="float" office:value="8640000" calcext:value-type="float">
            <text:p>8640000</text:p>
          </table:table-cell>
          <table:table-cell table:formula="of:=[.B3210]/[.C3210]" office:value-type="float" office:value="0.00259988425925926" calcext:value-type="float">
            <text:p>0,00259988425925926000</text:p>
          </table:table-cell>
          <table:table-cell table:formula="of:=[.D3211]-[.D321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table:formula="of:=[.B3210]+7" office:value-type="float" office:value="22470" calcext:value-type="float">
            <text:p>22470</text:p>
          </table:table-cell>
          <table:table-cell office:value-type="float" office:value="8640000" calcext:value-type="float">
            <text:p>8640000</text:p>
          </table:table-cell>
          <table:table-cell table:formula="of:=[.B3211]/[.C3211]" office:value-type="float" office:value="0.00260069444444444" calcext:value-type="float">
            <text:p>0,00260069444444444000</text:p>
          </table:table-cell>
          <table:table-cell table:formula="of:=[.D3212]-[.D321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table:formula="of:=[.B3211]+7" office:value-type="float" office:value="22477" calcext:value-type="float">
            <text:p>22477</text:p>
          </table:table-cell>
          <table:table-cell office:value-type="float" office:value="8640000" calcext:value-type="float">
            <text:p>8640000</text:p>
          </table:table-cell>
          <table:table-cell table:formula="of:=[.B3212]/[.C3212]" office:value-type="float" office:value="0.00260150462962963" calcext:value-type="float">
            <text:p>0,00260150462962963000</text:p>
          </table:table-cell>
          <table:table-cell table:formula="of:=[.D3213]-[.D321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table:formula="of:=[.B3212]+7" office:value-type="float" office:value="22484" calcext:value-type="float">
            <text:p>22484</text:p>
          </table:table-cell>
          <table:table-cell office:value-type="float" office:value="8640000" calcext:value-type="float">
            <text:p>8640000</text:p>
          </table:table-cell>
          <table:table-cell table:formula="of:=[.B3213]/[.C3213]" office:value-type="float" office:value="0.00260231481481481" calcext:value-type="float">
            <text:p>0,00260231481481481000</text:p>
          </table:table-cell>
          <table:table-cell table:formula="of:=[.D3214]-[.D321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table:formula="of:=[.B3213]+7" office:value-type="float" office:value="22491" calcext:value-type="float">
            <text:p>22491</text:p>
          </table:table-cell>
          <table:table-cell office:value-type="float" office:value="8640000" calcext:value-type="float">
            <text:p>8640000</text:p>
          </table:table-cell>
          <table:table-cell table:formula="of:=[.B3214]/[.C3214]" office:value-type="float" office:value="0.002603125" calcext:value-type="float">
            <text:p>0,00260312500000000000</text:p>
          </table:table-cell>
          <table:table-cell table:formula="of:=[.D3215]-[.D321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table:formula="of:=[.B3214]+7" office:value-type="float" office:value="22498" calcext:value-type="float">
            <text:p>22498</text:p>
          </table:table-cell>
          <table:table-cell office:value-type="float" office:value="8640000" calcext:value-type="float">
            <text:p>8640000</text:p>
          </table:table-cell>
          <table:table-cell table:formula="of:=[.B3215]/[.C3215]" office:value-type="float" office:value="0.00260393518518519" calcext:value-type="float">
            <text:p>0,00260393518518519000</text:p>
          </table:table-cell>
          <table:table-cell table:formula="of:=[.D3216]-[.D321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table:formula="of:=[.B3215]+7" office:value-type="float" office:value="22505" calcext:value-type="float">
            <text:p>22505</text:p>
          </table:table-cell>
          <table:table-cell office:value-type="float" office:value="8640000" calcext:value-type="float">
            <text:p>8640000</text:p>
          </table:table-cell>
          <table:table-cell table:formula="of:=[.B3216]/[.C3216]" office:value-type="float" office:value="0.00260474537037037" calcext:value-type="float">
            <text:p>0,00260474537037037000</text:p>
          </table:table-cell>
          <table:table-cell table:formula="of:=[.D3217]-[.D321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table:formula="of:=[.B3216]+7" office:value-type="float" office:value="22512" calcext:value-type="float">
            <text:p>22512</text:p>
          </table:table-cell>
          <table:table-cell office:value-type="float" office:value="8640000" calcext:value-type="float">
            <text:p>8640000</text:p>
          </table:table-cell>
          <table:table-cell table:formula="of:=[.B3217]/[.C3217]" office:value-type="float" office:value="0.00260555555555556" calcext:value-type="float">
            <text:p>0,00260555555555556000</text:p>
          </table:table-cell>
          <table:table-cell table:formula="of:=[.D3218]-[.D321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table:formula="of:=[.B3217]+7" office:value-type="float" office:value="22519" calcext:value-type="float">
            <text:p>22519</text:p>
          </table:table-cell>
          <table:table-cell office:value-type="float" office:value="8640000" calcext:value-type="float">
            <text:p>8640000</text:p>
          </table:table-cell>
          <table:table-cell table:formula="of:=[.B3218]/[.C3218]" office:value-type="float" office:value="0.00260636574074074" calcext:value-type="float">
            <text:p>0,00260636574074074000</text:p>
          </table:table-cell>
          <table:table-cell table:formula="of:=[.D3219]-[.D321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table:formula="of:=[.B3218]+7" office:value-type="float" office:value="22526" calcext:value-type="float">
            <text:p>22526</text:p>
          </table:table-cell>
          <table:table-cell office:value-type="float" office:value="8640000" calcext:value-type="float">
            <text:p>8640000</text:p>
          </table:table-cell>
          <table:table-cell table:formula="of:=[.B3219]/[.C3219]" office:value-type="float" office:value="0.00260717592592593" calcext:value-type="float">
            <text:p>0,00260717592592593000</text:p>
          </table:table-cell>
          <table:table-cell table:formula="of:=[.D3220]-[.D321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table:formula="of:=[.B3219]+7" office:value-type="float" office:value="22533" calcext:value-type="float">
            <text:p>22533</text:p>
          </table:table-cell>
          <table:table-cell office:value-type="float" office:value="8640000" calcext:value-type="float">
            <text:p>8640000</text:p>
          </table:table-cell>
          <table:table-cell table:formula="of:=[.B3220]/[.C3220]" office:value-type="float" office:value="0.00260798611111111" calcext:value-type="float">
            <text:p>0,00260798611111111000</text:p>
          </table:table-cell>
          <table:table-cell table:formula="of:=[.D3221]-[.D322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[.B3220]+7" office:value-type="float" office:value="22540" calcext:value-type="float">
            <text:p>22540</text:p>
          </table:table-cell>
          <table:table-cell office:value-type="float" office:value="8640000" calcext:value-type="float">
            <text:p>8640000</text:p>
          </table:table-cell>
          <table:table-cell table:formula="of:=[.B3221]/[.C3221]" office:value-type="float" office:value="0.0026087962962963" calcext:value-type="float">
            <text:p>0,00260879629629630000</text:p>
          </table:table-cell>
          <table:table-cell table:formula="of:=[.D3222]-[.D322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table:formula="of:=[.B3221]+7" office:value-type="float" office:value="22547" calcext:value-type="float">
            <text:p>22547</text:p>
          </table:table-cell>
          <table:table-cell office:value-type="float" office:value="8640000" calcext:value-type="float">
            <text:p>8640000</text:p>
          </table:table-cell>
          <table:table-cell table:formula="of:=[.B3222]/[.C3222]" office:value-type="float" office:value="0.00260960648148148" calcext:value-type="float">
            <text:p>0,00260960648148148000</text:p>
          </table:table-cell>
          <table:table-cell table:formula="of:=[.D3223]-[.D322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table:formula="of:=[.B3222]+7" office:value-type="float" office:value="22554" calcext:value-type="float">
            <text:p>22554</text:p>
          </table:table-cell>
          <table:table-cell office:value-type="float" office:value="8640000" calcext:value-type="float">
            <text:p>8640000</text:p>
          </table:table-cell>
          <table:table-cell table:formula="of:=[.B3223]/[.C3223]" office:value-type="float" office:value="0.00261041666666667" calcext:value-type="float">
            <text:p>0,00261041666666667000</text:p>
          </table:table-cell>
          <table:table-cell table:formula="of:=[.D3224]-[.D322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table:formula="of:=[.B3223]+7" office:value-type="float" office:value="22561" calcext:value-type="float">
            <text:p>22561</text:p>
          </table:table-cell>
          <table:table-cell office:value-type="float" office:value="8640000" calcext:value-type="float">
            <text:p>8640000</text:p>
          </table:table-cell>
          <table:table-cell table:formula="of:=[.B3224]/[.C3224]" office:value-type="float" office:value="0.00261122685185185" calcext:value-type="float">
            <text:p>0,00261122685185185000</text:p>
          </table:table-cell>
          <table:table-cell table:formula="of:=[.D3225]-[.D322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table:formula="of:=[.B3224]+7" office:value-type="float" office:value="22568" calcext:value-type="float">
            <text:p>22568</text:p>
          </table:table-cell>
          <table:table-cell office:value-type="float" office:value="8640000" calcext:value-type="float">
            <text:p>8640000</text:p>
          </table:table-cell>
          <table:table-cell table:formula="of:=[.B3225]/[.C3225]" office:value-type="float" office:value="0.00261203703703704" calcext:value-type="float">
            <text:p>0,00261203703703704000</text:p>
          </table:table-cell>
          <table:table-cell table:formula="of:=[.D3226]-[.D322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formula="of:=[.B3225]+7" office:value-type="float" office:value="22575" calcext:value-type="float">
            <text:p>22575</text:p>
          </table:table-cell>
          <table:table-cell office:value-type="float" office:value="8640000" calcext:value-type="float">
            <text:p>8640000</text:p>
          </table:table-cell>
          <table:table-cell table:formula="of:=[.B3226]/[.C3226]" office:value-type="float" office:value="0.00261284722222222" calcext:value-type="float">
            <text:p>0,00261284722222222000</text:p>
          </table:table-cell>
          <table:table-cell table:formula="of:=[.D3227]-[.D322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table:formula="of:=[.B3226]+7" office:value-type="float" office:value="22582" calcext:value-type="float">
            <text:p>22582</text:p>
          </table:table-cell>
          <table:table-cell office:value-type="float" office:value="8640000" calcext:value-type="float">
            <text:p>8640000</text:p>
          </table:table-cell>
          <table:table-cell table:formula="of:=[.B3227]/[.C3227]" office:value-type="float" office:value="0.00261365740740741" calcext:value-type="float">
            <text:p>0,00261365740740741000</text:p>
          </table:table-cell>
          <table:table-cell table:formula="of:=[.D3228]-[.D322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table:formula="of:=[.B3227]+7" office:value-type="float" office:value="22589" calcext:value-type="float">
            <text:p>22589</text:p>
          </table:table-cell>
          <table:table-cell office:value-type="float" office:value="8640000" calcext:value-type="float">
            <text:p>8640000</text:p>
          </table:table-cell>
          <table:table-cell table:formula="of:=[.B3228]/[.C3228]" office:value-type="float" office:value="0.00261446759259259" calcext:value-type="float">
            <text:p>0,00261446759259259000</text:p>
          </table:table-cell>
          <table:table-cell table:formula="of:=[.D3229]-[.D322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table:formula="of:=[.B3228]+7" office:value-type="float" office:value="22596" calcext:value-type="float">
            <text:p>22596</text:p>
          </table:table-cell>
          <table:table-cell office:value-type="float" office:value="8640000" calcext:value-type="float">
            <text:p>8640000</text:p>
          </table:table-cell>
          <table:table-cell table:formula="of:=[.B3229]/[.C3229]" office:value-type="float" office:value="0.00261527777777778" calcext:value-type="float">
            <text:p>0,00261527777777778000</text:p>
          </table:table-cell>
          <table:table-cell table:formula="of:=[.D3230]-[.D322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table:formula="of:=[.B3229]+7" office:value-type="float" office:value="22603" calcext:value-type="float">
            <text:p>22603</text:p>
          </table:table-cell>
          <table:table-cell office:value-type="float" office:value="8640000" calcext:value-type="float">
            <text:p>8640000</text:p>
          </table:table-cell>
          <table:table-cell table:formula="of:=[.B3230]/[.C3230]" office:value-type="float" office:value="0.00261608796296296" calcext:value-type="float">
            <text:p>0,00261608796296296000</text:p>
          </table:table-cell>
          <table:table-cell table:formula="of:=[.D3231]-[.D323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[.B3230]+7" office:value-type="float" office:value="22610" calcext:value-type="float">
            <text:p>22610</text:p>
          </table:table-cell>
          <table:table-cell office:value-type="float" office:value="8640000" calcext:value-type="float">
            <text:p>8640000</text:p>
          </table:table-cell>
          <table:table-cell table:formula="of:=[.B3231]/[.C3231]" office:value-type="float" office:value="0.00261689814814815" calcext:value-type="float">
            <text:p>0,00261689814814815000</text:p>
          </table:table-cell>
          <table:table-cell table:formula="of:=[.D3232]-[.D323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table:formula="of:=[.B3231]+7" office:value-type="float" office:value="22617" calcext:value-type="float">
            <text:p>22617</text:p>
          </table:table-cell>
          <table:table-cell office:value-type="float" office:value="8640000" calcext:value-type="float">
            <text:p>8640000</text:p>
          </table:table-cell>
          <table:table-cell table:formula="of:=[.B3232]/[.C3232]" office:value-type="float" office:value="0.00261770833333333" calcext:value-type="float">
            <text:p>0,00261770833333333000</text:p>
          </table:table-cell>
          <table:table-cell table:formula="of:=[.D3233]-[.D323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table:formula="of:=[.B3232]+7" office:value-type="float" office:value="22624" calcext:value-type="float">
            <text:p>22624</text:p>
          </table:table-cell>
          <table:table-cell office:value-type="float" office:value="8640000" calcext:value-type="float">
            <text:p>8640000</text:p>
          </table:table-cell>
          <table:table-cell table:formula="of:=[.B3233]/[.C3233]" office:value-type="float" office:value="0.00261851851851852" calcext:value-type="float">
            <text:p>0,00261851851851852000</text:p>
          </table:table-cell>
          <table:table-cell table:formula="of:=[.D3234]-[.D323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table:formula="of:=[.B3233]+7" office:value-type="float" office:value="22631" calcext:value-type="float">
            <text:p>22631</text:p>
          </table:table-cell>
          <table:table-cell office:value-type="float" office:value="8640000" calcext:value-type="float">
            <text:p>8640000</text:p>
          </table:table-cell>
          <table:table-cell table:formula="of:=[.B3234]/[.C3234]" office:value-type="float" office:value="0.0026193287037037" calcext:value-type="float">
            <text:p>0,00261932870370370000</text:p>
          </table:table-cell>
          <table:table-cell table:formula="of:=[.D3235]-[.D323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table:formula="of:=[.B3234]+7" office:value-type="float" office:value="22638" calcext:value-type="float">
            <text:p>22638</text:p>
          </table:table-cell>
          <table:table-cell office:value-type="float" office:value="8640000" calcext:value-type="float">
            <text:p>8640000</text:p>
          </table:table-cell>
          <table:table-cell table:formula="of:=[.B3235]/[.C3235]" office:value-type="float" office:value="0.00262013888888889" calcext:value-type="float">
            <text:p>0,00262013888888889000</text:p>
          </table:table-cell>
          <table:table-cell table:formula="of:=[.D3236]-[.D323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table:formula="of:=[.B3235]+7" office:value-type="float" office:value="22645" calcext:value-type="float">
            <text:p>22645</text:p>
          </table:table-cell>
          <table:table-cell office:value-type="float" office:value="8640000" calcext:value-type="float">
            <text:p>8640000</text:p>
          </table:table-cell>
          <table:table-cell table:formula="of:=[.B3236]/[.C3236]" office:value-type="float" office:value="0.00262094907407407" calcext:value-type="float">
            <text:p>0,00262094907407407000</text:p>
          </table:table-cell>
          <table:table-cell table:formula="of:=[.D3237]-[.D323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table:formula="of:=[.B3236]+7" office:value-type="float" office:value="22652" calcext:value-type="float">
            <text:p>22652</text:p>
          </table:table-cell>
          <table:table-cell office:value-type="float" office:value="8640000" calcext:value-type="float">
            <text:p>8640000</text:p>
          </table:table-cell>
          <table:table-cell table:formula="of:=[.B3237]/[.C3237]" office:value-type="float" office:value="0.00262175925925926" calcext:value-type="float">
            <text:p>0,00262175925925926000</text:p>
          </table:table-cell>
          <table:table-cell table:formula="of:=[.D3238]-[.D323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table:formula="of:=[.B3237]+7" office:value-type="float" office:value="22659" calcext:value-type="float">
            <text:p>22659</text:p>
          </table:table-cell>
          <table:table-cell office:value-type="float" office:value="8640000" calcext:value-type="float">
            <text:p>8640000</text:p>
          </table:table-cell>
          <table:table-cell table:formula="of:=[.B3238]/[.C3238]" office:value-type="float" office:value="0.00262256944444444" calcext:value-type="float">
            <text:p>0,00262256944444444000</text:p>
          </table:table-cell>
          <table:table-cell table:formula="of:=[.D3239]-[.D323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table:formula="of:=[.B3238]+7" office:value-type="float" office:value="22666" calcext:value-type="float">
            <text:p>22666</text:p>
          </table:table-cell>
          <table:table-cell office:value-type="float" office:value="8640000" calcext:value-type="float">
            <text:p>8640000</text:p>
          </table:table-cell>
          <table:table-cell table:formula="of:=[.B3239]/[.C3239]" office:value-type="float" office:value="0.00262337962962963" calcext:value-type="float">
            <text:p>0,00262337962962963000</text:p>
          </table:table-cell>
          <table:table-cell table:formula="of:=[.D3240]-[.D323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table:formula="of:=[.B3239]+7" office:value-type="float" office:value="22673" calcext:value-type="float">
            <text:p>22673</text:p>
          </table:table-cell>
          <table:table-cell office:value-type="float" office:value="8640000" calcext:value-type="float">
            <text:p>8640000</text:p>
          </table:table-cell>
          <table:table-cell table:formula="of:=[.B3240]/[.C3240]" office:value-type="float" office:value="0.00262418981481482" calcext:value-type="float">
            <text:p>0,00262418981481482000</text:p>
          </table:table-cell>
          <table:table-cell table:formula="of:=[.D3241]-[.D324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table:formula="of:=[.B3240]+7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3241]/[.C3241]" office:value-type="float" office:value="0.002625" calcext:value-type="float">
            <text:p>0,00262500000000000000</text:p>
          </table:table-cell>
          <table:table-cell table:formula="of:=[.D3242]-[.D324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table:formula="of:=[.B3241]+7" office:value-type="float" office:value="22687" calcext:value-type="float">
            <text:p>22687</text:p>
          </table:table-cell>
          <table:table-cell office:value-type="float" office:value="8640000" calcext:value-type="float">
            <text:p>8640000</text:p>
          </table:table-cell>
          <table:table-cell table:formula="of:=[.B3242]/[.C3242]" office:value-type="float" office:value="0.00262581018518519" calcext:value-type="float">
            <text:p>0,00262581018518519000</text:p>
          </table:table-cell>
          <table:table-cell table:formula="of:=[.D3243]-[.D324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table:formula="of:=[.B3242]+7" office:value-type="float" office:value="22694" calcext:value-type="float">
            <text:p>22694</text:p>
          </table:table-cell>
          <table:table-cell office:value-type="float" office:value="8640000" calcext:value-type="float">
            <text:p>8640000</text:p>
          </table:table-cell>
          <table:table-cell table:formula="of:=[.B3243]/[.C3243]" office:value-type="float" office:value="0.00262662037037037" calcext:value-type="float">
            <text:p>0,00262662037037037000</text:p>
          </table:table-cell>
          <table:table-cell table:formula="of:=[.D3244]-[.D324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table:formula="of:=[.B3243]+7" office:value-type="float" office:value="22701" calcext:value-type="float">
            <text:p>22701</text:p>
          </table:table-cell>
          <table:table-cell office:value-type="float" office:value="8640000" calcext:value-type="float">
            <text:p>8640000</text:p>
          </table:table-cell>
          <table:table-cell table:formula="of:=[.B3244]/[.C3244]" office:value-type="float" office:value="0.00262743055555556" calcext:value-type="float">
            <text:p>0,00262743055555556000</text:p>
          </table:table-cell>
          <table:table-cell table:formula="of:=[.D3245]-[.D324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table:formula="of:=[.B3244]+7" office:value-type="float" office:value="22708" calcext:value-type="float">
            <text:p>22708</text:p>
          </table:table-cell>
          <table:table-cell office:value-type="float" office:value="8640000" calcext:value-type="float">
            <text:p>8640000</text:p>
          </table:table-cell>
          <table:table-cell table:formula="of:=[.B3245]/[.C3245]" office:value-type="float" office:value="0.00262824074074074" calcext:value-type="float">
            <text:p>0,00262824074074074000</text:p>
          </table:table-cell>
          <table:table-cell table:formula="of:=[.D3246]-[.D324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table:formula="of:=[.B3245]+7" office:value-type="float" office:value="22715" calcext:value-type="float">
            <text:p>22715</text:p>
          </table:table-cell>
          <table:table-cell office:value-type="float" office:value="8640000" calcext:value-type="float">
            <text:p>8640000</text:p>
          </table:table-cell>
          <table:table-cell table:formula="of:=[.B3246]/[.C3246]" office:value-type="float" office:value="0.00262905092592593" calcext:value-type="float">
            <text:p>0,00262905092592593000</text:p>
          </table:table-cell>
          <table:table-cell table:formula="of:=[.D3247]-[.D324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table:formula="of:=[.B3246]+7" office:value-type="float" office:value="22722" calcext:value-type="float">
            <text:p>22722</text:p>
          </table:table-cell>
          <table:table-cell office:value-type="float" office:value="8640000" calcext:value-type="float">
            <text:p>8640000</text:p>
          </table:table-cell>
          <table:table-cell table:formula="of:=[.B3247]/[.C3247]" office:value-type="float" office:value="0.00262986111111111" calcext:value-type="float">
            <text:p>0,00262986111111111000</text:p>
          </table:table-cell>
          <table:table-cell table:formula="of:=[.D3248]-[.D324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table:formula="of:=[.B3247]+7" office:value-type="float" office:value="22729" calcext:value-type="float">
            <text:p>22729</text:p>
          </table:table-cell>
          <table:table-cell office:value-type="float" office:value="8640000" calcext:value-type="float">
            <text:p>8640000</text:p>
          </table:table-cell>
          <table:table-cell table:formula="of:=[.B3248]/[.C3248]" office:value-type="float" office:value="0.0026306712962963" calcext:value-type="float">
            <text:p>0,00263067129629630000</text:p>
          </table:table-cell>
          <table:table-cell table:formula="of:=[.D3249]-[.D324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table:formula="of:=[.B3248]+7" office:value-type="float" office:value="22736" calcext:value-type="float">
            <text:p>22736</text:p>
          </table:table-cell>
          <table:table-cell office:value-type="float" office:value="8640000" calcext:value-type="float">
            <text:p>8640000</text:p>
          </table:table-cell>
          <table:table-cell table:formula="of:=[.B3249]/[.C3249]" office:value-type="float" office:value="0.00263148148148148" calcext:value-type="float">
            <text:p>0,00263148148148148000</text:p>
          </table:table-cell>
          <table:table-cell table:formula="of:=[.D3250]-[.D324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table:formula="of:=[.B3249]+7" office:value-type="float" office:value="22743" calcext:value-type="float">
            <text:p>22743</text:p>
          </table:table-cell>
          <table:table-cell office:value-type="float" office:value="8640000" calcext:value-type="float">
            <text:p>8640000</text:p>
          </table:table-cell>
          <table:table-cell table:formula="of:=[.B3250]/[.C3250]" office:value-type="float" office:value="0.00263229166666667" calcext:value-type="float">
            <text:p>0,00263229166666667000</text:p>
          </table:table-cell>
          <table:table-cell table:formula="of:=[.D3251]-[.D325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formula="of:=[.B3250]+7" office:value-type="float" office:value="22750" calcext:value-type="float">
            <text:p>22750</text:p>
          </table:table-cell>
          <table:table-cell office:value-type="float" office:value="8640000" calcext:value-type="float">
            <text:p>8640000</text:p>
          </table:table-cell>
          <table:table-cell table:formula="of:=[.B3251]/[.C3251]" office:value-type="float" office:value="0.00263310185185185" calcext:value-type="float">
            <text:p>0,00263310185185185000</text:p>
          </table:table-cell>
          <table:table-cell table:formula="of:=[.D3252]-[.D325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table:formula="of:=[.B3251]+7" office:value-type="float" office:value="22757" calcext:value-type="float">
            <text:p>22757</text:p>
          </table:table-cell>
          <table:table-cell office:value-type="float" office:value="8640000" calcext:value-type="float">
            <text:p>8640000</text:p>
          </table:table-cell>
          <table:table-cell table:formula="of:=[.B3252]/[.C3252]" office:value-type="float" office:value="0.00263391203703704" calcext:value-type="float">
            <text:p>0,00263391203703704000</text:p>
          </table:table-cell>
          <table:table-cell table:formula="of:=[.D3253]-[.D325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table:formula="of:=[.B3252]+7" office:value-type="float" office:value="22764" calcext:value-type="float">
            <text:p>22764</text:p>
          </table:table-cell>
          <table:table-cell office:value-type="float" office:value="8640000" calcext:value-type="float">
            <text:p>8640000</text:p>
          </table:table-cell>
          <table:table-cell table:formula="of:=[.B3253]/[.C3253]" office:value-type="float" office:value="0.00263472222222222" calcext:value-type="float">
            <text:p>0,00263472222222222000</text:p>
          </table:table-cell>
          <table:table-cell table:formula="of:=[.D3254]-[.D325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table:formula="of:=[.B3253]+7" office:value-type="float" office:value="22771" calcext:value-type="float">
            <text:p>22771</text:p>
          </table:table-cell>
          <table:table-cell office:value-type="float" office:value="8640000" calcext:value-type="float">
            <text:p>8640000</text:p>
          </table:table-cell>
          <table:table-cell table:formula="of:=[.B3254]/[.C3254]" office:value-type="float" office:value="0.00263553240740741" calcext:value-type="float">
            <text:p>0,00263553240740741000</text:p>
          </table:table-cell>
          <table:table-cell table:formula="of:=[.D3255]-[.D325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table:formula="of:=[.B3254]+7" office:value-type="float" office:value="22778" calcext:value-type="float">
            <text:p>22778</text:p>
          </table:table-cell>
          <table:table-cell office:value-type="float" office:value="8640000" calcext:value-type="float">
            <text:p>8640000</text:p>
          </table:table-cell>
          <table:table-cell table:formula="of:=[.B3255]/[.C3255]" office:value-type="float" office:value="0.00263634259259259" calcext:value-type="float">
            <text:p>0,00263634259259259000</text:p>
          </table:table-cell>
          <table:table-cell table:formula="of:=[.D3256]-[.D325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table:formula="of:=[.B3255]+7" office:value-type="float" office:value="22785" calcext:value-type="float">
            <text:p>22785</text:p>
          </table:table-cell>
          <table:table-cell office:value-type="float" office:value="8640000" calcext:value-type="float">
            <text:p>8640000</text:p>
          </table:table-cell>
          <table:table-cell table:formula="of:=[.B3256]/[.C3256]" office:value-type="float" office:value="0.00263715277777778" calcext:value-type="float">
            <text:p>0,00263715277777778000</text:p>
          </table:table-cell>
          <table:table-cell table:formula="of:=[.D3257]-[.D325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table:formula="of:=[.B3256]+7" office:value-type="float" office:value="22792" calcext:value-type="float">
            <text:p>22792</text:p>
          </table:table-cell>
          <table:table-cell office:value-type="float" office:value="8640000" calcext:value-type="float">
            <text:p>8640000</text:p>
          </table:table-cell>
          <table:table-cell table:formula="of:=[.B3257]/[.C3257]" office:value-type="float" office:value="0.00263796296296296" calcext:value-type="float">
            <text:p>0,00263796296296296000</text:p>
          </table:table-cell>
          <table:table-cell table:formula="of:=[.D3258]-[.D325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table:formula="of:=[.B3257]+7" office:value-type="float" office:value="22799" calcext:value-type="float">
            <text:p>22799</text:p>
          </table:table-cell>
          <table:table-cell office:value-type="float" office:value="8640000" calcext:value-type="float">
            <text:p>8640000</text:p>
          </table:table-cell>
          <table:table-cell table:formula="of:=[.B3258]/[.C3258]" office:value-type="float" office:value="0.00263877314814815" calcext:value-type="float">
            <text:p>0,00263877314814815000</text:p>
          </table:table-cell>
          <table:table-cell table:formula="of:=[.D3259]-[.D325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table:formula="of:=[.B3258]+7" office:value-type="float" office:value="22806" calcext:value-type="float">
            <text:p>22806</text:p>
          </table:table-cell>
          <table:table-cell office:value-type="float" office:value="8640000" calcext:value-type="float">
            <text:p>8640000</text:p>
          </table:table-cell>
          <table:table-cell table:formula="of:=[.B3259]/[.C3259]" office:value-type="float" office:value="0.00263958333333333" calcext:value-type="float">
            <text:p>0,00263958333333333000</text:p>
          </table:table-cell>
          <table:table-cell table:formula="of:=[.D3260]-[.D325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table:formula="of:=[.B3259]+7" office:value-type="float" office:value="22813" calcext:value-type="float">
            <text:p>22813</text:p>
          </table:table-cell>
          <table:table-cell office:value-type="float" office:value="8640000" calcext:value-type="float">
            <text:p>8640000</text:p>
          </table:table-cell>
          <table:table-cell table:formula="of:=[.B3260]/[.C3260]" office:value-type="float" office:value="0.00264039351851852" calcext:value-type="float">
            <text:p>0,00264039351851852000</text:p>
          </table:table-cell>
          <table:table-cell table:formula="of:=[.D3261]-[.D326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table:formula="of:=[.B3260]+7" office:value-type="float" office:value="22820" calcext:value-type="float">
            <text:p>22820</text:p>
          </table:table-cell>
          <table:table-cell office:value-type="float" office:value="8640000" calcext:value-type="float">
            <text:p>8640000</text:p>
          </table:table-cell>
          <table:table-cell table:formula="of:=[.B3261]/[.C3261]" office:value-type="float" office:value="0.0026412037037037" calcext:value-type="float">
            <text:p>0,00264120370370370000</text:p>
          </table:table-cell>
          <table:table-cell table:formula="of:=[.D3262]-[.D326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table:formula="of:=[.B3261]+7" office:value-type="float" office:value="22827" calcext:value-type="float">
            <text:p>22827</text:p>
          </table:table-cell>
          <table:table-cell office:value-type="float" office:value="8640000" calcext:value-type="float">
            <text:p>8640000</text:p>
          </table:table-cell>
          <table:table-cell table:formula="of:=[.B3262]/[.C3262]" office:value-type="float" office:value="0.00264201388888889" calcext:value-type="float">
            <text:p>0,00264201388888889000</text:p>
          </table:table-cell>
          <table:table-cell table:formula="of:=[.D3263]-[.D326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table:formula="of:=[.B3262]+7" office:value-type="float" office:value="22834" calcext:value-type="float">
            <text:p>22834</text:p>
          </table:table-cell>
          <table:table-cell office:value-type="float" office:value="8640000" calcext:value-type="float">
            <text:p>8640000</text:p>
          </table:table-cell>
          <table:table-cell table:formula="of:=[.B3263]/[.C3263]" office:value-type="float" office:value="0.00264282407407407" calcext:value-type="float">
            <text:p>0,00264282407407407000</text:p>
          </table:table-cell>
          <table:table-cell table:formula="of:=[.D3264]-[.D326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table:formula="of:=[.B3263]+7" office:value-type="float" office:value="22841" calcext:value-type="float">
            <text:p>22841</text:p>
          </table:table-cell>
          <table:table-cell office:value-type="float" office:value="8640000" calcext:value-type="float">
            <text:p>8640000</text:p>
          </table:table-cell>
          <table:table-cell table:formula="of:=[.B3264]/[.C3264]" office:value-type="float" office:value="0.00264363425925926" calcext:value-type="float">
            <text:p>0,00264363425925926000</text:p>
          </table:table-cell>
          <table:table-cell table:formula="of:=[.D3265]-[.D326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table:formula="of:=[.B3264]+7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3265]/[.C3265]" office:value-type="float" office:value="0.00264444444444444" calcext:value-type="float">
            <text:p>0,00264444444444444000</text:p>
          </table:table-cell>
          <table:table-cell table:formula="of:=[.D3266]-[.D326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table:formula="of:=[.B3265]+7" office:value-type="float" office:value="22855" calcext:value-type="float">
            <text:p>22855</text:p>
          </table:table-cell>
          <table:table-cell office:value-type="float" office:value="8640000" calcext:value-type="float">
            <text:p>8640000</text:p>
          </table:table-cell>
          <table:table-cell table:formula="of:=[.B3266]/[.C3266]" office:value-type="float" office:value="0.00264525462962963" calcext:value-type="float">
            <text:p>0,00264525462962963000</text:p>
          </table:table-cell>
          <table:table-cell table:formula="of:=[.D3267]-[.D326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table:formula="of:=[.B3266]+7" office:value-type="float" office:value="22862" calcext:value-type="float">
            <text:p>22862</text:p>
          </table:table-cell>
          <table:table-cell office:value-type="float" office:value="8640000" calcext:value-type="float">
            <text:p>8640000</text:p>
          </table:table-cell>
          <table:table-cell table:formula="of:=[.B3267]/[.C3267]" office:value-type="float" office:value="0.00264606481481481" calcext:value-type="float">
            <text:p>0,00264606481481481000</text:p>
          </table:table-cell>
          <table:table-cell table:formula="of:=[.D3268]-[.D326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table:formula="of:=[.B3267]+7" office:value-type="float" office:value="22869" calcext:value-type="float">
            <text:p>22869</text:p>
          </table:table-cell>
          <table:table-cell office:value-type="float" office:value="8640000" calcext:value-type="float">
            <text:p>8640000</text:p>
          </table:table-cell>
          <table:table-cell table:formula="of:=[.B3268]/[.C3268]" office:value-type="float" office:value="0.002646875" calcext:value-type="float">
            <text:p>0,00264687500000000000</text:p>
          </table:table-cell>
          <table:table-cell table:formula="of:=[.D3269]-[.D326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table:formula="of:=[.B3268]+7" office:value-type="float" office:value="22876" calcext:value-type="float">
            <text:p>22876</text:p>
          </table:table-cell>
          <table:table-cell office:value-type="float" office:value="8640000" calcext:value-type="float">
            <text:p>8640000</text:p>
          </table:table-cell>
          <table:table-cell table:formula="of:=[.B3269]/[.C3269]" office:value-type="float" office:value="0.00264768518518519" calcext:value-type="float">
            <text:p>0,00264768518518519000</text:p>
          </table:table-cell>
          <table:table-cell table:formula="of:=[.D3270]-[.D326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table:formula="of:=[.B3269]+7" office:value-type="float" office:value="22883" calcext:value-type="float">
            <text:p>22883</text:p>
          </table:table-cell>
          <table:table-cell office:value-type="float" office:value="8640000" calcext:value-type="float">
            <text:p>8640000</text:p>
          </table:table-cell>
          <table:table-cell table:formula="of:=[.B3270]/[.C3270]" office:value-type="float" office:value="0.00264849537037037" calcext:value-type="float">
            <text:p>0,00264849537037037000</text:p>
          </table:table-cell>
          <table:table-cell table:formula="of:=[.D3271]-[.D327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table:formula="of:=[.B3270]+7" office:value-type="float" office:value="22890" calcext:value-type="float">
            <text:p>22890</text:p>
          </table:table-cell>
          <table:table-cell office:value-type="float" office:value="8640000" calcext:value-type="float">
            <text:p>8640000</text:p>
          </table:table-cell>
          <table:table-cell table:formula="of:=[.B3271]/[.C3271]" office:value-type="float" office:value="0.00264930555555556" calcext:value-type="float">
            <text:p>0,00264930555555556000</text:p>
          </table:table-cell>
          <table:table-cell table:formula="of:=[.D3272]-[.D327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table:formula="of:=[.B3271]+7" office:value-type="float" office:value="22897" calcext:value-type="float">
            <text:p>22897</text:p>
          </table:table-cell>
          <table:table-cell office:value-type="float" office:value="8640000" calcext:value-type="float">
            <text:p>8640000</text:p>
          </table:table-cell>
          <table:table-cell table:formula="of:=[.B3272]/[.C3272]" office:value-type="float" office:value="0.00265011574074074" calcext:value-type="float">
            <text:p>0,00265011574074074000</text:p>
          </table:table-cell>
          <table:table-cell table:formula="of:=[.D3273]-[.D327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table:formula="of:=[.B3272]+7" office:value-type="float" office:value="22904" calcext:value-type="float">
            <text:p>22904</text:p>
          </table:table-cell>
          <table:table-cell office:value-type="float" office:value="8640000" calcext:value-type="float">
            <text:p>8640000</text:p>
          </table:table-cell>
          <table:table-cell table:formula="of:=[.B3273]/[.C3273]" office:value-type="float" office:value="0.00265092592592593" calcext:value-type="float">
            <text:p>0,00265092592592593000</text:p>
          </table:table-cell>
          <table:table-cell table:formula="of:=[.D3274]-[.D327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table:formula="of:=[.B3273]+7" office:value-type="float" office:value="22911" calcext:value-type="float">
            <text:p>22911</text:p>
          </table:table-cell>
          <table:table-cell office:value-type="float" office:value="8640000" calcext:value-type="float">
            <text:p>8640000</text:p>
          </table:table-cell>
          <table:table-cell table:formula="of:=[.B3274]/[.C3274]" office:value-type="float" office:value="0.00265173611111111" calcext:value-type="float">
            <text:p>0,00265173611111111000</text:p>
          </table:table-cell>
          <table:table-cell table:formula="of:=[.D3275]-[.D327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table:formula="of:=[.B3274]+7" office:value-type="float" office:value="22918" calcext:value-type="float">
            <text:p>22918</text:p>
          </table:table-cell>
          <table:table-cell office:value-type="float" office:value="8640000" calcext:value-type="float">
            <text:p>8640000</text:p>
          </table:table-cell>
          <table:table-cell table:formula="of:=[.B3275]/[.C3275]" office:value-type="float" office:value="0.0026525462962963" calcext:value-type="float">
            <text:p>0,00265254629629630000</text:p>
          </table:table-cell>
          <table:table-cell table:formula="of:=[.D3276]-[.D327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table:formula="of:=[.B3275]+7" office:value-type="float" office:value="22925" calcext:value-type="float">
            <text:p>22925</text:p>
          </table:table-cell>
          <table:table-cell office:value-type="float" office:value="8640000" calcext:value-type="float">
            <text:p>8640000</text:p>
          </table:table-cell>
          <table:table-cell table:formula="of:=[.B3276]/[.C3276]" office:value-type="float" office:value="0.00265335648148148" calcext:value-type="float">
            <text:p>0,00265335648148148000</text:p>
          </table:table-cell>
          <table:table-cell table:formula="of:=[.D3277]-[.D327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table:formula="of:=[.B3276]+7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3277]/[.C3277]" office:value-type="float" office:value="0.00265416666666667" calcext:value-type="float">
            <text:p>0,00265416666666667000</text:p>
          </table:table-cell>
          <table:table-cell table:formula="of:=[.D3278]-[.D327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table:formula="of:=[.B3277]+7" office:value-type="float" office:value="22939" calcext:value-type="float">
            <text:p>22939</text:p>
          </table:table-cell>
          <table:table-cell office:value-type="float" office:value="8640000" calcext:value-type="float">
            <text:p>8640000</text:p>
          </table:table-cell>
          <table:table-cell table:formula="of:=[.B3278]/[.C3278]" office:value-type="float" office:value="0.00265497685185185" calcext:value-type="float">
            <text:p>0,00265497685185185000</text:p>
          </table:table-cell>
          <table:table-cell table:formula="of:=[.D3279]-[.D327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table:formula="of:=[.B3278]+7" office:value-type="float" office:value="22946" calcext:value-type="float">
            <text:p>22946</text:p>
          </table:table-cell>
          <table:table-cell office:value-type="float" office:value="8640000" calcext:value-type="float">
            <text:p>8640000</text:p>
          </table:table-cell>
          <table:table-cell table:formula="of:=[.B3279]/[.C3279]" office:value-type="float" office:value="0.00265578703703704" calcext:value-type="float">
            <text:p>0,00265578703703704000</text:p>
          </table:table-cell>
          <table:table-cell table:formula="of:=[.D3280]-[.D327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table:formula="of:=[.B3279]+7" office:value-type="float" office:value="22953" calcext:value-type="float">
            <text:p>22953</text:p>
          </table:table-cell>
          <table:table-cell office:value-type="float" office:value="8640000" calcext:value-type="float">
            <text:p>8640000</text:p>
          </table:table-cell>
          <table:table-cell table:formula="of:=[.B3280]/[.C3280]" office:value-type="float" office:value="0.00265659722222222" calcext:value-type="float">
            <text:p>0,00265659722222222000</text:p>
          </table:table-cell>
          <table:table-cell table:formula="of:=[.D3281]-[.D328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table:formula="of:=[.B3280]+7" office:value-type="float" office:value="22960" calcext:value-type="float">
            <text:p>22960</text:p>
          </table:table-cell>
          <table:table-cell office:value-type="float" office:value="8640000" calcext:value-type="float">
            <text:p>8640000</text:p>
          </table:table-cell>
          <table:table-cell table:formula="of:=[.B3281]/[.C3281]" office:value-type="float" office:value="0.00265740740740741" calcext:value-type="float">
            <text:p>0,00265740740740741000</text:p>
          </table:table-cell>
          <table:table-cell table:formula="of:=[.D3282]-[.D328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table:formula="of:=[.B3281]+7" office:value-type="float" office:value="22967" calcext:value-type="float">
            <text:p>22967</text:p>
          </table:table-cell>
          <table:table-cell office:value-type="float" office:value="8640000" calcext:value-type="float">
            <text:p>8640000</text:p>
          </table:table-cell>
          <table:table-cell table:formula="of:=[.B3282]/[.C3282]" office:value-type="float" office:value="0.00265821759259259" calcext:value-type="float">
            <text:p>0,00265821759259259000</text:p>
          </table:table-cell>
          <table:table-cell table:formula="of:=[.D3283]-[.D328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table:formula="of:=[.B3282]+7" office:value-type="float" office:value="22974" calcext:value-type="float">
            <text:p>22974</text:p>
          </table:table-cell>
          <table:table-cell office:value-type="float" office:value="8640000" calcext:value-type="float">
            <text:p>8640000</text:p>
          </table:table-cell>
          <table:table-cell table:formula="of:=[.B3283]/[.C3283]" office:value-type="float" office:value="0.00265902777777778" calcext:value-type="float">
            <text:p>0,00265902777777778000</text:p>
          </table:table-cell>
          <table:table-cell table:formula="of:=[.D3284]-[.D328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table:formula="of:=[.B3283]+7" office:value-type="float" office:value="22981" calcext:value-type="float">
            <text:p>22981</text:p>
          </table:table-cell>
          <table:table-cell office:value-type="float" office:value="8640000" calcext:value-type="float">
            <text:p>8640000</text:p>
          </table:table-cell>
          <table:table-cell table:formula="of:=[.B3284]/[.C3284]" office:value-type="float" office:value="0.00265983796296296" calcext:value-type="float">
            <text:p>0,00265983796296296000</text:p>
          </table:table-cell>
          <table:table-cell table:formula="of:=[.D3285]-[.D328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table:formula="of:=[.B3284]+7" office:value-type="float" office:value="22988" calcext:value-type="float">
            <text:p>22988</text:p>
          </table:table-cell>
          <table:table-cell office:value-type="float" office:value="8640000" calcext:value-type="float">
            <text:p>8640000</text:p>
          </table:table-cell>
          <table:table-cell table:formula="of:=[.B3285]/[.C3285]" office:value-type="float" office:value="0.00266064814814815" calcext:value-type="float">
            <text:p>0,00266064814814815000</text:p>
          </table:table-cell>
          <table:table-cell table:formula="of:=[.D3286]-[.D328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table:formula="of:=[.B3285]+7" office:value-type="float" office:value="22995" calcext:value-type="float">
            <text:p>22995</text:p>
          </table:table-cell>
          <table:table-cell office:value-type="float" office:value="8640000" calcext:value-type="float">
            <text:p>8640000</text:p>
          </table:table-cell>
          <table:table-cell table:formula="of:=[.B3286]/[.C3286]" office:value-type="float" office:value="0.00266145833333333" calcext:value-type="float">
            <text:p>0,00266145833333333000</text:p>
          </table:table-cell>
          <table:table-cell table:formula="of:=[.D3287]-[.D328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table:formula="of:=[.B3286]+7" office:value-type="float" office:value="23002" calcext:value-type="float">
            <text:p>23002</text:p>
          </table:table-cell>
          <table:table-cell office:value-type="float" office:value="8640000" calcext:value-type="float">
            <text:p>8640000</text:p>
          </table:table-cell>
          <table:table-cell table:formula="of:=[.B3287]/[.C3287]" office:value-type="float" office:value="0.00266226851851852" calcext:value-type="float">
            <text:p>0,00266226851851852000</text:p>
          </table:table-cell>
          <table:table-cell table:formula="of:=[.D3288]-[.D328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table:formula="of:=[.B3287]+7" office:value-type="float" office:value="23009" calcext:value-type="float">
            <text:p>23009</text:p>
          </table:table-cell>
          <table:table-cell office:value-type="float" office:value="8640000" calcext:value-type="float">
            <text:p>8640000</text:p>
          </table:table-cell>
          <table:table-cell table:formula="of:=[.B3288]/[.C3288]" office:value-type="float" office:value="0.0026630787037037" calcext:value-type="float">
            <text:p>0,00266307870370370000</text:p>
          </table:table-cell>
          <table:table-cell table:formula="of:=[.D3289]-[.D328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table:formula="of:=[.B3288]+7" office:value-type="float" office:value="23016" calcext:value-type="float">
            <text:p>23016</text:p>
          </table:table-cell>
          <table:table-cell office:value-type="float" office:value="8640000" calcext:value-type="float">
            <text:p>8640000</text:p>
          </table:table-cell>
          <table:table-cell table:formula="of:=[.B3289]/[.C3289]" office:value-type="float" office:value="0.00266388888888889" calcext:value-type="float">
            <text:p>0,00266388888888889000</text:p>
          </table:table-cell>
          <table:table-cell table:formula="of:=[.D3290]-[.D328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table:formula="of:=[.B3289]+7" office:value-type="float" office:value="23023" calcext:value-type="float">
            <text:p>23023</text:p>
          </table:table-cell>
          <table:table-cell office:value-type="float" office:value="8640000" calcext:value-type="float">
            <text:p>8640000</text:p>
          </table:table-cell>
          <table:table-cell table:formula="of:=[.B3290]/[.C3290]" office:value-type="float" office:value="0.00266469907407407" calcext:value-type="float">
            <text:p>0,00266469907407407000</text:p>
          </table:table-cell>
          <table:table-cell table:formula="of:=[.D3291]-[.D329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table:formula="of:=[.B3290]+7" office:value-type="float" office:value="23030" calcext:value-type="float">
            <text:p>23030</text:p>
          </table:table-cell>
          <table:table-cell office:value-type="float" office:value="8640000" calcext:value-type="float">
            <text:p>8640000</text:p>
          </table:table-cell>
          <table:table-cell table:formula="of:=[.B3291]/[.C3291]" office:value-type="float" office:value="0.00266550925925926" calcext:value-type="float">
            <text:p>0,00266550925925926000</text:p>
          </table:table-cell>
          <table:table-cell table:formula="of:=[.D3292]-[.D329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table:formula="of:=[.B3291]+7" office:value-type="float" office:value="23037" calcext:value-type="float">
            <text:p>23037</text:p>
          </table:table-cell>
          <table:table-cell office:value-type="float" office:value="8640000" calcext:value-type="float">
            <text:p>8640000</text:p>
          </table:table-cell>
          <table:table-cell table:formula="of:=[.B3292]/[.C3292]" office:value-type="float" office:value="0.00266631944444444" calcext:value-type="float">
            <text:p>0,00266631944444444000</text:p>
          </table:table-cell>
          <table:table-cell table:formula="of:=[.D3293]-[.D329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table:formula="of:=[.B3292]+7" office:value-type="float" office:value="23044" calcext:value-type="float">
            <text:p>23044</text:p>
          </table:table-cell>
          <table:table-cell office:value-type="float" office:value="8640000" calcext:value-type="float">
            <text:p>8640000</text:p>
          </table:table-cell>
          <table:table-cell table:formula="of:=[.B3293]/[.C3293]" office:value-type="float" office:value="0.00266712962962963" calcext:value-type="float">
            <text:p>0,00266712962962963000</text:p>
          </table:table-cell>
          <table:table-cell table:formula="of:=[.D3294]-[.D329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table:formula="of:=[.B3293]+7" office:value-type="float" office:value="23051" calcext:value-type="float">
            <text:p>23051</text:p>
          </table:table-cell>
          <table:table-cell office:value-type="float" office:value="8640000" calcext:value-type="float">
            <text:p>8640000</text:p>
          </table:table-cell>
          <table:table-cell table:formula="of:=[.B3294]/[.C3294]" office:value-type="float" office:value="0.00266793981481482" calcext:value-type="float">
            <text:p>0,00266793981481482000</text:p>
          </table:table-cell>
          <table:table-cell table:formula="of:=[.D3295]-[.D329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table:formula="of:=[.B3294]+7" office:value-type="float" office:value="23058" calcext:value-type="float">
            <text:p>23058</text:p>
          </table:table-cell>
          <table:table-cell office:value-type="float" office:value="8640000" calcext:value-type="float">
            <text:p>8640000</text:p>
          </table:table-cell>
          <table:table-cell table:formula="of:=[.B3295]/[.C3295]" office:value-type="float" office:value="0.00266875" calcext:value-type="float">
            <text:p>0,00266875000000000000</text:p>
          </table:table-cell>
          <table:table-cell table:formula="of:=[.D3296]-[.D329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table:formula="of:=[.B3295]+7" office:value-type="float" office:value="23065" calcext:value-type="float">
            <text:p>23065</text:p>
          </table:table-cell>
          <table:table-cell office:value-type="float" office:value="8640000" calcext:value-type="float">
            <text:p>8640000</text:p>
          </table:table-cell>
          <table:table-cell table:formula="of:=[.B3296]/[.C3296]" office:value-type="float" office:value="0.00266956018518519" calcext:value-type="float">
            <text:p>0,00266956018518519000</text:p>
          </table:table-cell>
          <table:table-cell table:formula="of:=[.D3297]-[.D329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table:formula="of:=[.B3296]+7" office:value-type="float" office:value="23072" calcext:value-type="float">
            <text:p>23072</text:p>
          </table:table-cell>
          <table:table-cell office:value-type="float" office:value="8640000" calcext:value-type="float">
            <text:p>8640000</text:p>
          </table:table-cell>
          <table:table-cell table:formula="of:=[.B3297]/[.C3297]" office:value-type="float" office:value="0.00267037037037037" calcext:value-type="float">
            <text:p>0,00267037037037037000</text:p>
          </table:table-cell>
          <table:table-cell table:formula="of:=[.D3298]-[.D329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table:formula="of:=[.B3297]+7" office:value-type="float" office:value="23079" calcext:value-type="float">
            <text:p>23079</text:p>
          </table:table-cell>
          <table:table-cell office:value-type="float" office:value="8640000" calcext:value-type="float">
            <text:p>8640000</text:p>
          </table:table-cell>
          <table:table-cell table:formula="of:=[.B3298]/[.C3298]" office:value-type="float" office:value="0.00267118055555556" calcext:value-type="float">
            <text:p>0,00267118055555556000</text:p>
          </table:table-cell>
          <table:table-cell table:formula="of:=[.D3299]-[.D329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table:formula="of:=[.B3298]+7" office:value-type="float" office:value="23086" calcext:value-type="float">
            <text:p>23086</text:p>
          </table:table-cell>
          <table:table-cell office:value-type="float" office:value="8640000" calcext:value-type="float">
            <text:p>8640000</text:p>
          </table:table-cell>
          <table:table-cell table:formula="of:=[.B3299]/[.C3299]" office:value-type="float" office:value="0.00267199074074074" calcext:value-type="float">
            <text:p>0,00267199074074074000</text:p>
          </table:table-cell>
          <table:table-cell table:formula="of:=[.D3300]-[.D329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table:formula="of:=[.B3299]+7" office:value-type="float" office:value="23093" calcext:value-type="float">
            <text:p>23093</text:p>
          </table:table-cell>
          <table:table-cell office:value-type="float" office:value="8640000" calcext:value-type="float">
            <text:p>8640000</text:p>
          </table:table-cell>
          <table:table-cell table:formula="of:=[.B3300]/[.C3300]" office:value-type="float" office:value="0.00267280092592593" calcext:value-type="float">
            <text:p>0,00267280092592593000</text:p>
          </table:table-cell>
          <table:table-cell table:formula="of:=[.D3301]-[.D330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table:formula="of:=[.B3300]+7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3301]/[.C3301]" office:value-type="float" office:value="0.00267361111111111" calcext:value-type="float">
            <text:p>0,00267361111111111000</text:p>
          </table:table-cell>
          <table:table-cell table:formula="of:=[.D3302]-[.D330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table:formula="of:=[.B3301]+7" office:value-type="float" office:value="23107" calcext:value-type="float">
            <text:p>23107</text:p>
          </table:table-cell>
          <table:table-cell office:value-type="float" office:value="8640000" calcext:value-type="float">
            <text:p>8640000</text:p>
          </table:table-cell>
          <table:table-cell table:formula="of:=[.B3302]/[.C3302]" office:value-type="float" office:value="0.0026744212962963" calcext:value-type="float">
            <text:p>0,00267442129629630000</text:p>
          </table:table-cell>
          <table:table-cell table:formula="of:=[.D3303]-[.D330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table:formula="of:=[.B3302]+7" office:value-type="float" office:value="23114" calcext:value-type="float">
            <text:p>23114</text:p>
          </table:table-cell>
          <table:table-cell office:value-type="float" office:value="8640000" calcext:value-type="float">
            <text:p>8640000</text:p>
          </table:table-cell>
          <table:table-cell table:formula="of:=[.B3303]/[.C3303]" office:value-type="float" office:value="0.00267523148148148" calcext:value-type="float">
            <text:p>0,00267523148148148000</text:p>
          </table:table-cell>
          <table:table-cell table:formula="of:=[.D3304]-[.D330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table:formula="of:=[.B3303]+7" office:value-type="float" office:value="23121" calcext:value-type="float">
            <text:p>23121</text:p>
          </table:table-cell>
          <table:table-cell office:value-type="float" office:value="8640000" calcext:value-type="float">
            <text:p>8640000</text:p>
          </table:table-cell>
          <table:table-cell table:formula="of:=[.B3304]/[.C3304]" office:value-type="float" office:value="0.00267604166666667" calcext:value-type="float">
            <text:p>0,00267604166666667000</text:p>
          </table:table-cell>
          <table:table-cell table:formula="of:=[.D3305]-[.D330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table:formula="of:=[.B3304]+7" office:value-type="float" office:value="23128" calcext:value-type="float">
            <text:p>23128</text:p>
          </table:table-cell>
          <table:table-cell office:value-type="float" office:value="8640000" calcext:value-type="float">
            <text:p>8640000</text:p>
          </table:table-cell>
          <table:table-cell table:formula="of:=[.B3305]/[.C3305]" office:value-type="float" office:value="0.00267685185185185" calcext:value-type="float">
            <text:p>0,00267685185185185000</text:p>
          </table:table-cell>
          <table:table-cell table:formula="of:=[.D3306]-[.D330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table:formula="of:=[.B3305]+7" office:value-type="float" office:value="23135" calcext:value-type="float">
            <text:p>23135</text:p>
          </table:table-cell>
          <table:table-cell office:value-type="float" office:value="8640000" calcext:value-type="float">
            <text:p>8640000</text:p>
          </table:table-cell>
          <table:table-cell table:formula="of:=[.B3306]/[.C3306]" office:value-type="float" office:value="0.00267766203703704" calcext:value-type="float">
            <text:p>0,00267766203703704000</text:p>
          </table:table-cell>
          <table:table-cell table:formula="of:=[.D3307]-[.D330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table:formula="of:=[.B3306]+7" office:value-type="float" office:value="23142" calcext:value-type="float">
            <text:p>23142</text:p>
          </table:table-cell>
          <table:table-cell office:value-type="float" office:value="8640000" calcext:value-type="float">
            <text:p>8640000</text:p>
          </table:table-cell>
          <table:table-cell table:formula="of:=[.B3307]/[.C3307]" office:value-type="float" office:value="0.00267847222222222" calcext:value-type="float">
            <text:p>0,00267847222222222000</text:p>
          </table:table-cell>
          <table:table-cell table:formula="of:=[.D3308]-[.D330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table:formula="of:=[.B3307]+7" office:value-type="float" office:value="23149" calcext:value-type="float">
            <text:p>23149</text:p>
          </table:table-cell>
          <table:table-cell office:value-type="float" office:value="8640000" calcext:value-type="float">
            <text:p>8640000</text:p>
          </table:table-cell>
          <table:table-cell table:formula="of:=[.B3308]/[.C3308]" office:value-type="float" office:value="0.00267928240740741" calcext:value-type="float">
            <text:p>0,00267928240740741000</text:p>
          </table:table-cell>
          <table:table-cell table:formula="of:=[.D3309]-[.D330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table:formula="of:=[.B3308]+7" office:value-type="float" office:value="23156" calcext:value-type="float">
            <text:p>23156</text:p>
          </table:table-cell>
          <table:table-cell office:value-type="float" office:value="8640000" calcext:value-type="float">
            <text:p>8640000</text:p>
          </table:table-cell>
          <table:table-cell table:formula="of:=[.B3309]/[.C3309]" office:value-type="float" office:value="0.00268009259259259" calcext:value-type="float">
            <text:p>0,00268009259259259000</text:p>
          </table:table-cell>
          <table:table-cell table:formula="of:=[.D3310]-[.D330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table:formula="of:=[.B3309]+7" office:value-type="float" office:value="23163" calcext:value-type="float">
            <text:p>23163</text:p>
          </table:table-cell>
          <table:table-cell office:value-type="float" office:value="8640000" calcext:value-type="float">
            <text:p>8640000</text:p>
          </table:table-cell>
          <table:table-cell table:formula="of:=[.B3310]/[.C3310]" office:value-type="float" office:value="0.00268090277777778" calcext:value-type="float">
            <text:p>0,00268090277777778000</text:p>
          </table:table-cell>
          <table:table-cell table:formula="of:=[.D3311]-[.D331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table:formula="of:=[.B3310]+7" office:value-type="float" office:value="23170" calcext:value-type="float">
            <text:p>23170</text:p>
          </table:table-cell>
          <table:table-cell office:value-type="float" office:value="8640000" calcext:value-type="float">
            <text:p>8640000</text:p>
          </table:table-cell>
          <table:table-cell table:formula="of:=[.B3311]/[.C3311]" office:value-type="float" office:value="0.00268171296296296" calcext:value-type="float">
            <text:p>0,00268171296296296000</text:p>
          </table:table-cell>
          <table:table-cell table:formula="of:=[.D3312]-[.D331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table:formula="of:=[.B3311]+7" office:value-type="float" office:value="23177" calcext:value-type="float">
            <text:p>23177</text:p>
          </table:table-cell>
          <table:table-cell office:value-type="float" office:value="8640000" calcext:value-type="float">
            <text:p>8640000</text:p>
          </table:table-cell>
          <table:table-cell table:formula="of:=[.B3312]/[.C3312]" office:value-type="float" office:value="0.00268252314814815" calcext:value-type="float">
            <text:p>0,00268252314814815000</text:p>
          </table:table-cell>
          <table:table-cell table:formula="of:=[.D3313]-[.D331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table:formula="of:=[.B3312]+7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3313]/[.C3313]" office:value-type="float" office:value="0.00268333333333333" calcext:value-type="float">
            <text:p>0,00268333333333333000</text:p>
          </table:table-cell>
          <table:table-cell table:formula="of:=[.D3314]-[.D331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table:formula="of:=[.B3313]+7" office:value-type="float" office:value="23191" calcext:value-type="float">
            <text:p>23191</text:p>
          </table:table-cell>
          <table:table-cell office:value-type="float" office:value="8640000" calcext:value-type="float">
            <text:p>8640000</text:p>
          </table:table-cell>
          <table:table-cell table:formula="of:=[.B3314]/[.C3314]" office:value-type="float" office:value="0.00268414351851852" calcext:value-type="float">
            <text:p>0,00268414351851852000</text:p>
          </table:table-cell>
          <table:table-cell table:formula="of:=[.D3315]-[.D331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table:formula="of:=[.B3314]+7" office:value-type="float" office:value="23198" calcext:value-type="float">
            <text:p>23198</text:p>
          </table:table-cell>
          <table:table-cell office:value-type="float" office:value="8640000" calcext:value-type="float">
            <text:p>8640000</text:p>
          </table:table-cell>
          <table:table-cell table:formula="of:=[.B3315]/[.C3315]" office:value-type="float" office:value="0.0026849537037037" calcext:value-type="float">
            <text:p>0,00268495370370370000</text:p>
          </table:table-cell>
          <table:table-cell table:formula="of:=[.D3316]-[.D331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table:formula="of:=[.B3315]+7" office:value-type="float" office:value="23205" calcext:value-type="float">
            <text:p>23205</text:p>
          </table:table-cell>
          <table:table-cell office:value-type="float" office:value="8640000" calcext:value-type="float">
            <text:p>8640000</text:p>
          </table:table-cell>
          <table:table-cell table:formula="of:=[.B3316]/[.C3316]" office:value-type="float" office:value="0.00268576388888889" calcext:value-type="float">
            <text:p>0,00268576388888889000</text:p>
          </table:table-cell>
          <table:table-cell table:formula="of:=[.D3317]-[.D331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table:formula="of:=[.B3316]+7" office:value-type="float" office:value="23212" calcext:value-type="float">
            <text:p>23212</text:p>
          </table:table-cell>
          <table:table-cell office:value-type="float" office:value="8640000" calcext:value-type="float">
            <text:p>8640000</text:p>
          </table:table-cell>
          <table:table-cell table:formula="of:=[.B3317]/[.C3317]" office:value-type="float" office:value="0.00268657407407407" calcext:value-type="float">
            <text:p>0,00268657407407407000</text:p>
          </table:table-cell>
          <table:table-cell table:formula="of:=[.D3318]-[.D331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table:formula="of:=[.B3317]+7" office:value-type="float" office:value="23219" calcext:value-type="float">
            <text:p>23219</text:p>
          </table:table-cell>
          <table:table-cell office:value-type="float" office:value="8640000" calcext:value-type="float">
            <text:p>8640000</text:p>
          </table:table-cell>
          <table:table-cell table:formula="of:=[.B3318]/[.C3318]" office:value-type="float" office:value="0.00268738425925926" calcext:value-type="float">
            <text:p>0,00268738425925926000</text:p>
          </table:table-cell>
          <table:table-cell table:formula="of:=[.D3319]-[.D331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table:formula="of:=[.B3318]+7" office:value-type="float" office:value="23226" calcext:value-type="float">
            <text:p>23226</text:p>
          </table:table-cell>
          <table:table-cell office:value-type="float" office:value="8640000" calcext:value-type="float">
            <text:p>8640000</text:p>
          </table:table-cell>
          <table:table-cell table:formula="of:=[.B3319]/[.C3319]" office:value-type="float" office:value="0.00268819444444444" calcext:value-type="float">
            <text:p>0,00268819444444444000</text:p>
          </table:table-cell>
          <table:table-cell table:formula="of:=[.D3320]-[.D331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table:formula="of:=[.B3319]+7" office:value-type="float" office:value="23233" calcext:value-type="float">
            <text:p>23233</text:p>
          </table:table-cell>
          <table:table-cell office:value-type="float" office:value="8640000" calcext:value-type="float">
            <text:p>8640000</text:p>
          </table:table-cell>
          <table:table-cell table:formula="of:=[.B3320]/[.C3320]" office:value-type="float" office:value="0.00268900462962963" calcext:value-type="float">
            <text:p>0,00268900462962963000</text:p>
          </table:table-cell>
          <table:table-cell table:formula="of:=[.D3321]-[.D332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table:formula="of:=[.B3320]+7" office:value-type="float" office:value="23240" calcext:value-type="float">
            <text:p>23240</text:p>
          </table:table-cell>
          <table:table-cell office:value-type="float" office:value="8640000" calcext:value-type="float">
            <text:p>8640000</text:p>
          </table:table-cell>
          <table:table-cell table:formula="of:=[.B3321]/[.C3321]" office:value-type="float" office:value="0.00268981481481482" calcext:value-type="float">
            <text:p>0,00268981481481482000</text:p>
          </table:table-cell>
          <table:table-cell table:formula="of:=[.D3322]-[.D332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table:formula="of:=[.B3321]+7" office:value-type="float" office:value="23247" calcext:value-type="float">
            <text:p>23247</text:p>
          </table:table-cell>
          <table:table-cell office:value-type="float" office:value="8640000" calcext:value-type="float">
            <text:p>8640000</text:p>
          </table:table-cell>
          <table:table-cell table:formula="of:=[.B3322]/[.C3322]" office:value-type="float" office:value="0.002690625" calcext:value-type="float">
            <text:p>0,00269062500000000000</text:p>
          </table:table-cell>
          <table:table-cell table:formula="of:=[.D3323]-[.D332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table:formula="of:=[.B3322]+7" office:value-type="float" office:value="23254" calcext:value-type="float">
            <text:p>23254</text:p>
          </table:table-cell>
          <table:table-cell office:value-type="float" office:value="8640000" calcext:value-type="float">
            <text:p>8640000</text:p>
          </table:table-cell>
          <table:table-cell table:formula="of:=[.B3323]/[.C3323]" office:value-type="float" office:value="0.00269143518518519" calcext:value-type="float">
            <text:p>0,00269143518518519000</text:p>
          </table:table-cell>
          <table:table-cell table:formula="of:=[.D3324]-[.D332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table:formula="of:=[.B3323]+7" office:value-type="float" office:value="23261" calcext:value-type="float">
            <text:p>23261</text:p>
          </table:table-cell>
          <table:table-cell office:value-type="float" office:value="8640000" calcext:value-type="float">
            <text:p>8640000</text:p>
          </table:table-cell>
          <table:table-cell table:formula="of:=[.B3324]/[.C3324]" office:value-type="float" office:value="0.00269224537037037" calcext:value-type="float">
            <text:p>0,00269224537037037000</text:p>
          </table:table-cell>
          <table:table-cell table:formula="of:=[.D3325]-[.D332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table:formula="of:=[.B3324]+7" office:value-type="float" office:value="23268" calcext:value-type="float">
            <text:p>23268</text:p>
          </table:table-cell>
          <table:table-cell office:value-type="float" office:value="8640000" calcext:value-type="float">
            <text:p>8640000</text:p>
          </table:table-cell>
          <table:table-cell table:formula="of:=[.B3325]/[.C3325]" office:value-type="float" office:value="0.00269305555555556" calcext:value-type="float">
            <text:p>0,00269305555555556000</text:p>
          </table:table-cell>
          <table:table-cell table:formula="of:=[.D3326]-[.D332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table:formula="of:=[.B3325]+7" office:value-type="float" office:value="23275" calcext:value-type="float">
            <text:p>23275</text:p>
          </table:table-cell>
          <table:table-cell office:value-type="float" office:value="8640000" calcext:value-type="float">
            <text:p>8640000</text:p>
          </table:table-cell>
          <table:table-cell table:formula="of:=[.B3326]/[.C3326]" office:value-type="float" office:value="0.00269386574074074" calcext:value-type="float">
            <text:p>0,00269386574074074000</text:p>
          </table:table-cell>
          <table:table-cell table:formula="of:=[.D3327]-[.D332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table:formula="of:=[.B3326]+7" office:value-type="float" office:value="23282" calcext:value-type="float">
            <text:p>23282</text:p>
          </table:table-cell>
          <table:table-cell office:value-type="float" office:value="8640000" calcext:value-type="float">
            <text:p>8640000</text:p>
          </table:table-cell>
          <table:table-cell table:formula="of:=[.B3327]/[.C3327]" office:value-type="float" office:value="0.00269467592592593" calcext:value-type="float">
            <text:p>0,00269467592592593000</text:p>
          </table:table-cell>
          <table:table-cell table:formula="of:=[.D3328]-[.D332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table:formula="of:=[.B3327]+7" office:value-type="float" office:value="23289" calcext:value-type="float">
            <text:p>23289</text:p>
          </table:table-cell>
          <table:table-cell office:value-type="float" office:value="8640000" calcext:value-type="float">
            <text:p>8640000</text:p>
          </table:table-cell>
          <table:table-cell table:formula="of:=[.B3328]/[.C3328]" office:value-type="float" office:value="0.00269548611111111" calcext:value-type="float">
            <text:p>0,00269548611111111000</text:p>
          </table:table-cell>
          <table:table-cell table:formula="of:=[.D3329]-[.D332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table:formula="of:=[.B3328]+7" office:value-type="float" office:value="23296" calcext:value-type="float">
            <text:p>23296</text:p>
          </table:table-cell>
          <table:table-cell office:value-type="float" office:value="8640000" calcext:value-type="float">
            <text:p>8640000</text:p>
          </table:table-cell>
          <table:table-cell table:formula="of:=[.B3329]/[.C3329]" office:value-type="float" office:value="0.0026962962962963" calcext:value-type="float">
            <text:p>0,00269629629629630000</text:p>
          </table:table-cell>
          <table:table-cell table:formula="of:=[.D3330]-[.D332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table:formula="of:=[.B3329]+7" office:value-type="float" office:value="23303" calcext:value-type="float">
            <text:p>23303</text:p>
          </table:table-cell>
          <table:table-cell office:value-type="float" office:value="8640000" calcext:value-type="float">
            <text:p>8640000</text:p>
          </table:table-cell>
          <table:table-cell table:formula="of:=[.B3330]/[.C3330]" office:value-type="float" office:value="0.00269710648148148" calcext:value-type="float">
            <text:p>0,00269710648148148000</text:p>
          </table:table-cell>
          <table:table-cell table:formula="of:=[.D3331]-[.D333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table:formula="of:=[.B3330]+7" office:value-type="float" office:value="23310" calcext:value-type="float">
            <text:p>23310</text:p>
          </table:table-cell>
          <table:table-cell office:value-type="float" office:value="8640000" calcext:value-type="float">
            <text:p>8640000</text:p>
          </table:table-cell>
          <table:table-cell table:formula="of:=[.B3331]/[.C3331]" office:value-type="float" office:value="0.00269791666666667" calcext:value-type="float">
            <text:p>0,00269791666666667000</text:p>
          </table:table-cell>
          <table:table-cell table:formula="of:=[.D3332]-[.D333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table:formula="of:=[.B3331]+7" office:value-type="float" office:value="23317" calcext:value-type="float">
            <text:p>23317</text:p>
          </table:table-cell>
          <table:table-cell office:value-type="float" office:value="8640000" calcext:value-type="float">
            <text:p>8640000</text:p>
          </table:table-cell>
          <table:table-cell table:formula="of:=[.B3332]/[.C3332]" office:value-type="float" office:value="0.00269872685185185" calcext:value-type="float">
            <text:p>0,00269872685185185000</text:p>
          </table:table-cell>
          <table:table-cell table:formula="of:=[.D3333]-[.D333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table:formula="of:=[.B3332]+7" office:value-type="float" office:value="23324" calcext:value-type="float">
            <text:p>23324</text:p>
          </table:table-cell>
          <table:table-cell office:value-type="float" office:value="8640000" calcext:value-type="float">
            <text:p>8640000</text:p>
          </table:table-cell>
          <table:table-cell table:formula="of:=[.B3333]/[.C3333]" office:value-type="float" office:value="0.00269953703703704" calcext:value-type="float">
            <text:p>0,00269953703703704000</text:p>
          </table:table-cell>
          <table:table-cell table:formula="of:=[.D3334]-[.D333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table:formula="of:=[.B3333]+7" office:value-type="float" office:value="23331" calcext:value-type="float">
            <text:p>23331</text:p>
          </table:table-cell>
          <table:table-cell office:value-type="float" office:value="8640000" calcext:value-type="float">
            <text:p>8640000</text:p>
          </table:table-cell>
          <table:table-cell table:formula="of:=[.B3334]/[.C3334]" office:value-type="float" office:value="0.00270034722222222" calcext:value-type="float">
            <text:p>0,00270034722222222000</text:p>
          </table:table-cell>
          <table:table-cell table:formula="of:=[.D3335]-[.D333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table:formula="of:=[.B3334]+7" office:value-type="float" office:value="23338" calcext:value-type="float">
            <text:p>23338</text:p>
          </table:table-cell>
          <table:table-cell office:value-type="float" office:value="8640000" calcext:value-type="float">
            <text:p>8640000</text:p>
          </table:table-cell>
          <table:table-cell table:formula="of:=[.B3335]/[.C3335]" office:value-type="float" office:value="0.00270115740740741" calcext:value-type="float">
            <text:p>0,00270115740740741000</text:p>
          </table:table-cell>
          <table:table-cell table:formula="of:=[.D3336]-[.D333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table:formula="of:=[.B3335]+7" office:value-type="float" office:value="23345" calcext:value-type="float">
            <text:p>23345</text:p>
          </table:table-cell>
          <table:table-cell office:value-type="float" office:value="8640000" calcext:value-type="float">
            <text:p>8640000</text:p>
          </table:table-cell>
          <table:table-cell table:formula="of:=[.B3336]/[.C3336]" office:value-type="float" office:value="0.00270196759259259" calcext:value-type="float">
            <text:p>0,00270196759259259000</text:p>
          </table:table-cell>
          <table:table-cell table:formula="of:=[.D3337]-[.D333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table:formula="of:=[.B3336]+7" office:value-type="float" office:value="23352" calcext:value-type="float">
            <text:p>23352</text:p>
          </table:table-cell>
          <table:table-cell office:value-type="float" office:value="8640000" calcext:value-type="float">
            <text:p>8640000</text:p>
          </table:table-cell>
          <table:table-cell table:formula="of:=[.B3337]/[.C3337]" office:value-type="float" office:value="0.00270277777777778" calcext:value-type="float">
            <text:p>0,00270277777777778000</text:p>
          </table:table-cell>
          <table:table-cell table:formula="of:=[.D3338]-[.D333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table:formula="of:=[.B3337]+7" office:value-type="float" office:value="23359" calcext:value-type="float">
            <text:p>23359</text:p>
          </table:table-cell>
          <table:table-cell office:value-type="float" office:value="8640000" calcext:value-type="float">
            <text:p>8640000</text:p>
          </table:table-cell>
          <table:table-cell table:formula="of:=[.B3338]/[.C3338]" office:value-type="float" office:value="0.00270358796296296" calcext:value-type="float">
            <text:p>0,00270358796296296000</text:p>
          </table:table-cell>
          <table:table-cell table:formula="of:=[.D3339]-[.D333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table:formula="of:=[.B3338]+7" office:value-type="float" office:value="23366" calcext:value-type="float">
            <text:p>23366</text:p>
          </table:table-cell>
          <table:table-cell office:value-type="float" office:value="8640000" calcext:value-type="float">
            <text:p>8640000</text:p>
          </table:table-cell>
          <table:table-cell table:formula="of:=[.B3339]/[.C3339]" office:value-type="float" office:value="0.00270439814814815" calcext:value-type="float">
            <text:p>0,00270439814814815000</text:p>
          </table:table-cell>
          <table:table-cell table:formula="of:=[.D3340]-[.D333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table:formula="of:=[.B3339]+7" office:value-type="float" office:value="23373" calcext:value-type="float">
            <text:p>23373</text:p>
          </table:table-cell>
          <table:table-cell office:value-type="float" office:value="8640000" calcext:value-type="float">
            <text:p>8640000</text:p>
          </table:table-cell>
          <table:table-cell table:formula="of:=[.B3340]/[.C3340]" office:value-type="float" office:value="0.00270520833333333" calcext:value-type="float">
            <text:p>0,00270520833333333000</text:p>
          </table:table-cell>
          <table:table-cell table:formula="of:=[.D3341]-[.D334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table:formula="of:=[.B3340]+7" office:value-type="float" office:value="23380" calcext:value-type="float">
            <text:p>23380</text:p>
          </table:table-cell>
          <table:table-cell office:value-type="float" office:value="8640000" calcext:value-type="float">
            <text:p>8640000</text:p>
          </table:table-cell>
          <table:table-cell table:formula="of:=[.B3341]/[.C3341]" office:value-type="float" office:value="0.00270601851851852" calcext:value-type="float">
            <text:p>0,00270601851851852000</text:p>
          </table:table-cell>
          <table:table-cell table:formula="of:=[.D3342]-[.D334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table:formula="of:=[.B3341]+7" office:value-type="float" office:value="23387" calcext:value-type="float">
            <text:p>23387</text:p>
          </table:table-cell>
          <table:table-cell office:value-type="float" office:value="8640000" calcext:value-type="float">
            <text:p>8640000</text:p>
          </table:table-cell>
          <table:table-cell table:formula="of:=[.B3342]/[.C3342]" office:value-type="float" office:value="0.0027068287037037" calcext:value-type="float">
            <text:p>0,00270682870370370000</text:p>
          </table:table-cell>
          <table:table-cell table:formula="of:=[.D3343]-[.D334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table:formula="of:=[.B3342]+7" office:value-type="float" office:value="23394" calcext:value-type="float">
            <text:p>23394</text:p>
          </table:table-cell>
          <table:table-cell office:value-type="float" office:value="8640000" calcext:value-type="float">
            <text:p>8640000</text:p>
          </table:table-cell>
          <table:table-cell table:formula="of:=[.B3343]/[.C3343]" office:value-type="float" office:value="0.00270763888888889" calcext:value-type="float">
            <text:p>0,00270763888888889000</text:p>
          </table:table-cell>
          <table:table-cell table:formula="of:=[.D3344]-[.D334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table:formula="of:=[.B3343]+7" office:value-type="float" office:value="23401" calcext:value-type="float">
            <text:p>23401</text:p>
          </table:table-cell>
          <table:table-cell office:value-type="float" office:value="8640000" calcext:value-type="float">
            <text:p>8640000</text:p>
          </table:table-cell>
          <table:table-cell table:formula="of:=[.B3344]/[.C3344]" office:value-type="float" office:value="0.00270844907407407" calcext:value-type="float">
            <text:p>0,00270844907407407000</text:p>
          </table:table-cell>
          <table:table-cell table:formula="of:=[.D3345]-[.D334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table:formula="of:=[.B3344]+7" office:value-type="float" office:value="23408" calcext:value-type="float">
            <text:p>23408</text:p>
          </table:table-cell>
          <table:table-cell office:value-type="float" office:value="8640000" calcext:value-type="float">
            <text:p>8640000</text:p>
          </table:table-cell>
          <table:table-cell table:formula="of:=[.B3345]/[.C3345]" office:value-type="float" office:value="0.00270925925925926" calcext:value-type="float">
            <text:p>0,00270925925925926000</text:p>
          </table:table-cell>
          <table:table-cell table:formula="of:=[.D3346]-[.D334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table:formula="of:=[.B3345]+7" office:value-type="float" office:value="23415" calcext:value-type="float">
            <text:p>23415</text:p>
          </table:table-cell>
          <table:table-cell office:value-type="float" office:value="8640000" calcext:value-type="float">
            <text:p>8640000</text:p>
          </table:table-cell>
          <table:table-cell table:formula="of:=[.B3346]/[.C3346]" office:value-type="float" office:value="0.00271006944444444" calcext:value-type="float">
            <text:p>0,00271006944444444000</text:p>
          </table:table-cell>
          <table:table-cell table:formula="of:=[.D3347]-[.D334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table:formula="of:=[.B3346]+7" office:value-type="float" office:value="23422" calcext:value-type="float">
            <text:p>23422</text:p>
          </table:table-cell>
          <table:table-cell office:value-type="float" office:value="8640000" calcext:value-type="float">
            <text:p>8640000</text:p>
          </table:table-cell>
          <table:table-cell table:formula="of:=[.B3347]/[.C3347]" office:value-type="float" office:value="0.00271087962962963" calcext:value-type="float">
            <text:p>0,00271087962962963000</text:p>
          </table:table-cell>
          <table:table-cell table:formula="of:=[.D3348]-[.D334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table:formula="of:=[.B3347]+7" office:value-type="float" office:value="23429" calcext:value-type="float">
            <text:p>23429</text:p>
          </table:table-cell>
          <table:table-cell office:value-type="float" office:value="8640000" calcext:value-type="float">
            <text:p>8640000</text:p>
          </table:table-cell>
          <table:table-cell table:formula="of:=[.B3348]/[.C3348]" office:value-type="float" office:value="0.00271168981481481" calcext:value-type="float">
            <text:p>0,00271168981481481000</text:p>
          </table:table-cell>
          <table:table-cell table:formula="of:=[.D3349]-[.D334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table:formula="of:=[.B3348]+7" office:value-type="float" office:value="23436" calcext:value-type="float">
            <text:p>23436</text:p>
          </table:table-cell>
          <table:table-cell office:value-type="float" office:value="8640000" calcext:value-type="float">
            <text:p>8640000</text:p>
          </table:table-cell>
          <table:table-cell table:formula="of:=[.B3349]/[.C3349]" office:value-type="float" office:value="0.0027125" calcext:value-type="float">
            <text:p>0,00271250000000000000</text:p>
          </table:table-cell>
          <table:table-cell table:formula="of:=[.D3350]-[.D334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table:formula="of:=[.B3349]+7" office:value-type="float" office:value="23443" calcext:value-type="float">
            <text:p>23443</text:p>
          </table:table-cell>
          <table:table-cell office:value-type="float" office:value="8640000" calcext:value-type="float">
            <text:p>8640000</text:p>
          </table:table-cell>
          <table:table-cell table:formula="of:=[.B3350]/[.C3350]" office:value-type="float" office:value="0.00271331018518519" calcext:value-type="float">
            <text:p>0,00271331018518519000</text:p>
          </table:table-cell>
          <table:table-cell table:formula="of:=[.D3351]-[.D335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table:formula="of:=[.B3350]+7" office:value-type="float" office:value="23450" calcext:value-type="float">
            <text:p>23450</text:p>
          </table:table-cell>
          <table:table-cell office:value-type="float" office:value="8640000" calcext:value-type="float">
            <text:p>8640000</text:p>
          </table:table-cell>
          <table:table-cell table:formula="of:=[.B3351]/[.C3351]" office:value-type="float" office:value="0.00271412037037037" calcext:value-type="float">
            <text:p>0,00271412037037037000</text:p>
          </table:table-cell>
          <table:table-cell table:formula="of:=[.D3352]-[.D335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table:formula="of:=[.B3351]+7" office:value-type="float" office:value="23457" calcext:value-type="float">
            <text:p>23457</text:p>
          </table:table-cell>
          <table:table-cell office:value-type="float" office:value="8640000" calcext:value-type="float">
            <text:p>8640000</text:p>
          </table:table-cell>
          <table:table-cell table:formula="of:=[.B3352]/[.C3352]" office:value-type="float" office:value="0.00271493055555556" calcext:value-type="float">
            <text:p>0,00271493055555556000</text:p>
          </table:table-cell>
          <table:table-cell table:formula="of:=[.D3353]-[.D335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table:formula="of:=[.B3352]+7" office:value-type="float" office:value="23464" calcext:value-type="float">
            <text:p>23464</text:p>
          </table:table-cell>
          <table:table-cell office:value-type="float" office:value="8640000" calcext:value-type="float">
            <text:p>8640000</text:p>
          </table:table-cell>
          <table:table-cell table:formula="of:=[.B3353]/[.C3353]" office:value-type="float" office:value="0.00271574074074074" calcext:value-type="float">
            <text:p>0,00271574074074074000</text:p>
          </table:table-cell>
          <table:table-cell table:formula="of:=[.D3354]-[.D335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table:formula="of:=[.B3353]+7" office:value-type="float" office:value="23471" calcext:value-type="float">
            <text:p>23471</text:p>
          </table:table-cell>
          <table:table-cell office:value-type="float" office:value="8640000" calcext:value-type="float">
            <text:p>8640000</text:p>
          </table:table-cell>
          <table:table-cell table:formula="of:=[.B3354]/[.C3354]" office:value-type="float" office:value="0.00271655092592593" calcext:value-type="float">
            <text:p>0,00271655092592593000</text:p>
          </table:table-cell>
          <table:table-cell table:formula="of:=[.D3355]-[.D335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table:formula="of:=[.B3354]+7" office:value-type="float" office:value="23478" calcext:value-type="float">
            <text:p>23478</text:p>
          </table:table-cell>
          <table:table-cell office:value-type="float" office:value="8640000" calcext:value-type="float">
            <text:p>8640000</text:p>
          </table:table-cell>
          <table:table-cell table:formula="of:=[.B3355]/[.C3355]" office:value-type="float" office:value="0.00271736111111111" calcext:value-type="float">
            <text:p>0,00271736111111111000</text:p>
          </table:table-cell>
          <table:table-cell table:formula="of:=[.D3356]-[.D335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table:formula="of:=[.B3355]+7" office:value-type="float" office:value="23485" calcext:value-type="float">
            <text:p>23485</text:p>
          </table:table-cell>
          <table:table-cell office:value-type="float" office:value="8640000" calcext:value-type="float">
            <text:p>8640000</text:p>
          </table:table-cell>
          <table:table-cell table:formula="of:=[.B3356]/[.C3356]" office:value-type="float" office:value="0.0027181712962963" calcext:value-type="float">
            <text:p>0,00271817129629630000</text:p>
          </table:table-cell>
          <table:table-cell table:formula="of:=[.D3357]-[.D335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table:formula="of:=[.B3356]+7" office:value-type="float" office:value="23492" calcext:value-type="float">
            <text:p>23492</text:p>
          </table:table-cell>
          <table:table-cell office:value-type="float" office:value="8640000" calcext:value-type="float">
            <text:p>8640000</text:p>
          </table:table-cell>
          <table:table-cell table:formula="of:=[.B3357]/[.C3357]" office:value-type="float" office:value="0.00271898148148148" calcext:value-type="float">
            <text:p>0,00271898148148148000</text:p>
          </table:table-cell>
          <table:table-cell table:formula="of:=[.D3358]-[.D335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table:formula="of:=[.B3357]+7" office:value-type="float" office:value="23499" calcext:value-type="float">
            <text:p>23499</text:p>
          </table:table-cell>
          <table:table-cell office:value-type="float" office:value="8640000" calcext:value-type="float">
            <text:p>8640000</text:p>
          </table:table-cell>
          <table:table-cell table:formula="of:=[.B3358]/[.C3358]" office:value-type="float" office:value="0.00271979166666667" calcext:value-type="float">
            <text:p>0,00271979166666667000</text:p>
          </table:table-cell>
          <table:table-cell table:formula="of:=[.D3359]-[.D335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table:formula="of:=[.B3358]+7" office:value-type="float" office:value="23506" calcext:value-type="float">
            <text:p>23506</text:p>
          </table:table-cell>
          <table:table-cell office:value-type="float" office:value="8640000" calcext:value-type="float">
            <text:p>8640000</text:p>
          </table:table-cell>
          <table:table-cell table:formula="of:=[.B3359]/[.C3359]" office:value-type="float" office:value="0.00272060185185185" calcext:value-type="float">
            <text:p>0,00272060185185185000</text:p>
          </table:table-cell>
          <table:table-cell table:formula="of:=[.D3360]-[.D335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table:formula="of:=[.B3359]+7" office:value-type="float" office:value="23513" calcext:value-type="float">
            <text:p>23513</text:p>
          </table:table-cell>
          <table:table-cell office:value-type="float" office:value="8640000" calcext:value-type="float">
            <text:p>8640000</text:p>
          </table:table-cell>
          <table:table-cell table:formula="of:=[.B3360]/[.C3360]" office:value-type="float" office:value="0.00272141203703704" calcext:value-type="float">
            <text:p>0,00272141203703704000</text:p>
          </table:table-cell>
          <table:table-cell table:formula="of:=[.D3361]-[.D336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table:formula="of:=[.B3360]+7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3361]/[.C3361]" office:value-type="float" office:value="0.00272222222222222" calcext:value-type="float">
            <text:p>0,00272222222222222000</text:p>
          </table:table-cell>
          <table:table-cell table:formula="of:=[.D3362]-[.D336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table:formula="of:=[.B3361]+7" office:value-type="float" office:value="23527" calcext:value-type="float">
            <text:p>23527</text:p>
          </table:table-cell>
          <table:table-cell office:value-type="float" office:value="8640000" calcext:value-type="float">
            <text:p>8640000</text:p>
          </table:table-cell>
          <table:table-cell table:formula="of:=[.B3362]/[.C3362]" office:value-type="float" office:value="0.00272303240740741" calcext:value-type="float">
            <text:p>0,00272303240740741000</text:p>
          </table:table-cell>
          <table:table-cell table:formula="of:=[.D3363]-[.D336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table:formula="of:=[.B3362]+7" office:value-type="float" office:value="23534" calcext:value-type="float">
            <text:p>23534</text:p>
          </table:table-cell>
          <table:table-cell office:value-type="float" office:value="8640000" calcext:value-type="float">
            <text:p>8640000</text:p>
          </table:table-cell>
          <table:table-cell table:formula="of:=[.B3363]/[.C3363]" office:value-type="float" office:value="0.00272384259259259" calcext:value-type="float">
            <text:p>0,00272384259259259000</text:p>
          </table:table-cell>
          <table:table-cell table:formula="of:=[.D3364]-[.D336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table:formula="of:=[.B3363]+7" office:value-type="float" office:value="23541" calcext:value-type="float">
            <text:p>23541</text:p>
          </table:table-cell>
          <table:table-cell office:value-type="float" office:value="8640000" calcext:value-type="float">
            <text:p>8640000</text:p>
          </table:table-cell>
          <table:table-cell table:formula="of:=[.B3364]/[.C3364]" office:value-type="float" office:value="0.00272465277777778" calcext:value-type="float">
            <text:p>0,00272465277777778000</text:p>
          </table:table-cell>
          <table:table-cell table:formula="of:=[.D3365]-[.D336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table:formula="of:=[.B3364]+7" office:value-type="float" office:value="23548" calcext:value-type="float">
            <text:p>23548</text:p>
          </table:table-cell>
          <table:table-cell office:value-type="float" office:value="8640000" calcext:value-type="float">
            <text:p>8640000</text:p>
          </table:table-cell>
          <table:table-cell table:formula="of:=[.B3365]/[.C3365]" office:value-type="float" office:value="0.00272546296296296" calcext:value-type="float">
            <text:p>0,00272546296296296000</text:p>
          </table:table-cell>
          <table:table-cell table:formula="of:=[.D3366]-[.D336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table:formula="of:=[.B3365]+7" office:value-type="float" office:value="23555" calcext:value-type="float">
            <text:p>23555</text:p>
          </table:table-cell>
          <table:table-cell office:value-type="float" office:value="8640000" calcext:value-type="float">
            <text:p>8640000</text:p>
          </table:table-cell>
          <table:table-cell table:formula="of:=[.B3366]/[.C3366]" office:value-type="float" office:value="0.00272627314814815" calcext:value-type="float">
            <text:p>0,00272627314814815000</text:p>
          </table:table-cell>
          <table:table-cell table:formula="of:=[.D3367]-[.D336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table:formula="of:=[.B3366]+7" office:value-type="float" office:value="23562" calcext:value-type="float">
            <text:p>23562</text:p>
          </table:table-cell>
          <table:table-cell office:value-type="float" office:value="8640000" calcext:value-type="float">
            <text:p>8640000</text:p>
          </table:table-cell>
          <table:table-cell table:formula="of:=[.B3367]/[.C3367]" office:value-type="float" office:value="0.00272708333333333" calcext:value-type="float">
            <text:p>0,00272708333333333000</text:p>
          </table:table-cell>
          <table:table-cell table:formula="of:=[.D3368]-[.D336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table:formula="of:=[.B3367]+7" office:value-type="float" office:value="23569" calcext:value-type="float">
            <text:p>23569</text:p>
          </table:table-cell>
          <table:table-cell office:value-type="float" office:value="8640000" calcext:value-type="float">
            <text:p>8640000</text:p>
          </table:table-cell>
          <table:table-cell table:formula="of:=[.B3368]/[.C3368]" office:value-type="float" office:value="0.00272789351851852" calcext:value-type="float">
            <text:p>0,00272789351851852000</text:p>
          </table:table-cell>
          <table:table-cell table:formula="of:=[.D3369]-[.D336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table:formula="of:=[.B3368]+7" office:value-type="float" office:value="23576" calcext:value-type="float">
            <text:p>23576</text:p>
          </table:table-cell>
          <table:table-cell office:value-type="float" office:value="8640000" calcext:value-type="float">
            <text:p>8640000</text:p>
          </table:table-cell>
          <table:table-cell table:formula="of:=[.B3369]/[.C3369]" office:value-type="float" office:value="0.0027287037037037" calcext:value-type="float">
            <text:p>0,00272870370370370000</text:p>
          </table:table-cell>
          <table:table-cell table:formula="of:=[.D3370]-[.D336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table:formula="of:=[.B3369]+7" office:value-type="float" office:value="23583" calcext:value-type="float">
            <text:p>23583</text:p>
          </table:table-cell>
          <table:table-cell office:value-type="float" office:value="8640000" calcext:value-type="float">
            <text:p>8640000</text:p>
          </table:table-cell>
          <table:table-cell table:formula="of:=[.B3370]/[.C3370]" office:value-type="float" office:value="0.00272951388888889" calcext:value-type="float">
            <text:p>0,00272951388888889000</text:p>
          </table:table-cell>
          <table:table-cell table:formula="of:=[.D3371]-[.D337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table:formula="of:=[.B3370]+7" office:value-type="float" office:value="23590" calcext:value-type="float">
            <text:p>23590</text:p>
          </table:table-cell>
          <table:table-cell office:value-type="float" office:value="8640000" calcext:value-type="float">
            <text:p>8640000</text:p>
          </table:table-cell>
          <table:table-cell table:formula="of:=[.B3371]/[.C3371]" office:value-type="float" office:value="0.00273032407407407" calcext:value-type="float">
            <text:p>0,00273032407407407000</text:p>
          </table:table-cell>
          <table:table-cell table:formula="of:=[.D3372]-[.D337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table:formula="of:=[.B3371]+7" office:value-type="float" office:value="23597" calcext:value-type="float">
            <text:p>23597</text:p>
          </table:table-cell>
          <table:table-cell office:value-type="float" office:value="8640000" calcext:value-type="float">
            <text:p>8640000</text:p>
          </table:table-cell>
          <table:table-cell table:formula="of:=[.B3372]/[.C3372]" office:value-type="float" office:value="0.00273113425925926" calcext:value-type="float">
            <text:p>0,00273113425925926000</text:p>
          </table:table-cell>
          <table:table-cell table:formula="of:=[.D3373]-[.D337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table:formula="of:=[.B3372]+7" office:value-type="float" office:value="23604" calcext:value-type="float">
            <text:p>23604</text:p>
          </table:table-cell>
          <table:table-cell office:value-type="float" office:value="8640000" calcext:value-type="float">
            <text:p>8640000</text:p>
          </table:table-cell>
          <table:table-cell table:formula="of:=[.B3373]/[.C3373]" office:value-type="float" office:value="0.00273194444444444" calcext:value-type="float">
            <text:p>0,00273194444444444000</text:p>
          </table:table-cell>
          <table:table-cell table:formula="of:=[.D3374]-[.D337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table:formula="of:=[.B3373]+7" office:value-type="float" office:value="23611" calcext:value-type="float">
            <text:p>23611</text:p>
          </table:table-cell>
          <table:table-cell office:value-type="float" office:value="8640000" calcext:value-type="float">
            <text:p>8640000</text:p>
          </table:table-cell>
          <table:table-cell table:formula="of:=[.B3374]/[.C3374]" office:value-type="float" office:value="0.00273275462962963" calcext:value-type="float">
            <text:p>0,00273275462962963000</text:p>
          </table:table-cell>
          <table:table-cell table:formula="of:=[.D3375]-[.D337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table:formula="of:=[.B3374]+7" office:value-type="float" office:value="23618" calcext:value-type="float">
            <text:p>23618</text:p>
          </table:table-cell>
          <table:table-cell office:value-type="float" office:value="8640000" calcext:value-type="float">
            <text:p>8640000</text:p>
          </table:table-cell>
          <table:table-cell table:formula="of:=[.B3375]/[.C3375]" office:value-type="float" office:value="0.00273356481481482" calcext:value-type="float">
            <text:p>0,00273356481481482000</text:p>
          </table:table-cell>
          <table:table-cell table:formula="of:=[.D3376]-[.D337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formula="of:=[.B3375]+7" office:value-type="float" office:value="23625" calcext:value-type="float">
            <text:p>23625</text:p>
          </table:table-cell>
          <table:table-cell office:value-type="float" office:value="8640000" calcext:value-type="float">
            <text:p>8640000</text:p>
          </table:table-cell>
          <table:table-cell table:formula="of:=[.B3376]/[.C3376]" office:value-type="float" office:value="0.002734375" calcext:value-type="float">
            <text:p>0,00273437500000000000</text:p>
          </table:table-cell>
          <table:table-cell table:formula="of:=[.D3377]-[.D337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table:formula="of:=[.B3376]+7" office:value-type="float" office:value="23632" calcext:value-type="float">
            <text:p>23632</text:p>
          </table:table-cell>
          <table:table-cell office:value-type="float" office:value="8640000" calcext:value-type="float">
            <text:p>8640000</text:p>
          </table:table-cell>
          <table:table-cell table:formula="of:=[.B3377]/[.C3377]" office:value-type="float" office:value="0.00273518518518519" calcext:value-type="float">
            <text:p>0,00273518518518519000</text:p>
          </table:table-cell>
          <table:table-cell table:formula="of:=[.D3378]-[.D337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table:formula="of:=[.B3377]+7" office:value-type="float" office:value="23639" calcext:value-type="float">
            <text:p>23639</text:p>
          </table:table-cell>
          <table:table-cell office:value-type="float" office:value="8640000" calcext:value-type="float">
            <text:p>8640000</text:p>
          </table:table-cell>
          <table:table-cell table:formula="of:=[.B3378]/[.C3378]" office:value-type="float" office:value="0.00273599537037037" calcext:value-type="float">
            <text:p>0,00273599537037037000</text:p>
          </table:table-cell>
          <table:table-cell table:formula="of:=[.D3379]-[.D337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table:formula="of:=[.B3378]+7" office:value-type="float" office:value="23646" calcext:value-type="float">
            <text:p>23646</text:p>
          </table:table-cell>
          <table:table-cell office:value-type="float" office:value="8640000" calcext:value-type="float">
            <text:p>8640000</text:p>
          </table:table-cell>
          <table:table-cell table:formula="of:=[.B3379]/[.C3379]" office:value-type="float" office:value="0.00273680555555556" calcext:value-type="float">
            <text:p>0,00273680555555556000</text:p>
          </table:table-cell>
          <table:table-cell table:formula="of:=[.D3380]-[.D337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table:formula="of:=[.B3379]+7" office:value-type="float" office:value="23653" calcext:value-type="float">
            <text:p>23653</text:p>
          </table:table-cell>
          <table:table-cell office:value-type="float" office:value="8640000" calcext:value-type="float">
            <text:p>8640000</text:p>
          </table:table-cell>
          <table:table-cell table:formula="of:=[.B3380]/[.C3380]" office:value-type="float" office:value="0.00273761574074074" calcext:value-type="float">
            <text:p>0,00273761574074074000</text:p>
          </table:table-cell>
          <table:table-cell table:formula="of:=[.D3381]-[.D338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table:formula="of:=[.B3380]+7" office:value-type="float" office:value="23660" calcext:value-type="float">
            <text:p>23660</text:p>
          </table:table-cell>
          <table:table-cell office:value-type="float" office:value="8640000" calcext:value-type="float">
            <text:p>8640000</text:p>
          </table:table-cell>
          <table:table-cell table:formula="of:=[.B3381]/[.C3381]" office:value-type="float" office:value="0.00273842592592593" calcext:value-type="float">
            <text:p>0,00273842592592593000</text:p>
          </table:table-cell>
          <table:table-cell table:formula="of:=[.D3382]-[.D338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table:formula="of:=[.B3381]+7" office:value-type="float" office:value="23667" calcext:value-type="float">
            <text:p>23667</text:p>
          </table:table-cell>
          <table:table-cell office:value-type="float" office:value="8640000" calcext:value-type="float">
            <text:p>8640000</text:p>
          </table:table-cell>
          <table:table-cell table:formula="of:=[.B3382]/[.C3382]" office:value-type="float" office:value="0.00273923611111111" calcext:value-type="float">
            <text:p>0,00273923611111111000</text:p>
          </table:table-cell>
          <table:table-cell table:formula="of:=[.D3383]-[.D338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table:formula="of:=[.B3382]+7" office:value-type="float" office:value="23674" calcext:value-type="float">
            <text:p>23674</text:p>
          </table:table-cell>
          <table:table-cell office:value-type="float" office:value="8640000" calcext:value-type="float">
            <text:p>8640000</text:p>
          </table:table-cell>
          <table:table-cell table:formula="of:=[.B3383]/[.C3383]" office:value-type="float" office:value="0.0027400462962963" calcext:value-type="float">
            <text:p>0,00274004629629630000</text:p>
          </table:table-cell>
          <table:table-cell table:formula="of:=[.D3384]-[.D338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table:formula="of:=[.B3383]+7" office:value-type="float" office:value="23681" calcext:value-type="float">
            <text:p>23681</text:p>
          </table:table-cell>
          <table:table-cell office:value-type="float" office:value="8640000" calcext:value-type="float">
            <text:p>8640000</text:p>
          </table:table-cell>
          <table:table-cell table:formula="of:=[.B3384]/[.C3384]" office:value-type="float" office:value="0.00274085648148148" calcext:value-type="float">
            <text:p>0,00274085648148148000</text:p>
          </table:table-cell>
          <table:table-cell table:formula="of:=[.D3385]-[.D338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table:formula="of:=[.B3384]+7" office:value-type="float" office:value="23688" calcext:value-type="float">
            <text:p>23688</text:p>
          </table:table-cell>
          <table:table-cell office:value-type="float" office:value="8640000" calcext:value-type="float">
            <text:p>8640000</text:p>
          </table:table-cell>
          <table:table-cell table:formula="of:=[.B3385]/[.C3385]" office:value-type="float" office:value="0.00274166666666667" calcext:value-type="float">
            <text:p>0,00274166666666667000</text:p>
          </table:table-cell>
          <table:table-cell table:formula="of:=[.D3386]-[.D338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table:formula="of:=[.B3385]+7" office:value-type="float" office:value="23695" calcext:value-type="float">
            <text:p>23695</text:p>
          </table:table-cell>
          <table:table-cell office:value-type="float" office:value="8640000" calcext:value-type="float">
            <text:p>8640000</text:p>
          </table:table-cell>
          <table:table-cell table:formula="of:=[.B3386]/[.C3386]" office:value-type="float" office:value="0.00274247685185185" calcext:value-type="float">
            <text:p>0,00274247685185185000</text:p>
          </table:table-cell>
          <table:table-cell table:formula="of:=[.D3387]-[.D338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table:formula="of:=[.B3386]+7" office:value-type="float" office:value="23702" calcext:value-type="float">
            <text:p>23702</text:p>
          </table:table-cell>
          <table:table-cell office:value-type="float" office:value="8640000" calcext:value-type="float">
            <text:p>8640000</text:p>
          </table:table-cell>
          <table:table-cell table:formula="of:=[.B3387]/[.C3387]" office:value-type="float" office:value="0.00274328703703704" calcext:value-type="float">
            <text:p>0,00274328703703704000</text:p>
          </table:table-cell>
          <table:table-cell table:formula="of:=[.D3388]-[.D338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table:formula="of:=[.B3387]+7" office:value-type="float" office:value="23709" calcext:value-type="float">
            <text:p>23709</text:p>
          </table:table-cell>
          <table:table-cell office:value-type="float" office:value="8640000" calcext:value-type="float">
            <text:p>8640000</text:p>
          </table:table-cell>
          <table:table-cell table:formula="of:=[.B3388]/[.C3388]" office:value-type="float" office:value="0.00274409722222222" calcext:value-type="float">
            <text:p>0,00274409722222222000</text:p>
          </table:table-cell>
          <table:table-cell table:formula="of:=[.D3389]-[.D3388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table:formula="of:=[.B3388]+7" office:value-type="float" office:value="23716" calcext:value-type="float">
            <text:p>23716</text:p>
          </table:table-cell>
          <table:table-cell office:value-type="float" office:value="8640000" calcext:value-type="float">
            <text:p>8640000</text:p>
          </table:table-cell>
          <table:table-cell table:formula="of:=[.B3389]/[.C3389]" office:value-type="float" office:value="0.00274490740740741" calcext:value-type="float">
            <text:p>0,00274490740740741000</text:p>
          </table:table-cell>
          <table:table-cell table:formula="of:=[.D3390]-[.D338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table:formula="of:=[.B3389]+7" office:value-type="float" office:value="23723" calcext:value-type="float">
            <text:p>23723</text:p>
          </table:table-cell>
          <table:table-cell office:value-type="float" office:value="8640000" calcext:value-type="float">
            <text:p>8640000</text:p>
          </table:table-cell>
          <table:table-cell table:formula="of:=[.B3390]/[.C3390]" office:value-type="float" office:value="0.00274571759259259" calcext:value-type="float">
            <text:p>0,00274571759259259000</text:p>
          </table:table-cell>
          <table:table-cell table:formula="of:=[.D3391]-[.D339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table:formula="of:=[.B3390]+7" office:value-type="float" office:value="23730" calcext:value-type="float">
            <text:p>23730</text:p>
          </table:table-cell>
          <table:table-cell office:value-type="float" office:value="8640000" calcext:value-type="float">
            <text:p>8640000</text:p>
          </table:table-cell>
          <table:table-cell table:formula="of:=[.B3391]/[.C3391]" office:value-type="float" office:value="0.00274652777777778" calcext:value-type="float">
            <text:p>0,00274652777777778000</text:p>
          </table:table-cell>
          <table:table-cell table:formula="of:=[.D3392]-[.D339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table:formula="of:=[.B3391]+7" office:value-type="float" office:value="23737" calcext:value-type="float">
            <text:p>23737</text:p>
          </table:table-cell>
          <table:table-cell office:value-type="float" office:value="8640000" calcext:value-type="float">
            <text:p>8640000</text:p>
          </table:table-cell>
          <table:table-cell table:formula="of:=[.B3392]/[.C3392]" office:value-type="float" office:value="0.00274733796296296" calcext:value-type="float">
            <text:p>0,00274733796296296000</text:p>
          </table:table-cell>
          <table:table-cell table:formula="of:=[.D3393]-[.D3392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table:formula="of:=[.B3392]+7" office:value-type="float" office:value="23744" calcext:value-type="float">
            <text:p>23744</text:p>
          </table:table-cell>
          <table:table-cell office:value-type="float" office:value="8640000" calcext:value-type="float">
            <text:p>8640000</text:p>
          </table:table-cell>
          <table:table-cell table:formula="of:=[.B3393]/[.C3393]" office:value-type="float" office:value="0.00274814814814815" calcext:value-type="float">
            <text:p>0,00274814814814815000</text:p>
          </table:table-cell>
          <table:table-cell table:formula="of:=[.D3394]-[.D339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table:formula="of:=[.B3393]+7" office:value-type="float" office:value="23751" calcext:value-type="float">
            <text:p>23751</text:p>
          </table:table-cell>
          <table:table-cell office:value-type="float" office:value="8640000" calcext:value-type="float">
            <text:p>8640000</text:p>
          </table:table-cell>
          <table:table-cell table:formula="of:=[.B3394]/[.C3394]" office:value-type="float" office:value="0.00274895833333333" calcext:value-type="float">
            <text:p>0,00274895833333333000</text:p>
          </table:table-cell>
          <table:table-cell table:formula="of:=[.D3395]-[.D339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formula="of:=[.B3394]+7" office:value-type="float" office:value="23758" calcext:value-type="float">
            <text:p>23758</text:p>
          </table:table-cell>
          <table:table-cell office:value-type="float" office:value="8640000" calcext:value-type="float">
            <text:p>8640000</text:p>
          </table:table-cell>
          <table:table-cell table:formula="of:=[.B3395]/[.C3395]" office:value-type="float" office:value="0.00274976851851852" calcext:value-type="float">
            <text:p>0,00274976851851852000</text:p>
          </table:table-cell>
          <table:table-cell table:formula="of:=[.D3396]-[.D339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[.B3395]+7" office:value-type="float" office:value="23765" calcext:value-type="float">
            <text:p>23765</text:p>
          </table:table-cell>
          <table:table-cell office:value-type="float" office:value="8640000" calcext:value-type="float">
            <text:p>8640000</text:p>
          </table:table-cell>
          <table:table-cell table:formula="of:=[.B3396]/[.C3396]" office:value-type="float" office:value="0.0027505787037037" calcext:value-type="float">
            <text:p>0,00275057870370370000</text:p>
          </table:table-cell>
          <table:table-cell table:formula="of:=[.D3397]-[.D3396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formula="of:=[.B3396]+7" office:value-type="float" office:value="23772" calcext:value-type="float">
            <text:p>23772</text:p>
          </table:table-cell>
          <table:table-cell office:value-type="float" office:value="8640000" calcext:value-type="float">
            <text:p>8640000</text:p>
          </table:table-cell>
          <table:table-cell table:formula="of:=[.B3397]/[.C3397]" office:value-type="float" office:value="0.00275138888888889" calcext:value-type="float">
            <text:p>0,00275138888888889000</text:p>
          </table:table-cell>
          <table:table-cell table:formula="of:=[.D3398]-[.D339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table:formula="of:=[.B3397]+7" office:value-type="float" office:value="23779" calcext:value-type="float">
            <text:p>23779</text:p>
          </table:table-cell>
          <table:table-cell office:value-type="float" office:value="8640000" calcext:value-type="float">
            <text:p>8640000</text:p>
          </table:table-cell>
          <table:table-cell table:formula="of:=[.B3398]/[.C3398]" office:value-type="float" office:value="0.00275219907407407" calcext:value-type="float">
            <text:p>0,00275219907407407000</text:p>
          </table:table-cell>
          <table:table-cell table:formula="of:=[.D3399]-[.D339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table:formula="of:=[.B3398]+7" office:value-type="float" office:value="23786" calcext:value-type="float">
            <text:p>23786</text:p>
          </table:table-cell>
          <table:table-cell office:value-type="float" office:value="8640000" calcext:value-type="float">
            <text:p>8640000</text:p>
          </table:table-cell>
          <table:table-cell table:formula="of:=[.B3399]/[.C3399]" office:value-type="float" office:value="0.00275300925925926" calcext:value-type="float">
            <text:p>0,00275300925925926000</text:p>
          </table:table-cell>
          <table:table-cell table:formula="of:=[.D3400]-[.D339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table:formula="of:=[.B3399]+7" office:value-type="float" office:value="23793" calcext:value-type="float">
            <text:p>23793</text:p>
          </table:table-cell>
          <table:table-cell office:value-type="float" office:value="8640000" calcext:value-type="float">
            <text:p>8640000</text:p>
          </table:table-cell>
          <table:table-cell table:formula="of:=[.B3400]/[.C3400]" office:value-type="float" office:value="0.00275381944444444" calcext:value-type="float">
            <text:p>0,00275381944444444000</text:p>
          </table:table-cell>
          <table:table-cell table:formula="of:=[.D3401]-[.D3400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[.B3400]+7" office:value-type="float" office:value="23800" calcext:value-type="float">
            <text:p>23800</text:p>
          </table:table-cell>
          <table:table-cell office:value-type="float" office:value="8640000" calcext:value-type="float">
            <text:p>8640000</text:p>
          </table:table-cell>
          <table:table-cell table:formula="of:=[.B3401]/[.C3401]" office:value-type="float" office:value="0.00275462962962963" calcext:value-type="float">
            <text:p>0,00275462962962963000</text:p>
          </table:table-cell>
          <table:table-cell table:formula="of:=[.D3402]-[.D340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table:formula="of:=[.B3401]+7" office:value-type="float" office:value="23807" calcext:value-type="float">
            <text:p>23807</text:p>
          </table:table-cell>
          <table:table-cell office:value-type="float" office:value="8640000" calcext:value-type="float">
            <text:p>8640000</text:p>
          </table:table-cell>
          <table:table-cell table:formula="of:=[.B3402]/[.C3402]" office:value-type="float" office:value="0.00275543981481481" calcext:value-type="float">
            <text:p>0,00275543981481481000</text:p>
          </table:table-cell>
          <table:table-cell table:formula="of:=[.D3403]-[.D340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table:formula="of:=[.B3402]+7" office:value-type="float" office:value="23814" calcext:value-type="float">
            <text:p>23814</text:p>
          </table:table-cell>
          <table:table-cell office:value-type="float" office:value="8640000" calcext:value-type="float">
            <text:p>8640000</text:p>
          </table:table-cell>
          <table:table-cell table:formula="of:=[.B3403]/[.C3403]" office:value-type="float" office:value="0.00275625" calcext:value-type="float">
            <text:p>0,00275625000000000000</text:p>
          </table:table-cell>
          <table:table-cell table:formula="of:=[.D3404]-[.D340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table:formula="of:=[.B3403]+7" office:value-type="float" office:value="23821" calcext:value-type="float">
            <text:p>23821</text:p>
          </table:table-cell>
          <table:table-cell office:value-type="float" office:value="8640000" calcext:value-type="float">
            <text:p>8640000</text:p>
          </table:table-cell>
          <table:table-cell table:formula="of:=[.B3404]/[.C3404]" office:value-type="float" office:value="0.00275706018518519" calcext:value-type="float">
            <text:p>0,00275706018518519000</text:p>
          </table:table-cell>
          <table:table-cell table:formula="of:=[.D3405]-[.D3404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[.B3404]+7" office:value-type="float" office:value="23828" calcext:value-type="float">
            <text:p>23828</text:p>
          </table:table-cell>
          <table:table-cell office:value-type="float" office:value="8640000" calcext:value-type="float">
            <text:p>8640000</text:p>
          </table:table-cell>
          <table:table-cell table:formula="of:=[.B3405]/[.C3405]" office:value-type="float" office:value="0.00275787037037037" calcext:value-type="float">
            <text:p>0,00275787037037037000</text:p>
          </table:table-cell>
          <table:table-cell table:formula="of:=[.D3406]-[.D340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table:formula="of:=[.B3405]+7" office:value-type="float" office:value="23835" calcext:value-type="float">
            <text:p>23835</text:p>
          </table:table-cell>
          <table:table-cell office:value-type="float" office:value="8640000" calcext:value-type="float">
            <text:p>8640000</text:p>
          </table:table-cell>
          <table:table-cell table:formula="of:=[.B3406]/[.C3406]" office:value-type="float" office:value="0.00275868055555556" calcext:value-type="float">
            <text:p>0,00275868055555556000</text:p>
          </table:table-cell>
          <table:table-cell table:formula="of:=[.D3407]-[.D340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table:formula="of:=[.B3406]+7" office:value-type="float" office:value="23842" calcext:value-type="float">
            <text:p>23842</text:p>
          </table:table-cell>
          <table:table-cell office:value-type="float" office:value="8640000" calcext:value-type="float">
            <text:p>8640000</text:p>
          </table:table-cell>
          <table:table-cell table:formula="of:=[.B3407]/[.C3407]" office:value-type="float" office:value="0.00275949074074074" calcext:value-type="float">
            <text:p>0,00275949074074074000</text:p>
          </table:table-cell>
          <table:table-cell table:formula="of:=[.D3408]-[.D340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table:formula="of:=[.B3407]+7" office:value-type="float" office:value="23849" calcext:value-type="float">
            <text:p>23849</text:p>
          </table:table-cell>
          <table:table-cell office:value-type="float" office:value="8640000" calcext:value-type="float">
            <text:p>8640000</text:p>
          </table:table-cell>
          <table:table-cell table:formula="of:=[.B3408]/[.C3408]" office:value-type="float" office:value="0.00276030092592593" calcext:value-type="float">
            <text:p>0,00276030092592593000</text:p>
          </table:table-cell>
          <table:table-cell table:formula="of:=[.D3409]-[.D340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table:formula="of:=[.B3408]+7" office:value-type="float" office:value="23856" calcext:value-type="float">
            <text:p>23856</text:p>
          </table:table-cell>
          <table:table-cell office:value-type="float" office:value="8640000" calcext:value-type="float">
            <text:p>8640000</text:p>
          </table:table-cell>
          <table:table-cell table:formula="of:=[.B3409]/[.C3409]" office:value-type="float" office:value="0.00276111111111111" calcext:value-type="float">
            <text:p>0,00276111111111111000</text:p>
          </table:table-cell>
          <table:table-cell table:formula="of:=[.D3410]-[.D3409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table:formula="of:=[.B3409]+7" office:value-type="float" office:value="23863" calcext:value-type="float">
            <text:p>23863</text:p>
          </table:table-cell>
          <table:table-cell office:value-type="float" office:value="8640000" calcext:value-type="float">
            <text:p>8640000</text:p>
          </table:table-cell>
          <table:table-cell table:formula="of:=[.B3410]/[.C3410]" office:value-type="float" office:value="0.0027619212962963" calcext:value-type="float">
            <text:p>0,00276192129629630000</text:p>
          </table:table-cell>
          <table:table-cell table:formula="of:=[.D3411]-[.D341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table:formula="of:=[.B3410]+7" office:value-type="float" office:value="23870" calcext:value-type="float">
            <text:p>23870</text:p>
          </table:table-cell>
          <table:table-cell office:value-type="float" office:value="8640000" calcext:value-type="float">
            <text:p>8640000</text:p>
          </table:table-cell>
          <table:table-cell table:formula="of:=[.B3411]/[.C3411]" office:value-type="float" office:value="0.00276273148148148" calcext:value-type="float">
            <text:p>0,00276273148148148000</text:p>
          </table:table-cell>
          <table:table-cell table:formula="of:=[.D3412]-[.D3411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table:formula="of:=[.B3411]+7" office:value-type="float" office:value="23877" calcext:value-type="float">
            <text:p>23877</text:p>
          </table:table-cell>
          <table:table-cell office:value-type="float" office:value="8640000" calcext:value-type="float">
            <text:p>8640000</text:p>
          </table:table-cell>
          <table:table-cell table:formula="of:=[.B3412]/[.C3412]" office:value-type="float" office:value="0.00276354166666667" calcext:value-type="float">
            <text:p>0,00276354166666667000</text:p>
          </table:table-cell>
          <table:table-cell table:formula="of:=[.D3413]-[.D341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table:formula="of:=[.B3412]+7" office:value-type="float" office:value="23884" calcext:value-type="float">
            <text:p>23884</text:p>
          </table:table-cell>
          <table:table-cell office:value-type="float" office:value="8640000" calcext:value-type="float">
            <text:p>8640000</text:p>
          </table:table-cell>
          <table:table-cell table:formula="of:=[.B3413]/[.C3413]" office:value-type="float" office:value="0.00276435185185185" calcext:value-type="float">
            <text:p>0,00276435185185185000</text:p>
          </table:table-cell>
          <table:table-cell table:formula="of:=[.D3414]-[.D3413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table:formula="of:=[.B3413]+7" office:value-type="float" office:value="23891" calcext:value-type="float">
            <text:p>23891</text:p>
          </table:table-cell>
          <table:table-cell office:value-type="float" office:value="8640000" calcext:value-type="float">
            <text:p>8640000</text:p>
          </table:table-cell>
          <table:table-cell table:formula="of:=[.B3414]/[.C3414]" office:value-type="float" office:value="0.00276516203703704" calcext:value-type="float">
            <text:p>0,00276516203703704000</text:p>
          </table:table-cell>
          <table:table-cell table:formula="of:=[.D3415]-[.D341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table:formula="of:=[.B3414]+7" office:value-type="float" office:value="23898" calcext:value-type="float">
            <text:p>23898</text:p>
          </table:table-cell>
          <table:table-cell office:value-type="float" office:value="8640000" calcext:value-type="float">
            <text:p>8640000</text:p>
          </table:table-cell>
          <table:table-cell table:formula="of:=[.B3415]/[.C3415]" office:value-type="float" office:value="0.00276597222222222" calcext:value-type="float">
            <text:p>0,00276597222222222000</text:p>
          </table:table-cell>
          <table:table-cell table:formula="of:=[.D3416]-[.D3415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table:formula="of:=[.B3415]+7" office:value-type="float" office:value="23905" calcext:value-type="float">
            <text:p>23905</text:p>
          </table:table-cell>
          <table:table-cell office:value-type="float" office:value="8640000" calcext:value-type="float">
            <text:p>8640000</text:p>
          </table:table-cell>
          <table:table-cell table:formula="of:=[.B3416]/[.C3416]" office:value-type="float" office:value="0.00276678240740741" calcext:value-type="float">
            <text:p>0,00276678240740741000</text:p>
          </table:table-cell>
          <table:table-cell table:formula="of:=[.D3417]-[.D341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table:formula="of:=[.B3416]+7" office:value-type="float" office:value="23912" calcext:value-type="float">
            <text:p>23912</text:p>
          </table:table-cell>
          <table:table-cell office:value-type="float" office:value="8640000" calcext:value-type="float">
            <text:p>8640000</text:p>
          </table:table-cell>
          <table:table-cell table:formula="of:=[.B3417]/[.C3417]" office:value-type="float" office:value="0.00276759259259259" calcext:value-type="float">
            <text:p>0,00276759259259259000</text:p>
          </table:table-cell>
          <table:table-cell table:formula="of:=[.D3418]-[.D3417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table:formula="of:=[.B3417]+7" office:value-type="float" office:value="23919" calcext:value-type="float">
            <text:p>23919</text:p>
          </table:table-cell>
          <table:table-cell office:value-type="float" office:value="8640000" calcext:value-type="float">
            <text:p>8640000</text:p>
          </table:table-cell>
          <table:table-cell table:formula="of:=[.B3418]/[.C3418]" office:value-type="float" office:value="0.00276840277777778" calcext:value-type="float">
            <text:p>0,00276840277777778000</text:p>
          </table:table-cell>
          <table:table-cell table:formula="of:=[.D3419]-[.D341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table:formula="of:=[.B3418]+7" office:value-type="float" office:value="23926" calcext:value-type="float">
            <text:p>23926</text:p>
          </table:table-cell>
          <table:table-cell office:value-type="float" office:value="8640000" calcext:value-type="float">
            <text:p>8640000</text:p>
          </table:table-cell>
          <table:table-cell table:formula="of:=[.B3419]/[.C3419]" office:value-type="float" office:value="0.00276921296296296" calcext:value-type="float">
            <text:p>0,00276921296296296000</text:p>
          </table:table-cell>
          <table:table-cell table:formula="of:=[.D3420]-[.D3419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table:formula="of:=[.B3419]+7" office:value-type="float" office:value="23933" calcext:value-type="float">
            <text:p>23933</text:p>
          </table:table-cell>
          <table:table-cell office:value-type="float" office:value="8640000" calcext:value-type="float">
            <text:p>8640000</text:p>
          </table:table-cell>
          <table:table-cell table:formula="of:=[.B3420]/[.C3420]" office:value-type="float" office:value="0.00277002314814815" calcext:value-type="float">
            <text:p>0,00277002314814815000</text:p>
          </table:table-cell>
          <table:table-cell table:formula="of:=[.D3421]-[.D3420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table:formula="of:=[.B3420]+7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3421]/[.C3421]" office:value-type="float" office:value="0.00277083333333333" calcext:value-type="float">
            <text:p>0,00277083333333333000</text:p>
          </table:table-cell>
          <table:table-cell table:formula="of:=[.D3422]-[.D3421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table:formula="of:=[.B3421]+7" office:value-type="float" office:value="23947" calcext:value-type="float">
            <text:p>23947</text:p>
          </table:table-cell>
          <table:table-cell office:value-type="float" office:value="8640000" calcext:value-type="float">
            <text:p>8640000</text:p>
          </table:table-cell>
          <table:table-cell table:formula="of:=[.B3422]/[.C3422]" office:value-type="float" office:value="0.00277164351851852" calcext:value-type="float">
            <text:p>0,00277164351851852000</text:p>
          </table:table-cell>
          <table:table-cell table:formula="of:=[.D3423]-[.D3422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table:formula="of:=[.B3422]+7" office:value-type="float" office:value="23954" calcext:value-type="float">
            <text:p>23954</text:p>
          </table:table-cell>
          <table:table-cell office:value-type="float" office:value="8640000" calcext:value-type="float">
            <text:p>8640000</text:p>
          </table:table-cell>
          <table:table-cell table:formula="of:=[.B3423]/[.C3423]" office:value-type="float" office:value="0.0027724537037037" calcext:value-type="float">
            <text:p>0,00277245370370370000</text:p>
          </table:table-cell>
          <table:table-cell table:formula="of:=[.D3424]-[.D3423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table:formula="of:=[.B3423]+7" office:value-type="float" office:value="23961" calcext:value-type="float">
            <text:p>23961</text:p>
          </table:table-cell>
          <table:table-cell office:value-type="float" office:value="8640000" calcext:value-type="float">
            <text:p>8640000</text:p>
          </table:table-cell>
          <table:table-cell table:formula="of:=[.B3424]/[.C3424]" office:value-type="float" office:value="0.00277326388888889" calcext:value-type="float">
            <text:p>0,00277326388888889000</text:p>
          </table:table-cell>
          <table:table-cell table:formula="of:=[.D3425]-[.D3424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table:formula="of:=[.B3424]+7" office:value-type="float" office:value="23968" calcext:value-type="float">
            <text:p>23968</text:p>
          </table:table-cell>
          <table:table-cell office:value-type="float" office:value="8640000" calcext:value-type="float">
            <text:p>8640000</text:p>
          </table:table-cell>
          <table:table-cell table:formula="of:=[.B3425]/[.C3425]" office:value-type="float" office:value="0.00277407407407407" calcext:value-type="float">
            <text:p>0,00277407407407407000</text:p>
          </table:table-cell>
          <table:table-cell table:formula="of:=[.D3426]-[.D3425]" office:value-type="float" office:value="0.000000810185185184855" calcext:value-type="float">
            <text:p>0,00000081018518518486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formula="of:=[.B3425]+7" office:value-type="float" office:value="23975" calcext:value-type="float">
            <text:p>23975</text:p>
          </table:table-cell>
          <table:table-cell office:value-type="float" office:value="8640000" calcext:value-type="float">
            <text:p>8640000</text:p>
          </table:table-cell>
          <table:table-cell table:formula="of:=[.B3426]/[.C3426]" office:value-type="float" office:value="0.00277488425925926" calcext:value-type="float">
            <text:p>0,00277488425925926000</text:p>
          </table:table-cell>
          <table:table-cell table:formula="of:=[.D3427]-[.D3426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table:formula="of:=[.B3426]+7" office:value-type="float" office:value="23982" calcext:value-type="float">
            <text:p>23982</text:p>
          </table:table-cell>
          <table:table-cell office:value-type="float" office:value="8640000" calcext:value-type="float">
            <text:p>8640000</text:p>
          </table:table-cell>
          <table:table-cell table:formula="of:=[.B3427]/[.C3427]" office:value-type="float" office:value="0.00277569444444444" calcext:value-type="float">
            <text:p>0,00277569444444444000</text:p>
          </table:table-cell>
          <table:table-cell table:formula="of:=[.D3428]-[.D3427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table:formula="of:=[.B3427]+7" office:value-type="float" office:value="23989" calcext:value-type="float">
            <text:p>23989</text:p>
          </table:table-cell>
          <table:table-cell office:value-type="float" office:value="8640000" calcext:value-type="float">
            <text:p>8640000</text:p>
          </table:table-cell>
          <table:table-cell table:formula="of:=[.B3428]/[.C3428]" office:value-type="float" office:value="0.00277650462962963" calcext:value-type="float">
            <text:p>0,00277650462962963000</text:p>
          </table:table-cell>
          <table:table-cell table:formula="of:=[.D3429]-[.D3428]" office:value-type="float" office:value="0.000000810185185185289" calcext:value-type="float">
            <text:p>0,00000081018518518529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table:formula="of:=[.B3428]+7" office:value-type="float" office:value="23996" calcext:value-type="float">
            <text:p>23996</text:p>
          </table:table-cell>
          <table:table-cell office:value-type="float" office:value="8640000" calcext:value-type="float">
            <text:p>8640000</text:p>
          </table:table-cell>
          <table:table-cell table:formula="of:=[.B3429]/[.C3429]" office:value-type="float" office:value="0.00277731481481482" calcext:value-type="float">
            <text:p>0,00277731481481482000</text:p>
          </table:table-cell>
          <table:table-cell table:formula="of:=#REF!-[.D3429]" office:value-type="string" office:string-value="" calcext:value-type="error">
            <text:p>#REF!</text:p>
          </table:table-cell>
        </table:table-row>
        <table:table-row table:style-name="ro1" table:number-rows-repeated="104514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31:15.318542901</meta:creation-date>
    <dc:date>2026-05-17T15:31:31.753167104</dc:date>
    <meta:editing-duration>PT18S</meta:editing-duration>
    <meta:editing-cycles>1</meta:editing-cycles>
    <meta:document-statistic meta:table-count="1" meta:cell-count="17145" meta:object-count="0"/>
    <meta:generator>LibreOffice/24.2.7.2$Linux_X86_64 LibreOffice_project/420$Build-2</meta:generator>
  </office:meta>
</office:document-meta>
</file>