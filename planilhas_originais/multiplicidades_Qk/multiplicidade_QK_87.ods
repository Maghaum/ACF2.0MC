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100694444444444" calcext:value-type="float">
            <text:p>0,00001006944444444450</text:p>
          </table:table-cell>
          <table:table-cell table:formula="of:=[.D3]-[.D2]" office:value-type="float" office:value="0.0000100694444444444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7" office:value-type="float" office:value="174" calcext:value-type="float">
            <text:p>17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201388888888889" calcext:value-type="float">
            <text:p>0,00002013888888888890</text:p>
          </table:table-cell>
          <table:table-cell table:formula="of:=[.D4]-[.D3]" office:value-type="float" office:value="0.0000100694444444444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7" office:value-type="float" office:value="261" calcext:value-type="float">
            <text:p>26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302083333333333" calcext:value-type="float">
            <text:p>0,00003020833333333330</text:p>
          </table:table-cell>
          <table:table-cell table:formula="of:=[.D5]-[.D4]" office:value-type="float" office:value="0.0000100694444444444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7" office:value-type="float" office:value="348" calcext:value-type="float">
            <text:p>34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402777777777778" calcext:value-type="float">
            <text:p>0,00004027777777777780</text:p>
          </table:table-cell>
          <table:table-cell table:formula="of:=[.D6]-[.D5]" office:value-type="float" office:value="0.0000100694444444444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7" office:value-type="float" office:value="435" calcext:value-type="float">
            <text:p>43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503472222222222" calcext:value-type="float">
            <text:p>0,00005034722222222220</text:p>
          </table:table-cell>
          <table:table-cell table:formula="of:=[.D7]-[.D6]" office:value-type="float" office:value="0.0000100694444444444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7" office:value-type="float" office:value="522" calcext:value-type="float">
            <text:p>52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604166666666667" calcext:value-type="float">
            <text:p>0,00006041666666666670</text:p>
          </table:table-cell>
          <table:table-cell table:formula="of:=[.D8]-[.D7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7" office:value-type="float" office:value="609" calcext:value-type="float">
            <text:p>60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704861111111111" calcext:value-type="float">
            <text:p>0,00007048611111111110</text:p>
          </table:table-cell>
          <table:table-cell table:formula="of:=[.D9]-[.D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7" office:value-type="float" office:value="696" calcext:value-type="float">
            <text:p>69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805555555555556" calcext:value-type="float">
            <text:p>0,00008055555555555560</text:p>
          </table:table-cell>
          <table:table-cell table:formula="of:=[.D10]-[.D9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7" office:value-type="float" office:value="783" calcext:value-type="float">
            <text:p>78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90625" calcext:value-type="float">
            <text:p>0,00009062500000000000</text:p>
          </table:table-cell>
          <table:table-cell table:formula="of:=[.D11]-[.D1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7" office:value-type="float" office:value="870" calcext:value-type="float">
            <text:p>8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100694444444444" calcext:value-type="float">
            <text:p>0,00010069444444444400</text:p>
          </table:table-cell>
          <table:table-cell table:formula="of:=[.D12]-[.D11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7" office:value-type="float" office:value="957" calcext:value-type="float">
            <text:p>95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10763888888889" calcext:value-type="float">
            <text:p>0,00011076388888888900</text:p>
          </table:table-cell>
          <table:table-cell table:formula="of:=[.D13]-[.D1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7" office:value-type="float" office:value="1044" calcext:value-type="float">
            <text:p>104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20833333333333" calcext:value-type="float">
            <text:p>0,00012083333333333300</text:p>
          </table:table-cell>
          <table:table-cell table:formula="of:=[.D14]-[.D13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7" office:value-type="float" office:value="1131" calcext:value-type="float">
            <text:p>113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30902777777778" calcext:value-type="float">
            <text:p>0,00013090277777777800</text:p>
          </table:table-cell>
          <table:table-cell table:formula="of:=[.D15]-[.D14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7" office:value-type="float" office:value="1218" calcext:value-type="float">
            <text:p>121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40972222222222" calcext:value-type="float">
            <text:p>0,00014097222222222200</text:p>
          </table:table-cell>
          <table:table-cell table:formula="of:=[.D16]-[.D1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7" office:value-type="float" office:value="1305" calcext:value-type="float">
            <text:p>130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51041666666667" calcext:value-type="float">
            <text:p>0,00015104166666666700</text:p>
          </table:table-cell>
          <table:table-cell table:formula="of:=[.D17]-[.D16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7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61111111111111" calcext:value-type="float">
            <text:p>0,00016111111111111100</text:p>
          </table:table-cell>
          <table:table-cell table:formula="of:=[.D18]-[.D17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7" office:value-type="float" office:value="1479" calcext:value-type="float">
            <text:p>147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71180555555556" calcext:value-type="float">
            <text:p>0,00017118055555555600</text:p>
          </table:table-cell>
          <table:table-cell table:formula="of:=[.D19]-[.D18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7" office:value-type="float" office:value="1566" calcext:value-type="float">
            <text:p>156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8125" calcext:value-type="float">
            <text:p>0,00018125000000000000</text:p>
          </table:table-cell>
          <table:table-cell table:formula="of:=[.D20]-[.D1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7" office:value-type="float" office:value="1653" calcext:value-type="float">
            <text:p>165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91319444444444" calcext:value-type="float">
            <text:p>0,00019131944444444400</text:p>
          </table:table-cell>
          <table:table-cell table:formula="of:=[.D21]-[.D20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7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201388888888889" calcext:value-type="float">
            <text:p>0,00020138888888888900</text:p>
          </table:table-cell>
          <table:table-cell table:formula="of:=[.D22]-[.D21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7" office:value-type="float" office:value="1827" calcext:value-type="float">
            <text:p>182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11458333333333" calcext:value-type="float">
            <text:p>0,00021145833333333300</text:p>
          </table:table-cell>
          <table:table-cell table:formula="of:=[.D23]-[.D22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7" office:value-type="float" office:value="1914" calcext:value-type="float">
            <text:p>191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21527777777778" calcext:value-type="float">
            <text:p>0,00022152777777777800</text:p>
          </table:table-cell>
          <table:table-cell table:formula="of:=[.D24]-[.D2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7" office:value-type="float" office:value="2001" calcext:value-type="float">
            <text:p>200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31597222222222" calcext:value-type="float">
            <text:p>0,00023159722222222200</text:p>
          </table:table-cell>
          <table:table-cell table:formula="of:=[.D25]-[.D24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7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41666666666667" calcext:value-type="float">
            <text:p>0,00024166666666666700</text:p>
          </table:table-cell>
          <table:table-cell table:formula="of:=[.D26]-[.D25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7" office:value-type="float" office:value="2175" calcext:value-type="float">
            <text:p>21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51736111111111" calcext:value-type="float">
            <text:p>0,00025173611111111100</text:p>
          </table:table-cell>
          <table:table-cell table:formula="of:=[.D27]-[.D26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7" office:value-type="float" office:value="2262" calcext:value-type="float">
            <text:p>226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61805555555556" calcext:value-type="float">
            <text:p>0,00026180555555555600</text:p>
          </table:table-cell>
          <table:table-cell table:formula="of:=[.D28]-[.D27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7" office:value-type="float" office:value="2349" calcext:value-type="float">
            <text:p>234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71875" calcext:value-type="float">
            <text:p>0,00027187500000000000</text:p>
          </table:table-cell>
          <table:table-cell table:formula="of:=[.D29]-[.D28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7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81944444444444" calcext:value-type="float">
            <text:p>0,00028194444444444400</text:p>
          </table:table-cell>
          <table:table-cell table:formula="of:=[.D30]-[.D2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7" office:value-type="float" office:value="2523" calcext:value-type="float">
            <text:p>252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92013888888889" calcext:value-type="float">
            <text:p>0,00029201388888888900</text:p>
          </table:table-cell>
          <table:table-cell table:formula="of:=[.D31]-[.D30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7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302083333333333" calcext:value-type="float">
            <text:p>0,00030208333333333300</text:p>
          </table:table-cell>
          <table:table-cell table:formula="of:=[.D32]-[.D31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7" office:value-type="float" office:value="2697" calcext:value-type="float">
            <text:p>269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12152777777778" calcext:value-type="float">
            <text:p>0,00031215277777777800</text:p>
          </table:table-cell>
          <table:table-cell table:formula="of:=[.D33]-[.D32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7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22222222222222" calcext:value-type="float">
            <text:p>0,00032222222222222200</text:p>
          </table:table-cell>
          <table:table-cell table:formula="of:=[.D34]-[.D33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7" office:value-type="float" office:value="2871" calcext:value-type="float">
            <text:p>287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32291666666667" calcext:value-type="float">
            <text:p>0,00033229166666666700</text:p>
          </table:table-cell>
          <table:table-cell table:formula="of:=[.D35]-[.D34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7" office:value-type="float" office:value="2958" calcext:value-type="float">
            <text:p>295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42361111111111" calcext:value-type="float">
            <text:p>0,00034236111111111100</text:p>
          </table:table-cell>
          <table:table-cell table:formula="of:=[.D36]-[.D35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7" office:value-type="float" office:value="3045" calcext:value-type="float">
            <text:p>304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52430555555556" calcext:value-type="float">
            <text:p>0,00035243055555555600</text:p>
          </table:table-cell>
          <table:table-cell table:formula="of:=[.D37]-[.D36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7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625" calcext:value-type="float">
            <text:p>0,00036250000000000000</text:p>
          </table:table-cell>
          <table:table-cell table:formula="of:=[.D38]-[.D3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7" office:value-type="float" office:value="3219" calcext:value-type="float">
            <text:p>321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72569444444444" calcext:value-type="float">
            <text:p>0,00037256944444444400</text:p>
          </table:table-cell>
          <table:table-cell table:formula="of:=[.D39]-[.D38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7" office:value-type="float" office:value="3306" calcext:value-type="float">
            <text:p>330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82638888888889" calcext:value-type="float">
            <text:p>0,00038263888888888900</text:p>
          </table:table-cell>
          <table:table-cell table:formula="of:=[.D40]-[.D39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7" office:value-type="float" office:value="3393" calcext:value-type="float">
            <text:p>339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92708333333333" calcext:value-type="float">
            <text:p>0,00039270833333333300</text:p>
          </table:table-cell>
          <table:table-cell table:formula="of:=[.D41]-[.D40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7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402777777777778" calcext:value-type="float">
            <text:p>0,00040277777777777800</text:p>
          </table:table-cell>
          <table:table-cell table:formula="of:=[.D42]-[.D41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7" office:value-type="float" office:value="3567" calcext:value-type="float">
            <text:p>356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12847222222222" calcext:value-type="float">
            <text:p>0,00041284722222222200</text:p>
          </table:table-cell>
          <table:table-cell table:formula="of:=[.D43]-[.D42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7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22916666666667" calcext:value-type="float">
            <text:p>0,00042291666666666700</text:p>
          </table:table-cell>
          <table:table-cell table:formula="of:=[.D44]-[.D43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7" office:value-type="float" office:value="3741" calcext:value-type="float">
            <text:p>374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32986111111111" calcext:value-type="float">
            <text:p>0,00043298611111111100</text:p>
          </table:table-cell>
          <table:table-cell table:formula="of:=[.D45]-[.D44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7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43055555555556" calcext:value-type="float">
            <text:p>0,00044305555555555600</text:p>
          </table:table-cell>
          <table:table-cell table:formula="of:=[.D46]-[.D4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7" office:value-type="float" office:value="3915" calcext:value-type="float">
            <text:p>391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53125" calcext:value-type="float">
            <text:p>0,00045312500000000000</text:p>
          </table:table-cell>
          <table:table-cell table:formula="of:=[.D47]-[.D46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7" office:value-type="float" office:value="4002" calcext:value-type="float">
            <text:p>400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63194444444444" calcext:value-type="float">
            <text:p>0,00046319444444444400</text:p>
          </table:table-cell>
          <table:table-cell table:formula="of:=[.D48]-[.D47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7" office:value-type="float" office:value="4089" calcext:value-type="float">
            <text:p>408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73263888888889" calcext:value-type="float">
            <text:p>0,00047326388888888900</text:p>
          </table:table-cell>
          <table:table-cell table:formula="of:=[.D49]-[.D48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7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83333333333333" calcext:value-type="float">
            <text:p>0,00048333333333333300</text:p>
          </table:table-cell>
          <table:table-cell table:formula="of:=[.D50]-[.D4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7" office:value-type="float" office:value="4263" calcext:value-type="float">
            <text:p>426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93402777777778" calcext:value-type="float">
            <text:p>0,00049340277777777800</text:p>
          </table:table-cell>
          <table:table-cell table:formula="of:=[.D51]-[.D50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7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503472222222222" calcext:value-type="float">
            <text:p>0,00050347222222222200</text:p>
          </table:table-cell>
          <table:table-cell table:formula="of:=[.D52]-[.D5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7" office:value-type="float" office:value="4437" calcext:value-type="float">
            <text:p>443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13541666666667" calcext:value-type="float">
            <text:p>0,00051354166666666700</text:p>
          </table:table-cell>
          <table:table-cell table:formula="of:=[.D53]-[.D52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7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23611111111111" calcext:value-type="float">
            <text:p>0,00052361111111111100</text:p>
          </table:table-cell>
          <table:table-cell table:formula="of:=[.D54]-[.D5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7" office:value-type="float" office:value="4611" calcext:value-type="float">
            <text:p>461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33680555555556" calcext:value-type="float">
            <text:p>0,00053368055555555600</text:p>
          </table:table-cell>
          <table:table-cell table:formula="of:=[.D55]-[.D54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7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4375" calcext:value-type="float">
            <text:p>0,00054375000000000000</text:p>
          </table:table-cell>
          <table:table-cell table:formula="of:=[.D56]-[.D5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7" office:value-type="float" office:value="4785" calcext:value-type="float">
            <text:p>478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53819444444445" calcext:value-type="float">
            <text:p>0,00055381944444444500</text:p>
          </table:table-cell>
          <table:table-cell table:formula="of:=[.D57]-[.D56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7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63888888888889" calcext:value-type="float">
            <text:p>0,00056388888888888900</text:p>
          </table:table-cell>
          <table:table-cell table:formula="of:=[.D58]-[.D5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7" office:value-type="float" office:value="4959" calcext:value-type="float">
            <text:p>495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73958333333333" calcext:value-type="float">
            <text:p>0,00057395833333333300</text:p>
          </table:table-cell>
          <table:table-cell table:formula="of:=[.D59]-[.D5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7" office:value-type="float" office:value="5046" calcext:value-type="float">
            <text:p>504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84027777777778" calcext:value-type="float">
            <text:p>0,00058402777777777800</text:p>
          </table:table-cell>
          <table:table-cell table:formula="of:=[.D60]-[.D59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7" office:value-type="float" office:value="5133" calcext:value-type="float">
            <text:p>513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94097222222222" calcext:value-type="float">
            <text:p>0,00059409722222222200</text:p>
          </table:table-cell>
          <table:table-cell table:formula="of:=[.D61]-[.D6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7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604166666666667" calcext:value-type="float">
            <text:p>0,00060416666666666700</text:p>
          </table:table-cell>
          <table:table-cell table:formula="of:=[.D62]-[.D61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7" office:value-type="float" office:value="5307" calcext:value-type="float">
            <text:p>530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14236111111111" calcext:value-type="float">
            <text:p>0,00061423611111111100</text:p>
          </table:table-cell>
          <table:table-cell table:formula="of:=[.D63]-[.D6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7" office:value-type="float" office:value="5394" calcext:value-type="float">
            <text:p>539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24305555555556" calcext:value-type="float">
            <text:p>0,00062430555555555600</text:p>
          </table:table-cell>
          <table:table-cell table:formula="of:=[.D64]-[.D63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7" office:value-type="float" office:value="5481" calcext:value-type="float">
            <text:p>548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34375" calcext:value-type="float">
            <text:p>0,00063437500000000000</text:p>
          </table:table-cell>
          <table:table-cell table:formula="of:=[.D65]-[.D6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7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44444444444444" calcext:value-type="float">
            <text:p>0,00064444444444444400</text:p>
          </table:table-cell>
          <table:table-cell table:formula="of:=[.D66]-[.D6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7" office:value-type="float" office:value="5655" calcext:value-type="float">
            <text:p>565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54513888888889" calcext:value-type="float">
            <text:p>0,00065451388888888900</text:p>
          </table:table-cell>
          <table:table-cell table:formula="of:=[.D67]-[.D66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7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64583333333333" calcext:value-type="float">
            <text:p>0,00066458333333333300</text:p>
          </table:table-cell>
          <table:table-cell table:formula="of:=[.D68]-[.D6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7" office:value-type="float" office:value="5829" calcext:value-type="float">
            <text:p>582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74652777777778" calcext:value-type="float">
            <text:p>0,00067465277777777800</text:p>
          </table:table-cell>
          <table:table-cell table:formula="of:=[.D69]-[.D68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7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84722222222222" calcext:value-type="float">
            <text:p>0,00068472222222222200</text:p>
          </table:table-cell>
          <table:table-cell table:formula="of:=[.D70]-[.D6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7" office:value-type="float" office:value="6003" calcext:value-type="float">
            <text:p>600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94791666666667" calcext:value-type="float">
            <text:p>0,00069479166666666700</text:p>
          </table:table-cell>
          <table:table-cell table:formula="of:=[.D71]-[.D70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7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704861111111111" calcext:value-type="float">
            <text:p>0,00070486111111111100</text:p>
          </table:table-cell>
          <table:table-cell table:formula="of:=[.D72]-[.D7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7" office:value-type="float" office:value="6177" calcext:value-type="float">
            <text:p>617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14930555555556" calcext:value-type="float">
            <text:p>0,00071493055555555600</text:p>
          </table:table-cell>
          <table:table-cell table:formula="of:=[.D73]-[.D72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7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25" calcext:value-type="float">
            <text:p>0,00072500000000000000</text:p>
          </table:table-cell>
          <table:table-cell table:formula="of:=[.D74]-[.D7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7" office:value-type="float" office:value="6351" calcext:value-type="float">
            <text:p>635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35069444444444" calcext:value-type="float">
            <text:p>0,00073506944444444400</text:p>
          </table:table-cell>
          <table:table-cell table:formula="of:=[.D75]-[.D7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7" office:value-type="float" office:value="6438" calcext:value-type="float">
            <text:p>643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45138888888889" calcext:value-type="float">
            <text:p>0,00074513888888888900</text:p>
          </table:table-cell>
          <table:table-cell table:formula="of:=[.D76]-[.D75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7" office:value-type="float" office:value="6525" calcext:value-type="float">
            <text:p>65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55208333333333" calcext:value-type="float">
            <text:p>0,00075520833333333300</text:p>
          </table:table-cell>
          <table:table-cell table:formula="of:=[.D77]-[.D7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7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65277777777778" calcext:value-type="float">
            <text:p>0,00076527777777777800</text:p>
          </table:table-cell>
          <table:table-cell table:formula="of:=[.D78]-[.D77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7" office:value-type="float" office:value="6699" calcext:value-type="float">
            <text:p>669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75347222222222" calcext:value-type="float">
            <text:p>0,00077534722222222200</text:p>
          </table:table-cell>
          <table:table-cell table:formula="of:=[.D79]-[.D7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7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85416666666667" calcext:value-type="float">
            <text:p>0,00078541666666666700</text:p>
          </table:table-cell>
          <table:table-cell table:formula="of:=[.D80]-[.D79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7" office:value-type="float" office:value="6873" calcext:value-type="float">
            <text:p>687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95486111111111" calcext:value-type="float">
            <text:p>0,00079548611111111100</text:p>
          </table:table-cell>
          <table:table-cell table:formula="of:=[.D81]-[.D8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7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805555555555556" calcext:value-type="float">
            <text:p>0,00080555555555555600</text:p>
          </table:table-cell>
          <table:table-cell table:formula="of:=[.D82]-[.D8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7" office:value-type="float" office:value="7047" calcext:value-type="float">
            <text:p>704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15625" calcext:value-type="float">
            <text:p>0,00081562500000000000</text:p>
          </table:table-cell>
          <table:table-cell table:formula="of:=[.D83]-[.D82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7" office:value-type="float" office:value="7134" calcext:value-type="float">
            <text:p>713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25694444444444" calcext:value-type="float">
            <text:p>0,00082569444444444400</text:p>
          </table:table-cell>
          <table:table-cell table:formula="of:=[.D84]-[.D8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7" office:value-type="float" office:value="7221" calcext:value-type="float">
            <text:p>722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35763888888889" calcext:value-type="float">
            <text:p>0,00083576388888888900</text:p>
          </table:table-cell>
          <table:table-cell table:formula="of:=[.D85]-[.D84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7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45833333333333" calcext:value-type="float">
            <text:p>0,00084583333333333300</text:p>
          </table:table-cell>
          <table:table-cell table:formula="of:=[.D86]-[.D8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7" office:value-type="float" office:value="7395" calcext:value-type="float">
            <text:p>739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55902777777778" calcext:value-type="float">
            <text:p>0,00085590277777777800</text:p>
          </table:table-cell>
          <table:table-cell table:formula="of:=[.D87]-[.D86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7" office:value-type="float" office:value="7482" calcext:value-type="float">
            <text:p>748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65972222222222" calcext:value-type="float">
            <text:p>0,00086597222222222200</text:p>
          </table:table-cell>
          <table:table-cell table:formula="of:=[.D88]-[.D8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7" office:value-type="float" office:value="7569" calcext:value-type="float">
            <text:p>756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76041666666667" calcext:value-type="float">
            <text:p>0,00087604166666666700</text:p>
          </table:table-cell>
          <table:table-cell table:formula="of:=[.D89]-[.D88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7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86111111111111" calcext:value-type="float">
            <text:p>0,00088611111111111100</text:p>
          </table:table-cell>
          <table:table-cell table:formula="of:=[.D90]-[.D8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7" office:value-type="float" office:value="7743" calcext:value-type="float">
            <text:p>774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96180555555556" calcext:value-type="float">
            <text:p>0,00089618055555555600</text:p>
          </table:table-cell>
          <table:table-cell table:formula="of:=[.D91]-[.D9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7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90625" calcext:value-type="float">
            <text:p>0,00090625000000000000</text:p>
          </table:table-cell>
          <table:table-cell table:formula="of:=[.D92]-[.D91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7" office:value-type="float" office:value="7917" calcext:value-type="float">
            <text:p>791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16319444444444" calcext:value-type="float">
            <text:p>0,00091631944444444400</text:p>
          </table:table-cell>
          <table:table-cell table:formula="of:=[.D93]-[.D9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7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26388888888889" calcext:value-type="float">
            <text:p>0,00092638888888888900</text:p>
          </table:table-cell>
          <table:table-cell table:formula="of:=[.D94]-[.D93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7" office:value-type="float" office:value="8091" calcext:value-type="float">
            <text:p>809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36458333333333" calcext:value-type="float">
            <text:p>0,00093645833333333300</text:p>
          </table:table-cell>
          <table:table-cell table:formula="of:=[.D95]-[.D9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7" office:value-type="float" office:value="8178" calcext:value-type="float">
            <text:p>817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46527777777778" calcext:value-type="float">
            <text:p>0,00094652777777777800</text:p>
          </table:table-cell>
          <table:table-cell table:formula="of:=[.D96]-[.D95]" office:value-type="float" office:value="0.0000100694444444444" calcext:value-type="float">
            <text:p>0,0000100694444444444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7" office:value-type="float" office:value="8265" calcext:value-type="float">
            <text:p>826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56597222222222" calcext:value-type="float">
            <text:p>0,00095659722222222200</text:p>
          </table:table-cell>
          <table:table-cell table:formula="of:=[.D97]-[.D9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7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66666666666667" calcext:value-type="float">
            <text:p>0,00096666666666666700</text:p>
          </table:table-cell>
          <table:table-cell table:formula="of:=[.D98]-[.D9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7" office:value-type="float" office:value="8439" calcext:value-type="float">
            <text:p>843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76736111111111" calcext:value-type="float">
            <text:p>0,00097673611111111100</text:p>
          </table:table-cell>
          <table:table-cell table:formula="of:=[.D99]-[.D9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7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86805555555556" calcext:value-type="float">
            <text:p>0,00098680555555555600</text:p>
          </table:table-cell>
          <table:table-cell table:formula="of:=[.D100]-[.D99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7" office:value-type="float" office:value="8613" calcext:value-type="float">
            <text:p>861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96875" calcext:value-type="float">
            <text:p>0,00099687500000000000</text:p>
          </table:table-cell>
          <table:table-cell table:formula="of:=[.D101]-[.D10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7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100694444444444" calcext:value-type="float">
            <text:p>0,00100694444444444000</text:p>
          </table:table-cell>
          <table:table-cell table:formula="of:=[.D102]-[.D10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7" office:value-type="float" office:value="8787" calcext:value-type="float">
            <text:p>878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1701388888889" calcext:value-type="float">
            <text:p>0,00101701388888889000</text:p>
          </table:table-cell>
          <table:table-cell table:formula="of:=[.D103]-[.D10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7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2708333333333" calcext:value-type="float">
            <text:p>0,00102708333333333000</text:p>
          </table:table-cell>
          <table:table-cell table:formula="of:=[.D104]-[.D103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7" office:value-type="float" office:value="8961" calcext:value-type="float">
            <text:p>896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3715277777778" calcext:value-type="float">
            <text:p>0,00103715277777778000</text:p>
          </table:table-cell>
          <table:table-cell table:formula="of:=[.D105]-[.D10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7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4722222222222" calcext:value-type="float">
            <text:p>0,00104722222222222000</text:p>
          </table:table-cell>
          <table:table-cell table:formula="of:=[.D106]-[.D10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7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5729166666667" calcext:value-type="float">
            <text:p>0,00105729166666667000</text:p>
          </table:table-cell>
          <table:table-cell table:formula="of:=[.D107]-[.D10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7" office:value-type="float" office:value="9222" calcext:value-type="float">
            <text:p>922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6736111111111" calcext:value-type="float">
            <text:p>0,00106736111111111000</text:p>
          </table:table-cell>
          <table:table-cell table:formula="of:=[.D108]-[.D10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7" office:value-type="float" office:value="9309" calcext:value-type="float">
            <text:p>930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7743055555556" calcext:value-type="float">
            <text:p>0,00107743055555556000</text:p>
          </table:table-cell>
          <table:table-cell table:formula="of:=[.D109]-[.D108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7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0875" calcext:value-type="float">
            <text:p>0,00108750000000000000</text:p>
          </table:table-cell>
          <table:table-cell table:formula="of:=[.D110]-[.D10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7" office:value-type="float" office:value="9483" calcext:value-type="float">
            <text:p>948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9756944444444" calcext:value-type="float">
            <text:p>0,00109756944444444000</text:p>
          </table:table-cell>
          <table:table-cell table:formula="of:=[.D111]-[.D11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7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10763888888889" calcext:value-type="float">
            <text:p>0,00110763888888889000</text:p>
          </table:table-cell>
          <table:table-cell table:formula="of:=[.D112]-[.D11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7" office:value-type="float" office:value="9657" calcext:value-type="float">
            <text:p>965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1770833333333" calcext:value-type="float">
            <text:p>0,00111770833333333000</text:p>
          </table:table-cell>
          <table:table-cell table:formula="of:=[.D113]-[.D112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7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2777777777778" calcext:value-type="float">
            <text:p>0,00112777777777778000</text:p>
          </table:table-cell>
          <table:table-cell table:formula="of:=[.D114]-[.D11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7" office:value-type="float" office:value="9831" calcext:value-type="float">
            <text:p>983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13784722222222" calcext:value-type="float">
            <text:p>0,00113784722222222000</text:p>
          </table:table-cell>
          <table:table-cell table:formula="of:=[.D115]-[.D11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7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14791666666667" calcext:value-type="float">
            <text:p>0,00114791666666667000</text:p>
          </table:table-cell>
          <table:table-cell table:formula="of:=[.D116]-[.D11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7" office:value-type="float" office:value="10005" calcext:value-type="float">
            <text:p>1000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5798611111111" calcext:value-type="float">
            <text:p>0,00115798611111111000</text:p>
          </table:table-cell>
          <table:table-cell table:formula="of:=[.D117]-[.D11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7" office:value-type="float" office:value="10092" calcext:value-type="float">
            <text:p>1009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6805555555556" calcext:value-type="float">
            <text:p>0,00116805555555556000</text:p>
          </table:table-cell>
          <table:table-cell table:formula="of:=[.D118]-[.D117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7" office:value-type="float" office:value="10179" calcext:value-type="float">
            <text:p>1017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178125" calcext:value-type="float">
            <text:p>0,00117812500000000000</text:p>
          </table:table-cell>
          <table:table-cell table:formula="of:=[.D119]-[.D11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7" office:value-type="float" office:value="10266" calcext:value-type="float">
            <text:p>1026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18819444444444" calcext:value-type="float">
            <text:p>0,00118819444444444000</text:p>
          </table:table-cell>
          <table:table-cell table:formula="of:=[.D120]-[.D11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7" office:value-type="float" office:value="10353" calcext:value-type="float">
            <text:p>1035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9826388888889" calcext:value-type="float">
            <text:p>0,00119826388888889000</text:p>
          </table:table-cell>
          <table:table-cell table:formula="of:=[.D121]-[.D12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7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20833333333333" calcext:value-type="float">
            <text:p>0,00120833333333333000</text:p>
          </table:table-cell>
          <table:table-cell table:formula="of:=[.D122]-[.D121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7" office:value-type="float" office:value="10527" calcext:value-type="float">
            <text:p>1052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21840277777778" calcext:value-type="float">
            <text:p>0,00121840277777778000</text:p>
          </table:table-cell>
          <table:table-cell table:formula="of:=[.D123]-[.D12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7" office:value-type="float" office:value="10614" calcext:value-type="float">
            <text:p>1061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2847222222222" calcext:value-type="float">
            <text:p>0,00122847222222222000</text:p>
          </table:table-cell>
          <table:table-cell table:formula="of:=[.D124]-[.D12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7" office:value-type="float" office:value="10701" calcext:value-type="float">
            <text:p>1070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23854166666667" calcext:value-type="float">
            <text:p>0,00123854166666667000</text:p>
          </table:table-cell>
          <table:table-cell table:formula="of:=[.D125]-[.D12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7" office:value-type="float" office:value="10788" calcext:value-type="float">
            <text:p>1078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24861111111111" calcext:value-type="float">
            <text:p>0,00124861111111111000</text:p>
          </table:table-cell>
          <table:table-cell table:formula="of:=[.D126]-[.D12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7" office:value-type="float" office:value="10875" calcext:value-type="float">
            <text:p>10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25868055555556" calcext:value-type="float">
            <text:p>0,00125868055555556000</text:p>
          </table:table-cell>
          <table:table-cell table:formula="of:=[.D127]-[.D126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7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26875" calcext:value-type="float">
            <text:p>0,00126875000000000000</text:p>
          </table:table-cell>
          <table:table-cell table:formula="of:=[.D128]-[.D12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7" office:value-type="float" office:value="11049" calcext:value-type="float">
            <text:p>1104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27881944444444" calcext:value-type="float">
            <text:p>0,00127881944444444000</text:p>
          </table:table-cell>
          <table:table-cell table:formula="of:=[.D129]-[.D12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7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28888888888889" calcext:value-type="float">
            <text:p>0,00128888888888889000</text:p>
          </table:table-cell>
          <table:table-cell table:formula="of:=[.D130]-[.D12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7" office:value-type="float" office:value="11223" calcext:value-type="float">
            <text:p>1122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29895833333333" calcext:value-type="float">
            <text:p>0,00129895833333333000</text:p>
          </table:table-cell>
          <table:table-cell table:formula="of:=[.D131]-[.D13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7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30902777777778" calcext:value-type="float">
            <text:p>0,00130902777777778000</text:p>
          </table:table-cell>
          <table:table-cell table:formula="of:=[.D132]-[.D131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7" office:value-type="float" office:value="11397" calcext:value-type="float">
            <text:p>1139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31909722222222" calcext:value-type="float">
            <text:p>0,00131909722222222000</text:p>
          </table:table-cell>
          <table:table-cell table:formula="of:=[.D133]-[.D13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7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32916666666667" calcext:value-type="float">
            <text:p>0,00132916666666667000</text:p>
          </table:table-cell>
          <table:table-cell table:formula="of:=[.D134]-[.D13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7" office:value-type="float" office:value="11571" calcext:value-type="float">
            <text:p>1157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33923611111111" calcext:value-type="float">
            <text:p>0,00133923611111111000</text:p>
          </table:table-cell>
          <table:table-cell table:formula="of:=[.D135]-[.D13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7" office:value-type="float" office:value="11658" calcext:value-type="float">
            <text:p>1165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34930555555556" calcext:value-type="float">
            <text:p>0,00134930555555556000</text:p>
          </table:table-cell>
          <table:table-cell table:formula="of:=[.D136]-[.D135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7" office:value-type="float" office:value="11745" calcext:value-type="float">
            <text:p>1174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359375" calcext:value-type="float">
            <text:p>0,00135937500000000000</text:p>
          </table:table-cell>
          <table:table-cell table:formula="of:=[.D137]-[.D13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7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36944444444444" calcext:value-type="float">
            <text:p>0,00136944444444444000</text:p>
          </table:table-cell>
          <table:table-cell table:formula="of:=[.D138]-[.D13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7" office:value-type="float" office:value="11919" calcext:value-type="float">
            <text:p>1191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37951388888889" calcext:value-type="float">
            <text:p>0,00137951388888889000</text:p>
          </table:table-cell>
          <table:table-cell table:formula="of:=[.D139]-[.D13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7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38958333333333" calcext:value-type="float">
            <text:p>0,00138958333333333000</text:p>
          </table:table-cell>
          <table:table-cell table:formula="of:=[.D140]-[.D13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7" office:value-type="float" office:value="12093" calcext:value-type="float">
            <text:p>1209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39965277777778" calcext:value-type="float">
            <text:p>0,00139965277777778000</text:p>
          </table:table-cell>
          <table:table-cell table:formula="of:=[.D141]-[.D140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7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40972222222222" calcext:value-type="float">
            <text:p>0,00140972222222222000</text:p>
          </table:table-cell>
          <table:table-cell table:formula="of:=[.D142]-[.D14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7" office:value-type="float" office:value="12267" calcext:value-type="float">
            <text:p>1226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41979166666667" calcext:value-type="float">
            <text:p>0,00141979166666667000</text:p>
          </table:table-cell>
          <table:table-cell table:formula="of:=[.D143]-[.D14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7" office:value-type="float" office:value="12354" calcext:value-type="float">
            <text:p>1235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42986111111111" calcext:value-type="float">
            <text:p>0,00142986111111111000</text:p>
          </table:table-cell>
          <table:table-cell table:formula="of:=[.D144]-[.D14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7" office:value-type="float" office:value="12441" calcext:value-type="float">
            <text:p>1244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43993055555556" calcext:value-type="float">
            <text:p>0,00143993055555556000</text:p>
          </table:table-cell>
          <table:table-cell table:formula="of:=[.D145]-[.D144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7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45" calcext:value-type="float">
            <text:p>0,00145000000000000000</text:p>
          </table:table-cell>
          <table:table-cell table:formula="of:=[.D146]-[.D14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7" office:value-type="float" office:value="12615" calcext:value-type="float">
            <text:p>1261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46006944444444" calcext:value-type="float">
            <text:p>0,00146006944444444000</text:p>
          </table:table-cell>
          <table:table-cell table:formula="of:=[.D147]-[.D14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7" office:value-type="float" office:value="12702" calcext:value-type="float">
            <text:p>1270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47013888888889" calcext:value-type="float">
            <text:p>0,00147013888888889000</text:p>
          </table:table-cell>
          <table:table-cell table:formula="of:=[.D148]-[.D14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7" office:value-type="float" office:value="12789" calcext:value-type="float">
            <text:p>1278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48020833333333" calcext:value-type="float">
            <text:p>0,00148020833333333000</text:p>
          </table:table-cell>
          <table:table-cell table:formula="of:=[.D149]-[.D14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7" office:value-type="float" office:value="12876" calcext:value-type="float">
            <text:p>1287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49027777777778" calcext:value-type="float">
            <text:p>0,00149027777777778000</text:p>
          </table:table-cell>
          <table:table-cell table:formula="of:=[.D150]-[.D149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7" office:value-type="float" office:value="12963" calcext:value-type="float">
            <text:p>1296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50034722222222" calcext:value-type="float">
            <text:p>0,00150034722222222000</text:p>
          </table:table-cell>
          <table:table-cell table:formula="of:=[.D151]-[.D15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7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51041666666667" calcext:value-type="float">
            <text:p>0,00151041666666667000</text:p>
          </table:table-cell>
          <table:table-cell table:formula="of:=[.D152]-[.D15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7" office:value-type="float" office:value="13137" calcext:value-type="float">
            <text:p>1313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52048611111111" calcext:value-type="float">
            <text:p>0,00152048611111111000</text:p>
          </table:table-cell>
          <table:table-cell table:formula="of:=[.D153]-[.D15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7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53055555555556" calcext:value-type="float">
            <text:p>0,00153055555555556000</text:p>
          </table:table-cell>
          <table:table-cell table:formula="of:=[.D154]-[.D153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7" office:value-type="float" office:value="13311" calcext:value-type="float">
            <text:p>1331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540625" calcext:value-type="float">
            <text:p>0,00154062500000000000</text:p>
          </table:table-cell>
          <table:table-cell table:formula="of:=[.D155]-[.D15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7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55069444444444" calcext:value-type="float">
            <text:p>0,00155069444444444000</text:p>
          </table:table-cell>
          <table:table-cell table:formula="of:=[.D156]-[.D15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7" office:value-type="float" office:value="13485" calcext:value-type="float">
            <text:p>1348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56076388888889" calcext:value-type="float">
            <text:p>0,00156076388888889000</text:p>
          </table:table-cell>
          <table:table-cell table:formula="of:=[.D157]-[.D15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7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57083333333333" calcext:value-type="float">
            <text:p>0,00157083333333333000</text:p>
          </table:table-cell>
          <table:table-cell table:formula="of:=[.D158]-[.D15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7" office:value-type="float" office:value="13659" calcext:value-type="float">
            <text:p>1365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58090277777778" calcext:value-type="float">
            <text:p>0,00158090277777778000</text:p>
          </table:table-cell>
          <table:table-cell table:formula="of:=[.D159]-[.D158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7" office:value-type="float" office:value="13746" calcext:value-type="float">
            <text:p>1374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59097222222222" calcext:value-type="float">
            <text:p>0,00159097222222222000</text:p>
          </table:table-cell>
          <table:table-cell table:formula="of:=[.D160]-[.D15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7" office:value-type="float" office:value="13833" calcext:value-type="float">
            <text:p>1383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60104166666667" calcext:value-type="float">
            <text:p>0,00160104166666667000</text:p>
          </table:table-cell>
          <table:table-cell table:formula="of:=[.D161]-[.D16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7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61111111111111" calcext:value-type="float">
            <text:p>0,00161111111111111000</text:p>
          </table:table-cell>
          <table:table-cell table:formula="of:=[.D162]-[.D16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7" office:value-type="float" office:value="14007" calcext:value-type="float">
            <text:p>1400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62118055555556" calcext:value-type="float">
            <text:p>0,00162118055555556000</text:p>
          </table:table-cell>
          <table:table-cell table:formula="of:=[.D163]-[.D16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7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63125" calcext:value-type="float">
            <text:p>0,00163125000000000000</text:p>
          </table:table-cell>
          <table:table-cell table:formula="of:=[.D164]-[.D163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7" office:value-type="float" office:value="14181" calcext:value-type="float">
            <text:p>1418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64131944444444" calcext:value-type="float">
            <text:p>0,00164131944444444000</text:p>
          </table:table-cell>
          <table:table-cell table:formula="of:=[.D165]-[.D16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7" office:value-type="float" office:value="14268" calcext:value-type="float">
            <text:p>1426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65138888888889" calcext:value-type="float">
            <text:p>0,00165138888888889000</text:p>
          </table:table-cell>
          <table:table-cell table:formula="of:=[.D166]-[.D16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7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66145833333333" calcext:value-type="float">
            <text:p>0,00166145833333333000</text:p>
          </table:table-cell>
          <table:table-cell table:formula="of:=[.D167]-[.D16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7" office:value-type="float" office:value="14442" calcext:value-type="float">
            <text:p>1444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67152777777778" calcext:value-type="float">
            <text:p>0,00167152777777778000</text:p>
          </table:table-cell>
          <table:table-cell table:formula="of:=[.D168]-[.D167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7" office:value-type="float" office:value="14529" calcext:value-type="float">
            <text:p>1452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68159722222222" calcext:value-type="float">
            <text:p>0,00168159722222222000</text:p>
          </table:table-cell>
          <table:table-cell table:formula="of:=[.D169]-[.D16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7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69166666666667" calcext:value-type="float">
            <text:p>0,00169166666666667000</text:p>
          </table:table-cell>
          <table:table-cell table:formula="of:=[.D170]-[.D16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7" office:value-type="float" office:value="14703" calcext:value-type="float">
            <text:p>1470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70173611111111" calcext:value-type="float">
            <text:p>0,00170173611111111000</text:p>
          </table:table-cell>
          <table:table-cell table:formula="of:=[.D171]-[.D17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7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71180555555556" calcext:value-type="float">
            <text:p>0,00171180555555556000</text:p>
          </table:table-cell>
          <table:table-cell table:formula="of:=[.D172]-[.D17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7" office:value-type="float" office:value="14877" calcext:value-type="float">
            <text:p>1487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721875" calcext:value-type="float">
            <text:p>0,00172187500000000000</text:p>
          </table:table-cell>
          <table:table-cell table:formula="of:=[.D173]-[.D172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7" office:value-type="float" office:value="14964" calcext:value-type="float">
            <text:p>1496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73194444444444" calcext:value-type="float">
            <text:p>0,00173194444444444000</text:p>
          </table:table-cell>
          <table:table-cell table:formula="of:=[.D174]-[.D17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7" office:value-type="float" office:value="15051" calcext:value-type="float">
            <text:p>1505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74201388888889" calcext:value-type="float">
            <text:p>0,00174201388888889000</text:p>
          </table:table-cell>
          <table:table-cell table:formula="of:=[.D175]-[.D17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7" office:value-type="float" office:value="15138" calcext:value-type="float">
            <text:p>1513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75208333333333" calcext:value-type="float">
            <text:p>0,00175208333333333000</text:p>
          </table:table-cell>
          <table:table-cell table:formula="of:=[.D176]-[.D17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7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76215277777778" calcext:value-type="float">
            <text:p>0,00176215277777778000</text:p>
          </table:table-cell>
          <table:table-cell table:formula="of:=[.D177]-[.D176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7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77222222222222" calcext:value-type="float">
            <text:p>0,00177222222222222000</text:p>
          </table:table-cell>
          <table:table-cell table:formula="of:=[.D178]-[.D17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7" office:value-type="float" office:value="15399" calcext:value-type="float">
            <text:p>1539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78229166666667" calcext:value-type="float">
            <text:p>0,00178229166666667000</text:p>
          </table:table-cell>
          <table:table-cell table:formula="of:=[.D179]-[.D17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7" office:value-type="float" office:value="15486" calcext:value-type="float">
            <text:p>1548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79236111111111" calcext:value-type="float">
            <text:p>0,00179236111111111000</text:p>
          </table:table-cell>
          <table:table-cell table:formula="of:=[.D180]-[.D17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7" office:value-type="float" office:value="15573" calcext:value-type="float">
            <text:p>1557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80243055555556" calcext:value-type="float">
            <text:p>0,00180243055555556000</text:p>
          </table:table-cell>
          <table:table-cell table:formula="of:=[.D181]-[.D18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7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8125" calcext:value-type="float">
            <text:p>0,00181250000000000000</text:p>
          </table:table-cell>
          <table:table-cell table:formula="of:=[.D182]-[.D181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7" office:value-type="float" office:value="15747" calcext:value-type="float">
            <text:p>1574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82256944444444" calcext:value-type="float">
            <text:p>0,00182256944444444000</text:p>
          </table:table-cell>
          <table:table-cell table:formula="of:=[.D183]-[.D18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7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83263888888889" calcext:value-type="float">
            <text:p>0,00183263888888889000</text:p>
          </table:table-cell>
          <table:table-cell table:formula="of:=[.D184]-[.D18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7" office:value-type="float" office:value="15921" calcext:value-type="float">
            <text:p>1592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84270833333333" calcext:value-type="float">
            <text:p>0,00184270833333333000</text:p>
          </table:table-cell>
          <table:table-cell table:formula="of:=[.D185]-[.D18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7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85277777777778" calcext:value-type="float">
            <text:p>0,00185277777777778000</text:p>
          </table:table-cell>
          <table:table-cell table:formula="of:=[.D186]-[.D185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7" office:value-type="float" office:value="16095" calcext:value-type="float">
            <text:p>1609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86284722222222" calcext:value-type="float">
            <text:p>0,00186284722222222000</text:p>
          </table:table-cell>
          <table:table-cell table:formula="of:=[.D187]-[.D18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7" office:value-type="float" office:value="16182" calcext:value-type="float">
            <text:p>1618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87291666666667" calcext:value-type="float">
            <text:p>0,00187291666666667000</text:p>
          </table:table-cell>
          <table:table-cell table:formula="of:=[.D188]-[.D18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7" office:value-type="float" office:value="16269" calcext:value-type="float">
            <text:p>1626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88298611111111" calcext:value-type="float">
            <text:p>0,00188298611111111000</text:p>
          </table:table-cell>
          <table:table-cell table:formula="of:=[.D189]-[.D18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7" office:value-type="float" office:value="16356" calcext:value-type="float">
            <text:p>1635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89305555555556" calcext:value-type="float">
            <text:p>0,00189305555555556000</text:p>
          </table:table-cell>
          <table:table-cell table:formula="of:=[.D190]-[.D18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7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903125" calcext:value-type="float">
            <text:p>0,00190312500000000000</text:p>
          </table:table-cell>
          <table:table-cell table:formula="of:=[.D191]-[.D190]" office:value-type="float" office:value="0.0000100694444444443" calcext:value-type="float">
            <text:p>0,0000100694444444443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7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91319444444444" calcext:value-type="float">
            <text:p>0,00191319444444444000</text:p>
          </table:table-cell>
          <table:table-cell table:formula="of:=[.D192]-[.D19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7" office:value-type="float" office:value="16617" calcext:value-type="float">
            <text:p>1661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92326388888889" calcext:value-type="float">
            <text:p>0,00192326388888889000</text:p>
          </table:table-cell>
          <table:table-cell table:formula="of:=[.D193]-[.D19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7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93333333333333" calcext:value-type="float">
            <text:p>0,00193333333333333000</text:p>
          </table:table-cell>
          <table:table-cell table:formula="of:=[.D194]-[.D19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7" office:value-type="float" office:value="16791" calcext:value-type="float">
            <text:p>1679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94340277777778" calcext:value-type="float">
            <text:p>0,00194340277777778000</text:p>
          </table:table-cell>
          <table:table-cell table:formula="of:=[.D195]-[.D19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7" office:value-type="float" office:value="16878" calcext:value-type="float">
            <text:p>1687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95347222222222" calcext:value-type="float">
            <text:p>0,00195347222222222000</text:p>
          </table:table-cell>
          <table:table-cell table:formula="of:=[.D196]-[.D19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7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96354166666667" calcext:value-type="float">
            <text:p>0,00196354166666667000</text:p>
          </table:table-cell>
          <table:table-cell table:formula="of:=[.D197]-[.D19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7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97361111111111" calcext:value-type="float">
            <text:p>0,00197361111111111000</text:p>
          </table:table-cell>
          <table:table-cell table:formula="of:=[.D198]-[.D197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7" office:value-type="float" office:value="17139" calcext:value-type="float">
            <text:p>1713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98368055555556" calcext:value-type="float">
            <text:p>0,00198368055555556000</text:p>
          </table:table-cell>
          <table:table-cell table:formula="of:=[.D199]-[.D19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7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99375" calcext:value-type="float">
            <text:p>0,00199375000000000000</text:p>
          </table:table-cell>
          <table:table-cell table:formula="of:=[.D200]-[.D19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7" office:value-type="float" office:value="17313" calcext:value-type="float">
            <text:p>1731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200381944444444" calcext:value-type="float">
            <text:p>0,00200381944444444000</text:p>
          </table:table-cell>
          <table:table-cell table:formula="of:=[.D201]-[.D20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7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201388888888889" calcext:value-type="float">
            <text:p>0,00201388888888889000</text:p>
          </table:table-cell>
          <table:table-cell table:formula="of:=[.D202]-[.D20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7" office:value-type="float" office:value="17487" calcext:value-type="float">
            <text:p>1748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02395833333333" calcext:value-type="float">
            <text:p>0,00202395833333333000</text:p>
          </table:table-cell>
          <table:table-cell table:formula="of:=[.D203]-[.D20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7" office:value-type="float" office:value="17574" calcext:value-type="float">
            <text:p>1757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03402777777778" calcext:value-type="float">
            <text:p>0,00203402777777778000</text:p>
          </table:table-cell>
          <table:table-cell table:formula="of:=[.D204]-[.D20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7" office:value-type="float" office:value="17661" calcext:value-type="float">
            <text:p>1766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04409722222222" calcext:value-type="float">
            <text:p>0,00204409722222222000</text:p>
          </table:table-cell>
          <table:table-cell table:formula="of:=[.D205]-[.D20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7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05416666666667" calcext:value-type="float">
            <text:p>0,00205416666666667000</text:p>
          </table:table-cell>
          <table:table-cell table:formula="of:=[.D206]-[.D20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7" office:value-type="float" office:value="17835" calcext:value-type="float">
            <text:p>1783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06423611111111" calcext:value-type="float">
            <text:p>0,00206423611111111000</text:p>
          </table:table-cell>
          <table:table-cell table:formula="of:=[.D207]-[.D206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7" office:value-type="float" office:value="17922" calcext:value-type="float">
            <text:p>1792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07430555555556" calcext:value-type="float">
            <text:p>0,00207430555555556000</text:p>
          </table:table-cell>
          <table:table-cell table:formula="of:=[.D208]-[.D20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7" office:value-type="float" office:value="18009" calcext:value-type="float">
            <text:p>1800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084375" calcext:value-type="float">
            <text:p>0,00208437500000000000</text:p>
          </table:table-cell>
          <table:table-cell table:formula="of:=[.D209]-[.D20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7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09444444444444" calcext:value-type="float">
            <text:p>0,00209444444444444000</text:p>
          </table:table-cell>
          <table:table-cell table:formula="of:=[.D210]-[.D20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7" office:value-type="float" office:value="18183" calcext:value-type="float">
            <text:p>1818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10451388888889" calcext:value-type="float">
            <text:p>0,00210451388888889000</text:p>
          </table:table-cell>
          <table:table-cell table:formula="of:=[.D211]-[.D21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7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11458333333333" calcext:value-type="float">
            <text:p>0,00211458333333333000</text:p>
          </table:table-cell>
          <table:table-cell table:formula="of:=[.D212]-[.D21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7" office:value-type="float" office:value="18357" calcext:value-type="float">
            <text:p>1835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12465277777778" calcext:value-type="float">
            <text:p>0,00212465277777778000</text:p>
          </table:table-cell>
          <table:table-cell table:formula="of:=[.D213]-[.D21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7" office:value-type="float" office:value="18444" calcext:value-type="float">
            <text:p>1844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13472222222222" calcext:value-type="float">
            <text:p>0,00213472222222222000</text:p>
          </table:table-cell>
          <table:table-cell table:formula="of:=[.D214]-[.D21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7" office:value-type="float" office:value="18531" calcext:value-type="float">
            <text:p>1853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14479166666667" calcext:value-type="float">
            <text:p>0,00214479166666667000</text:p>
          </table:table-cell>
          <table:table-cell table:formula="of:=[.D215]-[.D21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7" office:value-type="float" office:value="18618" calcext:value-type="float">
            <text:p>1861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15486111111111" calcext:value-type="float">
            <text:p>0,00215486111111111000</text:p>
          </table:table-cell>
          <table:table-cell table:formula="of:=[.D216]-[.D215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7" office:value-type="float" office:value="18705" calcext:value-type="float">
            <text:p>1870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16493055555556" calcext:value-type="float">
            <text:p>0,00216493055555556000</text:p>
          </table:table-cell>
          <table:table-cell table:formula="of:=[.D217]-[.D21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7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175" calcext:value-type="float">
            <text:p>0,00217500000000000000</text:p>
          </table:table-cell>
          <table:table-cell table:formula="of:=[.D218]-[.D21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7" office:value-type="float" office:value="18879" calcext:value-type="float">
            <text:p>1887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18506944444444" calcext:value-type="float">
            <text:p>0,00218506944444444000</text:p>
          </table:table-cell>
          <table:table-cell table:formula="of:=[.D219]-[.D21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7" office:value-type="float" office:value="18966" calcext:value-type="float">
            <text:p>1896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19513888888889" calcext:value-type="float">
            <text:p>0,00219513888888889000</text:p>
          </table:table-cell>
          <table:table-cell table:formula="of:=[.D220]-[.D21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7" office:value-type="float" office:value="19053" calcext:value-type="float">
            <text:p>1905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20520833333333" calcext:value-type="float">
            <text:p>0,00220520833333333000</text:p>
          </table:table-cell>
          <table:table-cell table:formula="of:=[.D221]-[.D22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7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21527777777778" calcext:value-type="float">
            <text:p>0,00221527777777778000</text:p>
          </table:table-cell>
          <table:table-cell table:formula="of:=[.D222]-[.D22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7" office:value-type="float" office:value="19227" calcext:value-type="float">
            <text:p>1922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22534722222222" calcext:value-type="float">
            <text:p>0,00222534722222222000</text:p>
          </table:table-cell>
          <table:table-cell table:formula="of:=[.D223]-[.D22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7" office:value-type="float" office:value="19314" calcext:value-type="float">
            <text:p>1931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23541666666667" calcext:value-type="float">
            <text:p>0,00223541666666667000</text:p>
          </table:table-cell>
          <table:table-cell table:formula="of:=[.D224]-[.D22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7" office:value-type="float" office:value="19401" calcext:value-type="float">
            <text:p>1940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24548611111111" calcext:value-type="float">
            <text:p>0,00224548611111111000</text:p>
          </table:table-cell>
          <table:table-cell table:formula="of:=[.D225]-[.D224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7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25555555555556" calcext:value-type="float">
            <text:p>0,00225555555555556000</text:p>
          </table:table-cell>
          <table:table-cell table:formula="of:=[.D226]-[.D22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7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265625" calcext:value-type="float">
            <text:p>0,00226562500000000000</text:p>
          </table:table-cell>
          <table:table-cell table:formula="of:=[.D227]-[.D22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7" office:value-type="float" office:value="19662" calcext:value-type="float">
            <text:p>1966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27569444444444" calcext:value-type="float">
            <text:p>0,00227569444444444000</text:p>
          </table:table-cell>
          <table:table-cell table:formula="of:=[.D228]-[.D22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7" office:value-type="float" office:value="19749" calcext:value-type="float">
            <text:p>1974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28576388888889" calcext:value-type="float">
            <text:p>0,00228576388888889000</text:p>
          </table:table-cell>
          <table:table-cell table:formula="of:=[.D229]-[.D22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7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29583333333333" calcext:value-type="float">
            <text:p>0,00229583333333333000</text:p>
          </table:table-cell>
          <table:table-cell table:formula="of:=[.D230]-[.D22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7" office:value-type="float" office:value="19923" calcext:value-type="float">
            <text:p>1992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30590277777778" calcext:value-type="float">
            <text:p>0,00230590277777778000</text:p>
          </table:table-cell>
          <table:table-cell table:formula="of:=[.D231]-[.D23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7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31597222222222" calcext:value-type="float">
            <text:p>0,00231597222222222000</text:p>
          </table:table-cell>
          <table:table-cell table:formula="of:=[.D232]-[.D23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7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32604166666667" calcext:value-type="float">
            <text:p>0,00232604166666667000</text:p>
          </table:table-cell>
          <table:table-cell table:formula="of:=[.D233]-[.D23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7" office:value-type="float" office:value="20184" calcext:value-type="float">
            <text:p>2018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33611111111111" calcext:value-type="float">
            <text:p>0,00233611111111111000</text:p>
          </table:table-cell>
          <table:table-cell table:formula="of:=[.D234]-[.D233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7" office:value-type="float" office:value="20271" calcext:value-type="float">
            <text:p>2027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34618055555556" calcext:value-type="float">
            <text:p>0,00234618055555556000</text:p>
          </table:table-cell>
          <table:table-cell table:formula="of:=[.D235]-[.D23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7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35625" calcext:value-type="float">
            <text:p>0,00235625000000000000</text:p>
          </table:table-cell>
          <table:table-cell table:formula="of:=[.D236]-[.D23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7" office:value-type="float" office:value="20445" calcext:value-type="float">
            <text:p>2044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36631944444444" calcext:value-type="float">
            <text:p>0,00236631944444444000</text:p>
          </table:table-cell>
          <table:table-cell table:formula="of:=[.D237]-[.D23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7" office:value-type="float" office:value="20532" calcext:value-type="float">
            <text:p>2053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37638888888889" calcext:value-type="float">
            <text:p>0,00237638888888889000</text:p>
          </table:table-cell>
          <table:table-cell table:formula="of:=[.D238]-[.D23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7" office:value-type="float" office:value="20619" calcext:value-type="float">
            <text:p>2061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38645833333333" calcext:value-type="float">
            <text:p>0,00238645833333333000</text:p>
          </table:table-cell>
          <table:table-cell table:formula="of:=[.D239]-[.D23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7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39652777777778" calcext:value-type="float">
            <text:p>0,00239652777777778000</text:p>
          </table:table-cell>
          <table:table-cell table:formula="of:=[.D240]-[.D23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7" office:value-type="float" office:value="20793" calcext:value-type="float">
            <text:p>2079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40659722222222" calcext:value-type="float">
            <text:p>0,00240659722222222000</text:p>
          </table:table-cell>
          <table:table-cell table:formula="of:=[.D241]-[.D24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7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41666666666667" calcext:value-type="float">
            <text:p>0,00241666666666667000</text:p>
          </table:table-cell>
          <table:table-cell table:formula="of:=[.D242]-[.D24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7" office:value-type="float" office:value="20967" calcext:value-type="float">
            <text:p>2096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42673611111111" calcext:value-type="float">
            <text:p>0,00242673611111111000</text:p>
          </table:table-cell>
          <table:table-cell table:formula="of:=[.D243]-[.D242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7" office:value-type="float" office:value="21054" calcext:value-type="float">
            <text:p>2105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43680555555556" calcext:value-type="float">
            <text:p>0,00243680555555556000</text:p>
          </table:table-cell>
          <table:table-cell table:formula="of:=[.D244]-[.D24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7" office:value-type="float" office:value="21141" calcext:value-type="float">
            <text:p>2114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446875" calcext:value-type="float">
            <text:p>0,00244687500000000000</text:p>
          </table:table-cell>
          <table:table-cell table:formula="of:=[.D245]-[.D24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7" office:value-type="float" office:value="21228" calcext:value-type="float">
            <text:p>2122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45694444444444" calcext:value-type="float">
            <text:p>0,00245694444444444000</text:p>
          </table:table-cell>
          <table:table-cell table:formula="of:=[.D246]-[.D24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7" office:value-type="float" office:value="21315" calcext:value-type="float">
            <text:p>2131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46701388888889" calcext:value-type="float">
            <text:p>0,00246701388888889000</text:p>
          </table:table-cell>
          <table:table-cell table:formula="of:=[.D247]-[.D24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7" office:value-type="float" office:value="21402" calcext:value-type="float">
            <text:p>2140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47708333333333" calcext:value-type="float">
            <text:p>0,00247708333333333000</text:p>
          </table:table-cell>
          <table:table-cell table:formula="of:=[.D248]-[.D24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7" office:value-type="float" office:value="21489" calcext:value-type="float">
            <text:p>2148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48715277777778" calcext:value-type="float">
            <text:p>0,00248715277777778000</text:p>
          </table:table-cell>
          <table:table-cell table:formula="of:=[.D249]-[.D24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7" office:value-type="float" office:value="21576" calcext:value-type="float">
            <text:p>2157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49722222222222" calcext:value-type="float">
            <text:p>0,00249722222222222000</text:p>
          </table:table-cell>
          <table:table-cell table:formula="of:=[.D250]-[.D24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7" office:value-type="float" office:value="21663" calcext:value-type="float">
            <text:p>2166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50729166666667" calcext:value-type="float">
            <text:p>0,00250729166666667000</text:p>
          </table:table-cell>
          <table:table-cell table:formula="of:=[.D251]-[.D25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7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51736111111111" calcext:value-type="float">
            <text:p>0,00251736111111111000</text:p>
          </table:table-cell>
          <table:table-cell table:formula="of:=[.D252]-[.D25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7" office:value-type="float" office:value="21837" calcext:value-type="float">
            <text:p>2183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52743055555556" calcext:value-type="float">
            <text:p>0,00252743055555556000</text:p>
          </table:table-cell>
          <table:table-cell table:formula="of:=[.D253]-[.D252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7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5375" calcext:value-type="float">
            <text:p>0,00253750000000000000</text:p>
          </table:table-cell>
          <table:table-cell table:formula="of:=[.D254]-[.D25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7" office:value-type="float" office:value="22011" calcext:value-type="float">
            <text:p>2201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54756944444444" calcext:value-type="float">
            <text:p>0,00254756944444444000</text:p>
          </table:table-cell>
          <table:table-cell table:formula="of:=[.D255]-[.D25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7" office:value-type="float" office:value="22098" calcext:value-type="float">
            <text:p>2209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55763888888889" calcext:value-type="float">
            <text:p>0,00255763888888889000</text:p>
          </table:table-cell>
          <table:table-cell table:formula="of:=[.D256]-[.D25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7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56770833333333" calcext:value-type="float">
            <text:p>0,00256770833333333000</text:p>
          </table:table-cell>
          <table:table-cell table:formula="of:=[.D257]-[.D25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7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57777777777778" calcext:value-type="float">
            <text:p>0,00257777777777778000</text:p>
          </table:table-cell>
          <table:table-cell table:formula="of:=[.D258]-[.D25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7" office:value-type="float" office:value="22359" calcext:value-type="float">
            <text:p>2235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58784722222222" calcext:value-type="float">
            <text:p>0,00258784722222222000</text:p>
          </table:table-cell>
          <table:table-cell table:formula="of:=[.D259]-[.D25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7" office:value-type="float" office:value="22446" calcext:value-type="float">
            <text:p>2244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59791666666667" calcext:value-type="float">
            <text:p>0,00259791666666667000</text:p>
          </table:table-cell>
          <table:table-cell table:formula="of:=[.D260]-[.D25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7" office:value-type="float" office:value="22533" calcext:value-type="float">
            <text:p>2253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60798611111111" calcext:value-type="float">
            <text:p>0,00260798611111111000</text:p>
          </table:table-cell>
          <table:table-cell table:formula="of:=[.D261]-[.D260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7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61805555555556" calcext:value-type="float">
            <text:p>0,00261805555555556000</text:p>
          </table:table-cell>
          <table:table-cell table:formula="of:=[.D262]-[.D261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7" office:value-type="float" office:value="22707" calcext:value-type="float">
            <text:p>2270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628125" calcext:value-type="float">
            <text:p>0,00262812500000000000</text:p>
          </table:table-cell>
          <table:table-cell table:formula="of:=[.D263]-[.D26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7" office:value-type="float" office:value="22794" calcext:value-type="float">
            <text:p>2279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63819444444444" calcext:value-type="float">
            <text:p>0,00263819444444444000</text:p>
          </table:table-cell>
          <table:table-cell table:formula="of:=[.D264]-[.D26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7" office:value-type="float" office:value="22881" calcext:value-type="float">
            <text:p>2288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64826388888889" calcext:value-type="float">
            <text:p>0,00264826388888889000</text:p>
          </table:table-cell>
          <table:table-cell table:formula="of:=[.D265]-[.D26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7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65833333333333" calcext:value-type="float">
            <text:p>0,00265833333333333000</text:p>
          </table:table-cell>
          <table:table-cell table:formula="of:=[.D266]-[.D26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7" office:value-type="float" office:value="23055" calcext:value-type="float">
            <text:p>2305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66840277777778" calcext:value-type="float">
            <text:p>0,00266840277777778000</text:p>
          </table:table-cell>
          <table:table-cell table:formula="of:=[.D267]-[.D266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7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67847222222222" calcext:value-type="float">
            <text:p>0,00267847222222222000</text:p>
          </table:table-cell>
          <table:table-cell table:formula="of:=[.D268]-[.D267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7" office:value-type="float" office:value="23229" calcext:value-type="float">
            <text:p>2322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68854166666667" calcext:value-type="float">
            <text:p>0,00268854166666667000</text:p>
          </table:table-cell>
          <table:table-cell table:formula="of:=[.D269]-[.D268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7" office:value-type="float" office:value="23316" calcext:value-type="float">
            <text:p>2331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69861111111111" calcext:value-type="float">
            <text:p>0,00269861111111111000</text:p>
          </table:table-cell>
          <table:table-cell table:formula="of:=[.D270]-[.D269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7" office:value-type="float" office:value="23403" calcext:value-type="float">
            <text:p>2340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70868055555556" calcext:value-type="float">
            <text:p>0,00270868055555556000</text:p>
          </table:table-cell>
          <table:table-cell table:formula="of:=[.D271]-[.D270]" office:value-type="float" office:value="0.0000100694444444441" calcext:value-type="float">
            <text:p>0,00001006944444444410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7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71875" calcext:value-type="float">
            <text:p>0,00271875000000000000</text:p>
          </table:table-cell>
          <table:table-cell table:formula="of:=[.D272]-[.D271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7" office:value-type="float" office:value="23577" calcext:value-type="float">
            <text:p>2357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72881944444444" calcext:value-type="float">
            <text:p>0,00272881944444444000</text:p>
          </table:table-cell>
          <table:table-cell table:formula="of:=[.D273]-[.D272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7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73888888888889" calcext:value-type="float">
            <text:p>0,00273888888888889000</text:p>
          </table:table-cell>
          <table:table-cell table:formula="of:=[.D274]-[.D273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7" office:value-type="float" office:value="23751" calcext:value-type="float">
            <text:p>2375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74895833333333" calcext:value-type="float">
            <text:p>0,00274895833333333000</text:p>
          </table:table-cell>
          <table:table-cell table:formula="of:=[.D275]-[.D274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7" office:value-type="float" office:value="23838" calcext:value-type="float">
            <text:p>2383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75902777777778" calcext:value-type="float">
            <text:p>0,00275902777777778000</text:p>
          </table:table-cell>
          <table:table-cell table:formula="of:=[.D276]-[.D275]" office:value-type="float" office:value="0.0000100694444444445" calcext:value-type="float">
            <text:p>0,00001006944444444450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7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76909722222222" calcext:value-type="float">
            <text:p>0,00276909722222222000</text:p>
          </table:table-cell>
          <table:table-cell table:formula="of:=#REF!-[.D276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2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15:54.825390101</meta:creation-date>
    <dc:date>2026-05-17T19:16:04.799331188</dc:date>
    <meta:editing-duration>PT11S</meta:editing-duration>
    <meta:editing-cycles>1</meta:editing-cycles>
    <meta:document-statistic meta:table-count="1" meta:cell-count="1380" meta:object-count="0"/>
    <meta:generator>LibreOffice/24.2.7.2$Linux_X86_64 LibreOffice_project/420$Build-2</meta:generator>
  </office:meta>
</office:document-meta>
</file>