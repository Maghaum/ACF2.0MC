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3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36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416666666666667" calcext:value-type="float">
            <text:p>0,00000416666666666667</text:p>
          </table:table-cell>
          <table:table-cell table:formula="of:=[.D3]-[.D2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36" office:value-type="float" office:value="72" calcext:value-type="float">
            <text:p>7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833333333333333" calcext:value-type="float">
            <text:p>0,00000833333333333333</text:p>
          </table:table-cell>
          <table:table-cell table:formula="of:=[.D4]-[.D3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36" office:value-type="float" office:value="108" calcext:value-type="float">
            <text:p>108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25" calcext:value-type="float">
            <text:p>0,00001250000000000000</text:p>
          </table:table-cell>
          <table:table-cell table:formula="of:=[.D5]-[.D4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36" office:value-type="float" office:value="144" calcext:value-type="float">
            <text:p>14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66666666666667" calcext:value-type="float">
            <text:p>0,00001666666666666670</text:p>
          </table:table-cell>
          <table:table-cell table:formula="of:=[.D6]-[.D5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36" office:value-type="float" office:value="180" calcext:value-type="float">
            <text:p>18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08333333333333" calcext:value-type="float">
            <text:p>0,00002083333333333330</text:p>
          </table:table-cell>
          <table:table-cell table:formula="of:=[.D7]-[.D6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36" office:value-type="float" office:value="216" calcext:value-type="float">
            <text:p>21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25" calcext:value-type="float">
            <text:p>0,00002500000000000000</text:p>
          </table:table-cell>
          <table:table-cell table:formula="of:=[.D8]-[.D7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36" office:value-type="float" office:value="252" calcext:value-type="float">
            <text:p>252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291666666666667" calcext:value-type="float">
            <text:p>0,00002916666666666670</text:p>
          </table:table-cell>
          <table:table-cell table:formula="of:=[.D9]-[.D8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36" office:value-type="float" office:value="288" calcext:value-type="float">
            <text:p>28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333333333333333" calcext:value-type="float">
            <text:p>0,00003333333333333330</text:p>
          </table:table-cell>
          <table:table-cell table:formula="of:=[.D10]-[.D9]" office:value-type="float" office:value="0.00000416666666666666" calcext:value-type="float">
            <text:p>0,000004166666666666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36" office:value-type="float" office:value="324" calcext:value-type="float">
            <text:p>324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375" calcext:value-type="float">
            <text:p>0,00003750000000000000</text:p>
          </table:table-cell>
          <table:table-cell table:formula="of:=[.D11]-[.D10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36" office:value-type="float" office:value="360" calcext:value-type="float">
            <text:p>36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416666666666667" calcext:value-type="float">
            <text:p>0,00004166666666666670</text:p>
          </table:table-cell>
          <table:table-cell table:formula="of:=[.D12]-[.D11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36" office:value-type="float" office:value="396" calcext:value-type="float">
            <text:p>396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458333333333333" calcext:value-type="float">
            <text:p>0,00004583333333333330</text:p>
          </table:table-cell>
          <table:table-cell table:formula="of:=[.D13]-[.D12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36" office:value-type="float" office:value="432" calcext:value-type="float">
            <text:p>43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5" calcext:value-type="float">
            <text:p>0,00005000000000000000</text:p>
          </table:table-cell>
          <table:table-cell table:formula="of:=[.D14]-[.D13]" office:value-type="float" office:value="0.00000416666666666666" calcext:value-type="float">
            <text:p>0,000004166666666666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36" office:value-type="float" office:value="468" calcext:value-type="float">
            <text:p>468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541666666666667" calcext:value-type="float">
            <text:p>0,00005416666666666670</text:p>
          </table:table-cell>
          <table:table-cell table:formula="of:=[.D15]-[.D14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36" office:value-type="float" office:value="504" calcext:value-type="float">
            <text:p>50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583333333333333" calcext:value-type="float">
            <text:p>0,00005833333333333330</text:p>
          </table:table-cell>
          <table:table-cell table:formula="of:=[.D16]-[.D15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36" office:value-type="float" office:value="540" calcext:value-type="float">
            <text:p>54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625" calcext:value-type="float">
            <text:p>0,00006250000000000000</text:p>
          </table:table-cell>
          <table:table-cell table:formula="of:=[.D17]-[.D16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36" office:value-type="float" office:value="576" calcext:value-type="float">
            <text:p>57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666666666666667" calcext:value-type="float">
            <text:p>0,00006666666666666670</text:p>
          </table:table-cell>
          <table:table-cell table:formula="of:=[.D18]-[.D17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36" office:value-type="float" office:value="612" calcext:value-type="float">
            <text:p>612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708333333333333" calcext:value-type="float">
            <text:p>0,00007083333333333330</text:p>
          </table:table-cell>
          <table:table-cell table:formula="of:=[.D19]-[.D18]" office:value-type="float" office:value="0.00000416666666666666" calcext:value-type="float">
            <text:p>0,000004166666666666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36" office:value-type="float" office:value="648" calcext:value-type="float">
            <text:p>64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75" calcext:value-type="float">
            <text:p>0,00007500000000000000</text:p>
          </table:table-cell>
          <table:table-cell table:formula="of:=[.D20]-[.D19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36" office:value-type="float" office:value="684" calcext:value-type="float">
            <text:p>684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791666666666667" calcext:value-type="float">
            <text:p>0,00007916666666666670</text:p>
          </table:table-cell>
          <table:table-cell table:formula="of:=[.D21]-[.D20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36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833333333333333" calcext:value-type="float">
            <text:p>0,00008333333333333330</text:p>
          </table:table-cell>
          <table:table-cell table:formula="of:=[.D22]-[.D21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36" office:value-type="float" office:value="756" calcext:value-type="float">
            <text:p>756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875" calcext:value-type="float">
            <text:p>0,00008750000000000000</text:p>
          </table:table-cell>
          <table:table-cell table:formula="of:=[.D23]-[.D22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36" office:value-type="float" office:value="792" calcext:value-type="float">
            <text:p>79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916666666666667" calcext:value-type="float">
            <text:p>0,00009166666666666670</text:p>
          </table:table-cell>
          <table:table-cell table:formula="of:=[.D24]-[.D23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36" office:value-type="float" office:value="828" calcext:value-type="float">
            <text:p>828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958333333333333" calcext:value-type="float">
            <text:p>0,00009583333333333330</text:p>
          </table:table-cell>
          <table:table-cell table:formula="of:=[.D25]-[.D24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36" office:value-type="float" office:value="864" calcext:value-type="float">
            <text:p>86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" calcext:value-type="float">
            <text:p>0,00010000000000000000</text:p>
          </table:table-cell>
          <table:table-cell table:formula="of:=[.D26]-[.D25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36" office:value-type="float" office:value="900" calcext:value-type="float">
            <text:p>9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04166666666667" calcext:value-type="float">
            <text:p>0,00010416666666666700</text:p>
          </table:table-cell>
          <table:table-cell table:formula="of:=[.D27]-[.D26]" office:value-type="float" office:value="0.00000416666666666666" calcext:value-type="float">
            <text:p>0,000004166666666666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36" office:value-type="float" office:value="936" calcext:value-type="float">
            <text:p>93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08333333333333" calcext:value-type="float">
            <text:p>0,00010833333333333300</text:p>
          </table:table-cell>
          <table:table-cell table:formula="of:=[.D28]-[.D27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36" office:value-type="float" office:value="972" calcext:value-type="float">
            <text:p>972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125" calcext:value-type="float">
            <text:p>0,00011250000000000000</text:p>
          </table:table-cell>
          <table:table-cell table:formula="of:=[.D29]-[.D28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36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16666666666667" calcext:value-type="float">
            <text:p>0,00011666666666666700</text:p>
          </table:table-cell>
          <table:table-cell table:formula="of:=[.D30]-[.D29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36" office:value-type="float" office:value="1044" calcext:value-type="float">
            <text:p>1044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20833333333333" calcext:value-type="float">
            <text:p>0,00012083333333333300</text:p>
          </table:table-cell>
          <table:table-cell table:formula="of:=[.D31]-[.D30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36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25" calcext:value-type="float">
            <text:p>0,00012500000000000000</text:p>
          </table:table-cell>
          <table:table-cell table:formula="of:=[.D32]-[.D31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36" office:value-type="float" office:value="1116" calcext:value-type="float">
            <text:p>1116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29166666666667" calcext:value-type="float">
            <text:p>0,00012916666666666700</text:p>
          </table:table-cell>
          <table:table-cell table:formula="of:=[.D33]-[.D32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36" office:value-type="float" office:value="1152" calcext:value-type="float">
            <text:p>115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33333333333333" calcext:value-type="float">
            <text:p>0,00013333333333333300</text:p>
          </table:table-cell>
          <table:table-cell table:formula="of:=[.D34]-[.D33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36" office:value-type="float" office:value="1188" calcext:value-type="float">
            <text:p>1188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375" calcext:value-type="float">
            <text:p>0,00013750000000000000</text:p>
          </table:table-cell>
          <table:table-cell table:formula="of:=[.D35]-[.D34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36" office:value-type="float" office:value="1224" calcext:value-type="float">
            <text:p>122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41666666666667" calcext:value-type="float">
            <text:p>0,00014166666666666700</text:p>
          </table:table-cell>
          <table:table-cell table:formula="of:=[.D36]-[.D35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36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45833333333333" calcext:value-type="float">
            <text:p>0,00014583333333333300</text:p>
          </table:table-cell>
          <table:table-cell table:formula="of:=[.D37]-[.D3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36" office:value-type="float" office:value="1296" calcext:value-type="float">
            <text:p>129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5" calcext:value-type="float">
            <text:p>0,00015000000000000000</text:p>
          </table:table-cell>
          <table:table-cell table:formula="of:=[.D38]-[.D37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36" office:value-type="float" office:value="1332" calcext:value-type="float">
            <text:p>1332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54166666666667" calcext:value-type="float">
            <text:p>0,00015416666666666700</text:p>
          </table:table-cell>
          <table:table-cell table:formula="of:=[.D39]-[.D38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36" office:value-type="float" office:value="1368" calcext:value-type="float">
            <text:p>136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58333333333333" calcext:value-type="float">
            <text:p>0,00015833333333333300</text:p>
          </table:table-cell>
          <table:table-cell table:formula="of:=[.D40]-[.D39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36" office:value-type="float" office:value="1404" calcext:value-type="float">
            <text:p>1404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625" calcext:value-type="float">
            <text:p>0,00016250000000000000</text:p>
          </table:table-cell>
          <table:table-cell table:formula="of:=[.D41]-[.D40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36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66666666666667" calcext:value-type="float">
            <text:p>0,00016666666666666700</text:p>
          </table:table-cell>
          <table:table-cell table:formula="of:=[.D42]-[.D41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36" office:value-type="float" office:value="1476" calcext:value-type="float">
            <text:p>1476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70833333333333" calcext:value-type="float">
            <text:p>0,00017083333333333300</text:p>
          </table:table-cell>
          <table:table-cell table:formula="of:=[.D43]-[.D42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36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75" calcext:value-type="float">
            <text:p>0,00017500000000000000</text:p>
          </table:table-cell>
          <table:table-cell table:formula="of:=[.D44]-[.D43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36" office:value-type="float" office:value="1548" calcext:value-type="float">
            <text:p>1548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79166666666667" calcext:value-type="float">
            <text:p>0,00017916666666666700</text:p>
          </table:table-cell>
          <table:table-cell table:formula="of:=[.D45]-[.D44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36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83333333333333" calcext:value-type="float">
            <text:p>0,00018333333333333300</text:p>
          </table:table-cell>
          <table:table-cell table:formula="of:=[.D46]-[.D45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36" office:value-type="float" office:value="1620" calcext:value-type="float">
            <text:p>162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875" calcext:value-type="float">
            <text:p>0,00018750000000000000</text:p>
          </table:table-cell>
          <table:table-cell table:formula="of:=[.D47]-[.D46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36" office:value-type="float" office:value="1656" calcext:value-type="float">
            <text:p>165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91666666666667" calcext:value-type="float">
            <text:p>0,00019166666666666700</text:p>
          </table:table-cell>
          <table:table-cell table:formula="of:=[.D48]-[.D47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36" office:value-type="float" office:value="1692" calcext:value-type="float">
            <text:p>1692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95833333333333" calcext:value-type="float">
            <text:p>0,00019583333333333300</text:p>
          </table:table-cell>
          <table:table-cell table:formula="of:=[.D49]-[.D48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36" office:value-type="float" office:value="1728" calcext:value-type="float">
            <text:p>172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" calcext:value-type="float">
            <text:p>0,00020000000000000000</text:p>
          </table:table-cell>
          <table:table-cell table:formula="of:=[.D50]-[.D49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36" office:value-type="float" office:value="1764" calcext:value-type="float">
            <text:p>1764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04166666666667" calcext:value-type="float">
            <text:p>0,00020416666666666700</text:p>
          </table:table-cell>
          <table:table-cell table:formula="of:=[.D51]-[.D50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36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08333333333333" calcext:value-type="float">
            <text:p>0,00020833333333333300</text:p>
          </table:table-cell>
          <table:table-cell table:formula="of:=[.D52]-[.D5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36" office:value-type="float" office:value="1836" calcext:value-type="float">
            <text:p>1836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125" calcext:value-type="float">
            <text:p>0,00021250000000000000</text:p>
          </table:table-cell>
          <table:table-cell table:formula="of:=[.D53]-[.D52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36" office:value-type="float" office:value="1872" calcext:value-type="float">
            <text:p>187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16666666666667" calcext:value-type="float">
            <text:p>0,00021666666666666700</text:p>
          </table:table-cell>
          <table:table-cell table:formula="of:=[.D54]-[.D53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36" office:value-type="float" office:value="1908" calcext:value-type="float">
            <text:p>1908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20833333333333" calcext:value-type="float">
            <text:p>0,00022083333333333300</text:p>
          </table:table-cell>
          <table:table-cell table:formula="of:=[.D55]-[.D54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36" office:value-type="float" office:value="1944" calcext:value-type="float">
            <text:p>194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25" calcext:value-type="float">
            <text:p>0,00022500000000000000</text:p>
          </table:table-cell>
          <table:table-cell table:formula="of:=[.D56]-[.D55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36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29166666666667" calcext:value-type="float">
            <text:p>0,00022916666666666700</text:p>
          </table:table-cell>
          <table:table-cell table:formula="of:=[.D57]-[.D56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36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33333333333333" calcext:value-type="float">
            <text:p>0,00023333333333333300</text:p>
          </table:table-cell>
          <table:table-cell table:formula="of:=[.D58]-[.D57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36" office:value-type="float" office:value="2052" calcext:value-type="float">
            <text:p>2052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2375" calcext:value-type="float">
            <text:p>0,00023750000000000000</text:p>
          </table:table-cell>
          <table:table-cell table:formula="of:=[.D59]-[.D58]" office:value-type="float" office:value="0.00000416666666666667" calcext:value-type="float">
            <text:p>0,0000041666666666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36" office:value-type="float" office:value="2088" calcext:value-type="float">
            <text:p>208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241666666666667" calcext:value-type="float">
            <text:p>0,00024166666666666700</text:p>
          </table:table-cell>
          <table:table-cell table:formula="of:=[.D60]-[.D5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36" office:value-type="float" office:value="2124" calcext:value-type="float">
            <text:p>2124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245833333333333" calcext:value-type="float">
            <text:p>0,00024583333333333300</text:p>
          </table:table-cell>
          <table:table-cell table:formula="of:=[.D61]-[.D60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36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25" calcext:value-type="float">
            <text:p>0,00025000000000000000</text:p>
          </table:table-cell>
          <table:table-cell table:formula="of:=[.D62]-[.D6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36" office:value-type="float" office:value="2196" calcext:value-type="float">
            <text:p>2196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254166666666667" calcext:value-type="float">
            <text:p>0,00025416666666666700</text:p>
          </table:table-cell>
          <table:table-cell table:formula="of:=[.D63]-[.D62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36" office:value-type="float" office:value="2232" calcext:value-type="float">
            <text:p>223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258333333333333" calcext:value-type="float">
            <text:p>0,00025833333333333300</text:p>
          </table:table-cell>
          <table:table-cell table:formula="of:=[.D64]-[.D6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36" office:value-type="float" office:value="2268" calcext:value-type="float">
            <text:p>2268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2625" calcext:value-type="float">
            <text:p>0,00026250000000000000</text:p>
          </table:table-cell>
          <table:table-cell table:formula="of:=[.D65]-[.D64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36" office:value-type="float" office:value="2304" calcext:value-type="float">
            <text:p>230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266666666666667" calcext:value-type="float">
            <text:p>0,00026666666666666700</text:p>
          </table:table-cell>
          <table:table-cell table:formula="of:=[.D66]-[.D6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36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270833333333333" calcext:value-type="float">
            <text:p>0,00027083333333333300</text:p>
          </table:table-cell>
          <table:table-cell table:formula="of:=[.D67]-[.D66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36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275" calcext:value-type="float">
            <text:p>0,00027500000000000000</text:p>
          </table:table-cell>
          <table:table-cell table:formula="of:=[.D68]-[.D6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36" office:value-type="float" office:value="2412" calcext:value-type="float">
            <text:p>2412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279166666666667" calcext:value-type="float">
            <text:p>0,00027916666666666700</text:p>
          </table:table-cell>
          <table:table-cell table:formula="of:=[.D69]-[.D68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36" office:value-type="float" office:value="2448" calcext:value-type="float">
            <text:p>244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283333333333333" calcext:value-type="float">
            <text:p>0,00028333333333333300</text:p>
          </table:table-cell>
          <table:table-cell table:formula="of:=[.D70]-[.D6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36" office:value-type="float" office:value="2484" calcext:value-type="float">
            <text:p>2484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2875" calcext:value-type="float">
            <text:p>0,00028750000000000000</text:p>
          </table:table-cell>
          <table:table-cell table:formula="of:=[.D71]-[.D70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36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291666666666667" calcext:value-type="float">
            <text:p>0,00029166666666666700</text:p>
          </table:table-cell>
          <table:table-cell table:formula="of:=[.D72]-[.D7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36" office:value-type="float" office:value="2556" calcext:value-type="float">
            <text:p>2556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295833333333333" calcext:value-type="float">
            <text:p>0,00029583333333333300</text:p>
          </table:table-cell>
          <table:table-cell table:formula="of:=[.D73]-[.D7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36" office:value-type="float" office:value="2592" calcext:value-type="float">
            <text:p>259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3" calcext:value-type="float">
            <text:p>0,00030000000000000000</text:p>
          </table:table-cell>
          <table:table-cell table:formula="of:=[.D74]-[.D73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36" office:value-type="float" office:value="2628" calcext:value-type="float">
            <text:p>2628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304166666666667" calcext:value-type="float">
            <text:p>0,00030416666666666700</text:p>
          </table:table-cell>
          <table:table-cell table:formula="of:=[.D75]-[.D7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36" office:value-type="float" office:value="2664" calcext:value-type="float">
            <text:p>266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308333333333333" calcext:value-type="float">
            <text:p>0,00030833333333333300</text:p>
          </table:table-cell>
          <table:table-cell table:formula="of:=[.D76]-[.D75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36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3125" calcext:value-type="float">
            <text:p>0,00031250000000000000</text:p>
          </table:table-cell>
          <table:table-cell table:formula="of:=[.D77]-[.D7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36" office:value-type="float" office:value="2736" calcext:value-type="float">
            <text:p>273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316666666666667" calcext:value-type="float">
            <text:p>0,00031666666666666700</text:p>
          </table:table-cell>
          <table:table-cell table:formula="of:=[.D78]-[.D77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36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320833333333333" calcext:value-type="float">
            <text:p>0,00032083333333333300</text:p>
          </table:table-cell>
          <table:table-cell table:formula="of:=[.D79]-[.D7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36" office:value-type="float" office:value="2808" calcext:value-type="float">
            <text:p>280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325" calcext:value-type="float">
            <text:p>0,00032500000000000000</text:p>
          </table:table-cell>
          <table:table-cell table:formula="of:=[.D80]-[.D79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36" office:value-type="float" office:value="2844" calcext:value-type="float">
            <text:p>2844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329166666666667" calcext:value-type="float">
            <text:p>0,00032916666666666700</text:p>
          </table:table-cell>
          <table:table-cell table:formula="of:=[.D81]-[.D8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36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333333333333333" calcext:value-type="float">
            <text:p>0,00033333333333333300</text:p>
          </table:table-cell>
          <table:table-cell table:formula="of:=[.D82]-[.D81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36" office:value-type="float" office:value="2916" calcext:value-type="float">
            <text:p>2916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3375" calcext:value-type="float">
            <text:p>0,00033750000000000000</text:p>
          </table:table-cell>
          <table:table-cell table:formula="of:=[.D83]-[.D8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36" office:value-type="float" office:value="2952" calcext:value-type="float">
            <text:p>295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341666666666667" calcext:value-type="float">
            <text:p>0,00034166666666666700</text:p>
          </table:table-cell>
          <table:table-cell table:formula="of:=[.D84]-[.D83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36" office:value-type="float" office:value="2988" calcext:value-type="float">
            <text:p>2988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345833333333333" calcext:value-type="float">
            <text:p>0,00034583333333333300</text:p>
          </table:table-cell>
          <table:table-cell table:formula="of:=[.D85]-[.D8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36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35" calcext:value-type="float">
            <text:p>0,00035000000000000000</text:p>
          </table:table-cell>
          <table:table-cell table:formula="of:=[.D86]-[.D85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36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354166666666667" calcext:value-type="float">
            <text:p>0,00035416666666666700</text:p>
          </table:table-cell>
          <table:table-cell table:formula="of:=[.D87]-[.D8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36" office:value-type="float" office:value="3096" calcext:value-type="float">
            <text:p>309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358333333333333" calcext:value-type="float">
            <text:p>0,00035833333333333300</text:p>
          </table:table-cell>
          <table:table-cell table:formula="of:=[.D88]-[.D8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36" office:value-type="float" office:value="3132" calcext:value-type="float">
            <text:p>3132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3625" calcext:value-type="float">
            <text:p>0,00036250000000000000</text:p>
          </table:table-cell>
          <table:table-cell table:formula="of:=[.D89]-[.D88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36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366666666666667" calcext:value-type="float">
            <text:p>0,00036666666666666700</text:p>
          </table:table-cell>
          <table:table-cell table:formula="of:=[.D90]-[.D8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36" office:value-type="float" office:value="3204" calcext:value-type="float">
            <text:p>3204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370833333333333" calcext:value-type="float">
            <text:p>0,00037083333333333300</text:p>
          </table:table-cell>
          <table:table-cell table:formula="of:=[.D91]-[.D90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36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375" calcext:value-type="float">
            <text:p>0,00037500000000000000</text:p>
          </table:table-cell>
          <table:table-cell table:formula="of:=[.D92]-[.D9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36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379166666666667" calcext:value-type="float">
            <text:p>0,00037916666666666700</text:p>
          </table:table-cell>
          <table:table-cell table:formula="of:=[.D93]-[.D92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36" office:value-type="float" office:value="3312" calcext:value-type="float">
            <text:p>331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383333333333333" calcext:value-type="float">
            <text:p>0,00038333333333333300</text:p>
          </table:table-cell>
          <table:table-cell table:formula="of:=[.D94]-[.D9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36" office:value-type="float" office:value="3348" calcext:value-type="float">
            <text:p>3348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3875" calcext:value-type="float">
            <text:p>0,00038750000000000000</text:p>
          </table:table-cell>
          <table:table-cell table:formula="of:=[.D95]-[.D94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36" office:value-type="float" office:value="3384" calcext:value-type="float">
            <text:p>338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391666666666667" calcext:value-type="float">
            <text:p>0,00039166666666666700</text:p>
          </table:table-cell>
          <table:table-cell table:formula="of:=[.D96]-[.D9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36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395833333333333" calcext:value-type="float">
            <text:p>0,00039583333333333300</text:p>
          </table:table-cell>
          <table:table-cell table:formula="of:=[.D97]-[.D96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36" office:value-type="float" office:value="3456" calcext:value-type="float">
            <text:p>345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4" calcext:value-type="float">
            <text:p>0,00040000000000000000</text:p>
          </table:table-cell>
          <table:table-cell table:formula="of:=[.D98]-[.D9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36" office:value-type="float" office:value="3492" calcext:value-type="float">
            <text:p>3492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404166666666667" calcext:value-type="float">
            <text:p>0,00040416666666666700</text:p>
          </table:table-cell>
          <table:table-cell table:formula="of:=[.D99]-[.D98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36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408333333333333" calcext:value-type="float">
            <text:p>0,00040833333333333300</text:p>
          </table:table-cell>
          <table:table-cell table:formula="of:=[.D100]-[.D9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36" office:value-type="float" office:value="3564" calcext:value-type="float">
            <text:p>3564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4125" calcext:value-type="float">
            <text:p>0,00041250000000000000</text:p>
          </table:table-cell>
          <table:table-cell table:formula="of:=[.D101]-[.D100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36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416666666666667" calcext:value-type="float">
            <text:p>0,00041666666666666700</text:p>
          </table:table-cell>
          <table:table-cell table:formula="of:=[.D102]-[.D10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36" office:value-type="float" office:value="3636" calcext:value-type="float">
            <text:p>3636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420833333333333" calcext:value-type="float">
            <text:p>0,00042083333333333300</text:p>
          </table:table-cell>
          <table:table-cell table:formula="of:=[.D103]-[.D10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36" office:value-type="float" office:value="3672" calcext:value-type="float">
            <text:p>367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425" calcext:value-type="float">
            <text:p>0,00042500000000000000</text:p>
          </table:table-cell>
          <table:table-cell table:formula="of:=[.D104]-[.D103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36" office:value-type="float" office:value="3708" calcext:value-type="float">
            <text:p>3708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429166666666667" calcext:value-type="float">
            <text:p>0,00042916666666666700</text:p>
          </table:table-cell>
          <table:table-cell table:formula="of:=[.D105]-[.D10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36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433333333333333" calcext:value-type="float">
            <text:p>0,00043333333333333300</text:p>
          </table:table-cell>
          <table:table-cell table:formula="of:=[.D106]-[.D105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36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4375" calcext:value-type="float">
            <text:p>0,00043750000000000000</text:p>
          </table:table-cell>
          <table:table-cell table:formula="of:=[.D107]-[.D10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36" office:value-type="float" office:value="3816" calcext:value-type="float">
            <text:p>381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441666666666667" calcext:value-type="float">
            <text:p>0,00044166666666666700</text:p>
          </table:table-cell>
          <table:table-cell table:formula="of:=[.D108]-[.D107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36" office:value-type="float" office:value="3852" calcext:value-type="float">
            <text:p>3852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445833333333333" calcext:value-type="float">
            <text:p>0,00044583333333333300</text:p>
          </table:table-cell>
          <table:table-cell table:formula="of:=[.D109]-[.D10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36" office:value-type="float" office:value="3888" calcext:value-type="float">
            <text:p>388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45" calcext:value-type="float">
            <text:p>0,00045000000000000000</text:p>
          </table:table-cell>
          <table:table-cell table:formula="of:=[.D110]-[.D109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36" office:value-type="float" office:value="3924" calcext:value-type="float">
            <text:p>3924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454166666666667" calcext:value-type="float">
            <text:p>0,00045416666666666700</text:p>
          </table:table-cell>
          <table:table-cell table:formula="of:=[.D111]-[.D11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36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458333333333333" calcext:value-type="float">
            <text:p>0,00045833333333333300</text:p>
          </table:table-cell>
          <table:table-cell table:formula="of:=[.D112]-[.D111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36" office:value-type="float" office:value="3996" calcext:value-type="float">
            <text:p>3996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4625" calcext:value-type="float">
            <text:p>0,00046250000000000000</text:p>
          </table:table-cell>
          <table:table-cell table:formula="of:=[.D113]-[.D11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36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466666666666667" calcext:value-type="float">
            <text:p>0,00046666666666666700</text:p>
          </table:table-cell>
          <table:table-cell table:formula="of:=[.D114]-[.D113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36" office:value-type="float" office:value="4068" calcext:value-type="float">
            <text:p>4068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470833333333333" calcext:value-type="float">
            <text:p>0,00047083333333333300</text:p>
          </table:table-cell>
          <table:table-cell table:formula="of:=[.D115]-[.D11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36" office:value-type="float" office:value="4104" calcext:value-type="float">
            <text:p>410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475" calcext:value-type="float">
            <text:p>0,00047500000000000000</text:p>
          </table:table-cell>
          <table:table-cell table:formula="of:=[.D116]-[.D11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36" office:value-type="float" office:value="4140" calcext:value-type="float">
            <text:p>414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479166666666667" calcext:value-type="float">
            <text:p>0,00047916666666666700</text:p>
          </table:table-cell>
          <table:table-cell table:formula="of:=[.D117]-[.D116]" office:value-type="float" office:value="0.0000041666666666667" calcext:value-type="float">
            <text:p>0,0000041666666666667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36" office:value-type="float" office:value="4176" calcext:value-type="float">
            <text:p>417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483333333333333" calcext:value-type="float">
            <text:p>0,00048333333333333300</text:p>
          </table:table-cell>
          <table:table-cell table:formula="of:=[.D118]-[.D11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36" office:value-type="float" office:value="4212" calcext:value-type="float">
            <text:p>4212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4875" calcext:value-type="float">
            <text:p>0,00048750000000000000</text:p>
          </table:table-cell>
          <table:table-cell table:formula="of:=[.D119]-[.D11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36" office:value-type="float" office:value="4248" calcext:value-type="float">
            <text:p>424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491666666666667" calcext:value-type="float">
            <text:p>0,00049166666666666700</text:p>
          </table:table-cell>
          <table:table-cell table:formula="of:=[.D120]-[.D119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36" office:value-type="float" office:value="4284" calcext:value-type="float">
            <text:p>4284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495833333333333" calcext:value-type="float">
            <text:p>0,00049583333333333300</text:p>
          </table:table-cell>
          <table:table-cell table:formula="of:=[.D121]-[.D12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36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5" calcext:value-type="float">
            <text:p>0,00050000000000000000</text:p>
          </table:table-cell>
          <table:table-cell table:formula="of:=[.D122]-[.D12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36" office:value-type="float" office:value="4356" calcext:value-type="float">
            <text:p>4356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504166666666667" calcext:value-type="float">
            <text:p>0,00050416666666666700</text:p>
          </table:table-cell>
          <table:table-cell table:formula="of:=[.D123]-[.D12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36" office:value-type="float" office:value="4392" calcext:value-type="float">
            <text:p>439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508333333333333" calcext:value-type="float">
            <text:p>0,00050833333333333300</text:p>
          </table:table-cell>
          <table:table-cell table:formula="of:=[.D124]-[.D123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36" office:value-type="float" office:value="4428" calcext:value-type="float">
            <text:p>4428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5125" calcext:value-type="float">
            <text:p>0,00051250000000000000</text:p>
          </table:table-cell>
          <table:table-cell table:formula="of:=[.D125]-[.D12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36" office:value-type="float" office:value="4464" calcext:value-type="float">
            <text:p>446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516666666666667" calcext:value-type="float">
            <text:p>0,00051666666666666700</text:p>
          </table:table-cell>
          <table:table-cell table:formula="of:=[.D126]-[.D12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36" office:value-type="float" office:value="4500" calcext:value-type="float">
            <text:p>45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520833333333333" calcext:value-type="float">
            <text:p>0,00052083333333333300</text:p>
          </table:table-cell>
          <table:table-cell table:formula="of:=[.D127]-[.D12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36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525" calcext:value-type="float">
            <text:p>0,00052500000000000000</text:p>
          </table:table-cell>
          <table:table-cell table:formula="of:=[.D128]-[.D127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36" office:value-type="float" office:value="4572" calcext:value-type="float">
            <text:p>4572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529166666666667" calcext:value-type="float">
            <text:p>0,00052916666666666700</text:p>
          </table:table-cell>
          <table:table-cell table:formula="of:=[.D129]-[.D12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36" office:value-type="float" office:value="4608" calcext:value-type="float">
            <text:p>460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533333333333333" calcext:value-type="float">
            <text:p>0,00053333333333333300</text:p>
          </table:table-cell>
          <table:table-cell table:formula="of:=[.D130]-[.D12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36" office:value-type="float" office:value="4644" calcext:value-type="float">
            <text:p>4644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5375" calcext:value-type="float">
            <text:p>0,00053750000000000000</text:p>
          </table:table-cell>
          <table:table-cell table:formula="of:=[.D131]-[.D13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36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541666666666667" calcext:value-type="float">
            <text:p>0,00054166666666666700</text:p>
          </table:table-cell>
          <table:table-cell table:formula="of:=[.D132]-[.D13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36" office:value-type="float" office:value="4716" calcext:value-type="float">
            <text:p>4716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545833333333333" calcext:value-type="float">
            <text:p>0,00054583333333333300</text:p>
          </table:table-cell>
          <table:table-cell table:formula="of:=[.D133]-[.D132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36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55" calcext:value-type="float">
            <text:p>0,00055000000000000000</text:p>
          </table:table-cell>
          <table:table-cell table:formula="of:=[.D134]-[.D13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36" office:value-type="float" office:value="4788" calcext:value-type="float">
            <text:p>4788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554166666666667" calcext:value-type="float">
            <text:p>0,00055416666666666700</text:p>
          </table:table-cell>
          <table:table-cell table:formula="of:=[.D135]-[.D13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36" office:value-type="float" office:value="4824" calcext:value-type="float">
            <text:p>482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558333333333333" calcext:value-type="float">
            <text:p>0,00055833333333333300</text:p>
          </table:table-cell>
          <table:table-cell table:formula="of:=[.D136]-[.D13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36" office:value-type="float" office:value="4860" calcext:value-type="float">
            <text:p>486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5625" calcext:value-type="float">
            <text:p>0,00056250000000000000</text:p>
          </table:table-cell>
          <table:table-cell table:formula="of:=[.D137]-[.D136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36" office:value-type="float" office:value="4896" calcext:value-type="float">
            <text:p>489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566666666666667" calcext:value-type="float">
            <text:p>0,00056666666666666700</text:p>
          </table:table-cell>
          <table:table-cell table:formula="of:=[.D138]-[.D13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36" office:value-type="float" office:value="4932" calcext:value-type="float">
            <text:p>4932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570833333333333" calcext:value-type="float">
            <text:p>0,00057083333333333300</text:p>
          </table:table-cell>
          <table:table-cell table:formula="of:=[.D139]-[.D13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36" office:value-type="float" office:value="4968" calcext:value-type="float">
            <text:p>496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575" calcext:value-type="float">
            <text:p>0,00057500000000000000</text:p>
          </table:table-cell>
          <table:table-cell table:formula="of:=[.D140]-[.D13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36" office:value-type="float" office:value="5004" calcext:value-type="float">
            <text:p>5004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579166666666667" calcext:value-type="float">
            <text:p>0,00057916666666666700</text:p>
          </table:table-cell>
          <table:table-cell table:formula="of:=[.D141]-[.D140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36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583333333333333" calcext:value-type="float">
            <text:p>0,00058333333333333300</text:p>
          </table:table-cell>
          <table:table-cell table:formula="of:=[.D142]-[.D14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36" office:value-type="float" office:value="5076" calcext:value-type="float">
            <text:p>5076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5875" calcext:value-type="float">
            <text:p>0,00058750000000000000</text:p>
          </table:table-cell>
          <table:table-cell table:formula="of:=[.D143]-[.D14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36" office:value-type="float" office:value="5112" calcext:value-type="float">
            <text:p>511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591666666666667" calcext:value-type="float">
            <text:p>0,00059166666666666700</text:p>
          </table:table-cell>
          <table:table-cell table:formula="of:=[.D144]-[.D14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36" office:value-type="float" office:value="5148" calcext:value-type="float">
            <text:p>5148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595833333333333" calcext:value-type="float">
            <text:p>0,00059583333333333300</text:p>
          </table:table-cell>
          <table:table-cell table:formula="of:=[.D145]-[.D14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36" office:value-type="float" office:value="5184" calcext:value-type="float">
            <text:p>518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6" calcext:value-type="float">
            <text:p>0,00060000000000000000</text:p>
          </table:table-cell>
          <table:table-cell table:formula="of:=[.D146]-[.D145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36" office:value-type="float" office:value="5220" calcext:value-type="float">
            <text:p>522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604166666666667" calcext:value-type="float">
            <text:p>0,00060416666666666700</text:p>
          </table:table-cell>
          <table:table-cell table:formula="of:=[.D147]-[.D14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36" office:value-type="float" office:value="5256" calcext:value-type="float">
            <text:p>525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608333333333333" calcext:value-type="float">
            <text:p>0,00060833333333333300</text:p>
          </table:table-cell>
          <table:table-cell table:formula="of:=[.D148]-[.D14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36" office:value-type="float" office:value="5292" calcext:value-type="float">
            <text:p>5292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6125" calcext:value-type="float">
            <text:p>0,00061250000000000000</text:p>
          </table:table-cell>
          <table:table-cell table:formula="of:=[.D149]-[.D14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36" office:value-type="float" office:value="5328" calcext:value-type="float">
            <text:p>532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616666666666667" calcext:value-type="float">
            <text:p>0,00061666666666666700</text:p>
          </table:table-cell>
          <table:table-cell table:formula="of:=[.D150]-[.D149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36" office:value-type="float" office:value="5364" calcext:value-type="float">
            <text:p>5364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620833333333333" calcext:value-type="float">
            <text:p>0,00062083333333333300</text:p>
          </table:table-cell>
          <table:table-cell table:formula="of:=[.D151]-[.D15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36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625" calcext:value-type="float">
            <text:p>0,00062500000000000000</text:p>
          </table:table-cell>
          <table:table-cell table:formula="of:=[.D152]-[.D15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36" office:value-type="float" office:value="5436" calcext:value-type="float">
            <text:p>5436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629166666666667" calcext:value-type="float">
            <text:p>0,00062916666666666700</text:p>
          </table:table-cell>
          <table:table-cell table:formula="of:=[.D153]-[.D15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36" office:value-type="float" office:value="5472" calcext:value-type="float">
            <text:p>547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633333333333333" calcext:value-type="float">
            <text:p>0,00063333333333333300</text:p>
          </table:table-cell>
          <table:table-cell table:formula="of:=[.D154]-[.D153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36" office:value-type="float" office:value="5508" calcext:value-type="float">
            <text:p>5508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6375" calcext:value-type="float">
            <text:p>0,00063750000000000000</text:p>
          </table:table-cell>
          <table:table-cell table:formula="of:=[.D155]-[.D15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36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641666666666667" calcext:value-type="float">
            <text:p>0,00064166666666666700</text:p>
          </table:table-cell>
          <table:table-cell table:formula="of:=[.D156]-[.D15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36" office:value-type="float" office:value="5580" calcext:value-type="float">
            <text:p>558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645833333333333" calcext:value-type="float">
            <text:p>0,00064583333333333300</text:p>
          </table:table-cell>
          <table:table-cell table:formula="of:=[.D157]-[.D15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36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65" calcext:value-type="float">
            <text:p>0,00065000000000000000</text:p>
          </table:table-cell>
          <table:table-cell table:formula="of:=[.D158]-[.D157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36" office:value-type="float" office:value="5652" calcext:value-type="float">
            <text:p>5652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654166666666667" calcext:value-type="float">
            <text:p>0,00065416666666666700</text:p>
          </table:table-cell>
          <table:table-cell table:formula="of:=[.D159]-[.D15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36" office:value-type="float" office:value="5688" calcext:value-type="float">
            <text:p>568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658333333333333" calcext:value-type="float">
            <text:p>0,00065833333333333300</text:p>
          </table:table-cell>
          <table:table-cell table:formula="of:=[.D160]-[.D15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36" office:value-type="float" office:value="5724" calcext:value-type="float">
            <text:p>5724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6625" calcext:value-type="float">
            <text:p>0,00066250000000000000</text:p>
          </table:table-cell>
          <table:table-cell table:formula="of:=[.D161]-[.D16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36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666666666666667" calcext:value-type="float">
            <text:p>0,00066666666666666700</text:p>
          </table:table-cell>
          <table:table-cell table:formula="of:=[.D162]-[.D16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36" office:value-type="float" office:value="5796" calcext:value-type="float">
            <text:p>5796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670833333333333" calcext:value-type="float">
            <text:p>0,00067083333333333300</text:p>
          </table:table-cell>
          <table:table-cell table:formula="of:=[.D163]-[.D162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36" office:value-type="float" office:value="5832" calcext:value-type="float">
            <text:p>583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675" calcext:value-type="float">
            <text:p>0,00067500000000000000</text:p>
          </table:table-cell>
          <table:table-cell table:formula="of:=[.D164]-[.D16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36" office:value-type="float" office:value="5868" calcext:value-type="float">
            <text:p>5868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679166666666667" calcext:value-type="float">
            <text:p>0,00067916666666666700</text:p>
          </table:table-cell>
          <table:table-cell table:formula="of:=[.D165]-[.D16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36" office:value-type="float" office:value="5904" calcext:value-type="float">
            <text:p>590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683333333333333" calcext:value-type="float">
            <text:p>0,00068333333333333300</text:p>
          </table:table-cell>
          <table:table-cell table:formula="of:=[.D166]-[.D16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36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6875" calcext:value-type="float">
            <text:p>0,00068750000000000000</text:p>
          </table:table-cell>
          <table:table-cell table:formula="of:=[.D167]-[.D166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36" office:value-type="float" office:value="5976" calcext:value-type="float">
            <text:p>597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691666666666667" calcext:value-type="float">
            <text:p>0,00069166666666666700</text:p>
          </table:table-cell>
          <table:table-cell table:formula="of:=[.D168]-[.D16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36" office:value-type="float" office:value="6012" calcext:value-type="float">
            <text:p>6012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695833333333333" calcext:value-type="float">
            <text:p>0,00069583333333333300</text:p>
          </table:table-cell>
          <table:table-cell table:formula="of:=[.D169]-[.D16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36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7" calcext:value-type="float">
            <text:p>0,00070000000000000000</text:p>
          </table:table-cell>
          <table:table-cell table:formula="of:=[.D170]-[.D16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36" office:value-type="float" office:value="6084" calcext:value-type="float">
            <text:p>6084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704166666666667" calcext:value-type="float">
            <text:p>0,00070416666666666700</text:p>
          </table:table-cell>
          <table:table-cell table:formula="of:=[.D171]-[.D170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36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708333333333333" calcext:value-type="float">
            <text:p>0,00070833333333333300</text:p>
          </table:table-cell>
          <table:table-cell table:formula="of:=[.D172]-[.D17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36" office:value-type="float" office:value="6156" calcext:value-type="float">
            <text:p>6156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7125" calcext:value-type="float">
            <text:p>0,00071250000000000000</text:p>
          </table:table-cell>
          <table:table-cell table:formula="of:=[.D173]-[.D17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36" office:value-type="float" office:value="6192" calcext:value-type="float">
            <text:p>619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716666666666667" calcext:value-type="float">
            <text:p>0,00071666666666666700</text:p>
          </table:table-cell>
          <table:table-cell table:formula="of:=[.D174]-[.D17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36" office:value-type="float" office:value="6228" calcext:value-type="float">
            <text:p>6228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720833333333333" calcext:value-type="float">
            <text:p>0,00072083333333333300</text:p>
          </table:table-cell>
          <table:table-cell table:formula="of:=[.D175]-[.D17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36" office:value-type="float" office:value="6264" calcext:value-type="float">
            <text:p>626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725" calcext:value-type="float">
            <text:p>0,00072500000000000000</text:p>
          </table:table-cell>
          <table:table-cell table:formula="of:=[.D176]-[.D175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36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729166666666667" calcext:value-type="float">
            <text:p>0,00072916666666666700</text:p>
          </table:table-cell>
          <table:table-cell table:formula="of:=[.D177]-[.D17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36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733333333333333" calcext:value-type="float">
            <text:p>0,00073333333333333300</text:p>
          </table:table-cell>
          <table:table-cell table:formula="of:=[.D178]-[.D17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36" office:value-type="float" office:value="6372" calcext:value-type="float">
            <text:p>6372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7375" calcext:value-type="float">
            <text:p>0,00073750000000000000</text:p>
          </table:table-cell>
          <table:table-cell table:formula="of:=[.D179]-[.D17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36" office:value-type="float" office:value="6408" calcext:value-type="float">
            <text:p>640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741666666666667" calcext:value-type="float">
            <text:p>0,00074166666666666700</text:p>
          </table:table-cell>
          <table:table-cell table:formula="of:=[.D180]-[.D179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36" office:value-type="float" office:value="6444" calcext:value-type="float">
            <text:p>6444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745833333333333" calcext:value-type="float">
            <text:p>0,00074583333333333400</text:p>
          </table:table-cell>
          <table:table-cell table:formula="of:=[.D181]-[.D18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36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75" calcext:value-type="float">
            <text:p>0,00075000000000000000</text:p>
          </table:table-cell>
          <table:table-cell table:formula="of:=[.D182]-[.D18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36" office:value-type="float" office:value="6516" calcext:value-type="float">
            <text:p>6516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754166666666667" calcext:value-type="float">
            <text:p>0,00075416666666666700</text:p>
          </table:table-cell>
          <table:table-cell table:formula="of:=[.D183]-[.D18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36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758333333333333" calcext:value-type="float">
            <text:p>0,00075833333333333300</text:p>
          </table:table-cell>
          <table:table-cell table:formula="of:=[.D184]-[.D183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36" office:value-type="float" office:value="6588" calcext:value-type="float">
            <text:p>6588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7625" calcext:value-type="float">
            <text:p>0,00076250000000000000</text:p>
          </table:table-cell>
          <table:table-cell table:formula="of:=[.D185]-[.D18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36" office:value-type="float" office:value="6624" calcext:value-type="float">
            <text:p>662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766666666666667" calcext:value-type="float">
            <text:p>0,00076666666666666700</text:p>
          </table:table-cell>
          <table:table-cell table:formula="of:=[.D186]-[.D18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36" office:value-type="float" office:value="6660" calcext:value-type="float">
            <text:p>666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770833333333333" calcext:value-type="float">
            <text:p>0,00077083333333333300</text:p>
          </table:table-cell>
          <table:table-cell table:formula="of:=[.D187]-[.D18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36" office:value-type="float" office:value="6696" calcext:value-type="float">
            <text:p>669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775" calcext:value-type="float">
            <text:p>0,00077500000000000000</text:p>
          </table:table-cell>
          <table:table-cell table:formula="of:=[.D188]-[.D18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36" office:value-type="float" office:value="6732" calcext:value-type="float">
            <text:p>6732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779166666666667" calcext:value-type="float">
            <text:p>0,00077916666666666700</text:p>
          </table:table-cell>
          <table:table-cell table:formula="of:=[.D189]-[.D188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36" office:value-type="float" office:value="6768" calcext:value-type="float">
            <text:p>676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783333333333333" calcext:value-type="float">
            <text:p>0,00078333333333333400</text:p>
          </table:table-cell>
          <table:table-cell table:formula="of:=[.D190]-[.D18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36" office:value-type="float" office:value="6804" calcext:value-type="float">
            <text:p>6804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7875" calcext:value-type="float">
            <text:p>0,00078750000000000000</text:p>
          </table:table-cell>
          <table:table-cell table:formula="of:=[.D191]-[.D19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36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791666666666667" calcext:value-type="float">
            <text:p>0,00079166666666666700</text:p>
          </table:table-cell>
          <table:table-cell table:formula="of:=[.D192]-[.D19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36" office:value-type="float" office:value="6876" calcext:value-type="float">
            <text:p>6876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795833333333333" calcext:value-type="float">
            <text:p>0,00079583333333333300</text:p>
          </table:table-cell>
          <table:table-cell table:formula="of:=[.D193]-[.D192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36" office:value-type="float" office:value="6912" calcext:value-type="float">
            <text:p>691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8" calcext:value-type="float">
            <text:p>0,00080000000000000000</text:p>
          </table:table-cell>
          <table:table-cell table:formula="of:=[.D194]-[.D19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36" office:value-type="float" office:value="6948" calcext:value-type="float">
            <text:p>6948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804166666666667" calcext:value-type="float">
            <text:p>0,00080416666666666700</text:p>
          </table:table-cell>
          <table:table-cell table:formula="of:=[.D195]-[.D19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36" office:value-type="float" office:value="6984" calcext:value-type="float">
            <text:p>698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808333333333333" calcext:value-type="float">
            <text:p>0,00080833333333333300</text:p>
          </table:table-cell>
          <table:table-cell table:formula="of:=[.D196]-[.D19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36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8125" calcext:value-type="float">
            <text:p>0,00081250000000000000</text:p>
          </table:table-cell>
          <table:table-cell table:formula="of:=[.D197]-[.D196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36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816666666666667" calcext:value-type="float">
            <text:p>0,00081666666666666700</text:p>
          </table:table-cell>
          <table:table-cell table:formula="of:=[.D198]-[.D19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36" office:value-type="float" office:value="7092" calcext:value-type="float">
            <text:p>7092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820833333333333" calcext:value-type="float">
            <text:p>0,00082083333333333300</text:p>
          </table:table-cell>
          <table:table-cell table:formula="of:=[.D199]-[.D19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36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825" calcext:value-type="float">
            <text:p>0,00082500000000000000</text:p>
          </table:table-cell>
          <table:table-cell table:formula="of:=[.D200]-[.D19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36" office:value-type="float" office:value="7164" calcext:value-type="float">
            <text:p>7164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829166666666667" calcext:value-type="float">
            <text:p>0,00082916666666666700</text:p>
          </table:table-cell>
          <table:table-cell table:formula="of:=[.D201]-[.D200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36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833333333333333" calcext:value-type="float">
            <text:p>0,00083333333333333300</text:p>
          </table:table-cell>
          <table:table-cell table:formula="of:=[.D202]-[.D20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36" office:value-type="float" office:value="7236" calcext:value-type="float">
            <text:p>7236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8375" calcext:value-type="float">
            <text:p>0,00083750000000000000</text:p>
          </table:table-cell>
          <table:table-cell table:formula="of:=[.D203]-[.D20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36" office:value-type="float" office:value="7272" calcext:value-type="float">
            <text:p>727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841666666666667" calcext:value-type="float">
            <text:p>0,00084166666666666700</text:p>
          </table:table-cell>
          <table:table-cell table:formula="of:=[.D204]-[.D20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36" office:value-type="float" office:value="7308" calcext:value-type="float">
            <text:p>7308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845833333333333" calcext:value-type="float">
            <text:p>0,00084583333333333300</text:p>
          </table:table-cell>
          <table:table-cell table:formula="of:=[.D205]-[.D20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36" office:value-type="float" office:value="7344" calcext:value-type="float">
            <text:p>734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85" calcext:value-type="float">
            <text:p>0,00085000000000000000</text:p>
          </table:table-cell>
          <table:table-cell table:formula="of:=[.D206]-[.D205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36" office:value-type="float" office:value="7380" calcext:value-type="float">
            <text:p>738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854166666666667" calcext:value-type="float">
            <text:p>0,00085416666666666700</text:p>
          </table:table-cell>
          <table:table-cell table:formula="of:=[.D207]-[.D20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36" office:value-type="float" office:value="7416" calcext:value-type="float">
            <text:p>741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858333333333333" calcext:value-type="float">
            <text:p>0,00085833333333333300</text:p>
          </table:table-cell>
          <table:table-cell table:formula="of:=[.D208]-[.D20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36" office:value-type="float" office:value="7452" calcext:value-type="float">
            <text:p>7452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8625" calcext:value-type="float">
            <text:p>0,00086250000000000000</text:p>
          </table:table-cell>
          <table:table-cell table:formula="of:=[.D209]-[.D20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36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866666666666667" calcext:value-type="float">
            <text:p>0,00086666666666666700</text:p>
          </table:table-cell>
          <table:table-cell table:formula="of:=[.D210]-[.D209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36" office:value-type="float" office:value="7524" calcext:value-type="float">
            <text:p>7524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870833333333333" calcext:value-type="float">
            <text:p>0,00087083333333333400</text:p>
          </table:table-cell>
          <table:table-cell table:formula="of:=[.D211]-[.D21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36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875" calcext:value-type="float">
            <text:p>0,00087500000000000000</text:p>
          </table:table-cell>
          <table:table-cell table:formula="of:=[.D212]-[.D21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36" office:value-type="float" office:value="7596" calcext:value-type="float">
            <text:p>7596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879166666666667" calcext:value-type="float">
            <text:p>0,00087916666666666700</text:p>
          </table:table-cell>
          <table:table-cell table:formula="of:=[.D213]-[.D21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36" office:value-type="float" office:value="7632" calcext:value-type="float">
            <text:p>763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883333333333333" calcext:value-type="float">
            <text:p>0,00088333333333333300</text:p>
          </table:table-cell>
          <table:table-cell table:formula="of:=[.D214]-[.D213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36" office:value-type="float" office:value="7668" calcext:value-type="float">
            <text:p>7668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8875" calcext:value-type="float">
            <text:p>0,00088750000000000000</text:p>
          </table:table-cell>
          <table:table-cell table:formula="of:=[.D215]-[.D21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36" office:value-type="float" office:value="7704" calcext:value-type="float">
            <text:p>770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891666666666667" calcext:value-type="float">
            <text:p>0,00089166666666666700</text:p>
          </table:table-cell>
          <table:table-cell table:formula="of:=[.D216]-[.D21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36" office:value-type="float" office:value="7740" calcext:value-type="float">
            <text:p>774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895833333333333" calcext:value-type="float">
            <text:p>0,00089583333333333300</text:p>
          </table:table-cell>
          <table:table-cell table:formula="of:=[.D217]-[.D21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36" office:value-type="float" office:value="7776" calcext:value-type="float">
            <text:p>777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9" calcext:value-type="float">
            <text:p>0,00090000000000000000</text:p>
          </table:table-cell>
          <table:table-cell table:formula="of:=[.D218]-[.D21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36" office:value-type="float" office:value="7812" calcext:value-type="float">
            <text:p>7812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904166666666667" calcext:value-type="float">
            <text:p>0,00090416666666666700</text:p>
          </table:table-cell>
          <table:table-cell table:formula="of:=[.D219]-[.D218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36" office:value-type="float" office:value="7848" calcext:value-type="float">
            <text:p>784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908333333333333" calcext:value-type="float">
            <text:p>0,00090833333333333400</text:p>
          </table:table-cell>
          <table:table-cell table:formula="of:=[.D220]-[.D21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36" office:value-type="float" office:value="7884" calcext:value-type="float">
            <text:p>7884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9125" calcext:value-type="float">
            <text:p>0,00091250000000000000</text:p>
          </table:table-cell>
          <table:table-cell table:formula="of:=[.D221]-[.D22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36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916666666666667" calcext:value-type="float">
            <text:p>0,00091666666666666700</text:p>
          </table:table-cell>
          <table:table-cell table:formula="of:=[.D222]-[.D22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36" office:value-type="float" office:value="7956" calcext:value-type="float">
            <text:p>7956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920833333333333" calcext:value-type="float">
            <text:p>0,00092083333333333300</text:p>
          </table:table-cell>
          <table:table-cell table:formula="of:=[.D223]-[.D222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36" office:value-type="float" office:value="7992" calcext:value-type="float">
            <text:p>799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925" calcext:value-type="float">
            <text:p>0,00092500000000000000</text:p>
          </table:table-cell>
          <table:table-cell table:formula="of:=[.D224]-[.D22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36" office:value-type="float" office:value="8028" calcext:value-type="float">
            <text:p>8028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929166666666667" calcext:value-type="float">
            <text:p>0,00092916666666666700</text:p>
          </table:table-cell>
          <table:table-cell table:formula="of:=[.D225]-[.D22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36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933333333333333" calcext:value-type="float">
            <text:p>0,00093333333333333300</text:p>
          </table:table-cell>
          <table:table-cell table:formula="of:=[.D226]-[.D22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36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9375" calcext:value-type="float">
            <text:p>0,00093750000000000000</text:p>
          </table:table-cell>
          <table:table-cell table:formula="of:=[.D227]-[.D226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36" office:value-type="float" office:value="8136" calcext:value-type="float">
            <text:p>813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941666666666667" calcext:value-type="float">
            <text:p>0,00094166666666666700</text:p>
          </table:table-cell>
          <table:table-cell table:formula="of:=[.D228]-[.D22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36" office:value-type="float" office:value="8172" calcext:value-type="float">
            <text:p>8172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945833333333333" calcext:value-type="float">
            <text:p>0,00094583333333333300</text:p>
          </table:table-cell>
          <table:table-cell table:formula="of:=[.D229]-[.D22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36" office:value-type="float" office:value="8208" calcext:value-type="float">
            <text:p>820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95" calcext:value-type="float">
            <text:p>0,00095000000000000000</text:p>
          </table:table-cell>
          <table:table-cell table:formula="of:=[.D230]-[.D22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36" office:value-type="float" office:value="8244" calcext:value-type="float">
            <text:p>8244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954166666666667" calcext:value-type="float">
            <text:p>0,00095416666666666700</text:p>
          </table:table-cell>
          <table:table-cell table:formula="of:=[.D231]-[.D23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36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958333333333333" calcext:value-type="float">
            <text:p>0,00095833333333333300</text:p>
          </table:table-cell>
          <table:table-cell table:formula="of:=[.D232]-[.D231]" office:value-type="float" office:value="0.00000416666666666675" calcext:value-type="float">
            <text:p>0,0000041666666666667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36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9625" calcext:value-type="float">
            <text:p>0,00096250000000000000</text:p>
          </table:table-cell>
          <table:table-cell table:formula="of:=[.D233]-[.D23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36" office:value-type="float" office:value="8352" calcext:value-type="float">
            <text:p>835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966666666666667" calcext:value-type="float">
            <text:p>0,00096666666666666700</text:p>
          </table:table-cell>
          <table:table-cell table:formula="of:=[.D234]-[.D23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36" office:value-type="float" office:value="8388" calcext:value-type="float">
            <text:p>8388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970833333333333" calcext:value-type="float">
            <text:p>0,00097083333333333300</text:p>
          </table:table-cell>
          <table:table-cell table:formula="of:=[.D235]-[.D23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36" office:value-type="float" office:value="8424" calcext:value-type="float">
            <text:p>842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975" calcext:value-type="float">
            <text:p>0,00097500000000000000</text:p>
          </table:table-cell>
          <table:table-cell table:formula="of:=[.D236]-[.D23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36" office:value-type="float" office:value="8460" calcext:value-type="float">
            <text:p>846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979166666666667" calcext:value-type="float">
            <text:p>0,00097916666666666700</text:p>
          </table:table-cell>
          <table:table-cell table:formula="of:=[.D237]-[.D23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36" office:value-type="float" office:value="8496" calcext:value-type="float">
            <text:p>849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983333333333333" calcext:value-type="float">
            <text:p>0,00098333333333333300</text:p>
          </table:table-cell>
          <table:table-cell table:formula="of:=[.D238]-[.D237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36" office:value-type="float" office:value="8532" calcext:value-type="float">
            <text:p>8532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9875" calcext:value-type="float">
            <text:p>0,00098750000000000000</text:p>
          </table:table-cell>
          <table:table-cell table:formula="of:=[.D239]-[.D23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36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991666666666667" calcext:value-type="float">
            <text:p>0,00099166666666666700</text:p>
          </table:table-cell>
          <table:table-cell table:formula="of:=[.D240]-[.D23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36" office:value-type="float" office:value="8604" calcext:value-type="float">
            <text:p>8604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995833333333333" calcext:value-type="float">
            <text:p>0,00099583333333333300</text:p>
          </table:table-cell>
          <table:table-cell table:formula="of:=[.D241]-[.D24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36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" calcext:value-type="float">
            <text:p>0,00100000000000000000</text:p>
          </table:table-cell>
          <table:table-cell table:formula="of:=[.D242]-[.D24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36" office:value-type="float" office:value="8676" calcext:value-type="float">
            <text:p>8676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00416666666667" calcext:value-type="float">
            <text:p>0,00100416666666667000</text:p>
          </table:table-cell>
          <table:table-cell table:formula="of:=[.D243]-[.D24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36" office:value-type="float" office:value="8712" calcext:value-type="float">
            <text:p>871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00833333333333" calcext:value-type="float">
            <text:p>0,00100833333333333000</text:p>
          </table:table-cell>
          <table:table-cell table:formula="of:=[.D244]-[.D24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36" office:value-type="float" office:value="8748" calcext:value-type="float">
            <text:p>8748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0125" calcext:value-type="float">
            <text:p>0,00101250000000000000</text:p>
          </table:table-cell>
          <table:table-cell table:formula="of:=[.D245]-[.D24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36" office:value-type="float" office:value="8784" calcext:value-type="float">
            <text:p>878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01666666666667" calcext:value-type="float">
            <text:p>0,00101666666666667000</text:p>
          </table:table-cell>
          <table:table-cell table:formula="of:=[.D246]-[.D24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36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02083333333333" calcext:value-type="float">
            <text:p>0,00102083333333333000</text:p>
          </table:table-cell>
          <table:table-cell table:formula="of:=[.D247]-[.D246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36" office:value-type="float" office:value="8856" calcext:value-type="float">
            <text:p>885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025" calcext:value-type="float">
            <text:p>0,00102500000000000000</text:p>
          </table:table-cell>
          <table:table-cell table:formula="of:=[.D248]-[.D24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36" office:value-type="float" office:value="8892" calcext:value-type="float">
            <text:p>8892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02916666666667" calcext:value-type="float">
            <text:p>0,00102916666666667000</text:p>
          </table:table-cell>
          <table:table-cell table:formula="of:=[.D249]-[.D24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36" office:value-type="float" office:value="8928" calcext:value-type="float">
            <text:p>892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03333333333333" calcext:value-type="float">
            <text:p>0,00103333333333333000</text:p>
          </table:table-cell>
          <table:table-cell table:formula="of:=[.D250]-[.D24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36" office:value-type="float" office:value="8964" calcext:value-type="float">
            <text:p>8964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0375" calcext:value-type="float">
            <text:p>0,00103750000000000000</text:p>
          </table:table-cell>
          <table:table-cell table:formula="of:=[.D251]-[.D25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36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04166666666667" calcext:value-type="float">
            <text:p>0,00104166666666667000</text:p>
          </table:table-cell>
          <table:table-cell table:formula="of:=[.D252]-[.D25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36" office:value-type="float" office:value="9036" calcext:value-type="float">
            <text:p>9036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04583333333333" calcext:value-type="float">
            <text:p>0,00104583333333333000</text:p>
          </table:table-cell>
          <table:table-cell table:formula="of:=[.D253]-[.D25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36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05" calcext:value-type="float">
            <text:p>0,00105000000000000000</text:p>
          </table:table-cell>
          <table:table-cell table:formula="of:=[.D254]-[.D25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36" office:value-type="float" office:value="9108" calcext:value-type="float">
            <text:p>9108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05416666666667" calcext:value-type="float">
            <text:p>0,00105416666666667000</text:p>
          </table:table-cell>
          <table:table-cell table:formula="of:=[.D255]-[.D254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36" office:value-type="float" office:value="9144" calcext:value-type="float">
            <text:p>914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05833333333333" calcext:value-type="float">
            <text:p>0,00105833333333333000</text:p>
          </table:table-cell>
          <table:table-cell table:formula="of:=[.D256]-[.D25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36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0625" calcext:value-type="float">
            <text:p>0,00106250000000000000</text:p>
          </table:table-cell>
          <table:table-cell table:formula="of:=[.D257]-[.D25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36" office:value-type="float" office:value="9216" calcext:value-type="float">
            <text:p>921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06666666666667" calcext:value-type="float">
            <text:p>0,00106666666666667000</text:p>
          </table:table-cell>
          <table:table-cell table:formula="of:=[.D258]-[.D25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36" office:value-type="float" office:value="9252" calcext:value-type="float">
            <text:p>9252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07083333333333" calcext:value-type="float">
            <text:p>0,00107083333333333000</text:p>
          </table:table-cell>
          <table:table-cell table:formula="of:=[.D259]-[.D25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36" office:value-type="float" office:value="9288" calcext:value-type="float">
            <text:p>928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075" calcext:value-type="float">
            <text:p>0,00107500000000000000</text:p>
          </table:table-cell>
          <table:table-cell table:formula="of:=[.D260]-[.D25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36" office:value-type="float" office:value="9324" calcext:value-type="float">
            <text:p>9324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07916666666667" calcext:value-type="float">
            <text:p>0,00107916666666667000</text:p>
          </table:table-cell>
          <table:table-cell table:formula="of:=[.D261]-[.D26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36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08333333333333" calcext:value-type="float">
            <text:p>0,00108333333333333000</text:p>
          </table:table-cell>
          <table:table-cell table:formula="of:=[.D262]-[.D26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36" office:value-type="float" office:value="9396" calcext:value-type="float">
            <text:p>9396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0875" calcext:value-type="float">
            <text:p>0,00108750000000000000</text:p>
          </table:table-cell>
          <table:table-cell table:formula="of:=[.D263]-[.D26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36" office:value-type="float" office:value="9432" calcext:value-type="float">
            <text:p>943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09166666666667" calcext:value-type="float">
            <text:p>0,00109166666666667000</text:p>
          </table:table-cell>
          <table:table-cell table:formula="of:=[.D264]-[.D263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36" office:value-type="float" office:value="9468" calcext:value-type="float">
            <text:p>9468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09583333333333" calcext:value-type="float">
            <text:p>0,00109583333333333000</text:p>
          </table:table-cell>
          <table:table-cell table:formula="of:=[.D265]-[.D26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36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1" calcext:value-type="float">
            <text:p>0,00110000000000000000</text:p>
          </table:table-cell>
          <table:table-cell table:formula="of:=[.D266]-[.D26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36" office:value-type="float" office:value="9540" calcext:value-type="float">
            <text:p>954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10416666666667" calcext:value-type="float">
            <text:p>0,00110416666666667000</text:p>
          </table:table-cell>
          <table:table-cell table:formula="of:=[.D267]-[.D26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36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10833333333333" calcext:value-type="float">
            <text:p>0,00110833333333333000</text:p>
          </table:table-cell>
          <table:table-cell table:formula="of:=[.D268]-[.D26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36" office:value-type="float" office:value="9612" calcext:value-type="float">
            <text:p>9612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1125" calcext:value-type="float">
            <text:p>0,00111250000000000000</text:p>
          </table:table-cell>
          <table:table-cell table:formula="of:=[.D269]-[.D26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36" office:value-type="float" office:value="9648" calcext:value-type="float">
            <text:p>964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11666666666667" calcext:value-type="float">
            <text:p>0,00111666666666667000</text:p>
          </table:table-cell>
          <table:table-cell table:formula="of:=[.D270]-[.D26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36" office:value-type="float" office:value="9684" calcext:value-type="float">
            <text:p>9684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12083333333333" calcext:value-type="float">
            <text:p>0,00112083333333333000</text:p>
          </table:table-cell>
          <table:table-cell table:formula="of:=[.D271]-[.D27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36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125" calcext:value-type="float">
            <text:p>0,00112500000000000000</text:p>
          </table:table-cell>
          <table:table-cell table:formula="of:=[.D272]-[.D271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36" office:value-type="float" office:value="9756" calcext:value-type="float">
            <text:p>9756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12916666666667" calcext:value-type="float">
            <text:p>0,00112916666666667000</text:p>
          </table:table-cell>
          <table:table-cell table:formula="of:=[.D273]-[.D27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36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13333333333333" calcext:value-type="float">
            <text:p>0,00113333333333333000</text:p>
          </table:table-cell>
          <table:table-cell table:formula="of:=[.D274]-[.D27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36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1375" calcext:value-type="float">
            <text:p>0,00113750000000000000</text:p>
          </table:table-cell>
          <table:table-cell table:formula="of:=[.D275]-[.D27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36" office:value-type="float" office:value="9864" calcext:value-type="float">
            <text:p>986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14166666666667" calcext:value-type="float">
            <text:p>0,00114166666666667000</text:p>
          </table:table-cell>
          <table:table-cell table:formula="of:=[.D276]-[.D27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36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14583333333333" calcext:value-type="float">
            <text:p>0,00114583333333333000</text:p>
          </table:table-cell>
          <table:table-cell table:formula="of:=[.D277]-[.D27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36" office:value-type="float" office:value="9936" calcext:value-type="float">
            <text:p>993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15" calcext:value-type="float">
            <text:p>0,00115000000000000000</text:p>
          </table:table-cell>
          <table:table-cell table:formula="of:=[.D278]-[.D27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36" office:value-type="float" office:value="9972" calcext:value-type="float">
            <text:p>9972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15416666666667" calcext:value-type="float">
            <text:p>0,00115416666666667000</text:p>
          </table:table-cell>
          <table:table-cell table:formula="of:=[.D279]-[.D27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36" office:value-type="float" office:value="10008" calcext:value-type="float">
            <text:p>1000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15833333333333" calcext:value-type="float">
            <text:p>0,00115833333333333000</text:p>
          </table:table-cell>
          <table:table-cell table:formula="of:=[.D280]-[.D27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36" office:value-type="float" office:value="10044" calcext:value-type="float">
            <text:p>10044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1625" calcext:value-type="float">
            <text:p>0,00116250000000000000</text:p>
          </table:table-cell>
          <table:table-cell table:formula="of:=[.D281]-[.D280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36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16666666666667" calcext:value-type="float">
            <text:p>0,00116666666666667000</text:p>
          </table:table-cell>
          <table:table-cell table:formula="of:=[.D282]-[.D28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36" office:value-type="float" office:value="10116" calcext:value-type="float">
            <text:p>10116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17083333333333" calcext:value-type="float">
            <text:p>0,00117083333333333000</text:p>
          </table:table-cell>
          <table:table-cell table:formula="of:=[.D283]-[.D28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36" office:value-type="float" office:value="10152" calcext:value-type="float">
            <text:p>10152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175" calcext:value-type="float">
            <text:p>0,00117500000000000000</text:p>
          </table:table-cell>
          <table:table-cell table:formula="of:=[.D284]-[.D28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36" office:value-type="float" office:value="10188" calcext:value-type="float">
            <text:p>10188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17916666666667" calcext:value-type="float">
            <text:p>0,00117916666666667000</text:p>
          </table:table-cell>
          <table:table-cell table:formula="of:=[.D285]-[.D28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36" office:value-type="float" office:value="10224" calcext:value-type="float">
            <text:p>10224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18333333333333" calcext:value-type="float">
            <text:p>0,00118333333333333000</text:p>
          </table:table-cell>
          <table:table-cell table:formula="of:=[.D286]-[.D28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36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1875" calcext:value-type="float">
            <text:p>0,00118750000000000000</text:p>
          </table:table-cell>
          <table:table-cell table:formula="of:=[.D287]-[.D28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36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19166666666667" calcext:value-type="float">
            <text:p>0,00119166666666667000</text:p>
          </table:table-cell>
          <table:table-cell table:formula="of:=[.D288]-[.D28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36" office:value-type="float" office:value="10332" calcext:value-type="float">
            <text:p>10332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19583333333333" calcext:value-type="float">
            <text:p>0,00119583333333333000</text:p>
          </table:table-cell>
          <table:table-cell table:formula="of:=[.D289]-[.D28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36" office:value-type="float" office:value="10368" calcext:value-type="float">
            <text:p>10368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2" calcext:value-type="float">
            <text:p>0,00120000000000000000</text:p>
          </table:table-cell>
          <table:table-cell table:formula="of:=[.D290]-[.D289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36" office:value-type="float" office:value="10404" calcext:value-type="float">
            <text:p>10404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20416666666667" calcext:value-type="float">
            <text:p>0,00120416666666667000</text:p>
          </table:table-cell>
          <table:table-cell table:formula="of:=[.D291]-[.D29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36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20833333333333" calcext:value-type="float">
            <text:p>0,00120833333333333000</text:p>
          </table:table-cell>
          <table:table-cell table:formula="of:=[.D292]-[.D29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36" office:value-type="float" office:value="10476" calcext:value-type="float">
            <text:p>10476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2125" calcext:value-type="float">
            <text:p>0,00121250000000000000</text:p>
          </table:table-cell>
          <table:table-cell table:formula="of:=[.D293]-[.D29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36" office:value-type="float" office:value="10512" calcext:value-type="float">
            <text:p>10512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21666666666667" calcext:value-type="float">
            <text:p>0,00121666666666667000</text:p>
          </table:table-cell>
          <table:table-cell table:formula="of:=[.D294]-[.D29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36" office:value-type="float" office:value="10548" calcext:value-type="float">
            <text:p>10548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22083333333333" calcext:value-type="float">
            <text:p>0,00122083333333333000</text:p>
          </table:table-cell>
          <table:table-cell table:formula="of:=[.D295]-[.D29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36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225" calcext:value-type="float">
            <text:p>0,00122500000000000000</text:p>
          </table:table-cell>
          <table:table-cell table:formula="of:=[.D296]-[.D29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36" office:value-type="float" office:value="10620" calcext:value-type="float">
            <text:p>1062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22916666666667" calcext:value-type="float">
            <text:p>0,00122916666666667000</text:p>
          </table:table-cell>
          <table:table-cell table:formula="of:=[.D297]-[.D29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36" office:value-type="float" office:value="10656" calcext:value-type="float">
            <text:p>10656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23333333333333" calcext:value-type="float">
            <text:p>0,00123333333333333000</text:p>
          </table:table-cell>
          <table:table-cell table:formula="of:=[.D298]-[.D297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36" office:value-type="float" office:value="10692" calcext:value-type="float">
            <text:p>10692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2375" calcext:value-type="float">
            <text:p>0,00123750000000000000</text:p>
          </table:table-cell>
          <table:table-cell table:formula="of:=[.D299]-[.D29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36" office:value-type="float" office:value="10728" calcext:value-type="float">
            <text:p>10728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24166666666667" calcext:value-type="float">
            <text:p>0,00124166666666667000</text:p>
          </table:table-cell>
          <table:table-cell table:formula="of:=[.D300]-[.D29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36" office:value-type="float" office:value="10764" calcext:value-type="float">
            <text:p>10764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24583333333333" calcext:value-type="float">
            <text:p>0,00124583333333333000</text:p>
          </table:table-cell>
          <table:table-cell table:formula="of:=[.D301]-[.D30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36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25" calcext:value-type="float">
            <text:p>0,00125000000000000000</text:p>
          </table:table-cell>
          <table:table-cell table:formula="of:=[.D302]-[.D30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36" office:value-type="float" office:value="10836" calcext:value-type="float">
            <text:p>10836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25416666666667" calcext:value-type="float">
            <text:p>0,00125416666666667000</text:p>
          </table:table-cell>
          <table:table-cell table:formula="of:=[.D303]-[.D30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36" office:value-type="float" office:value="10872" calcext:value-type="float">
            <text:p>10872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25833333333333" calcext:value-type="float">
            <text:p>0,00125833333333333000</text:p>
          </table:table-cell>
          <table:table-cell table:formula="of:=[.D304]-[.D30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36" office:value-type="float" office:value="10908" calcext:value-type="float">
            <text:p>10908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2625" calcext:value-type="float">
            <text:p>0,00126250000000000000</text:p>
          </table:table-cell>
          <table:table-cell table:formula="of:=[.D305]-[.D30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36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26666666666667" calcext:value-type="float">
            <text:p>0,00126666666666667000</text:p>
          </table:table-cell>
          <table:table-cell table:formula="of:=[.D306]-[.D30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36" office:value-type="float" office:value="10980" calcext:value-type="float">
            <text:p>1098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27083333333333" calcext:value-type="float">
            <text:p>0,00127083333333333000</text:p>
          </table:table-cell>
          <table:table-cell table:formula="of:=[.D307]-[.D306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36" office:value-type="float" office:value="11016" calcext:value-type="float">
            <text:p>11016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275" calcext:value-type="float">
            <text:p>0,00127500000000000000</text:p>
          </table:table-cell>
          <table:table-cell table:formula="of:=[.D308]-[.D30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36" office:value-type="float" office:value="11052" calcext:value-type="float">
            <text:p>11052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27916666666667" calcext:value-type="float">
            <text:p>0,00127916666666667000</text:p>
          </table:table-cell>
          <table:table-cell table:formula="of:=[.D309]-[.D30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36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28333333333333" calcext:value-type="float">
            <text:p>0,00128333333333333000</text:p>
          </table:table-cell>
          <table:table-cell table:formula="of:=[.D310]-[.D30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36" office:value-type="float" office:value="11124" calcext:value-type="float">
            <text:p>11124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2875" calcext:value-type="float">
            <text:p>0,00128750000000000000</text:p>
          </table:table-cell>
          <table:table-cell table:formula="of:=[.D311]-[.D31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36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29166666666667" calcext:value-type="float">
            <text:p>0,00129166666666667000</text:p>
          </table:table-cell>
          <table:table-cell table:formula="of:=[.D312]-[.D31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36" office:value-type="float" office:value="11196" calcext:value-type="float">
            <text:p>11196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29583333333333" calcext:value-type="float">
            <text:p>0,00129583333333333000</text:p>
          </table:table-cell>
          <table:table-cell table:formula="of:=[.D313]-[.D31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36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3" calcext:value-type="float">
            <text:p>0,00130000000000000000</text:p>
          </table:table-cell>
          <table:table-cell table:formula="of:=[.D314]-[.D31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36" office:value-type="float" office:value="11268" calcext:value-type="float">
            <text:p>11268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30416666666667" calcext:value-type="float">
            <text:p>0,00130416666666667000</text:p>
          </table:table-cell>
          <table:table-cell table:formula="of:=[.D315]-[.D314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36" office:value-type="float" office:value="11304" calcext:value-type="float">
            <text:p>11304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30833333333333" calcext:value-type="float">
            <text:p>0,00130833333333333000</text:p>
          </table:table-cell>
          <table:table-cell table:formula="of:=[.D316]-[.D31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36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3125" calcext:value-type="float">
            <text:p>0,00131250000000000000</text:p>
          </table:table-cell>
          <table:table-cell table:formula="of:=[.D317]-[.D31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36" office:value-type="float" office:value="11376" calcext:value-type="float">
            <text:p>11376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31666666666667" calcext:value-type="float">
            <text:p>0,00131666666666667000</text:p>
          </table:table-cell>
          <table:table-cell table:formula="of:=[.D318]-[.D31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36" office:value-type="float" office:value="11412" calcext:value-type="float">
            <text:p>11412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32083333333333" calcext:value-type="float">
            <text:p>0,00132083333333333000</text:p>
          </table:table-cell>
          <table:table-cell table:formula="of:=[.D319]-[.D31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36" office:value-type="float" office:value="11448" calcext:value-type="float">
            <text:p>11448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325" calcext:value-type="float">
            <text:p>0,00132500000000000000</text:p>
          </table:table-cell>
          <table:table-cell table:formula="of:=[.D320]-[.D31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36" office:value-type="float" office:value="11484" calcext:value-type="float">
            <text:p>11484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32916666666667" calcext:value-type="float">
            <text:p>0,00132916666666667000</text:p>
          </table:table-cell>
          <table:table-cell table:formula="of:=[.D321]-[.D32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36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33333333333333" calcext:value-type="float">
            <text:p>0,00133333333333333000</text:p>
          </table:table-cell>
          <table:table-cell table:formula="of:=[.D322]-[.D32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36" office:value-type="float" office:value="11556" calcext:value-type="float">
            <text:p>11556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3375" calcext:value-type="float">
            <text:p>0,00133750000000000000</text:p>
          </table:table-cell>
          <table:table-cell table:formula="of:=[.D323]-[.D32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36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34166666666667" calcext:value-type="float">
            <text:p>0,00134166666666667000</text:p>
          </table:table-cell>
          <table:table-cell table:formula="of:=[.D324]-[.D323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36" office:value-type="float" office:value="11628" calcext:value-type="float">
            <text:p>11628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34583333333333" calcext:value-type="float">
            <text:p>0,00134583333333333000</text:p>
          </table:table-cell>
          <table:table-cell table:formula="of:=[.D325]-[.D32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36" office:value-type="float" office:value="11664" calcext:value-type="float">
            <text:p>11664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35" calcext:value-type="float">
            <text:p>0,00135000000000000000</text:p>
          </table:table-cell>
          <table:table-cell table:formula="of:=[.D326]-[.D32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36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35416666666667" calcext:value-type="float">
            <text:p>0,00135416666666667000</text:p>
          </table:table-cell>
          <table:table-cell table:formula="of:=[.D327]-[.D32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36" office:value-type="float" office:value="11736" calcext:value-type="float">
            <text:p>11736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35833333333333" calcext:value-type="float">
            <text:p>0,00135833333333333000</text:p>
          </table:table-cell>
          <table:table-cell table:formula="of:=[.D328]-[.D32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36" office:value-type="float" office:value="11772" calcext:value-type="float">
            <text:p>11772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3625" calcext:value-type="float">
            <text:p>0,00136250000000000000</text:p>
          </table:table-cell>
          <table:table-cell table:formula="of:=[.D329]-[.D32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36" office:value-type="float" office:value="11808" calcext:value-type="float">
            <text:p>11808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36666666666667" calcext:value-type="float">
            <text:p>0,00136666666666667000</text:p>
          </table:table-cell>
          <table:table-cell table:formula="of:=[.D330]-[.D32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36" office:value-type="float" office:value="11844" calcext:value-type="float">
            <text:p>11844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37083333333333" calcext:value-type="float">
            <text:p>0,00137083333333333000</text:p>
          </table:table-cell>
          <table:table-cell table:formula="of:=[.D331]-[.D33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36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375" calcext:value-type="float">
            <text:p>0,00137500000000000000</text:p>
          </table:table-cell>
          <table:table-cell table:formula="of:=[.D332]-[.D33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36" office:value-type="float" office:value="11916" calcext:value-type="float">
            <text:p>11916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37916666666667" calcext:value-type="float">
            <text:p>0,00137916666666667000</text:p>
          </table:table-cell>
          <table:table-cell table:formula="of:=[.D333]-[.D332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36" office:value-type="float" office:value="11952" calcext:value-type="float">
            <text:p>11952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38333333333333" calcext:value-type="float">
            <text:p>0,00138333333333333000</text:p>
          </table:table-cell>
          <table:table-cell table:formula="of:=[.D334]-[.D33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36" office:value-type="float" office:value="11988" calcext:value-type="float">
            <text:p>11988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3875" calcext:value-type="float">
            <text:p>0,00138750000000000000</text:p>
          </table:table-cell>
          <table:table-cell table:formula="of:=[.D335]-[.D33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36" office:value-type="float" office:value="12024" calcext:value-type="float">
            <text:p>12024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39166666666667" calcext:value-type="float">
            <text:p>0,00139166666666667000</text:p>
          </table:table-cell>
          <table:table-cell table:formula="of:=[.D336]-[.D33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36" office:value-type="float" office:value="12060" calcext:value-type="float">
            <text:p>1206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39583333333333" calcext:value-type="float">
            <text:p>0,00139583333333333000</text:p>
          </table:table-cell>
          <table:table-cell table:formula="of:=[.D337]-[.D33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36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4" calcext:value-type="float">
            <text:p>0,00140000000000000000</text:p>
          </table:table-cell>
          <table:table-cell table:formula="of:=[.D338]-[.D33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36" office:value-type="float" office:value="12132" calcext:value-type="float">
            <text:p>12132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40416666666667" calcext:value-type="float">
            <text:p>0,00140416666666667000</text:p>
          </table:table-cell>
          <table:table-cell table:formula="of:=[.D339]-[.D33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36" office:value-type="float" office:value="12168" calcext:value-type="float">
            <text:p>12168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40833333333333" calcext:value-type="float">
            <text:p>0,00140833333333333000</text:p>
          </table:table-cell>
          <table:table-cell table:formula="of:=[.D340]-[.D33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36" office:value-type="float" office:value="12204" calcext:value-type="float">
            <text:p>12204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4125" calcext:value-type="float">
            <text:p>0,00141250000000000000</text:p>
          </table:table-cell>
          <table:table-cell table:formula="of:=[.D341]-[.D340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36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41666666666667" calcext:value-type="float">
            <text:p>0,00141666666666667000</text:p>
          </table:table-cell>
          <table:table-cell table:formula="of:=[.D342]-[.D34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36" office:value-type="float" office:value="12276" calcext:value-type="float">
            <text:p>12276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42083333333333" calcext:value-type="float">
            <text:p>0,00142083333333333000</text:p>
          </table:table-cell>
          <table:table-cell table:formula="of:=[.D343]-[.D34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36" office:value-type="float" office:value="12312" calcext:value-type="float">
            <text:p>12312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425" calcext:value-type="float">
            <text:p>0,00142500000000000000</text:p>
          </table:table-cell>
          <table:table-cell table:formula="of:=[.D344]-[.D34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36" office:value-type="float" office:value="12348" calcext:value-type="float">
            <text:p>12348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42916666666667" calcext:value-type="float">
            <text:p>0,00142916666666667000</text:p>
          </table:table-cell>
          <table:table-cell table:formula="of:=[.D345]-[.D34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36" office:value-type="float" office:value="12384" calcext:value-type="float">
            <text:p>12384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43333333333333" calcext:value-type="float">
            <text:p>0,00143333333333333000</text:p>
          </table:table-cell>
          <table:table-cell table:formula="of:=[.D346]-[.D34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36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4375" calcext:value-type="float">
            <text:p>0,00143750000000000000</text:p>
          </table:table-cell>
          <table:table-cell table:formula="of:=[.D347]-[.D34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36" office:value-type="float" office:value="12456" calcext:value-type="float">
            <text:p>12456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44166666666667" calcext:value-type="float">
            <text:p>0,00144166666666667000</text:p>
          </table:table-cell>
          <table:table-cell table:formula="of:=[.D348]-[.D34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36" office:value-type="float" office:value="12492" calcext:value-type="float">
            <text:p>12492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44583333333333" calcext:value-type="float">
            <text:p>0,00144583333333333000</text:p>
          </table:table-cell>
          <table:table-cell table:formula="of:=[.D349]-[.D34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36" office:value-type="float" office:value="12528" calcext:value-type="float">
            <text:p>12528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45" calcext:value-type="float">
            <text:p>0,00145000000000000000</text:p>
          </table:table-cell>
          <table:table-cell table:formula="of:=[.D350]-[.D349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36" office:value-type="float" office:value="12564" calcext:value-type="float">
            <text:p>12564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45416666666667" calcext:value-type="float">
            <text:p>0,00145416666666667000</text:p>
          </table:table-cell>
          <table:table-cell table:formula="of:=[.D351]-[.D35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36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45833333333333" calcext:value-type="float">
            <text:p>0,00145833333333333000</text:p>
          </table:table-cell>
          <table:table-cell table:formula="of:=[.D352]-[.D35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36" office:value-type="float" office:value="12636" calcext:value-type="float">
            <text:p>12636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4625" calcext:value-type="float">
            <text:p>0,00146250000000000000</text:p>
          </table:table-cell>
          <table:table-cell table:formula="of:=[.D353]-[.D35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36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46666666666667" calcext:value-type="float">
            <text:p>0,00146666666666667000</text:p>
          </table:table-cell>
          <table:table-cell table:formula="of:=[.D354]-[.D35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36" office:value-type="float" office:value="12708" calcext:value-type="float">
            <text:p>12708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47083333333333" calcext:value-type="float">
            <text:p>0,00147083333333333000</text:p>
          </table:table-cell>
          <table:table-cell table:formula="of:=[.D355]-[.D35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36" office:value-type="float" office:value="12744" calcext:value-type="float">
            <text:p>12744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475" calcext:value-type="float">
            <text:p>0,00147500000000000000</text:p>
          </table:table-cell>
          <table:table-cell table:formula="of:=[.D356]-[.D35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36" office:value-type="float" office:value="12780" calcext:value-type="float">
            <text:p>1278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47916666666667" calcext:value-type="float">
            <text:p>0,00147916666666667000</text:p>
          </table:table-cell>
          <table:table-cell table:formula="of:=[.D357]-[.D35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36" office:value-type="float" office:value="12816" calcext:value-type="float">
            <text:p>12816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48333333333333" calcext:value-type="float">
            <text:p>0,00148333333333333000</text:p>
          </table:table-cell>
          <table:table-cell table:formula="of:=[.D358]-[.D357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36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4875" calcext:value-type="float">
            <text:p>0,00148750000000000000</text:p>
          </table:table-cell>
          <table:table-cell table:formula="of:=[.D359]-[.D35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36" office:value-type="float" office:value="12888" calcext:value-type="float">
            <text:p>12888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49166666666667" calcext:value-type="float">
            <text:p>0,00149166666666667000</text:p>
          </table:table-cell>
          <table:table-cell table:formula="of:=[.D360]-[.D35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36" office:value-type="float" office:value="12924" calcext:value-type="float">
            <text:p>12924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49583333333333" calcext:value-type="float">
            <text:p>0,00149583333333333000</text:p>
          </table:table-cell>
          <table:table-cell table:formula="of:=[.D361]-[.D36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36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5" calcext:value-type="float">
            <text:p>0,00150000000000000000</text:p>
          </table:table-cell>
          <table:table-cell table:formula="of:=[.D362]-[.D36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36" office:value-type="float" office:value="12996" calcext:value-type="float">
            <text:p>12996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50416666666667" calcext:value-type="float">
            <text:p>0,00150416666666667000</text:p>
          </table:table-cell>
          <table:table-cell table:formula="of:=[.D363]-[.D36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36" office:value-type="float" office:value="13032" calcext:value-type="float">
            <text:p>13032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50833333333333" calcext:value-type="float">
            <text:p>0,00150833333333333000</text:p>
          </table:table-cell>
          <table:table-cell table:formula="of:=[.D364]-[.D36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36" office:value-type="float" office:value="13068" calcext:value-type="float">
            <text:p>13068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5125" calcext:value-type="float">
            <text:p>0,00151250000000000000</text:p>
          </table:table-cell>
          <table:table-cell table:formula="of:=[.D365]-[.D36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36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51666666666667" calcext:value-type="float">
            <text:p>0,00151666666666667000</text:p>
          </table:table-cell>
          <table:table-cell table:formula="of:=[.D366]-[.D36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36" office:value-type="float" office:value="13140" calcext:value-type="float">
            <text:p>1314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52083333333333" calcext:value-type="float">
            <text:p>0,00152083333333333000</text:p>
          </table:table-cell>
          <table:table-cell table:formula="of:=[.D367]-[.D366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36" office:value-type="float" office:value="13176" calcext:value-type="float">
            <text:p>13176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525" calcext:value-type="float">
            <text:p>0,00152500000000000000</text:p>
          </table:table-cell>
          <table:table-cell table:formula="of:=[.D368]-[.D36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36" office:value-type="float" office:value="13212" calcext:value-type="float">
            <text:p>13212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52916666666667" calcext:value-type="float">
            <text:p>0,00152916666666667000</text:p>
          </table:table-cell>
          <table:table-cell table:formula="of:=[.D369]-[.D36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36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53333333333333" calcext:value-type="float">
            <text:p>0,00153333333333333000</text:p>
          </table:table-cell>
          <table:table-cell table:formula="of:=[.D370]-[.D36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36" office:value-type="float" office:value="13284" calcext:value-type="float">
            <text:p>13284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5375" calcext:value-type="float">
            <text:p>0,00153750000000000000</text:p>
          </table:table-cell>
          <table:table-cell table:formula="of:=[.D371]-[.D37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36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54166666666667" calcext:value-type="float">
            <text:p>0,00154166666666667000</text:p>
          </table:table-cell>
          <table:table-cell table:formula="of:=[.D372]-[.D37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36" office:value-type="float" office:value="13356" calcext:value-type="float">
            <text:p>13356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54583333333333" calcext:value-type="float">
            <text:p>0,00154583333333333000</text:p>
          </table:table-cell>
          <table:table-cell table:formula="of:=[.D373]-[.D37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36" office:value-type="float" office:value="13392" calcext:value-type="float">
            <text:p>13392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55" calcext:value-type="float">
            <text:p>0,00155000000000000000</text:p>
          </table:table-cell>
          <table:table-cell table:formula="of:=[.D374]-[.D37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36" office:value-type="float" office:value="13428" calcext:value-type="float">
            <text:p>13428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55416666666667" calcext:value-type="float">
            <text:p>0,00155416666666667000</text:p>
          </table:table-cell>
          <table:table-cell table:formula="of:=[.D375]-[.D37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36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55833333333333" calcext:value-type="float">
            <text:p>0,00155833333333333000</text:p>
          </table:table-cell>
          <table:table-cell table:formula="of:=[.D376]-[.D375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36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5625" calcext:value-type="float">
            <text:p>0,00156250000000000000</text:p>
          </table:table-cell>
          <table:table-cell table:formula="of:=[.D377]-[.D37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36" office:value-type="float" office:value="13536" calcext:value-type="float">
            <text:p>13536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56666666666667" calcext:value-type="float">
            <text:p>0,00156666666666667000</text:p>
          </table:table-cell>
          <table:table-cell table:formula="of:=[.D378]-[.D37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36" office:value-type="float" office:value="13572" calcext:value-type="float">
            <text:p>13572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57083333333333" calcext:value-type="float">
            <text:p>0,00157083333333333000</text:p>
          </table:table-cell>
          <table:table-cell table:formula="of:=[.D379]-[.D37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36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575" calcext:value-type="float">
            <text:p>0,00157500000000000000</text:p>
          </table:table-cell>
          <table:table-cell table:formula="of:=[.D380]-[.D37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36" office:value-type="float" office:value="13644" calcext:value-type="float">
            <text:p>13644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57916666666667" calcext:value-type="float">
            <text:p>0,00157916666666667000</text:p>
          </table:table-cell>
          <table:table-cell table:formula="of:=[.D381]-[.D38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36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58333333333333" calcext:value-type="float">
            <text:p>0,00158333333333333000</text:p>
          </table:table-cell>
          <table:table-cell table:formula="of:=[.D382]-[.D38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36" office:value-type="float" office:value="13716" calcext:value-type="float">
            <text:p>13716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5875" calcext:value-type="float">
            <text:p>0,00158750000000000000</text:p>
          </table:table-cell>
          <table:table-cell table:formula="of:=[.D383]-[.D38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36" office:value-type="float" office:value="13752" calcext:value-type="float">
            <text:p>13752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59166666666667" calcext:value-type="float">
            <text:p>0,00159166666666667000</text:p>
          </table:table-cell>
          <table:table-cell table:formula="of:=[.D384]-[.D383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36" office:value-type="float" office:value="13788" calcext:value-type="float">
            <text:p>13788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59583333333333" calcext:value-type="float">
            <text:p>0,00159583333333333000</text:p>
          </table:table-cell>
          <table:table-cell table:formula="of:=[.D385]-[.D38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36" office:value-type="float" office:value="13824" calcext:value-type="float">
            <text:p>13824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6" calcext:value-type="float">
            <text:p>0,00160000000000000000</text:p>
          </table:table-cell>
          <table:table-cell table:formula="of:=[.D386]-[.D38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36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60416666666667" calcext:value-type="float">
            <text:p>0,00160416666666667000</text:p>
          </table:table-cell>
          <table:table-cell table:formula="of:=[.D387]-[.D38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36" office:value-type="float" office:value="13896" calcext:value-type="float">
            <text:p>13896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60833333333333" calcext:value-type="float">
            <text:p>0,00160833333333333000</text:p>
          </table:table-cell>
          <table:table-cell table:formula="of:=[.D388]-[.D38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36" office:value-type="float" office:value="13932" calcext:value-type="float">
            <text:p>13932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6125" calcext:value-type="float">
            <text:p>0,00161250000000000000</text:p>
          </table:table-cell>
          <table:table-cell table:formula="of:=[.D389]-[.D38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36" office:value-type="float" office:value="13968" calcext:value-type="float">
            <text:p>13968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61666666666667" calcext:value-type="float">
            <text:p>0,00161666666666667000</text:p>
          </table:table-cell>
          <table:table-cell table:formula="of:=[.D390]-[.D38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36" office:value-type="float" office:value="14004" calcext:value-type="float">
            <text:p>14004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62083333333333" calcext:value-type="float">
            <text:p>0,00162083333333333000</text:p>
          </table:table-cell>
          <table:table-cell table:formula="of:=[.D391]-[.D39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36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625" calcext:value-type="float">
            <text:p>0,00162500000000000000</text:p>
          </table:table-cell>
          <table:table-cell table:formula="of:=[.D392]-[.D39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36" office:value-type="float" office:value="14076" calcext:value-type="float">
            <text:p>14076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62916666666667" calcext:value-type="float">
            <text:p>0,00162916666666667000</text:p>
          </table:table-cell>
          <table:table-cell table:formula="of:=[.D393]-[.D392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36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63333333333333" calcext:value-type="float">
            <text:p>0,00163333333333333000</text:p>
          </table:table-cell>
          <table:table-cell table:formula="of:=[.D394]-[.D39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36" office:value-type="float" office:value="14148" calcext:value-type="float">
            <text:p>14148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6375" calcext:value-type="float">
            <text:p>0,00163750000000000000</text:p>
          </table:table-cell>
          <table:table-cell table:formula="of:=[.D395]-[.D39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36" office:value-type="float" office:value="14184" calcext:value-type="float">
            <text:p>14184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64166666666667" calcext:value-type="float">
            <text:p>0,00164166666666667000</text:p>
          </table:table-cell>
          <table:table-cell table:formula="of:=[.D396]-[.D39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36" office:value-type="float" office:value="14220" calcext:value-type="float">
            <text:p>1422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64583333333333" calcext:value-type="float">
            <text:p>0,00164583333333333000</text:p>
          </table:table-cell>
          <table:table-cell table:formula="of:=[.D397]-[.D39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36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65" calcext:value-type="float">
            <text:p>0,00165000000000000000</text:p>
          </table:table-cell>
          <table:table-cell table:formula="of:=[.D398]-[.D39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36" office:value-type="float" office:value="14292" calcext:value-type="float">
            <text:p>14292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65416666666667" calcext:value-type="float">
            <text:p>0,00165416666666667000</text:p>
          </table:table-cell>
          <table:table-cell table:formula="of:=[.D399]-[.D39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36" office:value-type="float" office:value="14328" calcext:value-type="float">
            <text:p>14328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65833333333333" calcext:value-type="float">
            <text:p>0,00165833333333333000</text:p>
          </table:table-cell>
          <table:table-cell table:formula="of:=[.D400]-[.D39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36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6625" calcext:value-type="float">
            <text:p>0,00166250000000000000</text:p>
          </table:table-cell>
          <table:table-cell table:formula="of:=[.D401]-[.D400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36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66666666666667" calcext:value-type="float">
            <text:p>0,00166666666666667000</text:p>
          </table:table-cell>
          <table:table-cell table:formula="of:=[.D402]-[.D40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36" office:value-type="float" office:value="14436" calcext:value-type="float">
            <text:p>14436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67083333333333" calcext:value-type="float">
            <text:p>0,00167083333333333000</text:p>
          </table:table-cell>
          <table:table-cell table:formula="of:=[.D403]-[.D40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36" office:value-type="float" office:value="14472" calcext:value-type="float">
            <text:p>14472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675" calcext:value-type="float">
            <text:p>0,00167500000000000000</text:p>
          </table:table-cell>
          <table:table-cell table:formula="of:=[.D404]-[.D40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36" office:value-type="float" office:value="14508" calcext:value-type="float">
            <text:p>14508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67916666666667" calcext:value-type="float">
            <text:p>0,00167916666666667000</text:p>
          </table:table-cell>
          <table:table-cell table:formula="of:=[.D405]-[.D40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36" office:value-type="float" office:value="14544" calcext:value-type="float">
            <text:p>14544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68333333333333" calcext:value-type="float">
            <text:p>0,00168333333333333000</text:p>
          </table:table-cell>
          <table:table-cell table:formula="of:=[.D406]-[.D40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36" office:value-type="float" office:value="14580" calcext:value-type="float">
            <text:p>1458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6875" calcext:value-type="float">
            <text:p>0,00168750000000000000</text:p>
          </table:table-cell>
          <table:table-cell table:formula="of:=[.D407]-[.D40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36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69166666666667" calcext:value-type="float">
            <text:p>0,00169166666666667000</text:p>
          </table:table-cell>
          <table:table-cell table:formula="of:=[.D408]-[.D40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36" office:value-type="float" office:value="14652" calcext:value-type="float">
            <text:p>14652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69583333333333" calcext:value-type="float">
            <text:p>0,00169583333333333000</text:p>
          </table:table-cell>
          <table:table-cell table:formula="of:=[.D409]-[.D40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36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7" calcext:value-type="float">
            <text:p>0,00170000000000000000</text:p>
          </table:table-cell>
          <table:table-cell table:formula="of:=[.D410]-[.D409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36" office:value-type="float" office:value="14724" calcext:value-type="float">
            <text:p>14724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70416666666667" calcext:value-type="float">
            <text:p>0,00170416666666667000</text:p>
          </table:table-cell>
          <table:table-cell table:formula="of:=[.D411]-[.D41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36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70833333333333" calcext:value-type="float">
            <text:p>0,00170833333333333000</text:p>
          </table:table-cell>
          <table:table-cell table:formula="of:=[.D412]-[.D41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36" office:value-type="float" office:value="14796" calcext:value-type="float">
            <text:p>14796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7125" calcext:value-type="float">
            <text:p>0,00171250000000000000</text:p>
          </table:table-cell>
          <table:table-cell table:formula="of:=[.D413]-[.D41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36" office:value-type="float" office:value="14832" calcext:value-type="float">
            <text:p>14832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71666666666667" calcext:value-type="float">
            <text:p>0,00171666666666667000</text:p>
          </table:table-cell>
          <table:table-cell table:formula="of:=[.D414]-[.D41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36" office:value-type="float" office:value="14868" calcext:value-type="float">
            <text:p>14868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72083333333333" calcext:value-type="float">
            <text:p>0,00172083333333333000</text:p>
          </table:table-cell>
          <table:table-cell table:formula="of:=[.D415]-[.D41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36" office:value-type="float" office:value="14904" calcext:value-type="float">
            <text:p>14904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725" calcext:value-type="float">
            <text:p>0,00172500000000000000</text:p>
          </table:table-cell>
          <table:table-cell table:formula="of:=[.D416]-[.D41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36" office:value-type="float" office:value="14940" calcext:value-type="float">
            <text:p>1494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72916666666667" calcext:value-type="float">
            <text:p>0,00172916666666667000</text:p>
          </table:table-cell>
          <table:table-cell table:formula="of:=[.D417]-[.D41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36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73333333333333" calcext:value-type="float">
            <text:p>0,00173333333333333000</text:p>
          </table:table-cell>
          <table:table-cell table:formula="of:=[.D418]-[.D41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36" office:value-type="float" office:value="15012" calcext:value-type="float">
            <text:p>15012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7375" calcext:value-type="float">
            <text:p>0,00173750000000000000</text:p>
          </table:table-cell>
          <table:table-cell table:formula="of:=[.D419]-[.D418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36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74166666666667" calcext:value-type="float">
            <text:p>0,00174166666666667000</text:p>
          </table:table-cell>
          <table:table-cell table:formula="of:=[.D420]-[.D41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36" office:value-type="float" office:value="15084" calcext:value-type="float">
            <text:p>15084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74583333333333" calcext:value-type="float">
            <text:p>0,00174583333333333000</text:p>
          </table:table-cell>
          <table:table-cell table:formula="of:=[.D421]-[.D42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36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75" calcext:value-type="float">
            <text:p>0,00175000000000000000</text:p>
          </table:table-cell>
          <table:table-cell table:formula="of:=[.D422]-[.D42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36" office:value-type="float" office:value="15156" calcext:value-type="float">
            <text:p>15156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75416666666667" calcext:value-type="float">
            <text:p>0,00175416666666667000</text:p>
          </table:table-cell>
          <table:table-cell table:formula="of:=[.D423]-[.D42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36" office:value-type="float" office:value="15192" calcext:value-type="float">
            <text:p>15192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75833333333333" calcext:value-type="float">
            <text:p>0,00175833333333333000</text:p>
          </table:table-cell>
          <table:table-cell table:formula="of:=[.D424]-[.D42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36" office:value-type="float" office:value="15228" calcext:value-type="float">
            <text:p>15228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7625" calcext:value-type="float">
            <text:p>0,00176250000000000000</text:p>
          </table:table-cell>
          <table:table-cell table:formula="of:=[.D425]-[.D42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36" office:value-type="float" office:value="15264" calcext:value-type="float">
            <text:p>15264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76666666666667" calcext:value-type="float">
            <text:p>0,00176666666666667000</text:p>
          </table:table-cell>
          <table:table-cell table:formula="of:=[.D426]-[.D42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36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77083333333333" calcext:value-type="float">
            <text:p>0,00177083333333333000</text:p>
          </table:table-cell>
          <table:table-cell table:formula="of:=[.D427]-[.D426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36" office:value-type="float" office:value="15336" calcext:value-type="float">
            <text:p>15336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775" calcext:value-type="float">
            <text:p>0,00177500000000000000</text:p>
          </table:table-cell>
          <table:table-cell table:formula="of:=[.D428]-[.D42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36" office:value-type="float" office:value="15372" calcext:value-type="float">
            <text:p>15372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77916666666667" calcext:value-type="float">
            <text:p>0,00177916666666667000</text:p>
          </table:table-cell>
          <table:table-cell table:formula="of:=[.D429]-[.D42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36" office:value-type="float" office:value="15408" calcext:value-type="float">
            <text:p>15408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78333333333333" calcext:value-type="float">
            <text:p>0,00178333333333333000</text:p>
          </table:table-cell>
          <table:table-cell table:formula="of:=[.D430]-[.D42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36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7875" calcext:value-type="float">
            <text:p>0,00178750000000000000</text:p>
          </table:table-cell>
          <table:table-cell table:formula="of:=[.D431]-[.D43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36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79166666666667" calcext:value-type="float">
            <text:p>0,00179166666666667000</text:p>
          </table:table-cell>
          <table:table-cell table:formula="of:=[.D432]-[.D43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36" office:value-type="float" office:value="15516" calcext:value-type="float">
            <text:p>15516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79583333333333" calcext:value-type="float">
            <text:p>0,00179583333333333000</text:p>
          </table:table-cell>
          <table:table-cell table:formula="of:=[.D433]-[.D43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36" office:value-type="float" office:value="15552" calcext:value-type="float">
            <text:p>15552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8" calcext:value-type="float">
            <text:p>0,00180000000000000000</text:p>
          </table:table-cell>
          <table:table-cell table:formula="of:=[.D434]-[.D43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36" office:value-type="float" office:value="15588" calcext:value-type="float">
            <text:p>15588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80416666666667" calcext:value-type="float">
            <text:p>0,00180416666666667000</text:p>
          </table:table-cell>
          <table:table-cell table:formula="of:=[.D435]-[.D43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36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80833333333333" calcext:value-type="float">
            <text:p>0,00180833333333333000</text:p>
          </table:table-cell>
          <table:table-cell table:formula="of:=[.D436]-[.D435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36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8125" calcext:value-type="float">
            <text:p>0,00181250000000000000</text:p>
          </table:table-cell>
          <table:table-cell table:formula="of:=[.D437]-[.D43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36" office:value-type="float" office:value="15696" calcext:value-type="float">
            <text:p>15696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81666666666667" calcext:value-type="float">
            <text:p>0,00181666666666667000</text:p>
          </table:table-cell>
          <table:table-cell table:formula="of:=[.D438]-[.D43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36" office:value-type="float" office:value="15732" calcext:value-type="float">
            <text:p>15732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82083333333333" calcext:value-type="float">
            <text:p>0,00182083333333333000</text:p>
          </table:table-cell>
          <table:table-cell table:formula="of:=[.D439]-[.D43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36" office:value-type="float" office:value="15768" calcext:value-type="float">
            <text:p>15768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825" calcext:value-type="float">
            <text:p>0,00182500000000000000</text:p>
          </table:table-cell>
          <table:table-cell table:formula="of:=[.D440]-[.D43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36" office:value-type="float" office:value="15804" calcext:value-type="float">
            <text:p>15804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82916666666667" calcext:value-type="float">
            <text:p>0,00182916666666667000</text:p>
          </table:table-cell>
          <table:table-cell table:formula="of:=[.D441]-[.D44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36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83333333333333" calcext:value-type="float">
            <text:p>0,00183333333333333000</text:p>
          </table:table-cell>
          <table:table-cell table:formula="of:=[.D442]-[.D44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36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8375" calcext:value-type="float">
            <text:p>0,00183750000000000000</text:p>
          </table:table-cell>
          <table:table-cell table:formula="of:=[.D443]-[.D44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36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84166666666667" calcext:value-type="float">
            <text:p>0,00184166666666667000</text:p>
          </table:table-cell>
          <table:table-cell table:formula="of:=[.D444]-[.D443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36" office:value-type="float" office:value="15948" calcext:value-type="float">
            <text:p>15948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84583333333333" calcext:value-type="float">
            <text:p>0,00184583333333333000</text:p>
          </table:table-cell>
          <table:table-cell table:formula="of:=[.D445]-[.D44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36" office:value-type="float" office:value="15984" calcext:value-type="float">
            <text:p>15984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85" calcext:value-type="float">
            <text:p>0,00185000000000000000</text:p>
          </table:table-cell>
          <table:table-cell table:formula="of:=[.D446]-[.D44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36" office:value-type="float" office:value="16020" calcext:value-type="float">
            <text:p>1602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85416666666667" calcext:value-type="float">
            <text:p>0,00185416666666667000</text:p>
          </table:table-cell>
          <table:table-cell table:formula="of:=[.D447]-[.D44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36" office:value-type="float" office:value="16056" calcext:value-type="float">
            <text:p>16056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85833333333333" calcext:value-type="float">
            <text:p>0,00185833333333333000</text:p>
          </table:table-cell>
          <table:table-cell table:formula="of:=[.D448]-[.D44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36" office:value-type="float" office:value="16092" calcext:value-type="float">
            <text:p>16092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8625" calcext:value-type="float">
            <text:p>0,00186250000000000000</text:p>
          </table:table-cell>
          <table:table-cell table:formula="of:=[.D449]-[.D44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36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86666666666667" calcext:value-type="float">
            <text:p>0,00186666666666667000</text:p>
          </table:table-cell>
          <table:table-cell table:formula="of:=[.D450]-[.D44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36" office:value-type="float" office:value="16164" calcext:value-type="float">
            <text:p>16164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87083333333333" calcext:value-type="float">
            <text:p>0,00187083333333333000</text:p>
          </table:table-cell>
          <table:table-cell table:formula="of:=[.D451]-[.D45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36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875" calcext:value-type="float">
            <text:p>0,00187500000000000000</text:p>
          </table:table-cell>
          <table:table-cell table:formula="of:=[.D452]-[.D45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36" office:value-type="float" office:value="16236" calcext:value-type="float">
            <text:p>16236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87916666666667" calcext:value-type="float">
            <text:p>0,00187916666666667000</text:p>
          </table:table-cell>
          <table:table-cell table:formula="of:=[.D453]-[.D452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36" office:value-type="float" office:value="16272" calcext:value-type="float">
            <text:p>16272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88333333333333" calcext:value-type="float">
            <text:p>0,00188333333333333000</text:p>
          </table:table-cell>
          <table:table-cell table:formula="of:=[.D454]-[.D45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36" office:value-type="float" office:value="16308" calcext:value-type="float">
            <text:p>16308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8875" calcext:value-type="float">
            <text:p>0,00188750000000000000</text:p>
          </table:table-cell>
          <table:table-cell table:formula="of:=[.D455]-[.D45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36" office:value-type="float" office:value="16344" calcext:value-type="float">
            <text:p>16344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89166666666667" calcext:value-type="float">
            <text:p>0,00189166666666667000</text:p>
          </table:table-cell>
          <table:table-cell table:formula="of:=[.D456]-[.D45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36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89583333333333" calcext:value-type="float">
            <text:p>0,00189583333333333000</text:p>
          </table:table-cell>
          <table:table-cell table:formula="of:=[.D457]-[.D45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36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9" calcext:value-type="float">
            <text:p>0,00190000000000000000</text:p>
          </table:table-cell>
          <table:table-cell table:formula="of:=[.D458]-[.D45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36" office:value-type="float" office:value="16452" calcext:value-type="float">
            <text:p>16452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90416666666667" calcext:value-type="float">
            <text:p>0,00190416666666667000</text:p>
          </table:table-cell>
          <table:table-cell table:formula="of:=[.D459]-[.D45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36" office:value-type="float" office:value="16488" calcext:value-type="float">
            <text:p>16488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90833333333333" calcext:value-type="float">
            <text:p>0,00190833333333333000</text:p>
          </table:table-cell>
          <table:table-cell table:formula="of:=[.D460]-[.D45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36" office:value-type="float" office:value="16524" calcext:value-type="float">
            <text:p>16524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9125" calcext:value-type="float">
            <text:p>0,00191250000000000000</text:p>
          </table:table-cell>
          <table:table-cell table:formula="of:=[.D461]-[.D46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36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91666666666667" calcext:value-type="float">
            <text:p>0,00191666666666667000</text:p>
          </table:table-cell>
          <table:table-cell table:formula="of:=[.D462]-[.D461]" office:value-type="float" office:value="0.00000416666666666686" calcext:value-type="float">
            <text:p>0,0000041666666666668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36" office:value-type="float" office:value="16596" calcext:value-type="float">
            <text:p>16596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92083333333333" calcext:value-type="float">
            <text:p>0,00192083333333333000</text:p>
          </table:table-cell>
          <table:table-cell table:formula="of:=[.D463]-[.D46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36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925" calcext:value-type="float">
            <text:p>0,00192500000000000000</text:p>
          </table:table-cell>
          <table:table-cell table:formula="of:=[.D464]-[.D46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36" office:value-type="float" office:value="16668" calcext:value-type="float">
            <text:p>16668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92916666666667" calcext:value-type="float">
            <text:p>0,00192916666666667000</text:p>
          </table:table-cell>
          <table:table-cell table:formula="of:=[.D465]-[.D46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36" office:value-type="float" office:value="16704" calcext:value-type="float">
            <text:p>16704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93333333333333" calcext:value-type="float">
            <text:p>0,00193333333333333000</text:p>
          </table:table-cell>
          <table:table-cell table:formula="of:=[.D466]-[.D46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36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9375" calcext:value-type="float">
            <text:p>0,00193750000000000000</text:p>
          </table:table-cell>
          <table:table-cell table:formula="of:=[.D467]-[.D46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36" office:value-type="float" office:value="16776" calcext:value-type="float">
            <text:p>16776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94166666666667" calcext:value-type="float">
            <text:p>0,00194166666666667000</text:p>
          </table:table-cell>
          <table:table-cell table:formula="of:=[.D468]-[.D46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36" office:value-type="float" office:value="16812" calcext:value-type="float">
            <text:p>16812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94583333333333" calcext:value-type="float">
            <text:p>0,00194583333333333000</text:p>
          </table:table-cell>
          <table:table-cell table:formula="of:=[.D469]-[.D46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36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95" calcext:value-type="float">
            <text:p>0,00195000000000000000</text:p>
          </table:table-cell>
          <table:table-cell table:formula="of:=[.D470]-[.D46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36" office:value-type="float" office:value="16884" calcext:value-type="float">
            <text:p>16884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95416666666667" calcext:value-type="float">
            <text:p>0,00195416666666667000</text:p>
          </table:table-cell>
          <table:table-cell table:formula="of:=[.D471]-[.D47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36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95833333333333" calcext:value-type="float">
            <text:p>0,00195833333333333000</text:p>
          </table:table-cell>
          <table:table-cell table:formula="of:=[.D472]-[.D47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36" office:value-type="float" office:value="16956" calcext:value-type="float">
            <text:p>16956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9625" calcext:value-type="float">
            <text:p>0,00196250000000000000</text:p>
          </table:table-cell>
          <table:table-cell table:formula="of:=[.D473]-[.D47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36" office:value-type="float" office:value="16992" calcext:value-type="float">
            <text:p>16992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96666666666667" calcext:value-type="float">
            <text:p>0,00196666666666667000</text:p>
          </table:table-cell>
          <table:table-cell table:formula="of:=[.D474]-[.D47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36" office:value-type="float" office:value="17028" calcext:value-type="float">
            <text:p>17028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97083333333333" calcext:value-type="float">
            <text:p>0,00197083333333333000</text:p>
          </table:table-cell>
          <table:table-cell table:formula="of:=[.D475]-[.D474]" office:value-type="float" office:value="0.00000416666666666708" calcext:value-type="float">
            <text:p>0,0000041666666666670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36" office:value-type="float" office:value="17064" calcext:value-type="float">
            <text:p>17064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975" calcext:value-type="float">
            <text:p>0,00197500000000000000</text:p>
          </table:table-cell>
          <table:table-cell table:formula="of:=[.D476]-[.D47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36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97916666666667" calcext:value-type="float">
            <text:p>0,00197916666666667000</text:p>
          </table:table-cell>
          <table:table-cell table:formula="of:=[.D477]-[.D47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36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98333333333333" calcext:value-type="float">
            <text:p>0,00198333333333333000</text:p>
          </table:table-cell>
          <table:table-cell table:formula="of:=[.D478]-[.D47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36" office:value-type="float" office:value="17172" calcext:value-type="float">
            <text:p>17172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9875" calcext:value-type="float">
            <text:p>0,00198750000000000000</text:p>
          </table:table-cell>
          <table:table-cell table:formula="of:=[.D479]-[.D47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36" office:value-type="float" office:value="17208" calcext:value-type="float">
            <text:p>17208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99166666666667" calcext:value-type="float">
            <text:p>0,00199166666666667000</text:p>
          </table:table-cell>
          <table:table-cell table:formula="of:=[.D480]-[.D47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36" office:value-type="float" office:value="17244" calcext:value-type="float">
            <text:p>17244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99583333333333" calcext:value-type="float">
            <text:p>0,00199583333333333000</text:p>
          </table:table-cell>
          <table:table-cell table:formula="of:=[.D481]-[.D48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36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2" calcext:value-type="float">
            <text:p>0,00200000000000000000</text:p>
          </table:table-cell>
          <table:table-cell table:formula="of:=[.D482]-[.D48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36" office:value-type="float" office:value="17316" calcext:value-type="float">
            <text:p>17316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200416666666667" calcext:value-type="float">
            <text:p>0,00200416666666667000</text:p>
          </table:table-cell>
          <table:table-cell table:formula="of:=[.D483]-[.D48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36" office:value-type="float" office:value="17352" calcext:value-type="float">
            <text:p>17352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200833333333333" calcext:value-type="float">
            <text:p>0,00200833333333333000</text:p>
          </table:table-cell>
          <table:table-cell table:formula="of:=[.D484]-[.D48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36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20125" calcext:value-type="float">
            <text:p>0,00201250000000000000</text:p>
          </table:table-cell>
          <table:table-cell table:formula="of:=[.D485]-[.D48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36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201666666666667" calcext:value-type="float">
            <text:p>0,00201666666666667000</text:p>
          </table:table-cell>
          <table:table-cell table:formula="of:=[.D486]-[.D48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36" office:value-type="float" office:value="17460" calcext:value-type="float">
            <text:p>1746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202083333333333" calcext:value-type="float">
            <text:p>0,00202083333333333000</text:p>
          </table:table-cell>
          <table:table-cell table:formula="of:=[.D487]-[.D48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36" office:value-type="float" office:value="17496" calcext:value-type="float">
            <text:p>17496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2025" calcext:value-type="float">
            <text:p>0,00202500000000000000</text:p>
          </table:table-cell>
          <table:table-cell table:formula="of:=[.D488]-[.D48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36" office:value-type="float" office:value="17532" calcext:value-type="float">
            <text:p>17532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202916666666667" calcext:value-type="float">
            <text:p>0,00202916666666667000</text:p>
          </table:table-cell>
          <table:table-cell table:formula="of:=[.D489]-[.D48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36" office:value-type="float" office:value="17568" calcext:value-type="float">
            <text:p>17568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203333333333333" calcext:value-type="float">
            <text:p>0,00203333333333333000</text:p>
          </table:table-cell>
          <table:table-cell table:formula="of:=[.D490]-[.D48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36" office:value-type="float" office:value="17604" calcext:value-type="float">
            <text:p>17604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20375" calcext:value-type="float">
            <text:p>0,00203750000000000000</text:p>
          </table:table-cell>
          <table:table-cell table:formula="of:=[.D491]-[.D49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36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204166666666667" calcext:value-type="float">
            <text:p>0,00204166666666667000</text:p>
          </table:table-cell>
          <table:table-cell table:formula="of:=[.D492]-[.D491]" office:value-type="float" office:value="0.00000416666666666708" calcext:value-type="float">
            <text:p>0,0000041666666666670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36" office:value-type="float" office:value="17676" calcext:value-type="float">
            <text:p>17676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204583333333333" calcext:value-type="float">
            <text:p>0,00204583333333333000</text:p>
          </table:table-cell>
          <table:table-cell table:formula="of:=[.D493]-[.D49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36" office:value-type="float" office:value="17712" calcext:value-type="float">
            <text:p>17712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205" calcext:value-type="float">
            <text:p>0,00205000000000000000</text:p>
          </table:table-cell>
          <table:table-cell table:formula="of:=[.D494]-[.D49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36" office:value-type="float" office:value="17748" calcext:value-type="float">
            <text:p>17748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205416666666667" calcext:value-type="float">
            <text:p>0,00205416666666667000</text:p>
          </table:table-cell>
          <table:table-cell table:formula="of:=[.D495]-[.D49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36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205833333333333" calcext:value-type="float">
            <text:p>0,00205833333333333000</text:p>
          </table:table-cell>
          <table:table-cell table:formula="of:=[.D496]-[.D49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36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20625" calcext:value-type="float">
            <text:p>0,00206250000000000000</text:p>
          </table:table-cell>
          <table:table-cell table:formula="of:=[.D497]-[.D49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36" office:value-type="float" office:value="17856" calcext:value-type="float">
            <text:p>17856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206666666666667" calcext:value-type="float">
            <text:p>0,00206666666666667000</text:p>
          </table:table-cell>
          <table:table-cell table:formula="of:=[.D498]-[.D49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36" office:value-type="float" office:value="17892" calcext:value-type="float">
            <text:p>17892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207083333333333" calcext:value-type="float">
            <text:p>0,00207083333333333000</text:p>
          </table:table-cell>
          <table:table-cell table:formula="of:=[.D499]-[.D49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36" office:value-type="float" office:value="17928" calcext:value-type="float">
            <text:p>17928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2075" calcext:value-type="float">
            <text:p>0,00207500000000000000</text:p>
          </table:table-cell>
          <table:table-cell table:formula="of:=[.D500]-[.D49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36" office:value-type="float" office:value="17964" calcext:value-type="float">
            <text:p>17964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207916666666667" calcext:value-type="float">
            <text:p>0,00207916666666667000</text:p>
          </table:table-cell>
          <table:table-cell table:formula="of:=[.D501]-[.D50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36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208333333333333" calcext:value-type="float">
            <text:p>0,00208333333333333000</text:p>
          </table:table-cell>
          <table:table-cell table:formula="of:=[.D502]-[.D50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36" office:value-type="float" office:value="18036" calcext:value-type="float">
            <text:p>18036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20875" calcext:value-type="float">
            <text:p>0,00208750000000000000</text:p>
          </table:table-cell>
          <table:table-cell table:formula="of:=[.D503]-[.D50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36" office:value-type="float" office:value="18072" calcext:value-type="float">
            <text:p>18072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209166666666667" calcext:value-type="float">
            <text:p>0,00209166666666667000</text:p>
          </table:table-cell>
          <table:table-cell table:formula="of:=[.D504]-[.D50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36" office:value-type="float" office:value="18108" calcext:value-type="float">
            <text:p>18108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209583333333333" calcext:value-type="float">
            <text:p>0,00209583333333333000</text:p>
          </table:table-cell>
          <table:table-cell table:formula="of:=[.D505]-[.D50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36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21" calcext:value-type="float">
            <text:p>0,00210000000000000000</text:p>
          </table:table-cell>
          <table:table-cell table:formula="of:=[.D506]-[.D50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36" office:value-type="float" office:value="18180" calcext:value-type="float">
            <text:p>1818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210416666666667" calcext:value-type="float">
            <text:p>0,00210416666666667000</text:p>
          </table:table-cell>
          <table:table-cell table:formula="of:=[.D507]-[.D50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36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210833333333333" calcext:value-type="float">
            <text:p>0,00210833333333333000</text:p>
          </table:table-cell>
          <table:table-cell table:formula="of:=[.D508]-[.D50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36" office:value-type="float" office:value="18252" calcext:value-type="float">
            <text:p>18252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21125" calcext:value-type="float">
            <text:p>0,00211250000000000000</text:p>
          </table:table-cell>
          <table:table-cell table:formula="of:=[.D509]-[.D508]" office:value-type="float" office:value="0.00000416666666666708" calcext:value-type="float">
            <text:p>0,000004166666666667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36" office:value-type="float" office:value="18288" calcext:value-type="float">
            <text:p>18288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211666666666667" calcext:value-type="float">
            <text:p>0,00211666666666667000</text:p>
          </table:table-cell>
          <table:table-cell table:formula="of:=[.D510]-[.D50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36" office:value-type="float" office:value="18324" calcext:value-type="float">
            <text:p>18324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212083333333333" calcext:value-type="float">
            <text:p>0,00212083333333333000</text:p>
          </table:table-cell>
          <table:table-cell table:formula="of:=[.D511]-[.D51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36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2125" calcext:value-type="float">
            <text:p>0,00212500000000000000</text:p>
          </table:table-cell>
          <table:table-cell table:formula="of:=[.D512]-[.D51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36" office:value-type="float" office:value="18396" calcext:value-type="float">
            <text:p>18396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212916666666667" calcext:value-type="float">
            <text:p>0,00212916666666667000</text:p>
          </table:table-cell>
          <table:table-cell table:formula="of:=[.D513]-[.D51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36" office:value-type="float" office:value="18432" calcext:value-type="float">
            <text:p>18432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213333333333333" calcext:value-type="float">
            <text:p>0,00213333333333333000</text:p>
          </table:table-cell>
          <table:table-cell table:formula="of:=[.D514]-[.D51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36" office:value-type="float" office:value="18468" calcext:value-type="float">
            <text:p>18468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21375" calcext:value-type="float">
            <text:p>0,00213750000000000000</text:p>
          </table:table-cell>
          <table:table-cell table:formula="of:=[.D515]-[.D51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36" office:value-type="float" office:value="18504" calcext:value-type="float">
            <text:p>18504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214166666666667" calcext:value-type="float">
            <text:p>0,00214166666666667000</text:p>
          </table:table-cell>
          <table:table-cell table:formula="of:=[.D516]-[.D51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36" office:value-type="float" office:value="18540" calcext:value-type="float">
            <text:p>1854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214583333333333" calcext:value-type="float">
            <text:p>0,00214583333333333000</text:p>
          </table:table-cell>
          <table:table-cell table:formula="of:=[.D517]-[.D51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36" office:value-type="float" office:value="18576" calcext:value-type="float">
            <text:p>18576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215" calcext:value-type="float">
            <text:p>0,00215000000000000000</text:p>
          </table:table-cell>
          <table:table-cell table:formula="of:=[.D518]-[.D51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36" office:value-type="float" office:value="18612" calcext:value-type="float">
            <text:p>18612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215416666666667" calcext:value-type="float">
            <text:p>0,00215416666666667000</text:p>
          </table:table-cell>
          <table:table-cell table:formula="of:=[.D519]-[.D51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36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215833333333333" calcext:value-type="float">
            <text:p>0,00215833333333333000</text:p>
          </table:table-cell>
          <table:table-cell table:formula="of:=[.D520]-[.D51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36" office:value-type="float" office:value="18684" calcext:value-type="float">
            <text:p>18684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21625" calcext:value-type="float">
            <text:p>0,00216250000000000000</text:p>
          </table:table-cell>
          <table:table-cell table:formula="of:=[.D521]-[.D52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36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216666666666667" calcext:value-type="float">
            <text:p>0,00216666666666667000</text:p>
          </table:table-cell>
          <table:table-cell table:formula="of:=[.D522]-[.D52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36" office:value-type="float" office:value="18756" calcext:value-type="float">
            <text:p>18756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217083333333333" calcext:value-type="float">
            <text:p>0,00217083333333333000</text:p>
          </table:table-cell>
          <table:table-cell table:formula="of:=[.D523]-[.D52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36" office:value-type="float" office:value="18792" calcext:value-type="float">
            <text:p>18792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2175" calcext:value-type="float">
            <text:p>0,00217500000000000000</text:p>
          </table:table-cell>
          <table:table-cell table:formula="of:=[.D524]-[.D52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36" office:value-type="float" office:value="18828" calcext:value-type="float">
            <text:p>18828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217916666666667" calcext:value-type="float">
            <text:p>0,00217916666666667000</text:p>
          </table:table-cell>
          <table:table-cell table:formula="of:=[.D525]-[.D52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36" office:value-type="float" office:value="18864" calcext:value-type="float">
            <text:p>18864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218333333333333" calcext:value-type="float">
            <text:p>0,00218333333333333000</text:p>
          </table:table-cell>
          <table:table-cell table:formula="of:=[.D526]-[.D525]" office:value-type="float" office:value="0.00000416666666666708" calcext:value-type="float">
            <text:p>0,0000041666666666670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36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21875" calcext:value-type="float">
            <text:p>0,00218750000000000000</text:p>
          </table:table-cell>
          <table:table-cell table:formula="of:=[.D527]-[.D52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36" office:value-type="float" office:value="18936" calcext:value-type="float">
            <text:p>18936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219166666666667" calcext:value-type="float">
            <text:p>0,00219166666666667000</text:p>
          </table:table-cell>
          <table:table-cell table:formula="of:=[.D528]-[.D52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36" office:value-type="float" office:value="18972" calcext:value-type="float">
            <text:p>18972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219583333333333" calcext:value-type="float">
            <text:p>0,00219583333333333000</text:p>
          </table:table-cell>
          <table:table-cell table:formula="of:=[.D529]-[.D52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36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22" calcext:value-type="float">
            <text:p>0,00220000000000000000</text:p>
          </table:table-cell>
          <table:table-cell table:formula="of:=[.D530]-[.D52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36" office:value-type="float" office:value="19044" calcext:value-type="float">
            <text:p>19044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220416666666667" calcext:value-type="float">
            <text:p>0,00220416666666667000</text:p>
          </table:table-cell>
          <table:table-cell table:formula="of:=[.D531]-[.D53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36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220833333333333" calcext:value-type="float">
            <text:p>0,00220833333333333000</text:p>
          </table:table-cell>
          <table:table-cell table:formula="of:=[.D532]-[.D53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36" office:value-type="float" office:value="19116" calcext:value-type="float">
            <text:p>19116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22125" calcext:value-type="float">
            <text:p>0,00221250000000000000</text:p>
          </table:table-cell>
          <table:table-cell table:formula="of:=[.D533]-[.D53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36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221666666666667" calcext:value-type="float">
            <text:p>0,00221666666666667000</text:p>
          </table:table-cell>
          <table:table-cell table:formula="of:=[.D534]-[.D53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36" office:value-type="float" office:value="19188" calcext:value-type="float">
            <text:p>19188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222083333333333" calcext:value-type="float">
            <text:p>0,00222083333333333000</text:p>
          </table:table-cell>
          <table:table-cell table:formula="of:=[.D535]-[.D53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36" office:value-type="float" office:value="19224" calcext:value-type="float">
            <text:p>19224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2225" calcext:value-type="float">
            <text:p>0,00222500000000000000</text:p>
          </table:table-cell>
          <table:table-cell table:formula="of:=[.D536]-[.D53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36" office:value-type="float" office:value="19260" calcext:value-type="float">
            <text:p>1926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222916666666667" calcext:value-type="float">
            <text:p>0,00222916666666667000</text:p>
          </table:table-cell>
          <table:table-cell table:formula="of:=[.D537]-[.D53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36" office:value-type="float" office:value="19296" calcext:value-type="float">
            <text:p>19296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223333333333333" calcext:value-type="float">
            <text:p>0,00223333333333333000</text:p>
          </table:table-cell>
          <table:table-cell table:formula="of:=[.D538]-[.D53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36" office:value-type="float" office:value="19332" calcext:value-type="float">
            <text:p>19332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22375" calcext:value-type="float">
            <text:p>0,00223750000000000000</text:p>
          </table:table-cell>
          <table:table-cell table:formula="of:=[.D539]-[.D53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36" office:value-type="float" office:value="19368" calcext:value-type="float">
            <text:p>19368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224166666666667" calcext:value-type="float">
            <text:p>0,00224166666666667000</text:p>
          </table:table-cell>
          <table:table-cell table:formula="of:=[.D540]-[.D53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36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224583333333333" calcext:value-type="float">
            <text:p>0,00224583333333333000</text:p>
          </table:table-cell>
          <table:table-cell table:formula="of:=[.D541]-[.D54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36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225" calcext:value-type="float">
            <text:p>0,00225000000000000000</text:p>
          </table:table-cell>
          <table:table-cell table:formula="of:=[.D542]-[.D54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36" office:value-type="float" office:value="19476" calcext:value-type="float">
            <text:p>19476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225416666666667" calcext:value-type="float">
            <text:p>0,00225416666666667000</text:p>
          </table:table-cell>
          <table:table-cell table:formula="of:=[.D543]-[.D542]" office:value-type="float" office:value="0.00000416666666666708" calcext:value-type="float">
            <text:p>0,000004166666666667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36" office:value-type="float" office:value="19512" calcext:value-type="float">
            <text:p>19512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225833333333333" calcext:value-type="float">
            <text:p>0,00225833333333333000</text:p>
          </table:table-cell>
          <table:table-cell table:formula="of:=[.D544]-[.D54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36" office:value-type="float" office:value="19548" calcext:value-type="float">
            <text:p>19548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22625" calcext:value-type="float">
            <text:p>0,00226250000000000000</text:p>
          </table:table-cell>
          <table:table-cell table:formula="of:=[.D545]-[.D54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36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226666666666667" calcext:value-type="float">
            <text:p>0,00226666666666667000</text:p>
          </table:table-cell>
          <table:table-cell table:formula="of:=[.D546]-[.D54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36" office:value-type="float" office:value="19620" calcext:value-type="float">
            <text:p>1962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227083333333333" calcext:value-type="float">
            <text:p>0,00227083333333333000</text:p>
          </table:table-cell>
          <table:table-cell table:formula="of:=[.D547]-[.D54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36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2275" calcext:value-type="float">
            <text:p>0,00227500000000000000</text:p>
          </table:table-cell>
          <table:table-cell table:formula="of:=[.D548]-[.D54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36" office:value-type="float" office:value="19692" calcext:value-type="float">
            <text:p>19692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227916666666667" calcext:value-type="float">
            <text:p>0,00227916666666667000</text:p>
          </table:table-cell>
          <table:table-cell table:formula="of:=[.D549]-[.D54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36" office:value-type="float" office:value="19728" calcext:value-type="float">
            <text:p>19728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228333333333333" calcext:value-type="float">
            <text:p>0,00228333333333333000</text:p>
          </table:table-cell>
          <table:table-cell table:formula="of:=[.D550]-[.D54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36" office:value-type="float" office:value="19764" calcext:value-type="float">
            <text:p>19764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22875" calcext:value-type="float">
            <text:p>0,00228750000000000000</text:p>
          </table:table-cell>
          <table:table-cell table:formula="of:=[.D551]-[.D55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36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229166666666667" calcext:value-type="float">
            <text:p>0,00229166666666667000</text:p>
          </table:table-cell>
          <table:table-cell table:formula="of:=[.D552]-[.D55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36" office:value-type="float" office:value="19836" calcext:value-type="float">
            <text:p>19836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229583333333333" calcext:value-type="float">
            <text:p>0,00229583333333333000</text:p>
          </table:table-cell>
          <table:table-cell table:formula="of:=[.D553]-[.D55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36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23" calcext:value-type="float">
            <text:p>0,00230000000000000000</text:p>
          </table:table-cell>
          <table:table-cell table:formula="of:=[.D554]-[.D55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36" office:value-type="float" office:value="19908" calcext:value-type="float">
            <text:p>19908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230416666666667" calcext:value-type="float">
            <text:p>0,00230416666666667000</text:p>
          </table:table-cell>
          <table:table-cell table:formula="of:=[.D555]-[.D55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36" office:value-type="float" office:value="19944" calcext:value-type="float">
            <text:p>19944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230833333333333" calcext:value-type="float">
            <text:p>0,00230833333333333000</text:p>
          </table:table-cell>
          <table:table-cell table:formula="of:=[.D556]-[.D55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36" office:value-type="float" office:value="19980" calcext:value-type="float">
            <text:p>1998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23125" calcext:value-type="float">
            <text:p>0,00231250000000000000</text:p>
          </table:table-cell>
          <table:table-cell table:formula="of:=[.D557]-[.D55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36" office:value-type="float" office:value="20016" calcext:value-type="float">
            <text:p>20016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231666666666667" calcext:value-type="float">
            <text:p>0,00231666666666667000</text:p>
          </table:table-cell>
          <table:table-cell table:formula="of:=[.D558]-[.D55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36" office:value-type="float" office:value="20052" calcext:value-type="float">
            <text:p>20052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232083333333333" calcext:value-type="float">
            <text:p>0,00232083333333333000</text:p>
          </table:table-cell>
          <table:table-cell table:formula="of:=[.D559]-[.D55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36" office:value-type="float" office:value="20088" calcext:value-type="float">
            <text:p>20088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2325" calcext:value-type="float">
            <text:p>0,00232500000000000000</text:p>
          </table:table-cell>
          <table:table-cell table:formula="of:=[.D560]-[.D55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36" office:value-type="float" office:value="20124" calcext:value-type="float">
            <text:p>20124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232916666666667" calcext:value-type="float">
            <text:p>0,00232916666666667000</text:p>
          </table:table-cell>
          <table:table-cell table:formula="of:=[.D561]-[.D560]" office:value-type="float" office:value="0.00000416666666666708" calcext:value-type="float">
            <text:p>0,0000041666666666670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36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233333333333333" calcext:value-type="float">
            <text:p>0,00233333333333333000</text:p>
          </table:table-cell>
          <table:table-cell table:formula="of:=[.D562]-[.D56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36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23375" calcext:value-type="float">
            <text:p>0,00233750000000000000</text:p>
          </table:table-cell>
          <table:table-cell table:formula="of:=[.D563]-[.D56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36" office:value-type="float" office:value="20232" calcext:value-type="float">
            <text:p>20232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234166666666667" calcext:value-type="float">
            <text:p>0,00234166666666667000</text:p>
          </table:table-cell>
          <table:table-cell table:formula="of:=[.D564]-[.D56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36" office:value-type="float" office:value="20268" calcext:value-type="float">
            <text:p>20268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234583333333333" calcext:value-type="float">
            <text:p>0,00234583333333333000</text:p>
          </table:table-cell>
          <table:table-cell table:formula="of:=[.D565]-[.D56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36" office:value-type="float" office:value="20304" calcext:value-type="float">
            <text:p>20304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235" calcext:value-type="float">
            <text:p>0,00235000000000000000</text:p>
          </table:table-cell>
          <table:table-cell table:formula="of:=[.D566]-[.D56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36" office:value-type="float" office:value="20340" calcext:value-type="float">
            <text:p>2034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235416666666667" calcext:value-type="float">
            <text:p>0,00235416666666667000</text:p>
          </table:table-cell>
          <table:table-cell table:formula="of:=[.D567]-[.D56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36" office:value-type="float" office:value="20376" calcext:value-type="float">
            <text:p>20376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235833333333333" calcext:value-type="float">
            <text:p>0,00235833333333333000</text:p>
          </table:table-cell>
          <table:table-cell table:formula="of:=[.D568]-[.D56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36" office:value-type="float" office:value="20412" calcext:value-type="float">
            <text:p>20412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23625" calcext:value-type="float">
            <text:p>0,00236250000000000000</text:p>
          </table:table-cell>
          <table:table-cell table:formula="of:=[.D569]-[.D56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36" office:value-type="float" office:value="20448" calcext:value-type="float">
            <text:p>20448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236666666666667" calcext:value-type="float">
            <text:p>0,00236666666666667000</text:p>
          </table:table-cell>
          <table:table-cell table:formula="of:=[.D570]-[.D56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36" office:value-type="float" office:value="20484" calcext:value-type="float">
            <text:p>20484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237083333333333" calcext:value-type="float">
            <text:p>0,00237083333333333000</text:p>
          </table:table-cell>
          <table:table-cell table:formula="of:=[.D571]-[.D57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36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2375" calcext:value-type="float">
            <text:p>0,00237500000000000000</text:p>
          </table:table-cell>
          <table:table-cell table:formula="of:=[.D572]-[.D57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36" office:value-type="float" office:value="20556" calcext:value-type="float">
            <text:p>20556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237916666666667" calcext:value-type="float">
            <text:p>0,00237916666666667000</text:p>
          </table:table-cell>
          <table:table-cell table:formula="of:=[.D573]-[.D57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36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238333333333333" calcext:value-type="float">
            <text:p>0,00238333333333333000</text:p>
          </table:table-cell>
          <table:table-cell table:formula="of:=[.D574]-[.D57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36" office:value-type="float" office:value="20628" calcext:value-type="float">
            <text:p>20628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23875" calcext:value-type="float">
            <text:p>0,00238750000000000000</text:p>
          </table:table-cell>
          <table:table-cell table:formula="of:=[.D575]-[.D57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36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239166666666667" calcext:value-type="float">
            <text:p>0,00239166666666667000</text:p>
          </table:table-cell>
          <table:table-cell table:formula="of:=[.D576]-[.D57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36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239583333333333" calcext:value-type="float">
            <text:p>0,00239583333333333000</text:p>
          </table:table-cell>
          <table:table-cell table:formula="of:=[.D577]-[.D57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36" office:value-type="float" office:value="20736" calcext:value-type="float">
            <text:p>20736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24" calcext:value-type="float">
            <text:p>0,00240000000000000000</text:p>
          </table:table-cell>
          <table:table-cell table:formula="of:=[.D578]-[.D577]" office:value-type="float" office:value="0.00000416666666666708" calcext:value-type="float">
            <text:p>0,0000041666666666670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36" office:value-type="float" office:value="20772" calcext:value-type="float">
            <text:p>20772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240416666666667" calcext:value-type="float">
            <text:p>0,00240416666666667000</text:p>
          </table:table-cell>
          <table:table-cell table:formula="of:=[.D579]-[.D57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36" office:value-type="float" office:value="20808" calcext:value-type="float">
            <text:p>20808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240833333333333" calcext:value-type="float">
            <text:p>0,00240833333333333000</text:p>
          </table:table-cell>
          <table:table-cell table:formula="of:=[.D580]-[.D57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36" office:value-type="float" office:value="20844" calcext:value-type="float">
            <text:p>20844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24125" calcext:value-type="float">
            <text:p>0,00241250000000000000</text:p>
          </table:table-cell>
          <table:table-cell table:formula="of:=[.D581]-[.D58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36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241666666666667" calcext:value-type="float">
            <text:p>0,00241666666666667000</text:p>
          </table:table-cell>
          <table:table-cell table:formula="of:=[.D582]-[.D58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36" office:value-type="float" office:value="20916" calcext:value-type="float">
            <text:p>20916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242083333333333" calcext:value-type="float">
            <text:p>0,00242083333333333000</text:p>
          </table:table-cell>
          <table:table-cell table:formula="of:=[.D583]-[.D58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36" office:value-type="float" office:value="20952" calcext:value-type="float">
            <text:p>20952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2425" calcext:value-type="float">
            <text:p>0,00242500000000000000</text:p>
          </table:table-cell>
          <table:table-cell table:formula="of:=[.D584]-[.D58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36" office:value-type="float" office:value="20988" calcext:value-type="float">
            <text:p>20988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242916666666667" calcext:value-type="float">
            <text:p>0,00242916666666667000</text:p>
          </table:table-cell>
          <table:table-cell table:formula="of:=[.D585]-[.D58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36" office:value-type="float" office:value="21024" calcext:value-type="float">
            <text:p>21024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243333333333333" calcext:value-type="float">
            <text:p>0,00243333333333333000</text:p>
          </table:table-cell>
          <table:table-cell table:formula="of:=[.D586]-[.D58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36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24375" calcext:value-type="float">
            <text:p>0,00243750000000000000</text:p>
          </table:table-cell>
          <table:table-cell table:formula="of:=[.D587]-[.D58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36" office:value-type="float" office:value="21096" calcext:value-type="float">
            <text:p>21096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244166666666667" calcext:value-type="float">
            <text:p>0,00244166666666667000</text:p>
          </table:table-cell>
          <table:table-cell table:formula="of:=[.D588]-[.D58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36" office:value-type="float" office:value="21132" calcext:value-type="float">
            <text:p>21132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244583333333333" calcext:value-type="float">
            <text:p>0,00244583333333333000</text:p>
          </table:table-cell>
          <table:table-cell table:formula="of:=[.D589]-[.D58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36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245" calcext:value-type="float">
            <text:p>0,00245000000000000000</text:p>
          </table:table-cell>
          <table:table-cell table:formula="of:=[.D590]-[.D58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36" office:value-type="float" office:value="21204" calcext:value-type="float">
            <text:p>21204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245416666666667" calcext:value-type="float">
            <text:p>0,00245416666666667000</text:p>
          </table:table-cell>
          <table:table-cell table:formula="of:=[.D591]-[.D59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36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245833333333333" calcext:value-type="float">
            <text:p>0,00245833333333333000</text:p>
          </table:table-cell>
          <table:table-cell table:formula="of:=[.D592]-[.D59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36" office:value-type="float" office:value="21276" calcext:value-type="float">
            <text:p>21276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24625" calcext:value-type="float">
            <text:p>0,00246250000000000000</text:p>
          </table:table-cell>
          <table:table-cell table:formula="of:=[.D593]-[.D59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36" office:value-type="float" office:value="21312" calcext:value-type="float">
            <text:p>21312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246666666666667" calcext:value-type="float">
            <text:p>0,00246666666666667000</text:p>
          </table:table-cell>
          <table:table-cell table:formula="of:=[.D594]-[.D59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36" office:value-type="float" office:value="21348" calcext:value-type="float">
            <text:p>21348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247083333333333" calcext:value-type="float">
            <text:p>0,00247083333333333000</text:p>
          </table:table-cell>
          <table:table-cell table:formula="of:=[.D595]-[.D594]" office:value-type="float" office:value="0.00000416666666666708" calcext:value-type="float">
            <text:p>0,0000041666666666670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36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2475" calcext:value-type="float">
            <text:p>0,00247500000000000000</text:p>
          </table:table-cell>
          <table:table-cell table:formula="of:=[.D596]-[.D59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36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247916666666667" calcext:value-type="float">
            <text:p>0,00247916666666667000</text:p>
          </table:table-cell>
          <table:table-cell table:formula="of:=[.D597]-[.D59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36" office:value-type="float" office:value="21456" calcext:value-type="float">
            <text:p>21456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248333333333333" calcext:value-type="float">
            <text:p>0,00248333333333333000</text:p>
          </table:table-cell>
          <table:table-cell table:formula="of:=[.D598]-[.D59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36" office:value-type="float" office:value="21492" calcext:value-type="float">
            <text:p>21492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24875" calcext:value-type="float">
            <text:p>0,00248750000000000000</text:p>
          </table:table-cell>
          <table:table-cell table:formula="of:=[.D599]-[.D59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36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249166666666667" calcext:value-type="float">
            <text:p>0,00249166666666667000</text:p>
          </table:table-cell>
          <table:table-cell table:formula="of:=[.D600]-[.D59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36" office:value-type="float" office:value="21564" calcext:value-type="float">
            <text:p>21564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249583333333333" calcext:value-type="float">
            <text:p>0,00249583333333333000</text:p>
          </table:table-cell>
          <table:table-cell table:formula="of:=[.D601]-[.D60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36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25" calcext:value-type="float">
            <text:p>0,00250000000000000000</text:p>
          </table:table-cell>
          <table:table-cell table:formula="of:=[.D602]-[.D60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36" office:value-type="float" office:value="21636" calcext:value-type="float">
            <text:p>21636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250416666666667" calcext:value-type="float">
            <text:p>0,00250416666666667000</text:p>
          </table:table-cell>
          <table:table-cell table:formula="of:=[.D603]-[.D60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36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250833333333333" calcext:value-type="float">
            <text:p>0,00250833333333333000</text:p>
          </table:table-cell>
          <table:table-cell table:formula="of:=[.D604]-[.D60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36" office:value-type="float" office:value="21708" calcext:value-type="float">
            <text:p>21708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25125" calcext:value-type="float">
            <text:p>0,00251250000000000000</text:p>
          </table:table-cell>
          <table:table-cell table:formula="of:=[.D605]-[.D60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36" office:value-type="float" office:value="21744" calcext:value-type="float">
            <text:p>21744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251666666666667" calcext:value-type="float">
            <text:p>0,00251666666666667000</text:p>
          </table:table-cell>
          <table:table-cell table:formula="of:=[.D606]-[.D60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36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252083333333333" calcext:value-type="float">
            <text:p>0,00252083333333333000</text:p>
          </table:table-cell>
          <table:table-cell table:formula="of:=[.D607]-[.D60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36" office:value-type="float" office:value="21816" calcext:value-type="float">
            <text:p>21816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2525" calcext:value-type="float">
            <text:p>0,00252500000000000000</text:p>
          </table:table-cell>
          <table:table-cell table:formula="of:=[.D608]-[.D60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36" office:value-type="float" office:value="21852" calcext:value-type="float">
            <text:p>21852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252916666666667" calcext:value-type="float">
            <text:p>0,00252916666666667000</text:p>
          </table:table-cell>
          <table:table-cell table:formula="of:=[.D609]-[.D60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36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253333333333333" calcext:value-type="float">
            <text:p>0,00253333333333333000</text:p>
          </table:table-cell>
          <table:table-cell table:formula="of:=[.D610]-[.D60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36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25375" calcext:value-type="float">
            <text:p>0,00253750000000000000</text:p>
          </table:table-cell>
          <table:table-cell table:formula="of:=[.D611]-[.D61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36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254166666666667" calcext:value-type="float">
            <text:p>0,00254166666666667000</text:p>
          </table:table-cell>
          <table:table-cell table:formula="of:=[.D612]-[.D611]" office:value-type="float" office:value="0.00000416666666666708" calcext:value-type="float">
            <text:p>0,0000041666666666670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36" office:value-type="float" office:value="21996" calcext:value-type="float">
            <text:p>21996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254583333333333" calcext:value-type="float">
            <text:p>0,00254583333333333000</text:p>
          </table:table-cell>
          <table:table-cell table:formula="of:=[.D613]-[.D61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36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255" calcext:value-type="float">
            <text:p>0,00255000000000000000</text:p>
          </table:table-cell>
          <table:table-cell table:formula="of:=[.D614]-[.D61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36" office:value-type="float" office:value="22068" calcext:value-type="float">
            <text:p>22068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255416666666667" calcext:value-type="float">
            <text:p>0,00255416666666667000</text:p>
          </table:table-cell>
          <table:table-cell table:formula="of:=[.D615]-[.D61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36" office:value-type="float" office:value="22104" calcext:value-type="float">
            <text:p>22104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255833333333333" calcext:value-type="float">
            <text:p>0,00255833333333333000</text:p>
          </table:table-cell>
          <table:table-cell table:formula="of:=[.D616]-[.D61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36" office:value-type="float" office:value="22140" calcext:value-type="float">
            <text:p>2214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25625" calcext:value-type="float">
            <text:p>0,00256250000000000000</text:p>
          </table:table-cell>
          <table:table-cell table:formula="of:=[.D617]-[.D61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36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256666666666667" calcext:value-type="float">
            <text:p>0,00256666666666667000</text:p>
          </table:table-cell>
          <table:table-cell table:formula="of:=[.D618]-[.D61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36" office:value-type="float" office:value="22212" calcext:value-type="float">
            <text:p>22212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257083333333333" calcext:value-type="float">
            <text:p>0,00257083333333333000</text:p>
          </table:table-cell>
          <table:table-cell table:formula="of:=[.D619]-[.D61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36" office:value-type="float" office:value="22248" calcext:value-type="float">
            <text:p>22248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2575" calcext:value-type="float">
            <text:p>0,00257500000000000000</text:p>
          </table:table-cell>
          <table:table-cell table:formula="of:=[.D620]-[.D61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36" office:value-type="float" office:value="22284" calcext:value-type="float">
            <text:p>22284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257916666666667" calcext:value-type="float">
            <text:p>0,00257916666666667000</text:p>
          </table:table-cell>
          <table:table-cell table:formula="of:=[.D621]-[.D62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36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258333333333333" calcext:value-type="float">
            <text:p>0,00258333333333333000</text:p>
          </table:table-cell>
          <table:table-cell table:formula="of:=[.D622]-[.D62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36" office:value-type="float" office:value="22356" calcext:value-type="float">
            <text:p>22356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25875" calcext:value-type="float">
            <text:p>0,00258750000000000000</text:p>
          </table:table-cell>
          <table:table-cell table:formula="of:=[.D623]-[.D62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36" office:value-type="float" office:value="22392" calcext:value-type="float">
            <text:p>22392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259166666666667" calcext:value-type="float">
            <text:p>0,00259166666666667000</text:p>
          </table:table-cell>
          <table:table-cell table:formula="of:=[.D624]-[.D62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36" office:value-type="float" office:value="22428" calcext:value-type="float">
            <text:p>22428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259583333333333" calcext:value-type="float">
            <text:p>0,00259583333333333000</text:p>
          </table:table-cell>
          <table:table-cell table:formula="of:=[.D625]-[.D62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36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26" calcext:value-type="float">
            <text:p>0,00260000000000000000</text:p>
          </table:table-cell>
          <table:table-cell table:formula="of:=[.D626]-[.D62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36" office:value-type="float" office:value="22500" calcext:value-type="float">
            <text:p>2250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260416666666667" calcext:value-type="float">
            <text:p>0,00260416666666667000</text:p>
          </table:table-cell>
          <table:table-cell table:formula="of:=[.D627]-[.D62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36" office:value-type="float" office:value="22536" calcext:value-type="float">
            <text:p>22536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260833333333333" calcext:value-type="float">
            <text:p>0,00260833333333333000</text:p>
          </table:table-cell>
          <table:table-cell table:formula="of:=[.D628]-[.D62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36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26125" calcext:value-type="float">
            <text:p>0,00261250000000000000</text:p>
          </table:table-cell>
          <table:table-cell table:formula="of:=[.D629]-[.D628]" office:value-type="float" office:value="0.00000416666666666708" calcext:value-type="float">
            <text:p>0,0000041666666666670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36" office:value-type="float" office:value="22608" calcext:value-type="float">
            <text:p>22608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261666666666667" calcext:value-type="float">
            <text:p>0,00261666666666667000</text:p>
          </table:table-cell>
          <table:table-cell table:formula="of:=[.D630]-[.D62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36" office:value-type="float" office:value="22644" calcext:value-type="float">
            <text:p>22644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262083333333333" calcext:value-type="float">
            <text:p>0,00262083333333333000</text:p>
          </table:table-cell>
          <table:table-cell table:formula="of:=[.D631]-[.D63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36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2625" calcext:value-type="float">
            <text:p>0,00262500000000000000</text:p>
          </table:table-cell>
          <table:table-cell table:formula="of:=[.D632]-[.D63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36" office:value-type="float" office:value="22716" calcext:value-type="float">
            <text:p>22716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262916666666667" calcext:value-type="float">
            <text:p>0,00262916666666667000</text:p>
          </table:table-cell>
          <table:table-cell table:formula="of:=[.D633]-[.D63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36" office:value-type="float" office:value="22752" calcext:value-type="float">
            <text:p>22752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263333333333333" calcext:value-type="float">
            <text:p>0,00263333333333333000</text:p>
          </table:table-cell>
          <table:table-cell table:formula="of:=[.D634]-[.D63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36" office:value-type="float" office:value="22788" calcext:value-type="float">
            <text:p>22788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26375" calcext:value-type="float">
            <text:p>0,00263750000000000000</text:p>
          </table:table-cell>
          <table:table-cell table:formula="of:=[.D635]-[.D63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36" office:value-type="float" office:value="22824" calcext:value-type="float">
            <text:p>22824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264166666666667" calcext:value-type="float">
            <text:p>0,00264166666666667000</text:p>
          </table:table-cell>
          <table:table-cell table:formula="of:=[.D636]-[.D63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36" office:value-type="float" office:value="22860" calcext:value-type="float">
            <text:p>22860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264583333333333" calcext:value-type="float">
            <text:p>0,00264583333333333000</text:p>
          </table:table-cell>
          <table:table-cell table:formula="of:=[.D637]-[.D63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36" office:value-type="float" office:value="22896" calcext:value-type="float">
            <text:p>22896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265" calcext:value-type="float">
            <text:p>0,00265000000000000000</text:p>
          </table:table-cell>
          <table:table-cell table:formula="of:=[.D638]-[.D63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36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265416666666667" calcext:value-type="float">
            <text:p>0,00265416666666667000</text:p>
          </table:table-cell>
          <table:table-cell table:formula="of:=[.D639]-[.D63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36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265833333333333" calcext:value-type="float">
            <text:p>0,00265833333333333000</text:p>
          </table:table-cell>
          <table:table-cell table:formula="of:=[.D640]-[.D63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36" office:value-type="float" office:value="23004" calcext:value-type="float">
            <text:p>23004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26625" calcext:value-type="float">
            <text:p>0,00266250000000000000</text:p>
          </table:table-cell>
          <table:table-cell table:formula="of:=[.D641]-[.D64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36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266666666666667" calcext:value-type="float">
            <text:p>0,00266666666666667000</text:p>
          </table:table-cell>
          <table:table-cell table:formula="of:=[.D642]-[.D64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36" office:value-type="float" office:value="23076" calcext:value-type="float">
            <text:p>23076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267083333333333" calcext:value-type="float">
            <text:p>0,00267083333333333000</text:p>
          </table:table-cell>
          <table:table-cell table:formula="of:=[.D643]-[.D64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36" office:value-type="float" office:value="23112" calcext:value-type="float">
            <text:p>23112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2675" calcext:value-type="float">
            <text:p>0,00267500000000000000</text:p>
          </table:table-cell>
          <table:table-cell table:formula="of:=[.D644]-[.D64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36" office:value-type="float" office:value="23148" calcext:value-type="float">
            <text:p>23148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267916666666667" calcext:value-type="float">
            <text:p>0,00267916666666667000</text:p>
          </table:table-cell>
          <table:table-cell table:formula="of:=[.D645]-[.D64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36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268333333333333" calcext:value-type="float">
            <text:p>0,00268333333333333000</text:p>
          </table:table-cell>
          <table:table-cell table:formula="of:=[.D646]-[.D64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36" office:value-type="float" office:value="23220" calcext:value-type="float">
            <text:p>23220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26875" calcext:value-type="float">
            <text:p>0,00268750000000000000</text:p>
          </table:table-cell>
          <table:table-cell table:formula="of:=[.D647]-[.D646]" office:value-type="float" office:value="0.00000416666666666708" calcext:value-type="float">
            <text:p>0,0000041666666666670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36" office:value-type="float" office:value="23256" calcext:value-type="float">
            <text:p>23256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269166666666667" calcext:value-type="float">
            <text:p>0,00269166666666667000</text:p>
          </table:table-cell>
          <table:table-cell table:formula="of:=[.D648]-[.D64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36" office:value-type="float" office:value="23292" calcext:value-type="float">
            <text:p>23292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269583333333333" calcext:value-type="float">
            <text:p>0,00269583333333333000</text:p>
          </table:table-cell>
          <table:table-cell table:formula="of:=[.D649]-[.D64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36" office:value-type="float" office:value="23328" calcext:value-type="float">
            <text:p>23328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27" calcext:value-type="float">
            <text:p>0,00270000000000000000</text:p>
          </table:table-cell>
          <table:table-cell table:formula="of:=[.D650]-[.D64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36" office:value-type="float" office:value="23364" calcext:value-type="float">
            <text:p>23364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270416666666667" calcext:value-type="float">
            <text:p>0,00270416666666667000</text:p>
          </table:table-cell>
          <table:table-cell table:formula="of:=[.D651]-[.D65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36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270833333333333" calcext:value-type="float">
            <text:p>0,00270833333333333000</text:p>
          </table:table-cell>
          <table:table-cell table:formula="of:=[.D652]-[.D65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36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27125" calcext:value-type="float">
            <text:p>0,00271250000000000000</text:p>
          </table:table-cell>
          <table:table-cell table:formula="of:=[.D653]-[.D65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36" office:value-type="float" office:value="23472" calcext:value-type="float">
            <text:p>23472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271666666666667" calcext:value-type="float">
            <text:p>0,00271666666666667000</text:p>
          </table:table-cell>
          <table:table-cell table:formula="of:=[.D654]-[.D653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36" office:value-type="float" office:value="23508" calcext:value-type="float">
            <text:p>23508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272083333333333" calcext:value-type="float">
            <text:p>0,00272083333333333000</text:p>
          </table:table-cell>
          <table:table-cell table:formula="of:=[.D655]-[.D65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36" office:value-type="float" office:value="23544" calcext:value-type="float">
            <text:p>23544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2725" calcext:value-type="float">
            <text:p>0,00272500000000000000</text:p>
          </table:table-cell>
          <table:table-cell table:formula="of:=[.D656]-[.D65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36" office:value-type="float" office:value="23580" calcext:value-type="float">
            <text:p>23580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272916666666667" calcext:value-type="float">
            <text:p>0,00272916666666667000</text:p>
          </table:table-cell>
          <table:table-cell table:formula="of:=[.D657]-[.D65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36" office:value-type="float" office:value="23616" calcext:value-type="float">
            <text:p>23616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273333333333333" calcext:value-type="float">
            <text:p>0,00273333333333333000</text:p>
          </table:table-cell>
          <table:table-cell table:formula="of:=[.D658]-[.D657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36" office:value-type="float" office:value="23652" calcext:value-type="float">
            <text:p>23652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27375" calcext:value-type="float">
            <text:p>0,00273750000000000000</text:p>
          </table:table-cell>
          <table:table-cell table:formula="of:=[.D659]-[.D658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36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274166666666667" calcext:value-type="float">
            <text:p>0,00274166666666667000</text:p>
          </table:table-cell>
          <table:table-cell table:formula="of:=[.D660]-[.D659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36" office:value-type="float" office:value="23724" calcext:value-type="float">
            <text:p>23724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274583333333333" calcext:value-type="float">
            <text:p>0,00274583333333333000</text:p>
          </table:table-cell>
          <table:table-cell table:formula="of:=[.D661]-[.D660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36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275" calcext:value-type="float">
            <text:p>0,00275000000000000000</text:p>
          </table:table-cell>
          <table:table-cell table:formula="of:=[.D662]-[.D661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36" office:value-type="float" office:value="23796" calcext:value-type="float">
            <text:p>23796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275416666666667" calcext:value-type="float">
            <text:p>0,00275416666666667000</text:p>
          </table:table-cell>
          <table:table-cell table:formula="of:=[.D663]-[.D662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36" office:value-type="float" office:value="23832" calcext:value-type="float">
            <text:p>23832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275833333333333" calcext:value-type="float">
            <text:p>0,00275833333333333000</text:p>
          </table:table-cell>
          <table:table-cell table:formula="of:=[.D664]-[.D663]" office:value-type="float" office:value="0.00000416666666666708" calcext:value-type="float">
            <text:p>0,0000041666666666670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36" office:value-type="float" office:value="23868" calcext:value-type="float">
            <text:p>23868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27625" calcext:value-type="float">
            <text:p>0,00276250000000000000</text:p>
          </table:table-cell>
          <table:table-cell table:formula="of:=[.D665]-[.D664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36" office:value-type="float" office:value="23904" calcext:value-type="float">
            <text:p>23904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276666666666667" calcext:value-type="float">
            <text:p>0,00276666666666667000</text:p>
          </table:table-cell>
          <table:table-cell table:formula="of:=[.D666]-[.D665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36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277083333333333" calcext:value-type="float">
            <text:p>0,00277083333333333000</text:p>
          </table:table-cell>
          <table:table-cell table:formula="of:=[.D667]-[.D666]" office:value-type="float" office:value="0.00000416666666666664" calcext:value-type="float">
            <text:p>0,0000041666666666666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36" office:value-type="float" office:value="23976" calcext:value-type="float">
            <text:p>23976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2775" calcext:value-type="float">
            <text:p>0,00277500000000000000</text:p>
          </table:table-cell>
          <table:table-cell table:formula="of:=#REF!-[.D667]" office:value-type="string" office:string-value="" calcext:value-type="error">
            <text:p>#REF!</text:p>
          </table:table-cell>
        </table:table-row>
        <table:table-row table:style-name="ro1" table:number-rows-repeated="104790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31:02.833783407</meta:creation-date>
    <dc:date>2026-05-17T17:31:10.881878157</dc:date>
    <meta:editing-duration>PT9S</meta:editing-duration>
    <meta:editing-cycles>1</meta:editing-cycles>
    <meta:document-statistic meta:table-count="1" meta:cell-count="3335" meta:object-count="0"/>
    <meta:generator>LibreOffice/24.2.7.2$Linux_X86_64 LibreOffice_project/420$Build-2</meta:generator>
  </office:meta>
</office:document-meta>
</file>