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4.9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3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35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405092592592593" calcext:value-type="float">
            <text:p>0,00000405092592592593</text:p>
          </table:table-cell>
          <table:table-cell table:formula="of:=[.D3]-[.D2]" office:value-type="float" office:value="0.00000405092592592593" calcext:value-type="float">
            <text:p>0,000004050925925925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35" office:value-type="float" office:value="70" calcext:value-type="float">
            <text:p>70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0810185185185185" calcext:value-type="float">
            <text:p>0,00000810185185185185</text:p>
          </table:table-cell>
          <table:table-cell table:formula="of:=[.D4]-[.D3]" office:value-type="float" office:value="0.00000405092592592593" calcext:value-type="float">
            <text:p>0,000004050925925925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35" office:value-type="float" office:value="105" calcext:value-type="float">
            <text:p>105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121527777777778" calcext:value-type="float">
            <text:p>0,00001215277777777780</text:p>
          </table:table-cell>
          <table:table-cell table:formula="of:=[.D5]-[.D4]" office:value-type="float" office:value="0.00000405092592592593" calcext:value-type="float">
            <text:p>0,000004050925925925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35" office:value-type="float" office:value="140" calcext:value-type="float">
            <text:p>140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162037037037037" calcext:value-type="float">
            <text:p>0,00001620370370370370</text:p>
          </table:table-cell>
          <table:table-cell table:formula="of:=[.D6]-[.D5]" office:value-type="float" office:value="0.00000405092592592593" calcext:value-type="float">
            <text:p>0,000004050925925925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35" office:value-type="float" office:value="175" calcext:value-type="float">
            <text:p>175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202546296296296" calcext:value-type="float">
            <text:p>0,00002025462962962960</text:p>
          </table:table-cell>
          <table:table-cell table:formula="of:=[.D7]-[.D6]" office:value-type="float" office:value="0.00000405092592592593" calcext:value-type="float">
            <text:p>0,000004050925925925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35" office:value-type="float" office:value="210" calcext:value-type="float">
            <text:p>210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243055555555556" calcext:value-type="float">
            <text:p>0,00002430555555555560</text:p>
          </table:table-cell>
          <table:table-cell table:formula="of:=[.D8]-[.D7]" office:value-type="float" office:value="0.00000405092592592593" calcext:value-type="float">
            <text:p>0,000004050925925925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35" office:value-type="float" office:value="245" calcext:value-type="float">
            <text:p>245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283564814814815" calcext:value-type="float">
            <text:p>0,00002835648148148150</text:p>
          </table:table-cell>
          <table:table-cell table:formula="of:=[.D9]-[.D8]" office:value-type="float" office:value="0.00000405092592592593" calcext:value-type="float">
            <text:p>0,000004050925925925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35" office:value-type="float" office:value="280" calcext:value-type="float">
            <text:p>280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324074074074074" calcext:value-type="float">
            <text:p>0,00003240740740740740</text:p>
          </table:table-cell>
          <table:table-cell table:formula="of:=[.D10]-[.D9]" office:value-type="float" office:value="0.00000405092592592593" calcext:value-type="float">
            <text:p>0,000004050925925925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35" office:value-type="float" office:value="315" calcext:value-type="float">
            <text:p>315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364583333333333" calcext:value-type="float">
            <text:p>0,00003645833333333330</text:p>
          </table:table-cell>
          <table:table-cell table:formula="of:=[.D11]-[.D10]" office:value-type="float" office:value="0.00000405092592592592" calcext:value-type="float">
            <text:p>0,000004050925925925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35" office:value-type="float" office:value="350" calcext:value-type="float">
            <text:p>35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405092592592593" calcext:value-type="float">
            <text:p>0,00004050925925925930</text:p>
          </table:table-cell>
          <table:table-cell table:formula="of:=[.D12]-[.D11]" office:value-type="float" office:value="0.00000405092592592593" calcext:value-type="float">
            <text:p>0,000004050925925925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35" office:value-type="float" office:value="385" calcext:value-type="float">
            <text:p>385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445601851851852" calcext:value-type="float">
            <text:p>0,00004456018518518520</text:p>
          </table:table-cell>
          <table:table-cell table:formula="of:=[.D13]-[.D12]" office:value-type="float" office:value="0.00000405092592592592" calcext:value-type="float">
            <text:p>0,000004050925925925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35" office:value-type="float" office:value="420" calcext:value-type="float">
            <text:p>420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486111111111111" calcext:value-type="float">
            <text:p>0,00004861111111111110</text:p>
          </table:table-cell>
          <table:table-cell table:formula="of:=[.D14]-[.D13]" office:value-type="float" office:value="0.00000405092592592593" calcext:value-type="float">
            <text:p>0,000004050925925925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35" office:value-type="float" office:value="455" calcext:value-type="float">
            <text:p>455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052662037037037" calcext:value-type="float">
            <text:p>0,00005266203703703700</text:p>
          </table:table-cell>
          <table:table-cell table:formula="of:=[.D15]-[.D14]" office:value-type="float" office:value="0.00000405092592592593" calcext:value-type="float">
            <text:p>0,000004050925925925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35" office:value-type="float" office:value="490" calcext:value-type="float">
            <text:p>490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056712962962963" calcext:value-type="float">
            <text:p>0,00005671296296296300</text:p>
          </table:table-cell>
          <table:table-cell table:formula="of:=[.D16]-[.D15]" office:value-type="float" office:value="0.00000405092592592592" calcext:value-type="float">
            <text:p>0,000004050925925925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35" office:value-type="float" office:value="525" calcext:value-type="float">
            <text:p>525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0607638888888889" calcext:value-type="float">
            <text:p>0,00006076388888888890</text:p>
          </table:table-cell>
          <table:table-cell table:formula="of:=[.D17]-[.D16]" office:value-type="float" office:value="0.00000405092592592593" calcext:value-type="float">
            <text:p>0,000004050925925925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35" office:value-type="float" office:value="560" calcext:value-type="float">
            <text:p>560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0648148148148148" calcext:value-type="float">
            <text:p>0,00006481481481481480</text:p>
          </table:table-cell>
          <table:table-cell table:formula="of:=[.D18]-[.D17]" office:value-type="float" office:value="0.00000405092592592593" calcext:value-type="float">
            <text:p>0,000004050925925925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35" office:value-type="float" office:value="595" calcext:value-type="float">
            <text:p>595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0688657407407407" calcext:value-type="float">
            <text:p>0,00006886574074074070</text:p>
          </table:table-cell>
          <table:table-cell table:formula="of:=[.D19]-[.D18]" office:value-type="float" office:value="0.00000405092592592593" calcext:value-type="float">
            <text:p>0,0000040509259259259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35" office:value-type="float" office:value="630" calcext:value-type="float">
            <text:p>630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0729166666666667" calcext:value-type="float">
            <text:p>0,00007291666666666670</text:p>
          </table:table-cell>
          <table:table-cell table:formula="of:=[.D20]-[.D19]" office:value-type="float" office:value="0.00000405092592592592" calcext:value-type="float">
            <text:p>0,000004050925925925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35" office:value-type="float" office:value="665" calcext:value-type="float">
            <text:p>665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0769675925925926" calcext:value-type="float">
            <text:p>0,00007696759259259260</text:p>
          </table:table-cell>
          <table:table-cell table:formula="of:=[.D21]-[.D20]" office:value-type="float" office:value="0.00000405092592592593" calcext:value-type="float">
            <text:p>0,000004050925925925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35" office:value-type="float" office:value="700" calcext:value-type="float">
            <text:p>70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0810185185185185" calcext:value-type="float">
            <text:p>0,00008101851851851850</text:p>
          </table:table-cell>
          <table:table-cell table:formula="of:=[.D22]-[.D21]" office:value-type="float" office:value="0.00000405092592592593" calcext:value-type="float">
            <text:p>0,000004050925925925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35" office:value-type="float" office:value="735" calcext:value-type="float">
            <text:p>735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0850694444444444" calcext:value-type="float">
            <text:p>0,00008506944444444440</text:p>
          </table:table-cell>
          <table:table-cell table:formula="of:=[.D23]-[.D22]" office:value-type="float" office:value="0.00000405092592592593" calcext:value-type="float">
            <text:p>0,0000040509259259259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35" office:value-type="float" office:value="770" calcext:value-type="float">
            <text:p>770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0891203703703704" calcext:value-type="float">
            <text:p>0,00008912037037037040</text:p>
          </table:table-cell>
          <table:table-cell table:formula="of:=[.D24]-[.D23]" office:value-type="float" office:value="0.00000405092592592593" calcext:value-type="float">
            <text:p>0,0000040509259259259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35" office:value-type="float" office:value="805" calcext:value-type="float">
            <text:p>805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0931712962962963" calcext:value-type="float">
            <text:p>0,00009317129629629630</text:p>
          </table:table-cell>
          <table:table-cell table:formula="of:=[.D25]-[.D24]" office:value-type="float" office:value="0.00000405092592592592" calcext:value-type="float">
            <text:p>0,000004050925925925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35" office:value-type="float" office:value="840" calcext:value-type="float">
            <text:p>840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0972222222222222" calcext:value-type="float">
            <text:p>0,00009722222222222220</text:p>
          </table:table-cell>
          <table:table-cell table:formula="of:=[.D26]-[.D25]" office:value-type="float" office:value="0.00000405092592592593" calcext:value-type="float">
            <text:p>0,000004050925925925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35" office:value-type="float" office:value="875" calcext:value-type="float">
            <text:p>875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101273148148148" calcext:value-type="float">
            <text:p>0,00010127314814814800</text:p>
          </table:table-cell>
          <table:table-cell table:formula="of:=[.D27]-[.D26]" office:value-type="float" office:value="0.00000405092592592593" calcext:value-type="float">
            <text:p>0,0000040509259259259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35" office:value-type="float" office:value="910" calcext:value-type="float">
            <text:p>910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105324074074074" calcext:value-type="float">
            <text:p>0,00010532407407407400</text:p>
          </table:table-cell>
          <table:table-cell table:formula="of:=[.D28]-[.D27]" office:value-type="float" office:value="0.00000405092592592593" calcext:value-type="float">
            <text:p>0,0000040509259259259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35" office:value-type="float" office:value="945" calcext:value-type="float">
            <text:p>945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109375" calcext:value-type="float">
            <text:p>0,00010937500000000000</text:p>
          </table:table-cell>
          <table:table-cell table:formula="of:=[.D29]-[.D28]" office:value-type="float" office:value="0.00000405092592592593" calcext:value-type="float">
            <text:p>0,0000040509259259259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35" office:value-type="float" office:value="980" calcext:value-type="float">
            <text:p>980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113425925925926" calcext:value-type="float">
            <text:p>0,00011342592592592600</text:p>
          </table:table-cell>
          <table:table-cell table:formula="of:=[.D30]-[.D29]" office:value-type="float" office:value="0.00000405092592592592" calcext:value-type="float">
            <text:p>0,0000040509259259259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35" office:value-type="float" office:value="1015" calcext:value-type="float">
            <text:p>1015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117476851851852" calcext:value-type="float">
            <text:p>0,00011747685185185200</text:p>
          </table:table-cell>
          <table:table-cell table:formula="of:=[.D31]-[.D30]" office:value-type="float" office:value="0.00000405092592592593" calcext:value-type="float">
            <text:p>0,0000040509259259259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35" office:value-type="float" office:value="1050" calcext:value-type="float">
            <text:p>105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121527777777778" calcext:value-type="float">
            <text:p>0,00012152777777777800</text:p>
          </table:table-cell>
          <table:table-cell table:formula="of:=[.D32]-[.D31]" office:value-type="float" office:value="0.00000405092592592593" calcext:value-type="float">
            <text:p>0,0000040509259259259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35" office:value-type="float" office:value="1085" calcext:value-type="float">
            <text:p>1085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125578703703704" calcext:value-type="float">
            <text:p>0,00012557870370370400</text:p>
          </table:table-cell>
          <table:table-cell table:formula="of:=[.D33]-[.D32]" office:value-type="float" office:value="0.00000405092592592593" calcext:value-type="float">
            <text:p>0,0000040509259259259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35" office:value-type="float" office:value="1120" calcext:value-type="float">
            <text:p>1120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12962962962963" calcext:value-type="float">
            <text:p>0,00012962962962963000</text:p>
          </table:table-cell>
          <table:table-cell table:formula="of:=[.D34]-[.D33]" office:value-type="float" office:value="0.00000405092592592593" calcext:value-type="float">
            <text:p>0,0000040509259259259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35" office:value-type="float" office:value="1155" calcext:value-type="float">
            <text:p>1155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133680555555556" calcext:value-type="float">
            <text:p>0,00013368055555555600</text:p>
          </table:table-cell>
          <table:table-cell table:formula="of:=[.D35]-[.D34]" office:value-type="float" office:value="0.00000405092592592593" calcext:value-type="float">
            <text:p>0,0000040509259259259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35" office:value-type="float" office:value="1190" calcext:value-type="float">
            <text:p>1190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137731481481482" calcext:value-type="float">
            <text:p>0,00013773148148148200</text:p>
          </table:table-cell>
          <table:table-cell table:formula="of:=[.D36]-[.D35]" office:value-type="float" office:value="0.00000405092592592593" calcext:value-type="float">
            <text:p>0,000004050925925925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35" office:value-type="float" office:value="1225" calcext:value-type="float">
            <text:p>1225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141782407407407" calcext:value-type="float">
            <text:p>0,00014178240740740700</text:p>
          </table:table-cell>
          <table:table-cell table:formula="of:=[.D37]-[.D36]" office:value-type="float" office:value="0.00000405092592592593" calcext:value-type="float">
            <text:p>0,0000040509259259259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35" office:value-type="float" office:value="1260" calcext:value-type="float">
            <text:p>1260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145833333333333" calcext:value-type="float">
            <text:p>0,00014583333333333300</text:p>
          </table:table-cell>
          <table:table-cell table:formula="of:=[.D38]-[.D37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35" office:value-type="float" office:value="1295" calcext:value-type="float">
            <text:p>1295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149884259259259" calcext:value-type="float">
            <text:p>0,00014988425925925900</text:p>
          </table:table-cell>
          <table:table-cell table:formula="of:=[.D39]-[.D38]" office:value-type="float" office:value="0.00000405092592592593" calcext:value-type="float">
            <text:p>0,0000040509259259259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35" office:value-type="float" office:value="1330" calcext:value-type="float">
            <text:p>1330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153935185185185" calcext:value-type="float">
            <text:p>0,00015393518518518500</text:p>
          </table:table-cell>
          <table:table-cell table:formula="of:=[.D40]-[.D39]" office:value-type="float" office:value="0.00000405092592592593" calcext:value-type="float">
            <text:p>0,0000040509259259259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35" office:value-type="float" office:value="1365" calcext:value-type="float">
            <text:p>1365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157986111111111" calcext:value-type="float">
            <text:p>0,00015798611111111100</text:p>
          </table:table-cell>
          <table:table-cell table:formula="of:=[.D41]-[.D40]" office:value-type="float" office:value="0.00000405092592592593" calcext:value-type="float">
            <text:p>0,0000040509259259259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35" office:value-type="float" office:value="1400" calcext:value-type="float">
            <text:p>140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162037037037037" calcext:value-type="float">
            <text:p>0,00016203703703703700</text:p>
          </table:table-cell>
          <table:table-cell table:formula="of:=[.D42]-[.D41]" office:value-type="float" office:value="0.00000405092592592593" calcext:value-type="float">
            <text:p>0,0000040509259259259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35" office:value-type="float" office:value="1435" calcext:value-type="float">
            <text:p>1435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166087962962963" calcext:value-type="float">
            <text:p>0,00016608796296296300</text:p>
          </table:table-cell>
          <table:table-cell table:formula="of:=[.D43]-[.D42]" office:value-type="float" office:value="0.00000405092592592593" calcext:value-type="float">
            <text:p>0,0000040509259259259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35" office:value-type="float" office:value="1470" calcext:value-type="float">
            <text:p>1470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170138888888889" calcext:value-type="float">
            <text:p>0,00017013888888888900</text:p>
          </table:table-cell>
          <table:table-cell table:formula="of:=[.D44]-[.D43]" office:value-type="float" office:value="0.00000405092592592593" calcext:value-type="float">
            <text:p>0,0000040509259259259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35" office:value-type="float" office:value="1505" calcext:value-type="float">
            <text:p>1505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174189814814815" calcext:value-type="float">
            <text:p>0,00017418981481481500</text:p>
          </table:table-cell>
          <table:table-cell table:formula="of:=[.D45]-[.D44]" office:value-type="float" office:value="0.00000405092592592593" calcext:value-type="float">
            <text:p>0,0000040509259259259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35" office:value-type="float" office:value="1540" calcext:value-type="float">
            <text:p>1540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178240740740741" calcext:value-type="float">
            <text:p>0,00017824074074074100</text:p>
          </table:table-cell>
          <table:table-cell table:formula="of:=[.D46]-[.D45]" office:value-type="float" office:value="0.00000405092592592593" calcext:value-type="float">
            <text:p>0,0000040509259259259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35" office:value-type="float" office:value="1575" calcext:value-type="float">
            <text:p>1575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182291666666667" calcext:value-type="float">
            <text:p>0,00018229166666666700</text:p>
          </table:table-cell>
          <table:table-cell table:formula="of:=[.D47]-[.D46]" office:value-type="float" office:value="0.00000405092592592593" calcext:value-type="float">
            <text:p>0,0000040509259259259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35" office:value-type="float" office:value="1610" calcext:value-type="float">
            <text:p>1610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186342592592593" calcext:value-type="float">
            <text:p>0,00018634259259259300</text:p>
          </table:table-cell>
          <table:table-cell table:formula="of:=[.D48]-[.D47]" office:value-type="float" office:value="0.00000405092592592593" calcext:value-type="float">
            <text:p>0,0000040509259259259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35" office:value-type="float" office:value="1645" calcext:value-type="float">
            <text:p>1645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190393518518519" calcext:value-type="float">
            <text:p>0,00019039351851851900</text:p>
          </table:table-cell>
          <table:table-cell table:formula="of:=[.D49]-[.D48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35" office:value-type="float" office:value="1680" calcext:value-type="float">
            <text:p>1680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194444444444444" calcext:value-type="float">
            <text:p>0,00019444444444444400</text:p>
          </table:table-cell>
          <table:table-cell table:formula="of:=[.D50]-[.D49]" office:value-type="float" office:value="0.00000405092592592593" calcext:value-type="float">
            <text:p>0,0000040509259259259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35" office:value-type="float" office:value="1715" calcext:value-type="float">
            <text:p>1715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19849537037037" calcext:value-type="float">
            <text:p>0,00019849537037037000</text:p>
          </table:table-cell>
          <table:table-cell table:formula="of:=[.D51]-[.D50]" office:value-type="float" office:value="0.00000405092592592593" calcext:value-type="float">
            <text:p>0,0000040509259259259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35" office:value-type="float" office:value="1750" calcext:value-type="float">
            <text:p>175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202546296296296" calcext:value-type="float">
            <text:p>0,00020254629629629600</text:p>
          </table:table-cell>
          <table:table-cell table:formula="of:=[.D52]-[.D51]" office:value-type="float" office:value="0.00000405092592592593" calcext:value-type="float">
            <text:p>0,0000040509259259259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35" office:value-type="float" office:value="1785" calcext:value-type="float">
            <text:p>1785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206597222222222" calcext:value-type="float">
            <text:p>0,00020659722222222200</text:p>
          </table:table-cell>
          <table:table-cell table:formula="of:=[.D53]-[.D52]" office:value-type="float" office:value="0.00000405092592592593" calcext:value-type="float">
            <text:p>0,0000040509259259259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35" office:value-type="float" office:value="1820" calcext:value-type="float">
            <text:p>1820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210648148148148" calcext:value-type="float">
            <text:p>0,00021064814814814800</text:p>
          </table:table-cell>
          <table:table-cell table:formula="of:=[.D54]-[.D53]" office:value-type="float" office:value="0.00000405092592592593" calcext:value-type="float">
            <text:p>0,0000040509259259259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35" office:value-type="float" office:value="1855" calcext:value-type="float">
            <text:p>1855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214699074074074" calcext:value-type="float">
            <text:p>0,00021469907407407400</text:p>
          </table:table-cell>
          <table:table-cell table:formula="of:=[.D55]-[.D54]" office:value-type="float" office:value="0.00000405092592592593" calcext:value-type="float">
            <text:p>0,0000040509259259259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35" office:value-type="float" office:value="1890" calcext:value-type="float">
            <text:p>1890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21875" calcext:value-type="float">
            <text:p>0,00021875000000000000</text:p>
          </table:table-cell>
          <table:table-cell table:formula="of:=[.D56]-[.D55]" office:value-type="float" office:value="0.00000405092592592593" calcext:value-type="float">
            <text:p>0,0000040509259259259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35" office:value-type="float" office:value="1925" calcext:value-type="float">
            <text:p>1925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222800925925926" calcext:value-type="float">
            <text:p>0,00022280092592592600</text:p>
          </table:table-cell>
          <table:table-cell table:formula="of:=[.D57]-[.D56]" office:value-type="float" office:value="0.00000405092592592593" calcext:value-type="float">
            <text:p>0,0000040509259259259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35" office:value-type="float" office:value="1960" calcext:value-type="float">
            <text:p>1960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226851851851852" calcext:value-type="float">
            <text:p>0,00022685185185185200</text:p>
          </table:table-cell>
          <table:table-cell table:formula="of:=[.D58]-[.D57]" office:value-type="float" office:value="0.00000405092592592593" calcext:value-type="float">
            <text:p>0,0000040509259259259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35" office:value-type="float" office:value="1995" calcext:value-type="float">
            <text:p>1995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230902777777778" calcext:value-type="float">
            <text:p>0,00023090277777777800</text:p>
          </table:table-cell>
          <table:table-cell table:formula="of:=[.D59]-[.D58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35" office:value-type="float" office:value="2030" calcext:value-type="float">
            <text:p>2030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234953703703704" calcext:value-type="float">
            <text:p>0,00023495370370370400</text:p>
          </table:table-cell>
          <table:table-cell table:formula="of:=[.D60]-[.D59]" office:value-type="float" office:value="0.00000405092592592593" calcext:value-type="float">
            <text:p>0,0000040509259259259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35" office:value-type="float" office:value="2065" calcext:value-type="float">
            <text:p>2065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23900462962963" calcext:value-type="float">
            <text:p>0,00023900462962963000</text:p>
          </table:table-cell>
          <table:table-cell table:formula="of:=[.D61]-[.D60]" office:value-type="float" office:value="0.00000405092592592593" calcext:value-type="float">
            <text:p>0,0000040509259259259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35" office:value-type="float" office:value="2100" calcext:value-type="float">
            <text:p>210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243055555555556" calcext:value-type="float">
            <text:p>0,00024305555555555600</text:p>
          </table:table-cell>
          <table:table-cell table:formula="of:=[.D62]-[.D61]" office:value-type="float" office:value="0.00000405092592592596" calcext:value-type="float">
            <text:p>0,0000040509259259259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35" office:value-type="float" office:value="2135" calcext:value-type="float">
            <text:p>2135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247106481481482" calcext:value-type="float">
            <text:p>0,00024710648148148200</text:p>
          </table:table-cell>
          <table:table-cell table:formula="of:=[.D63]-[.D62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35" office:value-type="float" office:value="2170" calcext:value-type="float">
            <text:p>2170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251157407407407" calcext:value-type="float">
            <text:p>0,00025115740740740700</text:p>
          </table:table-cell>
          <table:table-cell table:formula="of:=[.D64]-[.D63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35" office:value-type="float" office:value="2205" calcext:value-type="float">
            <text:p>2205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255208333333333" calcext:value-type="float">
            <text:p>0,00025520833333333300</text:p>
          </table:table-cell>
          <table:table-cell table:formula="of:=[.D65]-[.D64]" office:value-type="float" office:value="0.00000405092592592596" calcext:value-type="float">
            <text:p>0,0000040509259259259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35" office:value-type="float" office:value="2240" calcext:value-type="float">
            <text:p>2240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259259259259259" calcext:value-type="float">
            <text:p>0,00025925925925925900</text:p>
          </table:table-cell>
          <table:table-cell table:formula="of:=[.D66]-[.D65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35" office:value-type="float" office:value="2275" calcext:value-type="float">
            <text:p>2275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263310185185185" calcext:value-type="float">
            <text:p>0,00026331018518518500</text:p>
          </table:table-cell>
          <table:table-cell table:formula="of:=[.D67]-[.D66]" office:value-type="float" office:value="0.00000405092592592596" calcext:value-type="float">
            <text:p>0,0000040509259259259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35" office:value-type="float" office:value="2310" calcext:value-type="float">
            <text:p>2310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267361111111111" calcext:value-type="float">
            <text:p>0,00026736111111111100</text:p>
          </table:table-cell>
          <table:table-cell table:formula="of:=[.D68]-[.D67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35" office:value-type="float" office:value="2345" calcext:value-type="float">
            <text:p>2345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271412037037037" calcext:value-type="float">
            <text:p>0,00027141203703703700</text:p>
          </table:table-cell>
          <table:table-cell table:formula="of:=[.D69]-[.D68]" office:value-type="float" office:value="0.00000405092592592596" calcext:value-type="float">
            <text:p>0,0000040509259259259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35" office:value-type="float" office:value="2380" calcext:value-type="float">
            <text:p>2380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275462962962963" calcext:value-type="float">
            <text:p>0,00027546296296296300</text:p>
          </table:table-cell>
          <table:table-cell table:formula="of:=[.D70]-[.D69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35" office:value-type="float" office:value="2415" calcext:value-type="float">
            <text:p>2415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279513888888889" calcext:value-type="float">
            <text:p>0,00027951388888888900</text:p>
          </table:table-cell>
          <table:table-cell table:formula="of:=[.D71]-[.D70]" office:value-type="float" office:value="0.00000405092592592596" calcext:value-type="float">
            <text:p>0,0000040509259259259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35" office:value-type="float" office:value="2450" calcext:value-type="float">
            <text:p>245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283564814814815" calcext:value-type="float">
            <text:p>0,00028356481481481500</text:p>
          </table:table-cell>
          <table:table-cell table:formula="of:=[.D72]-[.D71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35" office:value-type="float" office:value="2485" calcext:value-type="float">
            <text:p>2485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287615740740741" calcext:value-type="float">
            <text:p>0,00028761574074074100</text:p>
          </table:table-cell>
          <table:table-cell table:formula="of:=[.D73]-[.D72]" office:value-type="float" office:value="0.00000405092592592596" calcext:value-type="float">
            <text:p>0,0000040509259259259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35" office:value-type="float" office:value="2520" calcext:value-type="float">
            <text:p>2520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291666666666667" calcext:value-type="float">
            <text:p>0,00029166666666666700</text:p>
          </table:table-cell>
          <table:table-cell table:formula="of:=[.D74]-[.D73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35" office:value-type="float" office:value="2555" calcext:value-type="float">
            <text:p>2555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295717592592593" calcext:value-type="float">
            <text:p>0,00029571759259259300</text:p>
          </table:table-cell>
          <table:table-cell table:formula="of:=[.D75]-[.D74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35" office:value-type="float" office:value="2590" calcext:value-type="float">
            <text:p>2590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299768518518519" calcext:value-type="float">
            <text:p>0,00029976851851851900</text:p>
          </table:table-cell>
          <table:table-cell table:formula="of:=[.D76]-[.D75]" office:value-type="float" office:value="0.00000405092592592596" calcext:value-type="float">
            <text:p>0,0000040509259259259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35" office:value-type="float" office:value="2625" calcext:value-type="float">
            <text:p>2625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303819444444444" calcext:value-type="float">
            <text:p>0,00030381944444444400</text:p>
          </table:table-cell>
          <table:table-cell table:formula="of:=[.D77]-[.D76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35" office:value-type="float" office:value="2660" calcext:value-type="float">
            <text:p>2660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30787037037037" calcext:value-type="float">
            <text:p>0,00030787037037037000</text:p>
          </table:table-cell>
          <table:table-cell table:formula="of:=[.D78]-[.D77]" office:value-type="float" office:value="0.00000405092592592596" calcext:value-type="float">
            <text:p>0,0000040509259259259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35" office:value-type="float" office:value="2695" calcext:value-type="float">
            <text:p>2695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311921296296296" calcext:value-type="float">
            <text:p>0,00031192129629629600</text:p>
          </table:table-cell>
          <table:table-cell table:formula="of:=[.D79]-[.D78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35" office:value-type="float" office:value="2730" calcext:value-type="float">
            <text:p>2730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315972222222222" calcext:value-type="float">
            <text:p>0,00031597222222222200</text:p>
          </table:table-cell>
          <table:table-cell table:formula="of:=[.D80]-[.D79]" office:value-type="float" office:value="0.00000405092592592596" calcext:value-type="float">
            <text:p>0,0000040509259259259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35" office:value-type="float" office:value="2765" calcext:value-type="float">
            <text:p>2765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320023148148148" calcext:value-type="float">
            <text:p>0,00032002314814814800</text:p>
          </table:table-cell>
          <table:table-cell table:formula="of:=[.D81]-[.D80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35" office:value-type="float" office:value="2800" calcext:value-type="float">
            <text:p>280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324074074074074" calcext:value-type="float">
            <text:p>0,00032407407407407400</text:p>
          </table:table-cell>
          <table:table-cell table:formula="of:=[.D82]-[.D81]" office:value-type="float" office:value="0.00000405092592592596" calcext:value-type="float">
            <text:p>0,0000040509259259259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35" office:value-type="float" office:value="2835" calcext:value-type="float">
            <text:p>2835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328125" calcext:value-type="float">
            <text:p>0,00032812500000000000</text:p>
          </table:table-cell>
          <table:table-cell table:formula="of:=[.D83]-[.D82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35" office:value-type="float" office:value="2870" calcext:value-type="float">
            <text:p>2870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332175925925926" calcext:value-type="float">
            <text:p>0,00033217592592592600</text:p>
          </table:table-cell>
          <table:table-cell table:formula="of:=[.D84]-[.D83]" office:value-type="float" office:value="0.00000405092592592596" calcext:value-type="float">
            <text:p>0,0000040509259259259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35" office:value-type="float" office:value="2905" calcext:value-type="float">
            <text:p>2905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336226851851852" calcext:value-type="float">
            <text:p>0,00033622685185185200</text:p>
          </table:table-cell>
          <table:table-cell table:formula="of:=[.D85]-[.D84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35" office:value-type="float" office:value="2940" calcext:value-type="float">
            <text:p>2940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340277777777778" calcext:value-type="float">
            <text:p>0,00034027777777777800</text:p>
          </table:table-cell>
          <table:table-cell table:formula="of:=[.D86]-[.D85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35" office:value-type="float" office:value="2975" calcext:value-type="float">
            <text:p>2975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344328703703704" calcext:value-type="float">
            <text:p>0,00034432870370370400</text:p>
          </table:table-cell>
          <table:table-cell table:formula="of:=[.D87]-[.D86]" office:value-type="float" office:value="0.00000405092592592596" calcext:value-type="float">
            <text:p>0,0000040509259259259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35" office:value-type="float" office:value="3010" calcext:value-type="float">
            <text:p>3010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34837962962963" calcext:value-type="float">
            <text:p>0,00034837962962963000</text:p>
          </table:table-cell>
          <table:table-cell table:formula="of:=[.D88]-[.D87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35" office:value-type="float" office:value="3045" calcext:value-type="float">
            <text:p>3045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352430555555556" calcext:value-type="float">
            <text:p>0,00035243055555555600</text:p>
          </table:table-cell>
          <table:table-cell table:formula="of:=[.D89]-[.D88]" office:value-type="float" office:value="0.00000405092592592596" calcext:value-type="float">
            <text:p>0,0000040509259259259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35" office:value-type="float" office:value="3080" calcext:value-type="float">
            <text:p>3080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356481481481482" calcext:value-type="float">
            <text:p>0,00035648148148148200</text:p>
          </table:table-cell>
          <table:table-cell table:formula="of:=[.D90]-[.D89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35" office:value-type="float" office:value="3115" calcext:value-type="float">
            <text:p>3115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360532407407407" calcext:value-type="float">
            <text:p>0,00036053240740740700</text:p>
          </table:table-cell>
          <table:table-cell table:formula="of:=[.D91]-[.D90]" office:value-type="float" office:value="0.00000405092592592596" calcext:value-type="float">
            <text:p>0,0000040509259259259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35" office:value-type="float" office:value="3150" calcext:value-type="float">
            <text:p>315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364583333333333" calcext:value-type="float">
            <text:p>0,00036458333333333300</text:p>
          </table:table-cell>
          <table:table-cell table:formula="of:=[.D92]-[.D91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35" office:value-type="float" office:value="3185" calcext:value-type="float">
            <text:p>3185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368634259259259" calcext:value-type="float">
            <text:p>0,00036863425925925900</text:p>
          </table:table-cell>
          <table:table-cell table:formula="of:=[.D93]-[.D92]" office:value-type="float" office:value="0.00000405092592592596" calcext:value-type="float">
            <text:p>0,0000040509259259259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35" office:value-type="float" office:value="3220" calcext:value-type="float">
            <text:p>3220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372685185185185" calcext:value-type="float">
            <text:p>0,00037268518518518500</text:p>
          </table:table-cell>
          <table:table-cell table:formula="of:=[.D94]-[.D93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35" office:value-type="float" office:value="3255" calcext:value-type="float">
            <text:p>3255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376736111111111" calcext:value-type="float">
            <text:p>0,00037673611111111100</text:p>
          </table:table-cell>
          <table:table-cell table:formula="of:=[.D95]-[.D94]" office:value-type="float" office:value="0.00000405092592592596" calcext:value-type="float">
            <text:p>0,0000040509259259259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35" office:value-type="float" office:value="3290" calcext:value-type="float">
            <text:p>3290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380787037037037" calcext:value-type="float">
            <text:p>0,00038078703703703700</text:p>
          </table:table-cell>
          <table:table-cell table:formula="of:=[.D96]-[.D95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35" office:value-type="float" office:value="3325" calcext:value-type="float">
            <text:p>3325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384837962962963" calcext:value-type="float">
            <text:p>0,00038483796296296300</text:p>
          </table:table-cell>
          <table:table-cell table:formula="of:=[.D97]-[.D96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35" office:value-type="float" office:value="3360" calcext:value-type="float">
            <text:p>3360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388888888888889" calcext:value-type="float">
            <text:p>0,00038888888888888900</text:p>
          </table:table-cell>
          <table:table-cell table:formula="of:=[.D98]-[.D97]" office:value-type="float" office:value="0.00000405092592592596" calcext:value-type="float">
            <text:p>0,000004050925925925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35" office:value-type="float" office:value="3395" calcext:value-type="float">
            <text:p>3395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392939814814815" calcext:value-type="float">
            <text:p>0,00039293981481481500</text:p>
          </table:table-cell>
          <table:table-cell table:formula="of:=[.D99]-[.D98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35" office:value-type="float" office:value="3430" calcext:value-type="float">
            <text:p>3430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396990740740741" calcext:value-type="float">
            <text:p>0,00039699074074074100</text:p>
          </table:table-cell>
          <table:table-cell table:formula="of:=[.D100]-[.D99]" office:value-type="float" office:value="0.00000405092592592596" calcext:value-type="float">
            <text:p>0,0000040509259259259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35" office:value-type="float" office:value="3465" calcext:value-type="float">
            <text:p>3465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401041666666667" calcext:value-type="float">
            <text:p>0,00040104166666666700</text:p>
          </table:table-cell>
          <table:table-cell table:formula="of:=[.D101]-[.D100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35" office:value-type="float" office:value="3500" calcext:value-type="float">
            <text:p>35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405092592592593" calcext:value-type="float">
            <text:p>0,00040509259259259300</text:p>
          </table:table-cell>
          <table:table-cell table:formula="of:=[.D102]-[.D101]" office:value-type="float" office:value="0.00000405092592592596" calcext:value-type="float">
            <text:p>0,0000040509259259259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35" office:value-type="float" office:value="3535" calcext:value-type="float">
            <text:p>3535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409143518518519" calcext:value-type="float">
            <text:p>0,00040914351851851900</text:p>
          </table:table-cell>
          <table:table-cell table:formula="of:=[.D103]-[.D102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35" office:value-type="float" office:value="3570" calcext:value-type="float">
            <text:p>3570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413194444444444" calcext:value-type="float">
            <text:p>0,00041319444444444400</text:p>
          </table:table-cell>
          <table:table-cell table:formula="of:=[.D104]-[.D103]" office:value-type="float" office:value="0.00000405092592592596" calcext:value-type="float">
            <text:p>0,0000040509259259259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35" office:value-type="float" office:value="3605" calcext:value-type="float">
            <text:p>3605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41724537037037" calcext:value-type="float">
            <text:p>0,00041724537037037000</text:p>
          </table:table-cell>
          <table:table-cell table:formula="of:=[.D105]-[.D104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35" office:value-type="float" office:value="3640" calcext:value-type="float">
            <text:p>3640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421296296296296" calcext:value-type="float">
            <text:p>0,00042129629629629600</text:p>
          </table:table-cell>
          <table:table-cell table:formula="of:=[.D106]-[.D105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35" office:value-type="float" office:value="3675" calcext:value-type="float">
            <text:p>3675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425347222222222" calcext:value-type="float">
            <text:p>0,00042534722222222200</text:p>
          </table:table-cell>
          <table:table-cell table:formula="of:=[.D107]-[.D106]" office:value-type="float" office:value="0.00000405092592592596" calcext:value-type="float">
            <text:p>0,0000040509259259259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35" office:value-type="float" office:value="3710" calcext:value-type="float">
            <text:p>3710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429398148148148" calcext:value-type="float">
            <text:p>0,00042939814814814800</text:p>
          </table:table-cell>
          <table:table-cell table:formula="of:=[.D108]-[.D107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35" office:value-type="float" office:value="3745" calcext:value-type="float">
            <text:p>3745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433449074074074" calcext:value-type="float">
            <text:p>0,00043344907407407400</text:p>
          </table:table-cell>
          <table:table-cell table:formula="of:=[.D109]-[.D108]" office:value-type="float" office:value="0.00000405092592592596" calcext:value-type="float">
            <text:p>0,0000040509259259259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35" office:value-type="float" office:value="3780" calcext:value-type="float">
            <text:p>3780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4375" calcext:value-type="float">
            <text:p>0,00043750000000000000</text:p>
          </table:table-cell>
          <table:table-cell table:formula="of:=[.D110]-[.D109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35" office:value-type="float" office:value="3815" calcext:value-type="float">
            <text:p>3815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441550925925926" calcext:value-type="float">
            <text:p>0,00044155092592592600</text:p>
          </table:table-cell>
          <table:table-cell table:formula="of:=[.D111]-[.D110]" office:value-type="float" office:value="0.00000405092592592596" calcext:value-type="float">
            <text:p>0,0000040509259259259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35" office:value-type="float" office:value="3850" calcext:value-type="float">
            <text:p>385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445601851851852" calcext:value-type="float">
            <text:p>0,00044560185185185200</text:p>
          </table:table-cell>
          <table:table-cell table:formula="of:=[.D112]-[.D111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35" office:value-type="float" office:value="3885" calcext:value-type="float">
            <text:p>3885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449652777777778" calcext:value-type="float">
            <text:p>0,00044965277777777800</text:p>
          </table:table-cell>
          <table:table-cell table:formula="of:=[.D113]-[.D112]" office:value-type="float" office:value="0.00000405092592592596" calcext:value-type="float">
            <text:p>0,0000040509259259259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35" office:value-type="float" office:value="3920" calcext:value-type="float">
            <text:p>3920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453703703703704" calcext:value-type="float">
            <text:p>0,00045370370370370400</text:p>
          </table:table-cell>
          <table:table-cell table:formula="of:=[.D114]-[.D113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35" office:value-type="float" office:value="3955" calcext:value-type="float">
            <text:p>3955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45775462962963" calcext:value-type="float">
            <text:p>0,00045775462962963000</text:p>
          </table:table-cell>
          <table:table-cell table:formula="of:=[.D115]-[.D114]" office:value-type="float" office:value="0.00000405092592592596" calcext:value-type="float">
            <text:p>0,0000040509259259259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35" office:value-type="float" office:value="3990" calcext:value-type="float">
            <text:p>3990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461805555555556" calcext:value-type="float">
            <text:p>0,00046180555555555600</text:p>
          </table:table-cell>
          <table:table-cell table:formula="of:=[.D116]-[.D115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35" office:value-type="float" office:value="4025" calcext:value-type="float">
            <text:p>4025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465856481481482" calcext:value-type="float">
            <text:p>0,00046585648148148200</text:p>
          </table:table-cell>
          <table:table-cell table:formula="of:=[.D117]-[.D116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35" office:value-type="float" office:value="4060" calcext:value-type="float">
            <text:p>4060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469907407407407" calcext:value-type="float">
            <text:p>0,00046990740740740700</text:p>
          </table:table-cell>
          <table:table-cell table:formula="of:=[.D118]-[.D117]" office:value-type="float" office:value="0.00000405092592592596" calcext:value-type="float">
            <text:p>0,0000040509259259259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35" office:value-type="float" office:value="4095" calcext:value-type="float">
            <text:p>4095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473958333333333" calcext:value-type="float">
            <text:p>0,00047395833333333300</text:p>
          </table:table-cell>
          <table:table-cell table:formula="of:=[.D119]-[.D118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35" office:value-type="float" office:value="4130" calcext:value-type="float">
            <text:p>4130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478009259259259" calcext:value-type="float">
            <text:p>0,00047800925925925900</text:p>
          </table:table-cell>
          <table:table-cell table:formula="of:=[.D120]-[.D119]" office:value-type="float" office:value="0.00000405092592592596" calcext:value-type="float">
            <text:p>0,0000040509259259259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35" office:value-type="float" office:value="4165" calcext:value-type="float">
            <text:p>4165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482060185185185" calcext:value-type="float">
            <text:p>0,00048206018518518500</text:p>
          </table:table-cell>
          <table:table-cell table:formula="of:=[.D121]-[.D120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35" office:value-type="float" office:value="4200" calcext:value-type="float">
            <text:p>420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486111111111111" calcext:value-type="float">
            <text:p>0,00048611111111111100</text:p>
          </table:table-cell>
          <table:table-cell table:formula="of:=[.D122]-[.D121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35" office:value-type="float" office:value="4235" calcext:value-type="float">
            <text:p>4235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490162037037037" calcext:value-type="float">
            <text:p>0,00049016203703703700</text:p>
          </table:table-cell>
          <table:table-cell table:formula="of:=[.D123]-[.D122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35" office:value-type="float" office:value="4270" calcext:value-type="float">
            <text:p>4270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0494212962962963" calcext:value-type="float">
            <text:p>0,00049421296296296300</text:p>
          </table:table-cell>
          <table:table-cell table:formula="of:=[.D124]-[.D123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35" office:value-type="float" office:value="4305" calcext:value-type="float">
            <text:p>4305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0498263888888889" calcext:value-type="float">
            <text:p>0,00049826388888888900</text:p>
          </table:table-cell>
          <table:table-cell table:formula="of:=[.D125]-[.D124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35" office:value-type="float" office:value="4340" calcext:value-type="float">
            <text:p>4340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0502314814814815" calcext:value-type="float">
            <text:p>0,00050231481481481500</text:p>
          </table:table-cell>
          <table:table-cell table:formula="of:=[.D126]-[.D125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35" office:value-type="float" office:value="4375" calcext:value-type="float">
            <text:p>4375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0506365740740741" calcext:value-type="float">
            <text:p>0,00050636574074074100</text:p>
          </table:table-cell>
          <table:table-cell table:formula="of:=[.D127]-[.D126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35" office:value-type="float" office:value="4410" calcext:value-type="float">
            <text:p>4410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0510416666666667" calcext:value-type="float">
            <text:p>0,00051041666666666700</text:p>
          </table:table-cell>
          <table:table-cell table:formula="of:=[.D128]-[.D127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35" office:value-type="float" office:value="4445" calcext:value-type="float">
            <text:p>4445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0514467592592593" calcext:value-type="float">
            <text:p>0,00051446759259259300</text:p>
          </table:table-cell>
          <table:table-cell table:formula="of:=[.D129]-[.D128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35" office:value-type="float" office:value="4480" calcext:value-type="float">
            <text:p>4480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0518518518518519" calcext:value-type="float">
            <text:p>0,00051851851851851900</text:p>
          </table:table-cell>
          <table:table-cell table:formula="of:=[.D130]-[.D129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35" office:value-type="float" office:value="4515" calcext:value-type="float">
            <text:p>4515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0522569444444444" calcext:value-type="float">
            <text:p>0,00052256944444444400</text:p>
          </table:table-cell>
          <table:table-cell table:formula="of:=[.D131]-[.D130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35" office:value-type="float" office:value="4550" calcext:value-type="float">
            <text:p>455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052662037037037" calcext:value-type="float">
            <text:p>0,00052662037037037000</text:p>
          </table:table-cell>
          <table:table-cell table:formula="of:=[.D132]-[.D131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35" office:value-type="float" office:value="4585" calcext:value-type="float">
            <text:p>4585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0530671296296296" calcext:value-type="float">
            <text:p>0,00053067129629629600</text:p>
          </table:table-cell>
          <table:table-cell table:formula="of:=[.D133]-[.D132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35" office:value-type="float" office:value="4620" calcext:value-type="float">
            <text:p>4620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0534722222222222" calcext:value-type="float">
            <text:p>0,00053472222222222200</text:p>
          </table:table-cell>
          <table:table-cell table:formula="of:=[.D134]-[.D133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35" office:value-type="float" office:value="4655" calcext:value-type="float">
            <text:p>4655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0538773148148148" calcext:value-type="float">
            <text:p>0,00053877314814814800</text:p>
          </table:table-cell>
          <table:table-cell table:formula="of:=[.D135]-[.D134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35" office:value-type="float" office:value="4690" calcext:value-type="float">
            <text:p>4690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0542824074074074" calcext:value-type="float">
            <text:p>0,00054282407407407400</text:p>
          </table:table-cell>
          <table:table-cell table:formula="of:=[.D136]-[.D135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35" office:value-type="float" office:value="4725" calcext:value-type="float">
            <text:p>4725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0546875" calcext:value-type="float">
            <text:p>0,00054687500000000000</text:p>
          </table:table-cell>
          <table:table-cell table:formula="of:=[.D137]-[.D136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35" office:value-type="float" office:value="4760" calcext:value-type="float">
            <text:p>4760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0550925925925926" calcext:value-type="float">
            <text:p>0,00055092592592592600</text:p>
          </table:table-cell>
          <table:table-cell table:formula="of:=[.D138]-[.D137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35" office:value-type="float" office:value="4795" calcext:value-type="float">
            <text:p>4795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0554976851851852" calcext:value-type="float">
            <text:p>0,00055497685185185200</text:p>
          </table:table-cell>
          <table:table-cell table:formula="of:=[.D139]-[.D138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35" office:value-type="float" office:value="4830" calcext:value-type="float">
            <text:p>4830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0559027777777778" calcext:value-type="float">
            <text:p>0,00055902777777777800</text:p>
          </table:table-cell>
          <table:table-cell table:formula="of:=[.D140]-[.D139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35" office:value-type="float" office:value="4865" calcext:value-type="float">
            <text:p>4865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0563078703703704" calcext:value-type="float">
            <text:p>0,00056307870370370400</text:p>
          </table:table-cell>
          <table:table-cell table:formula="of:=[.D141]-[.D140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35" office:value-type="float" office:value="4900" calcext:value-type="float">
            <text:p>490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056712962962963" calcext:value-type="float">
            <text:p>0,00056712962962963000</text:p>
          </table:table-cell>
          <table:table-cell table:formula="of:=[.D142]-[.D141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35" office:value-type="float" office:value="4935" calcext:value-type="float">
            <text:p>4935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0571180555555556" calcext:value-type="float">
            <text:p>0,00057118055555555600</text:p>
          </table:table-cell>
          <table:table-cell table:formula="of:=[.D143]-[.D142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35" office:value-type="float" office:value="4970" calcext:value-type="float">
            <text:p>4970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0575231481481482" calcext:value-type="float">
            <text:p>0,00057523148148148200</text:p>
          </table:table-cell>
          <table:table-cell table:formula="of:=[.D144]-[.D143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35" office:value-type="float" office:value="5005" calcext:value-type="float">
            <text:p>5005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0579282407407407" calcext:value-type="float">
            <text:p>0,00057928240740740700</text:p>
          </table:table-cell>
          <table:table-cell table:formula="of:=[.D145]-[.D144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35" office:value-type="float" office:value="5040" calcext:value-type="float">
            <text:p>5040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0583333333333333" calcext:value-type="float">
            <text:p>0,00058333333333333300</text:p>
          </table:table-cell>
          <table:table-cell table:formula="of:=[.D146]-[.D145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35" office:value-type="float" office:value="5075" calcext:value-type="float">
            <text:p>5075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0587384259259259" calcext:value-type="float">
            <text:p>0,00058738425925925900</text:p>
          </table:table-cell>
          <table:table-cell table:formula="of:=[.D147]-[.D146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35" office:value-type="float" office:value="5110" calcext:value-type="float">
            <text:p>5110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0591435185185185" calcext:value-type="float">
            <text:p>0,00059143518518518500</text:p>
          </table:table-cell>
          <table:table-cell table:formula="of:=[.D148]-[.D147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35" office:value-type="float" office:value="5145" calcext:value-type="float">
            <text:p>5145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0595486111111111" calcext:value-type="float">
            <text:p>0,00059548611111111100</text:p>
          </table:table-cell>
          <table:table-cell table:formula="of:=[.D149]-[.D148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35" office:value-type="float" office:value="5180" calcext:value-type="float">
            <text:p>5180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0599537037037037" calcext:value-type="float">
            <text:p>0,00059953703703703700</text:p>
          </table:table-cell>
          <table:table-cell table:formula="of:=[.D150]-[.D149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35" office:value-type="float" office:value="5215" calcext:value-type="float">
            <text:p>5215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0603587962962963" calcext:value-type="float">
            <text:p>0,00060358796296296300</text:p>
          </table:table-cell>
          <table:table-cell table:formula="of:=[.D151]-[.D150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35" office:value-type="float" office:value="5250" calcext:value-type="float">
            <text:p>525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0607638888888889" calcext:value-type="float">
            <text:p>0,00060763888888888900</text:p>
          </table:table-cell>
          <table:table-cell table:formula="of:=[.D152]-[.D151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35" office:value-type="float" office:value="5285" calcext:value-type="float">
            <text:p>5285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0611689814814815" calcext:value-type="float">
            <text:p>0,00061168981481481500</text:p>
          </table:table-cell>
          <table:table-cell table:formula="of:=[.D153]-[.D152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35" office:value-type="float" office:value="5320" calcext:value-type="float">
            <text:p>5320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0615740740740741" calcext:value-type="float">
            <text:p>0,00061574074074074100</text:p>
          </table:table-cell>
          <table:table-cell table:formula="of:=[.D154]-[.D153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35" office:value-type="float" office:value="5355" calcext:value-type="float">
            <text:p>5355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0619791666666667" calcext:value-type="float">
            <text:p>0,00061979166666666700</text:p>
          </table:table-cell>
          <table:table-cell table:formula="of:=[.D155]-[.D154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35" office:value-type="float" office:value="5390" calcext:value-type="float">
            <text:p>5390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0623842592592593" calcext:value-type="float">
            <text:p>0,00062384259259259300</text:p>
          </table:table-cell>
          <table:table-cell table:formula="of:=[.D156]-[.D155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35" office:value-type="float" office:value="5425" calcext:value-type="float">
            <text:p>5425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0627893518518519" calcext:value-type="float">
            <text:p>0,00062789351851851900</text:p>
          </table:table-cell>
          <table:table-cell table:formula="of:=[.D157]-[.D156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35" office:value-type="float" office:value="5460" calcext:value-type="float">
            <text:p>5460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0631944444444444" calcext:value-type="float">
            <text:p>0,00063194444444444400</text:p>
          </table:table-cell>
          <table:table-cell table:formula="of:=[.D158]-[.D157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35" office:value-type="float" office:value="5495" calcext:value-type="float">
            <text:p>5495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063599537037037" calcext:value-type="float">
            <text:p>0,00063599537037037000</text:p>
          </table:table-cell>
          <table:table-cell table:formula="of:=[.D159]-[.D158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35" office:value-type="float" office:value="5530" calcext:value-type="float">
            <text:p>5530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0640046296296296" calcext:value-type="float">
            <text:p>0,00064004629629629600</text:p>
          </table:table-cell>
          <table:table-cell table:formula="of:=[.D160]-[.D159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35" office:value-type="float" office:value="5565" calcext:value-type="float">
            <text:p>5565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0644097222222222" calcext:value-type="float">
            <text:p>0,00064409722222222200</text:p>
          </table:table-cell>
          <table:table-cell table:formula="of:=[.D161]-[.D160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35" office:value-type="float" office:value="5600" calcext:value-type="float">
            <text:p>560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0648148148148148" calcext:value-type="float">
            <text:p>0,00064814814814814800</text:p>
          </table:table-cell>
          <table:table-cell table:formula="of:=[.D162]-[.D161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35" office:value-type="float" office:value="5635" calcext:value-type="float">
            <text:p>5635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0652199074074074" calcext:value-type="float">
            <text:p>0,00065219907407407400</text:p>
          </table:table-cell>
          <table:table-cell table:formula="of:=[.D163]-[.D162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35" office:value-type="float" office:value="5670" calcext:value-type="float">
            <text:p>5670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065625" calcext:value-type="float">
            <text:p>0,00065625000000000000</text:p>
          </table:table-cell>
          <table:table-cell table:formula="of:=[.D164]-[.D163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35" office:value-type="float" office:value="5705" calcext:value-type="float">
            <text:p>5705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0660300925925926" calcext:value-type="float">
            <text:p>0,00066030092592592600</text:p>
          </table:table-cell>
          <table:table-cell table:formula="of:=[.D165]-[.D164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35" office:value-type="float" office:value="5740" calcext:value-type="float">
            <text:p>5740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0664351851851852" calcext:value-type="float">
            <text:p>0,00066435185185185200</text:p>
          </table:table-cell>
          <table:table-cell table:formula="of:=[.D166]-[.D165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35" office:value-type="float" office:value="5775" calcext:value-type="float">
            <text:p>5775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0668402777777778" calcext:value-type="float">
            <text:p>0,00066840277777777800</text:p>
          </table:table-cell>
          <table:table-cell table:formula="of:=[.D167]-[.D166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35" office:value-type="float" office:value="5810" calcext:value-type="float">
            <text:p>5810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0672453703703704" calcext:value-type="float">
            <text:p>0,00067245370370370400</text:p>
          </table:table-cell>
          <table:table-cell table:formula="of:=[.D168]-[.D167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35" office:value-type="float" office:value="5845" calcext:value-type="float">
            <text:p>5845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067650462962963" calcext:value-type="float">
            <text:p>0,00067650462962963000</text:p>
          </table:table-cell>
          <table:table-cell table:formula="of:=[.D169]-[.D168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35" office:value-type="float" office:value="5880" calcext:value-type="float">
            <text:p>5880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0680555555555556" calcext:value-type="float">
            <text:p>0,00068055555555555600</text:p>
          </table:table-cell>
          <table:table-cell table:formula="of:=[.D170]-[.D169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35" office:value-type="float" office:value="5915" calcext:value-type="float">
            <text:p>5915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0684606481481482" calcext:value-type="float">
            <text:p>0,00068460648148148200</text:p>
          </table:table-cell>
          <table:table-cell table:formula="of:=[.D171]-[.D170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35" office:value-type="float" office:value="5950" calcext:value-type="float">
            <text:p>595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0688657407407407" calcext:value-type="float">
            <text:p>0,00068865740740740700</text:p>
          </table:table-cell>
          <table:table-cell table:formula="of:=[.D172]-[.D171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35" office:value-type="float" office:value="5985" calcext:value-type="float">
            <text:p>5985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0692708333333333" calcext:value-type="float">
            <text:p>0,00069270833333333300</text:p>
          </table:table-cell>
          <table:table-cell table:formula="of:=[.D173]-[.D172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35" office:value-type="float" office:value="6020" calcext:value-type="float">
            <text:p>6020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0696759259259259" calcext:value-type="float">
            <text:p>0,00069675925925925900</text:p>
          </table:table-cell>
          <table:table-cell table:formula="of:=[.D174]-[.D173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35" office:value-type="float" office:value="6055" calcext:value-type="float">
            <text:p>6055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0700810185185185" calcext:value-type="float">
            <text:p>0,00070081018518518500</text:p>
          </table:table-cell>
          <table:table-cell table:formula="of:=[.D175]-[.D174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35" office:value-type="float" office:value="6090" calcext:value-type="float">
            <text:p>6090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0704861111111111" calcext:value-type="float">
            <text:p>0,00070486111111111100</text:p>
          </table:table-cell>
          <table:table-cell table:formula="of:=[.D176]-[.D175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35" office:value-type="float" office:value="6125" calcext:value-type="float">
            <text:p>6125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0708912037037037" calcext:value-type="float">
            <text:p>0,00070891203703703700</text:p>
          </table:table-cell>
          <table:table-cell table:formula="of:=[.D177]-[.D176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35" office:value-type="float" office:value="6160" calcext:value-type="float">
            <text:p>6160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0712962962962963" calcext:value-type="float">
            <text:p>0,00071296296296296300</text:p>
          </table:table-cell>
          <table:table-cell table:formula="of:=[.D178]-[.D177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35" office:value-type="float" office:value="6195" calcext:value-type="float">
            <text:p>6195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0717013888888889" calcext:value-type="float">
            <text:p>0,00071701388888888900</text:p>
          </table:table-cell>
          <table:table-cell table:formula="of:=[.D179]-[.D178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35" office:value-type="float" office:value="6230" calcext:value-type="float">
            <text:p>6230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0721064814814815" calcext:value-type="float">
            <text:p>0,00072106481481481500</text:p>
          </table:table-cell>
          <table:table-cell table:formula="of:=[.D180]-[.D179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35" office:value-type="float" office:value="6265" calcext:value-type="float">
            <text:p>6265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0725115740740741" calcext:value-type="float">
            <text:p>0,00072511574074074100</text:p>
          </table:table-cell>
          <table:table-cell table:formula="of:=[.D181]-[.D180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35" office:value-type="float" office:value="6300" calcext:value-type="float">
            <text:p>630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0729166666666667" calcext:value-type="float">
            <text:p>0,00072916666666666700</text:p>
          </table:table-cell>
          <table:table-cell table:formula="of:=[.D182]-[.D181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35" office:value-type="float" office:value="6335" calcext:value-type="float">
            <text:p>6335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0733217592592593" calcext:value-type="float">
            <text:p>0,00073321759259259300</text:p>
          </table:table-cell>
          <table:table-cell table:formula="of:=[.D183]-[.D182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35" office:value-type="float" office:value="6370" calcext:value-type="float">
            <text:p>6370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0737268518518519" calcext:value-type="float">
            <text:p>0,00073726851851851900</text:p>
          </table:table-cell>
          <table:table-cell table:formula="of:=[.D184]-[.D183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35" office:value-type="float" office:value="6405" calcext:value-type="float">
            <text:p>6405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0741319444444444" calcext:value-type="float">
            <text:p>0,00074131944444444500</text:p>
          </table:table-cell>
          <table:table-cell table:formula="of:=[.D185]-[.D184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35" office:value-type="float" office:value="6440" calcext:value-type="float">
            <text:p>6440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074537037037037" calcext:value-type="float">
            <text:p>0,00074537037037037000</text:p>
          </table:table-cell>
          <table:table-cell table:formula="of:=[.D186]-[.D185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35" office:value-type="float" office:value="6475" calcext:value-type="float">
            <text:p>6475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0749421296296296" calcext:value-type="float">
            <text:p>0,00074942129629629600</text:p>
          </table:table-cell>
          <table:table-cell table:formula="of:=[.D187]-[.D186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35" office:value-type="float" office:value="6510" calcext:value-type="float">
            <text:p>6510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0753472222222222" calcext:value-type="float">
            <text:p>0,00075347222222222200</text:p>
          </table:table-cell>
          <table:table-cell table:formula="of:=[.D188]-[.D187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35" office:value-type="float" office:value="6545" calcext:value-type="float">
            <text:p>6545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0757523148148148" calcext:value-type="float">
            <text:p>0,00075752314814814800</text:p>
          </table:table-cell>
          <table:table-cell table:formula="of:=[.D189]-[.D188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35" office:value-type="float" office:value="6580" calcext:value-type="float">
            <text:p>6580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0761574074074074" calcext:value-type="float">
            <text:p>0,00076157407407407400</text:p>
          </table:table-cell>
          <table:table-cell table:formula="of:=[.D190]-[.D189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35" office:value-type="float" office:value="6615" calcext:value-type="float">
            <text:p>6615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0765625" calcext:value-type="float">
            <text:p>0,00076562500000000000</text:p>
          </table:table-cell>
          <table:table-cell table:formula="of:=[.D191]-[.D190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35" office:value-type="float" office:value="6650" calcext:value-type="float">
            <text:p>665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0769675925925926" calcext:value-type="float">
            <text:p>0,00076967592592592600</text:p>
          </table:table-cell>
          <table:table-cell table:formula="of:=[.D192]-[.D191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35" office:value-type="float" office:value="6685" calcext:value-type="float">
            <text:p>6685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0773726851851852" calcext:value-type="float">
            <text:p>0,00077372685185185200</text:p>
          </table:table-cell>
          <table:table-cell table:formula="of:=[.D193]-[.D192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35" office:value-type="float" office:value="6720" calcext:value-type="float">
            <text:p>6720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0777777777777778" calcext:value-type="float">
            <text:p>0,00077777777777777800</text:p>
          </table:table-cell>
          <table:table-cell table:formula="of:=[.D194]-[.D193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35" office:value-type="float" office:value="6755" calcext:value-type="float">
            <text:p>6755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0781828703703704" calcext:value-type="float">
            <text:p>0,00078182870370370400</text:p>
          </table:table-cell>
          <table:table-cell table:formula="of:=[.D195]-[.D194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35" office:value-type="float" office:value="6790" calcext:value-type="float">
            <text:p>6790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078587962962963" calcext:value-type="float">
            <text:p>0,00078587962962963000</text:p>
          </table:table-cell>
          <table:table-cell table:formula="of:=[.D196]-[.D195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35" office:value-type="float" office:value="6825" calcext:value-type="float">
            <text:p>6825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0789930555555556" calcext:value-type="float">
            <text:p>0,00078993055555555600</text:p>
          </table:table-cell>
          <table:table-cell table:formula="of:=[.D197]-[.D196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35" office:value-type="float" office:value="6860" calcext:value-type="float">
            <text:p>6860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0793981481481481" calcext:value-type="float">
            <text:p>0,00079398148148148100</text:p>
          </table:table-cell>
          <table:table-cell table:formula="of:=[.D198]-[.D197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35" office:value-type="float" office:value="6895" calcext:value-type="float">
            <text:p>6895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0798032407407408" calcext:value-type="float">
            <text:p>0,00079803240740740800</text:p>
          </table:table-cell>
          <table:table-cell table:formula="of:=[.D199]-[.D198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35" office:value-type="float" office:value="6930" calcext:value-type="float">
            <text:p>6930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0802083333333333" calcext:value-type="float">
            <text:p>0,00080208333333333300</text:p>
          </table:table-cell>
          <table:table-cell table:formula="of:=[.D200]-[.D199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35" office:value-type="float" office:value="6965" calcext:value-type="float">
            <text:p>6965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0806134259259259" calcext:value-type="float">
            <text:p>0,00080613425925925900</text:p>
          </table:table-cell>
          <table:table-cell table:formula="of:=[.D201]-[.D200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35" office:value-type="float" office:value="7000" calcext:value-type="float">
            <text:p>70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0810185185185185" calcext:value-type="float">
            <text:p>0,00081018518518518500</text:p>
          </table:table-cell>
          <table:table-cell table:formula="of:=[.D202]-[.D201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35" office:value-type="float" office:value="7035" calcext:value-type="float">
            <text:p>7035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0814236111111111" calcext:value-type="float">
            <text:p>0,00081423611111111100</text:p>
          </table:table-cell>
          <table:table-cell table:formula="of:=[.D203]-[.D202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35" office:value-type="float" office:value="7070" calcext:value-type="float">
            <text:p>7070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0818287037037037" calcext:value-type="float">
            <text:p>0,00081828703703703700</text:p>
          </table:table-cell>
          <table:table-cell table:formula="of:=[.D204]-[.D203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35" office:value-type="float" office:value="7105" calcext:value-type="float">
            <text:p>7105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0822337962962963" calcext:value-type="float">
            <text:p>0,00082233796296296300</text:p>
          </table:table-cell>
          <table:table-cell table:formula="of:=[.D205]-[.D204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35" office:value-type="float" office:value="7140" calcext:value-type="float">
            <text:p>7140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0826388888888889" calcext:value-type="float">
            <text:p>0,00082638888888888900</text:p>
          </table:table-cell>
          <table:table-cell table:formula="of:=[.D206]-[.D205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35" office:value-type="float" office:value="7175" calcext:value-type="float">
            <text:p>7175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0830439814814815" calcext:value-type="float">
            <text:p>0,00083043981481481500</text:p>
          </table:table-cell>
          <table:table-cell table:formula="of:=[.D207]-[.D206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35" office:value-type="float" office:value="7210" calcext:value-type="float">
            <text:p>7210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0834490740740741" calcext:value-type="float">
            <text:p>0,00083449074074074100</text:p>
          </table:table-cell>
          <table:table-cell table:formula="of:=[.D208]-[.D207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35" office:value-type="float" office:value="7245" calcext:value-type="float">
            <text:p>7245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0838541666666667" calcext:value-type="float">
            <text:p>0,00083854166666666700</text:p>
          </table:table-cell>
          <table:table-cell table:formula="of:=[.D209]-[.D208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35" office:value-type="float" office:value="7280" calcext:value-type="float">
            <text:p>7280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0842592592592593" calcext:value-type="float">
            <text:p>0,00084259259259259300</text:p>
          </table:table-cell>
          <table:table-cell table:formula="of:=[.D210]-[.D209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35" office:value-type="float" office:value="7315" calcext:value-type="float">
            <text:p>7315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0846643518518519" calcext:value-type="float">
            <text:p>0,00084664351851851900</text:p>
          </table:table-cell>
          <table:table-cell table:formula="of:=[.D211]-[.D210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35" office:value-type="float" office:value="7350" calcext:value-type="float">
            <text:p>735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0850694444444444" calcext:value-type="float">
            <text:p>0,00085069444444444400</text:p>
          </table:table-cell>
          <table:table-cell table:formula="of:=[.D212]-[.D211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35" office:value-type="float" office:value="7385" calcext:value-type="float">
            <text:p>7385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085474537037037" calcext:value-type="float">
            <text:p>0,00085474537037037000</text:p>
          </table:table-cell>
          <table:table-cell table:formula="of:=[.D213]-[.D212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35" office:value-type="float" office:value="7420" calcext:value-type="float">
            <text:p>7420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0858796296296296" calcext:value-type="float">
            <text:p>0,00085879629629629600</text:p>
          </table:table-cell>
          <table:table-cell table:formula="of:=[.D214]-[.D213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35" office:value-type="float" office:value="7455" calcext:value-type="float">
            <text:p>7455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0862847222222222" calcext:value-type="float">
            <text:p>0,00086284722222222200</text:p>
          </table:table-cell>
          <table:table-cell table:formula="of:=[.D215]-[.D214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35" office:value-type="float" office:value="7490" calcext:value-type="float">
            <text:p>7490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0866898148148148" calcext:value-type="float">
            <text:p>0,00086689814814814800</text:p>
          </table:table-cell>
          <table:table-cell table:formula="of:=[.D216]-[.D215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35" office:value-type="float" office:value="7525" calcext:value-type="float">
            <text:p>7525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0870949074074074" calcext:value-type="float">
            <text:p>0,00087094907407407400</text:p>
          </table:table-cell>
          <table:table-cell table:formula="of:=[.D217]-[.D216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35" office:value-type="float" office:value="7560" calcext:value-type="float">
            <text:p>7560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0875" calcext:value-type="float">
            <text:p>0,00087500000000000000</text:p>
          </table:table-cell>
          <table:table-cell table:formula="of:=[.D218]-[.D217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35" office:value-type="float" office:value="7595" calcext:value-type="float">
            <text:p>7595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0879050925925926" calcext:value-type="float">
            <text:p>0,00087905092592592600</text:p>
          </table:table-cell>
          <table:table-cell table:formula="of:=[.D219]-[.D218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35" office:value-type="float" office:value="7630" calcext:value-type="float">
            <text:p>7630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0883101851851852" calcext:value-type="float">
            <text:p>0,00088310185185185200</text:p>
          </table:table-cell>
          <table:table-cell table:formula="of:=[.D220]-[.D219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35" office:value-type="float" office:value="7665" calcext:value-type="float">
            <text:p>7665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0887152777777778" calcext:value-type="float">
            <text:p>0,00088715277777777800</text:p>
          </table:table-cell>
          <table:table-cell table:formula="of:=[.D221]-[.D220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35" office:value-type="float" office:value="7700" calcext:value-type="float">
            <text:p>770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0891203703703704" calcext:value-type="float">
            <text:p>0,00089120370370370400</text:p>
          </table:table-cell>
          <table:table-cell table:formula="of:=[.D222]-[.D221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35" office:value-type="float" office:value="7735" calcext:value-type="float">
            <text:p>7735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089525462962963" calcext:value-type="float">
            <text:p>0,00089525462962963000</text:p>
          </table:table-cell>
          <table:table-cell table:formula="of:=[.D223]-[.D222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35" office:value-type="float" office:value="7770" calcext:value-type="float">
            <text:p>7770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0899305555555556" calcext:value-type="float">
            <text:p>0,00089930555555555600</text:p>
          </table:table-cell>
          <table:table-cell table:formula="of:=[.D224]-[.D223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35" office:value-type="float" office:value="7805" calcext:value-type="float">
            <text:p>7805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0903356481481481" calcext:value-type="float">
            <text:p>0,00090335648148148100</text:p>
          </table:table-cell>
          <table:table-cell table:formula="of:=[.D225]-[.D224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35" office:value-type="float" office:value="7840" calcext:value-type="float">
            <text:p>7840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0907407407407407" calcext:value-type="float">
            <text:p>0,00090740740740740800</text:p>
          </table:table-cell>
          <table:table-cell table:formula="of:=[.D226]-[.D225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35" office:value-type="float" office:value="7875" calcext:value-type="float">
            <text:p>7875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0911458333333333" calcext:value-type="float">
            <text:p>0,00091145833333333300</text:p>
          </table:table-cell>
          <table:table-cell table:formula="of:=[.D227]-[.D226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35" office:value-type="float" office:value="7910" calcext:value-type="float">
            <text:p>7910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0915509259259259" calcext:value-type="float">
            <text:p>0,00091550925925925900</text:p>
          </table:table-cell>
          <table:table-cell table:formula="of:=[.D228]-[.D227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35" office:value-type="float" office:value="7945" calcext:value-type="float">
            <text:p>7945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0919560185185185" calcext:value-type="float">
            <text:p>0,00091956018518518500</text:p>
          </table:table-cell>
          <table:table-cell table:formula="of:=[.D229]-[.D228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35" office:value-type="float" office:value="7980" calcext:value-type="float">
            <text:p>7980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0923611111111111" calcext:value-type="float">
            <text:p>0,00092361111111111100</text:p>
          </table:table-cell>
          <table:table-cell table:formula="of:=[.D230]-[.D229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35" office:value-type="float" office:value="8015" calcext:value-type="float">
            <text:p>8015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0927662037037037" calcext:value-type="float">
            <text:p>0,00092766203703703700</text:p>
          </table:table-cell>
          <table:table-cell table:formula="of:=[.D231]-[.D230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35" office:value-type="float" office:value="8050" calcext:value-type="float">
            <text:p>805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0931712962962963" calcext:value-type="float">
            <text:p>0,00093171296296296300</text:p>
          </table:table-cell>
          <table:table-cell table:formula="of:=[.D232]-[.D231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35" office:value-type="float" office:value="8085" calcext:value-type="float">
            <text:p>8085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0935763888888889" calcext:value-type="float">
            <text:p>0,00093576388888888900</text:p>
          </table:table-cell>
          <table:table-cell table:formula="of:=[.D233]-[.D232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35" office:value-type="float" office:value="8120" calcext:value-type="float">
            <text:p>8120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0939814814814815" calcext:value-type="float">
            <text:p>0,00093981481481481500</text:p>
          </table:table-cell>
          <table:table-cell table:formula="of:=[.D234]-[.D233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35" office:value-type="float" office:value="8155" calcext:value-type="float">
            <text:p>8155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0943865740740741" calcext:value-type="float">
            <text:p>0,00094386574074074100</text:p>
          </table:table-cell>
          <table:table-cell table:formula="of:=[.D235]-[.D234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35" office:value-type="float" office:value="8190" calcext:value-type="float">
            <text:p>8190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0947916666666667" calcext:value-type="float">
            <text:p>0,00094791666666666700</text:p>
          </table:table-cell>
          <table:table-cell table:formula="of:=[.D236]-[.D235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35" office:value-type="float" office:value="8225" calcext:value-type="float">
            <text:p>8225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0951967592592593" calcext:value-type="float">
            <text:p>0,00095196759259259300</text:p>
          </table:table-cell>
          <table:table-cell table:formula="of:=[.D237]-[.D236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35" office:value-type="float" office:value="8260" calcext:value-type="float">
            <text:p>8260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0956018518518519" calcext:value-type="float">
            <text:p>0,00095601851851851900</text:p>
          </table:table-cell>
          <table:table-cell table:formula="of:=[.D238]-[.D237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35" office:value-type="float" office:value="8295" calcext:value-type="float">
            <text:p>8295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0960069444444445" calcext:value-type="float">
            <text:p>0,00096006944444444500</text:p>
          </table:table-cell>
          <table:table-cell table:formula="of:=[.D239]-[.D238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35" office:value-type="float" office:value="8330" calcext:value-type="float">
            <text:p>8330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096412037037037" calcext:value-type="float">
            <text:p>0,00096412037037037000</text:p>
          </table:table-cell>
          <table:table-cell table:formula="of:=[.D240]-[.D239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35" office:value-type="float" office:value="8365" calcext:value-type="float">
            <text:p>8365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0968171296296296" calcext:value-type="float">
            <text:p>0,00096817129629629600</text:p>
          </table:table-cell>
          <table:table-cell table:formula="of:=[.D241]-[.D240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35" office:value-type="float" office:value="8400" calcext:value-type="float">
            <text:p>840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0972222222222222" calcext:value-type="float">
            <text:p>0,00097222222222222200</text:p>
          </table:table-cell>
          <table:table-cell table:formula="of:=[.D242]-[.D241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35" office:value-type="float" office:value="8435" calcext:value-type="float">
            <text:p>8435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0976273148148148" calcext:value-type="float">
            <text:p>0,00097627314814814800</text:p>
          </table:table-cell>
          <table:table-cell table:formula="of:=[.D243]-[.D242]" office:value-type="float" office:value="0.0000040509259259259" calcext:value-type="float">
            <text:p>0,0000040509259259259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35" office:value-type="float" office:value="8470" calcext:value-type="float">
            <text:p>8470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0980324074074074" calcext:value-type="float">
            <text:p>0,00098032407407407400</text:p>
          </table:table-cell>
          <table:table-cell table:formula="of:=[.D244]-[.D243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35" office:value-type="float" office:value="8505" calcext:value-type="float">
            <text:p>8505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0984375" calcext:value-type="float">
            <text:p>0,00098437500000000000</text:p>
          </table:table-cell>
          <table:table-cell table:formula="of:=[.D245]-[.D244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35" office:value-type="float" office:value="8540" calcext:value-type="float">
            <text:p>8540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0988425925925926" calcext:value-type="float">
            <text:p>0,00098842592592592600</text:p>
          </table:table-cell>
          <table:table-cell table:formula="of:=[.D246]-[.D245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35" office:value-type="float" office:value="8575" calcext:value-type="float">
            <text:p>8575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0992476851851852" calcext:value-type="float">
            <text:p>0,00099247685185185200</text:p>
          </table:table-cell>
          <table:table-cell table:formula="of:=[.D247]-[.D246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35" office:value-type="float" office:value="8610" calcext:value-type="float">
            <text:p>8610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0996527777777778" calcext:value-type="float">
            <text:p>0,00099652777777777800</text:p>
          </table:table-cell>
          <table:table-cell table:formula="of:=[.D248]-[.D247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35" office:value-type="float" office:value="8645" calcext:value-type="float">
            <text:p>8645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10005787037037" calcext:value-type="float">
            <text:p>0,00100057870370370000</text:p>
          </table:table-cell>
          <table:table-cell table:formula="of:=[.D249]-[.D248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35" office:value-type="float" office:value="8680" calcext:value-type="float">
            <text:p>8680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100462962962963" calcext:value-type="float">
            <text:p>0,00100462962962963000</text:p>
          </table:table-cell>
          <table:table-cell table:formula="of:=[.D250]-[.D249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35" office:value-type="float" office:value="8715" calcext:value-type="float">
            <text:p>8715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100868055555556" calcext:value-type="float">
            <text:p>0,00100868055555556000</text:p>
          </table:table-cell>
          <table:table-cell table:formula="of:=[.D251]-[.D250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35" office:value-type="float" office:value="8750" calcext:value-type="float">
            <text:p>875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101273148148148" calcext:value-type="float">
            <text:p>0,00101273148148148000</text:p>
          </table:table-cell>
          <table:table-cell table:formula="of:=[.D252]-[.D251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35" office:value-type="float" office:value="8785" calcext:value-type="float">
            <text:p>8785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101678240740741" calcext:value-type="float">
            <text:p>0,00101678240740741000</text:p>
          </table:table-cell>
          <table:table-cell table:formula="of:=[.D253]-[.D252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35" office:value-type="float" office:value="8820" calcext:value-type="float">
            <text:p>8820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102083333333333" calcext:value-type="float">
            <text:p>0,00102083333333333000</text:p>
          </table:table-cell>
          <table:table-cell table:formula="of:=[.D254]-[.D253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35" office:value-type="float" office:value="8855" calcext:value-type="float">
            <text:p>8855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102488425925926" calcext:value-type="float">
            <text:p>0,00102488425925926000</text:p>
          </table:table-cell>
          <table:table-cell table:formula="of:=[.D255]-[.D254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35" office:value-type="float" office:value="8890" calcext:value-type="float">
            <text:p>8890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102893518518519" calcext:value-type="float">
            <text:p>0,00102893518518519000</text:p>
          </table:table-cell>
          <table:table-cell table:formula="of:=[.D256]-[.D255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35" office:value-type="float" office:value="8925" calcext:value-type="float">
            <text:p>8925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103298611111111" calcext:value-type="float">
            <text:p>0,00103298611111111000</text:p>
          </table:table-cell>
          <table:table-cell table:formula="of:=[.D257]-[.D256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35" office:value-type="float" office:value="8960" calcext:value-type="float">
            <text:p>8960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103703703703704" calcext:value-type="float">
            <text:p>0,00103703703703704000</text:p>
          </table:table-cell>
          <table:table-cell table:formula="of:=[.D258]-[.D257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35" office:value-type="float" office:value="8995" calcext:value-type="float">
            <text:p>8995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104108796296296" calcext:value-type="float">
            <text:p>0,00104108796296296000</text:p>
          </table:table-cell>
          <table:table-cell table:formula="of:=[.D259]-[.D258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35" office:value-type="float" office:value="9030" calcext:value-type="float">
            <text:p>9030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104513888888889" calcext:value-type="float">
            <text:p>0,00104513888888889000</text:p>
          </table:table-cell>
          <table:table-cell table:formula="of:=[.D260]-[.D259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35" office:value-type="float" office:value="9065" calcext:value-type="float">
            <text:p>9065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104918981481481" calcext:value-type="float">
            <text:p>0,00104918981481481000</text:p>
          </table:table-cell>
          <table:table-cell table:formula="of:=[.D261]-[.D260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35" office:value-type="float" office:value="9100" calcext:value-type="float">
            <text:p>910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105324074074074" calcext:value-type="float">
            <text:p>0,00105324074074074000</text:p>
          </table:table-cell>
          <table:table-cell table:formula="of:=[.D262]-[.D261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35" office:value-type="float" office:value="9135" calcext:value-type="float">
            <text:p>9135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105729166666667" calcext:value-type="float">
            <text:p>0,00105729166666667000</text:p>
          </table:table-cell>
          <table:table-cell table:formula="of:=[.D263]-[.D262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35" office:value-type="float" office:value="9170" calcext:value-type="float">
            <text:p>9170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106134259259259" calcext:value-type="float">
            <text:p>0,00106134259259259000</text:p>
          </table:table-cell>
          <table:table-cell table:formula="of:=[.D264]-[.D263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35" office:value-type="float" office:value="9205" calcext:value-type="float">
            <text:p>9205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106539351851852" calcext:value-type="float">
            <text:p>0,00106539351851852000</text:p>
          </table:table-cell>
          <table:table-cell table:formula="of:=[.D265]-[.D264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35" office:value-type="float" office:value="9240" calcext:value-type="float">
            <text:p>9240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106944444444444" calcext:value-type="float">
            <text:p>0,00106944444444444000</text:p>
          </table:table-cell>
          <table:table-cell table:formula="of:=[.D266]-[.D265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35" office:value-type="float" office:value="9275" calcext:value-type="float">
            <text:p>9275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107349537037037" calcext:value-type="float">
            <text:p>0,00107349537037037000</text:p>
          </table:table-cell>
          <table:table-cell table:formula="of:=[.D267]-[.D266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35" office:value-type="float" office:value="9310" calcext:value-type="float">
            <text:p>9310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10775462962963" calcext:value-type="float">
            <text:p>0,00107754629629630000</text:p>
          </table:table-cell>
          <table:table-cell table:formula="of:=[.D268]-[.D267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35" office:value-type="float" office:value="9345" calcext:value-type="float">
            <text:p>9345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108159722222222" calcext:value-type="float">
            <text:p>0,00108159722222222000</text:p>
          </table:table-cell>
          <table:table-cell table:formula="of:=[.D269]-[.D268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35" office:value-type="float" office:value="9380" calcext:value-type="float">
            <text:p>9380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108564814814815" calcext:value-type="float">
            <text:p>0,00108564814814815000</text:p>
          </table:table-cell>
          <table:table-cell table:formula="of:=[.D270]-[.D269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35" office:value-type="float" office:value="9415" calcext:value-type="float">
            <text:p>9415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108969907407407" calcext:value-type="float">
            <text:p>0,00108969907407407000</text:p>
          </table:table-cell>
          <table:table-cell table:formula="of:=[.D271]-[.D270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35" office:value-type="float" office:value="9450" calcext:value-type="float">
            <text:p>945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109375" calcext:value-type="float">
            <text:p>0,00109375000000000000</text:p>
          </table:table-cell>
          <table:table-cell table:formula="of:=[.D272]-[.D271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35" office:value-type="float" office:value="9485" calcext:value-type="float">
            <text:p>9485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109780092592593" calcext:value-type="float">
            <text:p>0,00109780092592593000</text:p>
          </table:table-cell>
          <table:table-cell table:formula="of:=[.D273]-[.D272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35" office:value-type="float" office:value="9520" calcext:value-type="float">
            <text:p>9520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110185185185185" calcext:value-type="float">
            <text:p>0,00110185185185185000</text:p>
          </table:table-cell>
          <table:table-cell table:formula="of:=[.D274]-[.D273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35" office:value-type="float" office:value="9555" calcext:value-type="float">
            <text:p>9555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110590277777778" calcext:value-type="float">
            <text:p>0,00110590277777778000</text:p>
          </table:table-cell>
          <table:table-cell table:formula="of:=[.D275]-[.D274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35" office:value-type="float" office:value="9590" calcext:value-type="float">
            <text:p>9590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11099537037037" calcext:value-type="float">
            <text:p>0,00110995370370370000</text:p>
          </table:table-cell>
          <table:table-cell table:formula="of:=[.D276]-[.D275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35" office:value-type="float" office:value="9625" calcext:value-type="float">
            <text:p>9625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111400462962963" calcext:value-type="float">
            <text:p>0,00111400462962963000</text:p>
          </table:table-cell>
          <table:table-cell table:formula="of:=[.D277]-[.D276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35" office:value-type="float" office:value="9660" calcext:value-type="float">
            <text:p>9660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111805555555556" calcext:value-type="float">
            <text:p>0,00111805555555556000</text:p>
          </table:table-cell>
          <table:table-cell table:formula="of:=[.D278]-[.D277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35" office:value-type="float" office:value="9695" calcext:value-type="float">
            <text:p>9695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112210648148148" calcext:value-type="float">
            <text:p>0,00112210648148148000</text:p>
          </table:table-cell>
          <table:table-cell table:formula="of:=[.D279]-[.D278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35" office:value-type="float" office:value="9730" calcext:value-type="float">
            <text:p>9730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112615740740741" calcext:value-type="float">
            <text:p>0,00112615740740741000</text:p>
          </table:table-cell>
          <table:table-cell table:formula="of:=[.D280]-[.D279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35" office:value-type="float" office:value="9765" calcext:value-type="float">
            <text:p>9765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113020833333333" calcext:value-type="float">
            <text:p>0,00113020833333333000</text:p>
          </table:table-cell>
          <table:table-cell table:formula="of:=[.D281]-[.D280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35" office:value-type="float" office:value="9800" calcext:value-type="float">
            <text:p>980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113425925925926" calcext:value-type="float">
            <text:p>0,00113425925925926000</text:p>
          </table:table-cell>
          <table:table-cell table:formula="of:=[.D282]-[.D281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35" office:value-type="float" office:value="9835" calcext:value-type="float">
            <text:p>9835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113831018518519" calcext:value-type="float">
            <text:p>0,00113831018518519000</text:p>
          </table:table-cell>
          <table:table-cell table:formula="of:=[.D283]-[.D282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35" office:value-type="float" office:value="9870" calcext:value-type="float">
            <text:p>9870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114236111111111" calcext:value-type="float">
            <text:p>0,00114236111111111000</text:p>
          </table:table-cell>
          <table:table-cell table:formula="of:=[.D284]-[.D283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35" office:value-type="float" office:value="9905" calcext:value-type="float">
            <text:p>9905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114641203703704" calcext:value-type="float">
            <text:p>0,00114641203703704000</text:p>
          </table:table-cell>
          <table:table-cell table:formula="of:=[.D285]-[.D284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35" office:value-type="float" office:value="9940" calcext:value-type="float">
            <text:p>9940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115046296296296" calcext:value-type="float">
            <text:p>0,00115046296296296000</text:p>
          </table:table-cell>
          <table:table-cell table:formula="of:=[.D286]-[.D285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35" office:value-type="float" office:value="9975" calcext:value-type="float">
            <text:p>9975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115451388888889" calcext:value-type="float">
            <text:p>0,00115451388888889000</text:p>
          </table:table-cell>
          <table:table-cell table:formula="of:=[.D287]-[.D286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35" office:value-type="float" office:value="10010" calcext:value-type="float">
            <text:p>10010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115856481481481" calcext:value-type="float">
            <text:p>0,00115856481481481000</text:p>
          </table:table-cell>
          <table:table-cell table:formula="of:=[.D288]-[.D287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35" office:value-type="float" office:value="10045" calcext:value-type="float">
            <text:p>10045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116261574074074" calcext:value-type="float">
            <text:p>0,00116261574074074000</text:p>
          </table:table-cell>
          <table:table-cell table:formula="of:=[.D289]-[.D288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35" office:value-type="float" office:value="10080" calcext:value-type="float">
            <text:p>10080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116666666666667" calcext:value-type="float">
            <text:p>0,00116666666666667000</text:p>
          </table:table-cell>
          <table:table-cell table:formula="of:=[.D290]-[.D289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35" office:value-type="float" office:value="10115" calcext:value-type="float">
            <text:p>10115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117071759259259" calcext:value-type="float">
            <text:p>0,00117071759259259000</text:p>
          </table:table-cell>
          <table:table-cell table:formula="of:=[.D291]-[.D290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35" office:value-type="float" office:value="10150" calcext:value-type="float">
            <text:p>1015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117476851851852" calcext:value-type="float">
            <text:p>0,00117476851851852000</text:p>
          </table:table-cell>
          <table:table-cell table:formula="of:=[.D292]-[.D291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35" office:value-type="float" office:value="10185" calcext:value-type="float">
            <text:p>10185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117881944444444" calcext:value-type="float">
            <text:p>0,00117881944444444000</text:p>
          </table:table-cell>
          <table:table-cell table:formula="of:=[.D293]-[.D292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35" office:value-type="float" office:value="10220" calcext:value-type="float">
            <text:p>10220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118287037037037" calcext:value-type="float">
            <text:p>0,00118287037037037000</text:p>
          </table:table-cell>
          <table:table-cell table:formula="of:=[.D294]-[.D293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35" office:value-type="float" office:value="10255" calcext:value-type="float">
            <text:p>10255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11869212962963" calcext:value-type="float">
            <text:p>0,00118692129629630000</text:p>
          </table:table-cell>
          <table:table-cell table:formula="of:=[.D295]-[.D294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35" office:value-type="float" office:value="10290" calcext:value-type="float">
            <text:p>10290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119097222222222" calcext:value-type="float">
            <text:p>0,00119097222222222000</text:p>
          </table:table-cell>
          <table:table-cell table:formula="of:=[.D296]-[.D295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35" office:value-type="float" office:value="10325" calcext:value-type="float">
            <text:p>10325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119502314814815" calcext:value-type="float">
            <text:p>0,00119502314814815000</text:p>
          </table:table-cell>
          <table:table-cell table:formula="of:=[.D297]-[.D296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35" office:value-type="float" office:value="10360" calcext:value-type="float">
            <text:p>10360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119907407407407" calcext:value-type="float">
            <text:p>0,00119907407407407000</text:p>
          </table:table-cell>
          <table:table-cell table:formula="of:=[.D298]-[.D297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35" office:value-type="float" office:value="10395" calcext:value-type="float">
            <text:p>10395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1203125" calcext:value-type="float">
            <text:p>0,00120312500000000000</text:p>
          </table:table-cell>
          <table:table-cell table:formula="of:=[.D299]-[.D298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35" office:value-type="float" office:value="10430" calcext:value-type="float">
            <text:p>10430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120717592592593" calcext:value-type="float">
            <text:p>0,00120717592592593000</text:p>
          </table:table-cell>
          <table:table-cell table:formula="of:=[.D300]-[.D299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35" office:value-type="float" office:value="10465" calcext:value-type="float">
            <text:p>10465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121122685185185" calcext:value-type="float">
            <text:p>0,00121122685185185000</text:p>
          </table:table-cell>
          <table:table-cell table:formula="of:=[.D301]-[.D300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35" office:value-type="float" office:value="10500" calcext:value-type="float">
            <text:p>105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121527777777778" calcext:value-type="float">
            <text:p>0,00121527777777778000</text:p>
          </table:table-cell>
          <table:table-cell table:formula="of:=[.D302]-[.D301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35" office:value-type="float" office:value="10535" calcext:value-type="float">
            <text:p>10535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12193287037037" calcext:value-type="float">
            <text:p>0,00121932870370370000</text:p>
          </table:table-cell>
          <table:table-cell table:formula="of:=[.D303]-[.D302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35" office:value-type="float" office:value="10570" calcext:value-type="float">
            <text:p>10570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122337962962963" calcext:value-type="float">
            <text:p>0,00122337962962963000</text:p>
          </table:table-cell>
          <table:table-cell table:formula="of:=[.D304]-[.D303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35" office:value-type="float" office:value="10605" calcext:value-type="float">
            <text:p>10605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122743055555556" calcext:value-type="float">
            <text:p>0,00122743055555556000</text:p>
          </table:table-cell>
          <table:table-cell table:formula="of:=[.D305]-[.D304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35" office:value-type="float" office:value="10640" calcext:value-type="float">
            <text:p>10640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123148148148148" calcext:value-type="float">
            <text:p>0,00123148148148148000</text:p>
          </table:table-cell>
          <table:table-cell table:formula="of:=[.D306]-[.D305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35" office:value-type="float" office:value="10675" calcext:value-type="float">
            <text:p>10675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123553240740741" calcext:value-type="float">
            <text:p>0,00123553240740741000</text:p>
          </table:table-cell>
          <table:table-cell table:formula="of:=[.D307]-[.D306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35" office:value-type="float" office:value="10710" calcext:value-type="float">
            <text:p>10710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123958333333333" calcext:value-type="float">
            <text:p>0,00123958333333333000</text:p>
          </table:table-cell>
          <table:table-cell table:formula="of:=[.D308]-[.D307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35" office:value-type="float" office:value="10745" calcext:value-type="float">
            <text:p>10745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124363425925926" calcext:value-type="float">
            <text:p>0,00124363425925926000</text:p>
          </table:table-cell>
          <table:table-cell table:formula="of:=[.D309]-[.D308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35" office:value-type="float" office:value="10780" calcext:value-type="float">
            <text:p>10780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124768518518519" calcext:value-type="float">
            <text:p>0,00124768518518519000</text:p>
          </table:table-cell>
          <table:table-cell table:formula="of:=[.D310]-[.D309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35" office:value-type="float" office:value="10815" calcext:value-type="float">
            <text:p>10815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125173611111111" calcext:value-type="float">
            <text:p>0,00125173611111111000</text:p>
          </table:table-cell>
          <table:table-cell table:formula="of:=[.D311]-[.D310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35" office:value-type="float" office:value="10850" calcext:value-type="float">
            <text:p>1085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125578703703704" calcext:value-type="float">
            <text:p>0,00125578703703704000</text:p>
          </table:table-cell>
          <table:table-cell table:formula="of:=[.D312]-[.D311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35" office:value-type="float" office:value="10885" calcext:value-type="float">
            <text:p>10885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125983796296296" calcext:value-type="float">
            <text:p>0,00125983796296296000</text:p>
          </table:table-cell>
          <table:table-cell table:formula="of:=[.D313]-[.D312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35" office:value-type="float" office:value="10920" calcext:value-type="float">
            <text:p>10920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126388888888889" calcext:value-type="float">
            <text:p>0,00126388888888889000</text:p>
          </table:table-cell>
          <table:table-cell table:formula="of:=[.D314]-[.D313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35" office:value-type="float" office:value="10955" calcext:value-type="float">
            <text:p>10955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126793981481481" calcext:value-type="float">
            <text:p>0,00126793981481481000</text:p>
          </table:table-cell>
          <table:table-cell table:formula="of:=[.D315]-[.D314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35" office:value-type="float" office:value="10990" calcext:value-type="float">
            <text:p>10990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127199074074074" calcext:value-type="float">
            <text:p>0,00127199074074074000</text:p>
          </table:table-cell>
          <table:table-cell table:formula="of:=[.D316]-[.D315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35" office:value-type="float" office:value="11025" calcext:value-type="float">
            <text:p>11025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127604166666667" calcext:value-type="float">
            <text:p>0,00127604166666667000</text:p>
          </table:table-cell>
          <table:table-cell table:formula="of:=[.D317]-[.D316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35" office:value-type="float" office:value="11060" calcext:value-type="float">
            <text:p>11060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128009259259259" calcext:value-type="float">
            <text:p>0,00128009259259259000</text:p>
          </table:table-cell>
          <table:table-cell table:formula="of:=[.D318]-[.D317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35" office:value-type="float" office:value="11095" calcext:value-type="float">
            <text:p>11095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128414351851852" calcext:value-type="float">
            <text:p>0,00128414351851852000</text:p>
          </table:table-cell>
          <table:table-cell table:formula="of:=[.D319]-[.D318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35" office:value-type="float" office:value="11130" calcext:value-type="float">
            <text:p>11130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128819444444444" calcext:value-type="float">
            <text:p>0,00128819444444444000</text:p>
          </table:table-cell>
          <table:table-cell table:formula="of:=[.D320]-[.D319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35" office:value-type="float" office:value="11165" calcext:value-type="float">
            <text:p>11165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129224537037037" calcext:value-type="float">
            <text:p>0,00129224537037037000</text:p>
          </table:table-cell>
          <table:table-cell table:formula="of:=[.D321]-[.D320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35" office:value-type="float" office:value="11200" calcext:value-type="float">
            <text:p>1120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12962962962963" calcext:value-type="float">
            <text:p>0,00129629629629630000</text:p>
          </table:table-cell>
          <table:table-cell table:formula="of:=[.D322]-[.D321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35" office:value-type="float" office:value="11235" calcext:value-type="float">
            <text:p>11235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130034722222222" calcext:value-type="float">
            <text:p>0,00130034722222222000</text:p>
          </table:table-cell>
          <table:table-cell table:formula="of:=[.D323]-[.D322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35" office:value-type="float" office:value="11270" calcext:value-type="float">
            <text:p>11270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130439814814815" calcext:value-type="float">
            <text:p>0,00130439814814815000</text:p>
          </table:table-cell>
          <table:table-cell table:formula="of:=[.D324]-[.D323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35" office:value-type="float" office:value="11305" calcext:value-type="float">
            <text:p>11305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130844907407407" calcext:value-type="float">
            <text:p>0,00130844907407407000</text:p>
          </table:table-cell>
          <table:table-cell table:formula="of:=[.D325]-[.D324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35" office:value-type="float" office:value="11340" calcext:value-type="float">
            <text:p>11340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13125" calcext:value-type="float">
            <text:p>0,00131250000000000000</text:p>
          </table:table-cell>
          <table:table-cell table:formula="of:=[.D326]-[.D325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35" office:value-type="float" office:value="11375" calcext:value-type="float">
            <text:p>11375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131655092592593" calcext:value-type="float">
            <text:p>0,00131655092592593000</text:p>
          </table:table-cell>
          <table:table-cell table:formula="of:=[.D327]-[.D326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35" office:value-type="float" office:value="11410" calcext:value-type="float">
            <text:p>11410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132060185185185" calcext:value-type="float">
            <text:p>0,00132060185185185000</text:p>
          </table:table-cell>
          <table:table-cell table:formula="of:=[.D328]-[.D327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35" office:value-type="float" office:value="11445" calcext:value-type="float">
            <text:p>11445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132465277777778" calcext:value-type="float">
            <text:p>0,00132465277777778000</text:p>
          </table:table-cell>
          <table:table-cell table:formula="of:=[.D329]-[.D328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35" office:value-type="float" office:value="11480" calcext:value-type="float">
            <text:p>11480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13287037037037" calcext:value-type="float">
            <text:p>0,00132870370370370000</text:p>
          </table:table-cell>
          <table:table-cell table:formula="of:=[.D330]-[.D329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35" office:value-type="float" office:value="11515" calcext:value-type="float">
            <text:p>11515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133275462962963" calcext:value-type="float">
            <text:p>0,00133275462962963000</text:p>
          </table:table-cell>
          <table:table-cell table:formula="of:=[.D331]-[.D330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35" office:value-type="float" office:value="11550" calcext:value-type="float">
            <text:p>1155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133680555555556" calcext:value-type="float">
            <text:p>0,00133680555555556000</text:p>
          </table:table-cell>
          <table:table-cell table:formula="of:=[.D332]-[.D331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35" office:value-type="float" office:value="11585" calcext:value-type="float">
            <text:p>11585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134085648148148" calcext:value-type="float">
            <text:p>0,00134085648148148000</text:p>
          </table:table-cell>
          <table:table-cell table:formula="of:=[.D333]-[.D332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35" office:value-type="float" office:value="11620" calcext:value-type="float">
            <text:p>11620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134490740740741" calcext:value-type="float">
            <text:p>0,00134490740740741000</text:p>
          </table:table-cell>
          <table:table-cell table:formula="of:=[.D334]-[.D333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35" office:value-type="float" office:value="11655" calcext:value-type="float">
            <text:p>11655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134895833333333" calcext:value-type="float">
            <text:p>0,00134895833333333000</text:p>
          </table:table-cell>
          <table:table-cell table:formula="of:=[.D335]-[.D334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35" office:value-type="float" office:value="11690" calcext:value-type="float">
            <text:p>11690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135300925925926" calcext:value-type="float">
            <text:p>0,00135300925925926000</text:p>
          </table:table-cell>
          <table:table-cell table:formula="of:=[.D336]-[.D335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35" office:value-type="float" office:value="11725" calcext:value-type="float">
            <text:p>11725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135706018518519" calcext:value-type="float">
            <text:p>0,00135706018518519000</text:p>
          </table:table-cell>
          <table:table-cell table:formula="of:=[.D337]-[.D336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35" office:value-type="float" office:value="11760" calcext:value-type="float">
            <text:p>11760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136111111111111" calcext:value-type="float">
            <text:p>0,00136111111111111000</text:p>
          </table:table-cell>
          <table:table-cell table:formula="of:=[.D338]-[.D337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35" office:value-type="float" office:value="11795" calcext:value-type="float">
            <text:p>11795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136516203703704" calcext:value-type="float">
            <text:p>0,00136516203703704000</text:p>
          </table:table-cell>
          <table:table-cell table:formula="of:=[.D339]-[.D338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35" office:value-type="float" office:value="11830" calcext:value-type="float">
            <text:p>11830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136921296296296" calcext:value-type="float">
            <text:p>0,00136921296296296000</text:p>
          </table:table-cell>
          <table:table-cell table:formula="of:=[.D340]-[.D339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35" office:value-type="float" office:value="11865" calcext:value-type="float">
            <text:p>11865</text:p>
          </table:table-cell>
          <table:table-cell office:value-type="float" office:value="8640000" calcext:value-type="float">
            <text:p>8640000</text:p>
          </table:table-cell>
          <table:table-cell table:formula="of:=[.B340]/[.C340]" office:value-type="float" office:value="0.00137326388888889" calcext:value-type="float">
            <text:p>0,00137326388888889000</text:p>
          </table:table-cell>
          <table:table-cell table:formula="of:=[.D341]-[.D340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35" office:value-type="float" office:value="11900" calcext:value-type="float">
            <text:p>11900</text:p>
          </table:table-cell>
          <table:table-cell office:value-type="float" office:value="8640000" calcext:value-type="float">
            <text:p>8640000</text:p>
          </table:table-cell>
          <table:table-cell table:formula="of:=[.B341]/[.C341]" office:value-type="float" office:value="0.00137731481481481" calcext:value-type="float">
            <text:p>0,00137731481481481000</text:p>
          </table:table-cell>
          <table:table-cell table:formula="of:=[.D342]-[.D341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35" office:value-type="float" office:value="11935" calcext:value-type="float">
            <text:p>11935</text:p>
          </table:table-cell>
          <table:table-cell office:value-type="float" office:value="8640000" calcext:value-type="float">
            <text:p>8640000</text:p>
          </table:table-cell>
          <table:table-cell table:formula="of:=[.B342]/[.C342]" office:value-type="float" office:value="0.00138136574074074" calcext:value-type="float">
            <text:p>0,00138136574074074000</text:p>
          </table:table-cell>
          <table:table-cell table:formula="of:=[.D343]-[.D342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35" office:value-type="float" office:value="11970" calcext:value-type="float">
            <text:p>11970</text:p>
          </table:table-cell>
          <table:table-cell office:value-type="float" office:value="8640000" calcext:value-type="float">
            <text:p>8640000</text:p>
          </table:table-cell>
          <table:table-cell table:formula="of:=[.B343]/[.C343]" office:value-type="float" office:value="0.00138541666666667" calcext:value-type="float">
            <text:p>0,00138541666666667000</text:p>
          </table:table-cell>
          <table:table-cell table:formula="of:=[.D344]-[.D343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35" office:value-type="float" office:value="12005" calcext:value-type="float">
            <text:p>12005</text:p>
          </table:table-cell>
          <table:table-cell office:value-type="float" office:value="8640000" calcext:value-type="float">
            <text:p>8640000</text:p>
          </table:table-cell>
          <table:table-cell table:formula="of:=[.B344]/[.C344]" office:value-type="float" office:value="0.00138946759259259" calcext:value-type="float">
            <text:p>0,00138946759259259000</text:p>
          </table:table-cell>
          <table:table-cell table:formula="of:=[.D345]-[.D344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+35" office:value-type="float" office:value="12040" calcext:value-type="float">
            <text:p>12040</text:p>
          </table:table-cell>
          <table:table-cell office:value-type="float" office:value="8640000" calcext:value-type="float">
            <text:p>8640000</text:p>
          </table:table-cell>
          <table:table-cell table:formula="of:=[.B345]/[.C345]" office:value-type="float" office:value="0.00139351851851852" calcext:value-type="float">
            <text:p>0,00139351851851852000</text:p>
          </table:table-cell>
          <table:table-cell table:formula="of:=[.D346]-[.D345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35" office:value-type="float" office:value="12075" calcext:value-type="float">
            <text:p>12075</text:p>
          </table:table-cell>
          <table:table-cell office:value-type="float" office:value="8640000" calcext:value-type="float">
            <text:p>8640000</text:p>
          </table:table-cell>
          <table:table-cell table:formula="of:=[.B346]/[.C346]" office:value-type="float" office:value="0.00139756944444444" calcext:value-type="float">
            <text:p>0,00139756944444444000</text:p>
          </table:table-cell>
          <table:table-cell table:formula="of:=[.D347]-[.D346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35" office:value-type="float" office:value="12110" calcext:value-type="float">
            <text:p>12110</text:p>
          </table:table-cell>
          <table:table-cell office:value-type="float" office:value="8640000" calcext:value-type="float">
            <text:p>8640000</text:p>
          </table:table-cell>
          <table:table-cell table:formula="of:=[.B347]/[.C347]" office:value-type="float" office:value="0.00140162037037037" calcext:value-type="float">
            <text:p>0,00140162037037037000</text:p>
          </table:table-cell>
          <table:table-cell table:formula="of:=[.D348]-[.D347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+35" office:value-type="float" office:value="12145" calcext:value-type="float">
            <text:p>12145</text:p>
          </table:table-cell>
          <table:table-cell office:value-type="float" office:value="8640000" calcext:value-type="float">
            <text:p>8640000</text:p>
          </table:table-cell>
          <table:table-cell table:formula="of:=[.B348]/[.C348]" office:value-type="float" office:value="0.0014056712962963" calcext:value-type="float">
            <text:p>0,00140567129629630000</text:p>
          </table:table-cell>
          <table:table-cell table:formula="of:=[.D349]-[.D348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+35" office:value-type="float" office:value="12180" calcext:value-type="float">
            <text:p>12180</text:p>
          </table:table-cell>
          <table:table-cell office:value-type="float" office:value="8640000" calcext:value-type="float">
            <text:p>8640000</text:p>
          </table:table-cell>
          <table:table-cell table:formula="of:=[.B349]/[.C349]" office:value-type="float" office:value="0.00140972222222222" calcext:value-type="float">
            <text:p>0,00140972222222222000</text:p>
          </table:table-cell>
          <table:table-cell table:formula="of:=[.D350]-[.D349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+35" office:value-type="float" office:value="12215" calcext:value-type="float">
            <text:p>12215</text:p>
          </table:table-cell>
          <table:table-cell office:value-type="float" office:value="8640000" calcext:value-type="float">
            <text:p>8640000</text:p>
          </table:table-cell>
          <table:table-cell table:formula="of:=[.B350]/[.C350]" office:value-type="float" office:value="0.00141377314814815" calcext:value-type="float">
            <text:p>0,00141377314814815000</text:p>
          </table:table-cell>
          <table:table-cell table:formula="of:=[.D351]-[.D350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+35" office:value-type="float" office:value="12250" calcext:value-type="float">
            <text:p>12250</text:p>
          </table:table-cell>
          <table:table-cell office:value-type="float" office:value="8640000" calcext:value-type="float">
            <text:p>8640000</text:p>
          </table:table-cell>
          <table:table-cell table:formula="of:=[.B351]/[.C351]" office:value-type="float" office:value="0.00141782407407407" calcext:value-type="float">
            <text:p>0,00141782407407407000</text:p>
          </table:table-cell>
          <table:table-cell table:formula="of:=[.D352]-[.D351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+35" office:value-type="float" office:value="12285" calcext:value-type="float">
            <text:p>12285</text:p>
          </table:table-cell>
          <table:table-cell office:value-type="float" office:value="8640000" calcext:value-type="float">
            <text:p>8640000</text:p>
          </table:table-cell>
          <table:table-cell table:formula="of:=[.B352]/[.C352]" office:value-type="float" office:value="0.001421875" calcext:value-type="float">
            <text:p>0,00142187500000000000</text:p>
          </table:table-cell>
          <table:table-cell table:formula="of:=[.D353]-[.D352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35" office:value-type="float" office:value="12320" calcext:value-type="float">
            <text:p>12320</text:p>
          </table:table-cell>
          <table:table-cell office:value-type="float" office:value="8640000" calcext:value-type="float">
            <text:p>8640000</text:p>
          </table:table-cell>
          <table:table-cell table:formula="of:=[.B353]/[.C353]" office:value-type="float" office:value="0.00142592592592593" calcext:value-type="float">
            <text:p>0,00142592592592593000</text:p>
          </table:table-cell>
          <table:table-cell table:formula="of:=[.D354]-[.D353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+35" office:value-type="float" office:value="12355" calcext:value-type="float">
            <text:p>12355</text:p>
          </table:table-cell>
          <table:table-cell office:value-type="float" office:value="8640000" calcext:value-type="float">
            <text:p>8640000</text:p>
          </table:table-cell>
          <table:table-cell table:formula="of:=[.B354]/[.C354]" office:value-type="float" office:value="0.00142997685185185" calcext:value-type="float">
            <text:p>0,00142997685185185000</text:p>
          </table:table-cell>
          <table:table-cell table:formula="of:=[.D355]-[.D354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+35" office:value-type="float" office:value="12390" calcext:value-type="float">
            <text:p>12390</text:p>
          </table:table-cell>
          <table:table-cell office:value-type="float" office:value="8640000" calcext:value-type="float">
            <text:p>8640000</text:p>
          </table:table-cell>
          <table:table-cell table:formula="of:=[.B355]/[.C355]" office:value-type="float" office:value="0.00143402777777778" calcext:value-type="float">
            <text:p>0,00143402777777778000</text:p>
          </table:table-cell>
          <table:table-cell table:formula="of:=[.D356]-[.D355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+35" office:value-type="float" office:value="12425" calcext:value-type="float">
            <text:p>12425</text:p>
          </table:table-cell>
          <table:table-cell office:value-type="float" office:value="8640000" calcext:value-type="float">
            <text:p>8640000</text:p>
          </table:table-cell>
          <table:table-cell table:formula="of:=[.B356]/[.C356]" office:value-type="float" office:value="0.0014380787037037" calcext:value-type="float">
            <text:p>0,00143807870370370000</text:p>
          </table:table-cell>
          <table:table-cell table:formula="of:=[.D357]-[.D356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+35" office:value-type="float" office:value="12460" calcext:value-type="float">
            <text:p>12460</text:p>
          </table:table-cell>
          <table:table-cell office:value-type="float" office:value="8640000" calcext:value-type="float">
            <text:p>8640000</text:p>
          </table:table-cell>
          <table:table-cell table:formula="of:=[.B357]/[.C357]" office:value-type="float" office:value="0.00144212962962963" calcext:value-type="float">
            <text:p>0,00144212962962963000</text:p>
          </table:table-cell>
          <table:table-cell table:formula="of:=[.D358]-[.D357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+35" office:value-type="float" office:value="12495" calcext:value-type="float">
            <text:p>12495</text:p>
          </table:table-cell>
          <table:table-cell office:value-type="float" office:value="8640000" calcext:value-type="float">
            <text:p>8640000</text:p>
          </table:table-cell>
          <table:table-cell table:formula="of:=[.B358]/[.C358]" office:value-type="float" office:value="0.00144618055555556" calcext:value-type="float">
            <text:p>0,00144618055555556000</text:p>
          </table:table-cell>
          <table:table-cell table:formula="of:=[.D359]-[.D358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+35" office:value-type="float" office:value="12530" calcext:value-type="float">
            <text:p>12530</text:p>
          </table:table-cell>
          <table:table-cell office:value-type="float" office:value="8640000" calcext:value-type="float">
            <text:p>8640000</text:p>
          </table:table-cell>
          <table:table-cell table:formula="of:=[.B359]/[.C359]" office:value-type="float" office:value="0.00145023148148148" calcext:value-type="float">
            <text:p>0,00145023148148148000</text:p>
          </table:table-cell>
          <table:table-cell table:formula="of:=[.D360]-[.D359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+35" office:value-type="float" office:value="12565" calcext:value-type="float">
            <text:p>12565</text:p>
          </table:table-cell>
          <table:table-cell office:value-type="float" office:value="8640000" calcext:value-type="float">
            <text:p>8640000</text:p>
          </table:table-cell>
          <table:table-cell table:formula="of:=[.B360]/[.C360]" office:value-type="float" office:value="0.00145428240740741" calcext:value-type="float">
            <text:p>0,00145428240740741000</text:p>
          </table:table-cell>
          <table:table-cell table:formula="of:=[.D361]-[.D360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+35" office:value-type="float" office:value="12600" calcext:value-type="float">
            <text:p>12600</text:p>
          </table:table-cell>
          <table:table-cell office:value-type="float" office:value="8640000" calcext:value-type="float">
            <text:p>8640000</text:p>
          </table:table-cell>
          <table:table-cell table:formula="of:=[.B361]/[.C361]" office:value-type="float" office:value="0.00145833333333333" calcext:value-type="float">
            <text:p>0,00145833333333333000</text:p>
          </table:table-cell>
          <table:table-cell table:formula="of:=[.D362]-[.D361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+35" office:value-type="float" office:value="12635" calcext:value-type="float">
            <text:p>12635</text:p>
          </table:table-cell>
          <table:table-cell office:value-type="float" office:value="8640000" calcext:value-type="float">
            <text:p>8640000</text:p>
          </table:table-cell>
          <table:table-cell table:formula="of:=[.B362]/[.C362]" office:value-type="float" office:value="0.00146238425925926" calcext:value-type="float">
            <text:p>0,00146238425925926000</text:p>
          </table:table-cell>
          <table:table-cell table:formula="of:=[.D363]-[.D362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+35" office:value-type="float" office:value="12670" calcext:value-type="float">
            <text:p>12670</text:p>
          </table:table-cell>
          <table:table-cell office:value-type="float" office:value="8640000" calcext:value-type="float">
            <text:p>8640000</text:p>
          </table:table-cell>
          <table:table-cell table:formula="of:=[.B363]/[.C363]" office:value-type="float" office:value="0.00146643518518519" calcext:value-type="float">
            <text:p>0,00146643518518519000</text:p>
          </table:table-cell>
          <table:table-cell table:formula="of:=[.D364]-[.D363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+35" office:value-type="float" office:value="12705" calcext:value-type="float">
            <text:p>12705</text:p>
          </table:table-cell>
          <table:table-cell office:value-type="float" office:value="8640000" calcext:value-type="float">
            <text:p>8640000</text:p>
          </table:table-cell>
          <table:table-cell table:formula="of:=[.B364]/[.C364]" office:value-type="float" office:value="0.00147048611111111" calcext:value-type="float">
            <text:p>0,00147048611111111000</text:p>
          </table:table-cell>
          <table:table-cell table:formula="of:=[.D365]-[.D364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+35" office:value-type="float" office:value="12740" calcext:value-type="float">
            <text:p>12740</text:p>
          </table:table-cell>
          <table:table-cell office:value-type="float" office:value="8640000" calcext:value-type="float">
            <text:p>8640000</text:p>
          </table:table-cell>
          <table:table-cell table:formula="of:=[.B365]/[.C365]" office:value-type="float" office:value="0.00147453703703704" calcext:value-type="float">
            <text:p>0,00147453703703704000</text:p>
          </table:table-cell>
          <table:table-cell table:formula="of:=[.D366]-[.D365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5]+35" office:value-type="float" office:value="12775" calcext:value-type="float">
            <text:p>12775</text:p>
          </table:table-cell>
          <table:table-cell office:value-type="float" office:value="8640000" calcext:value-type="float">
            <text:p>8640000</text:p>
          </table:table-cell>
          <table:table-cell table:formula="of:=[.B366]/[.C366]" office:value-type="float" office:value="0.00147858796296296" calcext:value-type="float">
            <text:p>0,00147858796296296000</text:p>
          </table:table-cell>
          <table:table-cell table:formula="of:=[.D367]-[.D366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+35" office:value-type="float" office:value="12810" calcext:value-type="float">
            <text:p>12810</text:p>
          </table:table-cell>
          <table:table-cell office:value-type="float" office:value="8640000" calcext:value-type="float">
            <text:p>8640000</text:p>
          </table:table-cell>
          <table:table-cell table:formula="of:=[.B367]/[.C367]" office:value-type="float" office:value="0.00148263888888889" calcext:value-type="float">
            <text:p>0,00148263888888889000</text:p>
          </table:table-cell>
          <table:table-cell table:formula="of:=[.D368]-[.D367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7]+35" office:value-type="float" office:value="12845" calcext:value-type="float">
            <text:p>12845</text:p>
          </table:table-cell>
          <table:table-cell office:value-type="float" office:value="8640000" calcext:value-type="float">
            <text:p>8640000</text:p>
          </table:table-cell>
          <table:table-cell table:formula="of:=[.B368]/[.C368]" office:value-type="float" office:value="0.00148668981481481" calcext:value-type="float">
            <text:p>0,00148668981481481000</text:p>
          </table:table-cell>
          <table:table-cell table:formula="of:=[.D369]-[.D368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8]+35" office:value-type="float" office:value="12880" calcext:value-type="float">
            <text:p>12880</text:p>
          </table:table-cell>
          <table:table-cell office:value-type="float" office:value="8640000" calcext:value-type="float">
            <text:p>8640000</text:p>
          </table:table-cell>
          <table:table-cell table:formula="of:=[.B369]/[.C369]" office:value-type="float" office:value="0.00149074074074074" calcext:value-type="float">
            <text:p>0,00149074074074074000</text:p>
          </table:table-cell>
          <table:table-cell table:formula="of:=[.D370]-[.D369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69]+35" office:value-type="float" office:value="12915" calcext:value-type="float">
            <text:p>12915</text:p>
          </table:table-cell>
          <table:table-cell office:value-type="float" office:value="8640000" calcext:value-type="float">
            <text:p>8640000</text:p>
          </table:table-cell>
          <table:table-cell table:formula="of:=[.B370]/[.C370]" office:value-type="float" office:value="0.00149479166666667" calcext:value-type="float">
            <text:p>0,00149479166666667000</text:p>
          </table:table-cell>
          <table:table-cell table:formula="of:=[.D371]-[.D370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0]+35" office:value-type="float" office:value="12950" calcext:value-type="float">
            <text:p>12950</text:p>
          </table:table-cell>
          <table:table-cell office:value-type="float" office:value="8640000" calcext:value-type="float">
            <text:p>8640000</text:p>
          </table:table-cell>
          <table:table-cell table:formula="of:=[.B371]/[.C371]" office:value-type="float" office:value="0.00149884259259259" calcext:value-type="float">
            <text:p>0,00149884259259259000</text:p>
          </table:table-cell>
          <table:table-cell table:formula="of:=[.D372]-[.D371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1]+35" office:value-type="float" office:value="12985" calcext:value-type="float">
            <text:p>12985</text:p>
          </table:table-cell>
          <table:table-cell office:value-type="float" office:value="8640000" calcext:value-type="float">
            <text:p>8640000</text:p>
          </table:table-cell>
          <table:table-cell table:formula="of:=[.B372]/[.C372]" office:value-type="float" office:value="0.00150289351851852" calcext:value-type="float">
            <text:p>0,00150289351851852000</text:p>
          </table:table-cell>
          <table:table-cell table:formula="of:=[.D373]-[.D372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2]+35" office:value-type="float" office:value="13020" calcext:value-type="float">
            <text:p>13020</text:p>
          </table:table-cell>
          <table:table-cell office:value-type="float" office:value="8640000" calcext:value-type="float">
            <text:p>8640000</text:p>
          </table:table-cell>
          <table:table-cell table:formula="of:=[.B373]/[.C373]" office:value-type="float" office:value="0.00150694444444444" calcext:value-type="float">
            <text:p>0,00150694444444444000</text:p>
          </table:table-cell>
          <table:table-cell table:formula="of:=[.D374]-[.D373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3]+35" office:value-type="float" office:value="13055" calcext:value-type="float">
            <text:p>13055</text:p>
          </table:table-cell>
          <table:table-cell office:value-type="float" office:value="8640000" calcext:value-type="float">
            <text:p>8640000</text:p>
          </table:table-cell>
          <table:table-cell table:formula="of:=[.B374]/[.C374]" office:value-type="float" office:value="0.00151099537037037" calcext:value-type="float">
            <text:p>0,00151099537037037000</text:p>
          </table:table-cell>
          <table:table-cell table:formula="of:=[.D375]-[.D374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4]+35" office:value-type="float" office:value="13090" calcext:value-type="float">
            <text:p>13090</text:p>
          </table:table-cell>
          <table:table-cell office:value-type="float" office:value="8640000" calcext:value-type="float">
            <text:p>8640000</text:p>
          </table:table-cell>
          <table:table-cell table:formula="of:=[.B375]/[.C375]" office:value-type="float" office:value="0.0015150462962963" calcext:value-type="float">
            <text:p>0,00151504629629630000</text:p>
          </table:table-cell>
          <table:table-cell table:formula="of:=[.D376]-[.D375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5]+35" office:value-type="float" office:value="13125" calcext:value-type="float">
            <text:p>13125</text:p>
          </table:table-cell>
          <table:table-cell office:value-type="float" office:value="8640000" calcext:value-type="float">
            <text:p>8640000</text:p>
          </table:table-cell>
          <table:table-cell table:formula="of:=[.B376]/[.C376]" office:value-type="float" office:value="0.00151909722222222" calcext:value-type="float">
            <text:p>0,00151909722222222000</text:p>
          </table:table-cell>
          <table:table-cell table:formula="of:=[.D377]-[.D376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6]+35" office:value-type="float" office:value="13160" calcext:value-type="float">
            <text:p>13160</text:p>
          </table:table-cell>
          <table:table-cell office:value-type="float" office:value="8640000" calcext:value-type="float">
            <text:p>8640000</text:p>
          </table:table-cell>
          <table:table-cell table:formula="of:=[.B377]/[.C377]" office:value-type="float" office:value="0.00152314814814815" calcext:value-type="float">
            <text:p>0,00152314814814815000</text:p>
          </table:table-cell>
          <table:table-cell table:formula="of:=[.D378]-[.D377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7]+35" office:value-type="float" office:value="13195" calcext:value-type="float">
            <text:p>13195</text:p>
          </table:table-cell>
          <table:table-cell office:value-type="float" office:value="8640000" calcext:value-type="float">
            <text:p>8640000</text:p>
          </table:table-cell>
          <table:table-cell table:formula="of:=[.B378]/[.C378]" office:value-type="float" office:value="0.00152719907407407" calcext:value-type="float">
            <text:p>0,00152719907407407000</text:p>
          </table:table-cell>
          <table:table-cell table:formula="of:=[.D379]-[.D378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8]+35" office:value-type="float" office:value="13230" calcext:value-type="float">
            <text:p>13230</text:p>
          </table:table-cell>
          <table:table-cell office:value-type="float" office:value="8640000" calcext:value-type="float">
            <text:p>8640000</text:p>
          </table:table-cell>
          <table:table-cell table:formula="of:=[.B379]/[.C379]" office:value-type="float" office:value="0.00153125" calcext:value-type="float">
            <text:p>0,00153125000000000000</text:p>
          </table:table-cell>
          <table:table-cell table:formula="of:=[.D380]-[.D379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79]+35" office:value-type="float" office:value="13265" calcext:value-type="float">
            <text:p>13265</text:p>
          </table:table-cell>
          <table:table-cell office:value-type="float" office:value="8640000" calcext:value-type="float">
            <text:p>8640000</text:p>
          </table:table-cell>
          <table:table-cell table:formula="of:=[.B380]/[.C380]" office:value-type="float" office:value="0.00153530092592593" calcext:value-type="float">
            <text:p>0,00153530092592593000</text:p>
          </table:table-cell>
          <table:table-cell table:formula="of:=[.D381]-[.D380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0]+35" office:value-type="float" office:value="13300" calcext:value-type="float">
            <text:p>13300</text:p>
          </table:table-cell>
          <table:table-cell office:value-type="float" office:value="8640000" calcext:value-type="float">
            <text:p>8640000</text:p>
          </table:table-cell>
          <table:table-cell table:formula="of:=[.B381]/[.C381]" office:value-type="float" office:value="0.00153935185185185" calcext:value-type="float">
            <text:p>0,00153935185185185000</text:p>
          </table:table-cell>
          <table:table-cell table:formula="of:=[.D382]-[.D381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1]+35" office:value-type="float" office:value="13335" calcext:value-type="float">
            <text:p>13335</text:p>
          </table:table-cell>
          <table:table-cell office:value-type="float" office:value="8640000" calcext:value-type="float">
            <text:p>8640000</text:p>
          </table:table-cell>
          <table:table-cell table:formula="of:=[.B382]/[.C382]" office:value-type="float" office:value="0.00154340277777778" calcext:value-type="float">
            <text:p>0,00154340277777778000</text:p>
          </table:table-cell>
          <table:table-cell table:formula="of:=[.D383]-[.D382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2]+35" office:value-type="float" office:value="13370" calcext:value-type="float">
            <text:p>13370</text:p>
          </table:table-cell>
          <table:table-cell office:value-type="float" office:value="8640000" calcext:value-type="float">
            <text:p>8640000</text:p>
          </table:table-cell>
          <table:table-cell table:formula="of:=[.B383]/[.C383]" office:value-type="float" office:value="0.0015474537037037" calcext:value-type="float">
            <text:p>0,00154745370370370000</text:p>
          </table:table-cell>
          <table:table-cell table:formula="of:=[.D384]-[.D383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3]+35" office:value-type="float" office:value="13405" calcext:value-type="float">
            <text:p>13405</text:p>
          </table:table-cell>
          <table:table-cell office:value-type="float" office:value="8640000" calcext:value-type="float">
            <text:p>8640000</text:p>
          </table:table-cell>
          <table:table-cell table:formula="of:=[.B384]/[.C384]" office:value-type="float" office:value="0.00155150462962963" calcext:value-type="float">
            <text:p>0,00155150462962963000</text:p>
          </table:table-cell>
          <table:table-cell table:formula="of:=[.D385]-[.D384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4]+35" office:value-type="float" office:value="13440" calcext:value-type="float">
            <text:p>13440</text:p>
          </table:table-cell>
          <table:table-cell office:value-type="float" office:value="8640000" calcext:value-type="float">
            <text:p>8640000</text:p>
          </table:table-cell>
          <table:table-cell table:formula="of:=[.B385]/[.C385]" office:value-type="float" office:value="0.00155555555555556" calcext:value-type="float">
            <text:p>0,00155555555555556000</text:p>
          </table:table-cell>
          <table:table-cell table:formula="of:=[.D386]-[.D385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5]+35" office:value-type="float" office:value="13475" calcext:value-type="float">
            <text:p>13475</text:p>
          </table:table-cell>
          <table:table-cell office:value-type="float" office:value="8640000" calcext:value-type="float">
            <text:p>8640000</text:p>
          </table:table-cell>
          <table:table-cell table:formula="of:=[.B386]/[.C386]" office:value-type="float" office:value="0.00155960648148148" calcext:value-type="float">
            <text:p>0,00155960648148148000</text:p>
          </table:table-cell>
          <table:table-cell table:formula="of:=[.D387]-[.D386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6]+35" office:value-type="float" office:value="13510" calcext:value-type="float">
            <text:p>13510</text:p>
          </table:table-cell>
          <table:table-cell office:value-type="float" office:value="8640000" calcext:value-type="float">
            <text:p>8640000</text:p>
          </table:table-cell>
          <table:table-cell table:formula="of:=[.B387]/[.C387]" office:value-type="float" office:value="0.00156365740740741" calcext:value-type="float">
            <text:p>0,00156365740740741000</text:p>
          </table:table-cell>
          <table:table-cell table:formula="of:=[.D388]-[.D387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7]+35" office:value-type="float" office:value="13545" calcext:value-type="float">
            <text:p>13545</text:p>
          </table:table-cell>
          <table:table-cell office:value-type="float" office:value="8640000" calcext:value-type="float">
            <text:p>8640000</text:p>
          </table:table-cell>
          <table:table-cell table:formula="of:=[.B388]/[.C388]" office:value-type="float" office:value="0.00156770833333333" calcext:value-type="float">
            <text:p>0,00156770833333333000</text:p>
          </table:table-cell>
          <table:table-cell table:formula="of:=[.D389]-[.D388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8]+35" office:value-type="float" office:value="13580" calcext:value-type="float">
            <text:p>13580</text:p>
          </table:table-cell>
          <table:table-cell office:value-type="float" office:value="8640000" calcext:value-type="float">
            <text:p>8640000</text:p>
          </table:table-cell>
          <table:table-cell table:formula="of:=[.B389]/[.C389]" office:value-type="float" office:value="0.00157175925925926" calcext:value-type="float">
            <text:p>0,00157175925925926000</text:p>
          </table:table-cell>
          <table:table-cell table:formula="of:=[.D390]-[.D389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89]+35" office:value-type="float" office:value="13615" calcext:value-type="float">
            <text:p>13615</text:p>
          </table:table-cell>
          <table:table-cell office:value-type="float" office:value="8640000" calcext:value-type="float">
            <text:p>8640000</text:p>
          </table:table-cell>
          <table:table-cell table:formula="of:=[.B390]/[.C390]" office:value-type="float" office:value="0.00157581018518519" calcext:value-type="float">
            <text:p>0,00157581018518518000</text:p>
          </table:table-cell>
          <table:table-cell table:formula="of:=[.D391]-[.D390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0]+35" office:value-type="float" office:value="13650" calcext:value-type="float">
            <text:p>13650</text:p>
          </table:table-cell>
          <table:table-cell office:value-type="float" office:value="8640000" calcext:value-type="float">
            <text:p>8640000</text:p>
          </table:table-cell>
          <table:table-cell table:formula="of:=[.B391]/[.C391]" office:value-type="float" office:value="0.00157986111111111" calcext:value-type="float">
            <text:p>0,00157986111111111000</text:p>
          </table:table-cell>
          <table:table-cell table:formula="of:=[.D392]-[.D391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1]+35" office:value-type="float" office:value="13685" calcext:value-type="float">
            <text:p>13685</text:p>
          </table:table-cell>
          <table:table-cell office:value-type="float" office:value="8640000" calcext:value-type="float">
            <text:p>8640000</text:p>
          </table:table-cell>
          <table:table-cell table:formula="of:=[.B392]/[.C392]" office:value-type="float" office:value="0.00158391203703704" calcext:value-type="float">
            <text:p>0,00158391203703704000</text:p>
          </table:table-cell>
          <table:table-cell table:formula="of:=[.D393]-[.D392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2]+35" office:value-type="float" office:value="13720" calcext:value-type="float">
            <text:p>13720</text:p>
          </table:table-cell>
          <table:table-cell office:value-type="float" office:value="8640000" calcext:value-type="float">
            <text:p>8640000</text:p>
          </table:table-cell>
          <table:table-cell table:formula="of:=[.B393]/[.C393]" office:value-type="float" office:value="0.00158796296296296" calcext:value-type="float">
            <text:p>0,00158796296296296000</text:p>
          </table:table-cell>
          <table:table-cell table:formula="of:=[.D394]-[.D393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3]+35" office:value-type="float" office:value="13755" calcext:value-type="float">
            <text:p>13755</text:p>
          </table:table-cell>
          <table:table-cell office:value-type="float" office:value="8640000" calcext:value-type="float">
            <text:p>8640000</text:p>
          </table:table-cell>
          <table:table-cell table:formula="of:=[.B394]/[.C394]" office:value-type="float" office:value="0.00159201388888889" calcext:value-type="float">
            <text:p>0,00159201388888889000</text:p>
          </table:table-cell>
          <table:table-cell table:formula="of:=[.D395]-[.D394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4]+35" office:value-type="float" office:value="13790" calcext:value-type="float">
            <text:p>13790</text:p>
          </table:table-cell>
          <table:table-cell office:value-type="float" office:value="8640000" calcext:value-type="float">
            <text:p>8640000</text:p>
          </table:table-cell>
          <table:table-cell table:formula="of:=[.B395]/[.C395]" office:value-type="float" office:value="0.00159606481481482" calcext:value-type="float">
            <text:p>0,00159606481481482000</text:p>
          </table:table-cell>
          <table:table-cell table:formula="of:=[.D396]-[.D395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5]+35" office:value-type="float" office:value="13825" calcext:value-type="float">
            <text:p>13825</text:p>
          </table:table-cell>
          <table:table-cell office:value-type="float" office:value="8640000" calcext:value-type="float">
            <text:p>8640000</text:p>
          </table:table-cell>
          <table:table-cell table:formula="of:=[.B396]/[.C396]" office:value-type="float" office:value="0.00160011574074074" calcext:value-type="float">
            <text:p>0,00160011574074074000</text:p>
          </table:table-cell>
          <table:table-cell table:formula="of:=[.D397]-[.D396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6]+35" office:value-type="float" office:value="13860" calcext:value-type="float">
            <text:p>13860</text:p>
          </table:table-cell>
          <table:table-cell office:value-type="float" office:value="8640000" calcext:value-type="float">
            <text:p>8640000</text:p>
          </table:table-cell>
          <table:table-cell table:formula="of:=[.B397]/[.C397]" office:value-type="float" office:value="0.00160416666666667" calcext:value-type="float">
            <text:p>0,00160416666666667000</text:p>
          </table:table-cell>
          <table:table-cell table:formula="of:=[.D398]-[.D397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397]+35" office:value-type="float" office:value="13895" calcext:value-type="float">
            <text:p>13895</text:p>
          </table:table-cell>
          <table:table-cell office:value-type="float" office:value="8640000" calcext:value-type="float">
            <text:p>8640000</text:p>
          </table:table-cell>
          <table:table-cell table:formula="of:=[.B398]/[.C398]" office:value-type="float" office:value="0.00160821759259259" calcext:value-type="float">
            <text:p>0,00160821759259259000</text:p>
          </table:table-cell>
          <table:table-cell table:formula="of:=[.D399]-[.D398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398]+35" office:value-type="float" office:value="13930" calcext:value-type="float">
            <text:p>13930</text:p>
          </table:table-cell>
          <table:table-cell office:value-type="float" office:value="8640000" calcext:value-type="float">
            <text:p>8640000</text:p>
          </table:table-cell>
          <table:table-cell table:formula="of:=[.B399]/[.C399]" office:value-type="float" office:value="0.00161226851851852" calcext:value-type="float">
            <text:p>0,00161226851851852000</text:p>
          </table:table-cell>
          <table:table-cell table:formula="of:=[.D400]-[.D399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399]+35" office:value-type="float" office:value="13965" calcext:value-type="float">
            <text:p>13965</text:p>
          </table:table-cell>
          <table:table-cell office:value-type="float" office:value="8640000" calcext:value-type="float">
            <text:p>8640000</text:p>
          </table:table-cell>
          <table:table-cell table:formula="of:=[.B400]/[.C400]" office:value-type="float" office:value="0.00161631944444444" calcext:value-type="float">
            <text:p>0,00161631944444444000</text:p>
          </table:table-cell>
          <table:table-cell table:formula="of:=[.D401]-[.D400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0]+35" office:value-type="float" office:value="14000" calcext:value-type="float">
            <text:p>14000</text:p>
          </table:table-cell>
          <table:table-cell office:value-type="float" office:value="8640000" calcext:value-type="float">
            <text:p>8640000</text:p>
          </table:table-cell>
          <table:table-cell table:formula="of:=[.B401]/[.C401]" office:value-type="float" office:value="0.00162037037037037" calcext:value-type="float">
            <text:p>0,00162037037037037000</text:p>
          </table:table-cell>
          <table:table-cell table:formula="of:=[.D402]-[.D401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B401]+35" office:value-type="float" office:value="14035" calcext:value-type="float">
            <text:p>14035</text:p>
          </table:table-cell>
          <table:table-cell office:value-type="float" office:value="8640000" calcext:value-type="float">
            <text:p>8640000</text:p>
          </table:table-cell>
          <table:table-cell table:formula="of:=[.B402]/[.C402]" office:value-type="float" office:value="0.0016244212962963" calcext:value-type="float">
            <text:p>0,00162442129629630000</text:p>
          </table:table-cell>
          <table:table-cell table:formula="of:=[.D403]-[.D402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B402]+35" office:value-type="float" office:value="14070" calcext:value-type="float">
            <text:p>14070</text:p>
          </table:table-cell>
          <table:table-cell office:value-type="float" office:value="8640000" calcext:value-type="float">
            <text:p>8640000</text:p>
          </table:table-cell>
          <table:table-cell table:formula="of:=[.B403]/[.C403]" office:value-type="float" office:value="0.00162847222222222" calcext:value-type="float">
            <text:p>0,00162847222222222000</text:p>
          </table:table-cell>
          <table:table-cell table:formula="of:=[.D404]-[.D403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B403]+35" office:value-type="float" office:value="14105" calcext:value-type="float">
            <text:p>14105</text:p>
          </table:table-cell>
          <table:table-cell office:value-type="float" office:value="8640000" calcext:value-type="float">
            <text:p>8640000</text:p>
          </table:table-cell>
          <table:table-cell table:formula="of:=[.B404]/[.C404]" office:value-type="float" office:value="0.00163252314814815" calcext:value-type="float">
            <text:p>0,00163252314814815000</text:p>
          </table:table-cell>
          <table:table-cell table:formula="of:=[.D405]-[.D404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404]+35" office:value-type="float" office:value="14140" calcext:value-type="float">
            <text:p>14140</text:p>
          </table:table-cell>
          <table:table-cell office:value-type="float" office:value="8640000" calcext:value-type="float">
            <text:p>8640000</text:p>
          </table:table-cell>
          <table:table-cell table:formula="of:=[.B405]/[.C405]" office:value-type="float" office:value="0.00163657407407407" calcext:value-type="float">
            <text:p>0,00163657407407407000</text:p>
          </table:table-cell>
          <table:table-cell table:formula="of:=[.D406]-[.D405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405]+35" office:value-type="float" office:value="14175" calcext:value-type="float">
            <text:p>14175</text:p>
          </table:table-cell>
          <table:table-cell office:value-type="float" office:value="8640000" calcext:value-type="float">
            <text:p>8640000</text:p>
          </table:table-cell>
          <table:table-cell table:formula="of:=[.B406]/[.C406]" office:value-type="float" office:value="0.001640625" calcext:value-type="float">
            <text:p>0,00164062500000000000</text:p>
          </table:table-cell>
          <table:table-cell table:formula="of:=[.D407]-[.D406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B406]+35" office:value-type="float" office:value="14210" calcext:value-type="float">
            <text:p>14210</text:p>
          </table:table-cell>
          <table:table-cell office:value-type="float" office:value="8640000" calcext:value-type="float">
            <text:p>8640000</text:p>
          </table:table-cell>
          <table:table-cell table:formula="of:=[.B407]/[.C407]" office:value-type="float" office:value="0.00164467592592593" calcext:value-type="float">
            <text:p>0,00164467592592593000</text:p>
          </table:table-cell>
          <table:table-cell table:formula="of:=[.D408]-[.D407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B407]+35" office:value-type="float" office:value="14245" calcext:value-type="float">
            <text:p>14245</text:p>
          </table:table-cell>
          <table:table-cell office:value-type="float" office:value="8640000" calcext:value-type="float">
            <text:p>8640000</text:p>
          </table:table-cell>
          <table:table-cell table:formula="of:=[.B408]/[.C408]" office:value-type="float" office:value="0.00164872685185185" calcext:value-type="float">
            <text:p>0,00164872685185185000</text:p>
          </table:table-cell>
          <table:table-cell table:formula="of:=[.D409]-[.D408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B408]+35" office:value-type="float" office:value="14280" calcext:value-type="float">
            <text:p>14280</text:p>
          </table:table-cell>
          <table:table-cell office:value-type="float" office:value="8640000" calcext:value-type="float">
            <text:p>8640000</text:p>
          </table:table-cell>
          <table:table-cell table:formula="of:=[.B409]/[.C409]" office:value-type="float" office:value="0.00165277777777778" calcext:value-type="float">
            <text:p>0,00165277777777778000</text:p>
          </table:table-cell>
          <table:table-cell table:formula="of:=[.D410]-[.D409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409]+35" office:value-type="float" office:value="14315" calcext:value-type="float">
            <text:p>14315</text:p>
          </table:table-cell>
          <table:table-cell office:value-type="float" office:value="8640000" calcext:value-type="float">
            <text:p>8640000</text:p>
          </table:table-cell>
          <table:table-cell table:formula="of:=[.B410]/[.C410]" office:value-type="float" office:value="0.0016568287037037" calcext:value-type="float">
            <text:p>0,00165682870370370000</text:p>
          </table:table-cell>
          <table:table-cell table:formula="of:=[.D411]-[.D410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B410]+35" office:value-type="float" office:value="14350" calcext:value-type="float">
            <text:p>14350</text:p>
          </table:table-cell>
          <table:table-cell office:value-type="float" office:value="8640000" calcext:value-type="float">
            <text:p>8640000</text:p>
          </table:table-cell>
          <table:table-cell table:formula="of:=[.B411]/[.C411]" office:value-type="float" office:value="0.00166087962962963" calcext:value-type="float">
            <text:p>0,00166087962962963000</text:p>
          </table:table-cell>
          <table:table-cell table:formula="of:=[.D412]-[.D411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B411]+35" office:value-type="float" office:value="14385" calcext:value-type="float">
            <text:p>14385</text:p>
          </table:table-cell>
          <table:table-cell office:value-type="float" office:value="8640000" calcext:value-type="float">
            <text:p>8640000</text:p>
          </table:table-cell>
          <table:table-cell table:formula="of:=[.B412]/[.C412]" office:value-type="float" office:value="0.00166493055555556" calcext:value-type="float">
            <text:p>0,00166493055555556000</text:p>
          </table:table-cell>
          <table:table-cell table:formula="of:=[.D413]-[.D412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412]+35" office:value-type="float" office:value="14420" calcext:value-type="float">
            <text:p>14420</text:p>
          </table:table-cell>
          <table:table-cell office:value-type="float" office:value="8640000" calcext:value-type="float">
            <text:p>8640000</text:p>
          </table:table-cell>
          <table:table-cell table:formula="of:=[.B413]/[.C413]" office:value-type="float" office:value="0.00166898148148148" calcext:value-type="float">
            <text:p>0,00166898148148148000</text:p>
          </table:table-cell>
          <table:table-cell table:formula="of:=[.D414]-[.D413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B413]+35" office:value-type="float" office:value="14455" calcext:value-type="float">
            <text:p>14455</text:p>
          </table:table-cell>
          <table:table-cell office:value-type="float" office:value="8640000" calcext:value-type="float">
            <text:p>8640000</text:p>
          </table:table-cell>
          <table:table-cell table:formula="of:=[.B414]/[.C414]" office:value-type="float" office:value="0.00167303240740741" calcext:value-type="float">
            <text:p>0,00167303240740741000</text:p>
          </table:table-cell>
          <table:table-cell table:formula="of:=[.D415]-[.D414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B414]+35" office:value-type="float" office:value="14490" calcext:value-type="float">
            <text:p>14490</text:p>
          </table:table-cell>
          <table:table-cell office:value-type="float" office:value="8640000" calcext:value-type="float">
            <text:p>8640000</text:p>
          </table:table-cell>
          <table:table-cell table:formula="of:=[.B415]/[.C415]" office:value-type="float" office:value="0.00167708333333333" calcext:value-type="float">
            <text:p>0,00167708333333333000</text:p>
          </table:table-cell>
          <table:table-cell table:formula="of:=[.D416]-[.D415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B415]+35" office:value-type="float" office:value="14525" calcext:value-type="float">
            <text:p>14525</text:p>
          </table:table-cell>
          <table:table-cell office:value-type="float" office:value="8640000" calcext:value-type="float">
            <text:p>8640000</text:p>
          </table:table-cell>
          <table:table-cell table:formula="of:=[.B416]/[.C416]" office:value-type="float" office:value="0.00168113425925926" calcext:value-type="float">
            <text:p>0,00168113425925926000</text:p>
          </table:table-cell>
          <table:table-cell table:formula="of:=[.D417]-[.D416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B416]+35" office:value-type="float" office:value="14560" calcext:value-type="float">
            <text:p>14560</text:p>
          </table:table-cell>
          <table:table-cell office:value-type="float" office:value="8640000" calcext:value-type="float">
            <text:p>8640000</text:p>
          </table:table-cell>
          <table:table-cell table:formula="of:=[.B417]/[.C417]" office:value-type="float" office:value="0.00168518518518519" calcext:value-type="float">
            <text:p>0,00168518518518519000</text:p>
          </table:table-cell>
          <table:table-cell table:formula="of:=[.D418]-[.D417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417]+35" office:value-type="float" office:value="14595" calcext:value-type="float">
            <text:p>14595</text:p>
          </table:table-cell>
          <table:table-cell office:value-type="float" office:value="8640000" calcext:value-type="float">
            <text:p>8640000</text:p>
          </table:table-cell>
          <table:table-cell table:formula="of:=[.B418]/[.C418]" office:value-type="float" office:value="0.00168923611111111" calcext:value-type="float">
            <text:p>0,00168923611111111000</text:p>
          </table:table-cell>
          <table:table-cell table:formula="of:=[.D419]-[.D418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B418]+35" office:value-type="float" office:value="14630" calcext:value-type="float">
            <text:p>14630</text:p>
          </table:table-cell>
          <table:table-cell office:value-type="float" office:value="8640000" calcext:value-type="float">
            <text:p>8640000</text:p>
          </table:table-cell>
          <table:table-cell table:formula="of:=[.B419]/[.C419]" office:value-type="float" office:value="0.00169328703703704" calcext:value-type="float">
            <text:p>0,00169328703703704000</text:p>
          </table:table-cell>
          <table:table-cell table:formula="of:=[.D420]-[.D419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B419]+35" office:value-type="float" office:value="14665" calcext:value-type="float">
            <text:p>14665</text:p>
          </table:table-cell>
          <table:table-cell office:value-type="float" office:value="8640000" calcext:value-type="float">
            <text:p>8640000</text:p>
          </table:table-cell>
          <table:table-cell table:formula="of:=[.B420]/[.C420]" office:value-type="float" office:value="0.00169733796296296" calcext:value-type="float">
            <text:p>0,00169733796296296000</text:p>
          </table:table-cell>
          <table:table-cell table:formula="of:=[.D421]-[.D420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B420]+35" office:value-type="float" office:value="14700" calcext:value-type="float">
            <text:p>14700</text:p>
          </table:table-cell>
          <table:table-cell office:value-type="float" office:value="8640000" calcext:value-type="float">
            <text:p>8640000</text:p>
          </table:table-cell>
          <table:table-cell table:formula="of:=[.B421]/[.C421]" office:value-type="float" office:value="0.00170138888888889" calcext:value-type="float">
            <text:p>0,00170138888888889000</text:p>
          </table:table-cell>
          <table:table-cell table:formula="of:=[.D422]-[.D421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B421]+35" office:value-type="float" office:value="14735" calcext:value-type="float">
            <text:p>14735</text:p>
          </table:table-cell>
          <table:table-cell office:value-type="float" office:value="8640000" calcext:value-type="float">
            <text:p>8640000</text:p>
          </table:table-cell>
          <table:table-cell table:formula="of:=[.B422]/[.C422]" office:value-type="float" office:value="0.00170543981481481" calcext:value-type="float">
            <text:p>0,00170543981481481000</text:p>
          </table:table-cell>
          <table:table-cell table:formula="of:=[.D423]-[.D422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B422]+35" office:value-type="float" office:value="14770" calcext:value-type="float">
            <text:p>14770</text:p>
          </table:table-cell>
          <table:table-cell office:value-type="float" office:value="8640000" calcext:value-type="float">
            <text:p>8640000</text:p>
          </table:table-cell>
          <table:table-cell table:formula="of:=[.B423]/[.C423]" office:value-type="float" office:value="0.00170949074074074" calcext:value-type="float">
            <text:p>0,00170949074074074000</text:p>
          </table:table-cell>
          <table:table-cell table:formula="of:=[.D424]-[.D423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B423]+35" office:value-type="float" office:value="14805" calcext:value-type="float">
            <text:p>14805</text:p>
          </table:table-cell>
          <table:table-cell office:value-type="float" office:value="8640000" calcext:value-type="float">
            <text:p>8640000</text:p>
          </table:table-cell>
          <table:table-cell table:formula="of:=[.B424]/[.C424]" office:value-type="float" office:value="0.00171354166666667" calcext:value-type="float">
            <text:p>0,00171354166666667000</text:p>
          </table:table-cell>
          <table:table-cell table:formula="of:=[.D425]-[.D424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B424]+35" office:value-type="float" office:value="14840" calcext:value-type="float">
            <text:p>14840</text:p>
          </table:table-cell>
          <table:table-cell office:value-type="float" office:value="8640000" calcext:value-type="float">
            <text:p>8640000</text:p>
          </table:table-cell>
          <table:table-cell table:formula="of:=[.B425]/[.C425]" office:value-type="float" office:value="0.00171759259259259" calcext:value-type="float">
            <text:p>0,00171759259259259000</text:p>
          </table:table-cell>
          <table:table-cell table:formula="of:=[.D426]-[.D425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B425]+35" office:value-type="float" office:value="14875" calcext:value-type="float">
            <text:p>14875</text:p>
          </table:table-cell>
          <table:table-cell office:value-type="float" office:value="8640000" calcext:value-type="float">
            <text:p>8640000</text:p>
          </table:table-cell>
          <table:table-cell table:formula="of:=[.B426]/[.C426]" office:value-type="float" office:value="0.00172164351851852" calcext:value-type="float">
            <text:p>0,00172164351851852000</text:p>
          </table:table-cell>
          <table:table-cell table:formula="of:=[.D427]-[.D426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B426]+35" office:value-type="float" office:value="14910" calcext:value-type="float">
            <text:p>14910</text:p>
          </table:table-cell>
          <table:table-cell office:value-type="float" office:value="8640000" calcext:value-type="float">
            <text:p>8640000</text:p>
          </table:table-cell>
          <table:table-cell table:formula="of:=[.B427]/[.C427]" office:value-type="float" office:value="0.00172569444444444" calcext:value-type="float">
            <text:p>0,00172569444444444000</text:p>
          </table:table-cell>
          <table:table-cell table:formula="of:=[.D428]-[.D427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B427]+35" office:value-type="float" office:value="14945" calcext:value-type="float">
            <text:p>14945</text:p>
          </table:table-cell>
          <table:table-cell office:value-type="float" office:value="8640000" calcext:value-type="float">
            <text:p>8640000</text:p>
          </table:table-cell>
          <table:table-cell table:formula="of:=[.B428]/[.C428]" office:value-type="float" office:value="0.00172974537037037" calcext:value-type="float">
            <text:p>0,00172974537037037000</text:p>
          </table:table-cell>
          <table:table-cell table:formula="of:=[.D429]-[.D428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B428]+35" office:value-type="float" office:value="14980" calcext:value-type="float">
            <text:p>14980</text:p>
          </table:table-cell>
          <table:table-cell office:value-type="float" office:value="8640000" calcext:value-type="float">
            <text:p>8640000</text:p>
          </table:table-cell>
          <table:table-cell table:formula="of:=[.B429]/[.C429]" office:value-type="float" office:value="0.0017337962962963" calcext:value-type="float">
            <text:p>0,00173379629629630000</text:p>
          </table:table-cell>
          <table:table-cell table:formula="of:=[.D430]-[.D429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B429]+35" office:value-type="float" office:value="15015" calcext:value-type="float">
            <text:p>15015</text:p>
          </table:table-cell>
          <table:table-cell office:value-type="float" office:value="8640000" calcext:value-type="float">
            <text:p>8640000</text:p>
          </table:table-cell>
          <table:table-cell table:formula="of:=[.B430]/[.C430]" office:value-type="float" office:value="0.00173784722222222" calcext:value-type="float">
            <text:p>0,00173784722222222000</text:p>
          </table:table-cell>
          <table:table-cell table:formula="of:=[.D431]-[.D430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B430]+35" office:value-type="float" office:value="15050" calcext:value-type="float">
            <text:p>15050</text:p>
          </table:table-cell>
          <table:table-cell office:value-type="float" office:value="8640000" calcext:value-type="float">
            <text:p>8640000</text:p>
          </table:table-cell>
          <table:table-cell table:formula="of:=[.B431]/[.C431]" office:value-type="float" office:value="0.00174189814814815" calcext:value-type="float">
            <text:p>0,00174189814814815000</text:p>
          </table:table-cell>
          <table:table-cell table:formula="of:=[.D432]-[.D431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B431]+35" office:value-type="float" office:value="15085" calcext:value-type="float">
            <text:p>15085</text:p>
          </table:table-cell>
          <table:table-cell office:value-type="float" office:value="8640000" calcext:value-type="float">
            <text:p>8640000</text:p>
          </table:table-cell>
          <table:table-cell table:formula="of:=[.B432]/[.C432]" office:value-type="float" office:value="0.00174594907407407" calcext:value-type="float">
            <text:p>0,00174594907407407000</text:p>
          </table:table-cell>
          <table:table-cell table:formula="of:=[.D433]-[.D432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B432]+35" office:value-type="float" office:value="15120" calcext:value-type="float">
            <text:p>15120</text:p>
          </table:table-cell>
          <table:table-cell office:value-type="float" office:value="8640000" calcext:value-type="float">
            <text:p>8640000</text:p>
          </table:table-cell>
          <table:table-cell table:formula="of:=[.B433]/[.C433]" office:value-type="float" office:value="0.00175" calcext:value-type="float">
            <text:p>0,00175000000000000000</text:p>
          </table:table-cell>
          <table:table-cell table:formula="of:=[.D434]-[.D433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B433]+35" office:value-type="float" office:value="15155" calcext:value-type="float">
            <text:p>15155</text:p>
          </table:table-cell>
          <table:table-cell office:value-type="float" office:value="8640000" calcext:value-type="float">
            <text:p>8640000</text:p>
          </table:table-cell>
          <table:table-cell table:formula="of:=[.B434]/[.C434]" office:value-type="float" office:value="0.00175405092592593" calcext:value-type="float">
            <text:p>0,00175405092592593000</text:p>
          </table:table-cell>
          <table:table-cell table:formula="of:=[.D435]-[.D434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B434]+35" office:value-type="float" office:value="15190" calcext:value-type="float">
            <text:p>15190</text:p>
          </table:table-cell>
          <table:table-cell office:value-type="float" office:value="8640000" calcext:value-type="float">
            <text:p>8640000</text:p>
          </table:table-cell>
          <table:table-cell table:formula="of:=[.B435]/[.C435]" office:value-type="float" office:value="0.00175810185185185" calcext:value-type="float">
            <text:p>0,00175810185185185000</text:p>
          </table:table-cell>
          <table:table-cell table:formula="of:=[.D436]-[.D435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B435]+35" office:value-type="float" office:value="15225" calcext:value-type="float">
            <text:p>15225</text:p>
          </table:table-cell>
          <table:table-cell office:value-type="float" office:value="8640000" calcext:value-type="float">
            <text:p>8640000</text:p>
          </table:table-cell>
          <table:table-cell table:formula="of:=[.B436]/[.C436]" office:value-type="float" office:value="0.00176215277777778" calcext:value-type="float">
            <text:p>0,00176215277777778000</text:p>
          </table:table-cell>
          <table:table-cell table:formula="of:=[.D437]-[.D436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B436]+35" office:value-type="float" office:value="15260" calcext:value-type="float">
            <text:p>15260</text:p>
          </table:table-cell>
          <table:table-cell office:value-type="float" office:value="8640000" calcext:value-type="float">
            <text:p>8640000</text:p>
          </table:table-cell>
          <table:table-cell table:formula="of:=[.B437]/[.C437]" office:value-type="float" office:value="0.0017662037037037" calcext:value-type="float">
            <text:p>0,00176620370370370000</text:p>
          </table:table-cell>
          <table:table-cell table:formula="of:=[.D438]-[.D437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B437]+35" office:value-type="float" office:value="15295" calcext:value-type="float">
            <text:p>15295</text:p>
          </table:table-cell>
          <table:table-cell office:value-type="float" office:value="8640000" calcext:value-type="float">
            <text:p>8640000</text:p>
          </table:table-cell>
          <table:table-cell table:formula="of:=[.B438]/[.C438]" office:value-type="float" office:value="0.00177025462962963" calcext:value-type="float">
            <text:p>0,00177025462962963000</text:p>
          </table:table-cell>
          <table:table-cell table:formula="of:=[.D439]-[.D438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B438]+35" office:value-type="float" office:value="15330" calcext:value-type="float">
            <text:p>15330</text:p>
          </table:table-cell>
          <table:table-cell office:value-type="float" office:value="8640000" calcext:value-type="float">
            <text:p>8640000</text:p>
          </table:table-cell>
          <table:table-cell table:formula="of:=[.B439]/[.C439]" office:value-type="float" office:value="0.00177430555555556" calcext:value-type="float">
            <text:p>0,00177430555555556000</text:p>
          </table:table-cell>
          <table:table-cell table:formula="of:=[.D440]-[.D439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B439]+35" office:value-type="float" office:value="15365" calcext:value-type="float">
            <text:p>15365</text:p>
          </table:table-cell>
          <table:table-cell office:value-type="float" office:value="8640000" calcext:value-type="float">
            <text:p>8640000</text:p>
          </table:table-cell>
          <table:table-cell table:formula="of:=[.B440]/[.C440]" office:value-type="float" office:value="0.00177835648148148" calcext:value-type="float">
            <text:p>0,00177835648148148000</text:p>
          </table:table-cell>
          <table:table-cell table:formula="of:=[.D441]-[.D440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B440]+35" office:value-type="float" office:value="15400" calcext:value-type="float">
            <text:p>15400</text:p>
          </table:table-cell>
          <table:table-cell office:value-type="float" office:value="8640000" calcext:value-type="float">
            <text:p>8640000</text:p>
          </table:table-cell>
          <table:table-cell table:formula="of:=[.B441]/[.C441]" office:value-type="float" office:value="0.00178240740740741" calcext:value-type="float">
            <text:p>0,00178240740740741000</text:p>
          </table:table-cell>
          <table:table-cell table:formula="of:=[.D442]-[.D441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B441]+35" office:value-type="float" office:value="15435" calcext:value-type="float">
            <text:p>15435</text:p>
          </table:table-cell>
          <table:table-cell office:value-type="float" office:value="8640000" calcext:value-type="float">
            <text:p>8640000</text:p>
          </table:table-cell>
          <table:table-cell table:formula="of:=[.B442]/[.C442]" office:value-type="float" office:value="0.00178645833333333" calcext:value-type="float">
            <text:p>0,00178645833333333000</text:p>
          </table:table-cell>
          <table:table-cell table:formula="of:=[.D443]-[.D442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B442]+35" office:value-type="float" office:value="15470" calcext:value-type="float">
            <text:p>15470</text:p>
          </table:table-cell>
          <table:table-cell office:value-type="float" office:value="8640000" calcext:value-type="float">
            <text:p>8640000</text:p>
          </table:table-cell>
          <table:table-cell table:formula="of:=[.B443]/[.C443]" office:value-type="float" office:value="0.00179050925925926" calcext:value-type="float">
            <text:p>0,00179050925925926000</text:p>
          </table:table-cell>
          <table:table-cell table:formula="of:=[.D444]-[.D443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B443]+35" office:value-type="float" office:value="15505" calcext:value-type="float">
            <text:p>15505</text:p>
          </table:table-cell>
          <table:table-cell office:value-type="float" office:value="8640000" calcext:value-type="float">
            <text:p>8640000</text:p>
          </table:table-cell>
          <table:table-cell table:formula="of:=[.B444]/[.C444]" office:value-type="float" office:value="0.00179456018518519" calcext:value-type="float">
            <text:p>0,00179456018518519000</text:p>
          </table:table-cell>
          <table:table-cell table:formula="of:=[.D445]-[.D444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B444]+35" office:value-type="float" office:value="15540" calcext:value-type="float">
            <text:p>15540</text:p>
          </table:table-cell>
          <table:table-cell office:value-type="float" office:value="8640000" calcext:value-type="float">
            <text:p>8640000</text:p>
          </table:table-cell>
          <table:table-cell table:formula="of:=[.B445]/[.C445]" office:value-type="float" office:value="0.00179861111111111" calcext:value-type="float">
            <text:p>0,00179861111111111000</text:p>
          </table:table-cell>
          <table:table-cell table:formula="of:=[.D446]-[.D445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B445]+35" office:value-type="float" office:value="15575" calcext:value-type="float">
            <text:p>15575</text:p>
          </table:table-cell>
          <table:table-cell office:value-type="float" office:value="8640000" calcext:value-type="float">
            <text:p>8640000</text:p>
          </table:table-cell>
          <table:table-cell table:formula="of:=[.B446]/[.C446]" office:value-type="float" office:value="0.00180266203703704" calcext:value-type="float">
            <text:p>0,00180266203703704000</text:p>
          </table:table-cell>
          <table:table-cell table:formula="of:=[.D447]-[.D446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B446]+35" office:value-type="float" office:value="15610" calcext:value-type="float">
            <text:p>15610</text:p>
          </table:table-cell>
          <table:table-cell office:value-type="float" office:value="8640000" calcext:value-type="float">
            <text:p>8640000</text:p>
          </table:table-cell>
          <table:table-cell table:formula="of:=[.B447]/[.C447]" office:value-type="float" office:value="0.00180671296296296" calcext:value-type="float">
            <text:p>0,00180671296296296000</text:p>
          </table:table-cell>
          <table:table-cell table:formula="of:=[.D448]-[.D447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B447]+35" office:value-type="float" office:value="15645" calcext:value-type="float">
            <text:p>15645</text:p>
          </table:table-cell>
          <table:table-cell office:value-type="float" office:value="8640000" calcext:value-type="float">
            <text:p>8640000</text:p>
          </table:table-cell>
          <table:table-cell table:formula="of:=[.B448]/[.C448]" office:value-type="float" office:value="0.00181076388888889" calcext:value-type="float">
            <text:p>0,00181076388888889000</text:p>
          </table:table-cell>
          <table:table-cell table:formula="of:=[.D449]-[.D448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B448]+35" office:value-type="float" office:value="15680" calcext:value-type="float">
            <text:p>15680</text:p>
          </table:table-cell>
          <table:table-cell office:value-type="float" office:value="8640000" calcext:value-type="float">
            <text:p>8640000</text:p>
          </table:table-cell>
          <table:table-cell table:formula="of:=[.B449]/[.C449]" office:value-type="float" office:value="0.00181481481481482" calcext:value-type="float">
            <text:p>0,00181481481481482000</text:p>
          </table:table-cell>
          <table:table-cell table:formula="of:=[.D450]-[.D449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B449]+35" office:value-type="float" office:value="15715" calcext:value-type="float">
            <text:p>15715</text:p>
          </table:table-cell>
          <table:table-cell office:value-type="float" office:value="8640000" calcext:value-type="float">
            <text:p>8640000</text:p>
          </table:table-cell>
          <table:table-cell table:formula="of:=[.B450]/[.C450]" office:value-type="float" office:value="0.00181886574074074" calcext:value-type="float">
            <text:p>0,00181886574074074000</text:p>
          </table:table-cell>
          <table:table-cell table:formula="of:=[.D451]-[.D450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B450]+35" office:value-type="float" office:value="15750" calcext:value-type="float">
            <text:p>15750</text:p>
          </table:table-cell>
          <table:table-cell office:value-type="float" office:value="8640000" calcext:value-type="float">
            <text:p>8640000</text:p>
          </table:table-cell>
          <table:table-cell table:formula="of:=[.B451]/[.C451]" office:value-type="float" office:value="0.00182291666666667" calcext:value-type="float">
            <text:p>0,00182291666666667000</text:p>
          </table:table-cell>
          <table:table-cell table:formula="of:=[.D452]-[.D451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B451]+35" office:value-type="float" office:value="15785" calcext:value-type="float">
            <text:p>15785</text:p>
          </table:table-cell>
          <table:table-cell office:value-type="float" office:value="8640000" calcext:value-type="float">
            <text:p>8640000</text:p>
          </table:table-cell>
          <table:table-cell table:formula="of:=[.B452]/[.C452]" office:value-type="float" office:value="0.00182696759259259" calcext:value-type="float">
            <text:p>0,00182696759259259000</text:p>
          </table:table-cell>
          <table:table-cell table:formula="of:=[.D453]-[.D452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B452]+35" office:value-type="float" office:value="15820" calcext:value-type="float">
            <text:p>15820</text:p>
          </table:table-cell>
          <table:table-cell office:value-type="float" office:value="8640000" calcext:value-type="float">
            <text:p>8640000</text:p>
          </table:table-cell>
          <table:table-cell table:formula="of:=[.B453]/[.C453]" office:value-type="float" office:value="0.00183101851851852" calcext:value-type="float">
            <text:p>0,00183101851851852000</text:p>
          </table:table-cell>
          <table:table-cell table:formula="of:=[.D454]-[.D453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B453]+35" office:value-type="float" office:value="15855" calcext:value-type="float">
            <text:p>15855</text:p>
          </table:table-cell>
          <table:table-cell office:value-type="float" office:value="8640000" calcext:value-type="float">
            <text:p>8640000</text:p>
          </table:table-cell>
          <table:table-cell table:formula="of:=[.B454]/[.C454]" office:value-type="float" office:value="0.00183506944444444" calcext:value-type="float">
            <text:p>0,00183506944444444000</text:p>
          </table:table-cell>
          <table:table-cell table:formula="of:=[.D455]-[.D454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B454]+35" office:value-type="float" office:value="15890" calcext:value-type="float">
            <text:p>15890</text:p>
          </table:table-cell>
          <table:table-cell office:value-type="float" office:value="8640000" calcext:value-type="float">
            <text:p>8640000</text:p>
          </table:table-cell>
          <table:table-cell table:formula="of:=[.B455]/[.C455]" office:value-type="float" office:value="0.00183912037037037" calcext:value-type="float">
            <text:p>0,00183912037037037000</text:p>
          </table:table-cell>
          <table:table-cell table:formula="of:=[.D456]-[.D455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B455]+35" office:value-type="float" office:value="15925" calcext:value-type="float">
            <text:p>15925</text:p>
          </table:table-cell>
          <table:table-cell office:value-type="float" office:value="8640000" calcext:value-type="float">
            <text:p>8640000</text:p>
          </table:table-cell>
          <table:table-cell table:formula="of:=[.B456]/[.C456]" office:value-type="float" office:value="0.0018431712962963" calcext:value-type="float">
            <text:p>0,00184317129629630000</text:p>
          </table:table-cell>
          <table:table-cell table:formula="of:=[.D457]-[.D456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B456]+35" office:value-type="float" office:value="15960" calcext:value-type="float">
            <text:p>15960</text:p>
          </table:table-cell>
          <table:table-cell office:value-type="float" office:value="8640000" calcext:value-type="float">
            <text:p>8640000</text:p>
          </table:table-cell>
          <table:table-cell table:formula="of:=[.B457]/[.C457]" office:value-type="float" office:value="0.00184722222222222" calcext:value-type="float">
            <text:p>0,00184722222222222000</text:p>
          </table:table-cell>
          <table:table-cell table:formula="of:=[.D458]-[.D457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B457]+35" office:value-type="float" office:value="15995" calcext:value-type="float">
            <text:p>15995</text:p>
          </table:table-cell>
          <table:table-cell office:value-type="float" office:value="8640000" calcext:value-type="float">
            <text:p>8640000</text:p>
          </table:table-cell>
          <table:table-cell table:formula="of:=[.B458]/[.C458]" office:value-type="float" office:value="0.00185127314814815" calcext:value-type="float">
            <text:p>0,00185127314814815000</text:p>
          </table:table-cell>
          <table:table-cell table:formula="of:=[.D459]-[.D458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B458]+35" office:value-type="float" office:value="16030" calcext:value-type="float">
            <text:p>16030</text:p>
          </table:table-cell>
          <table:table-cell office:value-type="float" office:value="8640000" calcext:value-type="float">
            <text:p>8640000</text:p>
          </table:table-cell>
          <table:table-cell table:formula="of:=[.B459]/[.C459]" office:value-type="float" office:value="0.00185532407407407" calcext:value-type="float">
            <text:p>0,00185532407407407000</text:p>
          </table:table-cell>
          <table:table-cell table:formula="of:=[.D460]-[.D459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B459]+35" office:value-type="float" office:value="16065" calcext:value-type="float">
            <text:p>16065</text:p>
          </table:table-cell>
          <table:table-cell office:value-type="float" office:value="8640000" calcext:value-type="float">
            <text:p>8640000</text:p>
          </table:table-cell>
          <table:table-cell table:formula="of:=[.B460]/[.C460]" office:value-type="float" office:value="0.001859375" calcext:value-type="float">
            <text:p>0,00185937500000000000</text:p>
          </table:table-cell>
          <table:table-cell table:formula="of:=[.D461]-[.D460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B460]+35" office:value-type="float" office:value="16100" calcext:value-type="float">
            <text:p>16100</text:p>
          </table:table-cell>
          <table:table-cell office:value-type="float" office:value="8640000" calcext:value-type="float">
            <text:p>8640000</text:p>
          </table:table-cell>
          <table:table-cell table:formula="of:=[.B461]/[.C461]" office:value-type="float" office:value="0.00186342592592593" calcext:value-type="float">
            <text:p>0,00186342592592593000</text:p>
          </table:table-cell>
          <table:table-cell table:formula="of:=[.D462]-[.D461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B461]+35" office:value-type="float" office:value="16135" calcext:value-type="float">
            <text:p>16135</text:p>
          </table:table-cell>
          <table:table-cell office:value-type="float" office:value="8640000" calcext:value-type="float">
            <text:p>8640000</text:p>
          </table:table-cell>
          <table:table-cell table:formula="of:=[.B462]/[.C462]" office:value-type="float" office:value="0.00186747685185185" calcext:value-type="float">
            <text:p>0,00186747685185185000</text:p>
          </table:table-cell>
          <table:table-cell table:formula="of:=[.D463]-[.D462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B462]+35" office:value-type="float" office:value="16170" calcext:value-type="float">
            <text:p>16170</text:p>
          </table:table-cell>
          <table:table-cell office:value-type="float" office:value="8640000" calcext:value-type="float">
            <text:p>8640000</text:p>
          </table:table-cell>
          <table:table-cell table:formula="of:=[.B463]/[.C463]" office:value-type="float" office:value="0.00187152777777778" calcext:value-type="float">
            <text:p>0,00187152777777778000</text:p>
          </table:table-cell>
          <table:table-cell table:formula="of:=[.D464]-[.D463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B463]+35" office:value-type="float" office:value="16205" calcext:value-type="float">
            <text:p>16205</text:p>
          </table:table-cell>
          <table:table-cell office:value-type="float" office:value="8640000" calcext:value-type="float">
            <text:p>8640000</text:p>
          </table:table-cell>
          <table:table-cell table:formula="of:=[.B464]/[.C464]" office:value-type="float" office:value="0.0018755787037037" calcext:value-type="float">
            <text:p>0,00187557870370370000</text:p>
          </table:table-cell>
          <table:table-cell table:formula="of:=[.D465]-[.D464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B464]+35" office:value-type="float" office:value="16240" calcext:value-type="float">
            <text:p>16240</text:p>
          </table:table-cell>
          <table:table-cell office:value-type="float" office:value="8640000" calcext:value-type="float">
            <text:p>8640000</text:p>
          </table:table-cell>
          <table:table-cell table:formula="of:=[.B465]/[.C465]" office:value-type="float" office:value="0.00187962962962963" calcext:value-type="float">
            <text:p>0,00187962962962963000</text:p>
          </table:table-cell>
          <table:table-cell table:formula="of:=[.D466]-[.D465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B465]+35" office:value-type="float" office:value="16275" calcext:value-type="float">
            <text:p>16275</text:p>
          </table:table-cell>
          <table:table-cell office:value-type="float" office:value="8640000" calcext:value-type="float">
            <text:p>8640000</text:p>
          </table:table-cell>
          <table:table-cell table:formula="of:=[.B466]/[.C466]" office:value-type="float" office:value="0.00188368055555556" calcext:value-type="float">
            <text:p>0,00188368055555556000</text:p>
          </table:table-cell>
          <table:table-cell table:formula="of:=[.D467]-[.D466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B466]+35" office:value-type="float" office:value="16310" calcext:value-type="float">
            <text:p>16310</text:p>
          </table:table-cell>
          <table:table-cell office:value-type="float" office:value="8640000" calcext:value-type="float">
            <text:p>8640000</text:p>
          </table:table-cell>
          <table:table-cell table:formula="of:=[.B467]/[.C467]" office:value-type="float" office:value="0.00188773148148148" calcext:value-type="float">
            <text:p>0,00188773148148148000</text:p>
          </table:table-cell>
          <table:table-cell table:formula="of:=[.D468]-[.D467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B467]+35" office:value-type="float" office:value="16345" calcext:value-type="float">
            <text:p>16345</text:p>
          </table:table-cell>
          <table:table-cell office:value-type="float" office:value="8640000" calcext:value-type="float">
            <text:p>8640000</text:p>
          </table:table-cell>
          <table:table-cell table:formula="of:=[.B468]/[.C468]" office:value-type="float" office:value="0.00189178240740741" calcext:value-type="float">
            <text:p>0,00189178240740741000</text:p>
          </table:table-cell>
          <table:table-cell table:formula="of:=[.D469]-[.D468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B468]+35" office:value-type="float" office:value="16380" calcext:value-type="float">
            <text:p>16380</text:p>
          </table:table-cell>
          <table:table-cell office:value-type="float" office:value="8640000" calcext:value-type="float">
            <text:p>8640000</text:p>
          </table:table-cell>
          <table:table-cell table:formula="of:=[.B469]/[.C469]" office:value-type="float" office:value="0.00189583333333333" calcext:value-type="float">
            <text:p>0,00189583333333333000</text:p>
          </table:table-cell>
          <table:table-cell table:formula="of:=[.D470]-[.D469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B469]+35" office:value-type="float" office:value="16415" calcext:value-type="float">
            <text:p>16415</text:p>
          </table:table-cell>
          <table:table-cell office:value-type="float" office:value="8640000" calcext:value-type="float">
            <text:p>8640000</text:p>
          </table:table-cell>
          <table:table-cell table:formula="of:=[.B470]/[.C470]" office:value-type="float" office:value="0.00189988425925926" calcext:value-type="float">
            <text:p>0,00189988425925926000</text:p>
          </table:table-cell>
          <table:table-cell table:formula="of:=[.D471]-[.D470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B470]+35" office:value-type="float" office:value="16450" calcext:value-type="float">
            <text:p>16450</text:p>
          </table:table-cell>
          <table:table-cell office:value-type="float" office:value="8640000" calcext:value-type="float">
            <text:p>8640000</text:p>
          </table:table-cell>
          <table:table-cell table:formula="of:=[.B471]/[.C471]" office:value-type="float" office:value="0.00190393518518519" calcext:value-type="float">
            <text:p>0,00190393518518519000</text:p>
          </table:table-cell>
          <table:table-cell table:formula="of:=[.D472]-[.D471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B471]+35" office:value-type="float" office:value="16485" calcext:value-type="float">
            <text:p>16485</text:p>
          </table:table-cell>
          <table:table-cell office:value-type="float" office:value="8640000" calcext:value-type="float">
            <text:p>8640000</text:p>
          </table:table-cell>
          <table:table-cell table:formula="of:=[.B472]/[.C472]" office:value-type="float" office:value="0.00190798611111111" calcext:value-type="float">
            <text:p>0,00190798611111111000</text:p>
          </table:table-cell>
          <table:table-cell table:formula="of:=[.D473]-[.D472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B472]+35" office:value-type="float" office:value="16520" calcext:value-type="float">
            <text:p>16520</text:p>
          </table:table-cell>
          <table:table-cell office:value-type="float" office:value="8640000" calcext:value-type="float">
            <text:p>8640000</text:p>
          </table:table-cell>
          <table:table-cell table:formula="of:=[.B473]/[.C473]" office:value-type="float" office:value="0.00191203703703704" calcext:value-type="float">
            <text:p>0,00191203703703704000</text:p>
          </table:table-cell>
          <table:table-cell table:formula="of:=[.D474]-[.D473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B473]+35" office:value-type="float" office:value="16555" calcext:value-type="float">
            <text:p>16555</text:p>
          </table:table-cell>
          <table:table-cell office:value-type="float" office:value="8640000" calcext:value-type="float">
            <text:p>8640000</text:p>
          </table:table-cell>
          <table:table-cell table:formula="of:=[.B474]/[.C474]" office:value-type="float" office:value="0.00191608796296296" calcext:value-type="float">
            <text:p>0,00191608796296296000</text:p>
          </table:table-cell>
          <table:table-cell table:formula="of:=[.D475]-[.D474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B474]+35" office:value-type="float" office:value="16590" calcext:value-type="float">
            <text:p>16590</text:p>
          </table:table-cell>
          <table:table-cell office:value-type="float" office:value="8640000" calcext:value-type="float">
            <text:p>8640000</text:p>
          </table:table-cell>
          <table:table-cell table:formula="of:=[.B475]/[.C475]" office:value-type="float" office:value="0.00192013888888889" calcext:value-type="float">
            <text:p>0,00192013888888889000</text:p>
          </table:table-cell>
          <table:table-cell table:formula="of:=[.D476]-[.D475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B475]+35" office:value-type="float" office:value="16625" calcext:value-type="float">
            <text:p>16625</text:p>
          </table:table-cell>
          <table:table-cell office:value-type="float" office:value="8640000" calcext:value-type="float">
            <text:p>8640000</text:p>
          </table:table-cell>
          <table:table-cell table:formula="of:=[.B476]/[.C476]" office:value-type="float" office:value="0.00192418981481481" calcext:value-type="float">
            <text:p>0,00192418981481481000</text:p>
          </table:table-cell>
          <table:table-cell table:formula="of:=[.D477]-[.D476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B476]+35" office:value-type="float" office:value="16660" calcext:value-type="float">
            <text:p>16660</text:p>
          </table:table-cell>
          <table:table-cell office:value-type="float" office:value="8640000" calcext:value-type="float">
            <text:p>8640000</text:p>
          </table:table-cell>
          <table:table-cell table:formula="of:=[.B477]/[.C477]" office:value-type="float" office:value="0.00192824074074074" calcext:value-type="float">
            <text:p>0,00192824074074074000</text:p>
          </table:table-cell>
          <table:table-cell table:formula="of:=[.D478]-[.D477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B477]+35" office:value-type="float" office:value="16695" calcext:value-type="float">
            <text:p>16695</text:p>
          </table:table-cell>
          <table:table-cell office:value-type="float" office:value="8640000" calcext:value-type="float">
            <text:p>8640000</text:p>
          </table:table-cell>
          <table:table-cell table:formula="of:=[.B478]/[.C478]" office:value-type="float" office:value="0.00193229166666667" calcext:value-type="float">
            <text:p>0,00193229166666667000</text:p>
          </table:table-cell>
          <table:table-cell table:formula="of:=[.D479]-[.D478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B478]+35" office:value-type="float" office:value="16730" calcext:value-type="float">
            <text:p>16730</text:p>
          </table:table-cell>
          <table:table-cell office:value-type="float" office:value="8640000" calcext:value-type="float">
            <text:p>8640000</text:p>
          </table:table-cell>
          <table:table-cell table:formula="of:=[.B479]/[.C479]" office:value-type="float" office:value="0.00193634259259259" calcext:value-type="float">
            <text:p>0,00193634259259259000</text:p>
          </table:table-cell>
          <table:table-cell table:formula="of:=[.D480]-[.D479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B479]+35" office:value-type="float" office:value="16765" calcext:value-type="float">
            <text:p>16765</text:p>
          </table:table-cell>
          <table:table-cell office:value-type="float" office:value="8640000" calcext:value-type="float">
            <text:p>8640000</text:p>
          </table:table-cell>
          <table:table-cell table:formula="of:=[.B480]/[.C480]" office:value-type="float" office:value="0.00194039351851852" calcext:value-type="float">
            <text:p>0,00194039351851852000</text:p>
          </table:table-cell>
          <table:table-cell table:formula="of:=[.D481]-[.D480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B480]+35" office:value-type="float" office:value="16800" calcext:value-type="float">
            <text:p>16800</text:p>
          </table:table-cell>
          <table:table-cell office:value-type="float" office:value="8640000" calcext:value-type="float">
            <text:p>8640000</text:p>
          </table:table-cell>
          <table:table-cell table:formula="of:=[.B481]/[.C481]" office:value-type="float" office:value="0.00194444444444444" calcext:value-type="float">
            <text:p>0,00194444444444444000</text:p>
          </table:table-cell>
          <table:table-cell table:formula="of:=[.D482]-[.D481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B481]+35" office:value-type="float" office:value="16835" calcext:value-type="float">
            <text:p>16835</text:p>
          </table:table-cell>
          <table:table-cell office:value-type="float" office:value="8640000" calcext:value-type="float">
            <text:p>8640000</text:p>
          </table:table-cell>
          <table:table-cell table:formula="of:=[.B482]/[.C482]" office:value-type="float" office:value="0.00194849537037037" calcext:value-type="float">
            <text:p>0,00194849537037037000</text:p>
          </table:table-cell>
          <table:table-cell table:formula="of:=[.D483]-[.D482]" office:value-type="float" office:value="0.00000405092592592579" calcext:value-type="float">
            <text:p>0,00000405092592592579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B482]+35" office:value-type="float" office:value="16870" calcext:value-type="float">
            <text:p>16870</text:p>
          </table:table-cell>
          <table:table-cell office:value-type="float" office:value="8640000" calcext:value-type="float">
            <text:p>8640000</text:p>
          </table:table-cell>
          <table:table-cell table:formula="of:=[.B483]/[.C483]" office:value-type="float" office:value="0.0019525462962963" calcext:value-type="float">
            <text:p>0,00195254629629630000</text:p>
          </table:table-cell>
          <table:table-cell table:formula="of:=[.D484]-[.D483]" office:value-type="float" office:value="0.00000405092592592623" calcext:value-type="float">
            <text:p>0,0000040509259259262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B483]+35" office:value-type="float" office:value="16905" calcext:value-type="float">
            <text:p>16905</text:p>
          </table:table-cell>
          <table:table-cell office:value-type="float" office:value="8640000" calcext:value-type="float">
            <text:p>8640000</text:p>
          </table:table-cell>
          <table:table-cell table:formula="of:=[.B484]/[.C484]" office:value-type="float" office:value="0.00195659722222222" calcext:value-type="float">
            <text:p>0,00195659722222222000</text:p>
          </table:table-cell>
          <table:table-cell table:formula="of:=[.D485]-[.D484]" office:value-type="float" office:value="0.00000405092592592558" calcext:value-type="float">
            <text:p>0,0000040509259259255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B484]+35" office:value-type="float" office:value="16940" calcext:value-type="float">
            <text:p>16940</text:p>
          </table:table-cell>
          <table:table-cell office:value-type="float" office:value="8640000" calcext:value-type="float">
            <text:p>8640000</text:p>
          </table:table-cell>
          <table:table-cell table:formula="of:=[.B485]/[.C485]" office:value-type="float" office:value="0.00196064814814815" calcext:value-type="float">
            <text:p>0,00196064814814815000</text:p>
          </table:table-cell>
          <table:table-cell table:formula="of:=[.D486]-[.D485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B485]+35" office:value-type="float" office:value="16975" calcext:value-type="float">
            <text:p>16975</text:p>
          </table:table-cell>
          <table:table-cell office:value-type="float" office:value="8640000" calcext:value-type="float">
            <text:p>8640000</text:p>
          </table:table-cell>
          <table:table-cell table:formula="of:=[.B486]/[.C486]" office:value-type="float" office:value="0.00196469907407407" calcext:value-type="float">
            <text:p>0,00196469907407407000</text:p>
          </table:table-cell>
          <table:table-cell table:formula="of:=[.D487]-[.D486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B486]+35" office:value-type="float" office:value="17010" calcext:value-type="float">
            <text:p>17010</text:p>
          </table:table-cell>
          <table:table-cell office:value-type="float" office:value="8640000" calcext:value-type="float">
            <text:p>8640000</text:p>
          </table:table-cell>
          <table:table-cell table:formula="of:=[.B487]/[.C487]" office:value-type="float" office:value="0.00196875" calcext:value-type="float">
            <text:p>0,00196875000000000000</text:p>
          </table:table-cell>
          <table:table-cell table:formula="of:=[.D488]-[.D487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B487]+35" office:value-type="float" office:value="17045" calcext:value-type="float">
            <text:p>17045</text:p>
          </table:table-cell>
          <table:table-cell office:value-type="float" office:value="8640000" calcext:value-type="float">
            <text:p>8640000</text:p>
          </table:table-cell>
          <table:table-cell table:formula="of:=[.B488]/[.C488]" office:value-type="float" office:value="0.00197280092592593" calcext:value-type="float">
            <text:p>0,00197280092592593000</text:p>
          </table:table-cell>
          <table:table-cell table:formula="of:=[.D489]-[.D488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B488]+35" office:value-type="float" office:value="17080" calcext:value-type="float">
            <text:p>17080</text:p>
          </table:table-cell>
          <table:table-cell office:value-type="float" office:value="8640000" calcext:value-type="float">
            <text:p>8640000</text:p>
          </table:table-cell>
          <table:table-cell table:formula="of:=[.B489]/[.C489]" office:value-type="float" office:value="0.00197685185185185" calcext:value-type="float">
            <text:p>0,00197685185185185000</text:p>
          </table:table-cell>
          <table:table-cell table:formula="of:=[.D490]-[.D489]" office:value-type="float" office:value="0.00000405092592592558" calcext:value-type="float">
            <text:p>0,0000040509259259255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B489]+35" office:value-type="float" office:value="17115" calcext:value-type="float">
            <text:p>17115</text:p>
          </table:table-cell>
          <table:table-cell office:value-type="float" office:value="8640000" calcext:value-type="float">
            <text:p>8640000</text:p>
          </table:table-cell>
          <table:table-cell table:formula="of:=[.B490]/[.C490]" office:value-type="float" office:value="0.00198090277777778" calcext:value-type="float">
            <text:p>0,00198090277777778000</text:p>
          </table:table-cell>
          <table:table-cell table:formula="of:=[.D491]-[.D490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B490]+35" office:value-type="float" office:value="17150" calcext:value-type="float">
            <text:p>17150</text:p>
          </table:table-cell>
          <table:table-cell office:value-type="float" office:value="8640000" calcext:value-type="float">
            <text:p>8640000</text:p>
          </table:table-cell>
          <table:table-cell table:formula="of:=[.B491]/[.C491]" office:value-type="float" office:value="0.0019849537037037" calcext:value-type="float">
            <text:p>0,00198495370370370000</text:p>
          </table:table-cell>
          <table:table-cell table:formula="of:=[.D492]-[.D491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B491]+35" office:value-type="float" office:value="17185" calcext:value-type="float">
            <text:p>17185</text:p>
          </table:table-cell>
          <table:table-cell office:value-type="float" office:value="8640000" calcext:value-type="float">
            <text:p>8640000</text:p>
          </table:table-cell>
          <table:table-cell table:formula="of:=[.B492]/[.C492]" office:value-type="float" office:value="0.00198900462962963" calcext:value-type="float">
            <text:p>0,00198900462962963000</text:p>
          </table:table-cell>
          <table:table-cell table:formula="of:=[.D493]-[.D492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B492]+35" office:value-type="float" office:value="17220" calcext:value-type="float">
            <text:p>17220</text:p>
          </table:table-cell>
          <table:table-cell office:value-type="float" office:value="8640000" calcext:value-type="float">
            <text:p>8640000</text:p>
          </table:table-cell>
          <table:table-cell table:formula="of:=[.B493]/[.C493]" office:value-type="float" office:value="0.00199305555555556" calcext:value-type="float">
            <text:p>0,00199305555555556000</text:p>
          </table:table-cell>
          <table:table-cell table:formula="of:=[.D494]-[.D493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B493]+35" office:value-type="float" office:value="17255" calcext:value-type="float">
            <text:p>17255</text:p>
          </table:table-cell>
          <table:table-cell office:value-type="float" office:value="8640000" calcext:value-type="float">
            <text:p>8640000</text:p>
          </table:table-cell>
          <table:table-cell table:formula="of:=[.B494]/[.C494]" office:value-type="float" office:value="0.00199710648148148" calcext:value-type="float">
            <text:p>0,00199710648148148000</text:p>
          </table:table-cell>
          <table:table-cell table:formula="of:=[.D495]-[.D494]" office:value-type="float" office:value="0.00000405092592592558" calcext:value-type="float">
            <text:p>0,0000040509259259255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B494]+35" office:value-type="float" office:value="17290" calcext:value-type="float">
            <text:p>17290</text:p>
          </table:table-cell>
          <table:table-cell office:value-type="float" office:value="8640000" calcext:value-type="float">
            <text:p>8640000</text:p>
          </table:table-cell>
          <table:table-cell table:formula="of:=[.B495]/[.C495]" office:value-type="float" office:value="0.00200115740740741" calcext:value-type="float">
            <text:p>0,00200115740740741000</text:p>
          </table:table-cell>
          <table:table-cell table:formula="of:=[.D496]-[.D495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B495]+35" office:value-type="float" office:value="17325" calcext:value-type="float">
            <text:p>17325</text:p>
          </table:table-cell>
          <table:table-cell office:value-type="float" office:value="8640000" calcext:value-type="float">
            <text:p>8640000</text:p>
          </table:table-cell>
          <table:table-cell table:formula="of:=[.B496]/[.C496]" office:value-type="float" office:value="0.00200520833333333" calcext:value-type="float">
            <text:p>0,00200520833333333000</text:p>
          </table:table-cell>
          <table:table-cell table:formula="of:=[.D497]-[.D496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B496]+35" office:value-type="float" office:value="17360" calcext:value-type="float">
            <text:p>17360</text:p>
          </table:table-cell>
          <table:table-cell office:value-type="float" office:value="8640000" calcext:value-type="float">
            <text:p>8640000</text:p>
          </table:table-cell>
          <table:table-cell table:formula="of:=[.B497]/[.C497]" office:value-type="float" office:value="0.00200925925925926" calcext:value-type="float">
            <text:p>0,00200925925925926000</text:p>
          </table:table-cell>
          <table:table-cell table:formula="of:=[.D498]-[.D497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B497]+35" office:value-type="float" office:value="17395" calcext:value-type="float">
            <text:p>17395</text:p>
          </table:table-cell>
          <table:table-cell office:value-type="float" office:value="8640000" calcext:value-type="float">
            <text:p>8640000</text:p>
          </table:table-cell>
          <table:table-cell table:formula="of:=[.B498]/[.C498]" office:value-type="float" office:value="0.00201331018518519" calcext:value-type="float">
            <text:p>0,00201331018518519000</text:p>
          </table:table-cell>
          <table:table-cell table:formula="of:=[.D499]-[.D498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B498]+35" office:value-type="float" office:value="17430" calcext:value-type="float">
            <text:p>17430</text:p>
          </table:table-cell>
          <table:table-cell office:value-type="float" office:value="8640000" calcext:value-type="float">
            <text:p>8640000</text:p>
          </table:table-cell>
          <table:table-cell table:formula="of:=[.B499]/[.C499]" office:value-type="float" office:value="0.00201736111111111" calcext:value-type="float">
            <text:p>0,00201736111111111000</text:p>
          </table:table-cell>
          <table:table-cell table:formula="of:=[.D500]-[.D499]" office:value-type="float" office:value="0.00000405092592592558" calcext:value-type="float">
            <text:p>0,0000040509259259255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B499]+35" office:value-type="float" office:value="17465" calcext:value-type="float">
            <text:p>17465</text:p>
          </table:table-cell>
          <table:table-cell office:value-type="float" office:value="8640000" calcext:value-type="float">
            <text:p>8640000</text:p>
          </table:table-cell>
          <table:table-cell table:formula="of:=[.B500]/[.C500]" office:value-type="float" office:value="0.00202141203703704" calcext:value-type="float">
            <text:p>0,00202141203703704000</text:p>
          </table:table-cell>
          <table:table-cell table:formula="of:=[.D501]-[.D500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500]+35" office:value-type="float" office:value="17500" calcext:value-type="float">
            <text:p>17500</text:p>
          </table:table-cell>
          <table:table-cell office:value-type="float" office:value="8640000" calcext:value-type="float">
            <text:p>8640000</text:p>
          </table:table-cell>
          <table:table-cell table:formula="of:=[.B501]/[.C501]" office:value-type="float" office:value="0.00202546296296296" calcext:value-type="float">
            <text:p>0,00202546296296296000</text:p>
          </table:table-cell>
          <table:table-cell table:formula="of:=[.D502]-[.D501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B501]+35" office:value-type="float" office:value="17535" calcext:value-type="float">
            <text:p>17535</text:p>
          </table:table-cell>
          <table:table-cell office:value-type="float" office:value="8640000" calcext:value-type="float">
            <text:p>8640000</text:p>
          </table:table-cell>
          <table:table-cell table:formula="of:=[.B502]/[.C502]" office:value-type="float" office:value="0.00202951388888889" calcext:value-type="float">
            <text:p>0,00202951388888889000</text:p>
          </table:table-cell>
          <table:table-cell table:formula="of:=[.D503]-[.D502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B502]+35" office:value-type="float" office:value="17570" calcext:value-type="float">
            <text:p>17570</text:p>
          </table:table-cell>
          <table:table-cell office:value-type="float" office:value="8640000" calcext:value-type="float">
            <text:p>8640000</text:p>
          </table:table-cell>
          <table:table-cell table:formula="of:=[.B503]/[.C503]" office:value-type="float" office:value="0.00203356481481482" calcext:value-type="float">
            <text:p>0,00203356481481482000</text:p>
          </table:table-cell>
          <table:table-cell table:formula="of:=[.D504]-[.D503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B503]+35" office:value-type="float" office:value="17605" calcext:value-type="float">
            <text:p>17605</text:p>
          </table:table-cell>
          <table:table-cell office:value-type="float" office:value="8640000" calcext:value-type="float">
            <text:p>8640000</text:p>
          </table:table-cell>
          <table:table-cell table:formula="of:=[.B504]/[.C504]" office:value-type="float" office:value="0.00203761574074074" calcext:value-type="float">
            <text:p>0,00203761574074074000</text:p>
          </table:table-cell>
          <table:table-cell table:formula="of:=[.D505]-[.D504]" office:value-type="float" office:value="0.00000405092592592558" calcext:value-type="float">
            <text:p>0,0000040509259259255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B504]+35" office:value-type="float" office:value="17640" calcext:value-type="float">
            <text:p>17640</text:p>
          </table:table-cell>
          <table:table-cell office:value-type="float" office:value="8640000" calcext:value-type="float">
            <text:p>8640000</text:p>
          </table:table-cell>
          <table:table-cell table:formula="of:=[.B505]/[.C505]" office:value-type="float" office:value="0.00204166666666667" calcext:value-type="float">
            <text:p>0,00204166666666667000</text:p>
          </table:table-cell>
          <table:table-cell table:formula="of:=[.D506]-[.D505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B505]+35" office:value-type="float" office:value="17675" calcext:value-type="float">
            <text:p>17675</text:p>
          </table:table-cell>
          <table:table-cell office:value-type="float" office:value="8640000" calcext:value-type="float">
            <text:p>8640000</text:p>
          </table:table-cell>
          <table:table-cell table:formula="of:=[.B506]/[.C506]" office:value-type="float" office:value="0.00204571759259259" calcext:value-type="float">
            <text:p>0,00204571759259259000</text:p>
          </table:table-cell>
          <table:table-cell table:formula="of:=[.D507]-[.D506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B506]+35" office:value-type="float" office:value="17710" calcext:value-type="float">
            <text:p>17710</text:p>
          </table:table-cell>
          <table:table-cell office:value-type="float" office:value="8640000" calcext:value-type="float">
            <text:p>8640000</text:p>
          </table:table-cell>
          <table:table-cell table:formula="of:=[.B507]/[.C507]" office:value-type="float" office:value="0.00204976851851852" calcext:value-type="float">
            <text:p>0,00204976851851852000</text:p>
          </table:table-cell>
          <table:table-cell table:formula="of:=[.D508]-[.D507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B507]+35" office:value-type="float" office:value="17745" calcext:value-type="float">
            <text:p>17745</text:p>
          </table:table-cell>
          <table:table-cell office:value-type="float" office:value="8640000" calcext:value-type="float">
            <text:p>8640000</text:p>
          </table:table-cell>
          <table:table-cell table:formula="of:=[.B508]/[.C508]" office:value-type="float" office:value="0.00205381944444444" calcext:value-type="float">
            <text:p>0,00205381944444444000</text:p>
          </table:table-cell>
          <table:table-cell table:formula="of:=[.D509]-[.D508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B508]+35" office:value-type="float" office:value="17780" calcext:value-type="float">
            <text:p>17780</text:p>
          </table:table-cell>
          <table:table-cell office:value-type="float" office:value="8640000" calcext:value-type="float">
            <text:p>8640000</text:p>
          </table:table-cell>
          <table:table-cell table:formula="of:=[.B509]/[.C509]" office:value-type="float" office:value="0.00205787037037037" calcext:value-type="float">
            <text:p>0,00205787037037037000</text:p>
          </table:table-cell>
          <table:table-cell table:formula="of:=[.D510]-[.D509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B509]+35" office:value-type="float" office:value="17815" calcext:value-type="float">
            <text:p>17815</text:p>
          </table:table-cell>
          <table:table-cell office:value-type="float" office:value="8640000" calcext:value-type="float">
            <text:p>8640000</text:p>
          </table:table-cell>
          <table:table-cell table:formula="of:=[.B510]/[.C510]" office:value-type="float" office:value="0.0020619212962963" calcext:value-type="float">
            <text:p>0,00206192129629630000</text:p>
          </table:table-cell>
          <table:table-cell table:formula="of:=[.D511]-[.D510]" office:value-type="float" office:value="0.00000405092592592558" calcext:value-type="float">
            <text:p>0,0000040509259259255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B510]+35" office:value-type="float" office:value="17850" calcext:value-type="float">
            <text:p>17850</text:p>
          </table:table-cell>
          <table:table-cell office:value-type="float" office:value="8640000" calcext:value-type="float">
            <text:p>8640000</text:p>
          </table:table-cell>
          <table:table-cell table:formula="of:=[.B511]/[.C511]" office:value-type="float" office:value="0.00206597222222222" calcext:value-type="float">
            <text:p>0,00206597222222222000</text:p>
          </table:table-cell>
          <table:table-cell table:formula="of:=[.D512]-[.D511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B511]+35" office:value-type="float" office:value="17885" calcext:value-type="float">
            <text:p>17885</text:p>
          </table:table-cell>
          <table:table-cell office:value-type="float" office:value="8640000" calcext:value-type="float">
            <text:p>8640000</text:p>
          </table:table-cell>
          <table:table-cell table:formula="of:=[.B512]/[.C512]" office:value-type="float" office:value="0.00207002314814815" calcext:value-type="float">
            <text:p>0,00207002314814815000</text:p>
          </table:table-cell>
          <table:table-cell table:formula="of:=[.D513]-[.D512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B512]+35" office:value-type="float" office:value="17920" calcext:value-type="float">
            <text:p>17920</text:p>
          </table:table-cell>
          <table:table-cell office:value-type="float" office:value="8640000" calcext:value-type="float">
            <text:p>8640000</text:p>
          </table:table-cell>
          <table:table-cell table:formula="of:=[.B513]/[.C513]" office:value-type="float" office:value="0.00207407407407407" calcext:value-type="float">
            <text:p>0,00207407407407407000</text:p>
          </table:table-cell>
          <table:table-cell table:formula="of:=[.D514]-[.D513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B513]+35" office:value-type="float" office:value="17955" calcext:value-type="float">
            <text:p>17955</text:p>
          </table:table-cell>
          <table:table-cell office:value-type="float" office:value="8640000" calcext:value-type="float">
            <text:p>8640000</text:p>
          </table:table-cell>
          <table:table-cell table:formula="of:=[.B514]/[.C514]" office:value-type="float" office:value="0.002078125" calcext:value-type="float">
            <text:p>0,00207812500000000000</text:p>
          </table:table-cell>
          <table:table-cell table:formula="of:=[.D515]-[.D514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B514]+35" office:value-type="float" office:value="17990" calcext:value-type="float">
            <text:p>17990</text:p>
          </table:table-cell>
          <table:table-cell office:value-type="float" office:value="8640000" calcext:value-type="float">
            <text:p>8640000</text:p>
          </table:table-cell>
          <table:table-cell table:formula="of:=[.B515]/[.C515]" office:value-type="float" office:value="0.00208217592592593" calcext:value-type="float">
            <text:p>0,00208217592592593000</text:p>
          </table:table-cell>
          <table:table-cell table:formula="of:=[.D516]-[.D515]" office:value-type="float" office:value="0.00000405092592592558" calcext:value-type="float">
            <text:p>0,0000040509259259255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B515]+35" office:value-type="float" office:value="18025" calcext:value-type="float">
            <text:p>18025</text:p>
          </table:table-cell>
          <table:table-cell office:value-type="float" office:value="8640000" calcext:value-type="float">
            <text:p>8640000</text:p>
          </table:table-cell>
          <table:table-cell table:formula="of:=[.B516]/[.C516]" office:value-type="float" office:value="0.00208622685185185" calcext:value-type="float">
            <text:p>0,00208622685185185000</text:p>
          </table:table-cell>
          <table:table-cell table:formula="of:=[.D517]-[.D516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B516]+35" office:value-type="float" office:value="18060" calcext:value-type="float">
            <text:p>18060</text:p>
          </table:table-cell>
          <table:table-cell office:value-type="float" office:value="8640000" calcext:value-type="float">
            <text:p>8640000</text:p>
          </table:table-cell>
          <table:table-cell table:formula="of:=[.B517]/[.C517]" office:value-type="float" office:value="0.00209027777777778" calcext:value-type="float">
            <text:p>0,00209027777777778000</text:p>
          </table:table-cell>
          <table:table-cell table:formula="of:=[.D518]-[.D517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B517]+35" office:value-type="float" office:value="18095" calcext:value-type="float">
            <text:p>18095</text:p>
          </table:table-cell>
          <table:table-cell office:value-type="float" office:value="8640000" calcext:value-type="float">
            <text:p>8640000</text:p>
          </table:table-cell>
          <table:table-cell table:formula="of:=[.B518]/[.C518]" office:value-type="float" office:value="0.0020943287037037" calcext:value-type="float">
            <text:p>0,00209432870370370000</text:p>
          </table:table-cell>
          <table:table-cell table:formula="of:=[.D519]-[.D518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B518]+35" office:value-type="float" office:value="18130" calcext:value-type="float">
            <text:p>18130</text:p>
          </table:table-cell>
          <table:table-cell office:value-type="float" office:value="8640000" calcext:value-type="float">
            <text:p>8640000</text:p>
          </table:table-cell>
          <table:table-cell table:formula="of:=[.B519]/[.C519]" office:value-type="float" office:value="0.00209837962962963" calcext:value-type="float">
            <text:p>0,00209837962962963000</text:p>
          </table:table-cell>
          <table:table-cell table:formula="of:=[.D520]-[.D519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B519]+35" office:value-type="float" office:value="18165" calcext:value-type="float">
            <text:p>18165</text:p>
          </table:table-cell>
          <table:table-cell office:value-type="float" office:value="8640000" calcext:value-type="float">
            <text:p>8640000</text:p>
          </table:table-cell>
          <table:table-cell table:formula="of:=[.B520]/[.C520]" office:value-type="float" office:value="0.00210243055555556" calcext:value-type="float">
            <text:p>0,00210243055555556000</text:p>
          </table:table-cell>
          <table:table-cell table:formula="of:=[.D521]-[.D520]" office:value-type="float" office:value="0.00000405092592592558" calcext:value-type="float">
            <text:p>0,0000040509259259255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B520]+35" office:value-type="float" office:value="18200" calcext:value-type="float">
            <text:p>18200</text:p>
          </table:table-cell>
          <table:table-cell office:value-type="float" office:value="8640000" calcext:value-type="float">
            <text:p>8640000</text:p>
          </table:table-cell>
          <table:table-cell table:formula="of:=[.B521]/[.C521]" office:value-type="float" office:value="0.00210648148148148" calcext:value-type="float">
            <text:p>0,00210648148148148000</text:p>
          </table:table-cell>
          <table:table-cell table:formula="of:=[.D522]-[.D521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B521]+35" office:value-type="float" office:value="18235" calcext:value-type="float">
            <text:p>18235</text:p>
          </table:table-cell>
          <table:table-cell office:value-type="float" office:value="8640000" calcext:value-type="float">
            <text:p>8640000</text:p>
          </table:table-cell>
          <table:table-cell table:formula="of:=[.B522]/[.C522]" office:value-type="float" office:value="0.00211053240740741" calcext:value-type="float">
            <text:p>0,00211053240740741000</text:p>
          </table:table-cell>
          <table:table-cell table:formula="of:=[.D523]-[.D522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B522]+35" office:value-type="float" office:value="18270" calcext:value-type="float">
            <text:p>18270</text:p>
          </table:table-cell>
          <table:table-cell office:value-type="float" office:value="8640000" calcext:value-type="float">
            <text:p>8640000</text:p>
          </table:table-cell>
          <table:table-cell table:formula="of:=[.B523]/[.C523]" office:value-type="float" office:value="0.00211458333333333" calcext:value-type="float">
            <text:p>0,00211458333333333000</text:p>
          </table:table-cell>
          <table:table-cell table:formula="of:=[.D524]-[.D523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B523]+35" office:value-type="float" office:value="18305" calcext:value-type="float">
            <text:p>18305</text:p>
          </table:table-cell>
          <table:table-cell office:value-type="float" office:value="8640000" calcext:value-type="float">
            <text:p>8640000</text:p>
          </table:table-cell>
          <table:table-cell table:formula="of:=[.B524]/[.C524]" office:value-type="float" office:value="0.00211863425925926" calcext:value-type="float">
            <text:p>0,00211863425925926000</text:p>
          </table:table-cell>
          <table:table-cell table:formula="of:=[.D525]-[.D524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B524]+35" office:value-type="float" office:value="18340" calcext:value-type="float">
            <text:p>18340</text:p>
          </table:table-cell>
          <table:table-cell office:value-type="float" office:value="8640000" calcext:value-type="float">
            <text:p>8640000</text:p>
          </table:table-cell>
          <table:table-cell table:formula="of:=[.B525]/[.C525]" office:value-type="float" office:value="0.00212268518518519" calcext:value-type="float">
            <text:p>0,00212268518518519000</text:p>
          </table:table-cell>
          <table:table-cell table:formula="of:=[.D526]-[.D525]" office:value-type="float" office:value="0.00000405092592592558" calcext:value-type="float">
            <text:p>0,0000040509259259255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B525]+35" office:value-type="float" office:value="18375" calcext:value-type="float">
            <text:p>18375</text:p>
          </table:table-cell>
          <table:table-cell office:value-type="float" office:value="8640000" calcext:value-type="float">
            <text:p>8640000</text:p>
          </table:table-cell>
          <table:table-cell table:formula="of:=[.B526]/[.C526]" office:value-type="float" office:value="0.00212673611111111" calcext:value-type="float">
            <text:p>0,00212673611111111000</text:p>
          </table:table-cell>
          <table:table-cell table:formula="of:=[.D527]-[.D526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B526]+35" office:value-type="float" office:value="18410" calcext:value-type="float">
            <text:p>18410</text:p>
          </table:table-cell>
          <table:table-cell office:value-type="float" office:value="8640000" calcext:value-type="float">
            <text:p>8640000</text:p>
          </table:table-cell>
          <table:table-cell table:formula="of:=[.B527]/[.C527]" office:value-type="float" office:value="0.00213078703703704" calcext:value-type="float">
            <text:p>0,00213078703703704000</text:p>
          </table:table-cell>
          <table:table-cell table:formula="of:=[.D528]-[.D527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B527]+35" office:value-type="float" office:value="18445" calcext:value-type="float">
            <text:p>18445</text:p>
          </table:table-cell>
          <table:table-cell office:value-type="float" office:value="8640000" calcext:value-type="float">
            <text:p>8640000</text:p>
          </table:table-cell>
          <table:table-cell table:formula="of:=[.B528]/[.C528]" office:value-type="float" office:value="0.00213483796296296" calcext:value-type="float">
            <text:p>0,00213483796296296000</text:p>
          </table:table-cell>
          <table:table-cell table:formula="of:=[.D529]-[.D528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B528]+35" office:value-type="float" office:value="18480" calcext:value-type="float">
            <text:p>18480</text:p>
          </table:table-cell>
          <table:table-cell office:value-type="float" office:value="8640000" calcext:value-type="float">
            <text:p>8640000</text:p>
          </table:table-cell>
          <table:table-cell table:formula="of:=[.B529]/[.C529]" office:value-type="float" office:value="0.00213888888888889" calcext:value-type="float">
            <text:p>0,00213888888888889000</text:p>
          </table:table-cell>
          <table:table-cell table:formula="of:=[.D530]-[.D529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B529]+35" office:value-type="float" office:value="18515" calcext:value-type="float">
            <text:p>18515</text:p>
          </table:table-cell>
          <table:table-cell office:value-type="float" office:value="8640000" calcext:value-type="float">
            <text:p>8640000</text:p>
          </table:table-cell>
          <table:table-cell table:formula="of:=[.B530]/[.C530]" office:value-type="float" office:value="0.00214293981481482" calcext:value-type="float">
            <text:p>0,00214293981481482000</text:p>
          </table:table-cell>
          <table:table-cell table:formula="of:=[.D531]-[.D530]" office:value-type="float" office:value="0.00000405092592592558" calcext:value-type="float">
            <text:p>0,0000040509259259255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B530]+35" office:value-type="float" office:value="18550" calcext:value-type="float">
            <text:p>18550</text:p>
          </table:table-cell>
          <table:table-cell office:value-type="float" office:value="8640000" calcext:value-type="float">
            <text:p>8640000</text:p>
          </table:table-cell>
          <table:table-cell table:formula="of:=[.B531]/[.C531]" office:value-type="float" office:value="0.00214699074074074" calcext:value-type="float">
            <text:p>0,00214699074074074000</text:p>
          </table:table-cell>
          <table:table-cell table:formula="of:=[.D532]-[.D531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B531]+35" office:value-type="float" office:value="18585" calcext:value-type="float">
            <text:p>18585</text:p>
          </table:table-cell>
          <table:table-cell office:value-type="float" office:value="8640000" calcext:value-type="float">
            <text:p>8640000</text:p>
          </table:table-cell>
          <table:table-cell table:formula="of:=[.B532]/[.C532]" office:value-type="float" office:value="0.00215104166666667" calcext:value-type="float">
            <text:p>0,00215104166666667000</text:p>
          </table:table-cell>
          <table:table-cell table:formula="of:=[.D533]-[.D532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B532]+35" office:value-type="float" office:value="18620" calcext:value-type="float">
            <text:p>18620</text:p>
          </table:table-cell>
          <table:table-cell office:value-type="float" office:value="8640000" calcext:value-type="float">
            <text:p>8640000</text:p>
          </table:table-cell>
          <table:table-cell table:formula="of:=[.B533]/[.C533]" office:value-type="float" office:value="0.00215509259259259" calcext:value-type="float">
            <text:p>0,00215509259259259000</text:p>
          </table:table-cell>
          <table:table-cell table:formula="of:=[.D534]-[.D533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B533]+35" office:value-type="float" office:value="18655" calcext:value-type="float">
            <text:p>18655</text:p>
          </table:table-cell>
          <table:table-cell office:value-type="float" office:value="8640000" calcext:value-type="float">
            <text:p>8640000</text:p>
          </table:table-cell>
          <table:table-cell table:formula="of:=[.B534]/[.C534]" office:value-type="float" office:value="0.00215914351851852" calcext:value-type="float">
            <text:p>0,00215914351851852000</text:p>
          </table:table-cell>
          <table:table-cell table:formula="of:=[.D535]-[.D534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B534]+35" office:value-type="float" office:value="18690" calcext:value-type="float">
            <text:p>18690</text:p>
          </table:table-cell>
          <table:table-cell office:value-type="float" office:value="8640000" calcext:value-type="float">
            <text:p>8640000</text:p>
          </table:table-cell>
          <table:table-cell table:formula="of:=[.B535]/[.C535]" office:value-type="float" office:value="0.00216319444444444" calcext:value-type="float">
            <text:p>0,00216319444444444000</text:p>
          </table:table-cell>
          <table:table-cell table:formula="of:=[.D536]-[.D535]" office:value-type="float" office:value="0.00000405092592592558" calcext:value-type="float">
            <text:p>0,0000040509259259255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B535]+35" office:value-type="float" office:value="18725" calcext:value-type="float">
            <text:p>18725</text:p>
          </table:table-cell>
          <table:table-cell office:value-type="float" office:value="8640000" calcext:value-type="float">
            <text:p>8640000</text:p>
          </table:table-cell>
          <table:table-cell table:formula="of:=[.B536]/[.C536]" office:value-type="float" office:value="0.00216724537037037" calcext:value-type="float">
            <text:p>0,00216724537037037000</text:p>
          </table:table-cell>
          <table:table-cell table:formula="of:=[.D537]-[.D536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B536]+35" office:value-type="float" office:value="18760" calcext:value-type="float">
            <text:p>18760</text:p>
          </table:table-cell>
          <table:table-cell office:value-type="float" office:value="8640000" calcext:value-type="float">
            <text:p>8640000</text:p>
          </table:table-cell>
          <table:table-cell table:formula="of:=[.B537]/[.C537]" office:value-type="float" office:value="0.0021712962962963" calcext:value-type="float">
            <text:p>0,00217129629629630000</text:p>
          </table:table-cell>
          <table:table-cell table:formula="of:=[.D538]-[.D537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B537]+35" office:value-type="float" office:value="18795" calcext:value-type="float">
            <text:p>18795</text:p>
          </table:table-cell>
          <table:table-cell office:value-type="float" office:value="8640000" calcext:value-type="float">
            <text:p>8640000</text:p>
          </table:table-cell>
          <table:table-cell table:formula="of:=[.B538]/[.C538]" office:value-type="float" office:value="0.00217534722222222" calcext:value-type="float">
            <text:p>0,00217534722222222000</text:p>
          </table:table-cell>
          <table:table-cell table:formula="of:=[.D539]-[.D538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B538]+35" office:value-type="float" office:value="18830" calcext:value-type="float">
            <text:p>18830</text:p>
          </table:table-cell>
          <table:table-cell office:value-type="float" office:value="8640000" calcext:value-type="float">
            <text:p>8640000</text:p>
          </table:table-cell>
          <table:table-cell table:formula="of:=[.B539]/[.C539]" office:value-type="float" office:value="0.00217939814814815" calcext:value-type="float">
            <text:p>0,00217939814814815000</text:p>
          </table:table-cell>
          <table:table-cell table:formula="of:=[.D540]-[.D539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B539]+35" office:value-type="float" office:value="18865" calcext:value-type="float">
            <text:p>18865</text:p>
          </table:table-cell>
          <table:table-cell office:value-type="float" office:value="8640000" calcext:value-type="float">
            <text:p>8640000</text:p>
          </table:table-cell>
          <table:table-cell table:formula="of:=[.B540]/[.C540]" office:value-type="float" office:value="0.00218344907407407" calcext:value-type="float">
            <text:p>0,00218344907407407000</text:p>
          </table:table-cell>
          <table:table-cell table:formula="of:=[.D541]-[.D540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B540]+35" office:value-type="float" office:value="18900" calcext:value-type="float">
            <text:p>18900</text:p>
          </table:table-cell>
          <table:table-cell office:value-type="float" office:value="8640000" calcext:value-type="float">
            <text:p>8640000</text:p>
          </table:table-cell>
          <table:table-cell table:formula="of:=[.B541]/[.C541]" office:value-type="float" office:value="0.0021875" calcext:value-type="float">
            <text:p>0,00218750000000000000</text:p>
          </table:table-cell>
          <table:table-cell table:formula="of:=[.D542]-[.D541]" office:value-type="float" office:value="0.00000405092592592558" calcext:value-type="float">
            <text:p>0,0000040509259259255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B541]+35" office:value-type="float" office:value="18935" calcext:value-type="float">
            <text:p>18935</text:p>
          </table:table-cell>
          <table:table-cell office:value-type="float" office:value="8640000" calcext:value-type="float">
            <text:p>8640000</text:p>
          </table:table-cell>
          <table:table-cell table:formula="of:=[.B542]/[.C542]" office:value-type="float" office:value="0.00219155092592593" calcext:value-type="float">
            <text:p>0,00219155092592593000</text:p>
          </table:table-cell>
          <table:table-cell table:formula="of:=[.D543]-[.D542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B542]+35" office:value-type="float" office:value="18970" calcext:value-type="float">
            <text:p>18970</text:p>
          </table:table-cell>
          <table:table-cell office:value-type="float" office:value="8640000" calcext:value-type="float">
            <text:p>8640000</text:p>
          </table:table-cell>
          <table:table-cell table:formula="of:=[.B543]/[.C543]" office:value-type="float" office:value="0.00219560185185185" calcext:value-type="float">
            <text:p>0,00219560185185185000</text:p>
          </table:table-cell>
          <table:table-cell table:formula="of:=[.D544]-[.D543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B543]+35" office:value-type="float" office:value="19005" calcext:value-type="float">
            <text:p>19005</text:p>
          </table:table-cell>
          <table:table-cell office:value-type="float" office:value="8640000" calcext:value-type="float">
            <text:p>8640000</text:p>
          </table:table-cell>
          <table:table-cell table:formula="of:=[.B544]/[.C544]" office:value-type="float" office:value="0.00219965277777778" calcext:value-type="float">
            <text:p>0,00219965277777778000</text:p>
          </table:table-cell>
          <table:table-cell table:formula="of:=[.D545]-[.D544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B544]+35" office:value-type="float" office:value="19040" calcext:value-type="float">
            <text:p>19040</text:p>
          </table:table-cell>
          <table:table-cell office:value-type="float" office:value="8640000" calcext:value-type="float">
            <text:p>8640000</text:p>
          </table:table-cell>
          <table:table-cell table:formula="of:=[.B545]/[.C545]" office:value-type="float" office:value="0.0022037037037037" calcext:value-type="float">
            <text:p>0,00220370370370370000</text:p>
          </table:table-cell>
          <table:table-cell table:formula="of:=[.D546]-[.D545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B545]+35" office:value-type="float" office:value="19075" calcext:value-type="float">
            <text:p>19075</text:p>
          </table:table-cell>
          <table:table-cell office:value-type="float" office:value="8640000" calcext:value-type="float">
            <text:p>8640000</text:p>
          </table:table-cell>
          <table:table-cell table:formula="of:=[.B546]/[.C546]" office:value-type="float" office:value="0.00220775462962963" calcext:value-type="float">
            <text:p>0,00220775462962963000</text:p>
          </table:table-cell>
          <table:table-cell table:formula="of:=[.D547]-[.D546]" office:value-type="float" office:value="0.00000405092592592558" calcext:value-type="float">
            <text:p>0,00000405092592592558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B546]+35" office:value-type="float" office:value="19110" calcext:value-type="float">
            <text:p>19110</text:p>
          </table:table-cell>
          <table:table-cell office:value-type="float" office:value="8640000" calcext:value-type="float">
            <text:p>8640000</text:p>
          </table:table-cell>
          <table:table-cell table:formula="of:=[.B547]/[.C547]" office:value-type="float" office:value="0.00221180555555556" calcext:value-type="float">
            <text:p>0,00221180555555556000</text:p>
          </table:table-cell>
          <table:table-cell table:formula="of:=[.D548]-[.D547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B547]+35" office:value-type="float" office:value="19145" calcext:value-type="float">
            <text:p>19145</text:p>
          </table:table-cell>
          <table:table-cell office:value-type="float" office:value="8640000" calcext:value-type="float">
            <text:p>8640000</text:p>
          </table:table-cell>
          <table:table-cell table:formula="of:=[.B548]/[.C548]" office:value-type="float" office:value="0.00221585648148148" calcext:value-type="float">
            <text:p>0,00221585648148148000</text:p>
          </table:table-cell>
          <table:table-cell table:formula="of:=[.D549]-[.D548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B548]+35" office:value-type="float" office:value="19180" calcext:value-type="float">
            <text:p>19180</text:p>
          </table:table-cell>
          <table:table-cell office:value-type="float" office:value="8640000" calcext:value-type="float">
            <text:p>8640000</text:p>
          </table:table-cell>
          <table:table-cell table:formula="of:=[.B549]/[.C549]" office:value-type="float" office:value="0.00221990740740741" calcext:value-type="float">
            <text:p>0,00221990740740741000</text:p>
          </table:table-cell>
          <table:table-cell table:formula="of:=[.D550]-[.D549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B549]+35" office:value-type="float" office:value="19215" calcext:value-type="float">
            <text:p>19215</text:p>
          </table:table-cell>
          <table:table-cell office:value-type="float" office:value="8640000" calcext:value-type="float">
            <text:p>8640000</text:p>
          </table:table-cell>
          <table:table-cell table:formula="of:=[.B550]/[.C550]" office:value-type="float" office:value="0.00222395833333333" calcext:value-type="float">
            <text:p>0,00222395833333333000</text:p>
          </table:table-cell>
          <table:table-cell table:formula="of:=[.D551]-[.D550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B550]+35" office:value-type="float" office:value="19250" calcext:value-type="float">
            <text:p>19250</text:p>
          </table:table-cell>
          <table:table-cell office:value-type="float" office:value="8640000" calcext:value-type="float">
            <text:p>8640000</text:p>
          </table:table-cell>
          <table:table-cell table:formula="of:=[.B551]/[.C551]" office:value-type="float" office:value="0.00222800925925926" calcext:value-type="float">
            <text:p>0,00222800925925926000</text:p>
          </table:table-cell>
          <table:table-cell table:formula="of:=[.D552]-[.D551]" office:value-type="float" office:value="0.00000405092592592558" calcext:value-type="float">
            <text:p>0,0000040509259259255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B551]+35" office:value-type="float" office:value="19285" calcext:value-type="float">
            <text:p>19285</text:p>
          </table:table-cell>
          <table:table-cell office:value-type="float" office:value="8640000" calcext:value-type="float">
            <text:p>8640000</text:p>
          </table:table-cell>
          <table:table-cell table:formula="of:=[.B552]/[.C552]" office:value-type="float" office:value="0.00223206018518519" calcext:value-type="float">
            <text:p>0,00223206018518519000</text:p>
          </table:table-cell>
          <table:table-cell table:formula="of:=[.D553]-[.D552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B552]+35" office:value-type="float" office:value="19320" calcext:value-type="float">
            <text:p>19320</text:p>
          </table:table-cell>
          <table:table-cell office:value-type="float" office:value="8640000" calcext:value-type="float">
            <text:p>8640000</text:p>
          </table:table-cell>
          <table:table-cell table:formula="of:=[.B553]/[.C553]" office:value-type="float" office:value="0.00223611111111111" calcext:value-type="float">
            <text:p>0,00223611111111111000</text:p>
          </table:table-cell>
          <table:table-cell table:formula="of:=[.D554]-[.D553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B553]+35" office:value-type="float" office:value="19355" calcext:value-type="float">
            <text:p>19355</text:p>
          </table:table-cell>
          <table:table-cell office:value-type="float" office:value="8640000" calcext:value-type="float">
            <text:p>8640000</text:p>
          </table:table-cell>
          <table:table-cell table:formula="of:=[.B554]/[.C554]" office:value-type="float" office:value="0.00224016203703704" calcext:value-type="float">
            <text:p>0,00224016203703704000</text:p>
          </table:table-cell>
          <table:table-cell table:formula="of:=[.D555]-[.D554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B554]+35" office:value-type="float" office:value="19390" calcext:value-type="float">
            <text:p>19390</text:p>
          </table:table-cell>
          <table:table-cell office:value-type="float" office:value="8640000" calcext:value-type="float">
            <text:p>8640000</text:p>
          </table:table-cell>
          <table:table-cell table:formula="of:=[.B555]/[.C555]" office:value-type="float" office:value="0.00224421296296296" calcext:value-type="float">
            <text:p>0,00224421296296296000</text:p>
          </table:table-cell>
          <table:table-cell table:formula="of:=[.D556]-[.D555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B555]+35" office:value-type="float" office:value="19425" calcext:value-type="float">
            <text:p>19425</text:p>
          </table:table-cell>
          <table:table-cell office:value-type="float" office:value="8640000" calcext:value-type="float">
            <text:p>8640000</text:p>
          </table:table-cell>
          <table:table-cell table:formula="of:=[.B556]/[.C556]" office:value-type="float" office:value="0.00224826388888889" calcext:value-type="float">
            <text:p>0,00224826388888889000</text:p>
          </table:table-cell>
          <table:table-cell table:formula="of:=[.D557]-[.D556]" office:value-type="float" office:value="0.00000405092592592558" calcext:value-type="float">
            <text:p>0,0000040509259259255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B556]+35" office:value-type="float" office:value="19460" calcext:value-type="float">
            <text:p>19460</text:p>
          </table:table-cell>
          <table:table-cell office:value-type="float" office:value="8640000" calcext:value-type="float">
            <text:p>8640000</text:p>
          </table:table-cell>
          <table:table-cell table:formula="of:=[.B557]/[.C557]" office:value-type="float" office:value="0.00225231481481481" calcext:value-type="float">
            <text:p>0,00225231481481481000</text:p>
          </table:table-cell>
          <table:table-cell table:formula="of:=[.D558]-[.D557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B557]+35" office:value-type="float" office:value="19495" calcext:value-type="float">
            <text:p>19495</text:p>
          </table:table-cell>
          <table:table-cell office:value-type="float" office:value="8640000" calcext:value-type="float">
            <text:p>8640000</text:p>
          </table:table-cell>
          <table:table-cell table:formula="of:=[.B558]/[.C558]" office:value-type="float" office:value="0.00225636574074074" calcext:value-type="float">
            <text:p>0,00225636574074074000</text:p>
          </table:table-cell>
          <table:table-cell table:formula="of:=[.D559]-[.D558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B558]+35" office:value-type="float" office:value="19530" calcext:value-type="float">
            <text:p>19530</text:p>
          </table:table-cell>
          <table:table-cell office:value-type="float" office:value="8640000" calcext:value-type="float">
            <text:p>8640000</text:p>
          </table:table-cell>
          <table:table-cell table:formula="of:=[.B559]/[.C559]" office:value-type="float" office:value="0.00226041666666667" calcext:value-type="float">
            <text:p>0,00226041666666667000</text:p>
          </table:table-cell>
          <table:table-cell table:formula="of:=[.D560]-[.D559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B559]+35" office:value-type="float" office:value="19565" calcext:value-type="float">
            <text:p>19565</text:p>
          </table:table-cell>
          <table:table-cell office:value-type="float" office:value="8640000" calcext:value-type="float">
            <text:p>8640000</text:p>
          </table:table-cell>
          <table:table-cell table:formula="of:=[.B560]/[.C560]" office:value-type="float" office:value="0.00226446759259259" calcext:value-type="float">
            <text:p>0,00226446759259259000</text:p>
          </table:table-cell>
          <table:table-cell table:formula="of:=[.D561]-[.D560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B560]+35" office:value-type="float" office:value="19600" calcext:value-type="float">
            <text:p>19600</text:p>
          </table:table-cell>
          <table:table-cell office:value-type="float" office:value="8640000" calcext:value-type="float">
            <text:p>8640000</text:p>
          </table:table-cell>
          <table:table-cell table:formula="of:=[.B561]/[.C561]" office:value-type="float" office:value="0.00226851851851852" calcext:value-type="float">
            <text:p>0,00226851851851852000</text:p>
          </table:table-cell>
          <table:table-cell table:formula="of:=[.D562]-[.D561]" office:value-type="float" office:value="0.00000405092592592558" calcext:value-type="float">
            <text:p>0,0000040509259259255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B561]+35" office:value-type="float" office:value="19635" calcext:value-type="float">
            <text:p>19635</text:p>
          </table:table-cell>
          <table:table-cell office:value-type="float" office:value="8640000" calcext:value-type="float">
            <text:p>8640000</text:p>
          </table:table-cell>
          <table:table-cell table:formula="of:=[.B562]/[.C562]" office:value-type="float" office:value="0.00227256944444444" calcext:value-type="float">
            <text:p>0,00227256944444444000</text:p>
          </table:table-cell>
          <table:table-cell table:formula="of:=[.D563]-[.D562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B562]+35" office:value-type="float" office:value="19670" calcext:value-type="float">
            <text:p>19670</text:p>
          </table:table-cell>
          <table:table-cell office:value-type="float" office:value="8640000" calcext:value-type="float">
            <text:p>8640000</text:p>
          </table:table-cell>
          <table:table-cell table:formula="of:=[.B563]/[.C563]" office:value-type="float" office:value="0.00227662037037037" calcext:value-type="float">
            <text:p>0,00227662037037037000</text:p>
          </table:table-cell>
          <table:table-cell table:formula="of:=[.D564]-[.D563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B563]+35" office:value-type="float" office:value="19705" calcext:value-type="float">
            <text:p>19705</text:p>
          </table:table-cell>
          <table:table-cell office:value-type="float" office:value="8640000" calcext:value-type="float">
            <text:p>8640000</text:p>
          </table:table-cell>
          <table:table-cell table:formula="of:=[.B564]/[.C564]" office:value-type="float" office:value="0.0022806712962963" calcext:value-type="float">
            <text:p>0,00228067129629630000</text:p>
          </table:table-cell>
          <table:table-cell table:formula="of:=[.D565]-[.D564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B564]+35" office:value-type="float" office:value="19740" calcext:value-type="float">
            <text:p>19740</text:p>
          </table:table-cell>
          <table:table-cell office:value-type="float" office:value="8640000" calcext:value-type="float">
            <text:p>8640000</text:p>
          </table:table-cell>
          <table:table-cell table:formula="of:=[.B565]/[.C565]" office:value-type="float" office:value="0.00228472222222222" calcext:value-type="float">
            <text:p>0,00228472222222222000</text:p>
          </table:table-cell>
          <table:table-cell table:formula="of:=[.D566]-[.D565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B565]+35" office:value-type="float" office:value="19775" calcext:value-type="float">
            <text:p>19775</text:p>
          </table:table-cell>
          <table:table-cell office:value-type="float" office:value="8640000" calcext:value-type="float">
            <text:p>8640000</text:p>
          </table:table-cell>
          <table:table-cell table:formula="of:=[.B566]/[.C566]" office:value-type="float" office:value="0.00228877314814815" calcext:value-type="float">
            <text:p>0,00228877314814815000</text:p>
          </table:table-cell>
          <table:table-cell table:formula="of:=[.D567]-[.D566]" office:value-type="float" office:value="0.00000405092592592558" calcext:value-type="float">
            <text:p>0,0000040509259259255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B566]+35" office:value-type="float" office:value="19810" calcext:value-type="float">
            <text:p>19810</text:p>
          </table:table-cell>
          <table:table-cell office:value-type="float" office:value="8640000" calcext:value-type="float">
            <text:p>8640000</text:p>
          </table:table-cell>
          <table:table-cell table:formula="of:=[.B567]/[.C567]" office:value-type="float" office:value="0.00229282407407407" calcext:value-type="float">
            <text:p>0,00229282407407407000</text:p>
          </table:table-cell>
          <table:table-cell table:formula="of:=[.D568]-[.D567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B567]+35" office:value-type="float" office:value="19845" calcext:value-type="float">
            <text:p>19845</text:p>
          </table:table-cell>
          <table:table-cell office:value-type="float" office:value="8640000" calcext:value-type="float">
            <text:p>8640000</text:p>
          </table:table-cell>
          <table:table-cell table:formula="of:=[.B568]/[.C568]" office:value-type="float" office:value="0.002296875" calcext:value-type="float">
            <text:p>0,00229687500000000000</text:p>
          </table:table-cell>
          <table:table-cell table:formula="of:=[.D569]-[.D568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B568]+35" office:value-type="float" office:value="19880" calcext:value-type="float">
            <text:p>19880</text:p>
          </table:table-cell>
          <table:table-cell office:value-type="float" office:value="8640000" calcext:value-type="float">
            <text:p>8640000</text:p>
          </table:table-cell>
          <table:table-cell table:formula="of:=[.B569]/[.C569]" office:value-type="float" office:value="0.00230092592592593" calcext:value-type="float">
            <text:p>0,00230092592592593000</text:p>
          </table:table-cell>
          <table:table-cell table:formula="of:=[.D570]-[.D569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B569]+35" office:value-type="float" office:value="19915" calcext:value-type="float">
            <text:p>19915</text:p>
          </table:table-cell>
          <table:table-cell office:value-type="float" office:value="8640000" calcext:value-type="float">
            <text:p>8640000</text:p>
          </table:table-cell>
          <table:table-cell table:formula="of:=[.B570]/[.C570]" office:value-type="float" office:value="0.00230497685185185" calcext:value-type="float">
            <text:p>0,00230497685185185000</text:p>
          </table:table-cell>
          <table:table-cell table:formula="of:=[.D571]-[.D570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B570]+35" office:value-type="float" office:value="19950" calcext:value-type="float">
            <text:p>19950</text:p>
          </table:table-cell>
          <table:table-cell office:value-type="float" office:value="8640000" calcext:value-type="float">
            <text:p>8640000</text:p>
          </table:table-cell>
          <table:table-cell table:formula="of:=[.B571]/[.C571]" office:value-type="float" office:value="0.00230902777777778" calcext:value-type="float">
            <text:p>0,00230902777777778000</text:p>
          </table:table-cell>
          <table:table-cell table:formula="of:=[.D572]-[.D571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B571]+35" office:value-type="float" office:value="19985" calcext:value-type="float">
            <text:p>19985</text:p>
          </table:table-cell>
          <table:table-cell office:value-type="float" office:value="8640000" calcext:value-type="float">
            <text:p>8640000</text:p>
          </table:table-cell>
          <table:table-cell table:formula="of:=[.B572]/[.C572]" office:value-type="float" office:value="0.0023130787037037" calcext:value-type="float">
            <text:p>0,00231307870370370000</text:p>
          </table:table-cell>
          <table:table-cell table:formula="of:=[.D573]-[.D572]" office:value-type="float" office:value="0.00000405092592592558" calcext:value-type="float">
            <text:p>0,0000040509259259255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B572]+35" office:value-type="float" office:value="20020" calcext:value-type="float">
            <text:p>20020</text:p>
          </table:table-cell>
          <table:table-cell office:value-type="float" office:value="8640000" calcext:value-type="float">
            <text:p>8640000</text:p>
          </table:table-cell>
          <table:table-cell table:formula="of:=[.B573]/[.C573]" office:value-type="float" office:value="0.00231712962962963" calcext:value-type="float">
            <text:p>0,00231712962962963000</text:p>
          </table:table-cell>
          <table:table-cell table:formula="of:=[.D574]-[.D573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B573]+35" office:value-type="float" office:value="20055" calcext:value-type="float">
            <text:p>20055</text:p>
          </table:table-cell>
          <table:table-cell office:value-type="float" office:value="8640000" calcext:value-type="float">
            <text:p>8640000</text:p>
          </table:table-cell>
          <table:table-cell table:formula="of:=[.B574]/[.C574]" office:value-type="float" office:value="0.00232118055555556" calcext:value-type="float">
            <text:p>0,00232118055555556000</text:p>
          </table:table-cell>
          <table:table-cell table:formula="of:=[.D575]-[.D574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B574]+35" office:value-type="float" office:value="20090" calcext:value-type="float">
            <text:p>20090</text:p>
          </table:table-cell>
          <table:table-cell office:value-type="float" office:value="8640000" calcext:value-type="float">
            <text:p>8640000</text:p>
          </table:table-cell>
          <table:table-cell table:formula="of:=[.B575]/[.C575]" office:value-type="float" office:value="0.00232523148148148" calcext:value-type="float">
            <text:p>0,00232523148148148000</text:p>
          </table:table-cell>
          <table:table-cell table:formula="of:=[.D576]-[.D575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B575]+35" office:value-type="float" office:value="20125" calcext:value-type="float">
            <text:p>20125</text:p>
          </table:table-cell>
          <table:table-cell office:value-type="float" office:value="8640000" calcext:value-type="float">
            <text:p>8640000</text:p>
          </table:table-cell>
          <table:table-cell table:formula="of:=[.B576]/[.C576]" office:value-type="float" office:value="0.00232928240740741" calcext:value-type="float">
            <text:p>0,00232928240740741000</text:p>
          </table:table-cell>
          <table:table-cell table:formula="of:=[.D577]-[.D576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B576]+35" office:value-type="float" office:value="20160" calcext:value-type="float">
            <text:p>20160</text:p>
          </table:table-cell>
          <table:table-cell office:value-type="float" office:value="8640000" calcext:value-type="float">
            <text:p>8640000</text:p>
          </table:table-cell>
          <table:table-cell table:formula="of:=[.B577]/[.C577]" office:value-type="float" office:value="0.00233333333333333" calcext:value-type="float">
            <text:p>0,00233333333333333000</text:p>
          </table:table-cell>
          <table:table-cell table:formula="of:=[.D578]-[.D577]" office:value-type="float" office:value="0.00000405092592592558" calcext:value-type="float">
            <text:p>0,0000040509259259255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B577]+35" office:value-type="float" office:value="20195" calcext:value-type="float">
            <text:p>20195</text:p>
          </table:table-cell>
          <table:table-cell office:value-type="float" office:value="8640000" calcext:value-type="float">
            <text:p>8640000</text:p>
          </table:table-cell>
          <table:table-cell table:formula="of:=[.B578]/[.C578]" office:value-type="float" office:value="0.00233738425925926" calcext:value-type="float">
            <text:p>0,00233738425925926000</text:p>
          </table:table-cell>
          <table:table-cell table:formula="of:=[.D579]-[.D578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B578]+35" office:value-type="float" office:value="20230" calcext:value-type="float">
            <text:p>20230</text:p>
          </table:table-cell>
          <table:table-cell office:value-type="float" office:value="8640000" calcext:value-type="float">
            <text:p>8640000</text:p>
          </table:table-cell>
          <table:table-cell table:formula="of:=[.B579]/[.C579]" office:value-type="float" office:value="0.00234143518518519" calcext:value-type="float">
            <text:p>0,00234143518518519000</text:p>
          </table:table-cell>
          <table:table-cell table:formula="of:=[.D580]-[.D579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B579]+35" office:value-type="float" office:value="20265" calcext:value-type="float">
            <text:p>20265</text:p>
          </table:table-cell>
          <table:table-cell office:value-type="float" office:value="8640000" calcext:value-type="float">
            <text:p>8640000</text:p>
          </table:table-cell>
          <table:table-cell table:formula="of:=[.B580]/[.C580]" office:value-type="float" office:value="0.00234548611111111" calcext:value-type="float">
            <text:p>0,00234548611111111000</text:p>
          </table:table-cell>
          <table:table-cell table:formula="of:=[.D581]-[.D580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B580]+35" office:value-type="float" office:value="20300" calcext:value-type="float">
            <text:p>20300</text:p>
          </table:table-cell>
          <table:table-cell office:value-type="float" office:value="8640000" calcext:value-type="float">
            <text:p>8640000</text:p>
          </table:table-cell>
          <table:table-cell table:formula="of:=[.B581]/[.C581]" office:value-type="float" office:value="0.00234953703703704" calcext:value-type="float">
            <text:p>0,00234953703703704000</text:p>
          </table:table-cell>
          <table:table-cell table:formula="of:=[.D582]-[.D581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B581]+35" office:value-type="float" office:value="20335" calcext:value-type="float">
            <text:p>20335</text:p>
          </table:table-cell>
          <table:table-cell office:value-type="float" office:value="8640000" calcext:value-type="float">
            <text:p>8640000</text:p>
          </table:table-cell>
          <table:table-cell table:formula="of:=[.B582]/[.C582]" office:value-type="float" office:value="0.00235358796296296" calcext:value-type="float">
            <text:p>0,00235358796296296000</text:p>
          </table:table-cell>
          <table:table-cell table:formula="of:=[.D583]-[.D582]" office:value-type="float" office:value="0.00000405092592592558" calcext:value-type="float">
            <text:p>0,0000040509259259255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B582]+35" office:value-type="float" office:value="20370" calcext:value-type="float">
            <text:p>20370</text:p>
          </table:table-cell>
          <table:table-cell office:value-type="float" office:value="8640000" calcext:value-type="float">
            <text:p>8640000</text:p>
          </table:table-cell>
          <table:table-cell table:formula="of:=[.B583]/[.C583]" office:value-type="float" office:value="0.00235763888888889" calcext:value-type="float">
            <text:p>0,00235763888888889000</text:p>
          </table:table-cell>
          <table:table-cell table:formula="of:=[.D584]-[.D583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B583]+35" office:value-type="float" office:value="20405" calcext:value-type="float">
            <text:p>20405</text:p>
          </table:table-cell>
          <table:table-cell office:value-type="float" office:value="8640000" calcext:value-type="float">
            <text:p>8640000</text:p>
          </table:table-cell>
          <table:table-cell table:formula="of:=[.B584]/[.C584]" office:value-type="float" office:value="0.00236168981481481" calcext:value-type="float">
            <text:p>0,00236168981481481000</text:p>
          </table:table-cell>
          <table:table-cell table:formula="of:=[.D585]-[.D584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B584]+35" office:value-type="float" office:value="20440" calcext:value-type="float">
            <text:p>20440</text:p>
          </table:table-cell>
          <table:table-cell office:value-type="float" office:value="8640000" calcext:value-type="float">
            <text:p>8640000</text:p>
          </table:table-cell>
          <table:table-cell table:formula="of:=[.B585]/[.C585]" office:value-type="float" office:value="0.00236574074074074" calcext:value-type="float">
            <text:p>0,00236574074074074000</text:p>
          </table:table-cell>
          <table:table-cell table:formula="of:=[.D586]-[.D585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B585]+35" office:value-type="float" office:value="20475" calcext:value-type="float">
            <text:p>20475</text:p>
          </table:table-cell>
          <table:table-cell office:value-type="float" office:value="8640000" calcext:value-type="float">
            <text:p>8640000</text:p>
          </table:table-cell>
          <table:table-cell table:formula="of:=[.B586]/[.C586]" office:value-type="float" office:value="0.00236979166666667" calcext:value-type="float">
            <text:p>0,00236979166666667000</text:p>
          </table:table-cell>
          <table:table-cell table:formula="of:=[.D587]-[.D586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B586]+35" office:value-type="float" office:value="20510" calcext:value-type="float">
            <text:p>20510</text:p>
          </table:table-cell>
          <table:table-cell office:value-type="float" office:value="8640000" calcext:value-type="float">
            <text:p>8640000</text:p>
          </table:table-cell>
          <table:table-cell table:formula="of:=[.B587]/[.C587]" office:value-type="float" office:value="0.00237384259259259" calcext:value-type="float">
            <text:p>0,00237384259259259000</text:p>
          </table:table-cell>
          <table:table-cell table:formula="of:=[.D588]-[.D587]" office:value-type="float" office:value="0.00000405092592592558" calcext:value-type="float">
            <text:p>0,0000040509259259255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B587]+35" office:value-type="float" office:value="20545" calcext:value-type="float">
            <text:p>20545</text:p>
          </table:table-cell>
          <table:table-cell office:value-type="float" office:value="8640000" calcext:value-type="float">
            <text:p>8640000</text:p>
          </table:table-cell>
          <table:table-cell table:formula="of:=[.B588]/[.C588]" office:value-type="float" office:value="0.00237789351851852" calcext:value-type="float">
            <text:p>0,00237789351851852000</text:p>
          </table:table-cell>
          <table:table-cell table:formula="of:=[.D589]-[.D588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B588]+35" office:value-type="float" office:value="20580" calcext:value-type="float">
            <text:p>20580</text:p>
          </table:table-cell>
          <table:table-cell office:value-type="float" office:value="8640000" calcext:value-type="float">
            <text:p>8640000</text:p>
          </table:table-cell>
          <table:table-cell table:formula="of:=[.B589]/[.C589]" office:value-type="float" office:value="0.00238194444444444" calcext:value-type="float">
            <text:p>0,00238194444444444000</text:p>
          </table:table-cell>
          <table:table-cell table:formula="of:=[.D590]-[.D589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B589]+35" office:value-type="float" office:value="20615" calcext:value-type="float">
            <text:p>20615</text:p>
          </table:table-cell>
          <table:table-cell office:value-type="float" office:value="8640000" calcext:value-type="float">
            <text:p>8640000</text:p>
          </table:table-cell>
          <table:table-cell table:formula="of:=[.B590]/[.C590]" office:value-type="float" office:value="0.00238599537037037" calcext:value-type="float">
            <text:p>0,00238599537037037000</text:p>
          </table:table-cell>
          <table:table-cell table:formula="of:=[.D591]-[.D590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B590]+35" office:value-type="float" office:value="20650" calcext:value-type="float">
            <text:p>20650</text:p>
          </table:table-cell>
          <table:table-cell office:value-type="float" office:value="8640000" calcext:value-type="float">
            <text:p>8640000</text:p>
          </table:table-cell>
          <table:table-cell table:formula="of:=[.B591]/[.C591]" office:value-type="float" office:value="0.0023900462962963" calcext:value-type="float">
            <text:p>0,00239004629629630000</text:p>
          </table:table-cell>
          <table:table-cell table:formula="of:=[.D592]-[.D591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B591]+35" office:value-type="float" office:value="20685" calcext:value-type="float">
            <text:p>20685</text:p>
          </table:table-cell>
          <table:table-cell office:value-type="float" office:value="8640000" calcext:value-type="float">
            <text:p>8640000</text:p>
          </table:table-cell>
          <table:table-cell table:formula="of:=[.B592]/[.C592]" office:value-type="float" office:value="0.00239409722222222" calcext:value-type="float">
            <text:p>0,00239409722222222000</text:p>
          </table:table-cell>
          <table:table-cell table:formula="of:=[.D593]-[.D592]" office:value-type="float" office:value="0.00000405092592592558" calcext:value-type="float">
            <text:p>0,0000040509259259255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B592]+35" office:value-type="float" office:value="20720" calcext:value-type="float">
            <text:p>20720</text:p>
          </table:table-cell>
          <table:table-cell office:value-type="float" office:value="8640000" calcext:value-type="float">
            <text:p>8640000</text:p>
          </table:table-cell>
          <table:table-cell table:formula="of:=[.B593]/[.C593]" office:value-type="float" office:value="0.00239814814814815" calcext:value-type="float">
            <text:p>0,00239814814814815000</text:p>
          </table:table-cell>
          <table:table-cell table:formula="of:=[.D594]-[.D593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B593]+35" office:value-type="float" office:value="20755" calcext:value-type="float">
            <text:p>20755</text:p>
          </table:table-cell>
          <table:table-cell office:value-type="float" office:value="8640000" calcext:value-type="float">
            <text:p>8640000</text:p>
          </table:table-cell>
          <table:table-cell table:formula="of:=[.B594]/[.C594]" office:value-type="float" office:value="0.00240219907407407" calcext:value-type="float">
            <text:p>0,00240219907407407000</text:p>
          </table:table-cell>
          <table:table-cell table:formula="of:=[.D595]-[.D594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B594]+35" office:value-type="float" office:value="20790" calcext:value-type="float">
            <text:p>20790</text:p>
          </table:table-cell>
          <table:table-cell office:value-type="float" office:value="8640000" calcext:value-type="float">
            <text:p>8640000</text:p>
          </table:table-cell>
          <table:table-cell table:formula="of:=[.B595]/[.C595]" office:value-type="float" office:value="0.00240625" calcext:value-type="float">
            <text:p>0,00240625000000000000</text:p>
          </table:table-cell>
          <table:table-cell table:formula="of:=[.D596]-[.D595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B595]+35" office:value-type="float" office:value="20825" calcext:value-type="float">
            <text:p>20825</text:p>
          </table:table-cell>
          <table:table-cell office:value-type="float" office:value="8640000" calcext:value-type="float">
            <text:p>8640000</text:p>
          </table:table-cell>
          <table:table-cell table:formula="of:=[.B596]/[.C596]" office:value-type="float" office:value="0.00241030092592593" calcext:value-type="float">
            <text:p>0,00241030092592593000</text:p>
          </table:table-cell>
          <table:table-cell table:formula="of:=[.D597]-[.D596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B596]+35" office:value-type="float" office:value="20860" calcext:value-type="float">
            <text:p>20860</text:p>
          </table:table-cell>
          <table:table-cell office:value-type="float" office:value="8640000" calcext:value-type="float">
            <text:p>8640000</text:p>
          </table:table-cell>
          <table:table-cell table:formula="of:=[.B597]/[.C597]" office:value-type="float" office:value="0.00241435185185185" calcext:value-type="float">
            <text:p>0,00241435185185185000</text:p>
          </table:table-cell>
          <table:table-cell table:formula="of:=[.D598]-[.D597]" office:value-type="float" office:value="0.00000405092592592558" calcext:value-type="float">
            <text:p>0,0000040509259259255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B597]+35" office:value-type="float" office:value="20895" calcext:value-type="float">
            <text:p>20895</text:p>
          </table:table-cell>
          <table:table-cell office:value-type="float" office:value="8640000" calcext:value-type="float">
            <text:p>8640000</text:p>
          </table:table-cell>
          <table:table-cell table:formula="of:=[.B598]/[.C598]" office:value-type="float" office:value="0.00241840277777778" calcext:value-type="float">
            <text:p>0,00241840277777778000</text:p>
          </table:table-cell>
          <table:table-cell table:formula="of:=[.D599]-[.D598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B598]+35" office:value-type="float" office:value="20930" calcext:value-type="float">
            <text:p>20930</text:p>
          </table:table-cell>
          <table:table-cell office:value-type="float" office:value="8640000" calcext:value-type="float">
            <text:p>8640000</text:p>
          </table:table-cell>
          <table:table-cell table:formula="of:=[.B599]/[.C599]" office:value-type="float" office:value="0.0024224537037037" calcext:value-type="float">
            <text:p>0,00242245370370370000</text:p>
          </table:table-cell>
          <table:table-cell table:formula="of:=[.D600]-[.D599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B599]+35" office:value-type="float" office:value="20965" calcext:value-type="float">
            <text:p>20965</text:p>
          </table:table-cell>
          <table:table-cell office:value-type="float" office:value="8640000" calcext:value-type="float">
            <text:p>8640000</text:p>
          </table:table-cell>
          <table:table-cell table:formula="of:=[.B600]/[.C600]" office:value-type="float" office:value="0.00242650462962963" calcext:value-type="float">
            <text:p>0,00242650462962963000</text:p>
          </table:table-cell>
          <table:table-cell table:formula="of:=[.D601]-[.D600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B600]+35" office:value-type="float" office:value="21000" calcext:value-type="float">
            <text:p>21000</text:p>
          </table:table-cell>
          <table:table-cell office:value-type="float" office:value="8640000" calcext:value-type="float">
            <text:p>8640000</text:p>
          </table:table-cell>
          <table:table-cell table:formula="of:=[.B601]/[.C601]" office:value-type="float" office:value="0.00243055555555556" calcext:value-type="float">
            <text:p>0,00243055555555556000</text:p>
          </table:table-cell>
          <table:table-cell table:formula="of:=[.D602]-[.D601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B601]+35" office:value-type="float" office:value="21035" calcext:value-type="float">
            <text:p>21035</text:p>
          </table:table-cell>
          <table:table-cell office:value-type="float" office:value="8640000" calcext:value-type="float">
            <text:p>8640000</text:p>
          </table:table-cell>
          <table:table-cell table:formula="of:=[.B602]/[.C602]" office:value-type="float" office:value="0.00243460648148148" calcext:value-type="float">
            <text:p>0,00243460648148148000</text:p>
          </table:table-cell>
          <table:table-cell table:formula="of:=[.D603]-[.D602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B602]+35" office:value-type="float" office:value="21070" calcext:value-type="float">
            <text:p>21070</text:p>
          </table:table-cell>
          <table:table-cell office:value-type="float" office:value="8640000" calcext:value-type="float">
            <text:p>8640000</text:p>
          </table:table-cell>
          <table:table-cell table:formula="of:=[.B603]/[.C603]" office:value-type="float" office:value="0.00243865740740741" calcext:value-type="float">
            <text:p>0,00243865740740741000</text:p>
          </table:table-cell>
          <table:table-cell table:formula="of:=[.D604]-[.D603]" office:value-type="float" office:value="0.00000405092592592558" calcext:value-type="float">
            <text:p>0,0000040509259259255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B603]+35" office:value-type="float" office:value="21105" calcext:value-type="float">
            <text:p>21105</text:p>
          </table:table-cell>
          <table:table-cell office:value-type="float" office:value="8640000" calcext:value-type="float">
            <text:p>8640000</text:p>
          </table:table-cell>
          <table:table-cell table:formula="of:=[.B604]/[.C604]" office:value-type="float" office:value="0.00244270833333333" calcext:value-type="float">
            <text:p>0,00244270833333333000</text:p>
          </table:table-cell>
          <table:table-cell table:formula="of:=[.D605]-[.D604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B604]+35" office:value-type="float" office:value="21140" calcext:value-type="float">
            <text:p>21140</text:p>
          </table:table-cell>
          <table:table-cell office:value-type="float" office:value="8640000" calcext:value-type="float">
            <text:p>8640000</text:p>
          </table:table-cell>
          <table:table-cell table:formula="of:=[.B605]/[.C605]" office:value-type="float" office:value="0.00244675925925926" calcext:value-type="float">
            <text:p>0,00244675925925926000</text:p>
          </table:table-cell>
          <table:table-cell table:formula="of:=[.D606]-[.D605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B605]+35" office:value-type="float" office:value="21175" calcext:value-type="float">
            <text:p>21175</text:p>
          </table:table-cell>
          <table:table-cell office:value-type="float" office:value="8640000" calcext:value-type="float">
            <text:p>8640000</text:p>
          </table:table-cell>
          <table:table-cell table:formula="of:=[.B606]/[.C606]" office:value-type="float" office:value="0.00245081018518519" calcext:value-type="float">
            <text:p>0,00245081018518519000</text:p>
          </table:table-cell>
          <table:table-cell table:formula="of:=[.D607]-[.D606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B606]+35" office:value-type="float" office:value="21210" calcext:value-type="float">
            <text:p>21210</text:p>
          </table:table-cell>
          <table:table-cell office:value-type="float" office:value="8640000" calcext:value-type="float">
            <text:p>8640000</text:p>
          </table:table-cell>
          <table:table-cell table:formula="of:=[.B607]/[.C607]" office:value-type="float" office:value="0.00245486111111111" calcext:value-type="float">
            <text:p>0,00245486111111111000</text:p>
          </table:table-cell>
          <table:table-cell table:formula="of:=[.D608]-[.D607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B607]+35" office:value-type="float" office:value="21245" calcext:value-type="float">
            <text:p>21245</text:p>
          </table:table-cell>
          <table:table-cell office:value-type="float" office:value="8640000" calcext:value-type="float">
            <text:p>8640000</text:p>
          </table:table-cell>
          <table:table-cell table:formula="of:=[.B608]/[.C608]" office:value-type="float" office:value="0.00245891203703704" calcext:value-type="float">
            <text:p>0,00245891203703704000</text:p>
          </table:table-cell>
          <table:table-cell table:formula="of:=[.D609]-[.D608]" office:value-type="float" office:value="0.00000405092592592558" calcext:value-type="float">
            <text:p>0,0000040509259259255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B608]+35" office:value-type="float" office:value="21280" calcext:value-type="float">
            <text:p>21280</text:p>
          </table:table-cell>
          <table:table-cell office:value-type="float" office:value="8640000" calcext:value-type="float">
            <text:p>8640000</text:p>
          </table:table-cell>
          <table:table-cell table:formula="of:=[.B609]/[.C609]" office:value-type="float" office:value="0.00246296296296296" calcext:value-type="float">
            <text:p>0,00246296296296296000</text:p>
          </table:table-cell>
          <table:table-cell table:formula="of:=[.D610]-[.D609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B609]+35" office:value-type="float" office:value="21315" calcext:value-type="float">
            <text:p>21315</text:p>
          </table:table-cell>
          <table:table-cell office:value-type="float" office:value="8640000" calcext:value-type="float">
            <text:p>8640000</text:p>
          </table:table-cell>
          <table:table-cell table:formula="of:=[.B610]/[.C610]" office:value-type="float" office:value="0.00246701388888889" calcext:value-type="float">
            <text:p>0,00246701388888889000</text:p>
          </table:table-cell>
          <table:table-cell table:formula="of:=[.D611]-[.D610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B610]+35" office:value-type="float" office:value="21350" calcext:value-type="float">
            <text:p>21350</text:p>
          </table:table-cell>
          <table:table-cell office:value-type="float" office:value="8640000" calcext:value-type="float">
            <text:p>8640000</text:p>
          </table:table-cell>
          <table:table-cell table:formula="of:=[.B611]/[.C611]" office:value-type="float" office:value="0.00247106481481482" calcext:value-type="float">
            <text:p>0,00247106481481482000</text:p>
          </table:table-cell>
          <table:table-cell table:formula="of:=[.D612]-[.D611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B611]+35" office:value-type="float" office:value="21385" calcext:value-type="float">
            <text:p>21385</text:p>
          </table:table-cell>
          <table:table-cell office:value-type="float" office:value="8640000" calcext:value-type="float">
            <text:p>8640000</text:p>
          </table:table-cell>
          <table:table-cell table:formula="of:=[.B612]/[.C612]" office:value-type="float" office:value="0.00247511574074074" calcext:value-type="float">
            <text:p>0,00247511574074074000</text:p>
          </table:table-cell>
          <table:table-cell table:formula="of:=[.D613]-[.D612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B612]+35" office:value-type="float" office:value="21420" calcext:value-type="float">
            <text:p>21420</text:p>
          </table:table-cell>
          <table:table-cell office:value-type="float" office:value="8640000" calcext:value-type="float">
            <text:p>8640000</text:p>
          </table:table-cell>
          <table:table-cell table:formula="of:=[.B613]/[.C613]" office:value-type="float" office:value="0.00247916666666667" calcext:value-type="float">
            <text:p>0,00247916666666667000</text:p>
          </table:table-cell>
          <table:table-cell table:formula="of:=[.D614]-[.D613]" office:value-type="float" office:value="0.00000405092592592558" calcext:value-type="float">
            <text:p>0,0000040509259259255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B613]+35" office:value-type="float" office:value="21455" calcext:value-type="float">
            <text:p>21455</text:p>
          </table:table-cell>
          <table:table-cell office:value-type="float" office:value="8640000" calcext:value-type="float">
            <text:p>8640000</text:p>
          </table:table-cell>
          <table:table-cell table:formula="of:=[.B614]/[.C614]" office:value-type="float" office:value="0.00248321759259259" calcext:value-type="float">
            <text:p>0,00248321759259259000</text:p>
          </table:table-cell>
          <table:table-cell table:formula="of:=[.D615]-[.D614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B614]+35" office:value-type="float" office:value="21490" calcext:value-type="float">
            <text:p>21490</text:p>
          </table:table-cell>
          <table:table-cell office:value-type="float" office:value="8640000" calcext:value-type="float">
            <text:p>8640000</text:p>
          </table:table-cell>
          <table:table-cell table:formula="of:=[.B615]/[.C615]" office:value-type="float" office:value="0.00248726851851852" calcext:value-type="float">
            <text:p>0,00248726851851852000</text:p>
          </table:table-cell>
          <table:table-cell table:formula="of:=[.D616]-[.D615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B615]+35" office:value-type="float" office:value="21525" calcext:value-type="float">
            <text:p>21525</text:p>
          </table:table-cell>
          <table:table-cell office:value-type="float" office:value="8640000" calcext:value-type="float">
            <text:p>8640000</text:p>
          </table:table-cell>
          <table:table-cell table:formula="of:=[.B616]/[.C616]" office:value-type="float" office:value="0.00249131944444444" calcext:value-type="float">
            <text:p>0,00249131944444444000</text:p>
          </table:table-cell>
          <table:table-cell table:formula="of:=[.D617]-[.D616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B616]+35" office:value-type="float" office:value="21560" calcext:value-type="float">
            <text:p>21560</text:p>
          </table:table-cell>
          <table:table-cell office:value-type="float" office:value="8640000" calcext:value-type="float">
            <text:p>8640000</text:p>
          </table:table-cell>
          <table:table-cell table:formula="of:=[.B617]/[.C617]" office:value-type="float" office:value="0.00249537037037037" calcext:value-type="float">
            <text:p>0,00249537037037037000</text:p>
          </table:table-cell>
          <table:table-cell table:formula="of:=[.D618]-[.D617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B617]+35" office:value-type="float" office:value="21595" calcext:value-type="float">
            <text:p>21595</text:p>
          </table:table-cell>
          <table:table-cell office:value-type="float" office:value="8640000" calcext:value-type="float">
            <text:p>8640000</text:p>
          </table:table-cell>
          <table:table-cell table:formula="of:=[.B618]/[.C618]" office:value-type="float" office:value="0.0024994212962963" calcext:value-type="float">
            <text:p>0,00249942129629630000</text:p>
          </table:table-cell>
          <table:table-cell table:formula="of:=[.D619]-[.D618]" office:value-type="float" office:value="0.00000405092592592558" calcext:value-type="float">
            <text:p>0,0000040509259259255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B618]+35" office:value-type="float" office:value="21630" calcext:value-type="float">
            <text:p>21630</text:p>
          </table:table-cell>
          <table:table-cell office:value-type="float" office:value="8640000" calcext:value-type="float">
            <text:p>8640000</text:p>
          </table:table-cell>
          <table:table-cell table:formula="of:=[.B619]/[.C619]" office:value-type="float" office:value="0.00250347222222222" calcext:value-type="float">
            <text:p>0,00250347222222222000</text:p>
          </table:table-cell>
          <table:table-cell table:formula="of:=[.D620]-[.D619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B619]+35" office:value-type="float" office:value="21665" calcext:value-type="float">
            <text:p>21665</text:p>
          </table:table-cell>
          <table:table-cell office:value-type="float" office:value="8640000" calcext:value-type="float">
            <text:p>8640000</text:p>
          </table:table-cell>
          <table:table-cell table:formula="of:=[.B620]/[.C620]" office:value-type="float" office:value="0.00250752314814815" calcext:value-type="float">
            <text:p>0,00250752314814815000</text:p>
          </table:table-cell>
          <table:table-cell table:formula="of:=[.D621]-[.D620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B620]+35" office:value-type="float" office:value="21700" calcext:value-type="float">
            <text:p>21700</text:p>
          </table:table-cell>
          <table:table-cell office:value-type="float" office:value="8640000" calcext:value-type="float">
            <text:p>8640000</text:p>
          </table:table-cell>
          <table:table-cell table:formula="of:=[.B621]/[.C621]" office:value-type="float" office:value="0.00251157407407407" calcext:value-type="float">
            <text:p>0,00251157407407407000</text:p>
          </table:table-cell>
          <table:table-cell table:formula="of:=[.D622]-[.D621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B621]+35" office:value-type="float" office:value="21735" calcext:value-type="float">
            <text:p>21735</text:p>
          </table:table-cell>
          <table:table-cell office:value-type="float" office:value="8640000" calcext:value-type="float">
            <text:p>8640000</text:p>
          </table:table-cell>
          <table:table-cell table:formula="of:=[.B622]/[.C622]" office:value-type="float" office:value="0.002515625" calcext:value-type="float">
            <text:p>0,00251562500000000000</text:p>
          </table:table-cell>
          <table:table-cell table:formula="of:=[.D623]-[.D622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B622]+35" office:value-type="float" office:value="21770" calcext:value-type="float">
            <text:p>21770</text:p>
          </table:table-cell>
          <table:table-cell office:value-type="float" office:value="8640000" calcext:value-type="float">
            <text:p>8640000</text:p>
          </table:table-cell>
          <table:table-cell table:formula="of:=[.B623]/[.C623]" office:value-type="float" office:value="0.00251967592592593" calcext:value-type="float">
            <text:p>0,00251967592592593000</text:p>
          </table:table-cell>
          <table:table-cell table:formula="of:=[.D624]-[.D623]" office:value-type="float" office:value="0.00000405092592592558" calcext:value-type="float">
            <text:p>0,0000040509259259255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B623]+35" office:value-type="float" office:value="21805" calcext:value-type="float">
            <text:p>21805</text:p>
          </table:table-cell>
          <table:table-cell office:value-type="float" office:value="8640000" calcext:value-type="float">
            <text:p>8640000</text:p>
          </table:table-cell>
          <table:table-cell table:formula="of:=[.B624]/[.C624]" office:value-type="float" office:value="0.00252372685185185" calcext:value-type="float">
            <text:p>0,00252372685185185000</text:p>
          </table:table-cell>
          <table:table-cell table:formula="of:=[.D625]-[.D624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B624]+35" office:value-type="float" office:value="21840" calcext:value-type="float">
            <text:p>21840</text:p>
          </table:table-cell>
          <table:table-cell office:value-type="float" office:value="8640000" calcext:value-type="float">
            <text:p>8640000</text:p>
          </table:table-cell>
          <table:table-cell table:formula="of:=[.B625]/[.C625]" office:value-type="float" office:value="0.00252777777777778" calcext:value-type="float">
            <text:p>0,00252777777777778000</text:p>
          </table:table-cell>
          <table:table-cell table:formula="of:=[.D626]-[.D625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B625]+35" office:value-type="float" office:value="21875" calcext:value-type="float">
            <text:p>21875</text:p>
          </table:table-cell>
          <table:table-cell office:value-type="float" office:value="8640000" calcext:value-type="float">
            <text:p>8640000</text:p>
          </table:table-cell>
          <table:table-cell table:formula="of:=[.B626]/[.C626]" office:value-type="float" office:value="0.0025318287037037" calcext:value-type="float">
            <text:p>0,00253182870370370000</text:p>
          </table:table-cell>
          <table:table-cell table:formula="of:=[.D627]-[.D626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B626]+35" office:value-type="float" office:value="21910" calcext:value-type="float">
            <text:p>21910</text:p>
          </table:table-cell>
          <table:table-cell office:value-type="float" office:value="8640000" calcext:value-type="float">
            <text:p>8640000</text:p>
          </table:table-cell>
          <table:table-cell table:formula="of:=[.B627]/[.C627]" office:value-type="float" office:value="0.00253587962962963" calcext:value-type="float">
            <text:p>0,00253587962962963000</text:p>
          </table:table-cell>
          <table:table-cell table:formula="of:=[.D628]-[.D627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B627]+35" office:value-type="float" office:value="21945" calcext:value-type="float">
            <text:p>21945</text:p>
          </table:table-cell>
          <table:table-cell office:value-type="float" office:value="8640000" calcext:value-type="float">
            <text:p>8640000</text:p>
          </table:table-cell>
          <table:table-cell table:formula="of:=[.B628]/[.C628]" office:value-type="float" office:value="0.00253993055555556" calcext:value-type="float">
            <text:p>0,00253993055555556000</text:p>
          </table:table-cell>
          <table:table-cell table:formula="of:=[.D629]-[.D628]" office:value-type="float" office:value="0.00000405092592592558" calcext:value-type="float">
            <text:p>0,0000040509259259255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B628]+35" office:value-type="float" office:value="21980" calcext:value-type="float">
            <text:p>21980</text:p>
          </table:table-cell>
          <table:table-cell office:value-type="float" office:value="8640000" calcext:value-type="float">
            <text:p>8640000</text:p>
          </table:table-cell>
          <table:table-cell table:formula="of:=[.B629]/[.C629]" office:value-type="float" office:value="0.00254398148148148" calcext:value-type="float">
            <text:p>0,00254398148148148000</text:p>
          </table:table-cell>
          <table:table-cell table:formula="of:=[.D630]-[.D629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B629]+35" office:value-type="float" office:value="22015" calcext:value-type="float">
            <text:p>22015</text:p>
          </table:table-cell>
          <table:table-cell office:value-type="float" office:value="8640000" calcext:value-type="float">
            <text:p>8640000</text:p>
          </table:table-cell>
          <table:table-cell table:formula="of:=[.B630]/[.C630]" office:value-type="float" office:value="0.00254803240740741" calcext:value-type="float">
            <text:p>0,00254803240740741000</text:p>
          </table:table-cell>
          <table:table-cell table:formula="of:=[.D631]-[.D630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B630]+35" office:value-type="float" office:value="22050" calcext:value-type="float">
            <text:p>22050</text:p>
          </table:table-cell>
          <table:table-cell office:value-type="float" office:value="8640000" calcext:value-type="float">
            <text:p>8640000</text:p>
          </table:table-cell>
          <table:table-cell table:formula="of:=[.B631]/[.C631]" office:value-type="float" office:value="0.00255208333333333" calcext:value-type="float">
            <text:p>0,00255208333333333000</text:p>
          </table:table-cell>
          <table:table-cell table:formula="of:=[.D632]-[.D631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B631]+35" office:value-type="float" office:value="22085" calcext:value-type="float">
            <text:p>22085</text:p>
          </table:table-cell>
          <table:table-cell office:value-type="float" office:value="8640000" calcext:value-type="float">
            <text:p>8640000</text:p>
          </table:table-cell>
          <table:table-cell table:formula="of:=[.B632]/[.C632]" office:value-type="float" office:value="0.00255613425925926" calcext:value-type="float">
            <text:p>0,00255613425925926000</text:p>
          </table:table-cell>
          <table:table-cell table:formula="of:=[.D633]-[.D632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B632]+35" office:value-type="float" office:value="22120" calcext:value-type="float">
            <text:p>22120</text:p>
          </table:table-cell>
          <table:table-cell office:value-type="float" office:value="8640000" calcext:value-type="float">
            <text:p>8640000</text:p>
          </table:table-cell>
          <table:table-cell table:formula="of:=[.B633]/[.C633]" office:value-type="float" office:value="0.00256018518518519" calcext:value-type="float">
            <text:p>0,00256018518518519000</text:p>
          </table:table-cell>
          <table:table-cell table:formula="of:=[.D634]-[.D633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B633]+35" office:value-type="float" office:value="22155" calcext:value-type="float">
            <text:p>22155</text:p>
          </table:table-cell>
          <table:table-cell office:value-type="float" office:value="8640000" calcext:value-type="float">
            <text:p>8640000</text:p>
          </table:table-cell>
          <table:table-cell table:formula="of:=[.B634]/[.C634]" office:value-type="float" office:value="0.00256423611111111" calcext:value-type="float">
            <text:p>0,00256423611111111000</text:p>
          </table:table-cell>
          <table:table-cell table:formula="of:=[.D635]-[.D634]" office:value-type="float" office:value="0.00000405092592592558" calcext:value-type="float">
            <text:p>0,0000040509259259255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B634]+35" office:value-type="float" office:value="22190" calcext:value-type="float">
            <text:p>22190</text:p>
          </table:table-cell>
          <table:table-cell office:value-type="float" office:value="8640000" calcext:value-type="float">
            <text:p>8640000</text:p>
          </table:table-cell>
          <table:table-cell table:formula="of:=[.B635]/[.C635]" office:value-type="float" office:value="0.00256828703703704" calcext:value-type="float">
            <text:p>0,00256828703703704000</text:p>
          </table:table-cell>
          <table:table-cell table:formula="of:=[.D636]-[.D635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B635]+35" office:value-type="float" office:value="22225" calcext:value-type="float">
            <text:p>22225</text:p>
          </table:table-cell>
          <table:table-cell office:value-type="float" office:value="8640000" calcext:value-type="float">
            <text:p>8640000</text:p>
          </table:table-cell>
          <table:table-cell table:formula="of:=[.B636]/[.C636]" office:value-type="float" office:value="0.00257233796296296" calcext:value-type="float">
            <text:p>0,00257233796296296000</text:p>
          </table:table-cell>
          <table:table-cell table:formula="of:=[.D637]-[.D636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B636]+35" office:value-type="float" office:value="22260" calcext:value-type="float">
            <text:p>22260</text:p>
          </table:table-cell>
          <table:table-cell office:value-type="float" office:value="8640000" calcext:value-type="float">
            <text:p>8640000</text:p>
          </table:table-cell>
          <table:table-cell table:formula="of:=[.B637]/[.C637]" office:value-type="float" office:value="0.00257638888888889" calcext:value-type="float">
            <text:p>0,00257638888888889000</text:p>
          </table:table-cell>
          <table:table-cell table:formula="of:=[.D638]-[.D637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B637]+35" office:value-type="float" office:value="22295" calcext:value-type="float">
            <text:p>22295</text:p>
          </table:table-cell>
          <table:table-cell office:value-type="float" office:value="8640000" calcext:value-type="float">
            <text:p>8640000</text:p>
          </table:table-cell>
          <table:table-cell table:formula="of:=[.B638]/[.C638]" office:value-type="float" office:value="0.00258043981481482" calcext:value-type="float">
            <text:p>0,00258043981481482000</text:p>
          </table:table-cell>
          <table:table-cell table:formula="of:=[.D639]-[.D638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B638]+35" office:value-type="float" office:value="22330" calcext:value-type="float">
            <text:p>22330</text:p>
          </table:table-cell>
          <table:table-cell office:value-type="float" office:value="8640000" calcext:value-type="float">
            <text:p>8640000</text:p>
          </table:table-cell>
          <table:table-cell table:formula="of:=[.B639]/[.C639]" office:value-type="float" office:value="0.00258449074074074" calcext:value-type="float">
            <text:p>0,00258449074074074000</text:p>
          </table:table-cell>
          <table:table-cell table:formula="of:=[.D640]-[.D639]" office:value-type="float" office:value="0.00000405092592592558" calcext:value-type="float">
            <text:p>0,0000040509259259255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B639]+35" office:value-type="float" office:value="22365" calcext:value-type="float">
            <text:p>22365</text:p>
          </table:table-cell>
          <table:table-cell office:value-type="float" office:value="8640000" calcext:value-type="float">
            <text:p>8640000</text:p>
          </table:table-cell>
          <table:table-cell table:formula="of:=[.B640]/[.C640]" office:value-type="float" office:value="0.00258854166666667" calcext:value-type="float">
            <text:p>0,00258854166666667000</text:p>
          </table:table-cell>
          <table:table-cell table:formula="of:=[.D641]-[.D640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B640]+35" office:value-type="float" office:value="22400" calcext:value-type="float">
            <text:p>22400</text:p>
          </table:table-cell>
          <table:table-cell office:value-type="float" office:value="8640000" calcext:value-type="float">
            <text:p>8640000</text:p>
          </table:table-cell>
          <table:table-cell table:formula="of:=[.B641]/[.C641]" office:value-type="float" office:value="0.00259259259259259" calcext:value-type="float">
            <text:p>0,00259259259259259000</text:p>
          </table:table-cell>
          <table:table-cell table:formula="of:=[.D642]-[.D641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B641]+35" office:value-type="float" office:value="22435" calcext:value-type="float">
            <text:p>22435</text:p>
          </table:table-cell>
          <table:table-cell office:value-type="float" office:value="8640000" calcext:value-type="float">
            <text:p>8640000</text:p>
          </table:table-cell>
          <table:table-cell table:formula="of:=[.B642]/[.C642]" office:value-type="float" office:value="0.00259664351851852" calcext:value-type="float">
            <text:p>0,00259664351851852000</text:p>
          </table:table-cell>
          <table:table-cell table:formula="of:=[.D643]-[.D642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B642]+35" office:value-type="float" office:value="22470" calcext:value-type="float">
            <text:p>22470</text:p>
          </table:table-cell>
          <table:table-cell office:value-type="float" office:value="8640000" calcext:value-type="float">
            <text:p>8640000</text:p>
          </table:table-cell>
          <table:table-cell table:formula="of:=[.B643]/[.C643]" office:value-type="float" office:value="0.00260069444444444" calcext:value-type="float">
            <text:p>0,00260069444444444000</text:p>
          </table:table-cell>
          <table:table-cell table:formula="of:=[.D644]-[.D643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B643]+35" office:value-type="float" office:value="22505" calcext:value-type="float">
            <text:p>22505</text:p>
          </table:table-cell>
          <table:table-cell office:value-type="float" office:value="8640000" calcext:value-type="float">
            <text:p>8640000</text:p>
          </table:table-cell>
          <table:table-cell table:formula="of:=[.B644]/[.C644]" office:value-type="float" office:value="0.00260474537037037" calcext:value-type="float">
            <text:p>0,00260474537037037000</text:p>
          </table:table-cell>
          <table:table-cell table:formula="of:=[.D645]-[.D644]" office:value-type="float" office:value="0.00000405092592592558" calcext:value-type="float">
            <text:p>0,0000040509259259255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B644]+35" office:value-type="float" office:value="22540" calcext:value-type="float">
            <text:p>22540</text:p>
          </table:table-cell>
          <table:table-cell office:value-type="float" office:value="8640000" calcext:value-type="float">
            <text:p>8640000</text:p>
          </table:table-cell>
          <table:table-cell table:formula="of:=[.B645]/[.C645]" office:value-type="float" office:value="0.0026087962962963" calcext:value-type="float">
            <text:p>0,00260879629629630000</text:p>
          </table:table-cell>
          <table:table-cell table:formula="of:=[.D646]-[.D645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B645]+35" office:value-type="float" office:value="22575" calcext:value-type="float">
            <text:p>22575</text:p>
          </table:table-cell>
          <table:table-cell office:value-type="float" office:value="8640000" calcext:value-type="float">
            <text:p>8640000</text:p>
          </table:table-cell>
          <table:table-cell table:formula="of:=[.B646]/[.C646]" office:value-type="float" office:value="0.00261284722222222" calcext:value-type="float">
            <text:p>0,00261284722222222000</text:p>
          </table:table-cell>
          <table:table-cell table:formula="of:=[.D647]-[.D646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B646]+35" office:value-type="float" office:value="22610" calcext:value-type="float">
            <text:p>22610</text:p>
          </table:table-cell>
          <table:table-cell office:value-type="float" office:value="8640000" calcext:value-type="float">
            <text:p>8640000</text:p>
          </table:table-cell>
          <table:table-cell table:formula="of:=[.B647]/[.C647]" office:value-type="float" office:value="0.00261689814814815" calcext:value-type="float">
            <text:p>0,00261689814814815000</text:p>
          </table:table-cell>
          <table:table-cell table:formula="of:=[.D648]-[.D647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B647]+35" office:value-type="float" office:value="22645" calcext:value-type="float">
            <text:p>22645</text:p>
          </table:table-cell>
          <table:table-cell office:value-type="float" office:value="8640000" calcext:value-type="float">
            <text:p>8640000</text:p>
          </table:table-cell>
          <table:table-cell table:formula="of:=[.B648]/[.C648]" office:value-type="float" office:value="0.00262094907407407" calcext:value-type="float">
            <text:p>0,00262094907407407000</text:p>
          </table:table-cell>
          <table:table-cell table:formula="of:=[.D649]-[.D648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B648]+35" office:value-type="float" office:value="22680" calcext:value-type="float">
            <text:p>22680</text:p>
          </table:table-cell>
          <table:table-cell office:value-type="float" office:value="8640000" calcext:value-type="float">
            <text:p>8640000</text:p>
          </table:table-cell>
          <table:table-cell table:formula="of:=[.B649]/[.C649]" office:value-type="float" office:value="0.002625" calcext:value-type="float">
            <text:p>0,00262500000000000000</text:p>
          </table:table-cell>
          <table:table-cell table:formula="of:=[.D650]-[.D649]" office:value-type="float" office:value="0.00000405092592592558" calcext:value-type="float">
            <text:p>0,0000040509259259255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B649]+35" office:value-type="float" office:value="22715" calcext:value-type="float">
            <text:p>22715</text:p>
          </table:table-cell>
          <table:table-cell office:value-type="float" office:value="8640000" calcext:value-type="float">
            <text:p>8640000</text:p>
          </table:table-cell>
          <table:table-cell table:formula="of:=[.B650]/[.C650]" office:value-type="float" office:value="0.00262905092592593" calcext:value-type="float">
            <text:p>0,00262905092592593000</text:p>
          </table:table-cell>
          <table:table-cell table:formula="of:=[.D651]-[.D650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B650]+35" office:value-type="float" office:value="22750" calcext:value-type="float">
            <text:p>22750</text:p>
          </table:table-cell>
          <table:table-cell office:value-type="float" office:value="8640000" calcext:value-type="float">
            <text:p>8640000</text:p>
          </table:table-cell>
          <table:table-cell table:formula="of:=[.B651]/[.C651]" office:value-type="float" office:value="0.00263310185185185" calcext:value-type="float">
            <text:p>0,00263310185185185000</text:p>
          </table:table-cell>
          <table:table-cell table:formula="of:=[.D652]-[.D651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B651]+35" office:value-type="float" office:value="22785" calcext:value-type="float">
            <text:p>22785</text:p>
          </table:table-cell>
          <table:table-cell office:value-type="float" office:value="8640000" calcext:value-type="float">
            <text:p>8640000</text:p>
          </table:table-cell>
          <table:table-cell table:formula="of:=[.B652]/[.C652]" office:value-type="float" office:value="0.00263715277777778" calcext:value-type="float">
            <text:p>0,00263715277777778000</text:p>
          </table:table-cell>
          <table:table-cell table:formula="of:=[.D653]-[.D652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B652]+35" office:value-type="float" office:value="22820" calcext:value-type="float">
            <text:p>22820</text:p>
          </table:table-cell>
          <table:table-cell office:value-type="float" office:value="8640000" calcext:value-type="float">
            <text:p>8640000</text:p>
          </table:table-cell>
          <table:table-cell table:formula="of:=[.B653]/[.C653]" office:value-type="float" office:value="0.0026412037037037" calcext:value-type="float">
            <text:p>0,00264120370370370000</text:p>
          </table:table-cell>
          <table:table-cell table:formula="of:=[.D654]-[.D653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B653]+35" office:value-type="float" office:value="22855" calcext:value-type="float">
            <text:p>22855</text:p>
          </table:table-cell>
          <table:table-cell office:value-type="float" office:value="8640000" calcext:value-type="float">
            <text:p>8640000</text:p>
          </table:table-cell>
          <table:table-cell table:formula="of:=[.B654]/[.C654]" office:value-type="float" office:value="0.00264525462962963" calcext:value-type="float">
            <text:p>0,00264525462962963000</text:p>
          </table:table-cell>
          <table:table-cell table:formula="of:=[.D655]-[.D654]" office:value-type="float" office:value="0.00000405092592592558" calcext:value-type="float">
            <text:p>0,0000040509259259255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B654]+35" office:value-type="float" office:value="22890" calcext:value-type="float">
            <text:p>22890</text:p>
          </table:table-cell>
          <table:table-cell office:value-type="float" office:value="8640000" calcext:value-type="float">
            <text:p>8640000</text:p>
          </table:table-cell>
          <table:table-cell table:formula="of:=[.B655]/[.C655]" office:value-type="float" office:value="0.00264930555555556" calcext:value-type="float">
            <text:p>0,00264930555555556000</text:p>
          </table:table-cell>
          <table:table-cell table:formula="of:=[.D656]-[.D655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B655]+35" office:value-type="float" office:value="22925" calcext:value-type="float">
            <text:p>22925</text:p>
          </table:table-cell>
          <table:table-cell office:value-type="float" office:value="8640000" calcext:value-type="float">
            <text:p>8640000</text:p>
          </table:table-cell>
          <table:table-cell table:formula="of:=[.B656]/[.C656]" office:value-type="float" office:value="0.00265335648148148" calcext:value-type="float">
            <text:p>0,00265335648148148000</text:p>
          </table:table-cell>
          <table:table-cell table:formula="of:=[.D657]-[.D656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B656]+35" office:value-type="float" office:value="22960" calcext:value-type="float">
            <text:p>22960</text:p>
          </table:table-cell>
          <table:table-cell office:value-type="float" office:value="8640000" calcext:value-type="float">
            <text:p>8640000</text:p>
          </table:table-cell>
          <table:table-cell table:formula="of:=[.B657]/[.C657]" office:value-type="float" office:value="0.00265740740740741" calcext:value-type="float">
            <text:p>0,00265740740740741000</text:p>
          </table:table-cell>
          <table:table-cell table:formula="of:=[.D658]-[.D657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B657]+35" office:value-type="float" office:value="22995" calcext:value-type="float">
            <text:p>22995</text:p>
          </table:table-cell>
          <table:table-cell office:value-type="float" office:value="8640000" calcext:value-type="float">
            <text:p>8640000</text:p>
          </table:table-cell>
          <table:table-cell table:formula="of:=[.B658]/[.C658]" office:value-type="float" office:value="0.00266145833333333" calcext:value-type="float">
            <text:p>0,00266145833333333000</text:p>
          </table:table-cell>
          <table:table-cell table:formula="of:=[.D659]-[.D658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B658]+35" office:value-type="float" office:value="23030" calcext:value-type="float">
            <text:p>23030</text:p>
          </table:table-cell>
          <table:table-cell office:value-type="float" office:value="8640000" calcext:value-type="float">
            <text:p>8640000</text:p>
          </table:table-cell>
          <table:table-cell table:formula="of:=[.B659]/[.C659]" office:value-type="float" office:value="0.00266550925925926" calcext:value-type="float">
            <text:p>0,00266550925925926000</text:p>
          </table:table-cell>
          <table:table-cell table:formula="of:=[.D660]-[.D659]" office:value-type="float" office:value="0.00000405092592592558" calcext:value-type="float">
            <text:p>0,0000040509259259255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B659]+35" office:value-type="float" office:value="23065" calcext:value-type="float">
            <text:p>23065</text:p>
          </table:table-cell>
          <table:table-cell office:value-type="float" office:value="8640000" calcext:value-type="float">
            <text:p>8640000</text:p>
          </table:table-cell>
          <table:table-cell table:formula="of:=[.B660]/[.C660]" office:value-type="float" office:value="0.00266956018518519" calcext:value-type="float">
            <text:p>0,00266956018518519000</text:p>
          </table:table-cell>
          <table:table-cell table:formula="of:=[.D661]-[.D660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B660]+35" office:value-type="float" office:value="23100" calcext:value-type="float">
            <text:p>23100</text:p>
          </table:table-cell>
          <table:table-cell office:value-type="float" office:value="8640000" calcext:value-type="float">
            <text:p>8640000</text:p>
          </table:table-cell>
          <table:table-cell table:formula="of:=[.B661]/[.C661]" office:value-type="float" office:value="0.00267361111111111" calcext:value-type="float">
            <text:p>0,00267361111111111000</text:p>
          </table:table-cell>
          <table:table-cell table:formula="of:=[.D662]-[.D661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B661]+35" office:value-type="float" office:value="23135" calcext:value-type="float">
            <text:p>23135</text:p>
          </table:table-cell>
          <table:table-cell office:value-type="float" office:value="8640000" calcext:value-type="float">
            <text:p>8640000</text:p>
          </table:table-cell>
          <table:table-cell table:formula="of:=[.B662]/[.C662]" office:value-type="float" office:value="0.00267766203703704" calcext:value-type="float">
            <text:p>0,00267766203703704000</text:p>
          </table:table-cell>
          <table:table-cell table:formula="of:=[.D663]-[.D662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B662]+35" office:value-type="float" office:value="23170" calcext:value-type="float">
            <text:p>23170</text:p>
          </table:table-cell>
          <table:table-cell office:value-type="float" office:value="8640000" calcext:value-type="float">
            <text:p>8640000</text:p>
          </table:table-cell>
          <table:table-cell table:formula="of:=[.B663]/[.C663]" office:value-type="float" office:value="0.00268171296296296" calcext:value-type="float">
            <text:p>0,00268171296296296000</text:p>
          </table:table-cell>
          <table:table-cell table:formula="of:=[.D664]-[.D663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B663]+35" office:value-type="float" office:value="23205" calcext:value-type="float">
            <text:p>23205</text:p>
          </table:table-cell>
          <table:table-cell office:value-type="float" office:value="8640000" calcext:value-type="float">
            <text:p>8640000</text:p>
          </table:table-cell>
          <table:table-cell table:formula="of:=[.B664]/[.C664]" office:value-type="float" office:value="0.00268576388888889" calcext:value-type="float">
            <text:p>0,00268576388888889000</text:p>
          </table:table-cell>
          <table:table-cell table:formula="of:=[.D665]-[.D664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B664]+35" office:value-type="float" office:value="23240" calcext:value-type="float">
            <text:p>23240</text:p>
          </table:table-cell>
          <table:table-cell office:value-type="float" office:value="8640000" calcext:value-type="float">
            <text:p>8640000</text:p>
          </table:table-cell>
          <table:table-cell table:formula="of:=[.B665]/[.C665]" office:value-type="float" office:value="0.00268981481481482" calcext:value-type="float">
            <text:p>0,00268981481481482000</text:p>
          </table:table-cell>
          <table:table-cell table:formula="of:=[.D666]-[.D665]" office:value-type="float" office:value="0.00000405092592592558" calcext:value-type="float">
            <text:p>0,0000040509259259255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B665]+35" office:value-type="float" office:value="23275" calcext:value-type="float">
            <text:p>23275</text:p>
          </table:table-cell>
          <table:table-cell office:value-type="float" office:value="8640000" calcext:value-type="float">
            <text:p>8640000</text:p>
          </table:table-cell>
          <table:table-cell table:formula="of:=[.B666]/[.C666]" office:value-type="float" office:value="0.00269386574074074" calcext:value-type="float">
            <text:p>0,00269386574074074000</text:p>
          </table:table-cell>
          <table:table-cell table:formula="of:=[.D667]-[.D666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B666]+35" office:value-type="float" office:value="23310" calcext:value-type="float">
            <text:p>23310</text:p>
          </table:table-cell>
          <table:table-cell office:value-type="float" office:value="8640000" calcext:value-type="float">
            <text:p>8640000</text:p>
          </table:table-cell>
          <table:table-cell table:formula="of:=[.B667]/[.C667]" office:value-type="float" office:value="0.00269791666666667" calcext:value-type="float">
            <text:p>0,00269791666666667000</text:p>
          </table:table-cell>
          <table:table-cell table:formula="of:=[.D668]-[.D667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B667]+35" office:value-type="float" office:value="23345" calcext:value-type="float">
            <text:p>23345</text:p>
          </table:table-cell>
          <table:table-cell office:value-type="float" office:value="8640000" calcext:value-type="float">
            <text:p>8640000</text:p>
          </table:table-cell>
          <table:table-cell table:formula="of:=[.B668]/[.C668]" office:value-type="float" office:value="0.00270196759259259" calcext:value-type="float">
            <text:p>0,00270196759259259000</text:p>
          </table:table-cell>
          <table:table-cell table:formula="of:=[.D669]-[.D668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B668]+35" office:value-type="float" office:value="23380" calcext:value-type="float">
            <text:p>23380</text:p>
          </table:table-cell>
          <table:table-cell office:value-type="float" office:value="8640000" calcext:value-type="float">
            <text:p>8640000</text:p>
          </table:table-cell>
          <table:table-cell table:formula="of:=[.B669]/[.C669]" office:value-type="float" office:value="0.00270601851851852" calcext:value-type="float">
            <text:p>0,00270601851851852000</text:p>
          </table:table-cell>
          <table:table-cell table:formula="of:=[.D670]-[.D669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B669]+35" office:value-type="float" office:value="23415" calcext:value-type="float">
            <text:p>23415</text:p>
          </table:table-cell>
          <table:table-cell office:value-type="float" office:value="8640000" calcext:value-type="float">
            <text:p>8640000</text:p>
          </table:table-cell>
          <table:table-cell table:formula="of:=[.B670]/[.C670]" office:value-type="float" office:value="0.00271006944444444" calcext:value-type="float">
            <text:p>0,00271006944444444000</text:p>
          </table:table-cell>
          <table:table-cell table:formula="of:=[.D671]-[.D670]" office:value-type="float" office:value="0.00000405092592592558" calcext:value-type="float">
            <text:p>0,0000040509259259255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B670]+35" office:value-type="float" office:value="23450" calcext:value-type="float">
            <text:p>23450</text:p>
          </table:table-cell>
          <table:table-cell office:value-type="float" office:value="8640000" calcext:value-type="float">
            <text:p>8640000</text:p>
          </table:table-cell>
          <table:table-cell table:formula="of:=[.B671]/[.C671]" office:value-type="float" office:value="0.00271412037037037" calcext:value-type="float">
            <text:p>0,00271412037037037000</text:p>
          </table:table-cell>
          <table:table-cell table:formula="of:=[.D672]-[.D671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B671]+35" office:value-type="float" office:value="23485" calcext:value-type="float">
            <text:p>23485</text:p>
          </table:table-cell>
          <table:table-cell office:value-type="float" office:value="8640000" calcext:value-type="float">
            <text:p>8640000</text:p>
          </table:table-cell>
          <table:table-cell table:formula="of:=[.B672]/[.C672]" office:value-type="float" office:value="0.0027181712962963" calcext:value-type="float">
            <text:p>0,00271817129629630000</text:p>
          </table:table-cell>
          <table:table-cell table:formula="of:=[.D673]-[.D672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B672]+35" office:value-type="float" office:value="23520" calcext:value-type="float">
            <text:p>23520</text:p>
          </table:table-cell>
          <table:table-cell office:value-type="float" office:value="8640000" calcext:value-type="float">
            <text:p>8640000</text:p>
          </table:table-cell>
          <table:table-cell table:formula="of:=[.B673]/[.C673]" office:value-type="float" office:value="0.00272222222222222" calcext:value-type="float">
            <text:p>0,00272222222222222000</text:p>
          </table:table-cell>
          <table:table-cell table:formula="of:=[.D674]-[.D673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B673]+35" office:value-type="float" office:value="23555" calcext:value-type="float">
            <text:p>23555</text:p>
          </table:table-cell>
          <table:table-cell office:value-type="float" office:value="8640000" calcext:value-type="float">
            <text:p>8640000</text:p>
          </table:table-cell>
          <table:table-cell table:formula="of:=[.B674]/[.C674]" office:value-type="float" office:value="0.00272627314814815" calcext:value-type="float">
            <text:p>0,00272627314814815000</text:p>
          </table:table-cell>
          <table:table-cell table:formula="of:=[.D675]-[.D674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B674]+35" office:value-type="float" office:value="23590" calcext:value-type="float">
            <text:p>23590</text:p>
          </table:table-cell>
          <table:table-cell office:value-type="float" office:value="8640000" calcext:value-type="float">
            <text:p>8640000</text:p>
          </table:table-cell>
          <table:table-cell table:formula="of:=[.B675]/[.C675]" office:value-type="float" office:value="0.00273032407407407" calcext:value-type="float">
            <text:p>0,00273032407407407000</text:p>
          </table:table-cell>
          <table:table-cell table:formula="of:=[.D676]-[.D675]" office:value-type="float" office:value="0.00000405092592592558" calcext:value-type="float">
            <text:p>0,00000405092592592558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B675]+35" office:value-type="float" office:value="23625" calcext:value-type="float">
            <text:p>23625</text:p>
          </table:table-cell>
          <table:table-cell office:value-type="float" office:value="8640000" calcext:value-type="float">
            <text:p>8640000</text:p>
          </table:table-cell>
          <table:table-cell table:formula="of:=[.B676]/[.C676]" office:value-type="float" office:value="0.002734375" calcext:value-type="float">
            <text:p>0,00273437500000000000</text:p>
          </table:table-cell>
          <table:table-cell table:formula="of:=[.D677]-[.D676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B676]+35" office:value-type="float" office:value="23660" calcext:value-type="float">
            <text:p>23660</text:p>
          </table:table-cell>
          <table:table-cell office:value-type="float" office:value="8640000" calcext:value-type="float">
            <text:p>8640000</text:p>
          </table:table-cell>
          <table:table-cell table:formula="of:=[.B677]/[.C677]" office:value-type="float" office:value="0.00273842592592593" calcext:value-type="float">
            <text:p>0,00273842592592593000</text:p>
          </table:table-cell>
          <table:table-cell table:formula="of:=[.D678]-[.D677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B677]+35" office:value-type="float" office:value="23695" calcext:value-type="float">
            <text:p>23695</text:p>
          </table:table-cell>
          <table:table-cell office:value-type="float" office:value="8640000" calcext:value-type="float">
            <text:p>8640000</text:p>
          </table:table-cell>
          <table:table-cell table:formula="of:=[.B678]/[.C678]" office:value-type="float" office:value="0.00274247685185185" calcext:value-type="float">
            <text:p>0,00274247685185185000</text:p>
          </table:table-cell>
          <table:table-cell table:formula="of:=[.D679]-[.D678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B678]+35" office:value-type="float" office:value="23730" calcext:value-type="float">
            <text:p>23730</text:p>
          </table:table-cell>
          <table:table-cell office:value-type="float" office:value="8640000" calcext:value-type="float">
            <text:p>8640000</text:p>
          </table:table-cell>
          <table:table-cell table:formula="of:=[.B679]/[.C679]" office:value-type="float" office:value="0.00274652777777778" calcext:value-type="float">
            <text:p>0,00274652777777778000</text:p>
          </table:table-cell>
          <table:table-cell table:formula="of:=[.D680]-[.D679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B679]+35" office:value-type="float" office:value="23765" calcext:value-type="float">
            <text:p>23765</text:p>
          </table:table-cell>
          <table:table-cell office:value-type="float" office:value="8640000" calcext:value-type="float">
            <text:p>8640000</text:p>
          </table:table-cell>
          <table:table-cell table:formula="of:=[.B680]/[.C680]" office:value-type="float" office:value="0.0027505787037037" calcext:value-type="float">
            <text:p>0,00275057870370370000</text:p>
          </table:table-cell>
          <table:table-cell table:formula="of:=[.D681]-[.D680]" office:value-type="float" office:value="0.00000405092592592558" calcext:value-type="float">
            <text:p>0,0000040509259259255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B680]+35" office:value-type="float" office:value="23800" calcext:value-type="float">
            <text:p>23800</text:p>
          </table:table-cell>
          <table:table-cell office:value-type="float" office:value="8640000" calcext:value-type="float">
            <text:p>8640000</text:p>
          </table:table-cell>
          <table:table-cell table:formula="of:=[.B681]/[.C681]" office:value-type="float" office:value="0.00275462962962963" calcext:value-type="float">
            <text:p>0,00275462962962963000</text:p>
          </table:table-cell>
          <table:table-cell table:formula="of:=[.D682]-[.D681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B681]+35" office:value-type="float" office:value="23835" calcext:value-type="float">
            <text:p>23835</text:p>
          </table:table-cell>
          <table:table-cell office:value-type="float" office:value="8640000" calcext:value-type="float">
            <text:p>8640000</text:p>
          </table:table-cell>
          <table:table-cell table:formula="of:=[.B682]/[.C682]" office:value-type="float" office:value="0.00275868055555556" calcext:value-type="float">
            <text:p>0,00275868055555556000</text:p>
          </table:table-cell>
          <table:table-cell table:formula="of:=[.D683]-[.D682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B682]+35" office:value-type="float" office:value="23870" calcext:value-type="float">
            <text:p>23870</text:p>
          </table:table-cell>
          <table:table-cell office:value-type="float" office:value="8640000" calcext:value-type="float">
            <text:p>8640000</text:p>
          </table:table-cell>
          <table:table-cell table:formula="of:=[.B683]/[.C683]" office:value-type="float" office:value="0.00276273148148148" calcext:value-type="float">
            <text:p>0,00276273148148148000</text:p>
          </table:table-cell>
          <table:table-cell table:formula="of:=[.D684]-[.D683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B683]+35" office:value-type="float" office:value="23905" calcext:value-type="float">
            <text:p>23905</text:p>
          </table:table-cell>
          <table:table-cell office:value-type="float" office:value="8640000" calcext:value-type="float">
            <text:p>8640000</text:p>
          </table:table-cell>
          <table:table-cell table:formula="of:=[.B684]/[.C684]" office:value-type="float" office:value="0.00276678240740741" calcext:value-type="float">
            <text:p>0,00276678240740741000</text:p>
          </table:table-cell>
          <table:table-cell table:formula="of:=[.D685]-[.D684]" office:value-type="float" office:value="0.00000405092592592601" calcext:value-type="float">
            <text:p>0,00000405092592592601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B684]+35" office:value-type="float" office:value="23940" calcext:value-type="float">
            <text:p>23940</text:p>
          </table:table-cell>
          <table:table-cell office:value-type="float" office:value="8640000" calcext:value-type="float">
            <text:p>8640000</text:p>
          </table:table-cell>
          <table:table-cell table:formula="of:=[.B685]/[.C685]" office:value-type="float" office:value="0.00277083333333333" calcext:value-type="float">
            <text:p>0,00277083333333333000</text:p>
          </table:table-cell>
          <table:table-cell table:formula="of:=[.D686]-[.D685]" office:value-type="float" office:value="0.00000405092592592558" calcext:value-type="float">
            <text:p>0,0000040509259259255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B685]+35" office:value-type="float" office:value="23975" calcext:value-type="float">
            <text:p>23975</text:p>
          </table:table-cell>
          <table:table-cell office:value-type="float" office:value="8640000" calcext:value-type="float">
            <text:p>8640000</text:p>
          </table:table-cell>
          <table:table-cell table:formula="of:=[.B686]/[.C686]" office:value-type="float" office:value="0.00277488425925926" calcext:value-type="float">
            <text:p>0,00277488425925926000</text:p>
          </table:table-cell>
          <table:table-cell table:formula="of:=#REF!-[.D686]" office:value-type="string" office:string-value="" calcext:value-type="error">
            <text:p>#REF!</text:p>
          </table:table-cell>
        </table:table-row>
        <table:table-row table:style-name="ro1" table:number-rows-repeated="104788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7:29:49.429530215</meta:creation-date>
    <dc:date>2026-05-17T17:30:04.819019151</dc:date>
    <meta:editing-duration>PT16S</meta:editing-duration>
    <meta:editing-cycles>1</meta:editing-cycles>
    <meta:document-statistic meta:table-count="1" meta:cell-count="3430" meta:object-count="0"/>
    <meta:generator>LibreOffice/24.2.7.2$Linux_X86_64 LibreOffice_project/420$Build-2</meta:generator>
  </office:meta>
</office:document-meta>
</file>