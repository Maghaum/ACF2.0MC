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77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4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77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891203703703704" calcext:value-type="float">
            <text:p>0,00000891203703703704</text:p>
          </table:table-cell>
          <table:table-cell table:formula="of:=[.D3]-[.D2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77" office:value-type="float" office:value="154" calcext:value-type="float">
            <text:p>154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78240740740741" calcext:value-type="float">
            <text:p>0,00001782407407407410</text:p>
          </table:table-cell>
          <table:table-cell table:formula="of:=[.D4]-[.D3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77" office:value-type="float" office:value="231" calcext:value-type="float">
            <text:p>231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67361111111111" calcext:value-type="float">
            <text:p>0,00002673611111111110</text:p>
          </table:table-cell>
          <table:table-cell table:formula="of:=[.D5]-[.D4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77" office:value-type="float" office:value="308" calcext:value-type="float">
            <text:p>308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356481481481482" calcext:value-type="float">
            <text:p>0,00003564814814814820</text:p>
          </table:table-cell>
          <table:table-cell table:formula="of:=[.D6]-[.D5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77" office:value-type="float" office:value="385" calcext:value-type="float">
            <text:p>38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445601851851852" calcext:value-type="float">
            <text:p>0,00004456018518518520</text:p>
          </table:table-cell>
          <table:table-cell table:formula="of:=[.D7]-[.D6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77" office:value-type="float" office:value="462" calcext:value-type="float">
            <text:p>462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534722222222222" calcext:value-type="float">
            <text:p>0,00005347222222222220</text:p>
          </table:table-cell>
          <table:table-cell table:formula="of:=[.D8]-[.D7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77" office:value-type="float" office:value="539" calcext:value-type="float">
            <text:p>539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623842592592593" calcext:value-type="float">
            <text:p>0,00006238425925925930</text:p>
          </table:table-cell>
          <table:table-cell table:formula="of:=[.D9]-[.D8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77" office:value-type="float" office:value="616" calcext:value-type="float">
            <text:p>616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712962962962963" calcext:value-type="float">
            <text:p>0,00007129629629629630</text:p>
          </table:table-cell>
          <table:table-cell table:formula="of:=[.D10]-[.D9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77" office:value-type="float" office:value="693" calcext:value-type="float">
            <text:p>693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802083333333333" calcext:value-type="float">
            <text:p>0,00008020833333333330</text:p>
          </table:table-cell>
          <table:table-cell table:formula="of:=[.D11]-[.D10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77" office:value-type="float" office:value="770" calcext:value-type="float">
            <text:p>77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891203703703704" calcext:value-type="float">
            <text:p>0,00008912037037037040</text:p>
          </table:table-cell>
          <table:table-cell table:formula="of:=[.D12]-[.D11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77" office:value-type="float" office:value="847" calcext:value-type="float">
            <text:p>847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980324074074074" calcext:value-type="float">
            <text:p>0,00009803240740740740</text:p>
          </table:table-cell>
          <table:table-cell table:formula="of:=[.D13]-[.D12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77" office:value-type="float" office:value="924" calcext:value-type="float">
            <text:p>924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06944444444444" calcext:value-type="float">
            <text:p>0,00010694444444444400</text:p>
          </table:table-cell>
          <table:table-cell table:formula="of:=[.D14]-[.D13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77" office:value-type="float" office:value="1001" calcext:value-type="float">
            <text:p>1001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15856481481481" calcext:value-type="float">
            <text:p>0,00011585648148148100</text:p>
          </table:table-cell>
          <table:table-cell table:formula="of:=[.D15]-[.D14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77" office:value-type="float" office:value="1078" calcext:value-type="float">
            <text:p>1078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24768518518519" calcext:value-type="float">
            <text:p>0,00012476851851851900</text:p>
          </table:table-cell>
          <table:table-cell table:formula="of:=[.D16]-[.D15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77" office:value-type="float" office:value="1155" calcext:value-type="float">
            <text:p>115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33680555555556" calcext:value-type="float">
            <text:p>0,00013368055555555600</text:p>
          </table:table-cell>
          <table:table-cell table:formula="of:=[.D17]-[.D16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77" office:value-type="float" office:value="1232" calcext:value-type="float">
            <text:p>1232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42592592592593" calcext:value-type="float">
            <text:p>0,00014259259259259300</text:p>
          </table:table-cell>
          <table:table-cell table:formula="of:=[.D18]-[.D17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77" office:value-type="float" office:value="1309" calcext:value-type="float">
            <text:p>1309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5150462962963" calcext:value-type="float">
            <text:p>0,00015150462962963000</text:p>
          </table:table-cell>
          <table:table-cell table:formula="of:=[.D19]-[.D18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77" office:value-type="float" office:value="1386" calcext:value-type="float">
            <text:p>1386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60416666666667" calcext:value-type="float">
            <text:p>0,00016041666666666700</text:p>
          </table:table-cell>
          <table:table-cell table:formula="of:=[.D20]-[.D19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77" office:value-type="float" office:value="1463" calcext:value-type="float">
            <text:p>1463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69328703703704" calcext:value-type="float">
            <text:p>0,00016932870370370400</text:p>
          </table:table-cell>
          <table:table-cell table:formula="of:=[.D21]-[.D20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77" office:value-type="float" office:value="1540" calcext:value-type="float">
            <text:p>154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78240740740741" calcext:value-type="float">
            <text:p>0,00017824074074074100</text:p>
          </table:table-cell>
          <table:table-cell table:formula="of:=[.D22]-[.D21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77" office:value-type="float" office:value="1617" calcext:value-type="float">
            <text:p>1617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87152777777778" calcext:value-type="float">
            <text:p>0,00018715277777777800</text:p>
          </table:table-cell>
          <table:table-cell table:formula="of:=[.D23]-[.D22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77" office:value-type="float" office:value="1694" calcext:value-type="float">
            <text:p>1694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96064814814815" calcext:value-type="float">
            <text:p>0,00019606481481481500</text:p>
          </table:table-cell>
          <table:table-cell table:formula="of:=[.D24]-[.D23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77" office:value-type="float" office:value="1771" calcext:value-type="float">
            <text:p>1771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04976851851852" calcext:value-type="float">
            <text:p>0,00020497685185185200</text:p>
          </table:table-cell>
          <table:table-cell table:formula="of:=[.D25]-[.D24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77" office:value-type="float" office:value="1848" calcext:value-type="float">
            <text:p>1848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13888888888889" calcext:value-type="float">
            <text:p>0,00021388888888888900</text:p>
          </table:table-cell>
          <table:table-cell table:formula="of:=[.D26]-[.D25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77" office:value-type="float" office:value="1925" calcext:value-type="float">
            <text:p>192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22800925925926" calcext:value-type="float">
            <text:p>0,00022280092592592600</text:p>
          </table:table-cell>
          <table:table-cell table:formula="of:=[.D27]-[.D26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77" office:value-type="float" office:value="2002" calcext:value-type="float">
            <text:p>2002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31712962962963" calcext:value-type="float">
            <text:p>0,00023171296296296300</text:p>
          </table:table-cell>
          <table:table-cell table:formula="of:=[.D28]-[.D27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77" office:value-type="float" office:value="2079" calcext:value-type="float">
            <text:p>2079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40625" calcext:value-type="float">
            <text:p>0,00024062500000000000</text:p>
          </table:table-cell>
          <table:table-cell table:formula="of:=[.D29]-[.D28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77" office:value-type="float" office:value="2156" calcext:value-type="float">
            <text:p>2156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49537037037037" calcext:value-type="float">
            <text:p>0,00024953703703703700</text:p>
          </table:table-cell>
          <table:table-cell table:formula="of:=[.D30]-[.D29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77" office:value-type="float" office:value="2233" calcext:value-type="float">
            <text:p>2233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58449074074074" calcext:value-type="float">
            <text:p>0,00025844907407407400</text:p>
          </table:table-cell>
          <table:table-cell table:formula="of:=[.D31]-[.D30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77" office:value-type="float" office:value="2310" calcext:value-type="float">
            <text:p>231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67361111111111" calcext:value-type="float">
            <text:p>0,00026736111111111100</text:p>
          </table:table-cell>
          <table:table-cell table:formula="of:=[.D32]-[.D31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77" office:value-type="float" office:value="2387" calcext:value-type="float">
            <text:p>2387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76273148148148" calcext:value-type="float">
            <text:p>0,00027627314814814800</text:p>
          </table:table-cell>
          <table:table-cell table:formula="of:=[.D33]-[.D32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77" office:value-type="float" office:value="2464" calcext:value-type="float">
            <text:p>2464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85185185185185" calcext:value-type="float">
            <text:p>0,00028518518518518500</text:p>
          </table:table-cell>
          <table:table-cell table:formula="of:=[.D34]-[.D33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77" office:value-type="float" office:value="2541" calcext:value-type="float">
            <text:p>2541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94097222222222" calcext:value-type="float">
            <text:p>0,00029409722222222200</text:p>
          </table:table-cell>
          <table:table-cell table:formula="of:=[.D35]-[.D34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77" office:value-type="float" office:value="2618" calcext:value-type="float">
            <text:p>2618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03009259259259" calcext:value-type="float">
            <text:p>0,00030300925925925900</text:p>
          </table:table-cell>
          <table:table-cell table:formula="of:=[.D36]-[.D35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77" office:value-type="float" office:value="2695" calcext:value-type="float">
            <text:p>269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11921296296296" calcext:value-type="float">
            <text:p>0,00031192129629629600</text:p>
          </table:table-cell>
          <table:table-cell table:formula="of:=[.D37]-[.D36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77" office:value-type="float" office:value="2772" calcext:value-type="float">
            <text:p>2772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20833333333333" calcext:value-type="float">
            <text:p>0,00032083333333333300</text:p>
          </table:table-cell>
          <table:table-cell table:formula="of:=[.D38]-[.D37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77" office:value-type="float" office:value="2849" calcext:value-type="float">
            <text:p>2849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32974537037037" calcext:value-type="float">
            <text:p>0,00032974537037037000</text:p>
          </table:table-cell>
          <table:table-cell table:formula="of:=[.D39]-[.D38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77" office:value-type="float" office:value="2926" calcext:value-type="float">
            <text:p>2926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338657407407407" calcext:value-type="float">
            <text:p>0,00033865740740740700</text:p>
          </table:table-cell>
          <table:table-cell table:formula="of:=[.D40]-[.D39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77" office:value-type="float" office:value="3003" calcext:value-type="float">
            <text:p>3003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347569444444444" calcext:value-type="float">
            <text:p>0,00034756944444444400</text:p>
          </table:table-cell>
          <table:table-cell table:formula="of:=[.D41]-[.D40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77" office:value-type="float" office:value="3080" calcext:value-type="float">
            <text:p>308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356481481481482" calcext:value-type="float">
            <text:p>0,00035648148148148200</text:p>
          </table:table-cell>
          <table:table-cell table:formula="of:=[.D42]-[.D41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77" office:value-type="float" office:value="3157" calcext:value-type="float">
            <text:p>3157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365393518518519" calcext:value-type="float">
            <text:p>0,00036539351851851900</text:p>
          </table:table-cell>
          <table:table-cell table:formula="of:=[.D43]-[.D42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77" office:value-type="float" office:value="3234" calcext:value-type="float">
            <text:p>3234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374305555555556" calcext:value-type="float">
            <text:p>0,00037430555555555600</text:p>
          </table:table-cell>
          <table:table-cell table:formula="of:=[.D44]-[.D43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77" office:value-type="float" office:value="3311" calcext:value-type="float">
            <text:p>3311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383217592592593" calcext:value-type="float">
            <text:p>0,00038321759259259300</text:p>
          </table:table-cell>
          <table:table-cell table:formula="of:=[.D45]-[.D44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77" office:value-type="float" office:value="3388" calcext:value-type="float">
            <text:p>3388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39212962962963" calcext:value-type="float">
            <text:p>0,00039212962962963000</text:p>
          </table:table-cell>
          <table:table-cell table:formula="of:=[.D46]-[.D45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77" office:value-type="float" office:value="3465" calcext:value-type="float">
            <text:p>346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401041666666667" calcext:value-type="float">
            <text:p>0,00040104166666666700</text:p>
          </table:table-cell>
          <table:table-cell table:formula="of:=[.D47]-[.D46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77" office:value-type="float" office:value="3542" calcext:value-type="float">
            <text:p>3542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409953703703704" calcext:value-type="float">
            <text:p>0,00040995370370370400</text:p>
          </table:table-cell>
          <table:table-cell table:formula="of:=[.D48]-[.D47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77" office:value-type="float" office:value="3619" calcext:value-type="float">
            <text:p>3619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418865740740741" calcext:value-type="float">
            <text:p>0,00041886574074074100</text:p>
          </table:table-cell>
          <table:table-cell table:formula="of:=[.D49]-[.D48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77" office:value-type="float" office:value="3696" calcext:value-type="float">
            <text:p>3696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427777777777778" calcext:value-type="float">
            <text:p>0,00042777777777777800</text:p>
          </table:table-cell>
          <table:table-cell table:formula="of:=[.D50]-[.D49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77" office:value-type="float" office:value="3773" calcext:value-type="float">
            <text:p>3773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436689814814815" calcext:value-type="float">
            <text:p>0,00043668981481481500</text:p>
          </table:table-cell>
          <table:table-cell table:formula="of:=[.D51]-[.D50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77" office:value-type="float" office:value="3850" calcext:value-type="float">
            <text:p>38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445601851851852" calcext:value-type="float">
            <text:p>0,00044560185185185200</text:p>
          </table:table-cell>
          <table:table-cell table:formula="of:=[.D52]-[.D51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77" office:value-type="float" office:value="3927" calcext:value-type="float">
            <text:p>3927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454513888888889" calcext:value-type="float">
            <text:p>0,00045451388888888900</text:p>
          </table:table-cell>
          <table:table-cell table:formula="of:=[.D53]-[.D52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77" office:value-type="float" office:value="4004" calcext:value-type="float">
            <text:p>4004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463425925925926" calcext:value-type="float">
            <text:p>0,00046342592592592600</text:p>
          </table:table-cell>
          <table:table-cell table:formula="of:=[.D54]-[.D53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77" office:value-type="float" office:value="4081" calcext:value-type="float">
            <text:p>4081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472337962962963" calcext:value-type="float">
            <text:p>0,00047233796296296300</text:p>
          </table:table-cell>
          <table:table-cell table:formula="of:=[.D55]-[.D54]" office:value-type="float" office:value="0.00000891203703703704" calcext:value-type="float">
            <text:p>0,00000891203703703704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77" office:value-type="float" office:value="4158" calcext:value-type="float">
            <text:p>4158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48125" calcext:value-type="float">
            <text:p>0,00048125000000000000</text:p>
          </table:table-cell>
          <table:table-cell table:formula="of:=[.D56]-[.D55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77" office:value-type="float" office:value="4235" calcext:value-type="float">
            <text:p>423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490162037037037" calcext:value-type="float">
            <text:p>0,00049016203703703700</text:p>
          </table:table-cell>
          <table:table-cell table:formula="of:=[.D57]-[.D56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77" office:value-type="float" office:value="4312" calcext:value-type="float">
            <text:p>4312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499074074074074" calcext:value-type="float">
            <text:p>0,00049907407407407400</text:p>
          </table:table-cell>
          <table:table-cell table:formula="of:=[.D58]-[.D57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77" office:value-type="float" office:value="4389" calcext:value-type="float">
            <text:p>4389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507986111111111" calcext:value-type="float">
            <text:p>0,00050798611111111100</text:p>
          </table:table-cell>
          <table:table-cell table:formula="of:=[.D59]-[.D58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77" office:value-type="float" office:value="4466" calcext:value-type="float">
            <text:p>4466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516898148148148" calcext:value-type="float">
            <text:p>0,00051689814814814800</text:p>
          </table:table-cell>
          <table:table-cell table:formula="of:=[.D60]-[.D59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77" office:value-type="float" office:value="4543" calcext:value-type="float">
            <text:p>4543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525810185185185" calcext:value-type="float">
            <text:p>0,00052581018518518500</text:p>
          </table:table-cell>
          <table:table-cell table:formula="of:=[.D61]-[.D60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77" office:value-type="float" office:value="4620" calcext:value-type="float">
            <text:p>462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534722222222222" calcext:value-type="float">
            <text:p>0,00053472222222222200</text:p>
          </table:table-cell>
          <table:table-cell table:formula="of:=[.D62]-[.D61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77" office:value-type="float" office:value="4697" calcext:value-type="float">
            <text:p>4697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543634259259259" calcext:value-type="float">
            <text:p>0,00054363425925925900</text:p>
          </table:table-cell>
          <table:table-cell table:formula="of:=[.D63]-[.D62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77" office:value-type="float" office:value="4774" calcext:value-type="float">
            <text:p>4774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552546296296296" calcext:value-type="float">
            <text:p>0,00055254629629629600</text:p>
          </table:table-cell>
          <table:table-cell table:formula="of:=[.D64]-[.D63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77" office:value-type="float" office:value="4851" calcext:value-type="float">
            <text:p>4851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561458333333333" calcext:value-type="float">
            <text:p>0,00056145833333333300</text:p>
          </table:table-cell>
          <table:table-cell table:formula="of:=[.D65]-[.D64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77" office:value-type="float" office:value="4928" calcext:value-type="float">
            <text:p>4928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57037037037037" calcext:value-type="float">
            <text:p>0,00057037037037037000</text:p>
          </table:table-cell>
          <table:table-cell table:formula="of:=[.D66]-[.D65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77" office:value-type="float" office:value="5005" calcext:value-type="float">
            <text:p>500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579282407407407" calcext:value-type="float">
            <text:p>0,00057928240740740700</text:p>
          </table:table-cell>
          <table:table-cell table:formula="of:=[.D67]-[.D66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77" office:value-type="float" office:value="5082" calcext:value-type="float">
            <text:p>5082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588194444444445" calcext:value-type="float">
            <text:p>0,00058819444444444500</text:p>
          </table:table-cell>
          <table:table-cell table:formula="of:=[.D68]-[.D67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77" office:value-type="float" office:value="5159" calcext:value-type="float">
            <text:p>5159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597106481481481" calcext:value-type="float">
            <text:p>0,00059710648148148100</text:p>
          </table:table-cell>
          <table:table-cell table:formula="of:=[.D69]-[.D68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77" office:value-type="float" office:value="5236" calcext:value-type="float">
            <text:p>5236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606018518518519" calcext:value-type="float">
            <text:p>0,00060601851851851900</text:p>
          </table:table-cell>
          <table:table-cell table:formula="of:=[.D70]-[.D69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77" office:value-type="float" office:value="5313" calcext:value-type="float">
            <text:p>5313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614930555555556" calcext:value-type="float">
            <text:p>0,00061493055555555600</text:p>
          </table:table-cell>
          <table:table-cell table:formula="of:=[.D71]-[.D70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77" office:value-type="float" office:value="5390" calcext:value-type="float">
            <text:p>539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623842592592593" calcext:value-type="float">
            <text:p>0,00062384259259259300</text:p>
          </table:table-cell>
          <table:table-cell table:formula="of:=[.D72]-[.D71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77" office:value-type="float" office:value="5467" calcext:value-type="float">
            <text:p>5467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63275462962963" calcext:value-type="float">
            <text:p>0,00063275462962963000</text:p>
          </table:table-cell>
          <table:table-cell table:formula="of:=[.D73]-[.D72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77" office:value-type="float" office:value="5544" calcext:value-type="float">
            <text:p>5544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641666666666667" calcext:value-type="float">
            <text:p>0,00064166666666666700</text:p>
          </table:table-cell>
          <table:table-cell table:formula="of:=[.D74]-[.D73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77" office:value-type="float" office:value="5621" calcext:value-type="float">
            <text:p>5621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650578703703704" calcext:value-type="float">
            <text:p>0,00065057870370370400</text:p>
          </table:table-cell>
          <table:table-cell table:formula="of:=[.D75]-[.D74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77" office:value-type="float" office:value="5698" calcext:value-type="float">
            <text:p>5698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659490740740741" calcext:value-type="float">
            <text:p>0,00065949074074074100</text:p>
          </table:table-cell>
          <table:table-cell table:formula="of:=[.D76]-[.D75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77" office:value-type="float" office:value="5775" calcext:value-type="float">
            <text:p>577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668402777777778" calcext:value-type="float">
            <text:p>0,00066840277777777800</text:p>
          </table:table-cell>
          <table:table-cell table:formula="of:=[.D77]-[.D76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77" office:value-type="float" office:value="5852" calcext:value-type="float">
            <text:p>5852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677314814814815" calcext:value-type="float">
            <text:p>0,00067731481481481500</text:p>
          </table:table-cell>
          <table:table-cell table:formula="of:=[.D78]-[.D77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77" office:value-type="float" office:value="5929" calcext:value-type="float">
            <text:p>5929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686226851851852" calcext:value-type="float">
            <text:p>0,00068622685185185200</text:p>
          </table:table-cell>
          <table:table-cell table:formula="of:=[.D79]-[.D78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77" office:value-type="float" office:value="6006" calcext:value-type="float">
            <text:p>6006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695138888888889" calcext:value-type="float">
            <text:p>0,00069513888888888900</text:p>
          </table:table-cell>
          <table:table-cell table:formula="of:=[.D80]-[.D79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77" office:value-type="float" office:value="6083" calcext:value-type="float">
            <text:p>6083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704050925925926" calcext:value-type="float">
            <text:p>0,00070405092592592600</text:p>
          </table:table-cell>
          <table:table-cell table:formula="of:=[.D81]-[.D80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77" office:value-type="float" office:value="6160" calcext:value-type="float">
            <text:p>616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712962962962963" calcext:value-type="float">
            <text:p>0,00071296296296296300</text:p>
          </table:table-cell>
          <table:table-cell table:formula="of:=[.D82]-[.D81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77" office:value-type="float" office:value="6237" calcext:value-type="float">
            <text:p>6237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721875" calcext:value-type="float">
            <text:p>0,00072187500000000000</text:p>
          </table:table-cell>
          <table:table-cell table:formula="of:=[.D83]-[.D82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77" office:value-type="float" office:value="6314" calcext:value-type="float">
            <text:p>6314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730787037037037" calcext:value-type="float">
            <text:p>0,00073078703703703700</text:p>
          </table:table-cell>
          <table:table-cell table:formula="of:=[.D84]-[.D83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77" office:value-type="float" office:value="6391" calcext:value-type="float">
            <text:p>6391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739699074074074" calcext:value-type="float">
            <text:p>0,00073969907407407400</text:p>
          </table:table-cell>
          <table:table-cell table:formula="of:=[.D85]-[.D84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77" office:value-type="float" office:value="6468" calcext:value-type="float">
            <text:p>6468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748611111111111" calcext:value-type="float">
            <text:p>0,00074861111111111100</text:p>
          </table:table-cell>
          <table:table-cell table:formula="of:=[.D86]-[.D85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77" office:value-type="float" office:value="6545" calcext:value-type="float">
            <text:p>654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757523148148148" calcext:value-type="float">
            <text:p>0,00075752314814814800</text:p>
          </table:table-cell>
          <table:table-cell table:formula="of:=[.D87]-[.D86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77" office:value-type="float" office:value="6622" calcext:value-type="float">
            <text:p>6622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766435185185185" calcext:value-type="float">
            <text:p>0,00076643518518518500</text:p>
          </table:table-cell>
          <table:table-cell table:formula="of:=[.D88]-[.D87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77" office:value-type="float" office:value="6699" calcext:value-type="float">
            <text:p>6699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775347222222222" calcext:value-type="float">
            <text:p>0,00077534722222222200</text:p>
          </table:table-cell>
          <table:table-cell table:formula="of:=[.D89]-[.D88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77" office:value-type="float" office:value="6776" calcext:value-type="float">
            <text:p>6776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784259259259259" calcext:value-type="float">
            <text:p>0,00078425925925925900</text:p>
          </table:table-cell>
          <table:table-cell table:formula="of:=[.D90]-[.D89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77" office:value-type="float" office:value="6853" calcext:value-type="float">
            <text:p>6853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793171296296296" calcext:value-type="float">
            <text:p>0,00079317129629629600</text:p>
          </table:table-cell>
          <table:table-cell table:formula="of:=[.D91]-[.D90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77" office:value-type="float" office:value="6930" calcext:value-type="float">
            <text:p>693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802083333333333" calcext:value-type="float">
            <text:p>0,00080208333333333300</text:p>
          </table:table-cell>
          <table:table-cell table:formula="of:=[.D92]-[.D91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77" office:value-type="float" office:value="7007" calcext:value-type="float">
            <text:p>7007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81099537037037" calcext:value-type="float">
            <text:p>0,00081099537037037100</text:p>
          </table:table-cell>
          <table:table-cell table:formula="of:=[.D93]-[.D92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77" office:value-type="float" office:value="7084" calcext:value-type="float">
            <text:p>7084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819907407407407" calcext:value-type="float">
            <text:p>0,00081990740740740700</text:p>
          </table:table-cell>
          <table:table-cell table:formula="of:=[.D94]-[.D93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77" office:value-type="float" office:value="7161" calcext:value-type="float">
            <text:p>7161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828819444444444" calcext:value-type="float">
            <text:p>0,00082881944444444500</text:p>
          </table:table-cell>
          <table:table-cell table:formula="of:=[.D95]-[.D94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77" office:value-type="float" office:value="7238" calcext:value-type="float">
            <text:p>7238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837731481481482" calcext:value-type="float">
            <text:p>0,00083773148148148100</text:p>
          </table:table-cell>
          <table:table-cell table:formula="of:=[.D96]-[.D95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77" office:value-type="float" office:value="7315" calcext:value-type="float">
            <text:p>731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846643518518519" calcext:value-type="float">
            <text:p>0,00084664351851851900</text:p>
          </table:table-cell>
          <table:table-cell table:formula="of:=[.D97]-[.D96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77" office:value-type="float" office:value="7392" calcext:value-type="float">
            <text:p>7392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855555555555556" calcext:value-type="float">
            <text:p>0,00085555555555555600</text:p>
          </table:table-cell>
          <table:table-cell table:formula="of:=[.D98]-[.D97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77" office:value-type="float" office:value="7469" calcext:value-type="float">
            <text:p>7469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864467592592593" calcext:value-type="float">
            <text:p>0,00086446759259259300</text:p>
          </table:table-cell>
          <table:table-cell table:formula="of:=[.D99]-[.D98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77" office:value-type="float" office:value="7546" calcext:value-type="float">
            <text:p>7546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87337962962963" calcext:value-type="float">
            <text:p>0,00087337962962963000</text:p>
          </table:table-cell>
          <table:table-cell table:formula="of:=[.D100]-[.D99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77" office:value-type="float" office:value="7623" calcext:value-type="float">
            <text:p>7623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882291666666667" calcext:value-type="float">
            <text:p>0,00088229166666666700</text:p>
          </table:table-cell>
          <table:table-cell table:formula="of:=[.D101]-[.D100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77" office:value-type="float" office:value="7700" calcext:value-type="float">
            <text:p>77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891203703703704" calcext:value-type="float">
            <text:p>0,00089120370370370400</text:p>
          </table:table-cell>
          <table:table-cell table:formula="of:=[.D102]-[.D101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77" office:value-type="float" office:value="7777" calcext:value-type="float">
            <text:p>7777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900115740740741" calcext:value-type="float">
            <text:p>0,00090011574074074100</text:p>
          </table:table-cell>
          <table:table-cell table:formula="of:=[.D103]-[.D102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77" office:value-type="float" office:value="7854" calcext:value-type="float">
            <text:p>7854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909027777777778" calcext:value-type="float">
            <text:p>0,00090902777777777800</text:p>
          </table:table-cell>
          <table:table-cell table:formula="of:=[.D104]-[.D103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77" office:value-type="float" office:value="7931" calcext:value-type="float">
            <text:p>7931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917939814814815" calcext:value-type="float">
            <text:p>0,00091793981481481500</text:p>
          </table:table-cell>
          <table:table-cell table:formula="of:=[.D105]-[.D104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77" office:value-type="float" office:value="8008" calcext:value-type="float">
            <text:p>8008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926851851851852" calcext:value-type="float">
            <text:p>0,00092685185185185200</text:p>
          </table:table-cell>
          <table:table-cell table:formula="of:=[.D106]-[.D105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77" office:value-type="float" office:value="8085" calcext:value-type="float">
            <text:p>808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935763888888889" calcext:value-type="float">
            <text:p>0,00093576388888888900</text:p>
          </table:table-cell>
          <table:table-cell table:formula="of:=[.D107]-[.D106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77" office:value-type="float" office:value="8162" calcext:value-type="float">
            <text:p>8162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944675925925926" calcext:value-type="float">
            <text:p>0,00094467592592592600</text:p>
          </table:table-cell>
          <table:table-cell table:formula="of:=[.D108]-[.D107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77" office:value-type="float" office:value="8239" calcext:value-type="float">
            <text:p>8239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953587962962963" calcext:value-type="float">
            <text:p>0,00095358796296296300</text:p>
          </table:table-cell>
          <table:table-cell table:formula="of:=[.D109]-[.D108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77" office:value-type="float" office:value="8316" calcext:value-type="float">
            <text:p>8316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9625" calcext:value-type="float">
            <text:p>0,00096250000000000000</text:p>
          </table:table-cell>
          <table:table-cell table:formula="of:=[.D110]-[.D109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77" office:value-type="float" office:value="8393" calcext:value-type="float">
            <text:p>8393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971412037037037" calcext:value-type="float">
            <text:p>0,00097141203703703700</text:p>
          </table:table-cell>
          <table:table-cell table:formula="of:=[.D111]-[.D110]" office:value-type="float" office:value="0.00000891203703703698" calcext:value-type="float">
            <text:p>0,00000891203703703698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77" office:value-type="float" office:value="8470" calcext:value-type="float">
            <text:p>847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980324074074074" calcext:value-type="float">
            <text:p>0,00098032407407407400</text:p>
          </table:table-cell>
          <table:table-cell table:formula="of:=[.D112]-[.D111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77" office:value-type="float" office:value="8547" calcext:value-type="float">
            <text:p>8547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989236111111111" calcext:value-type="float">
            <text:p>0,00098923611111111100</text:p>
          </table:table-cell>
          <table:table-cell table:formula="of:=[.D113]-[.D112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77" office:value-type="float" office:value="8624" calcext:value-type="float">
            <text:p>8624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998148148148148" calcext:value-type="float">
            <text:p>0,00099814814814814800</text:p>
          </table:table-cell>
          <table:table-cell table:formula="of:=[.D114]-[.D113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77" office:value-type="float" office:value="8701" calcext:value-type="float">
            <text:p>8701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00706018518519" calcext:value-type="float">
            <text:p>0,00100706018518519000</text:p>
          </table:table-cell>
          <table:table-cell table:formula="of:=[.D115]-[.D114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77" office:value-type="float" office:value="8778" calcext:value-type="float">
            <text:p>8778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01597222222222" calcext:value-type="float">
            <text:p>0,00101597222222222000</text:p>
          </table:table-cell>
          <table:table-cell table:formula="of:=[.D116]-[.D115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77" office:value-type="float" office:value="8855" calcext:value-type="float">
            <text:p>885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02488425925926" calcext:value-type="float">
            <text:p>0,00102488425925926000</text:p>
          </table:table-cell>
          <table:table-cell table:formula="of:=[.D117]-[.D116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77" office:value-type="float" office:value="8932" calcext:value-type="float">
            <text:p>8932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0337962962963" calcext:value-type="float">
            <text:p>0,00103379629629630000</text:p>
          </table:table-cell>
          <table:table-cell table:formula="of:=[.D118]-[.D117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77" office:value-type="float" office:value="9009" calcext:value-type="float">
            <text:p>9009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04270833333333" calcext:value-type="float">
            <text:p>0,00104270833333333000</text:p>
          </table:table-cell>
          <table:table-cell table:formula="of:=[.D119]-[.D118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77" office:value-type="float" office:value="9086" calcext:value-type="float">
            <text:p>9086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05162037037037" calcext:value-type="float">
            <text:p>0,00105162037037037000</text:p>
          </table:table-cell>
          <table:table-cell table:formula="of:=[.D120]-[.D119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77" office:value-type="float" office:value="9163" calcext:value-type="float">
            <text:p>9163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06053240740741" calcext:value-type="float">
            <text:p>0,00106053240740741000</text:p>
          </table:table-cell>
          <table:table-cell table:formula="of:=[.D121]-[.D120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77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06944444444444" calcext:value-type="float">
            <text:p>0,00106944444444444000</text:p>
          </table:table-cell>
          <table:table-cell table:formula="of:=[.D122]-[.D121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77" office:value-type="float" office:value="9317" calcext:value-type="float">
            <text:p>9317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07835648148148" calcext:value-type="float">
            <text:p>0,00107835648148148000</text:p>
          </table:table-cell>
          <table:table-cell table:formula="of:=[.D123]-[.D122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77" office:value-type="float" office:value="9394" calcext:value-type="float">
            <text:p>9394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08726851851852" calcext:value-type="float">
            <text:p>0,00108726851851852000</text:p>
          </table:table-cell>
          <table:table-cell table:formula="of:=[.D124]-[.D123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77" office:value-type="float" office:value="9471" calcext:value-type="float">
            <text:p>9471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09618055555556" calcext:value-type="float">
            <text:p>0,00109618055555556000</text:p>
          </table:table-cell>
          <table:table-cell table:formula="of:=[.D125]-[.D124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77" office:value-type="float" office:value="9548" calcext:value-type="float">
            <text:p>9548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10509259259259" calcext:value-type="float">
            <text:p>0,00110509259259259000</text:p>
          </table:table-cell>
          <table:table-cell table:formula="of:=[.D126]-[.D125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77" office:value-type="float" office:value="9625" calcext:value-type="float">
            <text:p>962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11400462962963" calcext:value-type="float">
            <text:p>0,00111400462962963000</text:p>
          </table:table-cell>
          <table:table-cell table:formula="of:=[.D127]-[.D126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77" office:value-type="float" office:value="9702" calcext:value-type="float">
            <text:p>9702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12291666666667" calcext:value-type="float">
            <text:p>0,00112291666666667000</text:p>
          </table:table-cell>
          <table:table-cell table:formula="of:=[.D128]-[.D127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77" office:value-type="float" office:value="9779" calcext:value-type="float">
            <text:p>9779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1318287037037" calcext:value-type="float">
            <text:p>0,00113182870370370000</text:p>
          </table:table-cell>
          <table:table-cell table:formula="of:=[.D129]-[.D128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77" office:value-type="float" office:value="9856" calcext:value-type="float">
            <text:p>9856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14074074074074" calcext:value-type="float">
            <text:p>0,00114074074074074000</text:p>
          </table:table-cell>
          <table:table-cell table:formula="of:=[.D130]-[.D129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77" office:value-type="float" office:value="9933" calcext:value-type="float">
            <text:p>9933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14965277777778" calcext:value-type="float">
            <text:p>0,00114965277777778000</text:p>
          </table:table-cell>
          <table:table-cell table:formula="of:=[.D131]-[.D130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77" office:value-type="float" office:value="10010" calcext:value-type="float">
            <text:p>1001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15856481481481" calcext:value-type="float">
            <text:p>0,00115856481481481000</text:p>
          </table:table-cell>
          <table:table-cell table:formula="of:=[.D132]-[.D131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77" office:value-type="float" office:value="10087" calcext:value-type="float">
            <text:p>10087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16747685185185" calcext:value-type="float">
            <text:p>0,00116747685185185000</text:p>
          </table:table-cell>
          <table:table-cell table:formula="of:=[.D133]-[.D132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77" office:value-type="float" office:value="10164" calcext:value-type="float">
            <text:p>10164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17638888888889" calcext:value-type="float">
            <text:p>0,00117638888888889000</text:p>
          </table:table-cell>
          <table:table-cell table:formula="of:=[.D134]-[.D133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77" office:value-type="float" office:value="10241" calcext:value-type="float">
            <text:p>10241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18530092592593" calcext:value-type="float">
            <text:p>0,00118530092592593000</text:p>
          </table:table-cell>
          <table:table-cell table:formula="of:=[.D135]-[.D134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77" office:value-type="float" office:value="10318" calcext:value-type="float">
            <text:p>10318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19421296296296" calcext:value-type="float">
            <text:p>0,00119421296296296000</text:p>
          </table:table-cell>
          <table:table-cell table:formula="of:=[.D136]-[.D135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77" office:value-type="float" office:value="10395" calcext:value-type="float">
            <text:p>1039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203125" calcext:value-type="float">
            <text:p>0,00120312500000000000</text:p>
          </table:table-cell>
          <table:table-cell table:formula="of:=[.D137]-[.D136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77" office:value-type="float" office:value="10472" calcext:value-type="float">
            <text:p>10472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21203703703704" calcext:value-type="float">
            <text:p>0,00121203703703704000</text:p>
          </table:table-cell>
          <table:table-cell table:formula="of:=[.D138]-[.D137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77" office:value-type="float" office:value="10549" calcext:value-type="float">
            <text:p>10549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22094907407407" calcext:value-type="float">
            <text:p>0,00122094907407407000</text:p>
          </table:table-cell>
          <table:table-cell table:formula="of:=[.D139]-[.D138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77" office:value-type="float" office:value="10626" calcext:value-type="float">
            <text:p>10626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22986111111111" calcext:value-type="float">
            <text:p>0,00122986111111111000</text:p>
          </table:table-cell>
          <table:table-cell table:formula="of:=[.D140]-[.D139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77" office:value-type="float" office:value="10703" calcext:value-type="float">
            <text:p>10703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23877314814815" calcext:value-type="float">
            <text:p>0,00123877314814815000</text:p>
          </table:table-cell>
          <table:table-cell table:formula="of:=[.D141]-[.D140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77" office:value-type="float" office:value="10780" calcext:value-type="float">
            <text:p>1078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24768518518519" calcext:value-type="float">
            <text:p>0,00124768518518519000</text:p>
          </table:table-cell>
          <table:table-cell table:formula="of:=[.D142]-[.D141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77" office:value-type="float" office:value="10857" calcext:value-type="float">
            <text:p>10857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25659722222222" calcext:value-type="float">
            <text:p>0,00125659722222222000</text:p>
          </table:table-cell>
          <table:table-cell table:formula="of:=[.D143]-[.D142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77" office:value-type="float" office:value="10934" calcext:value-type="float">
            <text:p>10934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26550925925926" calcext:value-type="float">
            <text:p>0,00126550925925926000</text:p>
          </table:table-cell>
          <table:table-cell table:formula="of:=[.D144]-[.D143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77" office:value-type="float" office:value="11011" calcext:value-type="float">
            <text:p>11011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2744212962963" calcext:value-type="float">
            <text:p>0,00127442129629630000</text:p>
          </table:table-cell>
          <table:table-cell table:formula="of:=[.D145]-[.D144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77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28333333333333" calcext:value-type="float">
            <text:p>0,00128333333333333000</text:p>
          </table:table-cell>
          <table:table-cell table:formula="of:=[.D146]-[.D145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77" office:value-type="float" office:value="11165" calcext:value-type="float">
            <text:p>1116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29224537037037" calcext:value-type="float">
            <text:p>0,00129224537037037000</text:p>
          </table:table-cell>
          <table:table-cell table:formula="of:=[.D147]-[.D146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77" office:value-type="float" office:value="11242" calcext:value-type="float">
            <text:p>11242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30115740740741" calcext:value-type="float">
            <text:p>0,00130115740740741000</text:p>
          </table:table-cell>
          <table:table-cell table:formula="of:=[.D148]-[.D147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77" office:value-type="float" office:value="11319" calcext:value-type="float">
            <text:p>11319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31006944444444" calcext:value-type="float">
            <text:p>0,00131006944444444000</text:p>
          </table:table-cell>
          <table:table-cell table:formula="of:=[.D149]-[.D148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77" office:value-type="float" office:value="11396" calcext:value-type="float">
            <text:p>11396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31898148148148" calcext:value-type="float">
            <text:p>0,00131898148148148000</text:p>
          </table:table-cell>
          <table:table-cell table:formula="of:=[.D150]-[.D149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77" office:value-type="float" office:value="11473" calcext:value-type="float">
            <text:p>11473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32789351851852" calcext:value-type="float">
            <text:p>0,00132789351851852000</text:p>
          </table:table-cell>
          <table:table-cell table:formula="of:=[.D151]-[.D150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77" office:value-type="float" office:value="11550" calcext:value-type="float">
            <text:p>115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33680555555556" calcext:value-type="float">
            <text:p>0,00133680555555556000</text:p>
          </table:table-cell>
          <table:table-cell table:formula="of:=[.D152]-[.D151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77" office:value-type="float" office:value="11627" calcext:value-type="float">
            <text:p>11627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34571759259259" calcext:value-type="float">
            <text:p>0,00134571759259259000</text:p>
          </table:table-cell>
          <table:table-cell table:formula="of:=[.D153]-[.D152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77" office:value-type="float" office:value="11704" calcext:value-type="float">
            <text:p>11704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35462962962963" calcext:value-type="float">
            <text:p>0,00135462962962963000</text:p>
          </table:table-cell>
          <table:table-cell table:formula="of:=[.D154]-[.D153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77" office:value-type="float" office:value="11781" calcext:value-type="float">
            <text:p>11781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36354166666667" calcext:value-type="float">
            <text:p>0,00136354166666667000</text:p>
          </table:table-cell>
          <table:table-cell table:formula="of:=[.D155]-[.D154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77" office:value-type="float" office:value="11858" calcext:value-type="float">
            <text:p>11858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3724537037037" calcext:value-type="float">
            <text:p>0,00137245370370370000</text:p>
          </table:table-cell>
          <table:table-cell table:formula="of:=[.D156]-[.D155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77" office:value-type="float" office:value="11935" calcext:value-type="float">
            <text:p>1193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38136574074074" calcext:value-type="float">
            <text:p>0,00138136574074074000</text:p>
          </table:table-cell>
          <table:table-cell table:formula="of:=[.D157]-[.D156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77" office:value-type="float" office:value="12012" calcext:value-type="float">
            <text:p>12012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39027777777778" calcext:value-type="float">
            <text:p>0,00139027777777778000</text:p>
          </table:table-cell>
          <table:table-cell table:formula="of:=[.D158]-[.D157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77" office:value-type="float" office:value="12089" calcext:value-type="float">
            <text:p>12089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39918981481482" calcext:value-type="float">
            <text:p>0,00139918981481482000</text:p>
          </table:table-cell>
          <table:table-cell table:formula="of:=[.D159]-[.D158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77" office:value-type="float" office:value="12166" calcext:value-type="float">
            <text:p>12166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40810185185185" calcext:value-type="float">
            <text:p>0,00140810185185185000</text:p>
          </table:table-cell>
          <table:table-cell table:formula="of:=[.D160]-[.D159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77" office:value-type="float" office:value="12243" calcext:value-type="float">
            <text:p>12243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41701388888889" calcext:value-type="float">
            <text:p>0,00141701388888889000</text:p>
          </table:table-cell>
          <table:table-cell table:formula="of:=[.D161]-[.D160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77" office:value-type="float" office:value="12320" calcext:value-type="float">
            <text:p>1232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42592592592593" calcext:value-type="float">
            <text:p>0,00142592592592593000</text:p>
          </table:table-cell>
          <table:table-cell table:formula="of:=[.D162]-[.D161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77" office:value-type="float" office:value="12397" calcext:value-type="float">
            <text:p>12397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43483796296296" calcext:value-type="float">
            <text:p>0,00143483796296296000</text:p>
          </table:table-cell>
          <table:table-cell table:formula="of:=[.D163]-[.D162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77" office:value-type="float" office:value="12474" calcext:value-type="float">
            <text:p>12474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44375" calcext:value-type="float">
            <text:p>0,00144375000000000000</text:p>
          </table:table-cell>
          <table:table-cell table:formula="of:=[.D164]-[.D163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77" office:value-type="float" office:value="12551" calcext:value-type="float">
            <text:p>12551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45266203703704" calcext:value-type="float">
            <text:p>0,00145266203703704000</text:p>
          </table:table-cell>
          <table:table-cell table:formula="of:=[.D165]-[.D164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77" office:value-type="float" office:value="12628" calcext:value-type="float">
            <text:p>12628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46157407407407" calcext:value-type="float">
            <text:p>0,00146157407407407000</text:p>
          </table:table-cell>
          <table:table-cell table:formula="of:=[.D166]-[.D165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77" office:value-type="float" office:value="12705" calcext:value-type="float">
            <text:p>1270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47048611111111" calcext:value-type="float">
            <text:p>0,00147048611111111000</text:p>
          </table:table-cell>
          <table:table-cell table:formula="of:=[.D167]-[.D166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77" office:value-type="float" office:value="12782" calcext:value-type="float">
            <text:p>12782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47939814814815" calcext:value-type="float">
            <text:p>0,00147939814814815000</text:p>
          </table:table-cell>
          <table:table-cell table:formula="of:=[.D168]-[.D167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77" office:value-type="float" office:value="12859" calcext:value-type="float">
            <text:p>12859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48831018518519" calcext:value-type="float">
            <text:p>0,00148831018518519000</text:p>
          </table:table-cell>
          <table:table-cell table:formula="of:=[.D169]-[.D168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77" office:value-type="float" office:value="12936" calcext:value-type="float">
            <text:p>12936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49722222222222" calcext:value-type="float">
            <text:p>0,00149722222222222000</text:p>
          </table:table-cell>
          <table:table-cell table:formula="of:=[.D170]-[.D169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77" office:value-type="float" office:value="13013" calcext:value-type="float">
            <text:p>13013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50613425925926" calcext:value-type="float">
            <text:p>0,00150613425925926000</text:p>
          </table:table-cell>
          <table:table-cell table:formula="of:=[.D171]-[.D170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77" office:value-type="float" office:value="13090" calcext:value-type="float">
            <text:p>1309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5150462962963" calcext:value-type="float">
            <text:p>0,00151504629629630000</text:p>
          </table:table-cell>
          <table:table-cell table:formula="of:=[.D172]-[.D171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77" office:value-type="float" office:value="13167" calcext:value-type="float">
            <text:p>13167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52395833333333" calcext:value-type="float">
            <text:p>0,00152395833333333000</text:p>
          </table:table-cell>
          <table:table-cell table:formula="of:=[.D173]-[.D172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77" office:value-type="float" office:value="13244" calcext:value-type="float">
            <text:p>13244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53287037037037" calcext:value-type="float">
            <text:p>0,00153287037037037000</text:p>
          </table:table-cell>
          <table:table-cell table:formula="of:=[.D174]-[.D173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77" office:value-type="float" office:value="13321" calcext:value-type="float">
            <text:p>13321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54178240740741" calcext:value-type="float">
            <text:p>0,00154178240740741000</text:p>
          </table:table-cell>
          <table:table-cell table:formula="of:=[.D175]-[.D174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77" office:value-type="float" office:value="13398" calcext:value-type="float">
            <text:p>13398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55069444444444" calcext:value-type="float">
            <text:p>0,00155069444444444000</text:p>
          </table:table-cell>
          <table:table-cell table:formula="of:=[.D176]-[.D175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77" office:value-type="float" office:value="13475" calcext:value-type="float">
            <text:p>1347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55960648148148" calcext:value-type="float">
            <text:p>0,00155960648148148000</text:p>
          </table:table-cell>
          <table:table-cell table:formula="of:=[.D177]-[.D176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77" office:value-type="float" office:value="13552" calcext:value-type="float">
            <text:p>13552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56851851851852" calcext:value-type="float">
            <text:p>0,00156851851851852000</text:p>
          </table:table-cell>
          <table:table-cell table:formula="of:=[.D178]-[.D177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77" office:value-type="float" office:value="13629" calcext:value-type="float">
            <text:p>13629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57743055555556" calcext:value-type="float">
            <text:p>0,00157743055555556000</text:p>
          </table:table-cell>
          <table:table-cell table:formula="of:=[.D179]-[.D178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77" office:value-type="float" office:value="13706" calcext:value-type="float">
            <text:p>13706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58634259259259" calcext:value-type="float">
            <text:p>0,00158634259259259000</text:p>
          </table:table-cell>
          <table:table-cell table:formula="of:=[.D180]-[.D179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77" office:value-type="float" office:value="13783" calcext:value-type="float">
            <text:p>13783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59525462962963" calcext:value-type="float">
            <text:p>0,00159525462962963000</text:p>
          </table:table-cell>
          <table:table-cell table:formula="of:=[.D181]-[.D180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77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60416666666667" calcext:value-type="float">
            <text:p>0,00160416666666667000</text:p>
          </table:table-cell>
          <table:table-cell table:formula="of:=[.D182]-[.D181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77" office:value-type="float" office:value="13937" calcext:value-type="float">
            <text:p>13937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6130787037037" calcext:value-type="float">
            <text:p>0,00161307870370370000</text:p>
          </table:table-cell>
          <table:table-cell table:formula="of:=[.D183]-[.D182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77" office:value-type="float" office:value="14014" calcext:value-type="float">
            <text:p>14014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62199074074074" calcext:value-type="float">
            <text:p>0,00162199074074074000</text:p>
          </table:table-cell>
          <table:table-cell table:formula="of:=[.D184]-[.D183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77" office:value-type="float" office:value="14091" calcext:value-type="float">
            <text:p>14091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63090277777778" calcext:value-type="float">
            <text:p>0,00163090277777778000</text:p>
          </table:table-cell>
          <table:table-cell table:formula="of:=[.D185]-[.D184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77" office:value-type="float" office:value="14168" calcext:value-type="float">
            <text:p>14168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63981481481481" calcext:value-type="float">
            <text:p>0,00163981481481481000</text:p>
          </table:table-cell>
          <table:table-cell table:formula="of:=[.D186]-[.D185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77" office:value-type="float" office:value="14245" calcext:value-type="float">
            <text:p>1424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64872685185185" calcext:value-type="float">
            <text:p>0,00164872685185185000</text:p>
          </table:table-cell>
          <table:table-cell table:formula="of:=[.D187]-[.D186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77" office:value-type="float" office:value="14322" calcext:value-type="float">
            <text:p>14322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65763888888889" calcext:value-type="float">
            <text:p>0,00165763888888889000</text:p>
          </table:table-cell>
          <table:table-cell table:formula="of:=[.D188]-[.D187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77" office:value-type="float" office:value="14399" calcext:value-type="float">
            <text:p>14399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66655092592593" calcext:value-type="float">
            <text:p>0,00166655092592593000</text:p>
          </table:table-cell>
          <table:table-cell table:formula="of:=[.D189]-[.D188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77" office:value-type="float" office:value="14476" calcext:value-type="float">
            <text:p>14476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67546296296296" calcext:value-type="float">
            <text:p>0,00167546296296296000</text:p>
          </table:table-cell>
          <table:table-cell table:formula="of:=[.D190]-[.D189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77" office:value-type="float" office:value="14553" calcext:value-type="float">
            <text:p>14553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684375" calcext:value-type="float">
            <text:p>0,00168437500000000000</text:p>
          </table:table-cell>
          <table:table-cell table:formula="of:=[.D191]-[.D190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77" office:value-type="float" office:value="14630" calcext:value-type="float">
            <text:p>1463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69328703703704" calcext:value-type="float">
            <text:p>0,00169328703703704000</text:p>
          </table:table-cell>
          <table:table-cell table:formula="of:=[.D192]-[.D191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77" office:value-type="float" office:value="14707" calcext:value-type="float">
            <text:p>14707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70219907407407" calcext:value-type="float">
            <text:p>0,00170219907407407000</text:p>
          </table:table-cell>
          <table:table-cell table:formula="of:=[.D193]-[.D192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77" office:value-type="float" office:value="14784" calcext:value-type="float">
            <text:p>14784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71111111111111" calcext:value-type="float">
            <text:p>0,00171111111111111000</text:p>
          </table:table-cell>
          <table:table-cell table:formula="of:=[.D194]-[.D193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77" office:value-type="float" office:value="14861" calcext:value-type="float">
            <text:p>14861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72002314814815" calcext:value-type="float">
            <text:p>0,00172002314814815000</text:p>
          </table:table-cell>
          <table:table-cell table:formula="of:=[.D195]-[.D194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77" office:value-type="float" office:value="14938" calcext:value-type="float">
            <text:p>14938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72893518518519" calcext:value-type="float">
            <text:p>0,00172893518518519000</text:p>
          </table:table-cell>
          <table:table-cell table:formula="of:=[.D196]-[.D195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77" office:value-type="float" office:value="15015" calcext:value-type="float">
            <text:p>1501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73784722222222" calcext:value-type="float">
            <text:p>0,00173784722222222000</text:p>
          </table:table-cell>
          <table:table-cell table:formula="of:=[.D197]-[.D196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77" office:value-type="float" office:value="15092" calcext:value-type="float">
            <text:p>15092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74675925925926" calcext:value-type="float">
            <text:p>0,00174675925925926000</text:p>
          </table:table-cell>
          <table:table-cell table:formula="of:=[.D198]-[.D197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77" office:value-type="float" office:value="15169" calcext:value-type="float">
            <text:p>15169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7556712962963" calcext:value-type="float">
            <text:p>0,00175567129629630000</text:p>
          </table:table-cell>
          <table:table-cell table:formula="of:=[.D199]-[.D198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77" office:value-type="float" office:value="15246" calcext:value-type="float">
            <text:p>15246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76458333333333" calcext:value-type="float">
            <text:p>0,00176458333333333000</text:p>
          </table:table-cell>
          <table:table-cell table:formula="of:=[.D200]-[.D199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77" office:value-type="float" office:value="15323" calcext:value-type="float">
            <text:p>15323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77349537037037" calcext:value-type="float">
            <text:p>0,00177349537037037000</text:p>
          </table:table-cell>
          <table:table-cell table:formula="of:=[.D201]-[.D200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77" office:value-type="float" office:value="15400" calcext:value-type="float">
            <text:p>154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78240740740741" calcext:value-type="float">
            <text:p>0,00178240740740741000</text:p>
          </table:table-cell>
          <table:table-cell table:formula="of:=[.D202]-[.D201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77" office:value-type="float" office:value="15477" calcext:value-type="float">
            <text:p>15477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79131944444444" calcext:value-type="float">
            <text:p>0,00179131944444444000</text:p>
          </table:table-cell>
          <table:table-cell table:formula="of:=[.D203]-[.D202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77" office:value-type="float" office:value="15554" calcext:value-type="float">
            <text:p>15554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80023148148148" calcext:value-type="float">
            <text:p>0,00180023148148148000</text:p>
          </table:table-cell>
          <table:table-cell table:formula="of:=[.D204]-[.D203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77" office:value-type="float" office:value="15631" calcext:value-type="float">
            <text:p>15631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80914351851852" calcext:value-type="float">
            <text:p>0,00180914351851852000</text:p>
          </table:table-cell>
          <table:table-cell table:formula="of:=[.D205]-[.D204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77" office:value-type="float" office:value="15708" calcext:value-type="float">
            <text:p>15708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81805555555556" calcext:value-type="float">
            <text:p>0,00181805555555556000</text:p>
          </table:table-cell>
          <table:table-cell table:formula="of:=[.D206]-[.D205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77" office:value-type="float" office:value="15785" calcext:value-type="float">
            <text:p>1578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82696759259259" calcext:value-type="float">
            <text:p>0,00182696759259259000</text:p>
          </table:table-cell>
          <table:table-cell table:formula="of:=[.D207]-[.D206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77" office:value-type="float" office:value="15862" calcext:value-type="float">
            <text:p>15862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83587962962963" calcext:value-type="float">
            <text:p>0,00183587962962963000</text:p>
          </table:table-cell>
          <table:table-cell table:formula="of:=[.D208]-[.D207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77" office:value-type="float" office:value="15939" calcext:value-type="float">
            <text:p>15939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84479166666667" calcext:value-type="float">
            <text:p>0,00184479166666667000</text:p>
          </table:table-cell>
          <table:table-cell table:formula="of:=[.D209]-[.D208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77" office:value-type="float" office:value="16016" calcext:value-type="float">
            <text:p>16016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8537037037037" calcext:value-type="float">
            <text:p>0,00185370370370370000</text:p>
          </table:table-cell>
          <table:table-cell table:formula="of:=[.D210]-[.D209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77" office:value-type="float" office:value="16093" calcext:value-type="float">
            <text:p>16093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86261574074074" calcext:value-type="float">
            <text:p>0,00186261574074074000</text:p>
          </table:table-cell>
          <table:table-cell table:formula="of:=[.D211]-[.D210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77" office:value-type="float" office:value="16170" calcext:value-type="float">
            <text:p>1617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87152777777778" calcext:value-type="float">
            <text:p>0,00187152777777778000</text:p>
          </table:table-cell>
          <table:table-cell table:formula="of:=[.D212]-[.D211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77" office:value-type="float" office:value="16247" calcext:value-type="float">
            <text:p>16247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88043981481481" calcext:value-type="float">
            <text:p>0,00188043981481481000</text:p>
          </table:table-cell>
          <table:table-cell table:formula="of:=[.D213]-[.D212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77" office:value-type="float" office:value="16324" calcext:value-type="float">
            <text:p>16324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88935185185185" calcext:value-type="float">
            <text:p>0,00188935185185185000</text:p>
          </table:table-cell>
          <table:table-cell table:formula="of:=[.D214]-[.D213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77" office:value-type="float" office:value="16401" calcext:value-type="float">
            <text:p>16401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89826388888889" calcext:value-type="float">
            <text:p>0,00189826388888889000</text:p>
          </table:table-cell>
          <table:table-cell table:formula="of:=[.D215]-[.D214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77" office:value-type="float" office:value="16478" calcext:value-type="float">
            <text:p>16478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90717592592593" calcext:value-type="float">
            <text:p>0,00190717592592593000</text:p>
          </table:table-cell>
          <table:table-cell table:formula="of:=[.D216]-[.D215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77" office:value-type="float" office:value="16555" calcext:value-type="float">
            <text:p>1655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91608796296296" calcext:value-type="float">
            <text:p>0,00191608796296296000</text:p>
          </table:table-cell>
          <table:table-cell table:formula="of:=[.D217]-[.D216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77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925" calcext:value-type="float">
            <text:p>0,00192500000000000000</text:p>
          </table:table-cell>
          <table:table-cell table:formula="of:=[.D218]-[.D217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77" office:value-type="float" office:value="16709" calcext:value-type="float">
            <text:p>16709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93391203703704" calcext:value-type="float">
            <text:p>0,00193391203703704000</text:p>
          </table:table-cell>
          <table:table-cell table:formula="of:=[.D219]-[.D218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77" office:value-type="float" office:value="16786" calcext:value-type="float">
            <text:p>16786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94282407407407" calcext:value-type="float">
            <text:p>0,00194282407407407000</text:p>
          </table:table-cell>
          <table:table-cell table:formula="of:=[.D220]-[.D219]" office:value-type="float" office:value="0.00000891203703703709" calcext:value-type="float">
            <text:p>0,00000891203703703709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77" office:value-type="float" office:value="16863" calcext:value-type="float">
            <text:p>16863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95173611111111" calcext:value-type="float">
            <text:p>0,00195173611111111000</text:p>
          </table:table-cell>
          <table:table-cell table:formula="of:=[.D221]-[.D220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77" office:value-type="float" office:value="16940" calcext:value-type="float">
            <text:p>1694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96064814814815" calcext:value-type="float">
            <text:p>0,00196064814814815000</text:p>
          </table:table-cell>
          <table:table-cell table:formula="of:=[.D222]-[.D221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77" office:value-type="float" office:value="17017" calcext:value-type="float">
            <text:p>17017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96956018518519" calcext:value-type="float">
            <text:p>0,00196956018518519000</text:p>
          </table:table-cell>
          <table:table-cell table:formula="of:=[.D223]-[.D222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77" office:value-type="float" office:value="17094" calcext:value-type="float">
            <text:p>17094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97847222222222" calcext:value-type="float">
            <text:p>0,00197847222222222000</text:p>
          </table:table-cell>
          <table:table-cell table:formula="of:=[.D224]-[.D223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77" office:value-type="float" office:value="17171" calcext:value-type="float">
            <text:p>17171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98738425925926" calcext:value-type="float">
            <text:p>0,00198738425925926000</text:p>
          </table:table-cell>
          <table:table-cell table:formula="of:=[.D225]-[.D224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77" office:value-type="float" office:value="17248" calcext:value-type="float">
            <text:p>17248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9962962962963" calcext:value-type="float">
            <text:p>0,00199629629629630000</text:p>
          </table:table-cell>
          <table:table-cell table:formula="of:=[.D226]-[.D225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77" office:value-type="float" office:value="17325" calcext:value-type="float">
            <text:p>1732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00520833333333" calcext:value-type="float">
            <text:p>0,00200520833333333000</text:p>
          </table:table-cell>
          <table:table-cell table:formula="of:=[.D227]-[.D226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77" office:value-type="float" office:value="17402" calcext:value-type="float">
            <text:p>17402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01412037037037" calcext:value-type="float">
            <text:p>0,00201412037037037000</text:p>
          </table:table-cell>
          <table:table-cell table:formula="of:=[.D228]-[.D227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77" office:value-type="float" office:value="17479" calcext:value-type="float">
            <text:p>17479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02303240740741" calcext:value-type="float">
            <text:p>0,00202303240740741000</text:p>
          </table:table-cell>
          <table:table-cell table:formula="of:=[.D229]-[.D228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77" office:value-type="float" office:value="17556" calcext:value-type="float">
            <text:p>17556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03194444444444" calcext:value-type="float">
            <text:p>0,00203194444444444000</text:p>
          </table:table-cell>
          <table:table-cell table:formula="of:=[.D230]-[.D229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77" office:value-type="float" office:value="17633" calcext:value-type="float">
            <text:p>17633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04085648148148" calcext:value-type="float">
            <text:p>0,00204085648148148000</text:p>
          </table:table-cell>
          <table:table-cell table:formula="of:=[.D231]-[.D230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77" office:value-type="float" office:value="17710" calcext:value-type="float">
            <text:p>1771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04976851851852" calcext:value-type="float">
            <text:p>0,00204976851851852000</text:p>
          </table:table-cell>
          <table:table-cell table:formula="of:=[.D232]-[.D231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77" office:value-type="float" office:value="17787" calcext:value-type="float">
            <text:p>17787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05868055555556" calcext:value-type="float">
            <text:p>0,00205868055555556000</text:p>
          </table:table-cell>
          <table:table-cell table:formula="of:=[.D233]-[.D232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77" office:value-type="float" office:value="17864" calcext:value-type="float">
            <text:p>17864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06759259259259" calcext:value-type="float">
            <text:p>0,00206759259259259000</text:p>
          </table:table-cell>
          <table:table-cell table:formula="of:=[.D234]-[.D233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77" office:value-type="float" office:value="17941" calcext:value-type="float">
            <text:p>17941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07650462962963" calcext:value-type="float">
            <text:p>0,00207650462962963000</text:p>
          </table:table-cell>
          <table:table-cell table:formula="of:=[.D235]-[.D234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77" office:value-type="float" office:value="18018" calcext:value-type="float">
            <text:p>18018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08541666666667" calcext:value-type="float">
            <text:p>0,00208541666666667000</text:p>
          </table:table-cell>
          <table:table-cell table:formula="of:=[.D236]-[.D235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77" office:value-type="float" office:value="18095" calcext:value-type="float">
            <text:p>1809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0943287037037" calcext:value-type="float">
            <text:p>0,00209432870370370000</text:p>
          </table:table-cell>
          <table:table-cell table:formula="of:=[.D237]-[.D236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77" office:value-type="float" office:value="18172" calcext:value-type="float">
            <text:p>18172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10324074074074" calcext:value-type="float">
            <text:p>0,00210324074074074000</text:p>
          </table:table-cell>
          <table:table-cell table:formula="of:=[.D238]-[.D237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77" office:value-type="float" office:value="18249" calcext:value-type="float">
            <text:p>18249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11215277777778" calcext:value-type="float">
            <text:p>0,00211215277777778000</text:p>
          </table:table-cell>
          <table:table-cell table:formula="of:=[.D239]-[.D238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77" office:value-type="float" office:value="18326" calcext:value-type="float">
            <text:p>18326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12106481481481" calcext:value-type="float">
            <text:p>0,00212106481481481000</text:p>
          </table:table-cell>
          <table:table-cell table:formula="of:=[.D240]-[.D239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77" office:value-type="float" office:value="18403" calcext:value-type="float">
            <text:p>18403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12997685185185" calcext:value-type="float">
            <text:p>0,00212997685185185000</text:p>
          </table:table-cell>
          <table:table-cell table:formula="of:=[.D241]-[.D240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77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13888888888889" calcext:value-type="float">
            <text:p>0,00213888888888889000</text:p>
          </table:table-cell>
          <table:table-cell table:formula="of:=[.D242]-[.D241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77" office:value-type="float" office:value="18557" calcext:value-type="float">
            <text:p>18557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14780092592593" calcext:value-type="float">
            <text:p>0,00214780092592593000</text:p>
          </table:table-cell>
          <table:table-cell table:formula="of:=[.D243]-[.D242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77" office:value-type="float" office:value="18634" calcext:value-type="float">
            <text:p>18634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15671296296296" calcext:value-type="float">
            <text:p>0,00215671296296296000</text:p>
          </table:table-cell>
          <table:table-cell table:formula="of:=[.D244]-[.D243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77" office:value-type="float" office:value="18711" calcext:value-type="float">
            <text:p>18711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165625" calcext:value-type="float">
            <text:p>0,00216562500000000000</text:p>
          </table:table-cell>
          <table:table-cell table:formula="of:=[.D245]-[.D244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77" office:value-type="float" office:value="18788" calcext:value-type="float">
            <text:p>18788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17453703703704" calcext:value-type="float">
            <text:p>0,00217453703703704000</text:p>
          </table:table-cell>
          <table:table-cell table:formula="of:=[.D246]-[.D245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77" office:value-type="float" office:value="18865" calcext:value-type="float">
            <text:p>1886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18344907407407" calcext:value-type="float">
            <text:p>0,00218344907407407000</text:p>
          </table:table-cell>
          <table:table-cell table:formula="of:=[.D247]-[.D246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77" office:value-type="float" office:value="18942" calcext:value-type="float">
            <text:p>18942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19236111111111" calcext:value-type="float">
            <text:p>0,00219236111111111000</text:p>
          </table:table-cell>
          <table:table-cell table:formula="of:=[.D248]-[.D247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77" office:value-type="float" office:value="19019" calcext:value-type="float">
            <text:p>19019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20127314814815" calcext:value-type="float">
            <text:p>0,00220127314814815000</text:p>
          </table:table-cell>
          <table:table-cell table:formula="of:=[.D249]-[.D248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77" office:value-type="float" office:value="19096" calcext:value-type="float">
            <text:p>19096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21018518518519" calcext:value-type="float">
            <text:p>0,00221018518518519000</text:p>
          </table:table-cell>
          <table:table-cell table:formula="of:=[.D250]-[.D249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77" office:value-type="float" office:value="19173" calcext:value-type="float">
            <text:p>19173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21909722222222" calcext:value-type="float">
            <text:p>0,00221909722222222000</text:p>
          </table:table-cell>
          <table:table-cell table:formula="of:=[.D251]-[.D250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77" office:value-type="float" office:value="19250" calcext:value-type="float">
            <text:p>192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22800925925926" calcext:value-type="float">
            <text:p>0,00222800925925926000</text:p>
          </table:table-cell>
          <table:table-cell table:formula="of:=[.D252]-[.D251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77" office:value-type="float" office:value="19327" calcext:value-type="float">
            <text:p>19327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2369212962963" calcext:value-type="float">
            <text:p>0,00223692129629630000</text:p>
          </table:table-cell>
          <table:table-cell table:formula="of:=[.D253]-[.D252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77" office:value-type="float" office:value="19404" calcext:value-type="float">
            <text:p>19404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24583333333333" calcext:value-type="float">
            <text:p>0,00224583333333333000</text:p>
          </table:table-cell>
          <table:table-cell table:formula="of:=[.D254]-[.D253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77" office:value-type="float" office:value="19481" calcext:value-type="float">
            <text:p>19481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25474537037037" calcext:value-type="float">
            <text:p>0,00225474537037037000</text:p>
          </table:table-cell>
          <table:table-cell table:formula="of:=[.D255]-[.D254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77" office:value-type="float" office:value="19558" calcext:value-type="float">
            <text:p>19558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26365740740741" calcext:value-type="float">
            <text:p>0,00226365740740741000</text:p>
          </table:table-cell>
          <table:table-cell table:formula="of:=[.D256]-[.D255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77" office:value-type="float" office:value="19635" calcext:value-type="float">
            <text:p>1963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27256944444444" calcext:value-type="float">
            <text:p>0,00227256944444444000</text:p>
          </table:table-cell>
          <table:table-cell table:formula="of:=[.D257]-[.D256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77" office:value-type="float" office:value="19712" calcext:value-type="float">
            <text:p>19712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28148148148148" calcext:value-type="float">
            <text:p>0,00228148148148148000</text:p>
          </table:table-cell>
          <table:table-cell table:formula="of:=[.D258]-[.D257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77" office:value-type="float" office:value="19789" calcext:value-type="float">
            <text:p>19789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29039351851852" calcext:value-type="float">
            <text:p>0,00229039351851852000</text:p>
          </table:table-cell>
          <table:table-cell table:formula="of:=[.D259]-[.D258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77" office:value-type="float" office:value="19866" calcext:value-type="float">
            <text:p>19866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29930555555556" calcext:value-type="float">
            <text:p>0,00229930555555556000</text:p>
          </table:table-cell>
          <table:table-cell table:formula="of:=[.D260]-[.D259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77" office:value-type="float" office:value="19943" calcext:value-type="float">
            <text:p>19943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30821759259259" calcext:value-type="float">
            <text:p>0,00230821759259259000</text:p>
          </table:table-cell>
          <table:table-cell table:formula="of:=[.D261]-[.D260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77" office:value-type="float" office:value="20020" calcext:value-type="float">
            <text:p>2002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31712962962963" calcext:value-type="float">
            <text:p>0,00231712962962963000</text:p>
          </table:table-cell>
          <table:table-cell table:formula="of:=[.D262]-[.D261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77" office:value-type="float" office:value="20097" calcext:value-type="float">
            <text:p>20097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32604166666667" calcext:value-type="float">
            <text:p>0,00232604166666667000</text:p>
          </table:table-cell>
          <table:table-cell table:formula="of:=[.D263]-[.D262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77" office:value-type="float" office:value="20174" calcext:value-type="float">
            <text:p>20174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3349537037037" calcext:value-type="float">
            <text:p>0,00233495370370370000</text:p>
          </table:table-cell>
          <table:table-cell table:formula="of:=[.D264]-[.D263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77" office:value-type="float" office:value="20251" calcext:value-type="float">
            <text:p>20251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34386574074074" calcext:value-type="float">
            <text:p>0,00234386574074074000</text:p>
          </table:table-cell>
          <table:table-cell table:formula="of:=[.D265]-[.D264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77" office:value-type="float" office:value="20328" calcext:value-type="float">
            <text:p>20328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35277777777778" calcext:value-type="float">
            <text:p>0,00235277777777778000</text:p>
          </table:table-cell>
          <table:table-cell table:formula="of:=[.D266]-[.D265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77" office:value-type="float" office:value="20405" calcext:value-type="float">
            <text:p>2040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36168981481481" calcext:value-type="float">
            <text:p>0,00236168981481481000</text:p>
          </table:table-cell>
          <table:table-cell table:formula="of:=[.D267]-[.D266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77" office:value-type="float" office:value="20482" calcext:value-type="float">
            <text:p>20482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37060185185185" calcext:value-type="float">
            <text:p>0,00237060185185185000</text:p>
          </table:table-cell>
          <table:table-cell table:formula="of:=[.D268]-[.D267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77" office:value-type="float" office:value="20559" calcext:value-type="float">
            <text:p>20559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37951388888889" calcext:value-type="float">
            <text:p>0,00237951388888889000</text:p>
          </table:table-cell>
          <table:table-cell table:formula="of:=[.D269]-[.D268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77" office:value-type="float" office:value="20636" calcext:value-type="float">
            <text:p>20636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38842592592593" calcext:value-type="float">
            <text:p>0,00238842592592593000</text:p>
          </table:table-cell>
          <table:table-cell table:formula="of:=[.D270]-[.D269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77" office:value-type="float" office:value="20713" calcext:value-type="float">
            <text:p>20713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39733796296296" calcext:value-type="float">
            <text:p>0,00239733796296296000</text:p>
          </table:table-cell>
          <table:table-cell table:formula="of:=[.D271]-[.D270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77" office:value-type="float" office:value="20790" calcext:value-type="float">
            <text:p>2079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40625" calcext:value-type="float">
            <text:p>0,00240625000000000000</text:p>
          </table:table-cell>
          <table:table-cell table:formula="of:=[.D272]-[.D271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77" office:value-type="float" office:value="20867" calcext:value-type="float">
            <text:p>20867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41516203703704" calcext:value-type="float">
            <text:p>0,00241516203703704000</text:p>
          </table:table-cell>
          <table:table-cell table:formula="of:=[.D273]-[.D272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77" office:value-type="float" office:value="20944" calcext:value-type="float">
            <text:p>20944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42407407407407" calcext:value-type="float">
            <text:p>0,00242407407407407000</text:p>
          </table:table-cell>
          <table:table-cell table:formula="of:=[.D274]-[.D273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77" office:value-type="float" office:value="21021" calcext:value-type="float">
            <text:p>21021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43298611111111" calcext:value-type="float">
            <text:p>0,00243298611111111000</text:p>
          </table:table-cell>
          <table:table-cell table:formula="of:=[.D275]-[.D274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77" office:value-type="float" office:value="21098" calcext:value-type="float">
            <text:p>21098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44189814814815" calcext:value-type="float">
            <text:p>0,00244189814814815000</text:p>
          </table:table-cell>
          <table:table-cell table:formula="of:=[.D276]-[.D275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77" office:value-type="float" office:value="21175" calcext:value-type="float">
            <text:p>2117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45081018518519" calcext:value-type="float">
            <text:p>0,00245081018518519000</text:p>
          </table:table-cell>
          <table:table-cell table:formula="of:=[.D277]-[.D276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77" office:value-type="float" office:value="21252" calcext:value-type="float">
            <text:p>21252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45972222222222" calcext:value-type="float">
            <text:p>0,00245972222222222000</text:p>
          </table:table-cell>
          <table:table-cell table:formula="of:=[.D278]-[.D277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77" office:value-type="float" office:value="21329" calcext:value-type="float">
            <text:p>21329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46863425925926" calcext:value-type="float">
            <text:p>0,00246863425925926000</text:p>
          </table:table-cell>
          <table:table-cell table:formula="of:=[.D279]-[.D278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77" office:value-type="float" office:value="21406" calcext:value-type="float">
            <text:p>21406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4775462962963" calcext:value-type="float">
            <text:p>0,00247754629629630000</text:p>
          </table:table-cell>
          <table:table-cell table:formula="of:=[.D280]-[.D279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77" office:value-type="float" office:value="21483" calcext:value-type="float">
            <text:p>21483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48645833333333" calcext:value-type="float">
            <text:p>0,00248645833333333000</text:p>
          </table:table-cell>
          <table:table-cell table:formula="of:=[.D281]-[.D280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77" office:value-type="float" office:value="21560" calcext:value-type="float">
            <text:p>2156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49537037037037" calcext:value-type="float">
            <text:p>0,00249537037037037000</text:p>
          </table:table-cell>
          <table:table-cell table:formula="of:=[.D282]-[.D281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77" office:value-type="float" office:value="21637" calcext:value-type="float">
            <text:p>21637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50428240740741" calcext:value-type="float">
            <text:p>0,00250428240740741000</text:p>
          </table:table-cell>
          <table:table-cell table:formula="of:=[.D283]-[.D282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77" office:value-type="float" office:value="21714" calcext:value-type="float">
            <text:p>21714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51319444444444" calcext:value-type="float">
            <text:p>0,00251319444444444000</text:p>
          </table:table-cell>
          <table:table-cell table:formula="of:=[.D284]-[.D283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77" office:value-type="float" office:value="21791" calcext:value-type="float">
            <text:p>21791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252210648148148" calcext:value-type="float">
            <text:p>0,00252210648148148000</text:p>
          </table:table-cell>
          <table:table-cell table:formula="of:=[.D285]-[.D284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77" office:value-type="float" office:value="21868" calcext:value-type="float">
            <text:p>21868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53101851851852" calcext:value-type="float">
            <text:p>0,00253101851851852000</text:p>
          </table:table-cell>
          <table:table-cell table:formula="of:=[.D286]-[.D285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77" office:value-type="float" office:value="21945" calcext:value-type="float">
            <text:p>2194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53993055555556" calcext:value-type="float">
            <text:p>0,00253993055555556000</text:p>
          </table:table-cell>
          <table:table-cell table:formula="of:=[.D287]-[.D286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77" office:value-type="float" office:value="22022" calcext:value-type="float">
            <text:p>22022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254884259259259" calcext:value-type="float">
            <text:p>0,00254884259259259000</text:p>
          </table:table-cell>
          <table:table-cell table:formula="of:=[.D288]-[.D287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77" office:value-type="float" office:value="22099" calcext:value-type="float">
            <text:p>22099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255775462962963" calcext:value-type="float">
            <text:p>0,00255775462962963000</text:p>
          </table:table-cell>
          <table:table-cell table:formula="of:=[.D289]-[.D288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77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56666666666667" calcext:value-type="float">
            <text:p>0,00256666666666667000</text:p>
          </table:table-cell>
          <table:table-cell table:formula="of:=[.D290]-[.D289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77" office:value-type="float" office:value="22253" calcext:value-type="float">
            <text:p>22253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5755787037037" calcext:value-type="float">
            <text:p>0,00257557870370370000</text:p>
          </table:table-cell>
          <table:table-cell table:formula="of:=[.D291]-[.D290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77" office:value-type="float" office:value="22330" calcext:value-type="float">
            <text:p>2233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258449074074074" calcext:value-type="float">
            <text:p>0,00258449074074074000</text:p>
          </table:table-cell>
          <table:table-cell table:formula="of:=[.D292]-[.D291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77" office:value-type="float" office:value="22407" calcext:value-type="float">
            <text:p>22407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259340277777778" calcext:value-type="float">
            <text:p>0,00259340277777778000</text:p>
          </table:table-cell>
          <table:table-cell table:formula="of:=[.D293]-[.D292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77" office:value-type="float" office:value="22484" calcext:value-type="float">
            <text:p>22484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260231481481481" calcext:value-type="float">
            <text:p>0,00260231481481481000</text:p>
          </table:table-cell>
          <table:table-cell table:formula="of:=[.D294]-[.D293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77" office:value-type="float" office:value="22561" calcext:value-type="float">
            <text:p>22561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261122685185185" calcext:value-type="float">
            <text:p>0,00261122685185185000</text:p>
          </table:table-cell>
          <table:table-cell table:formula="of:=[.D295]-[.D294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77" office:value-type="float" office:value="22638" calcext:value-type="float">
            <text:p>22638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262013888888889" calcext:value-type="float">
            <text:p>0,00262013888888889000</text:p>
          </table:table-cell>
          <table:table-cell table:formula="of:=[.D296]-[.D295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77" office:value-type="float" office:value="22715" calcext:value-type="float">
            <text:p>2271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262905092592593" calcext:value-type="float">
            <text:p>0,00262905092592593000</text:p>
          </table:table-cell>
          <table:table-cell table:formula="of:=[.D297]-[.D296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77" office:value-type="float" office:value="22792" calcext:value-type="float">
            <text:p>22792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263796296296296" calcext:value-type="float">
            <text:p>0,00263796296296296000</text:p>
          </table:table-cell>
          <table:table-cell table:formula="of:=[.D298]-[.D297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77" office:value-type="float" office:value="22869" calcext:value-type="float">
            <text:p>22869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2646875" calcext:value-type="float">
            <text:p>0,00264687500000000000</text:p>
          </table:table-cell>
          <table:table-cell table:formula="of:=[.D299]-[.D298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77" office:value-type="float" office:value="22946" calcext:value-type="float">
            <text:p>22946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265578703703704" calcext:value-type="float">
            <text:p>0,00265578703703704000</text:p>
          </table:table-cell>
          <table:table-cell table:formula="of:=[.D300]-[.D299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77" office:value-type="float" office:value="23023" calcext:value-type="float">
            <text:p>23023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266469907407407" calcext:value-type="float">
            <text:p>0,00266469907407407000</text:p>
          </table:table-cell>
          <table:table-cell table:formula="of:=[.D301]-[.D300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77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267361111111111" calcext:value-type="float">
            <text:p>0,00267361111111111000</text:p>
          </table:table-cell>
          <table:table-cell table:formula="of:=[.D302]-[.D301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77" office:value-type="float" office:value="23177" calcext:value-type="float">
            <text:p>23177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268252314814815" calcext:value-type="float">
            <text:p>0,00268252314814815000</text:p>
          </table:table-cell>
          <table:table-cell table:formula="of:=[.D303]-[.D302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77" office:value-type="float" office:value="23254" calcext:value-type="float">
            <text:p>23254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269143518518519" calcext:value-type="float">
            <text:p>0,00269143518518519000</text:p>
          </table:table-cell>
          <table:table-cell table:formula="of:=[.D304]-[.D303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77" office:value-type="float" office:value="23331" calcext:value-type="float">
            <text:p>23331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270034722222222" calcext:value-type="float">
            <text:p>0,00270034722222222000</text:p>
          </table:table-cell>
          <table:table-cell table:formula="of:=[.D305]-[.D304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77" office:value-type="float" office:value="23408" calcext:value-type="float">
            <text:p>23408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270925925925926" calcext:value-type="float">
            <text:p>0,00270925925925926000</text:p>
          </table:table-cell>
          <table:table-cell table:formula="of:=[.D306]-[.D305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77" office:value-type="float" office:value="23485" calcext:value-type="float">
            <text:p>2348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27181712962963" calcext:value-type="float">
            <text:p>0,00271817129629630000</text:p>
          </table:table-cell>
          <table:table-cell table:formula="of:=[.D307]-[.D306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77" office:value-type="float" office:value="23562" calcext:value-type="float">
            <text:p>23562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272708333333333" calcext:value-type="float">
            <text:p>0,00272708333333333000</text:p>
          </table:table-cell>
          <table:table-cell table:formula="of:=[.D308]-[.D307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77" office:value-type="float" office:value="23639" calcext:value-type="float">
            <text:p>23639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273599537037037" calcext:value-type="float">
            <text:p>0,00273599537037037000</text:p>
          </table:table-cell>
          <table:table-cell table:formula="of:=[.D309]-[.D308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77" office:value-type="float" office:value="23716" calcext:value-type="float">
            <text:p>23716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274490740740741" calcext:value-type="float">
            <text:p>0,00274490740740741000</text:p>
          </table:table-cell>
          <table:table-cell table:formula="of:=[.D310]-[.D309]" office:value-type="float" office:value="0.00000891203703703731" calcext:value-type="float">
            <text:p>0,00000891203703703731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77" office:value-type="float" office:value="23793" calcext:value-type="float">
            <text:p>23793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275381944444444" calcext:value-type="float">
            <text:p>0,00275381944444444000</text:p>
          </table:table-cell>
          <table:table-cell table:formula="of:=[.D311]-[.D310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77" office:value-type="float" office:value="23870" calcext:value-type="float">
            <text:p>2387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276273148148148" calcext:value-type="float">
            <text:p>0,00276273148148148000</text:p>
          </table:table-cell>
          <table:table-cell table:formula="of:=[.D312]-[.D311]" office:value-type="float" office:value="0.00000891203703703688" calcext:value-type="float">
            <text:p>0,00000891203703703688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77" office:value-type="float" office:value="23947" calcext:value-type="float">
            <text:p>23947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277164351851852" calcext:value-type="float">
            <text:p>0,00277164351851852000</text:p>
          </table:table-cell>
          <table:table-cell table:formula="of:=#REF!-[.D312]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 table:number-rows-repeated="104826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55:53.304800542</meta:creation-date>
    <dc:date>2026-05-17T18:56:06.720243480</dc:date>
    <meta:editing-duration>PT14S</meta:editing-duration>
    <meta:editing-cycles>1</meta:editing-cycles>
    <meta:document-statistic meta:table-count="1" meta:cell-count="1560" meta:object-count="0"/>
    <meta:generator>LibreOffice/24.2.7.2$Linux_X86_64 LibreOffice_project/420$Build-2</meta:generator>
  </office:meta>
</office:document-meta>
</file>