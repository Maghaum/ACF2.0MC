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8cm"/>
    </style:style>
    <style:style style:name="co4" style:family="table-column">
      <style:table-column-properties fo:break-before="auto" style:column-width="5.0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8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80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925925925925926" calcext:value-type="float">
            <text:p>0,00000925925925925926</text:p>
          </table:table-cell>
          <table:table-cell table:formula="of:=[.D3]-[.D2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80" office:value-type="float" office:value="160" calcext:value-type="float">
            <text:p>160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85185185185185" calcext:value-type="float">
            <text:p>0,00001851851851851850</text:p>
          </table:table-cell>
          <table:table-cell table:formula="of:=[.D4]-[.D3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80" office:value-type="float" office:value="240" calcext:value-type="float">
            <text:p>240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77777777777778" calcext:value-type="float">
            <text:p>0,00002777777777777780</text:p>
          </table:table-cell>
          <table:table-cell table:formula="of:=[.D5]-[.D4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80" office:value-type="float" office:value="320" calcext:value-type="float">
            <text:p>320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37037037037037" calcext:value-type="float">
            <text:p>0,00003703703703703700</text:p>
          </table:table-cell>
          <table:table-cell table:formula="of:=[.D6]-[.D5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80" office:value-type="float" office:value="400" calcext:value-type="float">
            <text:p>40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462962962962963" calcext:value-type="float">
            <text:p>0,00004629629629629630</text:p>
          </table:table-cell>
          <table:table-cell table:formula="of:=[.D7]-[.D6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80" office:value-type="float" office:value="480" calcext:value-type="float">
            <text:p>480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555555555555556" calcext:value-type="float">
            <text:p>0,00005555555555555560</text:p>
          </table:table-cell>
          <table:table-cell table:formula="of:=[.D8]-[.D7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80" office:value-type="float" office:value="560" calcext:value-type="float">
            <text:p>560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648148148148148" calcext:value-type="float">
            <text:p>0,00006481481481481480</text:p>
          </table:table-cell>
          <table:table-cell table:formula="of:=[.D9]-[.D8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80" office:value-type="float" office:value="640" calcext:value-type="float">
            <text:p>640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740740740740741" calcext:value-type="float">
            <text:p>0,00007407407407407410</text:p>
          </table:table-cell>
          <table:table-cell table:formula="of:=[.D10]-[.D9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80" office:value-type="float" office:value="720" calcext:value-type="float">
            <text:p>720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833333333333333" calcext:value-type="float">
            <text:p>0,00008333333333333330</text:p>
          </table:table-cell>
          <table:table-cell table:formula="of:=[.D11]-[.D10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80" office:value-type="float" office:value="800" calcext:value-type="float">
            <text:p>80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925925925925926" calcext:value-type="float">
            <text:p>0,00009259259259259260</text:p>
          </table:table-cell>
          <table:table-cell table:formula="of:=[.D12]-[.D11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80" office:value-type="float" office:value="880" calcext:value-type="float">
            <text:p>880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101851851851852" calcext:value-type="float">
            <text:p>0,00010185185185185200</text:p>
          </table:table-cell>
          <table:table-cell table:formula="of:=[.D13]-[.D12]" office:value-type="float" office:value="0.00000925925925925927" calcext:value-type="float">
            <text:p>0,00000925925925925927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80" office:value-type="float" office:value="960" calcext:value-type="float">
            <text:p>960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11111111111111" calcext:value-type="float">
            <text:p>0,00011111111111111100</text:p>
          </table:table-cell>
          <table:table-cell table:formula="of:=[.D14]-[.D13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80" office:value-type="float" office:value="1040" calcext:value-type="float">
            <text:p>1040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2037037037037" calcext:value-type="float">
            <text:p>0,00012037037037037000</text:p>
          </table:table-cell>
          <table:table-cell table:formula="of:=[.D15]-[.D14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80" office:value-type="float" office:value="1120" calcext:value-type="float">
            <text:p>1120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2962962962963" calcext:value-type="float">
            <text:p>0,00012962962962963000</text:p>
          </table:table-cell>
          <table:table-cell table:formula="of:=[.D16]-[.D15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80" office:value-type="float" office:value="1200" calcext:value-type="float">
            <text:p>120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38888888888889" calcext:value-type="float">
            <text:p>0,00013888888888888900</text:p>
          </table:table-cell>
          <table:table-cell table:formula="of:=[.D17]-[.D16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80" office:value-type="float" office:value="1280" calcext:value-type="float">
            <text:p>1280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48148148148148" calcext:value-type="float">
            <text:p>0,00014814814814814800</text:p>
          </table:table-cell>
          <table:table-cell table:formula="of:=[.D18]-[.D17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80" office:value-type="float" office:value="1360" calcext:value-type="float">
            <text:p>1360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57407407407407" calcext:value-type="float">
            <text:p>0,00015740740740740700</text:p>
          </table:table-cell>
          <table:table-cell table:formula="of:=[.D19]-[.D18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80" office:value-type="float" office:value="1440" calcext:value-type="float">
            <text:p>1440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66666666666667" calcext:value-type="float">
            <text:p>0,00016666666666666700</text:p>
          </table:table-cell>
          <table:table-cell table:formula="of:=[.D20]-[.D19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80" office:value-type="float" office:value="1520" calcext:value-type="float">
            <text:p>1520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75925925925926" calcext:value-type="float">
            <text:p>0,00017592592592592600</text:p>
          </table:table-cell>
          <table:table-cell table:formula="of:=[.D21]-[.D20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80" office:value-type="float" office:value="1600" calcext:value-type="float">
            <text:p>160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85185185185185" calcext:value-type="float">
            <text:p>0,00018518518518518500</text:p>
          </table:table-cell>
          <table:table-cell table:formula="of:=[.D22]-[.D21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80" office:value-type="float" office:value="1680" calcext:value-type="float">
            <text:p>1680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94444444444444" calcext:value-type="float">
            <text:p>0,00019444444444444400</text:p>
          </table:table-cell>
          <table:table-cell table:formula="of:=[.D23]-[.D22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80" office:value-type="float" office:value="1760" calcext:value-type="float">
            <text:p>1760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203703703703704" calcext:value-type="float">
            <text:p>0,00020370370370370400</text:p>
          </table:table-cell>
          <table:table-cell table:formula="of:=[.D24]-[.D23]" office:value-type="float" office:value="0.00000925925925925929" calcext:value-type="float">
            <text:p>0,00000925925925925929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80" office:value-type="float" office:value="1840" calcext:value-type="float">
            <text:p>1840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12962962962963" calcext:value-type="float">
            <text:p>0,00021296296296296300</text:p>
          </table:table-cell>
          <table:table-cell table:formula="of:=[.D25]-[.D24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80" office:value-type="float" office:value="1920" calcext:value-type="float">
            <text:p>1920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22222222222222" calcext:value-type="float">
            <text:p>0,00022222222222222200</text:p>
          </table:table-cell>
          <table:table-cell table:formula="of:=[.D26]-[.D25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80" office:value-type="float" office:value="2000" calcext:value-type="float">
            <text:p>200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31481481481482" calcext:value-type="float">
            <text:p>0,00023148148148148200</text:p>
          </table:table-cell>
          <table:table-cell table:formula="of:=[.D27]-[.D26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80" office:value-type="float" office:value="2080" calcext:value-type="float">
            <text:p>2080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40740740740741" calcext:value-type="float">
            <text:p>0,00024074074074074100</text:p>
          </table:table-cell>
          <table:table-cell table:formula="of:=[.D28]-[.D27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80" office:value-type="float" office:value="2160" calcext:value-type="float">
            <text:p>2160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5" calcext:value-type="float">
            <text:p>0,00025000000000000000</text:p>
          </table:table-cell>
          <table:table-cell table:formula="of:=[.D29]-[.D28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80" office:value-type="float" office:value="2240" calcext:value-type="float">
            <text:p>2240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59259259259259" calcext:value-type="float">
            <text:p>0,00025925925925925900</text:p>
          </table:table-cell>
          <table:table-cell table:formula="of:=[.D30]-[.D29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80" office:value-type="float" office:value="2320" calcext:value-type="float">
            <text:p>2320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68518518518519" calcext:value-type="float">
            <text:p>0,00026851851851851900</text:p>
          </table:table-cell>
          <table:table-cell table:formula="of:=[.D31]-[.D30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80" office:value-type="float" office:value="2400" calcext:value-type="float">
            <text:p>240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77777777777778" calcext:value-type="float">
            <text:p>0,00027777777777777800</text:p>
          </table:table-cell>
          <table:table-cell table:formula="of:=[.D32]-[.D31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80" office:value-type="float" office:value="2480" calcext:value-type="float">
            <text:p>2480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87037037037037" calcext:value-type="float">
            <text:p>0,00028703703703703700</text:p>
          </table:table-cell>
          <table:table-cell table:formula="of:=[.D33]-[.D32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80" office:value-type="float" office:value="2560" calcext:value-type="float">
            <text:p>2560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96296296296296" calcext:value-type="float">
            <text:p>0,00029629629629629600</text:p>
          </table:table-cell>
          <table:table-cell table:formula="of:=[.D34]-[.D33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80" office:value-type="float" office:value="2640" calcext:value-type="float">
            <text:p>2640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305555555555556" calcext:value-type="float">
            <text:p>0,00030555555555555600</text:p>
          </table:table-cell>
          <table:table-cell table:formula="of:=[.D35]-[.D34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80" office:value-type="float" office:value="2720" calcext:value-type="float">
            <text:p>2720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314814814814815" calcext:value-type="float">
            <text:p>0,00031481481481481500</text:p>
          </table:table-cell>
          <table:table-cell table:formula="of:=[.D36]-[.D35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80" office:value-type="float" office:value="2800" calcext:value-type="float">
            <text:p>280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324074074074074" calcext:value-type="float">
            <text:p>0,00032407407407407400</text:p>
          </table:table-cell>
          <table:table-cell table:formula="of:=[.D37]-[.D36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80" office:value-type="float" office:value="2880" calcext:value-type="float">
            <text:p>2880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333333333333333" calcext:value-type="float">
            <text:p>0,00033333333333333300</text:p>
          </table:table-cell>
          <table:table-cell table:formula="of:=[.D38]-[.D37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80" office:value-type="float" office:value="2960" calcext:value-type="float">
            <text:p>2960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342592592592593" calcext:value-type="float">
            <text:p>0,00034259259259259300</text:p>
          </table:table-cell>
          <table:table-cell table:formula="of:=[.D39]-[.D38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80" office:value-type="float" office:value="3040" calcext:value-type="float">
            <text:p>3040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351851851851852" calcext:value-type="float">
            <text:p>0,00035185185185185200</text:p>
          </table:table-cell>
          <table:table-cell table:formula="of:=[.D40]-[.D39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80" office:value-type="float" office:value="3120" calcext:value-type="float">
            <text:p>3120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361111111111111" calcext:value-type="float">
            <text:p>0,00036111111111111100</text:p>
          </table:table-cell>
          <table:table-cell table:formula="of:=[.D41]-[.D40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80" office:value-type="float" office:value="3200" calcext:value-type="float">
            <text:p>320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37037037037037" calcext:value-type="float">
            <text:p>0,00037037037037037000</text:p>
          </table:table-cell>
          <table:table-cell table:formula="of:=[.D42]-[.D41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80" office:value-type="float" office:value="3280" calcext:value-type="float">
            <text:p>3280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37962962962963" calcext:value-type="float">
            <text:p>0,00037962962962963000</text:p>
          </table:table-cell>
          <table:table-cell table:formula="of:=[.D43]-[.D42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80" office:value-type="float" office:value="3360" calcext:value-type="float">
            <text:p>3360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388888888888889" calcext:value-type="float">
            <text:p>0,00038888888888888900</text:p>
          </table:table-cell>
          <table:table-cell table:formula="of:=[.D44]-[.D43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80" office:value-type="float" office:value="3440" calcext:value-type="float">
            <text:p>3440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398148148148148" calcext:value-type="float">
            <text:p>0,00039814814814814800</text:p>
          </table:table-cell>
          <table:table-cell table:formula="of:=[.D45]-[.D44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80" office:value-type="float" office:value="3520" calcext:value-type="float">
            <text:p>3520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407407407407407" calcext:value-type="float">
            <text:p>0,00040740740740740700</text:p>
          </table:table-cell>
          <table:table-cell table:formula="of:=[.D46]-[.D45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80" office:value-type="float" office:value="3600" calcext:value-type="float">
            <text:p>360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416666666666667" calcext:value-type="float">
            <text:p>0,00041666666666666700</text:p>
          </table:table-cell>
          <table:table-cell table:formula="of:=[.D47]-[.D46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80" office:value-type="float" office:value="3680" calcext:value-type="float">
            <text:p>3680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425925925925926" calcext:value-type="float">
            <text:p>0,00042592592592592600</text:p>
          </table:table-cell>
          <table:table-cell table:formula="of:=[.D48]-[.D47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80" office:value-type="float" office:value="3760" calcext:value-type="float">
            <text:p>3760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435185185185185" calcext:value-type="float">
            <text:p>0,00043518518518518500</text:p>
          </table:table-cell>
          <table:table-cell table:formula="of:=[.D49]-[.D48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80" office:value-type="float" office:value="3840" calcext:value-type="float">
            <text:p>3840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444444444444444" calcext:value-type="float">
            <text:p>0,00044444444444444400</text:p>
          </table:table-cell>
          <table:table-cell table:formula="of:=[.D50]-[.D49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80" office:value-type="float" office:value="3920" calcext:value-type="float">
            <text:p>3920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453703703703704" calcext:value-type="float">
            <text:p>0,00045370370370370400</text:p>
          </table:table-cell>
          <table:table-cell table:formula="of:=[.D51]-[.D50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80" office:value-type="float" office:value="4000" calcext:value-type="float">
            <text:p>40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462962962962963" calcext:value-type="float">
            <text:p>0,00046296296296296300</text:p>
          </table:table-cell>
          <table:table-cell table:formula="of:=[.D52]-[.D51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80" office:value-type="float" office:value="4080" calcext:value-type="float">
            <text:p>4080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472222222222222" calcext:value-type="float">
            <text:p>0,00047222222222222200</text:p>
          </table:table-cell>
          <table:table-cell table:formula="of:=[.D53]-[.D52]" office:value-type="float" office:value="0.00000925925925925926" calcext:value-type="float">
            <text:p>0,00000925925925925926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80" office:value-type="float" office:value="4160" calcext:value-type="float">
            <text:p>4160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481481481481482" calcext:value-type="float">
            <text:p>0,00048148148148148200</text:p>
          </table:table-cell>
          <table:table-cell table:formula="of:=[.D54]-[.D53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80" office:value-type="float" office:value="4240" calcext:value-type="float">
            <text:p>4240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490740740740741" calcext:value-type="float">
            <text:p>0,00049074074074074100</text:p>
          </table:table-cell>
          <table:table-cell table:formula="of:=[.D55]-[.D54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80" office:value-type="float" office:value="4320" calcext:value-type="float">
            <text:p>4320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5" calcext:value-type="float">
            <text:p>0,00050000000000000000</text:p>
          </table:table-cell>
          <table:table-cell table:formula="of:=[.D56]-[.D55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80" office:value-type="float" office:value="4400" calcext:value-type="float">
            <text:p>440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509259259259259" calcext:value-type="float">
            <text:p>0,00050925925925925900</text:p>
          </table:table-cell>
          <table:table-cell table:formula="of:=[.D57]-[.D56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80" office:value-type="float" office:value="4480" calcext:value-type="float">
            <text:p>4480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518518518518519" calcext:value-type="float">
            <text:p>0,00051851851851851900</text:p>
          </table:table-cell>
          <table:table-cell table:formula="of:=[.D58]-[.D57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80" office:value-type="float" office:value="4560" calcext:value-type="float">
            <text:p>4560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527777777777778" calcext:value-type="float">
            <text:p>0,00052777777777777800</text:p>
          </table:table-cell>
          <table:table-cell table:formula="of:=[.D59]-[.D58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80" office:value-type="float" office:value="4640" calcext:value-type="float">
            <text:p>4640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537037037037037" calcext:value-type="float">
            <text:p>0,00053703703703703700</text:p>
          </table:table-cell>
          <table:table-cell table:formula="of:=[.D60]-[.D59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80" office:value-type="float" office:value="4720" calcext:value-type="float">
            <text:p>4720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546296296296296" calcext:value-type="float">
            <text:p>0,00054629629629629600</text:p>
          </table:table-cell>
          <table:table-cell table:formula="of:=[.D61]-[.D60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80" office:value-type="float" office:value="4800" calcext:value-type="float">
            <text:p>480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555555555555556" calcext:value-type="float">
            <text:p>0,00055555555555555600</text:p>
          </table:table-cell>
          <table:table-cell table:formula="of:=[.D62]-[.D61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80" office:value-type="float" office:value="4880" calcext:value-type="float">
            <text:p>4880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564814814814815" calcext:value-type="float">
            <text:p>0,00056481481481481500</text:p>
          </table:table-cell>
          <table:table-cell table:formula="of:=[.D63]-[.D62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80" office:value-type="float" office:value="4960" calcext:value-type="float">
            <text:p>4960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574074074074074" calcext:value-type="float">
            <text:p>0,00057407407407407400</text:p>
          </table:table-cell>
          <table:table-cell table:formula="of:=[.D64]-[.D63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80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583333333333333" calcext:value-type="float">
            <text:p>0,00058333333333333300</text:p>
          </table:table-cell>
          <table:table-cell table:formula="of:=[.D65]-[.D64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80" office:value-type="float" office:value="5120" calcext:value-type="float">
            <text:p>5120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592592592592593" calcext:value-type="float">
            <text:p>0,00059259259259259300</text:p>
          </table:table-cell>
          <table:table-cell table:formula="of:=[.D66]-[.D65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80" office:value-type="float" office:value="5200" calcext:value-type="float">
            <text:p>520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601851851851852" calcext:value-type="float">
            <text:p>0,00060185185185185200</text:p>
          </table:table-cell>
          <table:table-cell table:formula="of:=[.D67]-[.D66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80" office:value-type="float" office:value="5280" calcext:value-type="float">
            <text:p>5280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611111111111111" calcext:value-type="float">
            <text:p>0,00061111111111111100</text:p>
          </table:table-cell>
          <table:table-cell table:formula="of:=[.D68]-[.D67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80" office:value-type="float" office:value="5360" calcext:value-type="float">
            <text:p>5360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62037037037037" calcext:value-type="float">
            <text:p>0,00062037037037037000</text:p>
          </table:table-cell>
          <table:table-cell table:formula="of:=[.D69]-[.D68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80" office:value-type="float" office:value="5440" calcext:value-type="float">
            <text:p>5440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62962962962963" calcext:value-type="float">
            <text:p>0,00062962962962963000</text:p>
          </table:table-cell>
          <table:table-cell table:formula="of:=[.D70]-[.D69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80" office:value-type="float" office:value="5520" calcext:value-type="float">
            <text:p>5520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638888888888889" calcext:value-type="float">
            <text:p>0,00063888888888888900</text:p>
          </table:table-cell>
          <table:table-cell table:formula="of:=[.D71]-[.D70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80" office:value-type="float" office:value="5600" calcext:value-type="float">
            <text:p>560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648148148148148" calcext:value-type="float">
            <text:p>0,00064814814814814800</text:p>
          </table:table-cell>
          <table:table-cell table:formula="of:=[.D72]-[.D71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80" office:value-type="float" office:value="5680" calcext:value-type="float">
            <text:p>5680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657407407407407" calcext:value-type="float">
            <text:p>0,00065740740740740700</text:p>
          </table:table-cell>
          <table:table-cell table:formula="of:=[.D73]-[.D72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80" office:value-type="float" office:value="5760" calcext:value-type="float">
            <text:p>5760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666666666666667" calcext:value-type="float">
            <text:p>0,00066666666666666700</text:p>
          </table:table-cell>
          <table:table-cell table:formula="of:=[.D74]-[.D73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80" office:value-type="float" office:value="5840" calcext:value-type="float">
            <text:p>5840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675925925925926" calcext:value-type="float">
            <text:p>0,00067592592592592600</text:p>
          </table:table-cell>
          <table:table-cell table:formula="of:=[.D75]-[.D74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80" office:value-type="float" office:value="5920" calcext:value-type="float">
            <text:p>5920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685185185185185" calcext:value-type="float">
            <text:p>0,00068518518518518500</text:p>
          </table:table-cell>
          <table:table-cell table:formula="of:=[.D76]-[.D75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80" office:value-type="float" office:value="6000" calcext:value-type="float">
            <text:p>600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694444444444445" calcext:value-type="float">
            <text:p>0,00069444444444444500</text:p>
          </table:table-cell>
          <table:table-cell table:formula="of:=[.D77]-[.D76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80" office:value-type="float" office:value="6080" calcext:value-type="float">
            <text:p>6080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703703703703704" calcext:value-type="float">
            <text:p>0,00070370370370370400</text:p>
          </table:table-cell>
          <table:table-cell table:formula="of:=[.D78]-[.D77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80" office:value-type="float" office:value="6160" calcext:value-type="float">
            <text:p>6160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712962962962963" calcext:value-type="float">
            <text:p>0,00071296296296296300</text:p>
          </table:table-cell>
          <table:table-cell table:formula="of:=[.D79]-[.D78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80" office:value-type="float" office:value="6240" calcext:value-type="float">
            <text:p>6240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722222222222222" calcext:value-type="float">
            <text:p>0,00072222222222222200</text:p>
          </table:table-cell>
          <table:table-cell table:formula="of:=[.D80]-[.D79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80" office:value-type="float" office:value="6320" calcext:value-type="float">
            <text:p>6320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731481481481482" calcext:value-type="float">
            <text:p>0,00073148148148148100</text:p>
          </table:table-cell>
          <table:table-cell table:formula="of:=[.D81]-[.D80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80" office:value-type="float" office:value="6400" calcext:value-type="float">
            <text:p>640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740740740740741" calcext:value-type="float">
            <text:p>0,00074074074074074100</text:p>
          </table:table-cell>
          <table:table-cell table:formula="of:=[.D82]-[.D81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80" office:value-type="float" office:value="6480" calcext:value-type="float">
            <text:p>6480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75" calcext:value-type="float">
            <text:p>0,00075000000000000000</text:p>
          </table:table-cell>
          <table:table-cell table:formula="of:=[.D83]-[.D82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80" office:value-type="float" office:value="6560" calcext:value-type="float">
            <text:p>6560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759259259259259" calcext:value-type="float">
            <text:p>0,00075925925925925900</text:p>
          </table:table-cell>
          <table:table-cell table:formula="of:=[.D84]-[.D83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80" office:value-type="float" office:value="6640" calcext:value-type="float">
            <text:p>6640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768518518518519" calcext:value-type="float">
            <text:p>0,00076851851851851900</text:p>
          </table:table-cell>
          <table:table-cell table:formula="of:=[.D85]-[.D84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80" office:value-type="float" office:value="6720" calcext:value-type="float">
            <text:p>6720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777777777777778" calcext:value-type="float">
            <text:p>0,00077777777777777800</text:p>
          </table:table-cell>
          <table:table-cell table:formula="of:=[.D86]-[.D85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80" office:value-type="float" office:value="6800" calcext:value-type="float">
            <text:p>680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787037037037037" calcext:value-type="float">
            <text:p>0,00078703703703703700</text:p>
          </table:table-cell>
          <table:table-cell table:formula="of:=[.D87]-[.D86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80" office:value-type="float" office:value="6880" calcext:value-type="float">
            <text:p>6880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796296296296296" calcext:value-type="float">
            <text:p>0,00079629629629629600</text:p>
          </table:table-cell>
          <table:table-cell table:formula="of:=[.D88]-[.D87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80" office:value-type="float" office:value="6960" calcext:value-type="float">
            <text:p>6960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805555555555556" calcext:value-type="float">
            <text:p>0,00080555555555555600</text:p>
          </table:table-cell>
          <table:table-cell table:formula="of:=[.D89]-[.D88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80" office:value-type="float" office:value="7040" calcext:value-type="float">
            <text:p>7040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814814814814815" calcext:value-type="float">
            <text:p>0,00081481481481481500</text:p>
          </table:table-cell>
          <table:table-cell table:formula="of:=[.D90]-[.D89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80" office:value-type="float" office:value="7120" calcext:value-type="float">
            <text:p>7120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824074074074074" calcext:value-type="float">
            <text:p>0,00082407407407407400</text:p>
          </table:table-cell>
          <table:table-cell table:formula="of:=[.D91]-[.D90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80" office:value-type="float" office:value="7200" calcext:value-type="float">
            <text:p>720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833333333333333" calcext:value-type="float">
            <text:p>0,00083333333333333300</text:p>
          </table:table-cell>
          <table:table-cell table:formula="of:=[.D92]-[.D91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80" office:value-type="float" office:value="7280" calcext:value-type="float">
            <text:p>7280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842592592592593" calcext:value-type="float">
            <text:p>0,00084259259259259300</text:p>
          </table:table-cell>
          <table:table-cell table:formula="of:=[.D93]-[.D92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80" office:value-type="float" office:value="7360" calcext:value-type="float">
            <text:p>7360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851851851851852" calcext:value-type="float">
            <text:p>0,00085185185185185200</text:p>
          </table:table-cell>
          <table:table-cell table:formula="of:=[.D94]-[.D93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80" office:value-type="float" office:value="7440" calcext:value-type="float">
            <text:p>7440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861111111111111" calcext:value-type="float">
            <text:p>0,00086111111111111100</text:p>
          </table:table-cell>
          <table:table-cell table:formula="of:=[.D95]-[.D94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80" office:value-type="float" office:value="7520" calcext:value-type="float">
            <text:p>7520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87037037037037" calcext:value-type="float">
            <text:p>0,00087037037037037000</text:p>
          </table:table-cell>
          <table:table-cell table:formula="of:=[.D96]-[.D95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80" office:value-type="float" office:value="7600" calcext:value-type="float">
            <text:p>760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87962962962963" calcext:value-type="float">
            <text:p>0,00087962962962963000</text:p>
          </table:table-cell>
          <table:table-cell table:formula="of:=[.D97]-[.D96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80" office:value-type="float" office:value="7680" calcext:value-type="float">
            <text:p>7680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888888888888889" calcext:value-type="float">
            <text:p>0,00088888888888888900</text:p>
          </table:table-cell>
          <table:table-cell table:formula="of:=[.D98]-[.D97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80" office:value-type="float" office:value="7760" calcext:value-type="float">
            <text:p>7760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898148148148148" calcext:value-type="float">
            <text:p>0,00089814814814814800</text:p>
          </table:table-cell>
          <table:table-cell table:formula="of:=[.D99]-[.D98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80" office:value-type="float" office:value="7840" calcext:value-type="float">
            <text:p>7840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907407407407407" calcext:value-type="float">
            <text:p>0,00090740740740740800</text:p>
          </table:table-cell>
          <table:table-cell table:formula="of:=[.D100]-[.D99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80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916666666666667" calcext:value-type="float">
            <text:p>0,00091666666666666700</text:p>
          </table:table-cell>
          <table:table-cell table:formula="of:=[.D101]-[.D100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80" office:value-type="float" office:value="8000" calcext:value-type="float">
            <text:p>80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925925925925926" calcext:value-type="float">
            <text:p>0,00092592592592592600</text:p>
          </table:table-cell>
          <table:table-cell table:formula="of:=[.D102]-[.D101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80" office:value-type="float" office:value="8080" calcext:value-type="float">
            <text:p>8080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935185185185185" calcext:value-type="float">
            <text:p>0,00093518518518518500</text:p>
          </table:table-cell>
          <table:table-cell table:formula="of:=[.D103]-[.D102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80" office:value-type="float" office:value="8160" calcext:value-type="float">
            <text:p>8160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944444444444445" calcext:value-type="float">
            <text:p>0,00094444444444444500</text:p>
          </table:table-cell>
          <table:table-cell table:formula="of:=[.D104]-[.D103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80" office:value-type="float" office:value="8240" calcext:value-type="float">
            <text:p>8240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953703703703704" calcext:value-type="float">
            <text:p>0,00095370370370370400</text:p>
          </table:table-cell>
          <table:table-cell table:formula="of:=[.D105]-[.D104]" office:value-type="float" office:value="0.00000925925925925931" calcext:value-type="float">
            <text:p>0,00000925925925925931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80" office:value-type="float" office:value="8320" calcext:value-type="float">
            <text:p>8320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962962962962963" calcext:value-type="float">
            <text:p>0,00096296296296296300</text:p>
          </table:table-cell>
          <table:table-cell table:formula="of:=[.D106]-[.D105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80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972222222222222" calcext:value-type="float">
            <text:p>0,00097222222222222200</text:p>
          </table:table-cell>
          <table:table-cell table:formula="of:=[.D107]-[.D106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80" office:value-type="float" office:value="8480" calcext:value-type="float">
            <text:p>8480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981481481481481" calcext:value-type="float">
            <text:p>0,00098148148148148100</text:p>
          </table:table-cell>
          <table:table-cell table:formula="of:=[.D108]-[.D107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80" office:value-type="float" office:value="8560" calcext:value-type="float">
            <text:p>8560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990740740740741" calcext:value-type="float">
            <text:p>0,00099074074074074100</text:p>
          </table:table-cell>
          <table:table-cell table:formula="of:=[.D109]-[.D108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80" office:value-type="float" office:value="8640" calcext:value-type="float">
            <text:p>8640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1" calcext:value-type="float">
            <text:p>0,00100000000000000000</text:p>
          </table:table-cell>
          <table:table-cell table:formula="of:=[.D110]-[.D109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80" office:value-type="float" office:value="8720" calcext:value-type="float">
            <text:p>8720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100925925925926" calcext:value-type="float">
            <text:p>0,00100925925925926000</text:p>
          </table:table-cell>
          <table:table-cell table:formula="of:=[.D111]-[.D110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80" office:value-type="float" office:value="8800" calcext:value-type="float">
            <text:p>880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101851851851852" calcext:value-type="float">
            <text:p>0,00101851851851852000</text:p>
          </table:table-cell>
          <table:table-cell table:formula="of:=[.D112]-[.D111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80" office:value-type="float" office:value="8880" calcext:value-type="float">
            <text:p>8880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102777777777778" calcext:value-type="float">
            <text:p>0,00102777777777778000</text:p>
          </table:table-cell>
          <table:table-cell table:formula="of:=[.D113]-[.D112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80" office:value-type="float" office:value="8960" calcext:value-type="float">
            <text:p>8960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103703703703704" calcext:value-type="float">
            <text:p>0,00103703703703704000</text:p>
          </table:table-cell>
          <table:table-cell table:formula="of:=[.D114]-[.D113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80" office:value-type="float" office:value="9040" calcext:value-type="float">
            <text:p>9040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10462962962963" calcext:value-type="float">
            <text:p>0,00104629629629630000</text:p>
          </table:table-cell>
          <table:table-cell table:formula="of:=[.D115]-[.D114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80" office:value-type="float" office:value="9120" calcext:value-type="float">
            <text:p>9120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05555555555556" calcext:value-type="float">
            <text:p>0,00105555555555556000</text:p>
          </table:table-cell>
          <table:table-cell table:formula="of:=[.D116]-[.D115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80" office:value-type="float" office:value="9200" calcext:value-type="float">
            <text:p>920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06481481481481" calcext:value-type="float">
            <text:p>0,00106481481481481000</text:p>
          </table:table-cell>
          <table:table-cell table:formula="of:=[.D117]-[.D116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80" office:value-type="float" office:value="9280" calcext:value-type="float">
            <text:p>9280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07407407407407" calcext:value-type="float">
            <text:p>0,00107407407407407000</text:p>
          </table:table-cell>
          <table:table-cell table:formula="of:=[.D118]-[.D117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80" office:value-type="float" office:value="9360" calcext:value-type="float">
            <text:p>9360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08333333333333" calcext:value-type="float">
            <text:p>0,00108333333333333000</text:p>
          </table:table-cell>
          <table:table-cell table:formula="of:=[.D119]-[.D118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80" office:value-type="float" office:value="9440" calcext:value-type="float">
            <text:p>9440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09259259259259" calcext:value-type="float">
            <text:p>0,00109259259259259000</text:p>
          </table:table-cell>
          <table:table-cell table:formula="of:=[.D120]-[.D119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80" office:value-type="float" office:value="9520" calcext:value-type="float">
            <text:p>9520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10185185185185" calcext:value-type="float">
            <text:p>0,00110185185185185000</text:p>
          </table:table-cell>
          <table:table-cell table:formula="of:=[.D121]-[.D120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80" office:value-type="float" office:value="9600" calcext:value-type="float">
            <text:p>960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11111111111111" calcext:value-type="float">
            <text:p>0,00111111111111111000</text:p>
          </table:table-cell>
          <table:table-cell table:formula="of:=[.D122]-[.D121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80" office:value-type="float" office:value="9680" calcext:value-type="float">
            <text:p>9680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12037037037037" calcext:value-type="float">
            <text:p>0,00112037037037037000</text:p>
          </table:table-cell>
          <table:table-cell table:formula="of:=[.D123]-[.D122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80" office:value-type="float" office:value="9760" calcext:value-type="float">
            <text:p>9760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12962962962963" calcext:value-type="float">
            <text:p>0,00112962962962963000</text:p>
          </table:table-cell>
          <table:table-cell table:formula="of:=[.D124]-[.D123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80" office:value-type="float" office:value="9840" calcext:value-type="float">
            <text:p>9840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13888888888889" calcext:value-type="float">
            <text:p>0,00113888888888889000</text:p>
          </table:table-cell>
          <table:table-cell table:formula="of:=[.D125]-[.D124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80" office:value-type="float" office:value="9920" calcext:value-type="float">
            <text:p>9920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14814814814815" calcext:value-type="float">
            <text:p>0,00114814814814815000</text:p>
          </table:table-cell>
          <table:table-cell table:formula="of:=[.D126]-[.D125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80" office:value-type="float" office:value="10000" calcext:value-type="float">
            <text:p>1000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15740740740741" calcext:value-type="float">
            <text:p>0,00115740740740741000</text:p>
          </table:table-cell>
          <table:table-cell table:formula="of:=[.D127]-[.D126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80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16666666666667" calcext:value-type="float">
            <text:p>0,00116666666666667000</text:p>
          </table:table-cell>
          <table:table-cell table:formula="of:=[.D128]-[.D127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80" office:value-type="float" office:value="10160" calcext:value-type="float">
            <text:p>10160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17592592592593" calcext:value-type="float">
            <text:p>0,00117592592592593000</text:p>
          </table:table-cell>
          <table:table-cell table:formula="of:=[.D129]-[.D128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80" office:value-type="float" office:value="10240" calcext:value-type="float">
            <text:p>10240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18518518518519" calcext:value-type="float">
            <text:p>0,00118518518518519000</text:p>
          </table:table-cell>
          <table:table-cell table:formula="of:=[.D130]-[.D129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80" office:value-type="float" office:value="10320" calcext:value-type="float">
            <text:p>10320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19444444444444" calcext:value-type="float">
            <text:p>0,00119444444444444000</text:p>
          </table:table-cell>
          <table:table-cell table:formula="of:=[.D131]-[.D130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80" office:value-type="float" office:value="10400" calcext:value-type="float">
            <text:p>1040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2037037037037" calcext:value-type="float">
            <text:p>0,00120370370370370000</text:p>
          </table:table-cell>
          <table:table-cell table:formula="of:=[.D132]-[.D131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80" office:value-type="float" office:value="10480" calcext:value-type="float">
            <text:p>10480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21296296296296" calcext:value-type="float">
            <text:p>0,00121296296296296000</text:p>
          </table:table-cell>
          <table:table-cell table:formula="of:=[.D133]-[.D132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80" office:value-type="float" office:value="10560" calcext:value-type="float">
            <text:p>10560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22222222222222" calcext:value-type="float">
            <text:p>0,00122222222222222000</text:p>
          </table:table-cell>
          <table:table-cell table:formula="of:=[.D134]-[.D133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80" office:value-type="float" office:value="10640" calcext:value-type="float">
            <text:p>10640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23148148148148" calcext:value-type="float">
            <text:p>0,00123148148148148000</text:p>
          </table:table-cell>
          <table:table-cell table:formula="of:=[.D135]-[.D134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80" office:value-type="float" office:value="10720" calcext:value-type="float">
            <text:p>10720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24074074074074" calcext:value-type="float">
            <text:p>0,00124074074074074000</text:p>
          </table:table-cell>
          <table:table-cell table:formula="of:=[.D136]-[.D135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80" office:value-type="float" office:value="10800" calcext:value-type="float">
            <text:p>1080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25" calcext:value-type="float">
            <text:p>0,00125000000000000000</text:p>
          </table:table-cell>
          <table:table-cell table:formula="of:=[.D137]-[.D136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80" office:value-type="float" office:value="10880" calcext:value-type="float">
            <text:p>10880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25925925925926" calcext:value-type="float">
            <text:p>0,00125925925925926000</text:p>
          </table:table-cell>
          <table:table-cell table:formula="of:=[.D138]-[.D137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80" office:value-type="float" office:value="10960" calcext:value-type="float">
            <text:p>10960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26851851851852" calcext:value-type="float">
            <text:p>0,00126851851851852000</text:p>
          </table:table-cell>
          <table:table-cell table:formula="of:=[.D139]-[.D138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80" office:value-type="float" office:value="11040" calcext:value-type="float">
            <text:p>11040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27777777777778" calcext:value-type="float">
            <text:p>0,00127777777777778000</text:p>
          </table:table-cell>
          <table:table-cell table:formula="of:=[.D140]-[.D139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80" office:value-type="float" office:value="11120" calcext:value-type="float">
            <text:p>11120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28703703703704" calcext:value-type="float">
            <text:p>0,00128703703703704000</text:p>
          </table:table-cell>
          <table:table-cell table:formula="of:=[.D141]-[.D140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80" office:value-type="float" office:value="11200" calcext:value-type="float">
            <text:p>1120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2962962962963" calcext:value-type="float">
            <text:p>0,00129629629629630000</text:p>
          </table:table-cell>
          <table:table-cell table:formula="of:=[.D142]-[.D141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80" office:value-type="float" office:value="11280" calcext:value-type="float">
            <text:p>11280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30555555555556" calcext:value-type="float">
            <text:p>0,00130555555555556000</text:p>
          </table:table-cell>
          <table:table-cell table:formula="of:=[.D143]-[.D142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80" office:value-type="float" office:value="11360" calcext:value-type="float">
            <text:p>11360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31481481481481" calcext:value-type="float">
            <text:p>0,00131481481481481000</text:p>
          </table:table-cell>
          <table:table-cell table:formula="of:=[.D144]-[.D143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80" office:value-type="float" office:value="11440" calcext:value-type="float">
            <text:p>11440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32407407407407" calcext:value-type="float">
            <text:p>0,00132407407407407000</text:p>
          </table:table-cell>
          <table:table-cell table:formula="of:=[.D145]-[.D144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80" office:value-type="float" office:value="11520" calcext:value-type="float">
            <text:p>11520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33333333333333" calcext:value-type="float">
            <text:p>0,00133333333333333000</text:p>
          </table:table-cell>
          <table:table-cell table:formula="of:=[.D146]-[.D145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80" office:value-type="float" office:value="11600" calcext:value-type="float">
            <text:p>1160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34259259259259" calcext:value-type="float">
            <text:p>0,00134259259259259000</text:p>
          </table:table-cell>
          <table:table-cell table:formula="of:=[.D147]-[.D146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80" office:value-type="float" office:value="11680" calcext:value-type="float">
            <text:p>11680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35185185185185" calcext:value-type="float">
            <text:p>0,00135185185185185000</text:p>
          </table:table-cell>
          <table:table-cell table:formula="of:=[.D148]-[.D147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80" office:value-type="float" office:value="11760" calcext:value-type="float">
            <text:p>11760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36111111111111" calcext:value-type="float">
            <text:p>0,00136111111111111000</text:p>
          </table:table-cell>
          <table:table-cell table:formula="of:=[.D149]-[.D148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80" office:value-type="float" office:value="11840" calcext:value-type="float">
            <text:p>11840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37037037037037" calcext:value-type="float">
            <text:p>0,00137037037037037000</text:p>
          </table:table-cell>
          <table:table-cell table:formula="of:=[.D150]-[.D149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80" office:value-type="float" office:value="11920" calcext:value-type="float">
            <text:p>11920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37962962962963" calcext:value-type="float">
            <text:p>0,00137962962962963000</text:p>
          </table:table-cell>
          <table:table-cell table:formula="of:=[.D151]-[.D150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80" office:value-type="float" office:value="12000" calcext:value-type="float">
            <text:p>120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38888888888889" calcext:value-type="float">
            <text:p>0,00138888888888889000</text:p>
          </table:table-cell>
          <table:table-cell table:formula="of:=[.D152]-[.D151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80" office:value-type="float" office:value="12080" calcext:value-type="float">
            <text:p>12080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39814814814815" calcext:value-type="float">
            <text:p>0,00139814814814815000</text:p>
          </table:table-cell>
          <table:table-cell table:formula="of:=[.D153]-[.D152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80" office:value-type="float" office:value="12160" calcext:value-type="float">
            <text:p>12160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40740740740741" calcext:value-type="float">
            <text:p>0,00140740740740741000</text:p>
          </table:table-cell>
          <table:table-cell table:formula="of:=[.D154]-[.D153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80" office:value-type="float" office:value="12240" calcext:value-type="float">
            <text:p>12240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41666666666667" calcext:value-type="float">
            <text:p>0,00141666666666667000</text:p>
          </table:table-cell>
          <table:table-cell table:formula="of:=[.D155]-[.D154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80" office:value-type="float" office:value="12320" calcext:value-type="float">
            <text:p>12320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42592592592593" calcext:value-type="float">
            <text:p>0,00142592592592593000</text:p>
          </table:table-cell>
          <table:table-cell table:formula="of:=[.D156]-[.D155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80" office:value-type="float" office:value="12400" calcext:value-type="float">
            <text:p>1240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43518518518519" calcext:value-type="float">
            <text:p>0,00143518518518519000</text:p>
          </table:table-cell>
          <table:table-cell table:formula="of:=[.D157]-[.D156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80" office:value-type="float" office:value="12480" calcext:value-type="float">
            <text:p>12480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44444444444444" calcext:value-type="float">
            <text:p>0,00144444444444444000</text:p>
          </table:table-cell>
          <table:table-cell table:formula="of:=[.D158]-[.D157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80" office:value-type="float" office:value="12560" calcext:value-type="float">
            <text:p>12560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4537037037037" calcext:value-type="float">
            <text:p>0,00145370370370370000</text:p>
          </table:table-cell>
          <table:table-cell table:formula="of:=[.D159]-[.D158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80" office:value-type="float" office:value="12640" calcext:value-type="float">
            <text:p>12640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46296296296296" calcext:value-type="float">
            <text:p>0,00146296296296296000</text:p>
          </table:table-cell>
          <table:table-cell table:formula="of:=[.D160]-[.D159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80" office:value-type="float" office:value="12720" calcext:value-type="float">
            <text:p>12720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47222222222222" calcext:value-type="float">
            <text:p>0,00147222222222222000</text:p>
          </table:table-cell>
          <table:table-cell table:formula="of:=[.D161]-[.D160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80" office:value-type="float" office:value="12800" calcext:value-type="float">
            <text:p>1280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48148148148148" calcext:value-type="float">
            <text:p>0,00148148148148148000</text:p>
          </table:table-cell>
          <table:table-cell table:formula="of:=[.D162]-[.D161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80" office:value-type="float" office:value="12880" calcext:value-type="float">
            <text:p>12880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49074074074074" calcext:value-type="float">
            <text:p>0,00149074074074074000</text:p>
          </table:table-cell>
          <table:table-cell table:formula="of:=[.D163]-[.D162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80" office:value-type="float" office:value="12960" calcext:value-type="float">
            <text:p>12960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5" calcext:value-type="float">
            <text:p>0,00150000000000000000</text:p>
          </table:table-cell>
          <table:table-cell table:formula="of:=[.D164]-[.D163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80" office:value-type="float" office:value="13040" calcext:value-type="float">
            <text:p>13040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50925925925926" calcext:value-type="float">
            <text:p>0,00150925925925926000</text:p>
          </table:table-cell>
          <table:table-cell table:formula="of:=[.D165]-[.D164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80" office:value-type="float" office:value="13120" calcext:value-type="float">
            <text:p>13120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51851851851852" calcext:value-type="float">
            <text:p>0,00151851851851852000</text:p>
          </table:table-cell>
          <table:table-cell table:formula="of:=[.D166]-[.D165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80" office:value-type="float" office:value="13200" calcext:value-type="float">
            <text:p>1320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52777777777778" calcext:value-type="float">
            <text:p>0,00152777777777778000</text:p>
          </table:table-cell>
          <table:table-cell table:formula="of:=[.D167]-[.D166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80" office:value-type="float" office:value="13280" calcext:value-type="float">
            <text:p>13280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53703703703704" calcext:value-type="float">
            <text:p>0,00153703703703704000</text:p>
          </table:table-cell>
          <table:table-cell table:formula="of:=[.D168]-[.D167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80" office:value-type="float" office:value="13360" calcext:value-type="float">
            <text:p>13360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5462962962963" calcext:value-type="float">
            <text:p>0,00154629629629630000</text:p>
          </table:table-cell>
          <table:table-cell table:formula="of:=[.D169]-[.D168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80" office:value-type="float" office:value="13440" calcext:value-type="float">
            <text:p>13440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55555555555556" calcext:value-type="float">
            <text:p>0,00155555555555556000</text:p>
          </table:table-cell>
          <table:table-cell table:formula="of:=[.D170]-[.D169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80" office:value-type="float" office:value="13520" calcext:value-type="float">
            <text:p>13520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56481481481481" calcext:value-type="float">
            <text:p>0,00156481481481482000</text:p>
          </table:table-cell>
          <table:table-cell table:formula="of:=[.D171]-[.D170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80" office:value-type="float" office:value="13600" calcext:value-type="float">
            <text:p>1360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57407407407407" calcext:value-type="float">
            <text:p>0,00157407407407407000</text:p>
          </table:table-cell>
          <table:table-cell table:formula="of:=[.D172]-[.D171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80" office:value-type="float" office:value="13680" calcext:value-type="float">
            <text:p>13680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58333333333333" calcext:value-type="float">
            <text:p>0,00158333333333333000</text:p>
          </table:table-cell>
          <table:table-cell table:formula="of:=[.D173]-[.D172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80" office:value-type="float" office:value="13760" calcext:value-type="float">
            <text:p>13760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59259259259259" calcext:value-type="float">
            <text:p>0,00159259259259259000</text:p>
          </table:table-cell>
          <table:table-cell table:formula="of:=[.D174]-[.D173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80" office:value-type="float" office:value="13840" calcext:value-type="float">
            <text:p>13840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60185185185185" calcext:value-type="float">
            <text:p>0,00160185185185185000</text:p>
          </table:table-cell>
          <table:table-cell table:formula="of:=[.D175]-[.D174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80" office:value-type="float" office:value="13920" calcext:value-type="float">
            <text:p>13920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61111111111111" calcext:value-type="float">
            <text:p>0,00161111111111111000</text:p>
          </table:table-cell>
          <table:table-cell table:formula="of:=[.D176]-[.D175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80" office:value-type="float" office:value="14000" calcext:value-type="float">
            <text:p>1400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62037037037037" calcext:value-type="float">
            <text:p>0,00162037037037037000</text:p>
          </table:table-cell>
          <table:table-cell table:formula="of:=[.D177]-[.D176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80" office:value-type="float" office:value="14080" calcext:value-type="float">
            <text:p>14080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62962962962963" calcext:value-type="float">
            <text:p>0,00162962962962963000</text:p>
          </table:table-cell>
          <table:table-cell table:formula="of:=[.D178]-[.D177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80" office:value-type="float" office:value="14160" calcext:value-type="float">
            <text:p>14160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63888888888889" calcext:value-type="float">
            <text:p>0,00163888888888889000</text:p>
          </table:table-cell>
          <table:table-cell table:formula="of:=[.D179]-[.D178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80" office:value-type="float" office:value="14240" calcext:value-type="float">
            <text:p>14240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64814814814815" calcext:value-type="float">
            <text:p>0,00164814814814815000</text:p>
          </table:table-cell>
          <table:table-cell table:formula="of:=[.D180]-[.D179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80" office:value-type="float" office:value="14320" calcext:value-type="float">
            <text:p>14320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65740740740741" calcext:value-type="float">
            <text:p>0,00165740740740741000</text:p>
          </table:table-cell>
          <table:table-cell table:formula="of:=[.D181]-[.D180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80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66666666666667" calcext:value-type="float">
            <text:p>0,00166666666666667000</text:p>
          </table:table-cell>
          <table:table-cell table:formula="of:=[.D182]-[.D181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80" office:value-type="float" office:value="14480" calcext:value-type="float">
            <text:p>14480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67592592592593" calcext:value-type="float">
            <text:p>0,00167592592592593000</text:p>
          </table:table-cell>
          <table:table-cell table:formula="of:=[.D183]-[.D182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80" office:value-type="float" office:value="14560" calcext:value-type="float">
            <text:p>14560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68518518518519" calcext:value-type="float">
            <text:p>0,00168518518518519000</text:p>
          </table:table-cell>
          <table:table-cell table:formula="of:=[.D184]-[.D183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80" office:value-type="float" office:value="14640" calcext:value-type="float">
            <text:p>14640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69444444444444" calcext:value-type="float">
            <text:p>0,00169444444444444000</text:p>
          </table:table-cell>
          <table:table-cell table:formula="of:=[.D185]-[.D184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80" office:value-type="float" office:value="14720" calcext:value-type="float">
            <text:p>14720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7037037037037" calcext:value-type="float">
            <text:p>0,00170370370370370000</text:p>
          </table:table-cell>
          <table:table-cell table:formula="of:=[.D186]-[.D185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80" office:value-type="float" office:value="14800" calcext:value-type="float">
            <text:p>1480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71296296296296" calcext:value-type="float">
            <text:p>0,00171296296296296000</text:p>
          </table:table-cell>
          <table:table-cell table:formula="of:=[.D187]-[.D186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80" office:value-type="float" office:value="14880" calcext:value-type="float">
            <text:p>14880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72222222222222" calcext:value-type="float">
            <text:p>0,00172222222222222000</text:p>
          </table:table-cell>
          <table:table-cell table:formula="of:=[.D188]-[.D187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80" office:value-type="float" office:value="14960" calcext:value-type="float">
            <text:p>14960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73148148148148" calcext:value-type="float">
            <text:p>0,00173148148148148000</text:p>
          </table:table-cell>
          <table:table-cell table:formula="of:=[.D189]-[.D188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80" office:value-type="float" office:value="15040" calcext:value-type="float">
            <text:p>15040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74074074074074" calcext:value-type="float">
            <text:p>0,00174074074074074000</text:p>
          </table:table-cell>
          <table:table-cell table:formula="of:=[.D190]-[.D189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80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75" calcext:value-type="float">
            <text:p>0,00175000000000000000</text:p>
          </table:table-cell>
          <table:table-cell table:formula="of:=[.D191]-[.D190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80" office:value-type="float" office:value="15200" calcext:value-type="float">
            <text:p>1520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75925925925926" calcext:value-type="float">
            <text:p>0,00175925925925926000</text:p>
          </table:table-cell>
          <table:table-cell table:formula="of:=[.D192]-[.D191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80" office:value-type="float" office:value="15280" calcext:value-type="float">
            <text:p>15280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76851851851852" calcext:value-type="float">
            <text:p>0,00176851851851852000</text:p>
          </table:table-cell>
          <table:table-cell table:formula="of:=[.D193]-[.D192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80" office:value-type="float" office:value="15360" calcext:value-type="float">
            <text:p>15360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77777777777778" calcext:value-type="float">
            <text:p>0,00177777777777778000</text:p>
          </table:table-cell>
          <table:table-cell table:formula="of:=[.D194]-[.D193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80" office:value-type="float" office:value="15440" calcext:value-type="float">
            <text:p>15440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78703703703704" calcext:value-type="float">
            <text:p>0,00178703703703704000</text:p>
          </table:table-cell>
          <table:table-cell table:formula="of:=[.D195]-[.D194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80" office:value-type="float" office:value="15520" calcext:value-type="float">
            <text:p>15520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7962962962963" calcext:value-type="float">
            <text:p>0,00179629629629630000</text:p>
          </table:table-cell>
          <table:table-cell table:formula="of:=[.D196]-[.D195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80" office:value-type="float" office:value="15600" calcext:value-type="float">
            <text:p>1560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80555555555556" calcext:value-type="float">
            <text:p>0,00180555555555556000</text:p>
          </table:table-cell>
          <table:table-cell table:formula="of:=[.D197]-[.D196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80" office:value-type="float" office:value="15680" calcext:value-type="float">
            <text:p>15680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81481481481482" calcext:value-type="float">
            <text:p>0,00181481481481482000</text:p>
          </table:table-cell>
          <table:table-cell table:formula="of:=[.D198]-[.D197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80" office:value-type="float" office:value="15760" calcext:value-type="float">
            <text:p>15760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82407407407407" calcext:value-type="float">
            <text:p>0,00182407407407407000</text:p>
          </table:table-cell>
          <table:table-cell table:formula="of:=[.D199]-[.D198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80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83333333333333" calcext:value-type="float">
            <text:p>0,00183333333333333000</text:p>
          </table:table-cell>
          <table:table-cell table:formula="of:=[.D200]-[.D199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80" office:value-type="float" office:value="15920" calcext:value-type="float">
            <text:p>15920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84259259259259" calcext:value-type="float">
            <text:p>0,00184259259259259000</text:p>
          </table:table-cell>
          <table:table-cell table:formula="of:=[.D201]-[.D200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80" office:value-type="float" office:value="16000" calcext:value-type="float">
            <text:p>160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85185185185185" calcext:value-type="float">
            <text:p>0,00185185185185185000</text:p>
          </table:table-cell>
          <table:table-cell table:formula="of:=[.D202]-[.D201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80" office:value-type="float" office:value="16080" calcext:value-type="float">
            <text:p>16080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86111111111111" calcext:value-type="float">
            <text:p>0,00186111111111111000</text:p>
          </table:table-cell>
          <table:table-cell table:formula="of:=[.D203]-[.D202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80" office:value-type="float" office:value="16160" calcext:value-type="float">
            <text:p>16160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87037037037037" calcext:value-type="float">
            <text:p>0,00187037037037037000</text:p>
          </table:table-cell>
          <table:table-cell table:formula="of:=[.D204]-[.D203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80" office:value-type="float" office:value="16240" calcext:value-type="float">
            <text:p>16240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87962962962963" calcext:value-type="float">
            <text:p>0,00187962962962963000</text:p>
          </table:table-cell>
          <table:table-cell table:formula="of:=[.D205]-[.D204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80" office:value-type="float" office:value="16320" calcext:value-type="float">
            <text:p>16320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88888888888889" calcext:value-type="float">
            <text:p>0,00188888888888889000</text:p>
          </table:table-cell>
          <table:table-cell table:formula="of:=[.D206]-[.D205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80" office:value-type="float" office:value="16400" calcext:value-type="float">
            <text:p>1640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89814814814815" calcext:value-type="float">
            <text:p>0,00189814814814815000</text:p>
          </table:table-cell>
          <table:table-cell table:formula="of:=[.D207]-[.D206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80" office:value-type="float" office:value="16480" calcext:value-type="float">
            <text:p>16480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90740740740741" calcext:value-type="float">
            <text:p>0,00190740740740741000</text:p>
          </table:table-cell>
          <table:table-cell table:formula="of:=[.D208]-[.D207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80" office:value-type="float" office:value="16560" calcext:value-type="float">
            <text:p>16560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91666666666667" calcext:value-type="float">
            <text:p>0,00191666666666667000</text:p>
          </table:table-cell>
          <table:table-cell table:formula="of:=[.D209]-[.D208]" office:value-type="float" office:value="0.00000925925925925942" calcext:value-type="float">
            <text:p>0,00000925925925925942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80" office:value-type="float" office:value="16640" calcext:value-type="float">
            <text:p>16640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92592592592593" calcext:value-type="float">
            <text:p>0,00192592592592593000</text:p>
          </table:table-cell>
          <table:table-cell table:formula="of:=[.D210]-[.D209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80" office:value-type="float" office:value="16720" calcext:value-type="float">
            <text:p>16720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93518518518519" calcext:value-type="float">
            <text:p>0,00193518518518519000</text:p>
          </table:table-cell>
          <table:table-cell table:formula="of:=[.D211]-[.D210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80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94444444444444" calcext:value-type="float">
            <text:p>0,00194444444444444000</text:p>
          </table:table-cell>
          <table:table-cell table:formula="of:=[.D212]-[.D211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80" office:value-type="float" office:value="16880" calcext:value-type="float">
            <text:p>16880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9537037037037" calcext:value-type="float">
            <text:p>0,00195370370370370000</text:p>
          </table:table-cell>
          <table:table-cell table:formula="of:=[.D213]-[.D212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80" office:value-type="float" office:value="16960" calcext:value-type="float">
            <text:p>16960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96296296296296" calcext:value-type="float">
            <text:p>0,00196296296296296000</text:p>
          </table:table-cell>
          <table:table-cell table:formula="of:=[.D214]-[.D213]" office:value-type="float" office:value="0.00000925925925925964" calcext:value-type="float">
            <text:p>0,00000925925925925964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80" office:value-type="float" office:value="17040" calcext:value-type="float">
            <text:p>17040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97222222222222" calcext:value-type="float">
            <text:p>0,00197222222222222000</text:p>
          </table:table-cell>
          <table:table-cell table:formula="of:=[.D215]-[.D214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80" office:value-type="float" office:value="17120" calcext:value-type="float">
            <text:p>17120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98148148148148" calcext:value-type="float">
            <text:p>0,00198148148148148000</text:p>
          </table:table-cell>
          <table:table-cell table:formula="of:=[.D216]-[.D215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80" office:value-type="float" office:value="17200" calcext:value-type="float">
            <text:p>1720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99074074074074" calcext:value-type="float">
            <text:p>0,00199074074074074000</text:p>
          </table:table-cell>
          <table:table-cell table:formula="of:=[.D217]-[.D216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80" office:value-type="float" office:value="17280" calcext:value-type="float">
            <text:p>17280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2" calcext:value-type="float">
            <text:p>0,00200000000000000000</text:p>
          </table:table-cell>
          <table:table-cell table:formula="of:=[.D218]-[.D217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80" office:value-type="float" office:value="17360" calcext:value-type="float">
            <text:p>17360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200925925925926" calcext:value-type="float">
            <text:p>0,00200925925925926000</text:p>
          </table:table-cell>
          <table:table-cell table:formula="of:=[.D219]-[.D218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80" office:value-type="float" office:value="17440" calcext:value-type="float">
            <text:p>17440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201851851851852" calcext:value-type="float">
            <text:p>0,00201851851851852000</text:p>
          </table:table-cell>
          <table:table-cell table:formula="of:=[.D220]-[.D219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80" office:value-type="float" office:value="17520" calcext:value-type="float">
            <text:p>17520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202777777777778" calcext:value-type="float">
            <text:p>0,00202777777777778000</text:p>
          </table:table-cell>
          <table:table-cell table:formula="of:=[.D221]-[.D220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80" office:value-type="float" office:value="17600" calcext:value-type="float">
            <text:p>1760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203703703703704" calcext:value-type="float">
            <text:p>0,00203703703703704000</text:p>
          </table:table-cell>
          <table:table-cell table:formula="of:=[.D222]-[.D221]" office:value-type="float" office:value="0.00000925925925925964" calcext:value-type="float">
            <text:p>0,00000925925925925964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80" office:value-type="float" office:value="17680" calcext:value-type="float">
            <text:p>17680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20462962962963" calcext:value-type="float">
            <text:p>0,00204629629629630000</text:p>
          </table:table-cell>
          <table:table-cell table:formula="of:=[.D223]-[.D222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80" office:value-type="float" office:value="17760" calcext:value-type="float">
            <text:p>17760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205555555555556" calcext:value-type="float">
            <text:p>0,00205555555555556000</text:p>
          </table:table-cell>
          <table:table-cell table:formula="of:=[.D224]-[.D223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80" office:value-type="float" office:value="17840" calcext:value-type="float">
            <text:p>17840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206481481481482" calcext:value-type="float">
            <text:p>0,00206481481481482000</text:p>
          </table:table-cell>
          <table:table-cell table:formula="of:=[.D225]-[.D224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80" office:value-type="float" office:value="17920" calcext:value-type="float">
            <text:p>17920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207407407407407" calcext:value-type="float">
            <text:p>0,00207407407407407000</text:p>
          </table:table-cell>
          <table:table-cell table:formula="of:=[.D226]-[.D225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80" office:value-type="float" office:value="18000" calcext:value-type="float">
            <text:p>1800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208333333333333" calcext:value-type="float">
            <text:p>0,00208333333333333000</text:p>
          </table:table-cell>
          <table:table-cell table:formula="of:=[.D227]-[.D226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80" office:value-type="float" office:value="18080" calcext:value-type="float">
            <text:p>18080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209259259259259" calcext:value-type="float">
            <text:p>0,00209259259259259000</text:p>
          </table:table-cell>
          <table:table-cell table:formula="of:=[.D228]-[.D227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80" office:value-type="float" office:value="18160" calcext:value-type="float">
            <text:p>18160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210185185185185" calcext:value-type="float">
            <text:p>0,00210185185185185000</text:p>
          </table:table-cell>
          <table:table-cell table:formula="of:=[.D229]-[.D228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80" office:value-type="float" office:value="18240" calcext:value-type="float">
            <text:p>18240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11111111111111" calcext:value-type="float">
            <text:p>0,00211111111111111000</text:p>
          </table:table-cell>
          <table:table-cell table:formula="of:=[.D230]-[.D229]" office:value-type="float" office:value="0.00000925925925925964" calcext:value-type="float">
            <text:p>0,00000925925925925964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80" office:value-type="float" office:value="18320" calcext:value-type="float">
            <text:p>18320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12037037037037" calcext:value-type="float">
            <text:p>0,00212037037037037000</text:p>
          </table:table-cell>
          <table:table-cell table:formula="of:=[.D231]-[.D230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80" office:value-type="float" office:value="18400" calcext:value-type="float">
            <text:p>1840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12962962962963" calcext:value-type="float">
            <text:p>0,00212962962962963000</text:p>
          </table:table-cell>
          <table:table-cell table:formula="of:=[.D232]-[.D231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80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13888888888889" calcext:value-type="float">
            <text:p>0,00213888888888889000</text:p>
          </table:table-cell>
          <table:table-cell table:formula="of:=[.D233]-[.D232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80" office:value-type="float" office:value="18560" calcext:value-type="float">
            <text:p>18560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14814814814815" calcext:value-type="float">
            <text:p>0,00214814814814815000</text:p>
          </table:table-cell>
          <table:table-cell table:formula="of:=[.D234]-[.D233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80" office:value-type="float" office:value="18640" calcext:value-type="float">
            <text:p>18640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15740740740741" calcext:value-type="float">
            <text:p>0,00215740740740741000</text:p>
          </table:table-cell>
          <table:table-cell table:formula="of:=[.D235]-[.D234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80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16666666666667" calcext:value-type="float">
            <text:p>0,00216666666666667000</text:p>
          </table:table-cell>
          <table:table-cell table:formula="of:=[.D236]-[.D235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80" office:value-type="float" office:value="18800" calcext:value-type="float">
            <text:p>1880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17592592592593" calcext:value-type="float">
            <text:p>0,00217592592592593000</text:p>
          </table:table-cell>
          <table:table-cell table:formula="of:=[.D237]-[.D236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80" office:value-type="float" office:value="18880" calcext:value-type="float">
            <text:p>18880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18518518518519" calcext:value-type="float">
            <text:p>0,00218518518518519000</text:p>
          </table:table-cell>
          <table:table-cell table:formula="of:=[.D238]-[.D237]" office:value-type="float" office:value="0.00000925925925925964" calcext:value-type="float">
            <text:p>0,00000925925925925964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80" office:value-type="float" office:value="18960" calcext:value-type="float">
            <text:p>18960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19444444444444" calcext:value-type="float">
            <text:p>0,00219444444444444000</text:p>
          </table:table-cell>
          <table:table-cell table:formula="of:=[.D239]-[.D238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80" office:value-type="float" office:value="19040" calcext:value-type="float">
            <text:p>19040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2037037037037" calcext:value-type="float">
            <text:p>0,00220370370370370000</text:p>
          </table:table-cell>
          <table:table-cell table:formula="of:=[.D240]-[.D239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80" office:value-type="float" office:value="19120" calcext:value-type="float">
            <text:p>19120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21296296296296" calcext:value-type="float">
            <text:p>0,00221296296296296000</text:p>
          </table:table-cell>
          <table:table-cell table:formula="of:=[.D241]-[.D240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80" office:value-type="float" office:value="19200" calcext:value-type="float">
            <text:p>1920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22222222222222" calcext:value-type="float">
            <text:p>0,00222222222222222000</text:p>
          </table:table-cell>
          <table:table-cell table:formula="of:=[.D242]-[.D241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80" office:value-type="float" office:value="19280" calcext:value-type="float">
            <text:p>19280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23148148148148" calcext:value-type="float">
            <text:p>0,00223148148148148000</text:p>
          </table:table-cell>
          <table:table-cell table:formula="of:=[.D243]-[.D242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80" office:value-type="float" office:value="19360" calcext:value-type="float">
            <text:p>19360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24074074074074" calcext:value-type="float">
            <text:p>0,00224074074074074000</text:p>
          </table:table-cell>
          <table:table-cell table:formula="of:=[.D244]-[.D243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80" office:value-type="float" office:value="19440" calcext:value-type="float">
            <text:p>19440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25" calcext:value-type="float">
            <text:p>0,00225000000000000000</text:p>
          </table:table-cell>
          <table:table-cell table:formula="of:=[.D245]-[.D244]" office:value-type="float" office:value="0.00000925925925925964" calcext:value-type="float">
            <text:p>0,00000925925925925964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80" office:value-type="float" office:value="19520" calcext:value-type="float">
            <text:p>19520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25925925925926" calcext:value-type="float">
            <text:p>0,00225925925925926000</text:p>
          </table:table-cell>
          <table:table-cell table:formula="of:=[.D246]-[.D245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80" office:value-type="float" office:value="19600" calcext:value-type="float">
            <text:p>1960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26851851851852" calcext:value-type="float">
            <text:p>0,00226851851851852000</text:p>
          </table:table-cell>
          <table:table-cell table:formula="of:=[.D247]-[.D246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80" office:value-type="float" office:value="19680" calcext:value-type="float">
            <text:p>19680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27777777777778" calcext:value-type="float">
            <text:p>0,00227777777777778000</text:p>
          </table:table-cell>
          <table:table-cell table:formula="of:=[.D248]-[.D247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80" office:value-type="float" office:value="19760" calcext:value-type="float">
            <text:p>19760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28703703703704" calcext:value-type="float">
            <text:p>0,00228703703703704000</text:p>
          </table:table-cell>
          <table:table-cell table:formula="of:=[.D249]-[.D248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80" office:value-type="float" office:value="19840" calcext:value-type="float">
            <text:p>19840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2962962962963" calcext:value-type="float">
            <text:p>0,00229629629629630000</text:p>
          </table:table-cell>
          <table:table-cell table:formula="of:=[.D250]-[.D249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80" office:value-type="float" office:value="19920" calcext:value-type="float">
            <text:p>19920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30555555555556" calcext:value-type="float">
            <text:p>0,00230555555555556000</text:p>
          </table:table-cell>
          <table:table-cell table:formula="of:=[.D251]-[.D250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80" office:value-type="float" office:value="20000" calcext:value-type="float">
            <text:p>200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31481481481481" calcext:value-type="float">
            <text:p>0,00231481481481481000</text:p>
          </table:table-cell>
          <table:table-cell table:formula="of:=[.D252]-[.D251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80" office:value-type="float" office:value="20080" calcext:value-type="float">
            <text:p>20080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32407407407407" calcext:value-type="float">
            <text:p>0,00232407407407407000</text:p>
          </table:table-cell>
          <table:table-cell table:formula="of:=[.D253]-[.D252]" office:value-type="float" office:value="0.00000925925925925964" calcext:value-type="float">
            <text:p>0,00000925925925925964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80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33333333333333" calcext:value-type="float">
            <text:p>0,00233333333333333000</text:p>
          </table:table-cell>
          <table:table-cell table:formula="of:=[.D254]-[.D253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80" office:value-type="float" office:value="20240" calcext:value-type="float">
            <text:p>20240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34259259259259" calcext:value-type="float">
            <text:p>0,00234259259259259000</text:p>
          </table:table-cell>
          <table:table-cell table:formula="of:=[.D255]-[.D254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80" office:value-type="float" office:value="20320" calcext:value-type="float">
            <text:p>20320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35185185185185" calcext:value-type="float">
            <text:p>0,00235185185185185000</text:p>
          </table:table-cell>
          <table:table-cell table:formula="of:=[.D256]-[.D255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80" office:value-type="float" office:value="20400" calcext:value-type="float">
            <text:p>2040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36111111111111" calcext:value-type="float">
            <text:p>0,00236111111111111000</text:p>
          </table:table-cell>
          <table:table-cell table:formula="of:=[.D257]-[.D256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80" office:value-type="float" office:value="20480" calcext:value-type="float">
            <text:p>20480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37037037037037" calcext:value-type="float">
            <text:p>0,00237037037037037000</text:p>
          </table:table-cell>
          <table:table-cell table:formula="of:=[.D258]-[.D257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80" office:value-type="float" office:value="20560" calcext:value-type="float">
            <text:p>20560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37962962962963" calcext:value-type="float">
            <text:p>0,00237962962962963000</text:p>
          </table:table-cell>
          <table:table-cell table:formula="of:=[.D259]-[.D258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80" office:value-type="float" office:value="20640" calcext:value-type="float">
            <text:p>20640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38888888888889" calcext:value-type="float">
            <text:p>0,00238888888888889000</text:p>
          </table:table-cell>
          <table:table-cell table:formula="of:=[.D260]-[.D259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80" office:value-type="float" office:value="20720" calcext:value-type="float">
            <text:p>20720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39814814814815" calcext:value-type="float">
            <text:p>0,00239814814814815000</text:p>
          </table:table-cell>
          <table:table-cell table:formula="of:=[.D261]-[.D260]" office:value-type="float" office:value="0.00000925925925925964" calcext:value-type="float">
            <text:p>0,00000925925925925964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80" office:value-type="float" office:value="20800" calcext:value-type="float">
            <text:p>2080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40740740740741" calcext:value-type="float">
            <text:p>0,00240740740740741000</text:p>
          </table:table-cell>
          <table:table-cell table:formula="of:=[.D262]-[.D261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80" office:value-type="float" office:value="20880" calcext:value-type="float">
            <text:p>20880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41666666666667" calcext:value-type="float">
            <text:p>0,00241666666666667000</text:p>
          </table:table-cell>
          <table:table-cell table:formula="of:=[.D263]-[.D262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80" office:value-type="float" office:value="20960" calcext:value-type="float">
            <text:p>20960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42592592592593" calcext:value-type="float">
            <text:p>0,00242592592592593000</text:p>
          </table:table-cell>
          <table:table-cell table:formula="of:=[.D264]-[.D263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80" office:value-type="float" office:value="21040" calcext:value-type="float">
            <text:p>21040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43518518518519" calcext:value-type="float">
            <text:p>0,00243518518518519000</text:p>
          </table:table-cell>
          <table:table-cell table:formula="of:=[.D265]-[.D264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80" office:value-type="float" office:value="21120" calcext:value-type="float">
            <text:p>21120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44444444444444" calcext:value-type="float">
            <text:p>0,00244444444444444000</text:p>
          </table:table-cell>
          <table:table-cell table:formula="of:=[.D266]-[.D265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80" office:value-type="float" office:value="21200" calcext:value-type="float">
            <text:p>2120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4537037037037" calcext:value-type="float">
            <text:p>0,00245370370370370000</text:p>
          </table:table-cell>
          <table:table-cell table:formula="of:=[.D267]-[.D266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80" office:value-type="float" office:value="21280" calcext:value-type="float">
            <text:p>21280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46296296296296" calcext:value-type="float">
            <text:p>0,00246296296296296000</text:p>
          </table:table-cell>
          <table:table-cell table:formula="of:=[.D268]-[.D267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80" office:value-type="float" office:value="21360" calcext:value-type="float">
            <text:p>21360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47222222222222" calcext:value-type="float">
            <text:p>0,00247222222222222000</text:p>
          </table:table-cell>
          <table:table-cell table:formula="of:=[.D269]-[.D268]" office:value-type="float" office:value="0.00000925925925925964" calcext:value-type="float">
            <text:p>0,00000925925925925964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80" office:value-type="float" office:value="21440" calcext:value-type="float">
            <text:p>21440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48148148148148" calcext:value-type="float">
            <text:p>0,00248148148148148000</text:p>
          </table:table-cell>
          <table:table-cell table:formula="of:=[.D270]-[.D269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80" office:value-type="float" office:value="21520" calcext:value-type="float">
            <text:p>21520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49074074074074" calcext:value-type="float">
            <text:p>0,00249074074074074000</text:p>
          </table:table-cell>
          <table:table-cell table:formula="of:=[.D271]-[.D270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80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5" calcext:value-type="float">
            <text:p>0,00250000000000000000</text:p>
          </table:table-cell>
          <table:table-cell table:formula="of:=[.D272]-[.D271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80" office:value-type="float" office:value="21680" calcext:value-type="float">
            <text:p>21680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50925925925926" calcext:value-type="float">
            <text:p>0,00250925925925926000</text:p>
          </table:table-cell>
          <table:table-cell table:formula="of:=[.D273]-[.D272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80" office:value-type="float" office:value="21760" calcext:value-type="float">
            <text:p>21760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51851851851852" calcext:value-type="float">
            <text:p>0,00251851851851852000</text:p>
          </table:table-cell>
          <table:table-cell table:formula="of:=[.D274]-[.D273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80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252777777777778" calcext:value-type="float">
            <text:p>0,00252777777777778000</text:p>
          </table:table-cell>
          <table:table-cell table:formula="of:=[.D275]-[.D274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80" office:value-type="float" office:value="21920" calcext:value-type="float">
            <text:p>21920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253703703703704" calcext:value-type="float">
            <text:p>0,00253703703703704000</text:p>
          </table:table-cell>
          <table:table-cell table:formula="of:=[.D276]-[.D275]" office:value-type="float" office:value="0.00000925925925925964" calcext:value-type="float">
            <text:p>0,00000925925925925964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80" office:value-type="float" office:value="22000" calcext:value-type="float">
            <text:p>2200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5462962962963" calcext:value-type="float">
            <text:p>0,00254629629629630000</text:p>
          </table:table-cell>
          <table:table-cell table:formula="of:=[.D277]-[.D276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80" office:value-type="float" office:value="22080" calcext:value-type="float">
            <text:p>22080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255555555555556" calcext:value-type="float">
            <text:p>0,00255555555555556000</text:p>
          </table:table-cell>
          <table:table-cell table:formula="of:=[.D278]-[.D277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80" office:value-type="float" office:value="22160" calcext:value-type="float">
            <text:p>22160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256481481481482" calcext:value-type="float">
            <text:p>0,00256481481481482000</text:p>
          </table:table-cell>
          <table:table-cell table:formula="of:=[.D279]-[.D278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80" office:value-type="float" office:value="22240" calcext:value-type="float">
            <text:p>22240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257407407407407" calcext:value-type="float">
            <text:p>0,00257407407407407000</text:p>
          </table:table-cell>
          <table:table-cell table:formula="of:=[.D280]-[.D279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80" office:value-type="float" office:value="22320" calcext:value-type="float">
            <text:p>22320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58333333333333" calcext:value-type="float">
            <text:p>0,00258333333333333000</text:p>
          </table:table-cell>
          <table:table-cell table:formula="of:=[.D281]-[.D280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80" office:value-type="float" office:value="22400" calcext:value-type="float">
            <text:p>2240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259259259259259" calcext:value-type="float">
            <text:p>0,00259259259259259000</text:p>
          </table:table-cell>
          <table:table-cell table:formula="of:=[.D282]-[.D281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80" office:value-type="float" office:value="22480" calcext:value-type="float">
            <text:p>22480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260185185185185" calcext:value-type="float">
            <text:p>0,00260185185185185000</text:p>
          </table:table-cell>
          <table:table-cell table:formula="of:=[.D283]-[.D282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80" office:value-type="float" office:value="22560" calcext:value-type="float">
            <text:p>22560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261111111111111" calcext:value-type="float">
            <text:p>0,00261111111111111000</text:p>
          </table:table-cell>
          <table:table-cell table:formula="of:=[.D284]-[.D283]" office:value-type="float" office:value="0.00000925925925925964" calcext:value-type="float">
            <text:p>0,00000925925925925964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80" office:value-type="float" office:value="22640" calcext:value-type="float">
            <text:p>22640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262037037037037" calcext:value-type="float">
            <text:p>0,00262037037037037000</text:p>
          </table:table-cell>
          <table:table-cell table:formula="of:=[.D285]-[.D284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80" office:value-type="float" office:value="22720" calcext:value-type="float">
            <text:p>22720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262962962962963" calcext:value-type="float">
            <text:p>0,00262962962962963000</text:p>
          </table:table-cell>
          <table:table-cell table:formula="of:=[.D286]-[.D285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80" office:value-type="float" office:value="22800" calcext:value-type="float">
            <text:p>2280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263888888888889" calcext:value-type="float">
            <text:p>0,00263888888888889000</text:p>
          </table:table-cell>
          <table:table-cell table:formula="of:=[.D287]-[.D286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80" office:value-type="float" office:value="22880" calcext:value-type="float">
            <text:p>22880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264814814814815" calcext:value-type="float">
            <text:p>0,00264814814814815000</text:p>
          </table:table-cell>
          <table:table-cell table:formula="of:=[.D288]-[.D287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80" office:value-type="float" office:value="22960" calcext:value-type="float">
            <text:p>22960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265740740740741" calcext:value-type="float">
            <text:p>0,00265740740740741000</text:p>
          </table:table-cell>
          <table:table-cell table:formula="of:=[.D289]-[.D288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80" office:value-type="float" office:value="23040" calcext:value-type="float">
            <text:p>23040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266666666666667" calcext:value-type="float">
            <text:p>0,00266666666666667000</text:p>
          </table:table-cell>
          <table:table-cell table:formula="of:=[.D290]-[.D289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80" office:value-type="float" office:value="23120" calcext:value-type="float">
            <text:p>23120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267592592592593" calcext:value-type="float">
            <text:p>0,00267592592592593000</text:p>
          </table:table-cell>
          <table:table-cell table:formula="of:=[.D291]-[.D290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80" office:value-type="float" office:value="23200" calcext:value-type="float">
            <text:p>2320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268518518518519" calcext:value-type="float">
            <text:p>0,00268518518518519000</text:p>
          </table:table-cell>
          <table:table-cell table:formula="of:=[.D292]-[.D291]" office:value-type="float" office:value="0.00000925925925925964" calcext:value-type="float">
            <text:p>0,00000925925925925964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80" office:value-type="float" office:value="23280" calcext:value-type="float">
            <text:p>23280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269444444444444" calcext:value-type="float">
            <text:p>0,00269444444444444000</text:p>
          </table:table-cell>
          <table:table-cell table:formula="of:=[.D293]-[.D292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80" office:value-type="float" office:value="23360" calcext:value-type="float">
            <text:p>23360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27037037037037" calcext:value-type="float">
            <text:p>0,00270370370370370000</text:p>
          </table:table-cell>
          <table:table-cell table:formula="of:=[.D294]-[.D293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80" office:value-type="float" office:value="23440" calcext:value-type="float">
            <text:p>23440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271296296296296" calcext:value-type="float">
            <text:p>0,00271296296296296000</text:p>
          </table:table-cell>
          <table:table-cell table:formula="of:=[.D295]-[.D294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80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272222222222222" calcext:value-type="float">
            <text:p>0,00272222222222222000</text:p>
          </table:table-cell>
          <table:table-cell table:formula="of:=[.D296]-[.D295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80" office:value-type="float" office:value="23600" calcext:value-type="float">
            <text:p>2360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273148148148148" calcext:value-type="float">
            <text:p>0,00273148148148148000</text:p>
          </table:table-cell>
          <table:table-cell table:formula="of:=[.D297]-[.D296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80" office:value-type="float" office:value="23680" calcext:value-type="float">
            <text:p>23680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274074074074074" calcext:value-type="float">
            <text:p>0,00274074074074074000</text:p>
          </table:table-cell>
          <table:table-cell table:formula="of:=[.D298]-[.D297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80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275" calcext:value-type="float">
            <text:p>0,00275000000000000000</text:p>
          </table:table-cell>
          <table:table-cell table:formula="of:=[.D299]-[.D298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80" office:value-type="float" office:value="23840" calcext:value-type="float">
            <text:p>23840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275925925925926" calcext:value-type="float">
            <text:p>0,00275925925925926000</text:p>
          </table:table-cell>
          <table:table-cell table:formula="of:=[.D300]-[.D299]" office:value-type="float" office:value="0.00000925925925925964" calcext:value-type="float">
            <text:p>0,00000925925925925964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80" office:value-type="float" office:value="23920" calcext:value-type="float">
            <text:p>23920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276851851851852" calcext:value-type="float">
            <text:p>0,00276851851851852000</text:p>
          </table:table-cell>
          <table:table-cell table:formula="of:=[.D301]-[.D300]" office:value-type="float" office:value="0.0000092592592592592" calcext:value-type="float">
            <text:p>0,00000925925925925920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80" office:value-type="float" office:value="24000" calcext:value-type="float">
            <text:p>240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277777777777778" calcext:value-type="float">
            <text:p>0,00277777777777778000</text:p>
          </table:table-cell>
          <table:table-cell table:formula="of:=#REF!-[.D301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27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9:01:02.265531896</meta:creation-date>
    <dc:date>2026-05-17T19:01:16.901278969</dc:date>
    <meta:editing-duration>PT16S</meta:editing-duration>
    <meta:editing-cycles>1</meta:editing-cycles>
    <meta:document-statistic meta:table-count="1" meta:cell-count="1505" meta:object-count="0"/>
    <meta:generator>LibreOffice/24.2.7.2$Linux_X86_64 LibreOffice_project/420$Build-2</meta:generator>
  </office:meta>
</office:document-meta>
</file>