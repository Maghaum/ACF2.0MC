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7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3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31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358796296296296" calcext:value-type="float">
            <text:p>0,00000358796296296296</text:p>
          </table:table-cell>
          <table:table-cell table:formula="of:=[.D3]-[.D2]" office:value-type="float" office:value="0.00000358796296296296" calcext:value-type="float">
            <text:p>0,00000358796296296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31" office:value-type="float" office:value="62" calcext:value-type="float">
            <text:p>62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717592592592593" calcext:value-type="float">
            <text:p>0,00000717592592592593</text:p>
          </table:table-cell>
          <table:table-cell table:formula="of:=[.D4]-[.D3]" office:value-type="float" office:value="0.00000358796296296296" calcext:value-type="float">
            <text:p>0,000003587962962962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31" office:value-type="float" office:value="93" calcext:value-type="float">
            <text:p>93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07638888888889" calcext:value-type="float">
            <text:p>0,00001076388888888890</text:p>
          </table:table-cell>
          <table:table-cell table:formula="of:=[.D5]-[.D4]" office:value-type="float" office:value="0.00000358796296296296" calcext:value-type="float">
            <text:p>0,000003587962962962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31" office:value-type="float" office:value="124" calcext:value-type="float">
            <text:p>124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43518518518519" calcext:value-type="float">
            <text:p>0,00001435185185185190</text:p>
          </table:table-cell>
          <table:table-cell table:formula="of:=[.D6]-[.D5]" office:value-type="float" office:value="0.00000358796296296296" calcext:value-type="float">
            <text:p>0,000003587962962962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31" office:value-type="float" office:value="155" calcext:value-type="float">
            <text:p>15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179398148148148" calcext:value-type="float">
            <text:p>0,00001793981481481480</text:p>
          </table:table-cell>
          <table:table-cell table:formula="of:=[.D7]-[.D6]" office:value-type="float" office:value="0.00000358796296296296" calcext:value-type="float">
            <text:p>0,000003587962962962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31" office:value-type="float" office:value="186" calcext:value-type="float">
            <text:p>186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215277777777778" calcext:value-type="float">
            <text:p>0,00002152777777777780</text:p>
          </table:table-cell>
          <table:table-cell table:formula="of:=[.D8]-[.D7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31" office:value-type="float" office:value="217" calcext:value-type="float">
            <text:p>217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251157407407407" calcext:value-type="float">
            <text:p>0,00002511574074074070</text:p>
          </table:table-cell>
          <table:table-cell table:formula="of:=[.D9]-[.D8]" office:value-type="float" office:value="0.00000358796296296296" calcext:value-type="float">
            <text:p>0,000003587962962962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31" office:value-type="float" office:value="248" calcext:value-type="float">
            <text:p>248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287037037037037" calcext:value-type="float">
            <text:p>0,00002870370370370370</text:p>
          </table:table-cell>
          <table:table-cell table:formula="of:=[.D10]-[.D9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31" office:value-type="float" office:value="279" calcext:value-type="float">
            <text:p>279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322916666666667" calcext:value-type="float">
            <text:p>0,00003229166666666670</text:p>
          </table:table-cell>
          <table:table-cell table:formula="of:=[.D11]-[.D10]" office:value-type="float" office:value="0.00000358796296296296" calcext:value-type="float">
            <text:p>0,000003587962962962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31" office:value-type="float" office:value="310" calcext:value-type="float">
            <text:p>31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358796296296296" calcext:value-type="float">
            <text:p>0,00003587962962962960</text:p>
          </table:table-cell>
          <table:table-cell table:formula="of:=[.D12]-[.D11]" office:value-type="float" office:value="0.00000358796296296296" calcext:value-type="float">
            <text:p>0,000003587962962962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31" office:value-type="float" office:value="341" calcext:value-type="float">
            <text:p>341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394675925925926" calcext:value-type="float">
            <text:p>0,00003946759259259260</text:p>
          </table:table-cell>
          <table:table-cell table:formula="of:=[.D13]-[.D12]" office:value-type="float" office:value="0.00000358796296296296" calcext:value-type="float">
            <text:p>0,000003587962962962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31" office:value-type="float" office:value="372" calcext:value-type="float">
            <text:p>372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430555555555556" calcext:value-type="float">
            <text:p>0,00004305555555555560</text:p>
          </table:table-cell>
          <table:table-cell table:formula="of:=[.D14]-[.D13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31" office:value-type="float" office:value="403" calcext:value-type="float">
            <text:p>403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466435185185185" calcext:value-type="float">
            <text:p>0,00004664351851851850</text:p>
          </table:table-cell>
          <table:table-cell table:formula="of:=[.D15]-[.D14]" office:value-type="float" office:value="0.00000358796296296296" calcext:value-type="float">
            <text:p>0,000003587962962962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31" office:value-type="float" office:value="434" calcext:value-type="float">
            <text:p>434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502314814814815" calcext:value-type="float">
            <text:p>0,00005023148148148150</text:p>
          </table:table-cell>
          <table:table-cell table:formula="of:=[.D16]-[.D15]" office:value-type="float" office:value="0.00000358796296296296" calcext:value-type="float">
            <text:p>0,000003587962962962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31" office:value-type="float" office:value="465" calcext:value-type="float">
            <text:p>46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538194444444444" calcext:value-type="float">
            <text:p>0,00005381944444444440</text:p>
          </table:table-cell>
          <table:table-cell table:formula="of:=[.D17]-[.D16]" office:value-type="float" office:value="0.00000358796296296296" calcext:value-type="float">
            <text:p>0,000003587962962962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31" office:value-type="float" office:value="496" calcext:value-type="float">
            <text:p>496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574074074074074" calcext:value-type="float">
            <text:p>0,00005740740740740740</text:p>
          </table:table-cell>
          <table:table-cell table:formula="of:=[.D18]-[.D17]" office:value-type="float" office:value="0.00000358796296296296" calcext:value-type="float">
            <text:p>0,000003587962962962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31" office:value-type="float" office:value="527" calcext:value-type="float">
            <text:p>527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609953703703704" calcext:value-type="float">
            <text:p>0,00006099537037037040</text:p>
          </table:table-cell>
          <table:table-cell table:formula="of:=[.D19]-[.D18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31" office:value-type="float" office:value="558" calcext:value-type="float">
            <text:p>558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645833333333333" calcext:value-type="float">
            <text:p>0,00006458333333333330</text:p>
          </table:table-cell>
          <table:table-cell table:formula="of:=[.D20]-[.D19]" office:value-type="float" office:value="0.00000358796296296296" calcext:value-type="float">
            <text:p>0,000003587962962962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31" office:value-type="float" office:value="589" calcext:value-type="float">
            <text:p>589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681712962962963" calcext:value-type="float">
            <text:p>0,00006817129629629630</text:p>
          </table:table-cell>
          <table:table-cell table:formula="of:=[.D21]-[.D20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31" office:value-type="float" office:value="620" calcext:value-type="float">
            <text:p>62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717592592592593" calcext:value-type="float">
            <text:p>0,00007175925925925930</text:p>
          </table:table-cell>
          <table:table-cell table:formula="of:=[.D22]-[.D21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31" office:value-type="float" office:value="651" calcext:value-type="float">
            <text:p>651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753472222222222" calcext:value-type="float">
            <text:p>0,00007534722222222220</text:p>
          </table:table-cell>
          <table:table-cell table:formula="of:=[.D23]-[.D22]" office:value-type="float" office:value="0.00000358796296296296" calcext:value-type="float">
            <text:p>0,000003587962962962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31" office:value-type="float" office:value="682" calcext:value-type="float">
            <text:p>682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789351851851852" calcext:value-type="float">
            <text:p>0,00007893518518518520</text:p>
          </table:table-cell>
          <table:table-cell table:formula="of:=[.D24]-[.D23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31" office:value-type="float" office:value="713" calcext:value-type="float">
            <text:p>713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825231481481482" calcext:value-type="float">
            <text:p>0,00008252314814814820</text:p>
          </table:table-cell>
          <table:table-cell table:formula="of:=[.D25]-[.D24]" office:value-type="float" office:value="0.00000358796296296296" calcext:value-type="float">
            <text:p>0,000003587962962962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31" office:value-type="float" office:value="744" calcext:value-type="float">
            <text:p>744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861111111111111" calcext:value-type="float">
            <text:p>0,00008611111111111110</text:p>
          </table:table-cell>
          <table:table-cell table:formula="of:=[.D26]-[.D25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31" office:value-type="float" office:value="775" calcext:value-type="float">
            <text:p>7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896990740740741" calcext:value-type="float">
            <text:p>0,00008969907407407410</text:p>
          </table:table-cell>
          <table:table-cell table:formula="of:=[.D27]-[.D26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31" office:value-type="float" office:value="806" calcext:value-type="float">
            <text:p>806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93287037037037" calcext:value-type="float">
            <text:p>0,00009328703703703700</text:p>
          </table:table-cell>
          <table:table-cell table:formula="of:=[.D28]-[.D27]" office:value-type="float" office:value="0.00000358796296296296" calcext:value-type="float">
            <text:p>0,000003587962962962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31" office:value-type="float" office:value="837" calcext:value-type="float">
            <text:p>837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96875" calcext:value-type="float">
            <text:p>0,00009687500000000000</text:p>
          </table:table-cell>
          <table:table-cell table:formula="of:=[.D29]-[.D28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31" office:value-type="float" office:value="868" calcext:value-type="float">
            <text:p>868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00462962962963" calcext:value-type="float">
            <text:p>0,00010046296296296300</text:p>
          </table:table-cell>
          <table:table-cell table:formula="of:=[.D30]-[.D29]" office:value-type="float" office:value="0.00000358796296296296" calcext:value-type="float">
            <text:p>0,000003587962962962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31" office:value-type="float" office:value="899" calcext:value-type="float">
            <text:p>899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04050925925926" calcext:value-type="float">
            <text:p>0,00010405092592592600</text:p>
          </table:table-cell>
          <table:table-cell table:formula="of:=[.D31]-[.D30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31" office:value-type="float" office:value="930" calcext:value-type="float">
            <text:p>93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07638888888889" calcext:value-type="float">
            <text:p>0,00010763888888888900</text:p>
          </table:table-cell>
          <table:table-cell table:formula="of:=[.D32]-[.D31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31" office:value-type="float" office:value="961" calcext:value-type="float">
            <text:p>961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11226851851852" calcext:value-type="float">
            <text:p>0,00011122685185185200</text:p>
          </table:table-cell>
          <table:table-cell table:formula="of:=[.D33]-[.D32]" office:value-type="float" office:value="0.00000358796296296296" calcext:value-type="float">
            <text:p>0,000003587962962962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31" office:value-type="float" office:value="992" calcext:value-type="float">
            <text:p>992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14814814814815" calcext:value-type="float">
            <text:p>0,00011481481481481500</text:p>
          </table:table-cell>
          <table:table-cell table:formula="of:=[.D34]-[.D33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31" office:value-type="float" office:value="1023" calcext:value-type="float">
            <text:p>1023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18402777777778" calcext:value-type="float">
            <text:p>0,00011840277777777800</text:p>
          </table:table-cell>
          <table:table-cell table:formula="of:=[.D35]-[.D34]" office:value-type="float" office:value="0.00000358796296296296" calcext:value-type="float">
            <text:p>0,000003587962962962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31" office:value-type="float" office:value="1054" calcext:value-type="float">
            <text:p>1054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21990740740741" calcext:value-type="float">
            <text:p>0,00012199074074074100</text:p>
          </table:table-cell>
          <table:table-cell table:formula="of:=[.D36]-[.D35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31" office:value-type="float" office:value="1085" calcext:value-type="float">
            <text:p>108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25578703703704" calcext:value-type="float">
            <text:p>0,00012557870370370400</text:p>
          </table:table-cell>
          <table:table-cell table:formula="of:=[.D37]-[.D36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31" office:value-type="float" office:value="1116" calcext:value-type="float">
            <text:p>1116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29166666666667" calcext:value-type="float">
            <text:p>0,00012916666666666700</text:p>
          </table:table-cell>
          <table:table-cell table:formula="of:=[.D38]-[.D37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31" office:value-type="float" office:value="1147" calcext:value-type="float">
            <text:p>1147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3275462962963" calcext:value-type="float">
            <text:p>0,00013275462962963000</text:p>
          </table:table-cell>
          <table:table-cell table:formula="of:=[.D39]-[.D38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31" office:value-type="float" office:value="1178" calcext:value-type="float">
            <text:p>1178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36342592592593" calcext:value-type="float">
            <text:p>0,00013634259259259300</text:p>
          </table:table-cell>
          <table:table-cell table:formula="of:=[.D40]-[.D39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31" office:value-type="float" office:value="1209" calcext:value-type="float">
            <text:p>1209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39930555555556" calcext:value-type="float">
            <text:p>0,00013993055555555600</text:p>
          </table:table-cell>
          <table:table-cell table:formula="of:=[.D41]-[.D40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31" office:value-type="float" office:value="1240" calcext:value-type="float">
            <text:p>124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43518518518519" calcext:value-type="float">
            <text:p>0,00014351851851851900</text:p>
          </table:table-cell>
          <table:table-cell table:formula="of:=[.D42]-[.D41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31" office:value-type="float" office:value="1271" calcext:value-type="float">
            <text:p>1271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147106481481481" calcext:value-type="float">
            <text:p>0,00014710648148148100</text:p>
          </table:table-cell>
          <table:table-cell table:formula="of:=[.D43]-[.D42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31" office:value-type="float" office:value="1302" calcext:value-type="float">
            <text:p>1302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150694444444444" calcext:value-type="float">
            <text:p>0,00015069444444444400</text:p>
          </table:table-cell>
          <table:table-cell table:formula="of:=[.D44]-[.D43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31" office:value-type="float" office:value="1333" calcext:value-type="float">
            <text:p>1333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154282407407407" calcext:value-type="float">
            <text:p>0,00015428240740740700</text:p>
          </table:table-cell>
          <table:table-cell table:formula="of:=[.D45]-[.D44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31" office:value-type="float" office:value="1364" calcext:value-type="float">
            <text:p>1364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15787037037037" calcext:value-type="float">
            <text:p>0,00015787037037037000</text:p>
          </table:table-cell>
          <table:table-cell table:formula="of:=[.D46]-[.D45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31" office:value-type="float" office:value="1395" calcext:value-type="float">
            <text:p>139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161458333333333" calcext:value-type="float">
            <text:p>0,00016145833333333300</text:p>
          </table:table-cell>
          <table:table-cell table:formula="of:=[.D47]-[.D46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31" office:value-type="float" office:value="1426" calcext:value-type="float">
            <text:p>1426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165046296296296" calcext:value-type="float">
            <text:p>0,00016504629629629600</text:p>
          </table:table-cell>
          <table:table-cell table:formula="of:=[.D48]-[.D47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31" office:value-type="float" office:value="1457" calcext:value-type="float">
            <text:p>1457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168634259259259" calcext:value-type="float">
            <text:p>0,00016863425925925900</text:p>
          </table:table-cell>
          <table:table-cell table:formula="of:=[.D49]-[.D48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31" office:value-type="float" office:value="1488" calcext:value-type="float">
            <text:p>1488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172222222222222" calcext:value-type="float">
            <text:p>0,00017222222222222200</text:p>
          </table:table-cell>
          <table:table-cell table:formula="of:=[.D50]-[.D49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31" office:value-type="float" office:value="1519" calcext:value-type="float">
            <text:p>1519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175810185185185" calcext:value-type="float">
            <text:p>0,00017581018518518500</text:p>
          </table:table-cell>
          <table:table-cell table:formula="of:=[.D51]-[.D50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31" office:value-type="float" office:value="1550" calcext:value-type="float">
            <text:p>15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179398148148148" calcext:value-type="float">
            <text:p>0,00017939814814814800</text:p>
          </table:table-cell>
          <table:table-cell table:formula="of:=[.D52]-[.D51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31" office:value-type="float" office:value="1581" calcext:value-type="float">
            <text:p>1581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182986111111111" calcext:value-type="float">
            <text:p>0,00018298611111111100</text:p>
          </table:table-cell>
          <table:table-cell table:formula="of:=[.D53]-[.D52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31" office:value-type="float" office:value="1612" calcext:value-type="float">
            <text:p>1612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186574074074074" calcext:value-type="float">
            <text:p>0,00018657407407407400</text:p>
          </table:table-cell>
          <table:table-cell table:formula="of:=[.D54]-[.D53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31" office:value-type="float" office:value="1643" calcext:value-type="float">
            <text:p>1643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190162037037037" calcext:value-type="float">
            <text:p>0,00019016203703703700</text:p>
          </table:table-cell>
          <table:table-cell table:formula="of:=[.D55]-[.D54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31" office:value-type="float" office:value="1674" calcext:value-type="float">
            <text:p>1674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19375" calcext:value-type="float">
            <text:p>0,00019375000000000000</text:p>
          </table:table-cell>
          <table:table-cell table:formula="of:=[.D56]-[.D55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31" office:value-type="float" office:value="1705" calcext:value-type="float">
            <text:p>170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197337962962963" calcext:value-type="float">
            <text:p>0,00019733796296296300</text:p>
          </table:table-cell>
          <table:table-cell table:formula="of:=[.D57]-[.D56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31" office:value-type="float" office:value="1736" calcext:value-type="float">
            <text:p>1736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200925925925926" calcext:value-type="float">
            <text:p>0,00020092592592592600</text:p>
          </table:table-cell>
          <table:table-cell table:formula="of:=[.D58]-[.D57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31" office:value-type="float" office:value="1767" calcext:value-type="float">
            <text:p>1767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204513888888889" calcext:value-type="float">
            <text:p>0,00020451388888888900</text:p>
          </table:table-cell>
          <table:table-cell table:formula="of:=[.D59]-[.D58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31" office:value-type="float" office:value="1798" calcext:value-type="float">
            <text:p>1798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208101851851852" calcext:value-type="float">
            <text:p>0,00020810185185185200</text:p>
          </table:table-cell>
          <table:table-cell table:formula="of:=[.D60]-[.D59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31" office:value-type="float" office:value="1829" calcext:value-type="float">
            <text:p>1829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211689814814815" calcext:value-type="float">
            <text:p>0,00021168981481481500</text:p>
          </table:table-cell>
          <table:table-cell table:formula="of:=[.D61]-[.D60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31" office:value-type="float" office:value="1860" calcext:value-type="float">
            <text:p>186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215277777777778" calcext:value-type="float">
            <text:p>0,00021527777777777800</text:p>
          </table:table-cell>
          <table:table-cell table:formula="of:=[.D62]-[.D61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31" office:value-type="float" office:value="1891" calcext:value-type="float">
            <text:p>1891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218865740740741" calcext:value-type="float">
            <text:p>0,00021886574074074100</text:p>
          </table:table-cell>
          <table:table-cell table:formula="of:=[.D63]-[.D62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31" office:value-type="float" office:value="1922" calcext:value-type="float">
            <text:p>1922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222453703703704" calcext:value-type="float">
            <text:p>0,00022245370370370400</text:p>
          </table:table-cell>
          <table:table-cell table:formula="of:=[.D64]-[.D63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31" office:value-type="float" office:value="1953" calcext:value-type="float">
            <text:p>1953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226041666666667" calcext:value-type="float">
            <text:p>0,00022604166666666700</text:p>
          </table:table-cell>
          <table:table-cell table:formula="of:=[.D65]-[.D64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31" office:value-type="float" office:value="1984" calcext:value-type="float">
            <text:p>1984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22962962962963" calcext:value-type="float">
            <text:p>0,00022962962962963000</text:p>
          </table:table-cell>
          <table:table-cell table:formula="of:=[.D66]-[.D65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31" office:value-type="float" office:value="2015" calcext:value-type="float">
            <text:p>201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233217592592593" calcext:value-type="float">
            <text:p>0,00023321759259259300</text:p>
          </table:table-cell>
          <table:table-cell table:formula="of:=[.D67]-[.D66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31" office:value-type="float" office:value="2046" calcext:value-type="float">
            <text:p>2046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236805555555556" calcext:value-type="float">
            <text:p>0,00023680555555555600</text:p>
          </table:table-cell>
          <table:table-cell table:formula="of:=[.D68]-[.D67]" office:value-type="float" office:value="0.00000358796296296297" calcext:value-type="float">
            <text:p>0,0000035879629629629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31" office:value-type="float" office:value="2077" calcext:value-type="float">
            <text:p>2077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240393518518519" calcext:value-type="float">
            <text:p>0,00024039351851851900</text:p>
          </table:table-cell>
          <table:table-cell table:formula="of:=[.D69]-[.D68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31" office:value-type="float" office:value="2108" calcext:value-type="float">
            <text:p>2108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243981481481481" calcext:value-type="float">
            <text:p>0,00024398148148148100</text:p>
          </table:table-cell>
          <table:table-cell table:formula="of:=[.D70]-[.D69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31" office:value-type="float" office:value="2139" calcext:value-type="float">
            <text:p>2139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247569444444444" calcext:value-type="float">
            <text:p>0,00024756944444444400</text:p>
          </table:table-cell>
          <table:table-cell table:formula="of:=[.D71]-[.D70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31" office:value-type="float" office:value="2170" calcext:value-type="float">
            <text:p>217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251157407407407" calcext:value-type="float">
            <text:p>0,00025115740740740700</text:p>
          </table:table-cell>
          <table:table-cell table:formula="of:=[.D72]-[.D71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31" office:value-type="float" office:value="2201" calcext:value-type="float">
            <text:p>2201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25474537037037" calcext:value-type="float">
            <text:p>0,00025474537037037000</text:p>
          </table:table-cell>
          <table:table-cell table:formula="of:=[.D73]-[.D72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31" office:value-type="float" office:value="2232" calcext:value-type="float">
            <text:p>2232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258333333333333" calcext:value-type="float">
            <text:p>0,00025833333333333300</text:p>
          </table:table-cell>
          <table:table-cell table:formula="of:=[.D74]-[.D73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31" office:value-type="float" office:value="2263" calcext:value-type="float">
            <text:p>2263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261921296296296" calcext:value-type="float">
            <text:p>0,00026192129629629600</text:p>
          </table:table-cell>
          <table:table-cell table:formula="of:=[.D75]-[.D74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31" office:value-type="float" office:value="2294" calcext:value-type="float">
            <text:p>2294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265509259259259" calcext:value-type="float">
            <text:p>0,00026550925925925900</text:p>
          </table:table-cell>
          <table:table-cell table:formula="of:=[.D76]-[.D75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31" office:value-type="float" office:value="2325" calcext:value-type="float">
            <text:p>23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269097222222222" calcext:value-type="float">
            <text:p>0,00026909722222222200</text:p>
          </table:table-cell>
          <table:table-cell table:formula="of:=[.D77]-[.D76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31" office:value-type="float" office:value="2356" calcext:value-type="float">
            <text:p>2356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272685185185185" calcext:value-type="float">
            <text:p>0,00027268518518518500</text:p>
          </table:table-cell>
          <table:table-cell table:formula="of:=[.D78]-[.D77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31" office:value-type="float" office:value="2387" calcext:value-type="float">
            <text:p>2387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276273148148148" calcext:value-type="float">
            <text:p>0,00027627314814814800</text:p>
          </table:table-cell>
          <table:table-cell table:formula="of:=[.D79]-[.D78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31" office:value-type="float" office:value="2418" calcext:value-type="float">
            <text:p>2418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279861111111111" calcext:value-type="float">
            <text:p>0,00027986111111111100</text:p>
          </table:table-cell>
          <table:table-cell table:formula="of:=[.D80]-[.D79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31" office:value-type="float" office:value="2449" calcext:value-type="float">
            <text:p>2449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283449074074074" calcext:value-type="float">
            <text:p>0,00028344907407407400</text:p>
          </table:table-cell>
          <table:table-cell table:formula="of:=[.D81]-[.D80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31" office:value-type="float" office:value="2480" calcext:value-type="float">
            <text:p>248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287037037037037" calcext:value-type="float">
            <text:p>0,00028703703703703700</text:p>
          </table:table-cell>
          <table:table-cell table:formula="of:=[.D82]-[.D81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31" office:value-type="float" office:value="2511" calcext:value-type="float">
            <text:p>2511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290625" calcext:value-type="float">
            <text:p>0,00029062500000000000</text:p>
          </table:table-cell>
          <table:table-cell table:formula="of:=[.D83]-[.D82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31" office:value-type="float" office:value="2542" calcext:value-type="float">
            <text:p>2542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294212962962963" calcext:value-type="float">
            <text:p>0,00029421296296296300</text:p>
          </table:table-cell>
          <table:table-cell table:formula="of:=[.D84]-[.D83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31" office:value-type="float" office:value="2573" calcext:value-type="float">
            <text:p>2573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297800925925926" calcext:value-type="float">
            <text:p>0,00029780092592592600</text:p>
          </table:table-cell>
          <table:table-cell table:formula="of:=[.D85]-[.D84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31" office:value-type="float" office:value="2604" calcext:value-type="float">
            <text:p>2604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301388888888889" calcext:value-type="float">
            <text:p>0,00030138888888888900</text:p>
          </table:table-cell>
          <table:table-cell table:formula="of:=[.D86]-[.D85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31" office:value-type="float" office:value="2635" calcext:value-type="float">
            <text:p>263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304976851851852" calcext:value-type="float">
            <text:p>0,00030497685185185200</text:p>
          </table:table-cell>
          <table:table-cell table:formula="of:=[.D87]-[.D86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31" office:value-type="float" office:value="2666" calcext:value-type="float">
            <text:p>2666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308564814814815" calcext:value-type="float">
            <text:p>0,00030856481481481500</text:p>
          </table:table-cell>
          <table:table-cell table:formula="of:=[.D88]-[.D87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31" office:value-type="float" office:value="2697" calcext:value-type="float">
            <text:p>2697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312152777777778" calcext:value-type="float">
            <text:p>0,00031215277777777800</text:p>
          </table:table-cell>
          <table:table-cell table:formula="of:=[.D89]-[.D88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31" office:value-type="float" office:value="2728" calcext:value-type="float">
            <text:p>2728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315740740740741" calcext:value-type="float">
            <text:p>0,00031574074074074100</text:p>
          </table:table-cell>
          <table:table-cell table:formula="of:=[.D90]-[.D89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31" office:value-type="float" office:value="2759" calcext:value-type="float">
            <text:p>2759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319328703703704" calcext:value-type="float">
            <text:p>0,00031932870370370400</text:p>
          </table:table-cell>
          <table:table-cell table:formula="of:=[.D91]-[.D90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31" office:value-type="float" office:value="2790" calcext:value-type="float">
            <text:p>279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322916666666667" calcext:value-type="float">
            <text:p>0,00032291666666666700</text:p>
          </table:table-cell>
          <table:table-cell table:formula="of:=[.D92]-[.D91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31" office:value-type="float" office:value="2821" calcext:value-type="float">
            <text:p>2821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32650462962963" calcext:value-type="float">
            <text:p>0,00032650462962963000</text:p>
          </table:table-cell>
          <table:table-cell table:formula="of:=[.D93]-[.D92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31" office:value-type="float" office:value="2852" calcext:value-type="float">
            <text:p>2852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330092592592593" calcext:value-type="float">
            <text:p>0,00033009259259259300</text:p>
          </table:table-cell>
          <table:table-cell table:formula="of:=[.D94]-[.D93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31" office:value-type="float" office:value="2883" calcext:value-type="float">
            <text:p>2883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333680555555556" calcext:value-type="float">
            <text:p>0,00033368055555555600</text:p>
          </table:table-cell>
          <table:table-cell table:formula="of:=[.D95]-[.D94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31" office:value-type="float" office:value="2914" calcext:value-type="float">
            <text:p>2914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337268518518519" calcext:value-type="float">
            <text:p>0,00033726851851851900</text:p>
          </table:table-cell>
          <table:table-cell table:formula="of:=[.D96]-[.D95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31" office:value-type="float" office:value="2945" calcext:value-type="float">
            <text:p>294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340856481481482" calcext:value-type="float">
            <text:p>0,00034085648148148200</text:p>
          </table:table-cell>
          <table:table-cell table:formula="of:=[.D97]-[.D96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31" office:value-type="float" office:value="2976" calcext:value-type="float">
            <text:p>2976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344444444444444" calcext:value-type="float">
            <text:p>0,00034444444444444400</text:p>
          </table:table-cell>
          <table:table-cell table:formula="of:=[.D98]-[.D97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31" office:value-type="float" office:value="3007" calcext:value-type="float">
            <text:p>3007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348032407407407" calcext:value-type="float">
            <text:p>0,00034803240740740700</text:p>
          </table:table-cell>
          <table:table-cell table:formula="of:=[.D99]-[.D98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31" office:value-type="float" office:value="3038" calcext:value-type="float">
            <text:p>3038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35162037037037" calcext:value-type="float">
            <text:p>0,00035162037037037000</text:p>
          </table:table-cell>
          <table:table-cell table:formula="of:=[.D100]-[.D99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31" office:value-type="float" office:value="3069" calcext:value-type="float">
            <text:p>3069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355208333333333" calcext:value-type="float">
            <text:p>0,00035520833333333300</text:p>
          </table:table-cell>
          <table:table-cell table:formula="of:=[.D101]-[.D100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31" office:value-type="float" office:value="3100" calcext:value-type="float">
            <text:p>31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358796296296296" calcext:value-type="float">
            <text:p>0,00035879629629629600</text:p>
          </table:table-cell>
          <table:table-cell table:formula="of:=[.D102]-[.D101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31" office:value-type="float" office:value="3131" calcext:value-type="float">
            <text:p>3131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362384259259259" calcext:value-type="float">
            <text:p>0,00036238425925925900</text:p>
          </table:table-cell>
          <table:table-cell table:formula="of:=[.D103]-[.D102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31" office:value-type="float" office:value="3162" calcext:value-type="float">
            <text:p>3162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365972222222222" calcext:value-type="float">
            <text:p>0,00036597222222222200</text:p>
          </table:table-cell>
          <table:table-cell table:formula="of:=[.D104]-[.D103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31" office:value-type="float" office:value="3193" calcext:value-type="float">
            <text:p>3193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369560185185185" calcext:value-type="float">
            <text:p>0,00036956018518518500</text:p>
          </table:table-cell>
          <table:table-cell table:formula="of:=[.D105]-[.D104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31" office:value-type="float" office:value="3224" calcext:value-type="float">
            <text:p>3224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373148148148148" calcext:value-type="float">
            <text:p>0,00037314814814814800</text:p>
          </table:table-cell>
          <table:table-cell table:formula="of:=[.D106]-[.D105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31" office:value-type="float" office:value="3255" calcext:value-type="float">
            <text:p>325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376736111111111" calcext:value-type="float">
            <text:p>0,00037673611111111100</text:p>
          </table:table-cell>
          <table:table-cell table:formula="of:=[.D107]-[.D106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31" office:value-type="float" office:value="3286" calcext:value-type="float">
            <text:p>3286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380324074074074" calcext:value-type="float">
            <text:p>0,00038032407407407400</text:p>
          </table:table-cell>
          <table:table-cell table:formula="of:=[.D108]-[.D107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31" office:value-type="float" office:value="3317" calcext:value-type="float">
            <text:p>3317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383912037037037" calcext:value-type="float">
            <text:p>0,00038391203703703700</text:p>
          </table:table-cell>
          <table:table-cell table:formula="of:=[.D109]-[.D108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31" office:value-type="float" office:value="3348" calcext:value-type="float">
            <text:p>3348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3875" calcext:value-type="float">
            <text:p>0,00038750000000000000</text:p>
          </table:table-cell>
          <table:table-cell table:formula="of:=[.D110]-[.D109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31" office:value-type="float" office:value="3379" calcext:value-type="float">
            <text:p>3379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391087962962963" calcext:value-type="float">
            <text:p>0,00039108796296296300</text:p>
          </table:table-cell>
          <table:table-cell table:formula="of:=[.D111]-[.D110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31" office:value-type="float" office:value="3410" calcext:value-type="float">
            <text:p>341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394675925925926" calcext:value-type="float">
            <text:p>0,00039467592592592600</text:p>
          </table:table-cell>
          <table:table-cell table:formula="of:=[.D112]-[.D111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31" office:value-type="float" office:value="3441" calcext:value-type="float">
            <text:p>3441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398263888888889" calcext:value-type="float">
            <text:p>0,00039826388888888900</text:p>
          </table:table-cell>
          <table:table-cell table:formula="of:=[.D113]-[.D112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31" office:value-type="float" office:value="3472" calcext:value-type="float">
            <text:p>3472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401851851851852" calcext:value-type="float">
            <text:p>0,00040185185185185200</text:p>
          </table:table-cell>
          <table:table-cell table:formula="of:=[.D114]-[.D113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31" office:value-type="float" office:value="3503" calcext:value-type="float">
            <text:p>3503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405439814814815" calcext:value-type="float">
            <text:p>0,00040543981481481500</text:p>
          </table:table-cell>
          <table:table-cell table:formula="of:=[.D115]-[.D114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31" office:value-type="float" office:value="3534" calcext:value-type="float">
            <text:p>3534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409027777777778" calcext:value-type="float">
            <text:p>0,00040902777777777800</text:p>
          </table:table-cell>
          <table:table-cell table:formula="of:=[.D116]-[.D115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31" office:value-type="float" office:value="3565" calcext:value-type="float">
            <text:p>356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412615740740741" calcext:value-type="float">
            <text:p>0,00041261574074074100</text:p>
          </table:table-cell>
          <table:table-cell table:formula="of:=[.D117]-[.D116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31" office:value-type="float" office:value="3596" calcext:value-type="float">
            <text:p>3596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416203703703704" calcext:value-type="float">
            <text:p>0,00041620370370370400</text:p>
          </table:table-cell>
          <table:table-cell table:formula="of:=[.D118]-[.D117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31" office:value-type="float" office:value="3627" calcext:value-type="float">
            <text:p>3627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419791666666667" calcext:value-type="float">
            <text:p>0,00041979166666666700</text:p>
          </table:table-cell>
          <table:table-cell table:formula="of:=[.D119]-[.D118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31" office:value-type="float" office:value="3658" calcext:value-type="float">
            <text:p>3658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42337962962963" calcext:value-type="float">
            <text:p>0,00042337962962963000</text:p>
          </table:table-cell>
          <table:table-cell table:formula="of:=[.D120]-[.D119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31" office:value-type="float" office:value="3689" calcext:value-type="float">
            <text:p>3689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426967592592593" calcext:value-type="float">
            <text:p>0,00042696759259259300</text:p>
          </table:table-cell>
          <table:table-cell table:formula="of:=[.D121]-[.D120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31" office:value-type="float" office:value="3720" calcext:value-type="float">
            <text:p>372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430555555555556" calcext:value-type="float">
            <text:p>0,00043055555555555600</text:p>
          </table:table-cell>
          <table:table-cell table:formula="of:=[.D122]-[.D121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31" office:value-type="float" office:value="3751" calcext:value-type="float">
            <text:p>3751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434143518518519" calcext:value-type="float">
            <text:p>0,00043414351851851900</text:p>
          </table:table-cell>
          <table:table-cell table:formula="of:=[.D123]-[.D122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31" office:value-type="float" office:value="3782" calcext:value-type="float">
            <text:p>3782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437731481481482" calcext:value-type="float">
            <text:p>0,00043773148148148200</text:p>
          </table:table-cell>
          <table:table-cell table:formula="of:=[.D124]-[.D123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31" office:value-type="float" office:value="3813" calcext:value-type="float">
            <text:p>3813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441319444444444" calcext:value-type="float">
            <text:p>0,00044131944444444400</text:p>
          </table:table-cell>
          <table:table-cell table:formula="of:=[.D125]-[.D124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31" office:value-type="float" office:value="3844" calcext:value-type="float">
            <text:p>3844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444907407407407" calcext:value-type="float">
            <text:p>0,00044490740740740700</text:p>
          </table:table-cell>
          <table:table-cell table:formula="of:=[.D126]-[.D125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31" office:value-type="float" office:value="3875" calcext:value-type="float">
            <text:p>38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44849537037037" calcext:value-type="float">
            <text:p>0,00044849537037037000</text:p>
          </table:table-cell>
          <table:table-cell table:formula="of:=[.D127]-[.D126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31" office:value-type="float" office:value="3906" calcext:value-type="float">
            <text:p>3906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452083333333333" calcext:value-type="float">
            <text:p>0,00045208333333333300</text:p>
          </table:table-cell>
          <table:table-cell table:formula="of:=[.D128]-[.D127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31" office:value-type="float" office:value="3937" calcext:value-type="float">
            <text:p>3937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455671296296296" calcext:value-type="float">
            <text:p>0,00045567129629629600</text:p>
          </table:table-cell>
          <table:table-cell table:formula="of:=[.D129]-[.D128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31" office:value-type="float" office:value="3968" calcext:value-type="float">
            <text:p>3968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459259259259259" calcext:value-type="float">
            <text:p>0,00045925925925925900</text:p>
          </table:table-cell>
          <table:table-cell table:formula="of:=[.D130]-[.D129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31" office:value-type="float" office:value="3999" calcext:value-type="float">
            <text:p>3999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462847222222222" calcext:value-type="float">
            <text:p>0,00046284722222222200</text:p>
          </table:table-cell>
          <table:table-cell table:formula="of:=[.D131]-[.D130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31" office:value-type="float" office:value="4030" calcext:value-type="float">
            <text:p>403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466435185185185" calcext:value-type="float">
            <text:p>0,00046643518518518500</text:p>
          </table:table-cell>
          <table:table-cell table:formula="of:=[.D132]-[.D131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31" office:value-type="float" office:value="4061" calcext:value-type="float">
            <text:p>4061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470023148148148" calcext:value-type="float">
            <text:p>0,00047002314814814800</text:p>
          </table:table-cell>
          <table:table-cell table:formula="of:=[.D133]-[.D132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31" office:value-type="float" office:value="4092" calcext:value-type="float">
            <text:p>4092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473611111111111" calcext:value-type="float">
            <text:p>0,00047361111111111100</text:p>
          </table:table-cell>
          <table:table-cell table:formula="of:=[.D134]-[.D133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31" office:value-type="float" office:value="4123" calcext:value-type="float">
            <text:p>4123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477199074074074" calcext:value-type="float">
            <text:p>0,00047719907407407400</text:p>
          </table:table-cell>
          <table:table-cell table:formula="of:=[.D135]-[.D134]" office:value-type="float" office:value="0.000003587962962963" calcext:value-type="float">
            <text:p>0,000003587962962963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31" office:value-type="float" office:value="4154" calcext:value-type="float">
            <text:p>4154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480787037037037" calcext:value-type="float">
            <text:p>0,00048078703703703700</text:p>
          </table:table-cell>
          <table:table-cell table:formula="of:=[.D136]-[.D135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31" office:value-type="float" office:value="4185" calcext:value-type="float">
            <text:p>418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484375" calcext:value-type="float">
            <text:p>0,00048437500000000000</text:p>
          </table:table-cell>
          <table:table-cell table:formula="of:=[.D137]-[.D136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31" office:value-type="float" office:value="4216" calcext:value-type="float">
            <text:p>4216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487962962962963" calcext:value-type="float">
            <text:p>0,00048796296296296300</text:p>
          </table:table-cell>
          <table:table-cell table:formula="of:=[.D138]-[.D137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31" office:value-type="float" office:value="4247" calcext:value-type="float">
            <text:p>4247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491550925925926" calcext:value-type="float">
            <text:p>0,00049155092592592600</text:p>
          </table:table-cell>
          <table:table-cell table:formula="of:=[.D139]-[.D13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31" office:value-type="float" office:value="4278" calcext:value-type="float">
            <text:p>4278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495138888888889" calcext:value-type="float">
            <text:p>0,00049513888888888900</text:p>
          </table:table-cell>
          <table:table-cell table:formula="of:=[.D140]-[.D139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31" office:value-type="float" office:value="4309" calcext:value-type="float">
            <text:p>4309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498726851851852" calcext:value-type="float">
            <text:p>0,00049872685185185200</text:p>
          </table:table-cell>
          <table:table-cell table:formula="of:=[.D141]-[.D140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31" office:value-type="float" office:value="4340" calcext:value-type="float">
            <text:p>434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502314814814815" calcext:value-type="float">
            <text:p>0,00050231481481481500</text:p>
          </table:table-cell>
          <table:table-cell table:formula="of:=[.D142]-[.D141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31" office:value-type="float" office:value="4371" calcext:value-type="float">
            <text:p>4371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505902777777778" calcext:value-type="float">
            <text:p>0,00050590277777777800</text:p>
          </table:table-cell>
          <table:table-cell table:formula="of:=[.D143]-[.D142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31" office:value-type="float" office:value="4402" calcext:value-type="float">
            <text:p>4402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509490740740741" calcext:value-type="float">
            <text:p>0,00050949074074074100</text:p>
          </table:table-cell>
          <table:table-cell table:formula="of:=[.D144]-[.D14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31" office:value-type="float" office:value="4433" calcext:value-type="float">
            <text:p>4433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513078703703704" calcext:value-type="float">
            <text:p>0,00051307870370370400</text:p>
          </table:table-cell>
          <table:table-cell table:formula="of:=[.D145]-[.D144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31" office:value-type="float" office:value="4464" calcext:value-type="float">
            <text:p>4464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516666666666667" calcext:value-type="float">
            <text:p>0,00051666666666666700</text:p>
          </table:table-cell>
          <table:table-cell table:formula="of:=[.D146]-[.D145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31" office:value-type="float" office:value="4495" calcext:value-type="float">
            <text:p>449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52025462962963" calcext:value-type="float">
            <text:p>0,00052025462962963000</text:p>
          </table:table-cell>
          <table:table-cell table:formula="of:=[.D147]-[.D146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31" office:value-type="float" office:value="4526" calcext:value-type="float">
            <text:p>4526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523842592592593" calcext:value-type="float">
            <text:p>0,00052384259259259300</text:p>
          </table:table-cell>
          <table:table-cell table:formula="of:=[.D148]-[.D147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31" office:value-type="float" office:value="4557" calcext:value-type="float">
            <text:p>4557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527430555555556" calcext:value-type="float">
            <text:p>0,00052743055555555600</text:p>
          </table:table-cell>
          <table:table-cell table:formula="of:=[.D149]-[.D14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31" office:value-type="float" office:value="4588" calcext:value-type="float">
            <text:p>4588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531018518518519" calcext:value-type="float">
            <text:p>0,00053101851851851900</text:p>
          </table:table-cell>
          <table:table-cell table:formula="of:=[.D150]-[.D149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31" office:value-type="float" office:value="4619" calcext:value-type="float">
            <text:p>4619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534606481481482" calcext:value-type="float">
            <text:p>0,00053460648148148200</text:p>
          </table:table-cell>
          <table:table-cell table:formula="of:=[.D151]-[.D150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31" office:value-type="float" office:value="4650" calcext:value-type="float">
            <text:p>46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538194444444444" calcext:value-type="float">
            <text:p>0,00053819444444444400</text:p>
          </table:table-cell>
          <table:table-cell table:formula="of:=[.D152]-[.D151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31" office:value-type="float" office:value="4681" calcext:value-type="float">
            <text:p>4681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541782407407407" calcext:value-type="float">
            <text:p>0,00054178240740740700</text:p>
          </table:table-cell>
          <table:table-cell table:formula="of:=[.D153]-[.D152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31" office:value-type="float" office:value="4712" calcext:value-type="float">
            <text:p>4712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54537037037037" calcext:value-type="float">
            <text:p>0,00054537037037037000</text:p>
          </table:table-cell>
          <table:table-cell table:formula="of:=[.D154]-[.D15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31" office:value-type="float" office:value="4743" calcext:value-type="float">
            <text:p>4743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548958333333333" calcext:value-type="float">
            <text:p>0,00054895833333333300</text:p>
          </table:table-cell>
          <table:table-cell table:formula="of:=[.D155]-[.D154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31" office:value-type="float" office:value="4774" calcext:value-type="float">
            <text:p>4774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552546296296296" calcext:value-type="float">
            <text:p>0,00055254629629629600</text:p>
          </table:table-cell>
          <table:table-cell table:formula="of:=[.D156]-[.D155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31" office:value-type="float" office:value="4805" calcext:value-type="float">
            <text:p>480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556134259259259" calcext:value-type="float">
            <text:p>0,00055613425925925900</text:p>
          </table:table-cell>
          <table:table-cell table:formula="of:=[.D157]-[.D156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31" office:value-type="float" office:value="4836" calcext:value-type="float">
            <text:p>4836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559722222222222" calcext:value-type="float">
            <text:p>0,00055972222222222200</text:p>
          </table:table-cell>
          <table:table-cell table:formula="of:=[.D158]-[.D157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31" office:value-type="float" office:value="4867" calcext:value-type="float">
            <text:p>4867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563310185185185" calcext:value-type="float">
            <text:p>0,00056331018518518500</text:p>
          </table:table-cell>
          <table:table-cell table:formula="of:=[.D159]-[.D15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31" office:value-type="float" office:value="4898" calcext:value-type="float">
            <text:p>4898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566898148148148" calcext:value-type="float">
            <text:p>0,00056689814814814800</text:p>
          </table:table-cell>
          <table:table-cell table:formula="of:=[.D160]-[.D159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31" office:value-type="float" office:value="4929" calcext:value-type="float">
            <text:p>4929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570486111111111" calcext:value-type="float">
            <text:p>0,00057048611111111100</text:p>
          </table:table-cell>
          <table:table-cell table:formula="of:=[.D161]-[.D160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31" office:value-type="float" office:value="4960" calcext:value-type="float">
            <text:p>496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574074074074074" calcext:value-type="float">
            <text:p>0,00057407407407407400</text:p>
          </table:table-cell>
          <table:table-cell table:formula="of:=[.D162]-[.D161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31" office:value-type="float" office:value="4991" calcext:value-type="float">
            <text:p>4991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577662037037037" calcext:value-type="float">
            <text:p>0,00057766203703703700</text:p>
          </table:table-cell>
          <table:table-cell table:formula="of:=[.D163]-[.D162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31" office:value-type="float" office:value="5022" calcext:value-type="float">
            <text:p>5022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58125" calcext:value-type="float">
            <text:p>0,00058125000000000000</text:p>
          </table:table-cell>
          <table:table-cell table:formula="of:=[.D164]-[.D16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31" office:value-type="float" office:value="5053" calcext:value-type="float">
            <text:p>5053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584837962962963" calcext:value-type="float">
            <text:p>0,00058483796296296300</text:p>
          </table:table-cell>
          <table:table-cell table:formula="of:=[.D165]-[.D164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31" office:value-type="float" office:value="5084" calcext:value-type="float">
            <text:p>5084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588425925925926" calcext:value-type="float">
            <text:p>0,00058842592592592600</text:p>
          </table:table-cell>
          <table:table-cell table:formula="of:=[.D166]-[.D165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31" office:value-type="float" office:value="5115" calcext:value-type="float">
            <text:p>511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592013888888889" calcext:value-type="float">
            <text:p>0,00059201388888888900</text:p>
          </table:table-cell>
          <table:table-cell table:formula="of:=[.D167]-[.D166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31" office:value-type="float" office:value="5146" calcext:value-type="float">
            <text:p>5146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595601851851852" calcext:value-type="float">
            <text:p>0,00059560185185185200</text:p>
          </table:table-cell>
          <table:table-cell table:formula="of:=[.D168]-[.D167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31" office:value-type="float" office:value="5177" calcext:value-type="float">
            <text:p>5177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599189814814815" calcext:value-type="float">
            <text:p>0,00059918981481481500</text:p>
          </table:table-cell>
          <table:table-cell table:formula="of:=[.D169]-[.D16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31" office:value-type="float" office:value="5208" calcext:value-type="float">
            <text:p>5208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602777777777778" calcext:value-type="float">
            <text:p>0,00060277777777777800</text:p>
          </table:table-cell>
          <table:table-cell table:formula="of:=[.D170]-[.D169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31" office:value-type="float" office:value="5239" calcext:value-type="float">
            <text:p>5239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606365740740741" calcext:value-type="float">
            <text:p>0,00060636574074074100</text:p>
          </table:table-cell>
          <table:table-cell table:formula="of:=[.D171]-[.D170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31" office:value-type="float" office:value="5270" calcext:value-type="float">
            <text:p>527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609953703703704" calcext:value-type="float">
            <text:p>0,00060995370370370400</text:p>
          </table:table-cell>
          <table:table-cell table:formula="of:=[.D172]-[.D171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31" office:value-type="float" office:value="5301" calcext:value-type="float">
            <text:p>5301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613541666666667" calcext:value-type="float">
            <text:p>0,00061354166666666700</text:p>
          </table:table-cell>
          <table:table-cell table:formula="of:=[.D173]-[.D172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31" office:value-type="float" office:value="5332" calcext:value-type="float">
            <text:p>5332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61712962962963" calcext:value-type="float">
            <text:p>0,00061712962962963000</text:p>
          </table:table-cell>
          <table:table-cell table:formula="of:=[.D174]-[.D17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31" office:value-type="float" office:value="5363" calcext:value-type="float">
            <text:p>5363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620717592592593" calcext:value-type="float">
            <text:p>0,00062071759259259300</text:p>
          </table:table-cell>
          <table:table-cell table:formula="of:=[.D175]-[.D174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31" office:value-type="float" office:value="5394" calcext:value-type="float">
            <text:p>5394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624305555555556" calcext:value-type="float">
            <text:p>0,00062430555555555600</text:p>
          </table:table-cell>
          <table:table-cell table:formula="of:=[.D176]-[.D175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31" office:value-type="float" office:value="5425" calcext:value-type="float">
            <text:p>54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627893518518519" calcext:value-type="float">
            <text:p>0,00062789351851851900</text:p>
          </table:table-cell>
          <table:table-cell table:formula="of:=[.D177]-[.D176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31" office:value-type="float" office:value="5456" calcext:value-type="float">
            <text:p>5456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631481481481482" calcext:value-type="float">
            <text:p>0,00063148148148148200</text:p>
          </table:table-cell>
          <table:table-cell table:formula="of:=[.D178]-[.D177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31" office:value-type="float" office:value="5487" calcext:value-type="float">
            <text:p>5487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635069444444444" calcext:value-type="float">
            <text:p>0,00063506944444444400</text:p>
          </table:table-cell>
          <table:table-cell table:formula="of:=[.D179]-[.D17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31" office:value-type="float" office:value="5518" calcext:value-type="float">
            <text:p>5518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638657407407407" calcext:value-type="float">
            <text:p>0,00063865740740740700</text:p>
          </table:table-cell>
          <table:table-cell table:formula="of:=[.D180]-[.D179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31" office:value-type="float" office:value="5549" calcext:value-type="float">
            <text:p>5549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64224537037037" calcext:value-type="float">
            <text:p>0,00064224537037037000</text:p>
          </table:table-cell>
          <table:table-cell table:formula="of:=[.D181]-[.D180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31" office:value-type="float" office:value="5580" calcext:value-type="float">
            <text:p>558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645833333333333" calcext:value-type="float">
            <text:p>0,00064583333333333300</text:p>
          </table:table-cell>
          <table:table-cell table:formula="of:=[.D182]-[.D181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31" office:value-type="float" office:value="5611" calcext:value-type="float">
            <text:p>5611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649421296296296" calcext:value-type="float">
            <text:p>0,00064942129629629600</text:p>
          </table:table-cell>
          <table:table-cell table:formula="of:=[.D183]-[.D182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31" office:value-type="float" office:value="5642" calcext:value-type="float">
            <text:p>5642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653009259259259" calcext:value-type="float">
            <text:p>0,00065300925925925900</text:p>
          </table:table-cell>
          <table:table-cell table:formula="of:=[.D184]-[.D18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31" office:value-type="float" office:value="5673" calcext:value-type="float">
            <text:p>5673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656597222222222" calcext:value-type="float">
            <text:p>0,00065659722222222200</text:p>
          </table:table-cell>
          <table:table-cell table:formula="of:=[.D185]-[.D184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31" office:value-type="float" office:value="5704" calcext:value-type="float">
            <text:p>5704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660185185185185" calcext:value-type="float">
            <text:p>0,00066018518518518500</text:p>
          </table:table-cell>
          <table:table-cell table:formula="of:=[.D186]-[.D185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31" office:value-type="float" office:value="5735" calcext:value-type="float">
            <text:p>573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663773148148148" calcext:value-type="float">
            <text:p>0,00066377314814814800</text:p>
          </table:table-cell>
          <table:table-cell table:formula="of:=[.D187]-[.D186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31" office:value-type="float" office:value="5766" calcext:value-type="float">
            <text:p>5766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667361111111111" calcext:value-type="float">
            <text:p>0,00066736111111111100</text:p>
          </table:table-cell>
          <table:table-cell table:formula="of:=[.D188]-[.D187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31" office:value-type="float" office:value="5797" calcext:value-type="float">
            <text:p>5797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670949074074074" calcext:value-type="float">
            <text:p>0,00067094907407407400</text:p>
          </table:table-cell>
          <table:table-cell table:formula="of:=[.D189]-[.D18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31" office:value-type="float" office:value="5828" calcext:value-type="float">
            <text:p>5828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674537037037037" calcext:value-type="float">
            <text:p>0,00067453703703703700</text:p>
          </table:table-cell>
          <table:table-cell table:formula="of:=[.D190]-[.D189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31" office:value-type="float" office:value="5859" calcext:value-type="float">
            <text:p>5859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678125" calcext:value-type="float">
            <text:p>0,00067812500000000000</text:p>
          </table:table-cell>
          <table:table-cell table:formula="of:=[.D191]-[.D190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31" office:value-type="float" office:value="5890" calcext:value-type="float">
            <text:p>589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681712962962963" calcext:value-type="float">
            <text:p>0,00068171296296296300</text:p>
          </table:table-cell>
          <table:table-cell table:formula="of:=[.D192]-[.D191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31" office:value-type="float" office:value="5921" calcext:value-type="float">
            <text:p>5921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685300925925926" calcext:value-type="float">
            <text:p>0,00068530092592592600</text:p>
          </table:table-cell>
          <table:table-cell table:formula="of:=[.D193]-[.D192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31" office:value-type="float" office:value="5952" calcext:value-type="float">
            <text:p>5952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688888888888889" calcext:value-type="float">
            <text:p>0,00068888888888888900</text:p>
          </table:table-cell>
          <table:table-cell table:formula="of:=[.D194]-[.D19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31" office:value-type="float" office:value="5983" calcext:value-type="float">
            <text:p>5983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692476851851852" calcext:value-type="float">
            <text:p>0,00069247685185185200</text:p>
          </table:table-cell>
          <table:table-cell table:formula="of:=[.D195]-[.D194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31" office:value-type="float" office:value="6014" calcext:value-type="float">
            <text:p>6014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696064814814815" calcext:value-type="float">
            <text:p>0,00069606481481481500</text:p>
          </table:table-cell>
          <table:table-cell table:formula="of:=[.D196]-[.D195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31" office:value-type="float" office:value="6045" calcext:value-type="float">
            <text:p>604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699652777777778" calcext:value-type="float">
            <text:p>0,00069965277777777800</text:p>
          </table:table-cell>
          <table:table-cell table:formula="of:=[.D197]-[.D196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31" office:value-type="float" office:value="6076" calcext:value-type="float">
            <text:p>6076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703240740740741" calcext:value-type="float">
            <text:p>0,00070324074074074100</text:p>
          </table:table-cell>
          <table:table-cell table:formula="of:=[.D198]-[.D197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31" office:value-type="float" office:value="6107" calcext:value-type="float">
            <text:p>6107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706828703703704" calcext:value-type="float">
            <text:p>0,00070682870370370400</text:p>
          </table:table-cell>
          <table:table-cell table:formula="of:=[.D199]-[.D19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31" office:value-type="float" office:value="6138" calcext:value-type="float">
            <text:p>6138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710416666666667" calcext:value-type="float">
            <text:p>0,00071041666666666700</text:p>
          </table:table-cell>
          <table:table-cell table:formula="of:=[.D200]-[.D199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31" office:value-type="float" office:value="6169" calcext:value-type="float">
            <text:p>6169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71400462962963" calcext:value-type="float">
            <text:p>0,00071400462962963000</text:p>
          </table:table-cell>
          <table:table-cell table:formula="of:=[.D201]-[.D200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31" office:value-type="float" office:value="6200" calcext:value-type="float">
            <text:p>62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717592592592593" calcext:value-type="float">
            <text:p>0,00071759259259259300</text:p>
          </table:table-cell>
          <table:table-cell table:formula="of:=[.D202]-[.D201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31" office:value-type="float" office:value="6231" calcext:value-type="float">
            <text:p>6231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721180555555556" calcext:value-type="float">
            <text:p>0,00072118055555555600</text:p>
          </table:table-cell>
          <table:table-cell table:formula="of:=[.D203]-[.D202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31" office:value-type="float" office:value="6262" calcext:value-type="float">
            <text:p>6262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724768518518519" calcext:value-type="float">
            <text:p>0,00072476851851851800</text:p>
          </table:table-cell>
          <table:table-cell table:formula="of:=[.D204]-[.D20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31" office:value-type="float" office:value="6293" calcext:value-type="float">
            <text:p>6293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728356481481482" calcext:value-type="float">
            <text:p>0,00072835648148148100</text:p>
          </table:table-cell>
          <table:table-cell table:formula="of:=[.D205]-[.D204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31" office:value-type="float" office:value="6324" calcext:value-type="float">
            <text:p>6324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731944444444445" calcext:value-type="float">
            <text:p>0,00073194444444444500</text:p>
          </table:table-cell>
          <table:table-cell table:formula="of:=[.D206]-[.D205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31" office:value-type="float" office:value="6355" calcext:value-type="float">
            <text:p>635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735532407407407" calcext:value-type="float">
            <text:p>0,00073553240740740700</text:p>
          </table:table-cell>
          <table:table-cell table:formula="of:=[.D207]-[.D206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31" office:value-type="float" office:value="6386" calcext:value-type="float">
            <text:p>6386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73912037037037" calcext:value-type="float">
            <text:p>0,00073912037037037100</text:p>
          </table:table-cell>
          <table:table-cell table:formula="of:=[.D208]-[.D207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31" office:value-type="float" office:value="6417" calcext:value-type="float">
            <text:p>6417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742708333333333" calcext:value-type="float">
            <text:p>0,00074270833333333300</text:p>
          </table:table-cell>
          <table:table-cell table:formula="of:=[.D209]-[.D20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31" office:value-type="float" office:value="6448" calcext:value-type="float">
            <text:p>6448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746296296296296" calcext:value-type="float">
            <text:p>0,00074629629629629600</text:p>
          </table:table-cell>
          <table:table-cell table:formula="of:=[.D210]-[.D209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31" office:value-type="float" office:value="6479" calcext:value-type="float">
            <text:p>6479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749884259259259" calcext:value-type="float">
            <text:p>0,00074988425925925900</text:p>
          </table:table-cell>
          <table:table-cell table:formula="of:=[.D211]-[.D210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31" office:value-type="float" office:value="6510" calcext:value-type="float">
            <text:p>651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753472222222222" calcext:value-type="float">
            <text:p>0,00075347222222222200</text:p>
          </table:table-cell>
          <table:table-cell table:formula="of:=[.D212]-[.D211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31" office:value-type="float" office:value="6541" calcext:value-type="float">
            <text:p>6541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757060185185185" calcext:value-type="float">
            <text:p>0,00075706018518518500</text:p>
          </table:table-cell>
          <table:table-cell table:formula="of:=[.D213]-[.D212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31" office:value-type="float" office:value="6572" calcext:value-type="float">
            <text:p>6572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760648148148148" calcext:value-type="float">
            <text:p>0,00076064814814814800</text:p>
          </table:table-cell>
          <table:table-cell table:formula="of:=[.D214]-[.D21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31" office:value-type="float" office:value="6603" calcext:value-type="float">
            <text:p>6603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764236111111111" calcext:value-type="float">
            <text:p>0,00076423611111111100</text:p>
          </table:table-cell>
          <table:table-cell table:formula="of:=[.D215]-[.D214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31" office:value-type="float" office:value="6634" calcext:value-type="float">
            <text:p>6634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767824074074074" calcext:value-type="float">
            <text:p>0,00076782407407407400</text:p>
          </table:table-cell>
          <table:table-cell table:formula="of:=[.D216]-[.D215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31" office:value-type="float" office:value="6665" calcext:value-type="float">
            <text:p>666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771412037037037" calcext:value-type="float">
            <text:p>0,00077141203703703700</text:p>
          </table:table-cell>
          <table:table-cell table:formula="of:=[.D217]-[.D216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31" office:value-type="float" office:value="6696" calcext:value-type="float">
            <text:p>6696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775" calcext:value-type="float">
            <text:p>0,00077500000000000000</text:p>
          </table:table-cell>
          <table:table-cell table:formula="of:=[.D218]-[.D217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31" office:value-type="float" office:value="6727" calcext:value-type="float">
            <text:p>6727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778587962962963" calcext:value-type="float">
            <text:p>0,00077858796296296300</text:p>
          </table:table-cell>
          <table:table-cell table:formula="of:=[.D219]-[.D21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31" office:value-type="float" office:value="6758" calcext:value-type="float">
            <text:p>6758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782175925925926" calcext:value-type="float">
            <text:p>0,00078217592592592600</text:p>
          </table:table-cell>
          <table:table-cell table:formula="of:=[.D220]-[.D219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31" office:value-type="float" office:value="6789" calcext:value-type="float">
            <text:p>6789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785763888888889" calcext:value-type="float">
            <text:p>0,00078576388888888900</text:p>
          </table:table-cell>
          <table:table-cell table:formula="of:=[.D221]-[.D220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31" office:value-type="float" office:value="6820" calcext:value-type="float">
            <text:p>682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789351851851852" calcext:value-type="float">
            <text:p>0,00078935185185185200</text:p>
          </table:table-cell>
          <table:table-cell table:formula="of:=[.D222]-[.D221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31" office:value-type="float" office:value="6851" calcext:value-type="float">
            <text:p>6851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792939814814815" calcext:value-type="float">
            <text:p>0,00079293981481481500</text:p>
          </table:table-cell>
          <table:table-cell table:formula="of:=[.D223]-[.D222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31" office:value-type="float" office:value="6882" calcext:value-type="float">
            <text:p>6882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796527777777778" calcext:value-type="float">
            <text:p>0,00079652777777777800</text:p>
          </table:table-cell>
          <table:table-cell table:formula="of:=[.D224]-[.D22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31" office:value-type="float" office:value="6913" calcext:value-type="float">
            <text:p>6913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800115740740741" calcext:value-type="float">
            <text:p>0,00080011574074074100</text:p>
          </table:table-cell>
          <table:table-cell table:formula="of:=[.D225]-[.D224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31" office:value-type="float" office:value="6944" calcext:value-type="float">
            <text:p>6944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803703703703704" calcext:value-type="float">
            <text:p>0,00080370370370370400</text:p>
          </table:table-cell>
          <table:table-cell table:formula="of:=[.D226]-[.D225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31" office:value-type="float" office:value="6975" calcext:value-type="float">
            <text:p>69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807291666666667" calcext:value-type="float">
            <text:p>0,00080729166666666700</text:p>
          </table:table-cell>
          <table:table-cell table:formula="of:=[.D227]-[.D226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31" office:value-type="float" office:value="7006" calcext:value-type="float">
            <text:p>7006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81087962962963" calcext:value-type="float">
            <text:p>0,00081087962962963000</text:p>
          </table:table-cell>
          <table:table-cell table:formula="of:=[.D228]-[.D227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31" office:value-type="float" office:value="7037" calcext:value-type="float">
            <text:p>7037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814467592592593" calcext:value-type="float">
            <text:p>0,00081446759259259200</text:p>
          </table:table-cell>
          <table:table-cell table:formula="of:=[.D229]-[.D22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31" office:value-type="float" office:value="7068" calcext:value-type="float">
            <text:p>7068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818055555555556" calcext:value-type="float">
            <text:p>0,00081805555555555600</text:p>
          </table:table-cell>
          <table:table-cell table:formula="of:=[.D230]-[.D229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31" office:value-type="float" office:value="7099" calcext:value-type="float">
            <text:p>7099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821643518518519" calcext:value-type="float">
            <text:p>0,00082164351851851900</text:p>
          </table:table-cell>
          <table:table-cell table:formula="of:=[.D231]-[.D230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31" office:value-type="float" office:value="7130" calcext:value-type="float">
            <text:p>713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825231481481482" calcext:value-type="float">
            <text:p>0,00082523148148148200</text:p>
          </table:table-cell>
          <table:table-cell table:formula="of:=[.D232]-[.D231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31" office:value-type="float" office:value="7161" calcext:value-type="float">
            <text:p>7161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828819444444444" calcext:value-type="float">
            <text:p>0,00082881944444444500</text:p>
          </table:table-cell>
          <table:table-cell table:formula="of:=[.D233]-[.D232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31" office:value-type="float" office:value="7192" calcext:value-type="float">
            <text:p>7192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832407407407407" calcext:value-type="float">
            <text:p>0,00083240740740740700</text:p>
          </table:table-cell>
          <table:table-cell table:formula="of:=[.D234]-[.D23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31" office:value-type="float" office:value="7223" calcext:value-type="float">
            <text:p>7223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83599537037037" calcext:value-type="float">
            <text:p>0,00083599537037037000</text:p>
          </table:table-cell>
          <table:table-cell table:formula="of:=[.D235]-[.D234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31" office:value-type="float" office:value="7254" calcext:value-type="float">
            <text:p>7254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839583333333333" calcext:value-type="float">
            <text:p>0,00083958333333333300</text:p>
          </table:table-cell>
          <table:table-cell table:formula="of:=[.D236]-[.D235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31" office:value-type="float" office:value="7285" calcext:value-type="float">
            <text:p>728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843171296296296" calcext:value-type="float">
            <text:p>0,00084317129629629600</text:p>
          </table:table-cell>
          <table:table-cell table:formula="of:=[.D237]-[.D236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31" office:value-type="float" office:value="7316" calcext:value-type="float">
            <text:p>7316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846759259259259" calcext:value-type="float">
            <text:p>0,00084675925925925900</text:p>
          </table:table-cell>
          <table:table-cell table:formula="of:=[.D238]-[.D237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31" office:value-type="float" office:value="7347" calcext:value-type="float">
            <text:p>7347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850347222222222" calcext:value-type="float">
            <text:p>0,00085034722222222200</text:p>
          </table:table-cell>
          <table:table-cell table:formula="of:=[.D239]-[.D23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31" office:value-type="float" office:value="7378" calcext:value-type="float">
            <text:p>7378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853935185185185" calcext:value-type="float">
            <text:p>0,00085393518518518500</text:p>
          </table:table-cell>
          <table:table-cell table:formula="of:=[.D240]-[.D239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31" office:value-type="float" office:value="7409" calcext:value-type="float">
            <text:p>7409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857523148148148" calcext:value-type="float">
            <text:p>0,00085752314814814800</text:p>
          </table:table-cell>
          <table:table-cell table:formula="of:=[.D241]-[.D240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31" office:value-type="float" office:value="7440" calcext:value-type="float">
            <text:p>744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861111111111111" calcext:value-type="float">
            <text:p>0,00086111111111111100</text:p>
          </table:table-cell>
          <table:table-cell table:formula="of:=[.D242]-[.D241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31" office:value-type="float" office:value="7471" calcext:value-type="float">
            <text:p>7471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864699074074074" calcext:value-type="float">
            <text:p>0,00086469907407407400</text:p>
          </table:table-cell>
          <table:table-cell table:formula="of:=[.D243]-[.D242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31" office:value-type="float" office:value="7502" calcext:value-type="float">
            <text:p>7502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868287037037037" calcext:value-type="float">
            <text:p>0,00086828703703703700</text:p>
          </table:table-cell>
          <table:table-cell table:formula="of:=[.D244]-[.D24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31" office:value-type="float" office:value="7533" calcext:value-type="float">
            <text:p>7533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871875" calcext:value-type="float">
            <text:p>0,00087187500000000000</text:p>
          </table:table-cell>
          <table:table-cell table:formula="of:=[.D245]-[.D244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31" office:value-type="float" office:value="7564" calcext:value-type="float">
            <text:p>7564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875462962962963" calcext:value-type="float">
            <text:p>0,00087546296296296300</text:p>
          </table:table-cell>
          <table:table-cell table:formula="of:=[.D246]-[.D245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31" office:value-type="float" office:value="7595" calcext:value-type="float">
            <text:p>759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879050925925926" calcext:value-type="float">
            <text:p>0,00087905092592592600</text:p>
          </table:table-cell>
          <table:table-cell table:formula="of:=[.D247]-[.D246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31" office:value-type="float" office:value="7626" calcext:value-type="float">
            <text:p>7626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882638888888889" calcext:value-type="float">
            <text:p>0,00088263888888888900</text:p>
          </table:table-cell>
          <table:table-cell table:formula="of:=[.D248]-[.D247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31" office:value-type="float" office:value="7657" calcext:value-type="float">
            <text:p>7657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886226851851852" calcext:value-type="float">
            <text:p>0,00088622685185185200</text:p>
          </table:table-cell>
          <table:table-cell table:formula="of:=[.D249]-[.D24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31" office:value-type="float" office:value="7688" calcext:value-type="float">
            <text:p>7688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889814814814815" calcext:value-type="float">
            <text:p>0,00088981481481481500</text:p>
          </table:table-cell>
          <table:table-cell table:formula="of:=[.D250]-[.D249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31" office:value-type="float" office:value="7719" calcext:value-type="float">
            <text:p>7719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893402777777778" calcext:value-type="float">
            <text:p>0,00089340277777777800</text:p>
          </table:table-cell>
          <table:table-cell table:formula="of:=[.D251]-[.D250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31" office:value-type="float" office:value="7750" calcext:value-type="float">
            <text:p>7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896990740740741" calcext:value-type="float">
            <text:p>0,00089699074074074100</text:p>
          </table:table-cell>
          <table:table-cell table:formula="of:=[.D252]-[.D251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31" office:value-type="float" office:value="7781" calcext:value-type="float">
            <text:p>7781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900578703703704" calcext:value-type="float">
            <text:p>0,00090057870370370400</text:p>
          </table:table-cell>
          <table:table-cell table:formula="of:=[.D253]-[.D252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31" office:value-type="float" office:value="7812" calcext:value-type="float">
            <text:p>7812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904166666666667" calcext:value-type="float">
            <text:p>0,00090416666666666700</text:p>
          </table:table-cell>
          <table:table-cell table:formula="of:=[.D254]-[.D25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31" office:value-type="float" office:value="7843" calcext:value-type="float">
            <text:p>7843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90775462962963" calcext:value-type="float">
            <text:p>0,00090775462962963000</text:p>
          </table:table-cell>
          <table:table-cell table:formula="of:=[.D255]-[.D254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31" office:value-type="float" office:value="7874" calcext:value-type="float">
            <text:p>7874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911342592592593" calcext:value-type="float">
            <text:p>0,00091134259259259300</text:p>
          </table:table-cell>
          <table:table-cell table:formula="of:=[.D256]-[.D255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31" office:value-type="float" office:value="7905" calcext:value-type="float">
            <text:p>790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914930555555556" calcext:value-type="float">
            <text:p>0,00091493055555555600</text:p>
          </table:table-cell>
          <table:table-cell table:formula="of:=[.D257]-[.D256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31" office:value-type="float" office:value="7936" calcext:value-type="float">
            <text:p>7936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918518518518519" calcext:value-type="float">
            <text:p>0,00091851851851851900</text:p>
          </table:table-cell>
          <table:table-cell table:formula="of:=[.D258]-[.D257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31" office:value-type="float" office:value="7967" calcext:value-type="float">
            <text:p>7967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922106481481481" calcext:value-type="float">
            <text:p>0,00092210648148148100</text:p>
          </table:table-cell>
          <table:table-cell table:formula="of:=[.D259]-[.D25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31" office:value-type="float" office:value="7998" calcext:value-type="float">
            <text:p>7998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925694444444445" calcext:value-type="float">
            <text:p>0,00092569444444444500</text:p>
          </table:table-cell>
          <table:table-cell table:formula="of:=[.D260]-[.D259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31" office:value-type="float" office:value="8029" calcext:value-type="float">
            <text:p>8029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929282407407407" calcext:value-type="float">
            <text:p>0,00092928240740740700</text:p>
          </table:table-cell>
          <table:table-cell table:formula="of:=[.D261]-[.D260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31" office:value-type="float" office:value="8060" calcext:value-type="float">
            <text:p>806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93287037037037" calcext:value-type="float">
            <text:p>0,00093287037037037000</text:p>
          </table:table-cell>
          <table:table-cell table:formula="of:=[.D262]-[.D261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31" office:value-type="float" office:value="8091" calcext:value-type="float">
            <text:p>8091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936458333333333" calcext:value-type="float">
            <text:p>0,00093645833333333300</text:p>
          </table:table-cell>
          <table:table-cell table:formula="of:=[.D263]-[.D262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31" office:value-type="float" office:value="8122" calcext:value-type="float">
            <text:p>8122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940046296296296" calcext:value-type="float">
            <text:p>0,00094004629629629600</text:p>
          </table:table-cell>
          <table:table-cell table:formula="of:=[.D264]-[.D26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31" office:value-type="float" office:value="8153" calcext:value-type="float">
            <text:p>8153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943634259259259" calcext:value-type="float">
            <text:p>0,00094363425925925900</text:p>
          </table:table-cell>
          <table:table-cell table:formula="of:=[.D265]-[.D264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31" office:value-type="float" office:value="8184" calcext:value-type="float">
            <text:p>8184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947222222222222" calcext:value-type="float">
            <text:p>0,00094722222222222200</text:p>
          </table:table-cell>
          <table:table-cell table:formula="of:=[.D266]-[.D265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31" office:value-type="float" office:value="8215" calcext:value-type="float">
            <text:p>821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950810185185185" calcext:value-type="float">
            <text:p>0,00095081018518518500</text:p>
          </table:table-cell>
          <table:table-cell table:formula="of:=[.D267]-[.D266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31" office:value-type="float" office:value="8246" calcext:value-type="float">
            <text:p>8246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954398148148148" calcext:value-type="float">
            <text:p>0,00095439814814814800</text:p>
          </table:table-cell>
          <table:table-cell table:formula="of:=[.D268]-[.D267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31" office:value-type="float" office:value="8277" calcext:value-type="float">
            <text:p>8277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957986111111111" calcext:value-type="float">
            <text:p>0,00095798611111111100</text:p>
          </table:table-cell>
          <table:table-cell table:formula="of:=[.D269]-[.D26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31" office:value-type="float" office:value="8308" calcext:value-type="float">
            <text:p>8308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961574074074074" calcext:value-type="float">
            <text:p>0,00096157407407407400</text:p>
          </table:table-cell>
          <table:table-cell table:formula="of:=[.D270]-[.D269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31" office:value-type="float" office:value="8339" calcext:value-type="float">
            <text:p>8339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965162037037037" calcext:value-type="float">
            <text:p>0,00096516203703703700</text:p>
          </table:table-cell>
          <table:table-cell table:formula="of:=[.D271]-[.D270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31" office:value-type="float" office:value="8370" calcext:value-type="float">
            <text:p>837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96875" calcext:value-type="float">
            <text:p>0,00096875000000000000</text:p>
          </table:table-cell>
          <table:table-cell table:formula="of:=[.D272]-[.D271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31" office:value-type="float" office:value="8401" calcext:value-type="float">
            <text:p>8401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972337962962963" calcext:value-type="float">
            <text:p>0,00097233796296296300</text:p>
          </table:table-cell>
          <table:table-cell table:formula="of:=[.D273]-[.D272]" office:value-type="float" office:value="0.00000358796296296294" calcext:value-type="float">
            <text:p>0,0000035879629629629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31" office:value-type="float" office:value="8432" calcext:value-type="float">
            <text:p>8432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975925925925926" calcext:value-type="float">
            <text:p>0,00097592592592592600</text:p>
          </table:table-cell>
          <table:table-cell table:formula="of:=[.D274]-[.D27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31" office:value-type="float" office:value="8463" calcext:value-type="float">
            <text:p>8463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979513888888889" calcext:value-type="float">
            <text:p>0,00097951388888888900</text:p>
          </table:table-cell>
          <table:table-cell table:formula="of:=[.D275]-[.D27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31" office:value-type="float" office:value="8494" calcext:value-type="float">
            <text:p>8494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983101851851852" calcext:value-type="float">
            <text:p>0,00098310185185185200</text:p>
          </table:table-cell>
          <table:table-cell table:formula="of:=[.D276]-[.D27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31" office:value-type="float" office:value="8525" calcext:value-type="float">
            <text:p>852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986689814814815" calcext:value-type="float">
            <text:p>0,00098668981481481500</text:p>
          </table:table-cell>
          <table:table-cell table:formula="of:=[.D277]-[.D27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31" office:value-type="float" office:value="8556" calcext:value-type="float">
            <text:p>8556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990277777777778" calcext:value-type="float">
            <text:p>0,00099027777777777800</text:p>
          </table:table-cell>
          <table:table-cell table:formula="of:=[.D278]-[.D27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31" office:value-type="float" office:value="8587" calcext:value-type="float">
            <text:p>8587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993865740740741" calcext:value-type="float">
            <text:p>0,00099386574074074100</text:p>
          </table:table-cell>
          <table:table-cell table:formula="of:=[.D279]-[.D27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31" office:value-type="float" office:value="8618" calcext:value-type="float">
            <text:p>8618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997453703703704" calcext:value-type="float">
            <text:p>0,00099745370370370400</text:p>
          </table:table-cell>
          <table:table-cell table:formula="of:=[.D280]-[.D27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31" office:value-type="float" office:value="8649" calcext:value-type="float">
            <text:p>8649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00104166666667" calcext:value-type="float">
            <text:p>0,00100104166666667000</text:p>
          </table:table-cell>
          <table:table-cell table:formula="of:=[.D281]-[.D28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31" office:value-type="float" office:value="8680" calcext:value-type="float">
            <text:p>868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00462962962963" calcext:value-type="float">
            <text:p>0,00100462962962963000</text:p>
          </table:table-cell>
          <table:table-cell table:formula="of:=[.D282]-[.D28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31" office:value-type="float" office:value="8711" calcext:value-type="float">
            <text:p>8711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00821759259259" calcext:value-type="float">
            <text:p>0,00100821759259259000</text:p>
          </table:table-cell>
          <table:table-cell table:formula="of:=[.D283]-[.D28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31" office:value-type="float" office:value="8742" calcext:value-type="float">
            <text:p>8742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01180555555556" calcext:value-type="float">
            <text:p>0,00101180555555556000</text:p>
          </table:table-cell>
          <table:table-cell table:formula="of:=[.D284]-[.D28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31" office:value-type="float" office:value="8773" calcext:value-type="float">
            <text:p>8773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01539351851852" calcext:value-type="float">
            <text:p>0,00101539351851852000</text:p>
          </table:table-cell>
          <table:table-cell table:formula="of:=[.D285]-[.D28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31" office:value-type="float" office:value="8804" calcext:value-type="float">
            <text:p>8804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01898148148148" calcext:value-type="float">
            <text:p>0,00101898148148148000</text:p>
          </table:table-cell>
          <table:table-cell table:formula="of:=[.D286]-[.D28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31" office:value-type="float" office:value="8835" calcext:value-type="float">
            <text:p>883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02256944444444" calcext:value-type="float">
            <text:p>0,00102256944444444000</text:p>
          </table:table-cell>
          <table:table-cell table:formula="of:=[.D287]-[.D28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31" office:value-type="float" office:value="8866" calcext:value-type="float">
            <text:p>8866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02615740740741" calcext:value-type="float">
            <text:p>0,00102615740740741000</text:p>
          </table:table-cell>
          <table:table-cell table:formula="of:=[.D288]-[.D28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31" office:value-type="float" office:value="8897" calcext:value-type="float">
            <text:p>8897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02974537037037" calcext:value-type="float">
            <text:p>0,00102974537037037000</text:p>
          </table:table-cell>
          <table:table-cell table:formula="of:=[.D289]-[.D28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31" office:value-type="float" office:value="8928" calcext:value-type="float">
            <text:p>8928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03333333333333" calcext:value-type="float">
            <text:p>0,00103333333333333000</text:p>
          </table:table-cell>
          <table:table-cell table:formula="of:=[.D290]-[.D28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31" office:value-type="float" office:value="8959" calcext:value-type="float">
            <text:p>8959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0369212962963" calcext:value-type="float">
            <text:p>0,00103692129629630000</text:p>
          </table:table-cell>
          <table:table-cell table:formula="of:=[.D291]-[.D29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31" office:value-type="float" office:value="8990" calcext:value-type="float">
            <text:p>899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04050925925926" calcext:value-type="float">
            <text:p>0,00104050925925926000</text:p>
          </table:table-cell>
          <table:table-cell table:formula="of:=[.D292]-[.D29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31" office:value-type="float" office:value="9021" calcext:value-type="float">
            <text:p>9021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04409722222222" calcext:value-type="float">
            <text:p>0,00104409722222222000</text:p>
          </table:table-cell>
          <table:table-cell table:formula="of:=[.D293]-[.D29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31" office:value-type="float" office:value="9052" calcext:value-type="float">
            <text:p>9052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04768518518519" calcext:value-type="float">
            <text:p>0,00104768518518519000</text:p>
          </table:table-cell>
          <table:table-cell table:formula="of:=[.D294]-[.D29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31" office:value-type="float" office:value="9083" calcext:value-type="float">
            <text:p>9083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05127314814815" calcext:value-type="float">
            <text:p>0,00105127314814815000</text:p>
          </table:table-cell>
          <table:table-cell table:formula="of:=[.D295]-[.D29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31" office:value-type="float" office:value="9114" calcext:value-type="float">
            <text:p>9114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05486111111111" calcext:value-type="float">
            <text:p>0,00105486111111111000</text:p>
          </table:table-cell>
          <table:table-cell table:formula="of:=[.D296]-[.D29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31" office:value-type="float" office:value="9145" calcext:value-type="float">
            <text:p>914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05844907407407" calcext:value-type="float">
            <text:p>0,00105844907407407000</text:p>
          </table:table-cell>
          <table:table-cell table:formula="of:=[.D297]-[.D29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31" office:value-type="float" office:value="9176" calcext:value-type="float">
            <text:p>9176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06203703703704" calcext:value-type="float">
            <text:p>0,00106203703703704000</text:p>
          </table:table-cell>
          <table:table-cell table:formula="of:=[.D298]-[.D29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31" office:value-type="float" office:value="9207" calcext:value-type="float">
            <text:p>9207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065625" calcext:value-type="float">
            <text:p>0,00106562500000000000</text:p>
          </table:table-cell>
          <table:table-cell table:formula="of:=[.D299]-[.D29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31" office:value-type="float" office:value="9238" calcext:value-type="float">
            <text:p>9238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06921296296296" calcext:value-type="float">
            <text:p>0,00106921296296296000</text:p>
          </table:table-cell>
          <table:table-cell table:formula="of:=[.D300]-[.D29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31" office:value-type="float" office:value="9269" calcext:value-type="float">
            <text:p>9269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07280092592593" calcext:value-type="float">
            <text:p>0,00107280092592593000</text:p>
          </table:table-cell>
          <table:table-cell table:formula="of:=[.D301]-[.D30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31" office:value-type="float" office:value="9300" calcext:value-type="float">
            <text:p>93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07638888888889" calcext:value-type="float">
            <text:p>0,00107638888888889000</text:p>
          </table:table-cell>
          <table:table-cell table:formula="of:=[.D302]-[.D30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31" office:value-type="float" office:value="9331" calcext:value-type="float">
            <text:p>9331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07997685185185" calcext:value-type="float">
            <text:p>0,00107997685185185000</text:p>
          </table:table-cell>
          <table:table-cell table:formula="of:=[.D303]-[.D30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31" office:value-type="float" office:value="9362" calcext:value-type="float">
            <text:p>9362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08356481481481" calcext:value-type="float">
            <text:p>0,00108356481481481000</text:p>
          </table:table-cell>
          <table:table-cell table:formula="of:=[.D304]-[.D30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31" office:value-type="float" office:value="9393" calcext:value-type="float">
            <text:p>9393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08715277777778" calcext:value-type="float">
            <text:p>0,00108715277777778000</text:p>
          </table:table-cell>
          <table:table-cell table:formula="of:=[.D305]-[.D30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31" office:value-type="float" office:value="9424" calcext:value-type="float">
            <text:p>9424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09074074074074" calcext:value-type="float">
            <text:p>0,00109074074074074000</text:p>
          </table:table-cell>
          <table:table-cell table:formula="of:=[.D306]-[.D30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31" office:value-type="float" office:value="9455" calcext:value-type="float">
            <text:p>945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0943287037037" calcext:value-type="float">
            <text:p>0,00109432870370370000</text:p>
          </table:table-cell>
          <table:table-cell table:formula="of:=[.D307]-[.D30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31" office:value-type="float" office:value="9486" calcext:value-type="float">
            <text:p>9486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09791666666667" calcext:value-type="float">
            <text:p>0,00109791666666667000</text:p>
          </table:table-cell>
          <table:table-cell table:formula="of:=[.D308]-[.D30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31" office:value-type="float" office:value="9517" calcext:value-type="float">
            <text:p>9517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10150462962963" calcext:value-type="float">
            <text:p>0,00110150462962963000</text:p>
          </table:table-cell>
          <table:table-cell table:formula="of:=[.D309]-[.D30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31" office:value-type="float" office:value="9548" calcext:value-type="float">
            <text:p>9548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10509259259259" calcext:value-type="float">
            <text:p>0,00110509259259259000</text:p>
          </table:table-cell>
          <table:table-cell table:formula="of:=[.D310]-[.D30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31" office:value-type="float" office:value="9579" calcext:value-type="float">
            <text:p>9579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10868055555556" calcext:value-type="float">
            <text:p>0,00110868055555556000</text:p>
          </table:table-cell>
          <table:table-cell table:formula="of:=[.D311]-[.D31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31" office:value-type="float" office:value="9610" calcext:value-type="float">
            <text:p>961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11226851851852" calcext:value-type="float">
            <text:p>0,00111226851851852000</text:p>
          </table:table-cell>
          <table:table-cell table:formula="of:=[.D312]-[.D31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31" office:value-type="float" office:value="9641" calcext:value-type="float">
            <text:p>9641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11585648148148" calcext:value-type="float">
            <text:p>0,00111585648148148000</text:p>
          </table:table-cell>
          <table:table-cell table:formula="of:=[.D313]-[.D31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31" office:value-type="float" office:value="9672" calcext:value-type="float">
            <text:p>9672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11944444444444" calcext:value-type="float">
            <text:p>0,00111944444444444000</text:p>
          </table:table-cell>
          <table:table-cell table:formula="of:=[.D314]-[.D31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31" office:value-type="float" office:value="9703" calcext:value-type="float">
            <text:p>9703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12303240740741" calcext:value-type="float">
            <text:p>0,00112303240740741000</text:p>
          </table:table-cell>
          <table:table-cell table:formula="of:=[.D315]-[.D31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31" office:value-type="float" office:value="9734" calcext:value-type="float">
            <text:p>9734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12662037037037" calcext:value-type="float">
            <text:p>0,00112662037037037000</text:p>
          </table:table-cell>
          <table:table-cell table:formula="of:=[.D316]-[.D31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31" office:value-type="float" office:value="9765" calcext:value-type="float">
            <text:p>976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13020833333333" calcext:value-type="float">
            <text:p>0,00113020833333333000</text:p>
          </table:table-cell>
          <table:table-cell table:formula="of:=[.D317]-[.D31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31" office:value-type="float" office:value="9796" calcext:value-type="float">
            <text:p>9796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1337962962963" calcext:value-type="float">
            <text:p>0,00113379629629630000</text:p>
          </table:table-cell>
          <table:table-cell table:formula="of:=[.D318]-[.D31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31" office:value-type="float" office:value="9827" calcext:value-type="float">
            <text:p>9827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13738425925926" calcext:value-type="float">
            <text:p>0,00113738425925926000</text:p>
          </table:table-cell>
          <table:table-cell table:formula="of:=[.D319]-[.D31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31" office:value-type="float" office:value="9858" calcext:value-type="float">
            <text:p>9858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14097222222222" calcext:value-type="float">
            <text:p>0,00114097222222222000</text:p>
          </table:table-cell>
          <table:table-cell table:formula="of:=[.D320]-[.D31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31" office:value-type="float" office:value="9889" calcext:value-type="float">
            <text:p>9889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14456018518519" calcext:value-type="float">
            <text:p>0,00114456018518519000</text:p>
          </table:table-cell>
          <table:table-cell table:formula="of:=[.D321]-[.D32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31" office:value-type="float" office:value="9920" calcext:value-type="float">
            <text:p>992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14814814814815" calcext:value-type="float">
            <text:p>0,00114814814814815000</text:p>
          </table:table-cell>
          <table:table-cell table:formula="of:=[.D322]-[.D32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31" office:value-type="float" office:value="9951" calcext:value-type="float">
            <text:p>9951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15173611111111" calcext:value-type="float">
            <text:p>0,00115173611111111000</text:p>
          </table:table-cell>
          <table:table-cell table:formula="of:=[.D323]-[.D32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31" office:value-type="float" office:value="9982" calcext:value-type="float">
            <text:p>9982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15532407407407" calcext:value-type="float">
            <text:p>0,00115532407407407000</text:p>
          </table:table-cell>
          <table:table-cell table:formula="of:=[.D324]-[.D32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31" office:value-type="float" office:value="10013" calcext:value-type="float">
            <text:p>10013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15891203703704" calcext:value-type="float">
            <text:p>0,00115891203703704000</text:p>
          </table:table-cell>
          <table:table-cell table:formula="of:=[.D325]-[.D32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31" office:value-type="float" office:value="10044" calcext:value-type="float">
            <text:p>10044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1625" calcext:value-type="float">
            <text:p>0,00116250000000000000</text:p>
          </table:table-cell>
          <table:table-cell table:formula="of:=[.D326]-[.D32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31" office:value-type="float" office:value="10075" calcext:value-type="float">
            <text:p>1007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16608796296296" calcext:value-type="float">
            <text:p>0,00116608796296296000</text:p>
          </table:table-cell>
          <table:table-cell table:formula="of:=[.D327]-[.D32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31" office:value-type="float" office:value="10106" calcext:value-type="float">
            <text:p>10106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16967592592593" calcext:value-type="float">
            <text:p>0,00116967592592593000</text:p>
          </table:table-cell>
          <table:table-cell table:formula="of:=[.D328]-[.D32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31" office:value-type="float" office:value="10137" calcext:value-type="float">
            <text:p>10137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17326388888889" calcext:value-type="float">
            <text:p>0,00117326388888889000</text:p>
          </table:table-cell>
          <table:table-cell table:formula="of:=[.D329]-[.D32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31" office:value-type="float" office:value="10168" calcext:value-type="float">
            <text:p>10168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17685185185185" calcext:value-type="float">
            <text:p>0,00117685185185185000</text:p>
          </table:table-cell>
          <table:table-cell table:formula="of:=[.D330]-[.D32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31" office:value-type="float" office:value="10199" calcext:value-type="float">
            <text:p>10199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18043981481481" calcext:value-type="float">
            <text:p>0,00118043981481481000</text:p>
          </table:table-cell>
          <table:table-cell table:formula="of:=[.D331]-[.D33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31" office:value-type="float" office:value="10230" calcext:value-type="float">
            <text:p>1023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18402777777778" calcext:value-type="float">
            <text:p>0,00118402777777778000</text:p>
          </table:table-cell>
          <table:table-cell table:formula="of:=[.D332]-[.D33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31" office:value-type="float" office:value="10261" calcext:value-type="float">
            <text:p>10261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18761574074074" calcext:value-type="float">
            <text:p>0,00118761574074074000</text:p>
          </table:table-cell>
          <table:table-cell table:formula="of:=[.D333]-[.D33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31" office:value-type="float" office:value="10292" calcext:value-type="float">
            <text:p>10292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1912037037037" calcext:value-type="float">
            <text:p>0,00119120370370370000</text:p>
          </table:table-cell>
          <table:table-cell table:formula="of:=[.D334]-[.D33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31" office:value-type="float" office:value="10323" calcext:value-type="float">
            <text:p>10323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19479166666667" calcext:value-type="float">
            <text:p>0,00119479166666667000</text:p>
          </table:table-cell>
          <table:table-cell table:formula="of:=[.D335]-[.D33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31" office:value-type="float" office:value="10354" calcext:value-type="float">
            <text:p>10354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19837962962963" calcext:value-type="float">
            <text:p>0,00119837962962963000</text:p>
          </table:table-cell>
          <table:table-cell table:formula="of:=[.D336]-[.D33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31" office:value-type="float" office:value="10385" calcext:value-type="float">
            <text:p>1038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20196759259259" calcext:value-type="float">
            <text:p>0,00120196759259259000</text:p>
          </table:table-cell>
          <table:table-cell table:formula="of:=[.D337]-[.D33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31" office:value-type="float" office:value="10416" calcext:value-type="float">
            <text:p>10416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20555555555556" calcext:value-type="float">
            <text:p>0,00120555555555556000</text:p>
          </table:table-cell>
          <table:table-cell table:formula="of:=[.D338]-[.D33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31" office:value-type="float" office:value="10447" calcext:value-type="float">
            <text:p>10447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20914351851852" calcext:value-type="float">
            <text:p>0,00120914351851852000</text:p>
          </table:table-cell>
          <table:table-cell table:formula="of:=[.D339]-[.D33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31" office:value-type="float" office:value="10478" calcext:value-type="float">
            <text:p>10478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21273148148148" calcext:value-type="float">
            <text:p>0,00121273148148148000</text:p>
          </table:table-cell>
          <table:table-cell table:formula="of:=[.D340]-[.D33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31" office:value-type="float" office:value="10509" calcext:value-type="float">
            <text:p>10509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21631944444444" calcext:value-type="float">
            <text:p>0,00121631944444444000</text:p>
          </table:table-cell>
          <table:table-cell table:formula="of:=[.D341]-[.D34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31" office:value-type="float" office:value="10540" calcext:value-type="float">
            <text:p>1054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21990740740741" calcext:value-type="float">
            <text:p>0,00121990740740741000</text:p>
          </table:table-cell>
          <table:table-cell table:formula="of:=[.D342]-[.D34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31" office:value-type="float" office:value="10571" calcext:value-type="float">
            <text:p>10571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22349537037037" calcext:value-type="float">
            <text:p>0,00122349537037037000</text:p>
          </table:table-cell>
          <table:table-cell table:formula="of:=[.D343]-[.D34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31" office:value-type="float" office:value="10602" calcext:value-type="float">
            <text:p>10602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22708333333333" calcext:value-type="float">
            <text:p>0,00122708333333333000</text:p>
          </table:table-cell>
          <table:table-cell table:formula="of:=[.D344]-[.D34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31" office:value-type="float" office:value="10633" calcext:value-type="float">
            <text:p>10633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2306712962963" calcext:value-type="float">
            <text:p>0,00123067129629630000</text:p>
          </table:table-cell>
          <table:table-cell table:formula="of:=[.D345]-[.D34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31" office:value-type="float" office:value="10664" calcext:value-type="float">
            <text:p>10664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23425925925926" calcext:value-type="float">
            <text:p>0,00123425925925926000</text:p>
          </table:table-cell>
          <table:table-cell table:formula="of:=[.D346]-[.D34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31" office:value-type="float" office:value="10695" calcext:value-type="float">
            <text:p>1069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23784722222222" calcext:value-type="float">
            <text:p>0,00123784722222222000</text:p>
          </table:table-cell>
          <table:table-cell table:formula="of:=[.D347]-[.D34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31" office:value-type="float" office:value="10726" calcext:value-type="float">
            <text:p>10726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24143518518519" calcext:value-type="float">
            <text:p>0,00124143518518519000</text:p>
          </table:table-cell>
          <table:table-cell table:formula="of:=[.D348]-[.D34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31" office:value-type="float" office:value="10757" calcext:value-type="float">
            <text:p>10757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24502314814815" calcext:value-type="float">
            <text:p>0,00124502314814815000</text:p>
          </table:table-cell>
          <table:table-cell table:formula="of:=[.D349]-[.D34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31" office:value-type="float" office:value="10788" calcext:value-type="float">
            <text:p>10788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24861111111111" calcext:value-type="float">
            <text:p>0,00124861111111111000</text:p>
          </table:table-cell>
          <table:table-cell table:formula="of:=[.D350]-[.D34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31" office:value-type="float" office:value="10819" calcext:value-type="float">
            <text:p>10819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25219907407407" calcext:value-type="float">
            <text:p>0,00125219907407407000</text:p>
          </table:table-cell>
          <table:table-cell table:formula="of:=[.D351]-[.D35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31" office:value-type="float" office:value="10850" calcext:value-type="float">
            <text:p>108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25578703703704" calcext:value-type="float">
            <text:p>0,00125578703703704000</text:p>
          </table:table-cell>
          <table:table-cell table:formula="of:=[.D352]-[.D35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31" office:value-type="float" office:value="10881" calcext:value-type="float">
            <text:p>10881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259375" calcext:value-type="float">
            <text:p>0,00125937500000000000</text:p>
          </table:table-cell>
          <table:table-cell table:formula="of:=[.D353]-[.D35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31" office:value-type="float" office:value="10912" calcext:value-type="float">
            <text:p>10912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26296296296296" calcext:value-type="float">
            <text:p>0,00126296296296296000</text:p>
          </table:table-cell>
          <table:table-cell table:formula="of:=[.D354]-[.D35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31" office:value-type="float" office:value="10943" calcext:value-type="float">
            <text:p>10943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26655092592593" calcext:value-type="float">
            <text:p>0,00126655092592593000</text:p>
          </table:table-cell>
          <table:table-cell table:formula="of:=[.D355]-[.D35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31" office:value-type="float" office:value="10974" calcext:value-type="float">
            <text:p>10974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27013888888889" calcext:value-type="float">
            <text:p>0,00127013888888889000</text:p>
          </table:table-cell>
          <table:table-cell table:formula="of:=[.D356]-[.D35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31" office:value-type="float" office:value="11005" calcext:value-type="float">
            <text:p>1100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27372685185185" calcext:value-type="float">
            <text:p>0,00127372685185185000</text:p>
          </table:table-cell>
          <table:table-cell table:formula="of:=[.D357]-[.D35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31" office:value-type="float" office:value="11036" calcext:value-type="float">
            <text:p>11036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27731481481482" calcext:value-type="float">
            <text:p>0,00127731481481482000</text:p>
          </table:table-cell>
          <table:table-cell table:formula="of:=[.D358]-[.D35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31" office:value-type="float" office:value="11067" calcext:value-type="float">
            <text:p>11067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28090277777778" calcext:value-type="float">
            <text:p>0,00128090277777778000</text:p>
          </table:table-cell>
          <table:table-cell table:formula="of:=[.D359]-[.D35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31" office:value-type="float" office:value="11098" calcext:value-type="float">
            <text:p>11098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28449074074074" calcext:value-type="float">
            <text:p>0,00128449074074074000</text:p>
          </table:table-cell>
          <table:table-cell table:formula="of:=[.D360]-[.D35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31" office:value-type="float" office:value="11129" calcext:value-type="float">
            <text:p>11129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2880787037037" calcext:value-type="float">
            <text:p>0,00128807870370370000</text:p>
          </table:table-cell>
          <table:table-cell table:formula="of:=[.D361]-[.D36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31" office:value-type="float" office:value="11160" calcext:value-type="float">
            <text:p>1116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29166666666667" calcext:value-type="float">
            <text:p>0,00129166666666667000</text:p>
          </table:table-cell>
          <table:table-cell table:formula="of:=[.D362]-[.D36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31" office:value-type="float" office:value="11191" calcext:value-type="float">
            <text:p>11191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29525462962963" calcext:value-type="float">
            <text:p>0,00129525462962963000</text:p>
          </table:table-cell>
          <table:table-cell table:formula="of:=[.D363]-[.D36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31" office:value-type="float" office:value="11222" calcext:value-type="float">
            <text:p>11222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29884259259259" calcext:value-type="float">
            <text:p>0,00129884259259259000</text:p>
          </table:table-cell>
          <table:table-cell table:formula="of:=[.D364]-[.D36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31" office:value-type="float" office:value="11253" calcext:value-type="float">
            <text:p>11253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30243055555556" calcext:value-type="float">
            <text:p>0,00130243055555556000</text:p>
          </table:table-cell>
          <table:table-cell table:formula="of:=[.D365]-[.D36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31" office:value-type="float" office:value="11284" calcext:value-type="float">
            <text:p>11284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30601851851852" calcext:value-type="float">
            <text:p>0,00130601851851852000</text:p>
          </table:table-cell>
          <table:table-cell table:formula="of:=[.D366]-[.D36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31" office:value-type="float" office:value="11315" calcext:value-type="float">
            <text:p>1131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30960648148148" calcext:value-type="float">
            <text:p>0,00130960648148148000</text:p>
          </table:table-cell>
          <table:table-cell table:formula="of:=[.D367]-[.D36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31" office:value-type="float" office:value="11346" calcext:value-type="float">
            <text:p>11346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31319444444444" calcext:value-type="float">
            <text:p>0,00131319444444444000</text:p>
          </table:table-cell>
          <table:table-cell table:formula="of:=[.D368]-[.D36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31" office:value-type="float" office:value="11377" calcext:value-type="float">
            <text:p>11377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31678240740741" calcext:value-type="float">
            <text:p>0,00131678240740741000</text:p>
          </table:table-cell>
          <table:table-cell table:formula="of:=[.D369]-[.D36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31" office:value-type="float" office:value="11408" calcext:value-type="float">
            <text:p>11408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32037037037037" calcext:value-type="float">
            <text:p>0,00132037037037037000</text:p>
          </table:table-cell>
          <table:table-cell table:formula="of:=[.D370]-[.D36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31" office:value-type="float" office:value="11439" calcext:value-type="float">
            <text:p>11439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32395833333333" calcext:value-type="float">
            <text:p>0,00132395833333333000</text:p>
          </table:table-cell>
          <table:table-cell table:formula="of:=[.D371]-[.D37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31" office:value-type="float" office:value="11470" calcext:value-type="float">
            <text:p>1147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3275462962963" calcext:value-type="float">
            <text:p>0,00132754629629630000</text:p>
          </table:table-cell>
          <table:table-cell table:formula="of:=[.D372]-[.D37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31" office:value-type="float" office:value="11501" calcext:value-type="float">
            <text:p>11501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33113425925926" calcext:value-type="float">
            <text:p>0,00133113425925926000</text:p>
          </table:table-cell>
          <table:table-cell table:formula="of:=[.D373]-[.D37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31" office:value-type="float" office:value="11532" calcext:value-type="float">
            <text:p>11532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33472222222222" calcext:value-type="float">
            <text:p>0,00133472222222222000</text:p>
          </table:table-cell>
          <table:table-cell table:formula="of:=[.D374]-[.D37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31" office:value-type="float" office:value="11563" calcext:value-type="float">
            <text:p>11563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33831018518519" calcext:value-type="float">
            <text:p>0,00133831018518519000</text:p>
          </table:table-cell>
          <table:table-cell table:formula="of:=[.D375]-[.D37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31" office:value-type="float" office:value="11594" calcext:value-type="float">
            <text:p>11594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34189814814815" calcext:value-type="float">
            <text:p>0,00134189814814815000</text:p>
          </table:table-cell>
          <table:table-cell table:formula="of:=[.D376]-[.D37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31" office:value-type="float" office:value="11625" calcext:value-type="float">
            <text:p>1162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34548611111111" calcext:value-type="float">
            <text:p>0,00134548611111111000</text:p>
          </table:table-cell>
          <table:table-cell table:formula="of:=[.D377]-[.D37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31" office:value-type="float" office:value="11656" calcext:value-type="float">
            <text:p>11656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34907407407407" calcext:value-type="float">
            <text:p>0,00134907407407407000</text:p>
          </table:table-cell>
          <table:table-cell table:formula="of:=[.D378]-[.D37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31" office:value-type="float" office:value="11687" calcext:value-type="float">
            <text:p>11687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35266203703704" calcext:value-type="float">
            <text:p>0,00135266203703704000</text:p>
          </table:table-cell>
          <table:table-cell table:formula="of:=[.D379]-[.D37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31" office:value-type="float" office:value="11718" calcext:value-type="float">
            <text:p>11718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35625" calcext:value-type="float">
            <text:p>0,00135625000000000000</text:p>
          </table:table-cell>
          <table:table-cell table:formula="of:=[.D380]-[.D37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31" office:value-type="float" office:value="11749" calcext:value-type="float">
            <text:p>11749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35983796296296" calcext:value-type="float">
            <text:p>0,00135983796296296000</text:p>
          </table:table-cell>
          <table:table-cell table:formula="of:=[.D381]-[.D38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31" office:value-type="float" office:value="11780" calcext:value-type="float">
            <text:p>1178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36342592592593" calcext:value-type="float">
            <text:p>0,00136342592592593000</text:p>
          </table:table-cell>
          <table:table-cell table:formula="of:=[.D382]-[.D38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31" office:value-type="float" office:value="11811" calcext:value-type="float">
            <text:p>11811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36701388888889" calcext:value-type="float">
            <text:p>0,00136701388888889000</text:p>
          </table:table-cell>
          <table:table-cell table:formula="of:=[.D383]-[.D38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31" office:value-type="float" office:value="11842" calcext:value-type="float">
            <text:p>11842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37060185185185" calcext:value-type="float">
            <text:p>0,00137060185185185000</text:p>
          </table:table-cell>
          <table:table-cell table:formula="of:=[.D384]-[.D38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31" office:value-type="float" office:value="11873" calcext:value-type="float">
            <text:p>11873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37418981481481" calcext:value-type="float">
            <text:p>0,00137418981481481000</text:p>
          </table:table-cell>
          <table:table-cell table:formula="of:=[.D385]-[.D38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31" office:value-type="float" office:value="11904" calcext:value-type="float">
            <text:p>11904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37777777777778" calcext:value-type="float">
            <text:p>0,00137777777777778000</text:p>
          </table:table-cell>
          <table:table-cell table:formula="of:=[.D386]-[.D38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31" office:value-type="float" office:value="11935" calcext:value-type="float">
            <text:p>1193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38136574074074" calcext:value-type="float">
            <text:p>0,00138136574074074000</text:p>
          </table:table-cell>
          <table:table-cell table:formula="of:=[.D387]-[.D38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31" office:value-type="float" office:value="11966" calcext:value-type="float">
            <text:p>11966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3849537037037" calcext:value-type="float">
            <text:p>0,00138495370370370000</text:p>
          </table:table-cell>
          <table:table-cell table:formula="of:=[.D388]-[.D38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31" office:value-type="float" office:value="11997" calcext:value-type="float">
            <text:p>11997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38854166666667" calcext:value-type="float">
            <text:p>0,00138854166666667000</text:p>
          </table:table-cell>
          <table:table-cell table:formula="of:=[.D389]-[.D38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31" office:value-type="float" office:value="12028" calcext:value-type="float">
            <text:p>12028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39212962962963" calcext:value-type="float">
            <text:p>0,00139212962962963000</text:p>
          </table:table-cell>
          <table:table-cell table:formula="of:=[.D390]-[.D38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31" office:value-type="float" office:value="12059" calcext:value-type="float">
            <text:p>12059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39571759259259" calcext:value-type="float">
            <text:p>0,00139571759259259000</text:p>
          </table:table-cell>
          <table:table-cell table:formula="of:=[.D391]-[.D39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31" office:value-type="float" office:value="12090" calcext:value-type="float">
            <text:p>1209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39930555555556" calcext:value-type="float">
            <text:p>0,00139930555555556000</text:p>
          </table:table-cell>
          <table:table-cell table:formula="of:=[.D392]-[.D39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31" office:value-type="float" office:value="12121" calcext:value-type="float">
            <text:p>12121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40289351851852" calcext:value-type="float">
            <text:p>0,00140289351851852000</text:p>
          </table:table-cell>
          <table:table-cell table:formula="of:=[.D393]-[.D39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31" office:value-type="float" office:value="12152" calcext:value-type="float">
            <text:p>12152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40648148148148" calcext:value-type="float">
            <text:p>0,00140648148148148000</text:p>
          </table:table-cell>
          <table:table-cell table:formula="of:=[.D394]-[.D39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31" office:value-type="float" office:value="12183" calcext:value-type="float">
            <text:p>12183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41006944444444" calcext:value-type="float">
            <text:p>0,00141006944444444000</text:p>
          </table:table-cell>
          <table:table-cell table:formula="of:=[.D395]-[.D39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31" office:value-type="float" office:value="12214" calcext:value-type="float">
            <text:p>12214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41365740740741" calcext:value-type="float">
            <text:p>0,00141365740740741000</text:p>
          </table:table-cell>
          <table:table-cell table:formula="of:=[.D396]-[.D39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31" office:value-type="float" office:value="12245" calcext:value-type="float">
            <text:p>1224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41724537037037" calcext:value-type="float">
            <text:p>0,00141724537037037000</text:p>
          </table:table-cell>
          <table:table-cell table:formula="of:=[.D397]-[.D39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31" office:value-type="float" office:value="12276" calcext:value-type="float">
            <text:p>12276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42083333333333" calcext:value-type="float">
            <text:p>0,00142083333333333000</text:p>
          </table:table-cell>
          <table:table-cell table:formula="of:=[.D398]-[.D39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31" office:value-type="float" office:value="12307" calcext:value-type="float">
            <text:p>12307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4244212962963" calcext:value-type="float">
            <text:p>0,00142442129629630000</text:p>
          </table:table-cell>
          <table:table-cell table:formula="of:=[.D399]-[.D39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31" office:value-type="float" office:value="12338" calcext:value-type="float">
            <text:p>12338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42800925925926" calcext:value-type="float">
            <text:p>0,00142800925925926000</text:p>
          </table:table-cell>
          <table:table-cell table:formula="of:=[.D400]-[.D39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31" office:value-type="float" office:value="12369" calcext:value-type="float">
            <text:p>12369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43159722222222" calcext:value-type="float">
            <text:p>0,00143159722222222000</text:p>
          </table:table-cell>
          <table:table-cell table:formula="of:=[.D401]-[.D40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31" office:value-type="float" office:value="12400" calcext:value-type="float">
            <text:p>124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43518518518519" calcext:value-type="float">
            <text:p>0,00143518518518519000</text:p>
          </table:table-cell>
          <table:table-cell table:formula="of:=[.D402]-[.D40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31" office:value-type="float" office:value="12431" calcext:value-type="float">
            <text:p>12431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43877314814815" calcext:value-type="float">
            <text:p>0,00143877314814815000</text:p>
          </table:table-cell>
          <table:table-cell table:formula="of:=[.D403]-[.D40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31" office:value-type="float" office:value="12462" calcext:value-type="float">
            <text:p>12462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144236111111111" calcext:value-type="float">
            <text:p>0,00144236111111111000</text:p>
          </table:table-cell>
          <table:table-cell table:formula="of:=[.D404]-[.D40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31" office:value-type="float" office:value="12493" calcext:value-type="float">
            <text:p>12493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144594907407407" calcext:value-type="float">
            <text:p>0,00144594907407407000</text:p>
          </table:table-cell>
          <table:table-cell table:formula="of:=[.D405]-[.D40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31" office:value-type="float" office:value="12524" calcext:value-type="float">
            <text:p>12524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144953703703704" calcext:value-type="float">
            <text:p>0,00144953703703704000</text:p>
          </table:table-cell>
          <table:table-cell table:formula="of:=[.D406]-[.D40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31" office:value-type="float" office:value="12555" calcext:value-type="float">
            <text:p>1255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1453125" calcext:value-type="float">
            <text:p>0,00145312500000000000</text:p>
          </table:table-cell>
          <table:table-cell table:formula="of:=[.D407]-[.D40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31" office:value-type="float" office:value="12586" calcext:value-type="float">
            <text:p>12586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145671296296296" calcext:value-type="float">
            <text:p>0,00145671296296296000</text:p>
          </table:table-cell>
          <table:table-cell table:formula="of:=[.D408]-[.D40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31" office:value-type="float" office:value="12617" calcext:value-type="float">
            <text:p>12617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146030092592593" calcext:value-type="float">
            <text:p>0,00146030092592593000</text:p>
          </table:table-cell>
          <table:table-cell table:formula="of:=[.D409]-[.D40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31" office:value-type="float" office:value="12648" calcext:value-type="float">
            <text:p>12648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146388888888889" calcext:value-type="float">
            <text:p>0,00146388888888889000</text:p>
          </table:table-cell>
          <table:table-cell table:formula="of:=[.D410]-[.D40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31" office:value-type="float" office:value="12679" calcext:value-type="float">
            <text:p>12679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146747685185185" calcext:value-type="float">
            <text:p>0,00146747685185185000</text:p>
          </table:table-cell>
          <table:table-cell table:formula="of:=[.D411]-[.D41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31" office:value-type="float" office:value="12710" calcext:value-type="float">
            <text:p>1271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147106481481481" calcext:value-type="float">
            <text:p>0,00147106481481481000</text:p>
          </table:table-cell>
          <table:table-cell table:formula="of:=[.D412]-[.D41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31" office:value-type="float" office:value="12741" calcext:value-type="float">
            <text:p>12741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147465277777778" calcext:value-type="float">
            <text:p>0,00147465277777778000</text:p>
          </table:table-cell>
          <table:table-cell table:formula="of:=[.D413]-[.D41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31" office:value-type="float" office:value="12772" calcext:value-type="float">
            <text:p>12772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147824074074074" calcext:value-type="float">
            <text:p>0,00147824074074074000</text:p>
          </table:table-cell>
          <table:table-cell table:formula="of:=[.D414]-[.D41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31" office:value-type="float" office:value="12803" calcext:value-type="float">
            <text:p>12803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14818287037037" calcext:value-type="float">
            <text:p>0,00148182870370370000</text:p>
          </table:table-cell>
          <table:table-cell table:formula="of:=[.D415]-[.D41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31" office:value-type="float" office:value="12834" calcext:value-type="float">
            <text:p>12834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148541666666667" calcext:value-type="float">
            <text:p>0,00148541666666667000</text:p>
          </table:table-cell>
          <table:table-cell table:formula="of:=[.D416]-[.D41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31" office:value-type="float" office:value="12865" calcext:value-type="float">
            <text:p>1286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148900462962963" calcext:value-type="float">
            <text:p>0,00148900462962963000</text:p>
          </table:table-cell>
          <table:table-cell table:formula="of:=[.D417]-[.D41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31" office:value-type="float" office:value="12896" calcext:value-type="float">
            <text:p>12896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149259259259259" calcext:value-type="float">
            <text:p>0,00149259259259259000</text:p>
          </table:table-cell>
          <table:table-cell table:formula="of:=[.D418]-[.D41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31" office:value-type="float" office:value="12927" calcext:value-type="float">
            <text:p>12927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149618055555556" calcext:value-type="float">
            <text:p>0,00149618055555556000</text:p>
          </table:table-cell>
          <table:table-cell table:formula="of:=[.D419]-[.D41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31" office:value-type="float" office:value="12958" calcext:value-type="float">
            <text:p>12958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149976851851852" calcext:value-type="float">
            <text:p>0,00149976851851852000</text:p>
          </table:table-cell>
          <table:table-cell table:formula="of:=[.D420]-[.D41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31" office:value-type="float" office:value="12989" calcext:value-type="float">
            <text:p>12989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150335648148148" calcext:value-type="float">
            <text:p>0,00150335648148148000</text:p>
          </table:table-cell>
          <table:table-cell table:formula="of:=[.D421]-[.D42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31" office:value-type="float" office:value="13020" calcext:value-type="float">
            <text:p>1302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150694444444444" calcext:value-type="float">
            <text:p>0,00150694444444444000</text:p>
          </table:table-cell>
          <table:table-cell table:formula="of:=[.D422]-[.D42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31" office:value-type="float" office:value="13051" calcext:value-type="float">
            <text:p>13051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151053240740741" calcext:value-type="float">
            <text:p>0,00151053240740741000</text:p>
          </table:table-cell>
          <table:table-cell table:formula="of:=[.D423]-[.D42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31" office:value-type="float" office:value="13082" calcext:value-type="float">
            <text:p>13082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151412037037037" calcext:value-type="float">
            <text:p>0,00151412037037037000</text:p>
          </table:table-cell>
          <table:table-cell table:formula="of:=[.D424]-[.D42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31" office:value-type="float" office:value="13113" calcext:value-type="float">
            <text:p>13113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151770833333333" calcext:value-type="float">
            <text:p>0,00151770833333333000</text:p>
          </table:table-cell>
          <table:table-cell table:formula="of:=[.D425]-[.D42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31" office:value-type="float" office:value="13144" calcext:value-type="float">
            <text:p>13144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15212962962963" calcext:value-type="float">
            <text:p>0,00152129629629630000</text:p>
          </table:table-cell>
          <table:table-cell table:formula="of:=[.D426]-[.D42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31" office:value-type="float" office:value="13175" calcext:value-type="float">
            <text:p>1317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152488425925926" calcext:value-type="float">
            <text:p>0,00152488425925926000</text:p>
          </table:table-cell>
          <table:table-cell table:formula="of:=[.D427]-[.D42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31" office:value-type="float" office:value="13206" calcext:value-type="float">
            <text:p>13206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152847222222222" calcext:value-type="float">
            <text:p>0,00152847222222222000</text:p>
          </table:table-cell>
          <table:table-cell table:formula="of:=[.D428]-[.D42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31" office:value-type="float" office:value="13237" calcext:value-type="float">
            <text:p>13237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153206018518519" calcext:value-type="float">
            <text:p>0,00153206018518519000</text:p>
          </table:table-cell>
          <table:table-cell table:formula="of:=[.D429]-[.D42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31" office:value-type="float" office:value="13268" calcext:value-type="float">
            <text:p>13268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153564814814815" calcext:value-type="float">
            <text:p>0,00153564814814815000</text:p>
          </table:table-cell>
          <table:table-cell table:formula="of:=[.D430]-[.D42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31" office:value-type="float" office:value="13299" calcext:value-type="float">
            <text:p>13299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153923611111111" calcext:value-type="float">
            <text:p>0,00153923611111111000</text:p>
          </table:table-cell>
          <table:table-cell table:formula="of:=[.D431]-[.D43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31" office:value-type="float" office:value="13330" calcext:value-type="float">
            <text:p>1333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154282407407407" calcext:value-type="float">
            <text:p>0,00154282407407407000</text:p>
          </table:table-cell>
          <table:table-cell table:formula="of:=[.D432]-[.D43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31" office:value-type="float" office:value="13361" calcext:value-type="float">
            <text:p>13361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154641203703704" calcext:value-type="float">
            <text:p>0,00154641203703704000</text:p>
          </table:table-cell>
          <table:table-cell table:formula="of:=[.D433]-[.D43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31" office:value-type="float" office:value="13392" calcext:value-type="float">
            <text:p>13392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155" calcext:value-type="float">
            <text:p>0,00155000000000000000</text:p>
          </table:table-cell>
          <table:table-cell table:formula="of:=[.D434]-[.D43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31" office:value-type="float" office:value="13423" calcext:value-type="float">
            <text:p>13423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155358796296296" calcext:value-type="float">
            <text:p>0,00155358796296296000</text:p>
          </table:table-cell>
          <table:table-cell table:formula="of:=[.D435]-[.D43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31" office:value-type="float" office:value="13454" calcext:value-type="float">
            <text:p>13454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155717592592593" calcext:value-type="float">
            <text:p>0,00155717592592593000</text:p>
          </table:table-cell>
          <table:table-cell table:formula="of:=[.D436]-[.D43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31" office:value-type="float" office:value="13485" calcext:value-type="float">
            <text:p>1348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156076388888889" calcext:value-type="float">
            <text:p>0,00156076388888889000</text:p>
          </table:table-cell>
          <table:table-cell table:formula="of:=[.D437]-[.D43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31" office:value-type="float" office:value="13516" calcext:value-type="float">
            <text:p>13516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156435185185185" calcext:value-type="float">
            <text:p>0,00156435185185185000</text:p>
          </table:table-cell>
          <table:table-cell table:formula="of:=[.D438]-[.D43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31" office:value-type="float" office:value="13547" calcext:value-type="float">
            <text:p>13547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156793981481481" calcext:value-type="float">
            <text:p>0,00156793981481481000</text:p>
          </table:table-cell>
          <table:table-cell table:formula="of:=[.D439]-[.D43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31" office:value-type="float" office:value="13578" calcext:value-type="float">
            <text:p>13578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157152777777778" calcext:value-type="float">
            <text:p>0,00157152777777778000</text:p>
          </table:table-cell>
          <table:table-cell table:formula="of:=[.D440]-[.D43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31" office:value-type="float" office:value="13609" calcext:value-type="float">
            <text:p>13609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157511574074074" calcext:value-type="float">
            <text:p>0,00157511574074074000</text:p>
          </table:table-cell>
          <table:table-cell table:formula="of:=[.D441]-[.D44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31" office:value-type="float" office:value="13640" calcext:value-type="float">
            <text:p>1364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15787037037037" calcext:value-type="float">
            <text:p>0,00157870370370370000</text:p>
          </table:table-cell>
          <table:table-cell table:formula="of:=[.D442]-[.D44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31" office:value-type="float" office:value="13671" calcext:value-type="float">
            <text:p>13671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158229166666667" calcext:value-type="float">
            <text:p>0,00158229166666667000</text:p>
          </table:table-cell>
          <table:table-cell table:formula="of:=[.D443]-[.D44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31" office:value-type="float" office:value="13702" calcext:value-type="float">
            <text:p>13702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158587962962963" calcext:value-type="float">
            <text:p>0,00158587962962963000</text:p>
          </table:table-cell>
          <table:table-cell table:formula="of:=[.D444]-[.D44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31" office:value-type="float" office:value="13733" calcext:value-type="float">
            <text:p>13733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158946759259259" calcext:value-type="float">
            <text:p>0,00158946759259259000</text:p>
          </table:table-cell>
          <table:table-cell table:formula="of:=[.D445]-[.D44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31" office:value-type="float" office:value="13764" calcext:value-type="float">
            <text:p>13764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159305555555556" calcext:value-type="float">
            <text:p>0,00159305555555556000</text:p>
          </table:table-cell>
          <table:table-cell table:formula="of:=[.D446]-[.D44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31" office:value-type="float" office:value="13795" calcext:value-type="float">
            <text:p>1379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159664351851852" calcext:value-type="float">
            <text:p>0,00159664351851852000</text:p>
          </table:table-cell>
          <table:table-cell table:formula="of:=[.D447]-[.D44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31" office:value-type="float" office:value="13826" calcext:value-type="float">
            <text:p>13826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160023148148148" calcext:value-type="float">
            <text:p>0,00160023148148148000</text:p>
          </table:table-cell>
          <table:table-cell table:formula="of:=[.D448]-[.D44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31" office:value-type="float" office:value="13857" calcext:value-type="float">
            <text:p>13857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160381944444444" calcext:value-type="float">
            <text:p>0,00160381944444444000</text:p>
          </table:table-cell>
          <table:table-cell table:formula="of:=[.D449]-[.D44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31" office:value-type="float" office:value="13888" calcext:value-type="float">
            <text:p>13888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160740740740741" calcext:value-type="float">
            <text:p>0,00160740740740741000</text:p>
          </table:table-cell>
          <table:table-cell table:formula="of:=[.D450]-[.D44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31" office:value-type="float" office:value="13919" calcext:value-type="float">
            <text:p>13919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161099537037037" calcext:value-type="float">
            <text:p>0,00161099537037037000</text:p>
          </table:table-cell>
          <table:table-cell table:formula="of:=[.D451]-[.D45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31" office:value-type="float" office:value="13950" calcext:value-type="float">
            <text:p>139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161458333333333" calcext:value-type="float">
            <text:p>0,00161458333333333000</text:p>
          </table:table-cell>
          <table:table-cell table:formula="of:=[.D452]-[.D45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31" office:value-type="float" office:value="13981" calcext:value-type="float">
            <text:p>13981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16181712962963" calcext:value-type="float">
            <text:p>0,00161817129629630000</text:p>
          </table:table-cell>
          <table:table-cell table:formula="of:=[.D453]-[.D45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31" office:value-type="float" office:value="14012" calcext:value-type="float">
            <text:p>14012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162175925925926" calcext:value-type="float">
            <text:p>0,00162175925925926000</text:p>
          </table:table-cell>
          <table:table-cell table:formula="of:=[.D454]-[.D45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31" office:value-type="float" office:value="14043" calcext:value-type="float">
            <text:p>14043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162534722222222" calcext:value-type="float">
            <text:p>0,00162534722222222000</text:p>
          </table:table-cell>
          <table:table-cell table:formula="of:=[.D455]-[.D45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31" office:value-type="float" office:value="14074" calcext:value-type="float">
            <text:p>14074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162893518518519" calcext:value-type="float">
            <text:p>0,00162893518518518000</text:p>
          </table:table-cell>
          <table:table-cell table:formula="of:=[.D456]-[.D45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31" office:value-type="float" office:value="14105" calcext:value-type="float">
            <text:p>1410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163252314814815" calcext:value-type="float">
            <text:p>0,00163252314814815000</text:p>
          </table:table-cell>
          <table:table-cell table:formula="of:=[.D457]-[.D45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31" office:value-type="float" office:value="14136" calcext:value-type="float">
            <text:p>14136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163611111111111" calcext:value-type="float">
            <text:p>0,00163611111111111000</text:p>
          </table:table-cell>
          <table:table-cell table:formula="of:=[.D458]-[.D45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31" office:value-type="float" office:value="14167" calcext:value-type="float">
            <text:p>14167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163969907407407" calcext:value-type="float">
            <text:p>0,00163969907407407000</text:p>
          </table:table-cell>
          <table:table-cell table:formula="of:=[.D459]-[.D45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31" office:value-type="float" office:value="14198" calcext:value-type="float">
            <text:p>14198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164328703703704" calcext:value-type="float">
            <text:p>0,00164328703703704000</text:p>
          </table:table-cell>
          <table:table-cell table:formula="of:=[.D460]-[.D45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31" office:value-type="float" office:value="14229" calcext:value-type="float">
            <text:p>14229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1646875" calcext:value-type="float">
            <text:p>0,00164687500000000000</text:p>
          </table:table-cell>
          <table:table-cell table:formula="of:=[.D461]-[.D46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31" office:value-type="float" office:value="14260" calcext:value-type="float">
            <text:p>1426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165046296296296" calcext:value-type="float">
            <text:p>0,00165046296296296000</text:p>
          </table:table-cell>
          <table:table-cell table:formula="of:=[.D462]-[.D46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31" office:value-type="float" office:value="14291" calcext:value-type="float">
            <text:p>14291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165405092592593" calcext:value-type="float">
            <text:p>0,00165405092592593000</text:p>
          </table:table-cell>
          <table:table-cell table:formula="of:=[.D463]-[.D46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31" office:value-type="float" office:value="14322" calcext:value-type="float">
            <text:p>14322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165763888888889" calcext:value-type="float">
            <text:p>0,00165763888888889000</text:p>
          </table:table-cell>
          <table:table-cell table:formula="of:=[.D464]-[.D46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31" office:value-type="float" office:value="14353" calcext:value-type="float">
            <text:p>14353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166122685185185" calcext:value-type="float">
            <text:p>0,00166122685185185000</text:p>
          </table:table-cell>
          <table:table-cell table:formula="of:=[.D465]-[.D46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31" office:value-type="float" office:value="14384" calcext:value-type="float">
            <text:p>14384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166481481481481" calcext:value-type="float">
            <text:p>0,00166481481481481000</text:p>
          </table:table-cell>
          <table:table-cell table:formula="of:=[.D466]-[.D46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31" office:value-type="float" office:value="14415" calcext:value-type="float">
            <text:p>1441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166840277777778" calcext:value-type="float">
            <text:p>0,00166840277777778000</text:p>
          </table:table-cell>
          <table:table-cell table:formula="of:=[.D467]-[.D46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31" office:value-type="float" office:value="14446" calcext:value-type="float">
            <text:p>14446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167199074074074" calcext:value-type="float">
            <text:p>0,00167199074074074000</text:p>
          </table:table-cell>
          <table:table-cell table:formula="of:=[.D468]-[.D46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31" office:value-type="float" office:value="14477" calcext:value-type="float">
            <text:p>14477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16755787037037" calcext:value-type="float">
            <text:p>0,00167557870370370000</text:p>
          </table:table-cell>
          <table:table-cell table:formula="of:=[.D469]-[.D46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31" office:value-type="float" office:value="14508" calcext:value-type="float">
            <text:p>14508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167916666666667" calcext:value-type="float">
            <text:p>0,00167916666666667000</text:p>
          </table:table-cell>
          <table:table-cell table:formula="of:=[.D470]-[.D46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31" office:value-type="float" office:value="14539" calcext:value-type="float">
            <text:p>14539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168275462962963" calcext:value-type="float">
            <text:p>0,00168275462962963000</text:p>
          </table:table-cell>
          <table:table-cell table:formula="of:=[.D471]-[.D47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31" office:value-type="float" office:value="14570" calcext:value-type="float">
            <text:p>1457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168634259259259" calcext:value-type="float">
            <text:p>0,00168634259259259000</text:p>
          </table:table-cell>
          <table:table-cell table:formula="of:=[.D472]-[.D47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31" office:value-type="float" office:value="14601" calcext:value-type="float">
            <text:p>14601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168993055555556" calcext:value-type="float">
            <text:p>0,00168993055555556000</text:p>
          </table:table-cell>
          <table:table-cell table:formula="of:=[.D473]-[.D47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31" office:value-type="float" office:value="14632" calcext:value-type="float">
            <text:p>14632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169351851851852" calcext:value-type="float">
            <text:p>0,00169351851851852000</text:p>
          </table:table-cell>
          <table:table-cell table:formula="of:=[.D474]-[.D47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31" office:value-type="float" office:value="14663" calcext:value-type="float">
            <text:p>14663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169710648148148" calcext:value-type="float">
            <text:p>0,00169710648148148000</text:p>
          </table:table-cell>
          <table:table-cell table:formula="of:=[.D475]-[.D47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31" office:value-type="float" office:value="14694" calcext:value-type="float">
            <text:p>14694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170069444444444" calcext:value-type="float">
            <text:p>0,00170069444444444000</text:p>
          </table:table-cell>
          <table:table-cell table:formula="of:=[.D476]-[.D47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31" office:value-type="float" office:value="14725" calcext:value-type="float">
            <text:p>1472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170428240740741" calcext:value-type="float">
            <text:p>0,00170428240740741000</text:p>
          </table:table-cell>
          <table:table-cell table:formula="of:=[.D477]-[.D47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31" office:value-type="float" office:value="14756" calcext:value-type="float">
            <text:p>14756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170787037037037" calcext:value-type="float">
            <text:p>0,00170787037037037000</text:p>
          </table:table-cell>
          <table:table-cell table:formula="of:=[.D478]-[.D47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31" office:value-type="float" office:value="14787" calcext:value-type="float">
            <text:p>14787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171145833333333" calcext:value-type="float">
            <text:p>0,00171145833333333000</text:p>
          </table:table-cell>
          <table:table-cell table:formula="of:=[.D479]-[.D47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31" office:value-type="float" office:value="14818" calcext:value-type="float">
            <text:p>14818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17150462962963" calcext:value-type="float">
            <text:p>0,00171504629629630000</text:p>
          </table:table-cell>
          <table:table-cell table:formula="of:=[.D480]-[.D47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31" office:value-type="float" office:value="14849" calcext:value-type="float">
            <text:p>14849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171863425925926" calcext:value-type="float">
            <text:p>0,00171863425925926000</text:p>
          </table:table-cell>
          <table:table-cell table:formula="of:=[.D481]-[.D48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31" office:value-type="float" office:value="14880" calcext:value-type="float">
            <text:p>1488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172222222222222" calcext:value-type="float">
            <text:p>0,00172222222222222000</text:p>
          </table:table-cell>
          <table:table-cell table:formula="of:=[.D482]-[.D48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31" office:value-type="float" office:value="14911" calcext:value-type="float">
            <text:p>14911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172581018518519" calcext:value-type="float">
            <text:p>0,00172581018518519000</text:p>
          </table:table-cell>
          <table:table-cell table:formula="of:=[.D483]-[.D48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31" office:value-type="float" office:value="14942" calcext:value-type="float">
            <text:p>14942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172939814814815" calcext:value-type="float">
            <text:p>0,00172939814814815000</text:p>
          </table:table-cell>
          <table:table-cell table:formula="of:=[.D484]-[.D48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31" office:value-type="float" office:value="14973" calcext:value-type="float">
            <text:p>14973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173298611111111" calcext:value-type="float">
            <text:p>0,00173298611111111000</text:p>
          </table:table-cell>
          <table:table-cell table:formula="of:=[.D485]-[.D48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31" office:value-type="float" office:value="15004" calcext:value-type="float">
            <text:p>15004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173657407407407" calcext:value-type="float">
            <text:p>0,00173657407407407000</text:p>
          </table:table-cell>
          <table:table-cell table:formula="of:=[.D486]-[.D48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31" office:value-type="float" office:value="15035" calcext:value-type="float">
            <text:p>1503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174016203703704" calcext:value-type="float">
            <text:p>0,00174016203703704000</text:p>
          </table:table-cell>
          <table:table-cell table:formula="of:=[.D487]-[.D48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31" office:value-type="float" office:value="15066" calcext:value-type="float">
            <text:p>15066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174375" calcext:value-type="float">
            <text:p>0,00174375000000000000</text:p>
          </table:table-cell>
          <table:table-cell table:formula="of:=[.D488]-[.D48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31" office:value-type="float" office:value="15097" calcext:value-type="float">
            <text:p>15097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174733796296296" calcext:value-type="float">
            <text:p>0,00174733796296296000</text:p>
          </table:table-cell>
          <table:table-cell table:formula="of:=[.D489]-[.D48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31" office:value-type="float" office:value="15128" calcext:value-type="float">
            <text:p>15128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175092592592593" calcext:value-type="float">
            <text:p>0,00175092592592593000</text:p>
          </table:table-cell>
          <table:table-cell table:formula="of:=[.D490]-[.D48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31" office:value-type="float" office:value="15159" calcext:value-type="float">
            <text:p>15159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175451388888889" calcext:value-type="float">
            <text:p>0,00175451388888889000</text:p>
          </table:table-cell>
          <table:table-cell table:formula="of:=[.D491]-[.D49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31" office:value-type="float" office:value="15190" calcext:value-type="float">
            <text:p>1519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175810185185185" calcext:value-type="float">
            <text:p>0,00175810185185185000</text:p>
          </table:table-cell>
          <table:table-cell table:formula="of:=[.D492]-[.D49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31" office:value-type="float" office:value="15221" calcext:value-type="float">
            <text:p>15221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176168981481481" calcext:value-type="float">
            <text:p>0,00176168981481482000</text:p>
          </table:table-cell>
          <table:table-cell table:formula="of:=[.D493]-[.D49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31" office:value-type="float" office:value="15252" calcext:value-type="float">
            <text:p>15252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176527777777778" calcext:value-type="float">
            <text:p>0,00176527777777778000</text:p>
          </table:table-cell>
          <table:table-cell table:formula="of:=[.D494]-[.D49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31" office:value-type="float" office:value="15283" calcext:value-type="float">
            <text:p>15283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176886574074074" calcext:value-type="float">
            <text:p>0,00176886574074074000</text:p>
          </table:table-cell>
          <table:table-cell table:formula="of:=[.D495]-[.D49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31" office:value-type="float" office:value="15314" calcext:value-type="float">
            <text:p>15314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17724537037037" calcext:value-type="float">
            <text:p>0,00177245370370370000</text:p>
          </table:table-cell>
          <table:table-cell table:formula="of:=[.D496]-[.D49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31" office:value-type="float" office:value="15345" calcext:value-type="float">
            <text:p>15345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177604166666667" calcext:value-type="float">
            <text:p>0,00177604166666667000</text:p>
          </table:table-cell>
          <table:table-cell table:formula="of:=[.D497]-[.D49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31" office:value-type="float" office:value="15376" calcext:value-type="float">
            <text:p>15376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177962962962963" calcext:value-type="float">
            <text:p>0,00177962962962963000</text:p>
          </table:table-cell>
          <table:table-cell table:formula="of:=[.D498]-[.D49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31" office:value-type="float" office:value="15407" calcext:value-type="float">
            <text:p>15407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178321759259259" calcext:value-type="float">
            <text:p>0,00178321759259259000</text:p>
          </table:table-cell>
          <table:table-cell table:formula="of:=[.D499]-[.D49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31" office:value-type="float" office:value="15438" calcext:value-type="float">
            <text:p>15438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178680555555556" calcext:value-type="float">
            <text:p>0,00178680555555556000</text:p>
          </table:table-cell>
          <table:table-cell table:formula="of:=[.D500]-[.D49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31" office:value-type="float" office:value="15469" calcext:value-type="float">
            <text:p>15469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179039351851852" calcext:value-type="float">
            <text:p>0,00179039351851852000</text:p>
          </table:table-cell>
          <table:table-cell table:formula="of:=[.D501]-[.D50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31" office:value-type="float" office:value="15500" calcext:value-type="float">
            <text:p>155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179398148148148" calcext:value-type="float">
            <text:p>0,00179398148148148000</text:p>
          </table:table-cell>
          <table:table-cell table:formula="of:=[.D502]-[.D50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31" office:value-type="float" office:value="15531" calcext:value-type="float">
            <text:p>15531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179756944444444" calcext:value-type="float">
            <text:p>0,00179756944444444000</text:p>
          </table:table-cell>
          <table:table-cell table:formula="of:=[.D503]-[.D50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31" office:value-type="float" office:value="15562" calcext:value-type="float">
            <text:p>15562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180115740740741" calcext:value-type="float">
            <text:p>0,00180115740740741000</text:p>
          </table:table-cell>
          <table:table-cell table:formula="of:=[.D504]-[.D50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31" office:value-type="float" office:value="15593" calcext:value-type="float">
            <text:p>15593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180474537037037" calcext:value-type="float">
            <text:p>0,00180474537037037000</text:p>
          </table:table-cell>
          <table:table-cell table:formula="of:=[.D505]-[.D50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31" office:value-type="float" office:value="15624" calcext:value-type="float">
            <text:p>15624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180833333333333" calcext:value-type="float">
            <text:p>0,00180833333333333000</text:p>
          </table:table-cell>
          <table:table-cell table:formula="of:=[.D506]-[.D50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31" office:value-type="float" office:value="15655" calcext:value-type="float">
            <text:p>15655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18119212962963" calcext:value-type="float">
            <text:p>0,00181192129629630000</text:p>
          </table:table-cell>
          <table:table-cell table:formula="of:=[.D507]-[.D50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31" office:value-type="float" office:value="15686" calcext:value-type="float">
            <text:p>15686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181550925925926" calcext:value-type="float">
            <text:p>0,00181550925925926000</text:p>
          </table:table-cell>
          <table:table-cell table:formula="of:=[.D508]-[.D50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31" office:value-type="float" office:value="15717" calcext:value-type="float">
            <text:p>15717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181909722222222" calcext:value-type="float">
            <text:p>0,00181909722222222000</text:p>
          </table:table-cell>
          <table:table-cell table:formula="of:=[.D509]-[.D50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31" office:value-type="float" office:value="15748" calcext:value-type="float">
            <text:p>15748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182268518518519" calcext:value-type="float">
            <text:p>0,00182268518518519000</text:p>
          </table:table-cell>
          <table:table-cell table:formula="of:=[.D510]-[.D50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31" office:value-type="float" office:value="15779" calcext:value-type="float">
            <text:p>15779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182627314814815" calcext:value-type="float">
            <text:p>0,00182627314814815000</text:p>
          </table:table-cell>
          <table:table-cell table:formula="of:=[.D511]-[.D51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31" office:value-type="float" office:value="15810" calcext:value-type="float">
            <text:p>1581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182986111111111" calcext:value-type="float">
            <text:p>0,00182986111111111000</text:p>
          </table:table-cell>
          <table:table-cell table:formula="of:=[.D512]-[.D51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31" office:value-type="float" office:value="15841" calcext:value-type="float">
            <text:p>15841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183344907407407" calcext:value-type="float">
            <text:p>0,00183344907407407000</text:p>
          </table:table-cell>
          <table:table-cell table:formula="of:=[.D513]-[.D51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31" office:value-type="float" office:value="15872" calcext:value-type="float">
            <text:p>15872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183703703703704" calcext:value-type="float">
            <text:p>0,00183703703703704000</text:p>
          </table:table-cell>
          <table:table-cell table:formula="of:=[.D514]-[.D51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31" office:value-type="float" office:value="15903" calcext:value-type="float">
            <text:p>15903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1840625" calcext:value-type="float">
            <text:p>0,00184062500000000000</text:p>
          </table:table-cell>
          <table:table-cell table:formula="of:=[.D515]-[.D51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31" office:value-type="float" office:value="15934" calcext:value-type="float">
            <text:p>15934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184421296296296" calcext:value-type="float">
            <text:p>0,00184421296296296000</text:p>
          </table:table-cell>
          <table:table-cell table:formula="of:=[.D516]-[.D51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31" office:value-type="float" office:value="15965" calcext:value-type="float">
            <text:p>15965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184780092592593" calcext:value-type="float">
            <text:p>0,00184780092592593000</text:p>
          </table:table-cell>
          <table:table-cell table:formula="of:=[.D517]-[.D51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31" office:value-type="float" office:value="15996" calcext:value-type="float">
            <text:p>15996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185138888888889" calcext:value-type="float">
            <text:p>0,00185138888888889000</text:p>
          </table:table-cell>
          <table:table-cell table:formula="of:=[.D518]-[.D51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31" office:value-type="float" office:value="16027" calcext:value-type="float">
            <text:p>16027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185497685185185" calcext:value-type="float">
            <text:p>0,00185497685185185000</text:p>
          </table:table-cell>
          <table:table-cell table:formula="of:=[.D519]-[.D51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31" office:value-type="float" office:value="16058" calcext:value-type="float">
            <text:p>16058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185856481481481" calcext:value-type="float">
            <text:p>0,00185856481481481000</text:p>
          </table:table-cell>
          <table:table-cell table:formula="of:=[.D520]-[.D51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31" office:value-type="float" office:value="16089" calcext:value-type="float">
            <text:p>16089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186215277777778" calcext:value-type="float">
            <text:p>0,00186215277777778000</text:p>
          </table:table-cell>
          <table:table-cell table:formula="of:=[.D521]-[.D52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31" office:value-type="float" office:value="16120" calcext:value-type="float">
            <text:p>1612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186574074074074" calcext:value-type="float">
            <text:p>0,00186574074074074000</text:p>
          </table:table-cell>
          <table:table-cell table:formula="of:=[.D522]-[.D52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31" office:value-type="float" office:value="16151" calcext:value-type="float">
            <text:p>16151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18693287037037" calcext:value-type="float">
            <text:p>0,00186932870370370000</text:p>
          </table:table-cell>
          <table:table-cell table:formula="of:=[.D523]-[.D52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31" office:value-type="float" office:value="16182" calcext:value-type="float">
            <text:p>16182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187291666666667" calcext:value-type="float">
            <text:p>0,00187291666666667000</text:p>
          </table:table-cell>
          <table:table-cell table:formula="of:=[.D524]-[.D52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31" office:value-type="float" office:value="16213" calcext:value-type="float">
            <text:p>16213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187650462962963" calcext:value-type="float">
            <text:p>0,00187650462962963000</text:p>
          </table:table-cell>
          <table:table-cell table:formula="of:=[.D525]-[.D52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31" office:value-type="float" office:value="16244" calcext:value-type="float">
            <text:p>16244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188009259259259" calcext:value-type="float">
            <text:p>0,00188009259259259000</text:p>
          </table:table-cell>
          <table:table-cell table:formula="of:=[.D526]-[.D52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31" office:value-type="float" office:value="16275" calcext:value-type="float">
            <text:p>16275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188368055555556" calcext:value-type="float">
            <text:p>0,00188368055555556000</text:p>
          </table:table-cell>
          <table:table-cell table:formula="of:=[.D527]-[.D52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31" office:value-type="float" office:value="16306" calcext:value-type="float">
            <text:p>16306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188726851851852" calcext:value-type="float">
            <text:p>0,00188726851851852000</text:p>
          </table:table-cell>
          <table:table-cell table:formula="of:=[.D528]-[.D52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31" office:value-type="float" office:value="16337" calcext:value-type="float">
            <text:p>16337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189085648148148" calcext:value-type="float">
            <text:p>0,00189085648148148000</text:p>
          </table:table-cell>
          <table:table-cell table:formula="of:=[.D529]-[.D52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31" office:value-type="float" office:value="16368" calcext:value-type="float">
            <text:p>16368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189444444444444" calcext:value-type="float">
            <text:p>0,00189444444444444000</text:p>
          </table:table-cell>
          <table:table-cell table:formula="of:=[.D530]-[.D52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31" office:value-type="float" office:value="16399" calcext:value-type="float">
            <text:p>16399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189803240740741" calcext:value-type="float">
            <text:p>0,00189803240740741000</text:p>
          </table:table-cell>
          <table:table-cell table:formula="of:=[.D531]-[.D53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31" office:value-type="float" office:value="16430" calcext:value-type="float">
            <text:p>1643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190162037037037" calcext:value-type="float">
            <text:p>0,00190162037037037000</text:p>
          </table:table-cell>
          <table:table-cell table:formula="of:=[.D532]-[.D53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31" office:value-type="float" office:value="16461" calcext:value-type="float">
            <text:p>16461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190520833333333" calcext:value-type="float">
            <text:p>0,00190520833333333000</text:p>
          </table:table-cell>
          <table:table-cell table:formula="of:=[.D533]-[.D53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31" office:value-type="float" office:value="16492" calcext:value-type="float">
            <text:p>16492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19087962962963" calcext:value-type="float">
            <text:p>0,00190879629629630000</text:p>
          </table:table-cell>
          <table:table-cell table:formula="of:=[.D534]-[.D53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31" office:value-type="float" office:value="16523" calcext:value-type="float">
            <text:p>16523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191238425925926" calcext:value-type="float">
            <text:p>0,00191238425925926000</text:p>
          </table:table-cell>
          <table:table-cell table:formula="of:=[.D535]-[.D53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31" office:value-type="float" office:value="16554" calcext:value-type="float">
            <text:p>16554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191597222222222" calcext:value-type="float">
            <text:p>0,00191597222222222000</text:p>
          </table:table-cell>
          <table:table-cell table:formula="of:=[.D536]-[.D53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31" office:value-type="float" office:value="16585" calcext:value-type="float">
            <text:p>16585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191956018518519" calcext:value-type="float">
            <text:p>0,00191956018518519000</text:p>
          </table:table-cell>
          <table:table-cell table:formula="of:=[.D537]-[.D53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31" office:value-type="float" office:value="16616" calcext:value-type="float">
            <text:p>16616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192314814814815" calcext:value-type="float">
            <text:p>0,00192314814814815000</text:p>
          </table:table-cell>
          <table:table-cell table:formula="of:=[.D538]-[.D537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31" office:value-type="float" office:value="16647" calcext:value-type="float">
            <text:p>16647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192673611111111" calcext:value-type="float">
            <text:p>0,00192673611111111000</text:p>
          </table:table-cell>
          <table:table-cell table:formula="of:=[.D539]-[.D538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31" office:value-type="float" office:value="16678" calcext:value-type="float">
            <text:p>16678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193032407407407" calcext:value-type="float">
            <text:p>0,00193032407407407000</text:p>
          </table:table-cell>
          <table:table-cell table:formula="of:=[.D540]-[.D539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31" office:value-type="float" office:value="16709" calcext:value-type="float">
            <text:p>16709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193391203703704" calcext:value-type="float">
            <text:p>0,00193391203703704000</text:p>
          </table:table-cell>
          <table:table-cell table:formula="of:=[.D541]-[.D54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31" office:value-type="float" office:value="16740" calcext:value-type="float">
            <text:p>1674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19375" calcext:value-type="float">
            <text:p>0,00193750000000000000</text:p>
          </table:table-cell>
          <table:table-cell table:formula="of:=[.D542]-[.D54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31" office:value-type="float" office:value="16771" calcext:value-type="float">
            <text:p>16771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194108796296296" calcext:value-type="float">
            <text:p>0,00194108796296296000</text:p>
          </table:table-cell>
          <table:table-cell table:formula="of:=[.D543]-[.D542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31" office:value-type="float" office:value="16802" calcext:value-type="float">
            <text:p>16802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194467592592593" calcext:value-type="float">
            <text:p>0,00194467592592593000</text:p>
          </table:table-cell>
          <table:table-cell table:formula="of:=[.D544]-[.D543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31" office:value-type="float" office:value="16833" calcext:value-type="float">
            <text:p>16833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194826388888889" calcext:value-type="float">
            <text:p>0,00194826388888889000</text:p>
          </table:table-cell>
          <table:table-cell table:formula="of:=[.D545]-[.D544]" office:value-type="float" office:value="0.00000358796296296283" calcext:value-type="float">
            <text:p>0,0000035879629629628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31" office:value-type="float" office:value="16864" calcext:value-type="float">
            <text:p>16864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195185185185185" calcext:value-type="float">
            <text:p>0,00195185185185185000</text:p>
          </table:table-cell>
          <table:table-cell table:formula="of:=[.D546]-[.D54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31" office:value-type="float" office:value="16895" calcext:value-type="float">
            <text:p>16895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195543981481482" calcext:value-type="float">
            <text:p>0,00195543981481482000</text:p>
          </table:table-cell>
          <table:table-cell table:formula="of:=[.D547]-[.D54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31" office:value-type="float" office:value="16926" calcext:value-type="float">
            <text:p>16926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195902777777778" calcext:value-type="float">
            <text:p>0,00195902777777778000</text:p>
          </table:table-cell>
          <table:table-cell table:formula="of:=[.D548]-[.D54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31" office:value-type="float" office:value="16957" calcext:value-type="float">
            <text:p>16957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196261574074074" calcext:value-type="float">
            <text:p>0,00196261574074074000</text:p>
          </table:table-cell>
          <table:table-cell table:formula="of:=[.D549]-[.D54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31" office:value-type="float" office:value="16988" calcext:value-type="float">
            <text:p>16988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19662037037037" calcext:value-type="float">
            <text:p>0,00196620370370370000</text:p>
          </table:table-cell>
          <table:table-cell table:formula="of:=[.D550]-[.D54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31" office:value-type="float" office:value="17019" calcext:value-type="float">
            <text:p>17019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196979166666667" calcext:value-type="float">
            <text:p>0,00196979166666667000</text:p>
          </table:table-cell>
          <table:table-cell table:formula="of:=[.D551]-[.D55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31" office:value-type="float" office:value="17050" calcext:value-type="float">
            <text:p>1705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197337962962963" calcext:value-type="float">
            <text:p>0,00197337962962963000</text:p>
          </table:table-cell>
          <table:table-cell table:formula="of:=[.D552]-[.D55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31" office:value-type="float" office:value="17081" calcext:value-type="float">
            <text:p>17081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197696759259259" calcext:value-type="float">
            <text:p>0,00197696759259259000</text:p>
          </table:table-cell>
          <table:table-cell table:formula="of:=[.D553]-[.D55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31" office:value-type="float" office:value="17112" calcext:value-type="float">
            <text:p>17112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198055555555556" calcext:value-type="float">
            <text:p>0,00198055555555556000</text:p>
          </table:table-cell>
          <table:table-cell table:formula="of:=[.D554]-[.D55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31" office:value-type="float" office:value="17143" calcext:value-type="float">
            <text:p>17143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198414351851852" calcext:value-type="float">
            <text:p>0,00198414351851852000</text:p>
          </table:table-cell>
          <table:table-cell table:formula="of:=[.D555]-[.D55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31" office:value-type="float" office:value="17174" calcext:value-type="float">
            <text:p>17174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198773148148148" calcext:value-type="float">
            <text:p>0,00198773148148148000</text:p>
          </table:table-cell>
          <table:table-cell table:formula="of:=[.D556]-[.D55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31" office:value-type="float" office:value="17205" calcext:value-type="float">
            <text:p>17205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199131944444444" calcext:value-type="float">
            <text:p>0,00199131944444444000</text:p>
          </table:table-cell>
          <table:table-cell table:formula="of:=[.D557]-[.D55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31" office:value-type="float" office:value="17236" calcext:value-type="float">
            <text:p>17236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199490740740741" calcext:value-type="float">
            <text:p>0,00199490740740741000</text:p>
          </table:table-cell>
          <table:table-cell table:formula="of:=[.D558]-[.D55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31" office:value-type="float" office:value="17267" calcext:value-type="float">
            <text:p>17267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199849537037037" calcext:value-type="float">
            <text:p>0,00199849537037037000</text:p>
          </table:table-cell>
          <table:table-cell table:formula="of:=[.D559]-[.D55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31" office:value-type="float" office:value="17298" calcext:value-type="float">
            <text:p>17298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200208333333333" calcext:value-type="float">
            <text:p>0,00200208333333333000</text:p>
          </table:table-cell>
          <table:table-cell table:formula="of:=[.D560]-[.D55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31" office:value-type="float" office:value="17329" calcext:value-type="float">
            <text:p>17329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20056712962963" calcext:value-type="float">
            <text:p>0,00200567129629630000</text:p>
          </table:table-cell>
          <table:table-cell table:formula="of:=[.D561]-[.D56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31" office:value-type="float" office:value="17360" calcext:value-type="float">
            <text:p>1736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200925925925926" calcext:value-type="float">
            <text:p>0,00200925925925926000</text:p>
          </table:table-cell>
          <table:table-cell table:formula="of:=[.D562]-[.D56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31" office:value-type="float" office:value="17391" calcext:value-type="float">
            <text:p>17391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201284722222222" calcext:value-type="float">
            <text:p>0,00201284722222222000</text:p>
          </table:table-cell>
          <table:table-cell table:formula="of:=[.D563]-[.D56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31" office:value-type="float" office:value="17422" calcext:value-type="float">
            <text:p>17422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201643518518519" calcext:value-type="float">
            <text:p>0,00201643518518519000</text:p>
          </table:table-cell>
          <table:table-cell table:formula="of:=[.D564]-[.D56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31" office:value-type="float" office:value="17453" calcext:value-type="float">
            <text:p>17453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202002314814815" calcext:value-type="float">
            <text:p>0,00202002314814815000</text:p>
          </table:table-cell>
          <table:table-cell table:formula="of:=[.D565]-[.D56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31" office:value-type="float" office:value="17484" calcext:value-type="float">
            <text:p>17484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202361111111111" calcext:value-type="float">
            <text:p>0,00202361111111111000</text:p>
          </table:table-cell>
          <table:table-cell table:formula="of:=[.D566]-[.D56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31" office:value-type="float" office:value="17515" calcext:value-type="float">
            <text:p>17515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202719907407407" calcext:value-type="float">
            <text:p>0,00202719907407407000</text:p>
          </table:table-cell>
          <table:table-cell table:formula="of:=[.D567]-[.D56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31" office:value-type="float" office:value="17546" calcext:value-type="float">
            <text:p>17546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203078703703704" calcext:value-type="float">
            <text:p>0,00203078703703704000</text:p>
          </table:table-cell>
          <table:table-cell table:formula="of:=[.D568]-[.D56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31" office:value-type="float" office:value="17577" calcext:value-type="float">
            <text:p>17577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2034375" calcext:value-type="float">
            <text:p>0,00203437500000000000</text:p>
          </table:table-cell>
          <table:table-cell table:formula="of:=[.D569]-[.D56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31" office:value-type="float" office:value="17608" calcext:value-type="float">
            <text:p>17608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203796296296296" calcext:value-type="float">
            <text:p>0,00203796296296296000</text:p>
          </table:table-cell>
          <table:table-cell table:formula="of:=[.D570]-[.D56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31" office:value-type="float" office:value="17639" calcext:value-type="float">
            <text:p>17639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204155092592593" calcext:value-type="float">
            <text:p>0,00204155092592593000</text:p>
          </table:table-cell>
          <table:table-cell table:formula="of:=[.D571]-[.D57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31" office:value-type="float" office:value="17670" calcext:value-type="float">
            <text:p>1767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204513888888889" calcext:value-type="float">
            <text:p>0,00204513888888889000</text:p>
          </table:table-cell>
          <table:table-cell table:formula="of:=[.D572]-[.D57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31" office:value-type="float" office:value="17701" calcext:value-type="float">
            <text:p>17701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204872685185185" calcext:value-type="float">
            <text:p>0,00204872685185185000</text:p>
          </table:table-cell>
          <table:table-cell table:formula="of:=[.D573]-[.D57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31" office:value-type="float" office:value="17732" calcext:value-type="float">
            <text:p>17732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205231481481482" calcext:value-type="float">
            <text:p>0,00205231481481482000</text:p>
          </table:table-cell>
          <table:table-cell table:formula="of:=[.D574]-[.D57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31" office:value-type="float" office:value="17763" calcext:value-type="float">
            <text:p>17763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205590277777778" calcext:value-type="float">
            <text:p>0,00205590277777778000</text:p>
          </table:table-cell>
          <table:table-cell table:formula="of:=[.D575]-[.D57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31" office:value-type="float" office:value="17794" calcext:value-type="float">
            <text:p>17794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205949074074074" calcext:value-type="float">
            <text:p>0,00205949074074074000</text:p>
          </table:table-cell>
          <table:table-cell table:formula="of:=[.D576]-[.D57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31" office:value-type="float" office:value="17825" calcext:value-type="float">
            <text:p>17825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20630787037037" calcext:value-type="float">
            <text:p>0,00206307870370370000</text:p>
          </table:table-cell>
          <table:table-cell table:formula="of:=[.D577]-[.D57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31" office:value-type="float" office:value="17856" calcext:value-type="float">
            <text:p>17856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206666666666667" calcext:value-type="float">
            <text:p>0,00206666666666667000</text:p>
          </table:table-cell>
          <table:table-cell table:formula="of:=[.D578]-[.D57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31" office:value-type="float" office:value="17887" calcext:value-type="float">
            <text:p>17887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207025462962963" calcext:value-type="float">
            <text:p>0,00207025462962963000</text:p>
          </table:table-cell>
          <table:table-cell table:formula="of:=[.D579]-[.D57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31" office:value-type="float" office:value="17918" calcext:value-type="float">
            <text:p>17918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207384259259259" calcext:value-type="float">
            <text:p>0,00207384259259259000</text:p>
          </table:table-cell>
          <table:table-cell table:formula="of:=[.D580]-[.D57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31" office:value-type="float" office:value="17949" calcext:value-type="float">
            <text:p>17949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207743055555556" calcext:value-type="float">
            <text:p>0,00207743055555556000</text:p>
          </table:table-cell>
          <table:table-cell table:formula="of:=[.D581]-[.D58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31" office:value-type="float" office:value="17980" calcext:value-type="float">
            <text:p>1798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208101851851852" calcext:value-type="float">
            <text:p>0,00208101851851852000</text:p>
          </table:table-cell>
          <table:table-cell table:formula="of:=[.D582]-[.D58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31" office:value-type="float" office:value="18011" calcext:value-type="float">
            <text:p>18011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208460648148148" calcext:value-type="float">
            <text:p>0,00208460648148148000</text:p>
          </table:table-cell>
          <table:table-cell table:formula="of:=[.D583]-[.D58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31" office:value-type="float" office:value="18042" calcext:value-type="float">
            <text:p>18042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208819444444444" calcext:value-type="float">
            <text:p>0,00208819444444444000</text:p>
          </table:table-cell>
          <table:table-cell table:formula="of:=[.D584]-[.D58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31" office:value-type="float" office:value="18073" calcext:value-type="float">
            <text:p>18073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209178240740741" calcext:value-type="float">
            <text:p>0,00209178240740741000</text:p>
          </table:table-cell>
          <table:table-cell table:formula="of:=[.D585]-[.D58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31" office:value-type="float" office:value="18104" calcext:value-type="float">
            <text:p>18104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209537037037037" calcext:value-type="float">
            <text:p>0,00209537037037037000</text:p>
          </table:table-cell>
          <table:table-cell table:formula="of:=[.D586]-[.D58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31" office:value-type="float" office:value="18135" calcext:value-type="float">
            <text:p>18135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209895833333333" calcext:value-type="float">
            <text:p>0,00209895833333333000</text:p>
          </table:table-cell>
          <table:table-cell table:formula="of:=[.D587]-[.D58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31" office:value-type="float" office:value="18166" calcext:value-type="float">
            <text:p>18166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21025462962963" calcext:value-type="float">
            <text:p>0,00210254629629630000</text:p>
          </table:table-cell>
          <table:table-cell table:formula="of:=[.D588]-[.D58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31" office:value-type="float" office:value="18197" calcext:value-type="float">
            <text:p>18197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210613425925926" calcext:value-type="float">
            <text:p>0,00210613425925926000</text:p>
          </table:table-cell>
          <table:table-cell table:formula="of:=[.D589]-[.D58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31" office:value-type="float" office:value="18228" calcext:value-type="float">
            <text:p>18228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210972222222222" calcext:value-type="float">
            <text:p>0,00210972222222222000</text:p>
          </table:table-cell>
          <table:table-cell table:formula="of:=[.D590]-[.D58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31" office:value-type="float" office:value="18259" calcext:value-type="float">
            <text:p>18259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211331018518519" calcext:value-type="float">
            <text:p>0,00211331018518519000</text:p>
          </table:table-cell>
          <table:table-cell table:formula="of:=[.D591]-[.D59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31" office:value-type="float" office:value="18290" calcext:value-type="float">
            <text:p>1829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211689814814815" calcext:value-type="float">
            <text:p>0,00211689814814815000</text:p>
          </table:table-cell>
          <table:table-cell table:formula="of:=[.D592]-[.D59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31" office:value-type="float" office:value="18321" calcext:value-type="float">
            <text:p>18321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212048611111111" calcext:value-type="float">
            <text:p>0,00212048611111111000</text:p>
          </table:table-cell>
          <table:table-cell table:formula="of:=[.D593]-[.D59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31" office:value-type="float" office:value="18352" calcext:value-type="float">
            <text:p>18352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212407407407407" calcext:value-type="float">
            <text:p>0,00212407407407407000</text:p>
          </table:table-cell>
          <table:table-cell table:formula="of:=[.D594]-[.D59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31" office:value-type="float" office:value="18383" calcext:value-type="float">
            <text:p>18383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212766203703704" calcext:value-type="float">
            <text:p>0,00212766203703704000</text:p>
          </table:table-cell>
          <table:table-cell table:formula="of:=[.D595]-[.D59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31" office:value-type="float" office:value="18414" calcext:value-type="float">
            <text:p>18414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213125" calcext:value-type="float">
            <text:p>0,00213125000000000000</text:p>
          </table:table-cell>
          <table:table-cell table:formula="of:=[.D596]-[.D59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31" office:value-type="float" office:value="18445" calcext:value-type="float">
            <text:p>18445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213483796296296" calcext:value-type="float">
            <text:p>0,00213483796296296000</text:p>
          </table:table-cell>
          <table:table-cell table:formula="of:=[.D597]-[.D59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31" office:value-type="float" office:value="18476" calcext:value-type="float">
            <text:p>18476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213842592592593" calcext:value-type="float">
            <text:p>0,00213842592592593000</text:p>
          </table:table-cell>
          <table:table-cell table:formula="of:=[.D598]-[.D59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31" office:value-type="float" office:value="18507" calcext:value-type="float">
            <text:p>18507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214201388888889" calcext:value-type="float">
            <text:p>0,00214201388888889000</text:p>
          </table:table-cell>
          <table:table-cell table:formula="of:=[.D599]-[.D59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31" office:value-type="float" office:value="18538" calcext:value-type="float">
            <text:p>18538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214560185185185" calcext:value-type="float">
            <text:p>0,00214560185185185000</text:p>
          </table:table-cell>
          <table:table-cell table:formula="of:=[.D600]-[.D59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31" office:value-type="float" office:value="18569" calcext:value-type="float">
            <text:p>18569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214918981481481" calcext:value-type="float">
            <text:p>0,00214918981481481000</text:p>
          </table:table-cell>
          <table:table-cell table:formula="of:=[.D601]-[.D60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31" office:value-type="float" office:value="18600" calcext:value-type="float">
            <text:p>186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215277777777778" calcext:value-type="float">
            <text:p>0,00215277777777778000</text:p>
          </table:table-cell>
          <table:table-cell table:formula="of:=[.D602]-[.D60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31" office:value-type="float" office:value="18631" calcext:value-type="float">
            <text:p>18631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215636574074074" calcext:value-type="float">
            <text:p>0,00215636574074074000</text:p>
          </table:table-cell>
          <table:table-cell table:formula="of:=[.D603]-[.D60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31" office:value-type="float" office:value="18662" calcext:value-type="float">
            <text:p>18662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21599537037037" calcext:value-type="float">
            <text:p>0,00215995370370370000</text:p>
          </table:table-cell>
          <table:table-cell table:formula="of:=[.D604]-[.D60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31" office:value-type="float" office:value="18693" calcext:value-type="float">
            <text:p>18693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216354166666667" calcext:value-type="float">
            <text:p>0,00216354166666667000</text:p>
          </table:table-cell>
          <table:table-cell table:formula="of:=[.D605]-[.D60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31" office:value-type="float" office:value="18724" calcext:value-type="float">
            <text:p>18724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216712962962963" calcext:value-type="float">
            <text:p>0,00216712962962963000</text:p>
          </table:table-cell>
          <table:table-cell table:formula="of:=[.D606]-[.D60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31" office:value-type="float" office:value="18755" calcext:value-type="float">
            <text:p>18755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217071759259259" calcext:value-type="float">
            <text:p>0,00217071759259259000</text:p>
          </table:table-cell>
          <table:table-cell table:formula="of:=[.D607]-[.D60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31" office:value-type="float" office:value="18786" calcext:value-type="float">
            <text:p>18786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217430555555556" calcext:value-type="float">
            <text:p>0,00217430555555556000</text:p>
          </table:table-cell>
          <table:table-cell table:formula="of:=[.D608]-[.D60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31" office:value-type="float" office:value="18817" calcext:value-type="float">
            <text:p>18817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217789351851852" calcext:value-type="float">
            <text:p>0,00217789351851852000</text:p>
          </table:table-cell>
          <table:table-cell table:formula="of:=[.D609]-[.D60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31" office:value-type="float" office:value="18848" calcext:value-type="float">
            <text:p>18848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218148148148148" calcext:value-type="float">
            <text:p>0,00218148148148148000</text:p>
          </table:table-cell>
          <table:table-cell table:formula="of:=[.D610]-[.D60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31" office:value-type="float" office:value="18879" calcext:value-type="float">
            <text:p>18879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218506944444444" calcext:value-type="float">
            <text:p>0,00218506944444444000</text:p>
          </table:table-cell>
          <table:table-cell table:formula="of:=[.D611]-[.D61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31" office:value-type="float" office:value="18910" calcext:value-type="float">
            <text:p>1891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218865740740741" calcext:value-type="float">
            <text:p>0,00218865740740741000</text:p>
          </table:table-cell>
          <table:table-cell table:formula="of:=[.D612]-[.D61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31" office:value-type="float" office:value="18941" calcext:value-type="float">
            <text:p>18941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219224537037037" calcext:value-type="float">
            <text:p>0,00219224537037037000</text:p>
          </table:table-cell>
          <table:table-cell table:formula="of:=[.D613]-[.D61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31" office:value-type="float" office:value="18972" calcext:value-type="float">
            <text:p>18972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219583333333333" calcext:value-type="float">
            <text:p>0,00219583333333333000</text:p>
          </table:table-cell>
          <table:table-cell table:formula="of:=[.D614]-[.D61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31" office:value-type="float" office:value="19003" calcext:value-type="float">
            <text:p>19003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21994212962963" calcext:value-type="float">
            <text:p>0,00219942129629630000</text:p>
          </table:table-cell>
          <table:table-cell table:formula="of:=[.D615]-[.D61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31" office:value-type="float" office:value="19034" calcext:value-type="float">
            <text:p>19034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220300925925926" calcext:value-type="float">
            <text:p>0,00220300925925926000</text:p>
          </table:table-cell>
          <table:table-cell table:formula="of:=[.D616]-[.D61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31" office:value-type="float" office:value="19065" calcext:value-type="float">
            <text:p>19065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220659722222222" calcext:value-type="float">
            <text:p>0,00220659722222222000</text:p>
          </table:table-cell>
          <table:table-cell table:formula="of:=[.D617]-[.D61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31" office:value-type="float" office:value="19096" calcext:value-type="float">
            <text:p>19096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221018518518519" calcext:value-type="float">
            <text:p>0,00221018518518519000</text:p>
          </table:table-cell>
          <table:table-cell table:formula="of:=[.D618]-[.D61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31" office:value-type="float" office:value="19127" calcext:value-type="float">
            <text:p>19127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221377314814815" calcext:value-type="float">
            <text:p>0,00221377314814815000</text:p>
          </table:table-cell>
          <table:table-cell table:formula="of:=[.D619]-[.D61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31" office:value-type="float" office:value="19158" calcext:value-type="float">
            <text:p>19158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221736111111111" calcext:value-type="float">
            <text:p>0,00221736111111111000</text:p>
          </table:table-cell>
          <table:table-cell table:formula="of:=[.D620]-[.D61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31" office:value-type="float" office:value="19189" calcext:value-type="float">
            <text:p>19189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222094907407407" calcext:value-type="float">
            <text:p>0,00222094907407407000</text:p>
          </table:table-cell>
          <table:table-cell table:formula="of:=[.D621]-[.D62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31" office:value-type="float" office:value="19220" calcext:value-type="float">
            <text:p>1922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222453703703704" calcext:value-type="float">
            <text:p>0,00222453703703704000</text:p>
          </table:table-cell>
          <table:table-cell table:formula="of:=[.D622]-[.D62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31" office:value-type="float" office:value="19251" calcext:value-type="float">
            <text:p>19251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2228125" calcext:value-type="float">
            <text:p>0,00222812500000000000</text:p>
          </table:table-cell>
          <table:table-cell table:formula="of:=[.D623]-[.D62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31" office:value-type="float" office:value="19282" calcext:value-type="float">
            <text:p>19282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223171296296296" calcext:value-type="float">
            <text:p>0,00223171296296296000</text:p>
          </table:table-cell>
          <table:table-cell table:formula="of:=[.D624]-[.D62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31" office:value-type="float" office:value="19313" calcext:value-type="float">
            <text:p>19313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223530092592593" calcext:value-type="float">
            <text:p>0,00223530092592593000</text:p>
          </table:table-cell>
          <table:table-cell table:formula="of:=[.D625]-[.D62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31" office:value-type="float" office:value="19344" calcext:value-type="float">
            <text:p>19344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223888888888889" calcext:value-type="float">
            <text:p>0,00223888888888889000</text:p>
          </table:table-cell>
          <table:table-cell table:formula="of:=[.D626]-[.D62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31" office:value-type="float" office:value="19375" calcext:value-type="float">
            <text:p>19375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224247685185185" calcext:value-type="float">
            <text:p>0,00224247685185185000</text:p>
          </table:table-cell>
          <table:table-cell table:formula="of:=[.D627]-[.D62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31" office:value-type="float" office:value="19406" calcext:value-type="float">
            <text:p>19406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224606481481482" calcext:value-type="float">
            <text:p>0,00224606481481482000</text:p>
          </table:table-cell>
          <table:table-cell table:formula="of:=[.D628]-[.D62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31" office:value-type="float" office:value="19437" calcext:value-type="float">
            <text:p>19437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224965277777778" calcext:value-type="float">
            <text:p>0,00224965277777778000</text:p>
          </table:table-cell>
          <table:table-cell table:formula="of:=[.D629]-[.D62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31" office:value-type="float" office:value="19468" calcext:value-type="float">
            <text:p>19468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225324074074074" calcext:value-type="float">
            <text:p>0,00225324074074074000</text:p>
          </table:table-cell>
          <table:table-cell table:formula="of:=[.D630]-[.D62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31" office:value-type="float" office:value="19499" calcext:value-type="float">
            <text:p>19499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22568287037037" calcext:value-type="float">
            <text:p>0,00225682870370370000</text:p>
          </table:table-cell>
          <table:table-cell table:formula="of:=[.D631]-[.D63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31" office:value-type="float" office:value="19530" calcext:value-type="float">
            <text:p>1953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226041666666667" calcext:value-type="float">
            <text:p>0,00226041666666667000</text:p>
          </table:table-cell>
          <table:table-cell table:formula="of:=[.D632]-[.D63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31" office:value-type="float" office:value="19561" calcext:value-type="float">
            <text:p>19561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226400462962963" calcext:value-type="float">
            <text:p>0,00226400462962963000</text:p>
          </table:table-cell>
          <table:table-cell table:formula="of:=[.D633]-[.D63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31" office:value-type="float" office:value="19592" calcext:value-type="float">
            <text:p>19592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226759259259259" calcext:value-type="float">
            <text:p>0,00226759259259259000</text:p>
          </table:table-cell>
          <table:table-cell table:formula="of:=[.D634]-[.D63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31" office:value-type="float" office:value="19623" calcext:value-type="float">
            <text:p>19623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227118055555556" calcext:value-type="float">
            <text:p>0,00227118055555556000</text:p>
          </table:table-cell>
          <table:table-cell table:formula="of:=[.D635]-[.D63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31" office:value-type="float" office:value="19654" calcext:value-type="float">
            <text:p>19654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227476851851852" calcext:value-type="float">
            <text:p>0,00227476851851852000</text:p>
          </table:table-cell>
          <table:table-cell table:formula="of:=[.D636]-[.D63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31" office:value-type="float" office:value="19685" calcext:value-type="float">
            <text:p>19685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227835648148148" calcext:value-type="float">
            <text:p>0,00227835648148148000</text:p>
          </table:table-cell>
          <table:table-cell table:formula="of:=[.D637]-[.D63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31" office:value-type="float" office:value="19716" calcext:value-type="float">
            <text:p>19716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228194444444444" calcext:value-type="float">
            <text:p>0,00228194444444444000</text:p>
          </table:table-cell>
          <table:table-cell table:formula="of:=[.D638]-[.D63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31" office:value-type="float" office:value="19747" calcext:value-type="float">
            <text:p>19747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228553240740741" calcext:value-type="float">
            <text:p>0,00228553240740741000</text:p>
          </table:table-cell>
          <table:table-cell table:formula="of:=[.D639]-[.D63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31" office:value-type="float" office:value="19778" calcext:value-type="float">
            <text:p>19778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228912037037037" calcext:value-type="float">
            <text:p>0,00228912037037037000</text:p>
          </table:table-cell>
          <table:table-cell table:formula="of:=[.D640]-[.D63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31" office:value-type="float" office:value="19809" calcext:value-type="float">
            <text:p>19809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229270833333333" calcext:value-type="float">
            <text:p>0,00229270833333333000</text:p>
          </table:table-cell>
          <table:table-cell table:formula="of:=[.D641]-[.D64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31" office:value-type="float" office:value="19840" calcext:value-type="float">
            <text:p>1984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22962962962963" calcext:value-type="float">
            <text:p>0,00229629629629630000</text:p>
          </table:table-cell>
          <table:table-cell table:formula="of:=[.D642]-[.D64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31" office:value-type="float" office:value="19871" calcext:value-type="float">
            <text:p>19871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229988425925926" calcext:value-type="float">
            <text:p>0,00229988425925926000</text:p>
          </table:table-cell>
          <table:table-cell table:formula="of:=[.D643]-[.D64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31" office:value-type="float" office:value="19902" calcext:value-type="float">
            <text:p>19902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230347222222222" calcext:value-type="float">
            <text:p>0,00230347222222222000</text:p>
          </table:table-cell>
          <table:table-cell table:formula="of:=[.D644]-[.D64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31" office:value-type="float" office:value="19933" calcext:value-type="float">
            <text:p>19933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230706018518519" calcext:value-type="float">
            <text:p>0,00230706018518519000</text:p>
          </table:table-cell>
          <table:table-cell table:formula="of:=[.D645]-[.D64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31" office:value-type="float" office:value="19964" calcext:value-type="float">
            <text:p>19964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231064814814815" calcext:value-type="float">
            <text:p>0,00231064814814815000</text:p>
          </table:table-cell>
          <table:table-cell table:formula="of:=[.D646]-[.D64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31" office:value-type="float" office:value="19995" calcext:value-type="float">
            <text:p>19995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231423611111111" calcext:value-type="float">
            <text:p>0,00231423611111111000</text:p>
          </table:table-cell>
          <table:table-cell table:formula="of:=[.D647]-[.D64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31" office:value-type="float" office:value="20026" calcext:value-type="float">
            <text:p>20026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231782407407407" calcext:value-type="float">
            <text:p>0,00231782407407407000</text:p>
          </table:table-cell>
          <table:table-cell table:formula="of:=[.D648]-[.D64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31" office:value-type="float" office:value="20057" calcext:value-type="float">
            <text:p>20057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232141203703704" calcext:value-type="float">
            <text:p>0,00232141203703704000</text:p>
          </table:table-cell>
          <table:table-cell table:formula="of:=[.D649]-[.D64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31" office:value-type="float" office:value="20088" calcext:value-type="float">
            <text:p>20088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2325" calcext:value-type="float">
            <text:p>0,00232500000000000000</text:p>
          </table:table-cell>
          <table:table-cell table:formula="of:=[.D650]-[.D64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31" office:value-type="float" office:value="20119" calcext:value-type="float">
            <text:p>20119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232858796296296" calcext:value-type="float">
            <text:p>0,00232858796296296000</text:p>
          </table:table-cell>
          <table:table-cell table:formula="of:=[.D651]-[.D65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31" office:value-type="float" office:value="20150" calcext:value-type="float">
            <text:p>2015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233217592592593" calcext:value-type="float">
            <text:p>0,00233217592592593000</text:p>
          </table:table-cell>
          <table:table-cell table:formula="of:=[.D652]-[.D65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31" office:value-type="float" office:value="20181" calcext:value-type="float">
            <text:p>20181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233576388888889" calcext:value-type="float">
            <text:p>0,00233576388888889000</text:p>
          </table:table-cell>
          <table:table-cell table:formula="of:=[.D653]-[.D65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31" office:value-type="float" office:value="20212" calcext:value-type="float">
            <text:p>20212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233935185185185" calcext:value-type="float">
            <text:p>0,00233935185185185000</text:p>
          </table:table-cell>
          <table:table-cell table:formula="of:=[.D654]-[.D65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31" office:value-type="float" office:value="20243" calcext:value-type="float">
            <text:p>20243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234293981481481" calcext:value-type="float">
            <text:p>0,00234293981481481000</text:p>
          </table:table-cell>
          <table:table-cell table:formula="of:=[.D655]-[.D65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31" office:value-type="float" office:value="20274" calcext:value-type="float">
            <text:p>20274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234652777777778" calcext:value-type="float">
            <text:p>0,00234652777777778000</text:p>
          </table:table-cell>
          <table:table-cell table:formula="of:=[.D656]-[.D65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31" office:value-type="float" office:value="20305" calcext:value-type="float">
            <text:p>20305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235011574074074" calcext:value-type="float">
            <text:p>0,00235011574074074000</text:p>
          </table:table-cell>
          <table:table-cell table:formula="of:=[.D657]-[.D65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31" office:value-type="float" office:value="20336" calcext:value-type="float">
            <text:p>20336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23537037037037" calcext:value-type="float">
            <text:p>0,00235370370370370000</text:p>
          </table:table-cell>
          <table:table-cell table:formula="of:=[.D658]-[.D65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31" office:value-type="float" office:value="20367" calcext:value-type="float">
            <text:p>20367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235729166666667" calcext:value-type="float">
            <text:p>0,00235729166666667000</text:p>
          </table:table-cell>
          <table:table-cell table:formula="of:=[.D659]-[.D65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31" office:value-type="float" office:value="20398" calcext:value-type="float">
            <text:p>20398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236087962962963" calcext:value-type="float">
            <text:p>0,00236087962962963000</text:p>
          </table:table-cell>
          <table:table-cell table:formula="of:=[.D660]-[.D65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31" office:value-type="float" office:value="20429" calcext:value-type="float">
            <text:p>20429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236446759259259" calcext:value-type="float">
            <text:p>0,00236446759259259000</text:p>
          </table:table-cell>
          <table:table-cell table:formula="of:=[.D661]-[.D66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31" office:value-type="float" office:value="20460" calcext:value-type="float">
            <text:p>2046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236805555555556" calcext:value-type="float">
            <text:p>0,00236805555555556000</text:p>
          </table:table-cell>
          <table:table-cell table:formula="of:=[.D662]-[.D66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31" office:value-type="float" office:value="20491" calcext:value-type="float">
            <text:p>20491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237164351851852" calcext:value-type="float">
            <text:p>0,00237164351851852000</text:p>
          </table:table-cell>
          <table:table-cell table:formula="of:=[.D663]-[.D66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31" office:value-type="float" office:value="20522" calcext:value-type="float">
            <text:p>20522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237523148148148" calcext:value-type="float">
            <text:p>0,00237523148148148000</text:p>
          </table:table-cell>
          <table:table-cell table:formula="of:=[.D664]-[.D66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31" office:value-type="float" office:value="20553" calcext:value-type="float">
            <text:p>20553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237881944444444" calcext:value-type="float">
            <text:p>0,00237881944444444000</text:p>
          </table:table-cell>
          <table:table-cell table:formula="of:=[.D665]-[.D66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31" office:value-type="float" office:value="20584" calcext:value-type="float">
            <text:p>20584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238240740740741" calcext:value-type="float">
            <text:p>0,00238240740740741000</text:p>
          </table:table-cell>
          <table:table-cell table:formula="of:=[.D666]-[.D66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31" office:value-type="float" office:value="20615" calcext:value-type="float">
            <text:p>20615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238599537037037" calcext:value-type="float">
            <text:p>0,00238599537037037000</text:p>
          </table:table-cell>
          <table:table-cell table:formula="of:=[.D667]-[.D66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31" office:value-type="float" office:value="20646" calcext:value-type="float">
            <text:p>20646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238958333333333" calcext:value-type="float">
            <text:p>0,00238958333333333000</text:p>
          </table:table-cell>
          <table:table-cell table:formula="of:=[.D668]-[.D66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31" office:value-type="float" office:value="20677" calcext:value-type="float">
            <text:p>20677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23931712962963" calcext:value-type="float">
            <text:p>0,00239317129629630000</text:p>
          </table:table-cell>
          <table:table-cell table:formula="of:=[.D669]-[.D66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31" office:value-type="float" office:value="20708" calcext:value-type="float">
            <text:p>20708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239675925925926" calcext:value-type="float">
            <text:p>0,00239675925925926000</text:p>
          </table:table-cell>
          <table:table-cell table:formula="of:=[.D670]-[.D66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31" office:value-type="float" office:value="20739" calcext:value-type="float">
            <text:p>20739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240034722222222" calcext:value-type="float">
            <text:p>0,00240034722222222000</text:p>
          </table:table-cell>
          <table:table-cell table:formula="of:=[.D671]-[.D67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31" office:value-type="float" office:value="20770" calcext:value-type="float">
            <text:p>2077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240393518518519" calcext:value-type="float">
            <text:p>0,00240393518518519000</text:p>
          </table:table-cell>
          <table:table-cell table:formula="of:=[.D672]-[.D67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31" office:value-type="float" office:value="20801" calcext:value-type="float">
            <text:p>20801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240752314814815" calcext:value-type="float">
            <text:p>0,00240752314814815000</text:p>
          </table:table-cell>
          <table:table-cell table:formula="of:=[.D673]-[.D67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31" office:value-type="float" office:value="20832" calcext:value-type="float">
            <text:p>20832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241111111111111" calcext:value-type="float">
            <text:p>0,00241111111111111000</text:p>
          </table:table-cell>
          <table:table-cell table:formula="of:=[.D674]-[.D67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31" office:value-type="float" office:value="20863" calcext:value-type="float">
            <text:p>20863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241469907407407" calcext:value-type="float">
            <text:p>0,00241469907407407000</text:p>
          </table:table-cell>
          <table:table-cell table:formula="of:=[.D675]-[.D67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31" office:value-type="float" office:value="20894" calcext:value-type="float">
            <text:p>20894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241828703703704" calcext:value-type="float">
            <text:p>0,00241828703703704000</text:p>
          </table:table-cell>
          <table:table-cell table:formula="of:=[.D676]-[.D67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31" office:value-type="float" office:value="20925" calcext:value-type="float">
            <text:p>20925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2421875" calcext:value-type="float">
            <text:p>0,00242187500000000000</text:p>
          </table:table-cell>
          <table:table-cell table:formula="of:=[.D677]-[.D67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31" office:value-type="float" office:value="20956" calcext:value-type="float">
            <text:p>20956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242546296296296" calcext:value-type="float">
            <text:p>0,00242546296296296000</text:p>
          </table:table-cell>
          <table:table-cell table:formula="of:=[.D678]-[.D67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31" office:value-type="float" office:value="20987" calcext:value-type="float">
            <text:p>20987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242905092592593" calcext:value-type="float">
            <text:p>0,00242905092592593000</text:p>
          </table:table-cell>
          <table:table-cell table:formula="of:=[.D679]-[.D67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31" office:value-type="float" office:value="21018" calcext:value-type="float">
            <text:p>21018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243263888888889" calcext:value-type="float">
            <text:p>0,00243263888888889000</text:p>
          </table:table-cell>
          <table:table-cell table:formula="of:=[.D680]-[.D67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31" office:value-type="float" office:value="21049" calcext:value-type="float">
            <text:p>21049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243622685185185" calcext:value-type="float">
            <text:p>0,00243622685185185000</text:p>
          </table:table-cell>
          <table:table-cell table:formula="of:=[.D681]-[.D68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31" office:value-type="float" office:value="21080" calcext:value-type="float">
            <text:p>2108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243981481481482" calcext:value-type="float">
            <text:p>0,00243981481481482000</text:p>
          </table:table-cell>
          <table:table-cell table:formula="of:=[.D682]-[.D68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31" office:value-type="float" office:value="21111" calcext:value-type="float">
            <text:p>21111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244340277777778" calcext:value-type="float">
            <text:p>0,00244340277777778000</text:p>
          </table:table-cell>
          <table:table-cell table:formula="of:=[.D683]-[.D68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31" office:value-type="float" office:value="21142" calcext:value-type="float">
            <text:p>21142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244699074074074" calcext:value-type="float">
            <text:p>0,00244699074074074000</text:p>
          </table:table-cell>
          <table:table-cell table:formula="of:=[.D684]-[.D68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31" office:value-type="float" office:value="21173" calcext:value-type="float">
            <text:p>21173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24505787037037" calcext:value-type="float">
            <text:p>0,00245057870370370000</text:p>
          </table:table-cell>
          <table:table-cell table:formula="of:=[.D685]-[.D68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31" office:value-type="float" office:value="21204" calcext:value-type="float">
            <text:p>21204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245416666666667" calcext:value-type="float">
            <text:p>0,00245416666666667000</text:p>
          </table:table-cell>
          <table:table-cell table:formula="of:=[.D686]-[.D68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31" office:value-type="float" office:value="21235" calcext:value-type="float">
            <text:p>21235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245775462962963" calcext:value-type="float">
            <text:p>0,00245775462962963000</text:p>
          </table:table-cell>
          <table:table-cell table:formula="of:=[.D687]-[.D68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31" office:value-type="float" office:value="21266" calcext:value-type="float">
            <text:p>21266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246134259259259" calcext:value-type="float">
            <text:p>0,00246134259259259000</text:p>
          </table:table-cell>
          <table:table-cell table:formula="of:=[.D688]-[.D68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31" office:value-type="float" office:value="21297" calcext:value-type="float">
            <text:p>21297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246493055555556" calcext:value-type="float">
            <text:p>0,00246493055555556000</text:p>
          </table:table-cell>
          <table:table-cell table:formula="of:=[.D689]-[.D68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31" office:value-type="float" office:value="21328" calcext:value-type="float">
            <text:p>21328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246851851851852" calcext:value-type="float">
            <text:p>0,00246851851851852000</text:p>
          </table:table-cell>
          <table:table-cell table:formula="of:=[.D690]-[.D68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31" office:value-type="float" office:value="21359" calcext:value-type="float">
            <text:p>21359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247210648148148" calcext:value-type="float">
            <text:p>0,00247210648148148000</text:p>
          </table:table-cell>
          <table:table-cell table:formula="of:=[.D691]-[.D69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31" office:value-type="float" office:value="21390" calcext:value-type="float">
            <text:p>2139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247569444444444" calcext:value-type="float">
            <text:p>0,00247569444444444000</text:p>
          </table:table-cell>
          <table:table-cell table:formula="of:=[.D692]-[.D69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31" office:value-type="float" office:value="21421" calcext:value-type="float">
            <text:p>21421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247928240740741" calcext:value-type="float">
            <text:p>0,00247928240740741000</text:p>
          </table:table-cell>
          <table:table-cell table:formula="of:=[.D693]-[.D69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31" office:value-type="float" office:value="21452" calcext:value-type="float">
            <text:p>21452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248287037037037" calcext:value-type="float">
            <text:p>0,00248287037037037000</text:p>
          </table:table-cell>
          <table:table-cell table:formula="of:=[.D694]-[.D69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31" office:value-type="float" office:value="21483" calcext:value-type="float">
            <text:p>21483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248645833333333" calcext:value-type="float">
            <text:p>0,00248645833333333000</text:p>
          </table:table-cell>
          <table:table-cell table:formula="of:=[.D695]-[.D69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31" office:value-type="float" office:value="21514" calcext:value-type="float">
            <text:p>21514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24900462962963" calcext:value-type="float">
            <text:p>0,00249004629629630000</text:p>
          </table:table-cell>
          <table:table-cell table:formula="of:=[.D696]-[.D69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31" office:value-type="float" office:value="21545" calcext:value-type="float">
            <text:p>21545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249363425925926" calcext:value-type="float">
            <text:p>0,00249363425925926000</text:p>
          </table:table-cell>
          <table:table-cell table:formula="of:=[.D697]-[.D69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31" office:value-type="float" office:value="21576" calcext:value-type="float">
            <text:p>21576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249722222222222" calcext:value-type="float">
            <text:p>0,00249722222222222000</text:p>
          </table:table-cell>
          <table:table-cell table:formula="of:=[.D698]-[.D69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31" office:value-type="float" office:value="21607" calcext:value-type="float">
            <text:p>21607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250081018518519" calcext:value-type="float">
            <text:p>0,00250081018518519000</text:p>
          </table:table-cell>
          <table:table-cell table:formula="of:=[.D699]-[.D69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31" office:value-type="float" office:value="21638" calcext:value-type="float">
            <text:p>21638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250439814814815" calcext:value-type="float">
            <text:p>0,00250439814814815000</text:p>
          </table:table-cell>
          <table:table-cell table:formula="of:=[.D700]-[.D69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31" office:value-type="float" office:value="21669" calcext:value-type="float">
            <text:p>21669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250798611111111" calcext:value-type="float">
            <text:p>0,00250798611111111000</text:p>
          </table:table-cell>
          <table:table-cell table:formula="of:=[.D701]-[.D70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31" office:value-type="float" office:value="21700" calcext:value-type="float">
            <text:p>217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251157407407407" calcext:value-type="float">
            <text:p>0,00251157407407407000</text:p>
          </table:table-cell>
          <table:table-cell table:formula="of:=[.D702]-[.D70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31" office:value-type="float" office:value="21731" calcext:value-type="float">
            <text:p>21731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251516203703704" calcext:value-type="float">
            <text:p>0,00251516203703704000</text:p>
          </table:table-cell>
          <table:table-cell table:formula="of:=[.D703]-[.D70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31" office:value-type="float" office:value="21762" calcext:value-type="float">
            <text:p>21762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251875" calcext:value-type="float">
            <text:p>0,00251875000000000000</text:p>
          </table:table-cell>
          <table:table-cell table:formula="of:=[.D704]-[.D70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31" office:value-type="float" office:value="21793" calcext:value-type="float">
            <text:p>21793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252233796296296" calcext:value-type="float">
            <text:p>0,00252233796296296000</text:p>
          </table:table-cell>
          <table:table-cell table:formula="of:=[.D705]-[.D70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31" office:value-type="float" office:value="21824" calcext:value-type="float">
            <text:p>21824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252592592592593" calcext:value-type="float">
            <text:p>0,00252592592592593000</text:p>
          </table:table-cell>
          <table:table-cell table:formula="of:=[.D706]-[.D70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31" office:value-type="float" office:value="21855" calcext:value-type="float">
            <text:p>21855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252951388888889" calcext:value-type="float">
            <text:p>0,00252951388888889000</text:p>
          </table:table-cell>
          <table:table-cell table:formula="of:=[.D707]-[.D70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31" office:value-type="float" office:value="21886" calcext:value-type="float">
            <text:p>21886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253310185185185" calcext:value-type="float">
            <text:p>0,00253310185185185000</text:p>
          </table:table-cell>
          <table:table-cell table:formula="of:=[.D708]-[.D70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31" office:value-type="float" office:value="21917" calcext:value-type="float">
            <text:p>21917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253668981481482" calcext:value-type="float">
            <text:p>0,00253668981481482000</text:p>
          </table:table-cell>
          <table:table-cell table:formula="of:=[.D709]-[.D70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31" office:value-type="float" office:value="21948" calcext:value-type="float">
            <text:p>21948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254027777777778" calcext:value-type="float">
            <text:p>0,00254027777777778000</text:p>
          </table:table-cell>
          <table:table-cell table:formula="of:=[.D710]-[.D70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31" office:value-type="float" office:value="21979" calcext:value-type="float">
            <text:p>21979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254386574074074" calcext:value-type="float">
            <text:p>0,00254386574074074000</text:p>
          </table:table-cell>
          <table:table-cell table:formula="of:=[.D711]-[.D71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31" office:value-type="float" office:value="22010" calcext:value-type="float">
            <text:p>2201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25474537037037" calcext:value-type="float">
            <text:p>0,00254745370370370000</text:p>
          </table:table-cell>
          <table:table-cell table:formula="of:=[.D712]-[.D71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31" office:value-type="float" office:value="22041" calcext:value-type="float">
            <text:p>22041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255104166666667" calcext:value-type="float">
            <text:p>0,00255104166666667000</text:p>
          </table:table-cell>
          <table:table-cell table:formula="of:=[.D713]-[.D71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31" office:value-type="float" office:value="22072" calcext:value-type="float">
            <text:p>22072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255462962962963" calcext:value-type="float">
            <text:p>0,00255462962962963000</text:p>
          </table:table-cell>
          <table:table-cell table:formula="of:=[.D714]-[.D71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31" office:value-type="float" office:value="22103" calcext:value-type="float">
            <text:p>22103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255821759259259" calcext:value-type="float">
            <text:p>0,00255821759259259000</text:p>
          </table:table-cell>
          <table:table-cell table:formula="of:=[.D715]-[.D71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31" office:value-type="float" office:value="22134" calcext:value-type="float">
            <text:p>22134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256180555555556" calcext:value-type="float">
            <text:p>0,00256180555555556000</text:p>
          </table:table-cell>
          <table:table-cell table:formula="of:=[.D716]-[.D71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31" office:value-type="float" office:value="22165" calcext:value-type="float">
            <text:p>22165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256539351851852" calcext:value-type="float">
            <text:p>0,00256539351851852000</text:p>
          </table:table-cell>
          <table:table-cell table:formula="of:=[.D717]-[.D71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31" office:value-type="float" office:value="22196" calcext:value-type="float">
            <text:p>22196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256898148148148" calcext:value-type="float">
            <text:p>0,00256898148148148000</text:p>
          </table:table-cell>
          <table:table-cell table:formula="of:=[.D718]-[.D71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31" office:value-type="float" office:value="22227" calcext:value-type="float">
            <text:p>22227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257256944444444" calcext:value-type="float">
            <text:p>0,00257256944444444000</text:p>
          </table:table-cell>
          <table:table-cell table:formula="of:=[.D719]-[.D71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31" office:value-type="float" office:value="22258" calcext:value-type="float">
            <text:p>22258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257615740740741" calcext:value-type="float">
            <text:p>0,00257615740740741000</text:p>
          </table:table-cell>
          <table:table-cell table:formula="of:=[.D720]-[.D71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31" office:value-type="float" office:value="22289" calcext:value-type="float">
            <text:p>22289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257974537037037" calcext:value-type="float">
            <text:p>0,00257974537037037000</text:p>
          </table:table-cell>
          <table:table-cell table:formula="of:=[.D721]-[.D72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31" office:value-type="float" office:value="22320" calcext:value-type="float">
            <text:p>2232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258333333333333" calcext:value-type="float">
            <text:p>0,00258333333333333000</text:p>
          </table:table-cell>
          <table:table-cell table:formula="of:=[.D722]-[.D72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31" office:value-type="float" office:value="22351" calcext:value-type="float">
            <text:p>22351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25869212962963" calcext:value-type="float">
            <text:p>0,00258692129629630000</text:p>
          </table:table-cell>
          <table:table-cell table:formula="of:=[.D723]-[.D72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31" office:value-type="float" office:value="22382" calcext:value-type="float">
            <text:p>22382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259050925925926" calcext:value-type="float">
            <text:p>0,00259050925925926000</text:p>
          </table:table-cell>
          <table:table-cell table:formula="of:=[.D724]-[.D72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31" office:value-type="float" office:value="22413" calcext:value-type="float">
            <text:p>22413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259409722222222" calcext:value-type="float">
            <text:p>0,00259409722222222000</text:p>
          </table:table-cell>
          <table:table-cell table:formula="of:=[.D725]-[.D72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31" office:value-type="float" office:value="22444" calcext:value-type="float">
            <text:p>22444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259768518518519" calcext:value-type="float">
            <text:p>0,00259768518518519000</text:p>
          </table:table-cell>
          <table:table-cell table:formula="of:=[.D726]-[.D72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31" office:value-type="float" office:value="22475" calcext:value-type="float">
            <text:p>22475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260127314814815" calcext:value-type="float">
            <text:p>0,00260127314814815000</text:p>
          </table:table-cell>
          <table:table-cell table:formula="of:=[.D727]-[.D72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31" office:value-type="float" office:value="22506" calcext:value-type="float">
            <text:p>22506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260486111111111" calcext:value-type="float">
            <text:p>0,00260486111111111000</text:p>
          </table:table-cell>
          <table:table-cell table:formula="of:=[.D728]-[.D72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31" office:value-type="float" office:value="22537" calcext:value-type="float">
            <text:p>22537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260844907407407" calcext:value-type="float">
            <text:p>0,00260844907407407000</text:p>
          </table:table-cell>
          <table:table-cell table:formula="of:=[.D729]-[.D72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31" office:value-type="float" office:value="22568" calcext:value-type="float">
            <text:p>22568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261203703703704" calcext:value-type="float">
            <text:p>0,00261203703703704000</text:p>
          </table:table-cell>
          <table:table-cell table:formula="of:=[.D730]-[.D72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31" office:value-type="float" office:value="22599" calcext:value-type="float">
            <text:p>22599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2615625" calcext:value-type="float">
            <text:p>0,00261562500000000000</text:p>
          </table:table-cell>
          <table:table-cell table:formula="of:=[.D731]-[.D73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31" office:value-type="float" office:value="22630" calcext:value-type="float">
            <text:p>2263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261921296296296" calcext:value-type="float">
            <text:p>0,00261921296296296000</text:p>
          </table:table-cell>
          <table:table-cell table:formula="of:=[.D732]-[.D73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31" office:value-type="float" office:value="22661" calcext:value-type="float">
            <text:p>22661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262280092592593" calcext:value-type="float">
            <text:p>0,00262280092592593000</text:p>
          </table:table-cell>
          <table:table-cell table:formula="of:=[.D733]-[.D73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31" office:value-type="float" office:value="22692" calcext:value-type="float">
            <text:p>22692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262638888888889" calcext:value-type="float">
            <text:p>0,00262638888888889000</text:p>
          </table:table-cell>
          <table:table-cell table:formula="of:=[.D734]-[.D73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31" office:value-type="float" office:value="22723" calcext:value-type="float">
            <text:p>22723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262997685185185" calcext:value-type="float">
            <text:p>0,00262997685185185000</text:p>
          </table:table-cell>
          <table:table-cell table:formula="of:=[.D735]-[.D73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31" office:value-type="float" office:value="22754" calcext:value-type="float">
            <text:p>22754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263356481481481" calcext:value-type="float">
            <text:p>0,00263356481481481000</text:p>
          </table:table-cell>
          <table:table-cell table:formula="of:=[.D736]-[.D73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31" office:value-type="float" office:value="22785" calcext:value-type="float">
            <text:p>22785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263715277777778" calcext:value-type="float">
            <text:p>0,00263715277777778000</text:p>
          </table:table-cell>
          <table:table-cell table:formula="of:=[.D737]-[.D73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31" office:value-type="float" office:value="22816" calcext:value-type="float">
            <text:p>22816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264074074074074" calcext:value-type="float">
            <text:p>0,00264074074074074000</text:p>
          </table:table-cell>
          <table:table-cell table:formula="of:=[.D738]-[.D73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31" office:value-type="float" office:value="22847" calcext:value-type="float">
            <text:p>22847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26443287037037" calcext:value-type="float">
            <text:p>0,00264432870370370000</text:p>
          </table:table-cell>
          <table:table-cell table:formula="of:=[.D739]-[.D73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31" office:value-type="float" office:value="22878" calcext:value-type="float">
            <text:p>22878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264791666666667" calcext:value-type="float">
            <text:p>0,00264791666666667000</text:p>
          </table:table-cell>
          <table:table-cell table:formula="of:=[.D740]-[.D73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31" office:value-type="float" office:value="22909" calcext:value-type="float">
            <text:p>22909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265150462962963" calcext:value-type="float">
            <text:p>0,00265150462962963000</text:p>
          </table:table-cell>
          <table:table-cell table:formula="of:=[.D741]-[.D74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31" office:value-type="float" office:value="22940" calcext:value-type="float">
            <text:p>2294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265509259259259" calcext:value-type="float">
            <text:p>0,00265509259259259000</text:p>
          </table:table-cell>
          <table:table-cell table:formula="of:=[.D742]-[.D74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31" office:value-type="float" office:value="22971" calcext:value-type="float">
            <text:p>22971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265868055555556" calcext:value-type="float">
            <text:p>0,00265868055555556000</text:p>
          </table:table-cell>
          <table:table-cell table:formula="of:=[.D743]-[.D74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31" office:value-type="float" office:value="23002" calcext:value-type="float">
            <text:p>23002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266226851851852" calcext:value-type="float">
            <text:p>0,00266226851851852000</text:p>
          </table:table-cell>
          <table:table-cell table:formula="of:=[.D744]-[.D74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31" office:value-type="float" office:value="23033" calcext:value-type="float">
            <text:p>23033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266585648148148" calcext:value-type="float">
            <text:p>0,00266585648148148000</text:p>
          </table:table-cell>
          <table:table-cell table:formula="of:=[.D745]-[.D74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31" office:value-type="float" office:value="23064" calcext:value-type="float">
            <text:p>23064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266944444444444" calcext:value-type="float">
            <text:p>0,00266944444444444000</text:p>
          </table:table-cell>
          <table:table-cell table:formula="of:=[.D746]-[.D74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31" office:value-type="float" office:value="23095" calcext:value-type="float">
            <text:p>23095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267303240740741" calcext:value-type="float">
            <text:p>0,00267303240740741000</text:p>
          </table:table-cell>
          <table:table-cell table:formula="of:=[.D747]-[.D74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31" office:value-type="float" office:value="23126" calcext:value-type="float">
            <text:p>23126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267662037037037" calcext:value-type="float">
            <text:p>0,00267662037037037000</text:p>
          </table:table-cell>
          <table:table-cell table:formula="of:=[.D748]-[.D74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31" office:value-type="float" office:value="23157" calcext:value-type="float">
            <text:p>23157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268020833333333" calcext:value-type="float">
            <text:p>0,00268020833333333000</text:p>
          </table:table-cell>
          <table:table-cell table:formula="of:=[.D749]-[.D74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31" office:value-type="float" office:value="23188" calcext:value-type="float">
            <text:p>23188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26837962962963" calcext:value-type="float">
            <text:p>0,00268379629629630000</text:p>
          </table:table-cell>
          <table:table-cell table:formula="of:=[.D750]-[.D74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31" office:value-type="float" office:value="23219" calcext:value-type="float">
            <text:p>23219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268738425925926" calcext:value-type="float">
            <text:p>0,00268738425925926000</text:p>
          </table:table-cell>
          <table:table-cell table:formula="of:=[.D751]-[.D75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31" office:value-type="float" office:value="23250" calcext:value-type="float">
            <text:p>2325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269097222222222" calcext:value-type="float">
            <text:p>0,00269097222222222000</text:p>
          </table:table-cell>
          <table:table-cell table:formula="of:=[.D752]-[.D75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31" office:value-type="float" office:value="23281" calcext:value-type="float">
            <text:p>23281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269456018518519" calcext:value-type="float">
            <text:p>0,00269456018518519000</text:p>
          </table:table-cell>
          <table:table-cell table:formula="of:=[.D753]-[.D75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31" office:value-type="float" office:value="23312" calcext:value-type="float">
            <text:p>23312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269814814814815" calcext:value-type="float">
            <text:p>0,00269814814814815000</text:p>
          </table:table-cell>
          <table:table-cell table:formula="of:=[.D754]-[.D75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31" office:value-type="float" office:value="23343" calcext:value-type="float">
            <text:p>23343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270173611111111" calcext:value-type="float">
            <text:p>0,00270173611111111000</text:p>
          </table:table-cell>
          <table:table-cell table:formula="of:=[.D755]-[.D75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31" office:value-type="float" office:value="23374" calcext:value-type="float">
            <text:p>23374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270532407407407" calcext:value-type="float">
            <text:p>0,00270532407407407000</text:p>
          </table:table-cell>
          <table:table-cell table:formula="of:=[.D756]-[.D75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31" office:value-type="float" office:value="23405" calcext:value-type="float">
            <text:p>23405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270891203703704" calcext:value-type="float">
            <text:p>0,00270891203703704000</text:p>
          </table:table-cell>
          <table:table-cell table:formula="of:=[.D757]-[.D75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31" office:value-type="float" office:value="23436" calcext:value-type="float">
            <text:p>23436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27125" calcext:value-type="float">
            <text:p>0,00271250000000000000</text:p>
          </table:table-cell>
          <table:table-cell table:formula="of:=[.D758]-[.D75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31" office:value-type="float" office:value="23467" calcext:value-type="float">
            <text:p>23467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271608796296296" calcext:value-type="float">
            <text:p>0,00271608796296296000</text:p>
          </table:table-cell>
          <table:table-cell table:formula="of:=[.D759]-[.D75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31" office:value-type="float" office:value="23498" calcext:value-type="float">
            <text:p>23498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271967592592593" calcext:value-type="float">
            <text:p>0,00271967592592593000</text:p>
          </table:table-cell>
          <table:table-cell table:formula="of:=[.D760]-[.D75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31" office:value-type="float" office:value="23529" calcext:value-type="float">
            <text:p>23529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272326388888889" calcext:value-type="float">
            <text:p>0,00272326388888889000</text:p>
          </table:table-cell>
          <table:table-cell table:formula="of:=[.D761]-[.D76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31" office:value-type="float" office:value="23560" calcext:value-type="float">
            <text:p>2356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272685185185185" calcext:value-type="float">
            <text:p>0,00272685185185185000</text:p>
          </table:table-cell>
          <table:table-cell table:formula="of:=[.D762]-[.D76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31" office:value-type="float" office:value="23591" calcext:value-type="float">
            <text:p>23591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273043981481482" calcext:value-type="float">
            <text:p>0,00273043981481482000</text:p>
          </table:table-cell>
          <table:table-cell table:formula="of:=[.D763]-[.D76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31" office:value-type="float" office:value="23622" calcext:value-type="float">
            <text:p>23622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273402777777778" calcext:value-type="float">
            <text:p>0,00273402777777778000</text:p>
          </table:table-cell>
          <table:table-cell table:formula="of:=[.D764]-[.D76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31" office:value-type="float" office:value="23653" calcext:value-type="float">
            <text:p>23653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273761574074074" calcext:value-type="float">
            <text:p>0,00273761574074074000</text:p>
          </table:table-cell>
          <table:table-cell table:formula="of:=[.D765]-[.D76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31" office:value-type="float" office:value="23684" calcext:value-type="float">
            <text:p>23684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27412037037037" calcext:value-type="float">
            <text:p>0,00274120370370370000</text:p>
          </table:table-cell>
          <table:table-cell table:formula="of:=[.D766]-[.D765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31" office:value-type="float" office:value="23715" calcext:value-type="float">
            <text:p>23715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274479166666667" calcext:value-type="float">
            <text:p>0,00274479166666667000</text:p>
          </table:table-cell>
          <table:table-cell table:formula="of:=[.D767]-[.D766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31" office:value-type="float" office:value="23746" calcext:value-type="float">
            <text:p>23746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274837962962963" calcext:value-type="float">
            <text:p>0,00274837962962963000</text:p>
          </table:table-cell>
          <table:table-cell table:formula="of:=[.D768]-[.D767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31" office:value-type="float" office:value="23777" calcext:value-type="float">
            <text:p>23777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275196759259259" calcext:value-type="float">
            <text:p>0,00275196759259259000</text:p>
          </table:table-cell>
          <table:table-cell table:formula="of:=[.D769]-[.D768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31" office:value-type="float" office:value="23808" calcext:value-type="float">
            <text:p>23808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275555555555556" calcext:value-type="float">
            <text:p>0,00275555555555556000</text:p>
          </table:table-cell>
          <table:table-cell table:formula="of:=[.D770]-[.D769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31" office:value-type="float" office:value="23839" calcext:value-type="float">
            <text:p>23839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275914351851852" calcext:value-type="float">
            <text:p>0,00275914351851852000</text:p>
          </table:table-cell>
          <table:table-cell table:formula="of:=[.D771]-[.D770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31" office:value-type="float" office:value="23870" calcext:value-type="float">
            <text:p>2387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276273148148148" calcext:value-type="float">
            <text:p>0,00276273148148148000</text:p>
          </table:table-cell>
          <table:table-cell table:formula="of:=[.D772]-[.D771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31" office:value-type="float" office:value="23901" calcext:value-type="float">
            <text:p>23901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276631944444444" calcext:value-type="float">
            <text:p>0,00276631944444444000</text:p>
          </table:table-cell>
          <table:table-cell table:formula="of:=[.D773]-[.D772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31" office:value-type="float" office:value="23932" calcext:value-type="float">
            <text:p>23932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276990740740741" calcext:value-type="float">
            <text:p>0,00276990740740741000</text:p>
          </table:table-cell>
          <table:table-cell table:formula="of:=[.D774]-[.D773]" office:value-type="float" office:value="0.00000358796296296262" calcext:value-type="float">
            <text:p>0,0000035879629629626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31" office:value-type="float" office:value="23963" calcext:value-type="float">
            <text:p>23963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277349537037037" calcext:value-type="float">
            <text:p>0,00277349537037037000</text:p>
          </table:table-cell>
          <table:table-cell table:formula="of:=[.D775]-[.D774]" office:value-type="float" office:value="0.00000358796296296305" calcext:value-type="float">
            <text:p>0,0000035879629629630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31" office:value-type="float" office:value="23994" calcext:value-type="float">
            <text:p>23994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277708333333333" calcext:value-type="float">
            <text:p>0,00277708333333333000</text:p>
          </table:table-cell>
          <table:table-cell table:formula="of:=#REF!-[.D775]" office:value-type="string" office:string-value="" calcext:value-type="error">
            <text:p>#REF!</text:p>
          </table:table-cell>
        </table:table-row>
        <table:table-row table:style-name="ro1" table:number-rows-repeated="104780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56:33.692028761</meta:creation-date>
    <dc:date>2026-05-17T15:56:43.139032495</dc:date>
    <meta:editing-duration>PT11S</meta:editing-duration>
    <meta:editing-cycles>1</meta:editing-cycles>
    <meta:document-statistic meta:table-count="1" meta:cell-count="3875" meta:object-count="0"/>
    <meta:generator>LibreOffice/24.2.7.2$Linux_X86_64 LibreOffice_project/420$Build-2</meta:generator>
  </office:meta>
</office:document-meta>
</file>