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5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2</text:p>
          </table:table-cell>
          <table:table-cell table:style-name="ce1" office:value-type="string" calcext:value-type="string">
            <text:p>Ciclo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nterior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7037037037037" calcext:value-type="float">
            <text:p>0,00000370370370370370</text:p>
          </table:table-cell>
          <table:table-cell table:formula="of:=[.D3]-[.D2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2" office:value-type="float" office:value="64" calcext:value-type="float">
            <text:p>6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740740740740741" calcext:value-type="float">
            <text:p>0,00000740740740740741</text:p>
          </table:table-cell>
          <table:table-cell table:formula="of:=[.D4]-[.D3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2"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11111111111111" calcext:value-type="float">
            <text:p>0,00001111111111111110</text:p>
          </table:table-cell>
          <table:table-cell table:formula="of:=[.D5]-[.D4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2" office:value-type="float" office:value="128" calcext:value-type="float">
            <text:p>12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48148148148148" calcext:value-type="float">
            <text:p>0,00001481481481481480</text:p>
          </table:table-cell>
          <table:table-cell table:formula="of:=[.D6]-[.D5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2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85185185185185" calcext:value-type="float">
            <text:p>0,00001851851851851850</text:p>
          </table:table-cell>
          <table:table-cell table:formula="of:=[.D7]-[.D6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2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22222222222222" calcext:value-type="float">
            <text:p>0,00002222222222222220</text:p>
          </table:table-cell>
          <table:table-cell table:formula="of:=[.D8]-[.D7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2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59259259259259" calcext:value-type="float">
            <text:p>0,00002592592592592590</text:p>
          </table:table-cell>
          <table:table-cell table:formula="of:=[.D9]-[.D8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2" office:value-type="float" office:value="256" calcext:value-type="float">
            <text:p>25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96296296296296" calcext:value-type="float">
            <text:p>0,00002962962962962960</text:p>
          </table:table-cell>
          <table:table-cell table:formula="of:=[.D10]-[.D9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2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33333333333333" calcext:value-type="float">
            <text:p>0,00003333333333333330</text:p>
          </table:table-cell>
          <table:table-cell table:formula="of:=[.D11]-[.D10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2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7037037037037" calcext:value-type="float">
            <text:p>0,00003703703703703700</text:p>
          </table:table-cell>
          <table:table-cell table:formula="of:=[.D12]-[.D11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2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07407407407407" calcext:value-type="float">
            <text:p>0,00004074074074074070</text:p>
          </table:table-cell>
          <table:table-cell table:formula="of:=[.D13]-[.D12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2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44444444444444" calcext:value-type="float">
            <text:p>0,00004444444444444450</text:p>
          </table:table-cell>
          <table:table-cell table:formula="of:=[.D14]-[.D13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2" office:value-type="float" office:value="416" calcext:value-type="float">
            <text:p>41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81481481481482" calcext:value-type="float">
            <text:p>0,00004814814814814820</text:p>
          </table:table-cell>
          <table:table-cell table:formula="of:=[.D15]-[.D14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2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18518518518519" calcext:value-type="float">
            <text:p>0,00005185185185185190</text:p>
          </table:table-cell>
          <table:table-cell table:formula="of:=[.D16]-[.D15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2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555555555555556" calcext:value-type="float">
            <text:p>0,00005555555555555560</text:p>
          </table:table-cell>
          <table:table-cell table:formula="of:=[.D17]-[.D16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2" office:value-type="float" office:value="512" calcext:value-type="float">
            <text:p>51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592592592592593" calcext:value-type="float">
            <text:p>0,00005925925925925930</text:p>
          </table:table-cell>
          <table:table-cell table:formula="of:=[.D18]-[.D17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2" office:value-type="float" office:value="544" calcext:value-type="float">
            <text:p>54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62962962962963" calcext:value-type="float">
            <text:p>0,00006296296296296300</text:p>
          </table:table-cell>
          <table:table-cell table:formula="of:=[.D19]-[.D18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2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666666666666667" calcext:value-type="float">
            <text:p>0,00006666666666666670</text:p>
          </table:table-cell>
          <table:table-cell table:formula="of:=[.D20]-[.D19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2" office:value-type="float" office:value="608" calcext:value-type="float">
            <text:p>60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703703703703704" calcext:value-type="float">
            <text:p>0,00007037037037037040</text:p>
          </table:table-cell>
          <table:table-cell table:formula="of:=[.D21]-[.D20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2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740740740740741" calcext:value-type="float">
            <text:p>0,00007407407407407410</text:p>
          </table:table-cell>
          <table:table-cell table:formula="of:=[.D22]-[.D21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2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777777777777778" calcext:value-type="float">
            <text:p>0,00007777777777777780</text:p>
          </table:table-cell>
          <table:table-cell table:formula="of:=[.D23]-[.D22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2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814814814814815" calcext:value-type="float">
            <text:p>0,00008148148148148150</text:p>
          </table:table-cell>
          <table:table-cell table:formula="of:=[.D24]-[.D23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2" office:value-type="float" office:value="736" calcext:value-type="float">
            <text:p>73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851851851851852" calcext:value-type="float">
            <text:p>0,00008518518518518520</text:p>
          </table:table-cell>
          <table:table-cell table:formula="of:=[.D25]-[.D24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2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888888888888889" calcext:value-type="float">
            <text:p>0,00008888888888888890</text:p>
          </table:table-cell>
          <table:table-cell table:formula="of:=[.D26]-[.D25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2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925925925925926" calcext:value-type="float">
            <text:p>0,00009259259259259260</text:p>
          </table:table-cell>
          <table:table-cell table:formula="of:=[.D27]-[.D26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2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962962962962963" calcext:value-type="float">
            <text:p>0,00009629629629629630</text:p>
          </table:table-cell>
          <table:table-cell table:formula="of:=[.D28]-[.D27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2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" calcext:value-type="float">
            <text:p>0,00010000000000000000</text:p>
          </table:table-cell>
          <table:table-cell table:formula="of:=[.D29]-[.D28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2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03703703703704" calcext:value-type="float">
            <text:p>0,00010370370370370400</text:p>
          </table:table-cell>
          <table:table-cell table:formula="of:=[.D30]-[.D29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2" office:value-type="float" office:value="928" calcext:value-type="float">
            <text:p>92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07407407407407" calcext:value-type="float">
            <text:p>0,00010740740740740700</text:p>
          </table:table-cell>
          <table:table-cell table:formula="of:=[.D31]-[.D30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2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11111111111111" calcext:value-type="float">
            <text:p>0,00011111111111111100</text:p>
          </table:table-cell>
          <table:table-cell table:formula="of:=[.D32]-[.D31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2" office:value-type="float" office:value="992" calcext:value-type="float">
            <text:p>99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14814814814815" calcext:value-type="float">
            <text:p>0,00011481481481481500</text:p>
          </table:table-cell>
          <table:table-cell table:formula="of:=[.D33]-[.D32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2" office:value-type="float" office:value="1024" calcext:value-type="float">
            <text:p>102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18518518518519" calcext:value-type="float">
            <text:p>0,00011851851851851900</text:p>
          </table:table-cell>
          <table:table-cell table:formula="of:=[.D34]-[.D33]" office:value-type="float" office:value="0.0000037037037037037" calcext:value-type="float">
            <text:p>0,0000037037037037037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2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22222222222222" calcext:value-type="float">
            <text:p>0,00012222222222222200</text:p>
          </table:table-cell>
          <table:table-cell table:formula="of:=[.D35]-[.D34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2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25925925925926" calcext:value-type="float">
            <text:p>0,00012592592592592600</text:p>
          </table:table-cell>
          <table:table-cell table:formula="of:=[.D36]-[.D35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2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2962962962963" calcext:value-type="float">
            <text:p>0,00012962962962963000</text:p>
          </table:table-cell>
          <table:table-cell table:formula="of:=[.D37]-[.D36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2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33333333333333" calcext:value-type="float">
            <text:p>0,00013333333333333300</text:p>
          </table:table-cell>
          <table:table-cell table:formula="of:=[.D38]-[.D37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2" office:value-type="float" office:value="1184" calcext:value-type="float">
            <text:p>118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37037037037037" calcext:value-type="float">
            <text:p>0,00013703703703703700</text:p>
          </table:table-cell>
          <table:table-cell table:formula="of:=[.D39]-[.D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2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40740740740741" calcext:value-type="float">
            <text:p>0,00014074074074074100</text:p>
          </table:table-cell>
          <table:table-cell table:formula="of:=[.D40]-[.D39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2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44444444444444" calcext:value-type="float">
            <text:p>0,00014444444444444400</text:p>
          </table:table-cell>
          <table:table-cell table:formula="of:=[.D41]-[.D40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2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48148148148148" calcext:value-type="float">
            <text:p>0,00014814814814814800</text:p>
          </table:table-cell>
          <table:table-cell table:formula="of:=[.D42]-[.D41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2" office:value-type="float" office:value="1312" calcext:value-type="float">
            <text:p>131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51851851851852" calcext:value-type="float">
            <text:p>0,00015185185185185200</text:p>
          </table:table-cell>
          <table:table-cell table:formula="of:=[.D43]-[.D42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2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55555555555556" calcext:value-type="float">
            <text:p>0,00015555555555555600</text:p>
          </table:table-cell>
          <table:table-cell table:formula="of:=[.D44]-[.D43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2" office:value-type="float" office:value="1376" calcext:value-type="float">
            <text:p>137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59259259259259" calcext:value-type="float">
            <text:p>0,00015925925925925900</text:p>
          </table:table-cell>
          <table:table-cell table:formula="of:=[.D45]-[.D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2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62962962962963" calcext:value-type="float">
            <text:p>0,00016296296296296300</text:p>
          </table:table-cell>
          <table:table-cell table:formula="of:=[.D46]-[.D45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2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66666666666667" calcext:value-type="float">
            <text:p>0,00016666666666666700</text:p>
          </table:table-cell>
          <table:table-cell table:formula="of:=[.D47]-[.D46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2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7037037037037" calcext:value-type="float">
            <text:p>0,00017037037037037000</text:p>
          </table:table-cell>
          <table:table-cell table:formula="of:=[.D48]-[.D47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2" office:value-type="float" office:value="1504" calcext:value-type="float">
            <text:p>150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74074074074074" calcext:value-type="float">
            <text:p>0,00017407407407407400</text:p>
          </table:table-cell>
          <table:table-cell table:formula="of:=[.D49]-[.D48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2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77777777777778" calcext:value-type="float">
            <text:p>0,00017777777777777800</text:p>
          </table:table-cell>
          <table:table-cell table:formula="of:=[.D50]-[.D49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2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81481481481482" calcext:value-type="float">
            <text:p>0,00018148148148148100</text:p>
          </table:table-cell>
          <table:table-cell table:formula="of:=[.D51]-[.D5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2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85185185185185" calcext:value-type="float">
            <text:p>0,00018518518518518500</text:p>
          </table:table-cell>
          <table:table-cell table:formula="of:=[.D52]-[.D51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2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88888888888889" calcext:value-type="float">
            <text:p>0,00018888888888888900</text:p>
          </table:table-cell>
          <table:table-cell table:formula="of:=[.D53]-[.D52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2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92592592592593" calcext:value-type="float">
            <text:p>0,00019259259259259300</text:p>
          </table:table-cell>
          <table:table-cell table:formula="of:=[.D54]-[.D53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2" office:value-type="float" office:value="1696" calcext:value-type="float">
            <text:p>169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96296296296296" calcext:value-type="float">
            <text:p>0,00019629629629629600</text:p>
          </table:table-cell>
          <table:table-cell table:formula="of:=[.D55]-[.D54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2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" calcext:value-type="float">
            <text:p>0,00020000000000000000</text:p>
          </table:table-cell>
          <table:table-cell table:formula="of:=[.D56]-[.D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2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03703703703704" calcext:value-type="float">
            <text:p>0,00020370370370370400</text:p>
          </table:table-cell>
          <table:table-cell table:formula="of:=[.D57]-[.D56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2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07407407407407" calcext:value-type="float">
            <text:p>0,00020740740740740700</text:p>
          </table:table-cell>
          <table:table-cell table:formula="of:=[.D58]-[.D57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2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11111111111111" calcext:value-type="float">
            <text:p>0,00021111111111111100</text:p>
          </table:table-cell>
          <table:table-cell table:formula="of:=[.D59]-[.D58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2" office:value-type="float" office:value="1856" calcext:value-type="float">
            <text:p>185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14814814814815" calcext:value-type="float">
            <text:p>0,00021481481481481500</text:p>
          </table:table-cell>
          <table:table-cell table:formula="of:=[.D60]-[.D59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2" office:value-type="float" office:value="1888" calcext:value-type="float">
            <text:p>188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18518518518519" calcext:value-type="float">
            <text:p>0,00021851851851851900</text:p>
          </table:table-cell>
          <table:table-cell table:formula="of:=[.D61]-[.D60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2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22222222222222" calcext:value-type="float">
            <text:p>0,00022222222222222200</text:p>
          </table:table-cell>
          <table:table-cell table:formula="of:=[.D62]-[.D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2" office:value-type="float" office:value="1952" calcext:value-type="float">
            <text:p>195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25925925925926" calcext:value-type="float">
            <text:p>0,00022592592592592600</text:p>
          </table:table-cell>
          <table:table-cell table:formula="of:=[.D63]-[.D62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2" office:value-type="float" office:value="1984" calcext:value-type="float">
            <text:p>198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2962962962963" calcext:value-type="float">
            <text:p>0,00022962962962963000</text:p>
          </table:table-cell>
          <table:table-cell table:formula="of:=[.D64]-[.D63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2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33333333333333" calcext:value-type="float">
            <text:p>0,00023333333333333300</text:p>
          </table:table-cell>
          <table:table-cell table:formula="of:=[.D65]-[.D64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2" office:value-type="float" office:value="2048" calcext:value-type="float">
            <text:p>204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37037037037037" calcext:value-type="float">
            <text:p>0,00023703703703703700</text:p>
          </table:table-cell>
          <table:table-cell table:formula="of:=[.D66]-[.D65]" office:value-type="float" office:value="0.00000370370370370371" calcext:value-type="float">
            <text:p>0,00000370370370370371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2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40740740740741" calcext:value-type="float">
            <text:p>0,00024074074074074100</text:p>
          </table:table-cell>
          <table:table-cell table:formula="of:=[.D67]-[.D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2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44444444444444" calcext:value-type="float">
            <text:p>0,00024444444444444400</text:p>
          </table:table-cell>
          <table:table-cell table:formula="of:=[.D68]-[.D67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2" office:value-type="float" office:value="2144" calcext:value-type="float">
            <text:p>214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48148148148148" calcext:value-type="float">
            <text:p>0,00024814814814814800</text:p>
          </table:table-cell>
          <table:table-cell table:formula="of:=[.D69]-[.D6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2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51851851851852" calcext:value-type="float">
            <text:p>0,00025185185185185200</text:p>
          </table:table-cell>
          <table:table-cell table:formula="of:=[.D70]-[.D69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2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55555555555556" calcext:value-type="float">
            <text:p>0,00025555555555555600</text:p>
          </table:table-cell>
          <table:table-cell table:formula="of:=[.D71]-[.D7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2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59259259259259" calcext:value-type="float">
            <text:p>0,00025925925925925900</text:p>
          </table:table-cell>
          <table:table-cell table:formula="of:=[.D72]-[.D7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2" office:value-type="float" office:value="2272" calcext:value-type="float">
            <text:p>227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62962962962963" calcext:value-type="float">
            <text:p>0,00026296296296296300</text:p>
          </table:table-cell>
          <table:table-cell table:formula="of:=[.D73]-[.D72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2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66666666666667" calcext:value-type="float">
            <text:p>0,00026666666666666700</text:p>
          </table:table-cell>
          <table:table-cell table:formula="of:=[.D74]-[.D7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2" office:value-type="float" office:value="2336" calcext:value-type="float">
            <text:p>233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7037037037037" calcext:value-type="float">
            <text:p>0,00027037037037037000</text:p>
          </table:table-cell>
          <table:table-cell table:formula="of:=[.D75]-[.D74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2" office:value-type="float" office:value="2368" calcext:value-type="float">
            <text:p>236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74074074074074" calcext:value-type="float">
            <text:p>0,00027407407407407400</text:p>
          </table:table-cell>
          <table:table-cell table:formula="of:=[.D76]-[.D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2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77777777777778" calcext:value-type="float">
            <text:p>0,00027777777777777800</text:p>
          </table:table-cell>
          <table:table-cell table:formula="of:=[.D77]-[.D7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2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81481481481481" calcext:value-type="float">
            <text:p>0,00028148148148148100</text:p>
          </table:table-cell>
          <table:table-cell table:formula="of:=[.D78]-[.D77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2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85185185185185" calcext:value-type="float">
            <text:p>0,00028518518518518500</text:p>
          </table:table-cell>
          <table:table-cell table:formula="of:=[.D79]-[.D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2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88888888888889" calcext:value-type="float">
            <text:p>0,00028888888888888900</text:p>
          </table:table-cell>
          <table:table-cell table:formula="of:=[.D80]-[.D79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2" office:value-type="float" office:value="2528" calcext:value-type="float">
            <text:p>252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92592592592593" calcext:value-type="float">
            <text:p>0,00029259259259259300</text:p>
          </table:table-cell>
          <table:table-cell table:formula="of:=[.D81]-[.D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2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96296296296296" calcext:value-type="float">
            <text:p>0,00029629629629629600</text:p>
          </table:table-cell>
          <table:table-cell table:formula="of:=[.D82]-[.D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2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" calcext:value-type="float">
            <text:p>0,00030000000000000000</text:p>
          </table:table-cell>
          <table:table-cell table:formula="of:=[.D83]-[.D82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2" office:value-type="float" office:value="2624" calcext:value-type="float">
            <text:p>262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03703703703704" calcext:value-type="float">
            <text:p>0,00030370370370370400</text:p>
          </table:table-cell>
          <table:table-cell table:formula="of:=[.D84]-[.D8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2" office:value-type="float" office:value="2656" calcext:value-type="float">
            <text:p>265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07407407407407" calcext:value-type="float">
            <text:p>0,00030740740740740700</text:p>
          </table:table-cell>
          <table:table-cell table:formula="of:=[.D85]-[.D84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2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11111111111111" calcext:value-type="float">
            <text:p>0,00031111111111111100</text:p>
          </table:table-cell>
          <table:table-cell table:formula="of:=[.D86]-[.D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2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14814814814815" calcext:value-type="float">
            <text:p>0,00031481481481481500</text:p>
          </table:table-cell>
          <table:table-cell table:formula="of:=[.D87]-[.D86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2" office:value-type="float" office:value="2752" calcext:value-type="float">
            <text:p>275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18518518518519" calcext:value-type="float">
            <text:p>0,00031851851851851900</text:p>
          </table:table-cell>
          <table:table-cell table:formula="of:=[.D88]-[.D8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2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22222222222222" calcext:value-type="float">
            <text:p>0,00032222222222222200</text:p>
          </table:table-cell>
          <table:table-cell table:formula="of:=[.D89]-[.D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2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25925925925926" calcext:value-type="float">
            <text:p>0,00032592592592592600</text:p>
          </table:table-cell>
          <table:table-cell table:formula="of:=[.D90]-[.D89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2" office:value-type="float" office:value="2848" calcext:value-type="float">
            <text:p>284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2962962962963" calcext:value-type="float">
            <text:p>0,00032962962962963000</text:p>
          </table:table-cell>
          <table:table-cell table:formula="of:=[.D91]-[.D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2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33333333333333" calcext:value-type="float">
            <text:p>0,00033333333333333300</text:p>
          </table:table-cell>
          <table:table-cell table:formula="of:=[.D92]-[.D91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2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37037037037037" calcext:value-type="float">
            <text:p>0,00033703703703703700</text:p>
          </table:table-cell>
          <table:table-cell table:formula="of:=[.D93]-[.D9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2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40740740740741" calcext:value-type="float">
            <text:p>0,00034074074074074100</text:p>
          </table:table-cell>
          <table:table-cell table:formula="of:=[.D94]-[.D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2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44444444444444" calcext:value-type="float">
            <text:p>0,00034444444444444400</text:p>
          </table:table-cell>
          <table:table-cell table:formula="of:=[.D95]-[.D94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2" office:value-type="float" office:value="3008" calcext:value-type="float">
            <text:p>300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48148148148148" calcext:value-type="float">
            <text:p>0,00034814814814814800</text:p>
          </table:table-cell>
          <table:table-cell table:formula="of:=[.D96]-[.D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2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51851851851852" calcext:value-type="float">
            <text:p>0,00035185185185185200</text:p>
          </table:table-cell>
          <table:table-cell table:formula="of:=[.D97]-[.D96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2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55555555555556" calcext:value-type="float">
            <text:p>0,00035555555555555600</text:p>
          </table:table-cell>
          <table:table-cell table:formula="of:=[.D98]-[.D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2" office:value-type="float" office:value="3104" calcext:value-type="float">
            <text:p>310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59259259259259" calcext:value-type="float">
            <text:p>0,00035925925925925900</text:p>
          </table:table-cell>
          <table:table-cell table:formula="of:=[.D99]-[.D98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2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62962962962963" calcext:value-type="float">
            <text:p>0,00036296296296296300</text:p>
          </table:table-cell>
          <table:table-cell table:formula="of:=[.D100]-[.D9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2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66666666666667" calcext:value-type="float">
            <text:p>0,00036666666666666700</text:p>
          </table:table-cell>
          <table:table-cell table:formula="of:=[.D101]-[.D1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2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7037037037037" calcext:value-type="float">
            <text:p>0,00037037037037037000</text:p>
          </table:table-cell>
          <table:table-cell table:formula="of:=[.D102]-[.D101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2" office:value-type="float" office:value="3232" calcext:value-type="float">
            <text:p>323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74074074074074" calcext:value-type="float">
            <text:p>0,00037407407407407400</text:p>
          </table:table-cell>
          <table:table-cell table:formula="of:=[.D103]-[.D10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2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77777777777778" calcext:value-type="float">
            <text:p>0,00037777777777777800</text:p>
          </table:table-cell>
          <table:table-cell table:formula="of:=[.D104]-[.D103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2" office:value-type="float" office:value="3296" calcext:value-type="float">
            <text:p>329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81481481481482" calcext:value-type="float">
            <text:p>0,00038148148148148200</text:p>
          </table:table-cell>
          <table:table-cell table:formula="of:=[.D105]-[.D1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2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85185185185185" calcext:value-type="float">
            <text:p>0,00038518518518518500</text:p>
          </table:table-cell>
          <table:table-cell table:formula="of:=[.D106]-[.D10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2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88888888888889" calcext:value-type="float">
            <text:p>0,00038888888888888900</text:p>
          </table:table-cell>
          <table:table-cell table:formula="of:=[.D107]-[.D106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2" office:value-type="float" office:value="3392" calcext:value-type="float">
            <text:p>339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92592592592593" calcext:value-type="float">
            <text:p>0,00039259259259259300</text:p>
          </table:table-cell>
          <table:table-cell table:formula="of:=[.D108]-[.D10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2" office:value-type="float" office:value="3424" calcext:value-type="float">
            <text:p>342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96296296296296" calcext:value-type="float">
            <text:p>0,00039629629629629600</text:p>
          </table:table-cell>
          <table:table-cell table:formula="of:=[.D109]-[.D108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2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" calcext:value-type="float">
            <text:p>0,00040000000000000000</text:p>
          </table:table-cell>
          <table:table-cell table:formula="of:=[.D110]-[.D1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2" office:value-type="float" office:value="3488" calcext:value-type="float">
            <text:p>348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03703703703704" calcext:value-type="float">
            <text:p>0,00040370370370370400</text:p>
          </table:table-cell>
          <table:table-cell table:formula="of:=[.D111]-[.D11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2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07407407407407" calcext:value-type="float">
            <text:p>0,00040740740740740700</text:p>
          </table:table-cell>
          <table:table-cell table:formula="of:=[.D112]-[.D111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2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11111111111111" calcext:value-type="float">
            <text:p>0,00041111111111111100</text:p>
          </table:table-cell>
          <table:table-cell table:formula="of:=[.D113]-[.D11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2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14814814814815" calcext:value-type="float">
            <text:p>0,00041481481481481500</text:p>
          </table:table-cell>
          <table:table-cell table:formula="of:=[.D114]-[.D113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2" office:value-type="float" office:value="3616" calcext:value-type="float">
            <text:p>361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18518518518519" calcext:value-type="float">
            <text:p>0,00041851851851851900</text:p>
          </table:table-cell>
          <table:table-cell table:formula="of:=[.D115]-[.D1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2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22222222222222" calcext:value-type="float">
            <text:p>0,00042222222222222200</text:p>
          </table:table-cell>
          <table:table-cell table:formula="of:=[.D116]-[.D115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2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25925925925926" calcext:value-type="float">
            <text:p>0,00042592592592592600</text:p>
          </table:table-cell>
          <table:table-cell table:formula="of:=[.D117]-[.D11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2" office:value-type="float" office:value="3712" calcext:value-type="float">
            <text:p>371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2962962962963" calcext:value-type="float">
            <text:p>0,00042962962962963000</text:p>
          </table:table-cell>
          <table:table-cell table:formula="of:=[.D118]-[.D1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2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33333333333333" calcext:value-type="float">
            <text:p>0,00043333333333333300</text:p>
          </table:table-cell>
          <table:table-cell table:formula="of:=[.D119]-[.D118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2" office:value-type="float" office:value="3776" calcext:value-type="float">
            <text:p>377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37037037037037" calcext:value-type="float">
            <text:p>0,00043703703703703700</text:p>
          </table:table-cell>
          <table:table-cell table:formula="of:=[.D120]-[.D1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2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40740740740741" calcext:value-type="float">
            <text:p>0,00044074074074074100</text:p>
          </table:table-cell>
          <table:table-cell table:formula="of:=[.D121]-[.D120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2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44444444444444" calcext:value-type="float">
            <text:p>0,00044444444444444400</text:p>
          </table:table-cell>
          <table:table-cell table:formula="of:=[.D122]-[.D12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2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48148148148148" calcext:value-type="float">
            <text:p>0,00044814814814814800</text:p>
          </table:table-cell>
          <table:table-cell table:formula="of:=[.D123]-[.D1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2" office:value-type="float" office:value="3904" calcext:value-type="float">
            <text:p>390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51851851851852" calcext:value-type="float">
            <text:p>0,00045185185185185200</text:p>
          </table:table-cell>
          <table:table-cell table:formula="of:=[.D124]-[.D123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2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55555555555556" calcext:value-type="float">
            <text:p>0,00045555555555555600</text:p>
          </table:table-cell>
          <table:table-cell table:formula="of:=[.D125]-[.D1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2" office:value-type="float" office:value="3968" calcext:value-type="float">
            <text:p>396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59259259259259" calcext:value-type="float">
            <text:p>0,00045925925925925900</text:p>
          </table:table-cell>
          <table:table-cell table:formula="of:=[.D126]-[.D125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2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62962962962963" calcext:value-type="float">
            <text:p>0,00046296296296296300</text:p>
          </table:table-cell>
          <table:table-cell table:formula="of:=[.D127]-[.D12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2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66666666666667" calcext:value-type="float">
            <text:p>0,00046666666666666700</text:p>
          </table:table-cell>
          <table:table-cell table:formula="of:=[.D128]-[.D127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2" office:value-type="float" office:value="4064" calcext:value-type="float">
            <text:p>406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7037037037037" calcext:value-type="float">
            <text:p>0,00047037037037037000</text:p>
          </table:table-cell>
          <table:table-cell table:formula="of:=[.D129]-[.D1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2" office:value-type="float" office:value="4096" calcext:value-type="float">
            <text:p>409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74074074074074" calcext:value-type="float">
            <text:p>0,00047407407407407400</text:p>
          </table:table-cell>
          <table:table-cell table:formula="of:=[.D130]-[.D12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2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77777777777778" calcext:value-type="float">
            <text:p>0,00047777777777777800</text:p>
          </table:table-cell>
          <table:table-cell table:formula="of:=[.D131]-[.D130]" office:value-type="float" office:value="0.00000370370370370374" calcext:value-type="float">
            <text:p>0,00000370370370370374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2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81481481481482" calcext:value-type="float">
            <text:p>0,00048148148148148200</text:p>
          </table:table-cell>
          <table:table-cell table:formula="of:=[.D132]-[.D13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2" office:value-type="float" office:value="4192" calcext:value-type="float">
            <text:p>419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485185185185185" calcext:value-type="float">
            <text:p>0,00048518518518518500</text:p>
          </table:table-cell>
          <table:table-cell table:formula="of:=[.D133]-[.D1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2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488888888888889" calcext:value-type="float">
            <text:p>0,00048888888888888900</text:p>
          </table:table-cell>
          <table:table-cell table:formula="of:=[.D134]-[.D13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2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92592592592593" calcext:value-type="float">
            <text:p>0,00049259259259259300</text:p>
          </table:table-cell>
          <table:table-cell table:formula="of:=[.D135]-[.D134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2" office:value-type="float" office:value="4288" calcext:value-type="float">
            <text:p>428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96296296296296" calcext:value-type="float">
            <text:p>0,00049629629629629600</text:p>
          </table:table-cell>
          <table:table-cell table:formula="of:=[.D136]-[.D13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2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" calcext:value-type="float">
            <text:p>0,00050000000000000000</text:p>
          </table:table-cell>
          <table:table-cell table:formula="of:=[.D137]-[.D1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2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03703703703704" calcext:value-type="float">
            <text:p>0,00050370370370370400</text:p>
          </table:table-cell>
          <table:table-cell table:formula="of:=[.D138]-[.D1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2" office:value-type="float" office:value="4384" calcext:value-type="float">
            <text:p>438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507407407407407" calcext:value-type="float">
            <text:p>0,00050740740740740700</text:p>
          </table:table-cell>
          <table:table-cell table:formula="of:=[.D139]-[.D138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2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511111111111111" calcext:value-type="float">
            <text:p>0,00051111111111111100</text:p>
          </table:table-cell>
          <table:table-cell table:formula="of:=[.D140]-[.D1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2" office:value-type="float" office:value="4448" calcext:value-type="float">
            <text:p>444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514814814814815" calcext:value-type="float">
            <text:p>0,00051481481481481500</text:p>
          </table:table-cell>
          <table:table-cell table:formula="of:=[.D141]-[.D14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2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18518518518519" calcext:value-type="float">
            <text:p>0,00051851851851851900</text:p>
          </table:table-cell>
          <table:table-cell table:formula="of:=[.D142]-[.D14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2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522222222222222" calcext:value-type="float">
            <text:p>0,00052222222222222200</text:p>
          </table:table-cell>
          <table:table-cell table:formula="of:=[.D143]-[.D1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2" office:value-type="float" office:value="4544" calcext:value-type="float">
            <text:p>454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525925925925926" calcext:value-type="float">
            <text:p>0,00052592592592592600</text:p>
          </table:table-cell>
          <table:table-cell table:formula="of:=[.D144]-[.D143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2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52962962962963" calcext:value-type="float">
            <text:p>0,00052962962962963000</text:p>
          </table:table-cell>
          <table:table-cell table:formula="of:=[.D145]-[.D1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2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533333333333333" calcext:value-type="float">
            <text:p>0,00053333333333333300</text:p>
          </table:table-cell>
          <table:table-cell table:formula="of:=[.D146]-[.D14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2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537037037037037" calcext:value-type="float">
            <text:p>0,00053703703703703700</text:p>
          </table:table-cell>
          <table:table-cell table:formula="of:=[.D147]-[.D14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2" office:value-type="float" office:value="4672" calcext:value-type="float">
            <text:p>467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540740740740741" calcext:value-type="float">
            <text:p>0,00054074074074074100</text:p>
          </table:table-cell>
          <table:table-cell table:formula="of:=[.D148]-[.D1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2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544444444444444" calcext:value-type="float">
            <text:p>0,00054444444444444400</text:p>
          </table:table-cell>
          <table:table-cell table:formula="of:=[.D149]-[.D148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2" office:value-type="float" office:value="4736" calcext:value-type="float">
            <text:p>473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548148148148148" calcext:value-type="float">
            <text:p>0,00054814814814814800</text:p>
          </table:table-cell>
          <table:table-cell table:formula="of:=[.D150]-[.D14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2" office:value-type="float" office:value="4768" calcext:value-type="float">
            <text:p>476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551851851851852" calcext:value-type="float">
            <text:p>0,00055185185185185200</text:p>
          </table:table-cell>
          <table:table-cell table:formula="of:=[.D151]-[.D15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2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555555555555556" calcext:value-type="float">
            <text:p>0,00055555555555555600</text:p>
          </table:table-cell>
          <table:table-cell table:formula="of:=[.D152]-[.D15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2" office:value-type="float" office:value="4832" calcext:value-type="float">
            <text:p>483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559259259259259" calcext:value-type="float">
            <text:p>0,00055925925925925900</text:p>
          </table:table-cell>
          <table:table-cell table:formula="of:=[.D153]-[.D15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2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562962962962963" calcext:value-type="float">
            <text:p>0,00056296296296296300</text:p>
          </table:table-cell>
          <table:table-cell table:formula="of:=[.D154]-[.D153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2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566666666666667" calcext:value-type="float">
            <text:p>0,00056666666666666700</text:p>
          </table:table-cell>
          <table:table-cell table:formula="of:=[.D155]-[.D15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2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57037037037037" calcext:value-type="float">
            <text:p>0,00057037037037037000</text:p>
          </table:table-cell>
          <table:table-cell table:formula="of:=[.D156]-[.D1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2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574074074074074" calcext:value-type="float">
            <text:p>0,00057407407407407400</text:p>
          </table:table-cell>
          <table:table-cell table:formula="of:=[.D157]-[.D15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2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577777777777778" calcext:value-type="float">
            <text:p>0,00057777777777777800</text:p>
          </table:table-cell>
          <table:table-cell table:formula="of:=[.D158]-[.D15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2" office:value-type="float" office:value="5024" calcext:value-type="float">
            <text:p>502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581481481481481" calcext:value-type="float">
            <text:p>0,00058148148148148100</text:p>
          </table:table-cell>
          <table:table-cell table:formula="of:=[.D159]-[.D158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2" office:value-type="float" office:value="5056" calcext:value-type="float">
            <text:p>505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585185185185185" calcext:value-type="float">
            <text:p>0,00058518518518518500</text:p>
          </table:table-cell>
          <table:table-cell table:formula="of:=[.D160]-[.D15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2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588888888888889" calcext:value-type="float">
            <text:p>0,00058888888888888900</text:p>
          </table:table-cell>
          <table:table-cell table:formula="of:=[.D161]-[.D16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2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592592592592593" calcext:value-type="float">
            <text:p>0,00059259259259259300</text:p>
          </table:table-cell>
          <table:table-cell table:formula="of:=[.D162]-[.D1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2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596296296296296" calcext:value-type="float">
            <text:p>0,00059629629629629600</text:p>
          </table:table-cell>
          <table:table-cell table:formula="of:=[.D163]-[.D16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2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6" calcext:value-type="float">
            <text:p>0,00060000000000000000</text:p>
          </table:table-cell>
          <table:table-cell table:formula="of:=[.D164]-[.D163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2" office:value-type="float" office:value="5216" calcext:value-type="float">
            <text:p>521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603703703703704" calcext:value-type="float">
            <text:p>0,00060370370370370400</text:p>
          </table:table-cell>
          <table:table-cell table:formula="of:=[.D165]-[.D16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2" office:value-type="float" office:value="5248" calcext:value-type="float">
            <text:p>524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607407407407407" calcext:value-type="float">
            <text:p>0,00060740740740740700</text:p>
          </table:table-cell>
          <table:table-cell table:formula="of:=[.D166]-[.D16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2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611111111111111" calcext:value-type="float">
            <text:p>0,00061111111111111100</text:p>
          </table:table-cell>
          <table:table-cell table:formula="of:=[.D167]-[.D1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2" office:value-type="float" office:value="5312" calcext:value-type="float">
            <text:p>531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614814814814815" calcext:value-type="float">
            <text:p>0,00061481481481481500</text:p>
          </table:table-cell>
          <table:table-cell table:formula="of:=[.D168]-[.D167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2" office:value-type="float" office:value="5344" calcext:value-type="float">
            <text:p>534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618518518518519" calcext:value-type="float">
            <text:p>0,00061851851851851900</text:p>
          </table:table-cell>
          <table:table-cell table:formula="of:=[.D169]-[.D16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2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622222222222222" calcext:value-type="float">
            <text:p>0,00062222222222222200</text:p>
          </table:table-cell>
          <table:table-cell table:formula="of:=[.D170]-[.D16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2" office:value-type="float" office:value="5408" calcext:value-type="float">
            <text:p>540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625925925925926" calcext:value-type="float">
            <text:p>0,00062592592592592600</text:p>
          </table:table-cell>
          <table:table-cell table:formula="of:=[.D171]-[.D17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2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62962962962963" calcext:value-type="float">
            <text:p>0,00062962962962963000</text:p>
          </table:table-cell>
          <table:table-cell table:formula="of:=[.D172]-[.D17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2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633333333333333" calcext:value-type="float">
            <text:p>0,00063333333333333300</text:p>
          </table:table-cell>
          <table:table-cell table:formula="of:=[.D173]-[.D172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2" office:value-type="float" office:value="5504" calcext:value-type="float">
            <text:p>550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637037037037037" calcext:value-type="float">
            <text:p>0,00063703703703703700</text:p>
          </table:table-cell>
          <table:table-cell table:formula="of:=[.D174]-[.D17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2" office:value-type="float" office:value="5536" calcext:value-type="float">
            <text:p>553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640740740740741" calcext:value-type="float">
            <text:p>0,00064074074074074100</text:p>
          </table:table-cell>
          <table:table-cell table:formula="of:=[.D175]-[.D17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2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644444444444444" calcext:value-type="float">
            <text:p>0,00064444444444444400</text:p>
          </table:table-cell>
          <table:table-cell table:formula="of:=[.D176]-[.D1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2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648148148148148" calcext:value-type="float">
            <text:p>0,00064814814814814800</text:p>
          </table:table-cell>
          <table:table-cell table:formula="of:=[.D177]-[.D17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2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651851851851852" calcext:value-type="float">
            <text:p>0,00065185185185185200</text:p>
          </table:table-cell>
          <table:table-cell table:formula="of:=[.D178]-[.D177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2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655555555555556" calcext:value-type="float">
            <text:p>0,00065555555555555600</text:p>
          </table:table-cell>
          <table:table-cell table:formula="of:=[.D179]-[.D1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2" office:value-type="float" office:value="5696" calcext:value-type="float">
            <text:p>569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659259259259259" calcext:value-type="float">
            <text:p>0,00065925925925925900</text:p>
          </table:table-cell>
          <table:table-cell table:formula="of:=[.D180]-[.D17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2" office:value-type="float" office:value="5728" calcext:value-type="float">
            <text:p>572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662962962962963" calcext:value-type="float">
            <text:p>0,00066296296296296300</text:p>
          </table:table-cell>
          <table:table-cell table:formula="of:=[.D181]-[.D1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2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666666666666667" calcext:value-type="float">
            <text:p>0,00066666666666666700</text:p>
          </table:table-cell>
          <table:table-cell table:formula="of:=[.D182]-[.D1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2" office:value-type="float" office:value="5792" calcext:value-type="float">
            <text:p>579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67037037037037" calcext:value-type="float">
            <text:p>0,00067037037037037000</text:p>
          </table:table-cell>
          <table:table-cell table:formula="of:=[.D183]-[.D182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2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674074074074074" calcext:value-type="float">
            <text:p>0,00067407407407407400</text:p>
          </table:table-cell>
          <table:table-cell table:formula="of:=[.D184]-[.D18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2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677777777777778" calcext:value-type="float">
            <text:p>0,00067777777777777800</text:p>
          </table:table-cell>
          <table:table-cell table:formula="of:=[.D185]-[.D18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2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681481481481482" calcext:value-type="float">
            <text:p>0,00068148148148148200</text:p>
          </table:table-cell>
          <table:table-cell table:formula="of:=[.D186]-[.D1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2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685185185185185" calcext:value-type="float">
            <text:p>0,00068518518518518500</text:p>
          </table:table-cell>
          <table:table-cell table:formula="of:=[.D187]-[.D18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2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688888888888889" calcext:value-type="float">
            <text:p>0,00068888888888888900</text:p>
          </table:table-cell>
          <table:table-cell table:formula="of:=[.D188]-[.D187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2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692592592592593" calcext:value-type="float">
            <text:p>0,00069259259259259300</text:p>
          </table:table-cell>
          <table:table-cell table:formula="of:=[.D189]-[.D1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2" office:value-type="float" office:value="6016" calcext:value-type="float">
            <text:p>601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696296296296296" calcext:value-type="float">
            <text:p>0,00069629629629629600</text:p>
          </table:table-cell>
          <table:table-cell table:formula="of:=[.D190]-[.D18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2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7" calcext:value-type="float">
            <text:p>0,00070000000000000000</text:p>
          </table:table-cell>
          <table:table-cell table:formula="of:=[.D191]-[.D1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2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703703703703704" calcext:value-type="float">
            <text:p>0,00070370370370370400</text:p>
          </table:table-cell>
          <table:table-cell table:formula="of:=[.D192]-[.D19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2" office:value-type="float" office:value="6112" calcext:value-type="float">
            <text:p>611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707407407407407" calcext:value-type="float">
            <text:p>0,00070740740740740700</text:p>
          </table:table-cell>
          <table:table-cell table:formula="of:=[.D193]-[.D192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2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711111111111111" calcext:value-type="float">
            <text:p>0,00071111111111111100</text:p>
          </table:table-cell>
          <table:table-cell table:formula="of:=[.D194]-[.D1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2" office:value-type="float" office:value="6176" calcext:value-type="float">
            <text:p>617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714814814814815" calcext:value-type="float">
            <text:p>0,00071481481481481500</text:p>
          </table:table-cell>
          <table:table-cell table:formula="of:=[.D195]-[.D19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2" office:value-type="float" office:value="6208" calcext:value-type="float">
            <text:p>620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718518518518519" calcext:value-type="float">
            <text:p>0,00071851851851851900</text:p>
          </table:table-cell>
          <table:table-cell table:formula="of:=[.D196]-[.D1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2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722222222222222" calcext:value-type="float">
            <text:p>0,00072222222222222200</text:p>
          </table:table-cell>
          <table:table-cell table:formula="of:=[.D197]-[.D196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2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725925925925926" calcext:value-type="float">
            <text:p>0,00072592592592592600</text:p>
          </table:table-cell>
          <table:table-cell table:formula="of:=[.D198]-[.D1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2" office:value-type="float" office:value="6304" calcext:value-type="float">
            <text:p>630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72962962962963" calcext:value-type="float">
            <text:p>0,00072962962962963000</text:p>
          </table:table-cell>
          <table:table-cell table:formula="of:=[.D199]-[.D19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2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733333333333333" calcext:value-type="float">
            <text:p>0,00073333333333333300</text:p>
          </table:table-cell>
          <table:table-cell table:formula="of:=[.D200]-[.D19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2" office:value-type="float" office:value="6368" calcext:value-type="float">
            <text:p>636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737037037037037" calcext:value-type="float">
            <text:p>0,00073703703703703700</text:p>
          </table:table-cell>
          <table:table-cell table:formula="of:=[.D201]-[.D2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2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740740740740741" calcext:value-type="float">
            <text:p>0,00074074074074074100</text:p>
          </table:table-cell>
          <table:table-cell table:formula="of:=[.D202]-[.D201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2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744444444444445" calcext:value-type="float">
            <text:p>0,00074444444444444500</text:p>
          </table:table-cell>
          <table:table-cell table:formula="of:=[.D203]-[.D20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2" office:value-type="float" office:value="6464" calcext:value-type="float">
            <text:p>646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748148148148148" calcext:value-type="float">
            <text:p>0,00074814814814814800</text:p>
          </table:table-cell>
          <table:table-cell table:formula="of:=[.D204]-[.D20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2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751851851851852" calcext:value-type="float">
            <text:p>0,00075185185185185200</text:p>
          </table:table-cell>
          <table:table-cell table:formula="of:=[.D205]-[.D2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2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755555555555556" calcext:value-type="float">
            <text:p>0,00075555555555555600</text:p>
          </table:table-cell>
          <table:table-cell table:formula="of:=[.D206]-[.D20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2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759259259259259" calcext:value-type="float">
            <text:p>0,00075925925925925900</text:p>
          </table:table-cell>
          <table:table-cell table:formula="of:=[.D207]-[.D206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2" office:value-type="float" office:value="6592" calcext:value-type="float">
            <text:p>659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762962962962963" calcext:value-type="float">
            <text:p>0,00076296296296296300</text:p>
          </table:table-cell>
          <table:table-cell table:formula="of:=[.D208]-[.D20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2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766666666666667" calcext:value-type="float">
            <text:p>0,00076666666666666700</text:p>
          </table:table-cell>
          <table:table-cell table:formula="of:=[.D209]-[.D20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2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77037037037037" calcext:value-type="float">
            <text:p>0,00077037037037037000</text:p>
          </table:table-cell>
          <table:table-cell table:formula="of:=[.D210]-[.D2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2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774074074074074" calcext:value-type="float">
            <text:p>0,00077407407407407400</text:p>
          </table:table-cell>
          <table:table-cell table:formula="of:=[.D211]-[.D21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2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777777777777778" calcext:value-type="float">
            <text:p>0,00077777777777777800</text:p>
          </table:table-cell>
          <table:table-cell table:formula="of:=[.D212]-[.D211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2" office:value-type="float" office:value="6752" calcext:value-type="float">
            <text:p>675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781481481481482" calcext:value-type="float">
            <text:p>0,00078148148148148200</text:p>
          </table:table-cell>
          <table:table-cell table:formula="of:=[.D213]-[.D21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2" office:value-type="float" office:value="6784" calcext:value-type="float">
            <text:p>678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785185185185185" calcext:value-type="float">
            <text:p>0,00078518518518518500</text:p>
          </table:table-cell>
          <table:table-cell table:formula="of:=[.D214]-[.D21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2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788888888888889" calcext:value-type="float">
            <text:p>0,00078888888888888900</text:p>
          </table:table-cell>
          <table:table-cell table:formula="of:=[.D215]-[.D2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2" office:value-type="float" office:value="6848" calcext:value-type="float">
            <text:p>684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792592592592593" calcext:value-type="float">
            <text:p>0,00079259259259259300</text:p>
          </table:table-cell>
          <table:table-cell table:formula="of:=[.D216]-[.D21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2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796296296296296" calcext:value-type="float">
            <text:p>0,00079629629629629600</text:p>
          </table:table-cell>
          <table:table-cell table:formula="of:=[.D217]-[.D216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2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8" calcext:value-type="float">
            <text:p>0,00080000000000000000</text:p>
          </table:table-cell>
          <table:table-cell table:formula="of:=[.D218]-[.D2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2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803703703703704" calcext:value-type="float">
            <text:p>0,00080370370370370400</text:p>
          </table:table-cell>
          <table:table-cell table:formula="of:=[.D219]-[.D21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2" office:value-type="float" office:value="6976" calcext:value-type="float">
            <text:p>697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807407407407407" calcext:value-type="float">
            <text:p>0,00080740740740740700</text:p>
          </table:table-cell>
          <table:table-cell table:formula="of:=[.D220]-[.D2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2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811111111111111" calcext:value-type="float">
            <text:p>0,00081111111111111100</text:p>
          </table:table-cell>
          <table:table-cell table:formula="of:=[.D221]-[.D22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2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814814814814815" calcext:value-type="float">
            <text:p>0,00081481481481481500</text:p>
          </table:table-cell>
          <table:table-cell table:formula="of:=[.D222]-[.D221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2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818518518518519" calcext:value-type="float">
            <text:p>0,00081851851851851900</text:p>
          </table:table-cell>
          <table:table-cell table:formula="of:=[.D223]-[.D2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2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822222222222222" calcext:value-type="float">
            <text:p>0,00082222222222222200</text:p>
          </table:table-cell>
          <table:table-cell table:formula="of:=[.D224]-[.D22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2" office:value-type="float" office:value="7136" calcext:value-type="float">
            <text:p>713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825925925925926" calcext:value-type="float">
            <text:p>0,00082592592592592600</text:p>
          </table:table-cell>
          <table:table-cell table:formula="of:=[.D225]-[.D2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2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82962962962963" calcext:value-type="float">
            <text:p>0,00082962962962963000</text:p>
          </table:table-cell>
          <table:table-cell table:formula="of:=[.D226]-[.D225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2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833333333333333" calcext:value-type="float">
            <text:p>0,00083333333333333300</text:p>
          </table:table-cell>
          <table:table-cell table:formula="of:=[.D227]-[.D22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2" office:value-type="float" office:value="7232" calcext:value-type="float">
            <text:p>723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837037037037037" calcext:value-type="float">
            <text:p>0,00083703703703703700</text:p>
          </table:table-cell>
          <table:table-cell table:formula="of:=[.D228]-[.D22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2" office:value-type="float" office:value="7264" calcext:value-type="float">
            <text:p>726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840740740740741" calcext:value-type="float">
            <text:p>0,00084074074074074100</text:p>
          </table:table-cell>
          <table:table-cell table:formula="of:=[.D229]-[.D2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2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844444444444444" calcext:value-type="float">
            <text:p>0,00084444444444444400</text:p>
          </table:table-cell>
          <table:table-cell table:formula="of:=[.D230]-[.D22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2" office:value-type="float" office:value="7328" calcext:value-type="float">
            <text:p>732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848148148148148" calcext:value-type="float">
            <text:p>0,00084814814814814800</text:p>
          </table:table-cell>
          <table:table-cell table:formula="of:=[.D231]-[.D230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2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851851851851852" calcext:value-type="float">
            <text:p>0,00085185185185185200</text:p>
          </table:table-cell>
          <table:table-cell table:formula="of:=[.D232]-[.D23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2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855555555555556" calcext:value-type="float">
            <text:p>0,00085555555555555600</text:p>
          </table:table-cell>
          <table:table-cell table:formula="of:=[.D233]-[.D2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2" office:value-type="float" office:value="7424" calcext:value-type="float">
            <text:p>742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859259259259259" calcext:value-type="float">
            <text:p>0,00085925925925925900</text:p>
          </table:table-cell>
          <table:table-cell table:formula="of:=[.D234]-[.D23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2" office:value-type="float" office:value="7456" calcext:value-type="float">
            <text:p>745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862962962962963" calcext:value-type="float">
            <text:p>0,00086296296296296300</text:p>
          </table:table-cell>
          <table:table-cell table:formula="of:=[.D235]-[.D23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2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866666666666667" calcext:value-type="float">
            <text:p>0,00086666666666666700</text:p>
          </table:table-cell>
          <table:table-cell table:formula="of:=[.D236]-[.D235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2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87037037037037" calcext:value-type="float">
            <text:p>0,00087037037037037000</text:p>
          </table:table-cell>
          <table:table-cell table:formula="of:=[.D237]-[.D2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2" office:value-type="float" office:value="7552" calcext:value-type="float">
            <text:p>755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874074074074074" calcext:value-type="float">
            <text:p>0,00087407407407407400</text:p>
          </table:table-cell>
          <table:table-cell table:formula="of:=[.D238]-[.D2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2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877777777777778" calcext:value-type="float">
            <text:p>0,00087777777777777800</text:p>
          </table:table-cell>
          <table:table-cell table:formula="of:=[.D239]-[.D2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2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881481481481482" calcext:value-type="float">
            <text:p>0,00088148148148148200</text:p>
          </table:table-cell>
          <table:table-cell table:formula="of:=[.D240]-[.D2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2" office:value-type="float" office:value="7648" calcext:value-type="float">
            <text:p>764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885185185185185" calcext:value-type="float">
            <text:p>0,00088518518518518500</text:p>
          </table:table-cell>
          <table:table-cell table:formula="of:=[.D241]-[.D240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2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888888888888889" calcext:value-type="float">
            <text:p>0,00088888888888888900</text:p>
          </table:table-cell>
          <table:table-cell table:formula="of:=[.D242]-[.D24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2" office:value-type="float" office:value="7712" calcext:value-type="float">
            <text:p>771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892592592592593" calcext:value-type="float">
            <text:p>0,00089259259259259300</text:p>
          </table:table-cell>
          <table:table-cell table:formula="of:=[.D243]-[.D2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2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896296296296296" calcext:value-type="float">
            <text:p>0,00089629629629629600</text:p>
          </table:table-cell>
          <table:table-cell table:formula="of:=[.D244]-[.D24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2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9" calcext:value-type="float">
            <text:p>0,00090000000000000000</text:p>
          </table:table-cell>
          <table:table-cell table:formula="of:=[.D245]-[.D2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2" office:value-type="float" office:value="7808" calcext:value-type="float">
            <text:p>780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903703703703704" calcext:value-type="float">
            <text:p>0,00090370370370370400</text:p>
          </table:table-cell>
          <table:table-cell table:formula="of:=[.D246]-[.D245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2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907407407407407" calcext:value-type="float">
            <text:p>0,00090740740740740800</text:p>
          </table:table-cell>
          <table:table-cell table:formula="of:=[.D247]-[.D24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2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911111111111111" calcext:value-type="float">
            <text:p>0,00091111111111111100</text:p>
          </table:table-cell>
          <table:table-cell table:formula="of:=[.D248]-[.D2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2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914814814814815" calcext:value-type="float">
            <text:p>0,00091481481481481500</text:p>
          </table:table-cell>
          <table:table-cell table:formula="of:=[.D249]-[.D24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2" office:value-type="float" office:value="7936" calcext:value-type="float">
            <text:p>793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918518518518519" calcext:value-type="float">
            <text:p>0,00091851851851851900</text:p>
          </table:table-cell>
          <table:table-cell table:formula="of:=[.D250]-[.D24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2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922222222222222" calcext:value-type="float">
            <text:p>0,00092222222222222200</text:p>
          </table:table-cell>
          <table:table-cell table:formula="of:=[.D251]-[.D250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2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925925925925926" calcext:value-type="float">
            <text:p>0,00092592592592592600</text:p>
          </table:table-cell>
          <table:table-cell table:formula="of:=[.D252]-[.D25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2" office:value-type="float" office:value="8032" calcext:value-type="float">
            <text:p>803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92962962962963" calcext:value-type="float">
            <text:p>0,00092962962962963000</text:p>
          </table:table-cell>
          <table:table-cell table:formula="of:=[.D253]-[.D25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2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933333333333333" calcext:value-type="float">
            <text:p>0,00093333333333333300</text:p>
          </table:table-cell>
          <table:table-cell table:formula="of:=[.D254]-[.D25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2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937037037037037" calcext:value-type="float">
            <text:p>0,00093703703703703700</text:p>
          </table:table-cell>
          <table:table-cell table:formula="of:=[.D255]-[.D254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2" office:value-type="float" office:value="8128" calcext:value-type="float">
            <text:p>812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940740740740741" calcext:value-type="float">
            <text:p>0,00094074074074074100</text:p>
          </table:table-cell>
          <table:table-cell table:formula="of:=[.D256]-[.D2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2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944444444444445" calcext:value-type="float">
            <text:p>0,00094444444444444500</text:p>
          </table:table-cell>
          <table:table-cell table:formula="of:=[.D257]-[.D25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2" office:value-type="float" office:value="8192" calcext:value-type="float">
            <text:p>819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948148148148148" calcext:value-type="float">
            <text:p>0,00094814814814814800</text:p>
          </table:table-cell>
          <table:table-cell table:formula="of:=[.D258]-[.D25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2" office:value-type="float" office:value="8224" calcext:value-type="float">
            <text:p>822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951851851851852" calcext:value-type="float">
            <text:p>0,00095185185185185200</text:p>
          </table:table-cell>
          <table:table-cell table:formula="of:=[.D259]-[.D25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2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955555555555556" calcext:value-type="float">
            <text:p>0,00095555555555555600</text:p>
          </table:table-cell>
          <table:table-cell table:formula="of:=[.D260]-[.D259]" office:value-type="float" office:value="0.00000370370370370379" calcext:value-type="float">
            <text:p>0,00000370370370370379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2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959259259259259" calcext:value-type="float">
            <text:p>0,00095925925925925900</text:p>
          </table:table-cell>
          <table:table-cell table:formula="of:=[.D261]-[.D26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2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962962962962963" calcext:value-type="float">
            <text:p>0,00096296296296296300</text:p>
          </table:table-cell>
          <table:table-cell table:formula="of:=[.D262]-[.D2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2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966666666666667" calcext:value-type="float">
            <text:p>0,00096666666666666700</text:p>
          </table:table-cell>
          <table:table-cell table:formula="of:=[.D263]-[.D26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2" office:value-type="float" office:value="8384" calcext:value-type="float">
            <text:p>838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97037037037037" calcext:value-type="float">
            <text:p>0,00097037037037037000</text:p>
          </table:table-cell>
          <table:table-cell table:formula="of:=[.D264]-[.D26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2" office:value-type="float" office:value="8416" calcext:value-type="float">
            <text:p>841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974074074074074" calcext:value-type="float">
            <text:p>0,00097407407407407400</text:p>
          </table:table-cell>
          <table:table-cell table:formula="of:=[.D265]-[.D26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2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977777777777778" calcext:value-type="float">
            <text:p>0,00097777777777777800</text:p>
          </table:table-cell>
          <table:table-cell table:formula="of:=[.D266]-[.D26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2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981481481481481" calcext:value-type="float">
            <text:p>0,00098148148148148100</text:p>
          </table:table-cell>
          <table:table-cell table:formula="of:=[.D267]-[.D2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2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985185185185185" calcext:value-type="float">
            <text:p>0,00098518518518518500</text:p>
          </table:table-cell>
          <table:table-cell table:formula="of:=[.D268]-[.D267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2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988888888888889" calcext:value-type="float">
            <text:p>0,00098888888888888900</text:p>
          </table:table-cell>
          <table:table-cell table:formula="of:=[.D269]-[.D26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2" office:value-type="float" office:value="8576" calcext:value-type="float">
            <text:p>857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992592592592593" calcext:value-type="float">
            <text:p>0,00099259259259259300</text:p>
          </table:table-cell>
          <table:table-cell table:formula="of:=[.D270]-[.D26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2" office:value-type="float" office:value="8608" calcext:value-type="float">
            <text:p>860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996296296296296" calcext:value-type="float">
            <text:p>0,00099629629629629600</text:p>
          </table:table-cell>
          <table:table-cell table:formula="of:=[.D271]-[.D27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2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" calcext:value-type="float">
            <text:p>0,00100000000000000000</text:p>
          </table:table-cell>
          <table:table-cell table:formula="of:=[.D272]-[.D27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2" office:value-type="float" office:value="8672" calcext:value-type="float">
            <text:p>867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0037037037037" calcext:value-type="float">
            <text:p>0,00100370370370370000</text:p>
          </table:table-cell>
          <table:table-cell table:formula="of:=[.D273]-[.D27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2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00740740740741" calcext:value-type="float">
            <text:p>0,00100740740740741000</text:p>
          </table:table-cell>
          <table:table-cell table:formula="of:=[.D274]-[.D27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2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01111111111111" calcext:value-type="float">
            <text:p>0,00101111111111111000</text:p>
          </table:table-cell>
          <table:table-cell table:formula="of:=[.D275]-[.D27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2" office:value-type="float" office:value="8768" calcext:value-type="float">
            <text:p>876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01481481481481" calcext:value-type="float">
            <text:p>0,00101481481481481000</text:p>
          </table:table-cell>
          <table:table-cell table:formula="of:=[.D276]-[.D2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2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01851851851852" calcext:value-type="float">
            <text:p>0,00101851851851852000</text:p>
          </table:table-cell>
          <table:table-cell table:formula="of:=[.D277]-[.D276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2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02222222222222" calcext:value-type="float">
            <text:p>0,00102222222222222000</text:p>
          </table:table-cell>
          <table:table-cell table:formula="of:=[.D278]-[.D27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2" office:value-type="float" office:value="8864" calcext:value-type="float">
            <text:p>886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02592592592593" calcext:value-type="float">
            <text:p>0,00102592592592593000</text:p>
          </table:table-cell>
          <table:table-cell table:formula="of:=[.D279]-[.D2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2" office:value-type="float" office:value="8896" calcext:value-type="float">
            <text:p>889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02962962962963" calcext:value-type="float">
            <text:p>0,00102962962962963000</text:p>
          </table:table-cell>
          <table:table-cell table:formula="of:=[.D280]-[.D27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2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03333333333333" calcext:value-type="float">
            <text:p>0,00103333333333333000</text:p>
          </table:table-cell>
          <table:table-cell table:formula="of:=[.D281]-[.D2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2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03703703703704" calcext:value-type="float">
            <text:p>0,00103703703703704000</text:p>
          </table:table-cell>
          <table:table-cell table:formula="of:=[.D282]-[.D2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2" office:value-type="float" office:value="8992" calcext:value-type="float">
            <text:p>899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04074074074074" calcext:value-type="float">
            <text:p>0,00104074074074074000</text:p>
          </table:table-cell>
          <table:table-cell table:formula="of:=[.D283]-[.D28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2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04444444444444" calcext:value-type="float">
            <text:p>0,00104444444444444000</text:p>
          </table:table-cell>
          <table:table-cell table:formula="of:=[.D284]-[.D28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2" office:value-type="float" office:value="9056" calcext:value-type="float">
            <text:p>905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04814814814815" calcext:value-type="float">
            <text:p>0,00104814814814815000</text:p>
          </table:table-cell>
          <table:table-cell table:formula="of:=[.D285]-[.D28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2" office:value-type="float" office:value="9088" calcext:value-type="float">
            <text:p>908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05185185185185" calcext:value-type="float">
            <text:p>0,00105185185185185000</text:p>
          </table:table-cell>
          <table:table-cell table:formula="of:=[.D286]-[.D2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2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05555555555556" calcext:value-type="float">
            <text:p>0,00105555555555556000</text:p>
          </table:table-cell>
          <table:table-cell table:formula="of:=[.D287]-[.D286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2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05925925925926" calcext:value-type="float">
            <text:p>0,00105925925925926000</text:p>
          </table:table-cell>
          <table:table-cell table:formula="of:=[.D288]-[.D28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2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06296296296296" calcext:value-type="float">
            <text:p>0,00106296296296296000</text:p>
          </table:table-cell>
          <table:table-cell table:formula="of:=[.D289]-[.D2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2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06666666666667" calcext:value-type="float">
            <text:p>0,00106666666666667000</text:p>
          </table:table-cell>
          <table:table-cell table:formula="of:=[.D290]-[.D28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2" office:value-type="float" office:value="9248" calcext:value-type="float">
            <text:p>924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07037037037037" calcext:value-type="float">
            <text:p>0,00107037037037037000</text:p>
          </table:table-cell>
          <table:table-cell table:formula="of:=[.D291]-[.D2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2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07407407407407" calcext:value-type="float">
            <text:p>0,00107407407407407000</text:p>
          </table:table-cell>
          <table:table-cell table:formula="of:=[.D292]-[.D29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2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07777777777778" calcext:value-type="float">
            <text:p>0,00107777777777778000</text:p>
          </table:table-cell>
          <table:table-cell table:formula="of:=[.D293]-[.D29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2" office:value-type="float" office:value="9344" calcext:value-type="float">
            <text:p>934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08148148148148" calcext:value-type="float">
            <text:p>0,00108148148148148000</text:p>
          </table:table-cell>
          <table:table-cell table:formula="of:=[.D294]-[.D2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2" office:value-type="float" office:value="9376" calcext:value-type="float">
            <text:p>937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08518518518519" calcext:value-type="float">
            <text:p>0,00108518518518519000</text:p>
          </table:table-cell>
          <table:table-cell table:formula="of:=[.D295]-[.D29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2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08888888888889" calcext:value-type="float">
            <text:p>0,00108888888888889000</text:p>
          </table:table-cell>
          <table:table-cell table:formula="of:=[.D296]-[.D2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2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09259259259259" calcext:value-type="float">
            <text:p>0,00109259259259259000</text:p>
          </table:table-cell>
          <table:table-cell table:formula="of:=[.D297]-[.D296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2" office:value-type="float" office:value="9472" calcext:value-type="float">
            <text:p>947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0962962962963" calcext:value-type="float">
            <text:p>0,00109629629629630000</text:p>
          </table:table-cell>
          <table:table-cell table:formula="of:=[.D298]-[.D2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2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1" calcext:value-type="float">
            <text:p>0,00110000000000000000</text:p>
          </table:table-cell>
          <table:table-cell table:formula="of:=[.D299]-[.D29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2" office:value-type="float" office:value="9536" calcext:value-type="float">
            <text:p>953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1037037037037" calcext:value-type="float">
            <text:p>0,00110370370370370000</text:p>
          </table:table-cell>
          <table:table-cell table:formula="of:=[.D300]-[.D29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2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10740740740741" calcext:value-type="float">
            <text:p>0,00110740740740741000</text:p>
          </table:table-cell>
          <table:table-cell table:formula="of:=[.D301]-[.D3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2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11111111111111" calcext:value-type="float">
            <text:p>0,00111111111111111000</text:p>
          </table:table-cell>
          <table:table-cell table:formula="of:=[.D302]-[.D30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2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11481481481481" calcext:value-type="float">
            <text:p>0,00111481481481481000</text:p>
          </table:table-cell>
          <table:table-cell table:formula="of:=[.D303]-[.D30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2" office:value-type="float" office:value="9664" calcext:value-type="float">
            <text:p>966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11851851851852" calcext:value-type="float">
            <text:p>0,00111851851851852000</text:p>
          </table:table-cell>
          <table:table-cell table:formula="of:=[.D304]-[.D30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2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12222222222222" calcext:value-type="float">
            <text:p>0,00112222222222222000</text:p>
          </table:table-cell>
          <table:table-cell table:formula="of:=[.D305]-[.D3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2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12592592592593" calcext:value-type="float">
            <text:p>0,00112592592592593000</text:p>
          </table:table-cell>
          <table:table-cell table:formula="of:=[.D306]-[.D305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2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12962962962963" calcext:value-type="float">
            <text:p>0,00112962962962963000</text:p>
          </table:table-cell>
          <table:table-cell table:formula="of:=[.D307]-[.D30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2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13333333333333" calcext:value-type="float">
            <text:p>0,00113333333333333000</text:p>
          </table:table-cell>
          <table:table-cell table:formula="of:=[.D308]-[.D30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2" office:value-type="float" office:value="9824" calcext:value-type="float">
            <text:p>982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13703703703704" calcext:value-type="float">
            <text:p>0,00113703703703704000</text:p>
          </table:table-cell>
          <table:table-cell table:formula="of:=[.D309]-[.D30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2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14074074074074" calcext:value-type="float">
            <text:p>0,00114074074074074000</text:p>
          </table:table-cell>
          <table:table-cell table:formula="of:=[.D310]-[.D3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2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14444444444444" calcext:value-type="float">
            <text:p>0,00114444444444444000</text:p>
          </table:table-cell>
          <table:table-cell table:formula="of:=[.D311]-[.D31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2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14814814814815" calcext:value-type="float">
            <text:p>0,00114814814814815000</text:p>
          </table:table-cell>
          <table:table-cell table:formula="of:=[.D312]-[.D31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2" office:value-type="float" office:value="9952" calcext:value-type="float">
            <text:p>995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15185185185185" calcext:value-type="float">
            <text:p>0,00115185185185185000</text:p>
          </table:table-cell>
          <table:table-cell table:formula="of:=[.D313]-[.D31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2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15555555555556" calcext:value-type="float">
            <text:p>0,00115555555555556000</text:p>
          </table:table-cell>
          <table:table-cell table:formula="of:=[.D314]-[.D31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2" office:value-type="float" office:value="10016" calcext:value-type="float">
            <text:p>1001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15925925925926" calcext:value-type="float">
            <text:p>0,00115925925925926000</text:p>
          </table:table-cell>
          <table:table-cell table:formula="of:=[.D315]-[.D3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2" office:value-type="float" office:value="10048" calcext:value-type="float">
            <text:p>1004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16296296296296" calcext:value-type="float">
            <text:p>0,00116296296296296000</text:p>
          </table:table-cell>
          <table:table-cell table:formula="of:=[.D316]-[.D315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2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16666666666667" calcext:value-type="float">
            <text:p>0,00116666666666667000</text:p>
          </table:table-cell>
          <table:table-cell table:formula="of:=[.D317]-[.D31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2" office:value-type="float" office:value="10112" calcext:value-type="float">
            <text:p>1011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17037037037037" calcext:value-type="float">
            <text:p>0,00117037037037037000</text:p>
          </table:table-cell>
          <table:table-cell table:formula="of:=[.D318]-[.D3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2" office:value-type="float" office:value="10144" calcext:value-type="float">
            <text:p>1014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17407407407407" calcext:value-type="float">
            <text:p>0,00117407407407407000</text:p>
          </table:table-cell>
          <table:table-cell table:formula="of:=[.D319]-[.D31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2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17777777777778" calcext:value-type="float">
            <text:p>0,00117777777777778000</text:p>
          </table:table-cell>
          <table:table-cell table:formula="of:=[.D320]-[.D3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2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18148148148148" calcext:value-type="float">
            <text:p>0,00118148148148148000</text:p>
          </table:table-cell>
          <table:table-cell table:formula="of:=[.D321]-[.D32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2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18518518518519" calcext:value-type="float">
            <text:p>0,00118518518518519000</text:p>
          </table:table-cell>
          <table:table-cell table:formula="of:=[.D322]-[.D32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2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18888888888889" calcext:value-type="float">
            <text:p>0,00118888888888889000</text:p>
          </table:table-cell>
          <table:table-cell table:formula="of:=[.D323]-[.D3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2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19259259259259" calcext:value-type="float">
            <text:p>0,00119259259259259000</text:p>
          </table:table-cell>
          <table:table-cell table:formula="of:=[.D324]-[.D32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2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1962962962963" calcext:value-type="float">
            <text:p>0,00119629629629630000</text:p>
          </table:table-cell>
          <table:table-cell table:formula="of:=[.D325]-[.D3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2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2" calcext:value-type="float">
            <text:p>0,00120000000000000000</text:p>
          </table:table-cell>
          <table:table-cell table:formula="of:=[.D326]-[.D325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2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2037037037037" calcext:value-type="float">
            <text:p>0,00120370370370370000</text:p>
          </table:table-cell>
          <table:table-cell table:formula="of:=[.D327]-[.D32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2" office:value-type="float" office:value="10432" calcext:value-type="float">
            <text:p>1043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20740740740741" calcext:value-type="float">
            <text:p>0,00120740740740741000</text:p>
          </table:table-cell>
          <table:table-cell table:formula="of:=[.D328]-[.D32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2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21111111111111" calcext:value-type="float">
            <text:p>0,00121111111111111000</text:p>
          </table:table-cell>
          <table:table-cell table:formula="of:=[.D329]-[.D3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2" office:value-type="float" office:value="10496" calcext:value-type="float">
            <text:p>1049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21481481481481" calcext:value-type="float">
            <text:p>0,00121481481481481000</text:p>
          </table:table-cell>
          <table:table-cell table:formula="of:=[.D330]-[.D32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2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21851851851852" calcext:value-type="float">
            <text:p>0,00121851851851852000</text:p>
          </table:table-cell>
          <table:table-cell table:formula="of:=[.D331]-[.D33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2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22222222222222" calcext:value-type="float">
            <text:p>0,00122222222222222000</text:p>
          </table:table-cell>
          <table:table-cell table:formula="of:=[.D332]-[.D33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2" office:value-type="float" office:value="10592" calcext:value-type="float">
            <text:p>1059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22592592592593" calcext:value-type="float">
            <text:p>0,00122592592592593000</text:p>
          </table:table-cell>
          <table:table-cell table:formula="of:=[.D333]-[.D3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2" office:value-type="float" office:value="10624" calcext:value-type="float">
            <text:p>1062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22962962962963" calcext:value-type="float">
            <text:p>0,00122962962962963000</text:p>
          </table:table-cell>
          <table:table-cell table:formula="of:=[.D334]-[.D33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2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23333333333333" calcext:value-type="float">
            <text:p>0,00123333333333333000</text:p>
          </table:table-cell>
          <table:table-cell table:formula="of:=[.D335]-[.D334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2" office:value-type="float" office:value="10688" calcext:value-type="float">
            <text:p>1068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23703703703704" calcext:value-type="float">
            <text:p>0,00123703703703704000</text:p>
          </table:table-cell>
          <table:table-cell table:formula="of:=[.D336]-[.D33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2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24074074074074" calcext:value-type="float">
            <text:p>0,00124074074074074000</text:p>
          </table:table-cell>
          <table:table-cell table:formula="of:=[.D337]-[.D3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2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24444444444444" calcext:value-type="float">
            <text:p>0,00124444444444444000</text:p>
          </table:table-cell>
          <table:table-cell table:formula="of:=[.D338]-[.D3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2" office:value-type="float" office:value="10784" calcext:value-type="float">
            <text:p>10784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24814814814815" calcext:value-type="float">
            <text:p>0,00124814814814815000</text:p>
          </table:table-cell>
          <table:table-cell table:formula="of:=[.D339]-[.D3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2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25185185185185" calcext:value-type="float">
            <text:p>0,00125185185185185000</text:p>
          </table:table-cell>
          <table:table-cell table:formula="of:=[.D340]-[.D3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2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25555555555556" calcext:value-type="float">
            <text:p>0,00125555555555556000</text:p>
          </table:table-cell>
          <table:table-cell table:formula="of:=[.D341]-[.D34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2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25925925925926" calcext:value-type="float">
            <text:p>0,00125925925925926000</text:p>
          </table:table-cell>
          <table:table-cell table:formula="of:=[.D342]-[.D34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2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26296296296296" calcext:value-type="float">
            <text:p>0,00126296296296296000</text:p>
          </table:table-cell>
          <table:table-cell table:formula="of:=[.D343]-[.D3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2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26666666666667" calcext:value-type="float">
            <text:p>0,00126666666666667000</text:p>
          </table:table-cell>
          <table:table-cell table:formula="of:=[.D344]-[.D34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2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27037037037037" calcext:value-type="float">
            <text:p>0,00127037037037037000</text:p>
          </table:table-cell>
          <table:table-cell table:formula="of:=[.D345]-[.D344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2" office:value-type="float" office:value="11008" calcext:value-type="float">
            <text:p>1100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27407407407407" calcext:value-type="float">
            <text:p>0,00127407407407407000</text:p>
          </table:table-cell>
          <table:table-cell table:formula="of:=[.D346]-[.D34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2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27777777777778" calcext:value-type="float">
            <text:p>0,00127777777777778000</text:p>
          </table:table-cell>
          <table:table-cell table:formula="of:=[.D347]-[.D34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2" office:value-type="float" office:value="11072" calcext:value-type="float">
            <text:p>1107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28148148148148" calcext:value-type="float">
            <text:p>0,00128148148148148000</text:p>
          </table:table-cell>
          <table:table-cell table:formula="of:=[.D348]-[.D3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2" office:value-type="float" office:value="11104" calcext:value-type="float">
            <text:p>11104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28518518518519" calcext:value-type="float">
            <text:p>0,00128518518518519000</text:p>
          </table:table-cell>
          <table:table-cell table:formula="of:=[.D349]-[.D34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2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28888888888889" calcext:value-type="float">
            <text:p>0,00128888888888889000</text:p>
          </table:table-cell>
          <table:table-cell table:formula="of:=[.D350]-[.D34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2" office:value-type="float" office:value="11168" calcext:value-type="float">
            <text:p>11168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29259259259259" calcext:value-type="float">
            <text:p>0,00129259259259259000</text:p>
          </table:table-cell>
          <table:table-cell table:formula="of:=[.D351]-[.D35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2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2962962962963" calcext:value-type="float">
            <text:p>0,00129629629629630000</text:p>
          </table:table-cell>
          <table:table-cell table:formula="of:=[.D352]-[.D35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2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3" calcext:value-type="float">
            <text:p>0,00130000000000000000</text:p>
          </table:table-cell>
          <table:table-cell table:formula="of:=[.D353]-[.D35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2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3037037037037" calcext:value-type="float">
            <text:p>0,00130370370370370000</text:p>
          </table:table-cell>
          <table:table-cell table:formula="of:=[.D354]-[.D35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2" office:value-type="float" office:value="11296" calcext:value-type="float">
            <text:p>11296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30740740740741" calcext:value-type="float">
            <text:p>0,00130740740740741000</text:p>
          </table:table-cell>
          <table:table-cell table:formula="of:=[.D355]-[.D354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2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31111111111111" calcext:value-type="float">
            <text:p>0,00131111111111111000</text:p>
          </table:table-cell>
          <table:table-cell table:formula="of:=[.D356]-[.D3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2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31481481481481" calcext:value-type="float">
            <text:p>0,00131481481481481000</text:p>
          </table:table-cell>
          <table:table-cell table:formula="of:=[.D357]-[.D35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2" office:value-type="float" office:value="11392" calcext:value-type="float">
            <text:p>1139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31851851851852" calcext:value-type="float">
            <text:p>0,00131851851851852000</text:p>
          </table:table-cell>
          <table:table-cell table:formula="of:=[.D358]-[.D35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2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32222222222222" calcext:value-type="float">
            <text:p>0,00132222222222222000</text:p>
          </table:table-cell>
          <table:table-cell table:formula="of:=[.D359]-[.D35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2" office:value-type="float" office:value="11456" calcext:value-type="float">
            <text:p>1145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32592592592593" calcext:value-type="float">
            <text:p>0,00132592592592593000</text:p>
          </table:table-cell>
          <table:table-cell table:formula="of:=[.D360]-[.D35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2" office:value-type="float" office:value="11488" calcext:value-type="float">
            <text:p>11488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32962962962963" calcext:value-type="float">
            <text:p>0,00132962962962963000</text:p>
          </table:table-cell>
          <table:table-cell table:formula="of:=[.D361]-[.D36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2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33333333333333" calcext:value-type="float">
            <text:p>0,00133333333333333000</text:p>
          </table:table-cell>
          <table:table-cell table:formula="of:=[.D362]-[.D3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2" office:value-type="float" office:value="11552" calcext:value-type="float">
            <text:p>11552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33703703703704" calcext:value-type="float">
            <text:p>0,00133703703703704000</text:p>
          </table:table-cell>
          <table:table-cell table:formula="of:=[.D363]-[.D36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2" office:value-type="float" office:value="11584" calcext:value-type="float">
            <text:p>1158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34074074074074" calcext:value-type="float">
            <text:p>0,00134074074074074000</text:p>
          </table:table-cell>
          <table:table-cell table:formula="of:=[.D364]-[.D363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2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34444444444444" calcext:value-type="float">
            <text:p>0,00134444444444444000</text:p>
          </table:table-cell>
          <table:table-cell table:formula="of:=[.D365]-[.D36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2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34814814814815" calcext:value-type="float">
            <text:p>0,00134814814814815000</text:p>
          </table:table-cell>
          <table:table-cell table:formula="of:=[.D366]-[.D36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2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35185185185185" calcext:value-type="float">
            <text:p>0,00135185185185185000</text:p>
          </table:table-cell>
          <table:table-cell table:formula="of:=[.D367]-[.D3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2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35555555555556" calcext:value-type="float">
            <text:p>0,00135555555555556000</text:p>
          </table:table-cell>
          <table:table-cell table:formula="of:=[.D368]-[.D36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2" office:value-type="float" office:value="11744" calcext:value-type="float">
            <text:p>11744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35925925925926" calcext:value-type="float">
            <text:p>0,00135925925925926000</text:p>
          </table:table-cell>
          <table:table-cell table:formula="of:=[.D369]-[.D36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2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36296296296296" calcext:value-type="float">
            <text:p>0,00136296296296296000</text:p>
          </table:table-cell>
          <table:table-cell table:formula="of:=[.D370]-[.D36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2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36666666666667" calcext:value-type="float">
            <text:p>0,00136666666666667000</text:p>
          </table:table-cell>
          <table:table-cell table:formula="of:=[.D371]-[.D37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2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37037037037037" calcext:value-type="float">
            <text:p>0,00137037037037037000</text:p>
          </table:table-cell>
          <table:table-cell table:formula="of:=[.D372]-[.D37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2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37407407407407" calcext:value-type="float">
            <text:p>0,00137407407407407000</text:p>
          </table:table-cell>
          <table:table-cell table:formula="of:=[.D373]-[.D37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2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37777777777778" calcext:value-type="float">
            <text:p>0,00137777777777778000</text:p>
          </table:table-cell>
          <table:table-cell table:formula="of:=[.D374]-[.D373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2" office:value-type="float" office:value="11936" calcext:value-type="float">
            <text:p>11936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38148148148148" calcext:value-type="float">
            <text:p>0,00138148148148148000</text:p>
          </table:table-cell>
          <table:table-cell table:formula="of:=[.D375]-[.D37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2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38518518518519" calcext:value-type="float">
            <text:p>0,00138518518518519000</text:p>
          </table:table-cell>
          <table:table-cell table:formula="of:=[.D376]-[.D3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2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38888888888889" calcext:value-type="float">
            <text:p>0,00138888888888889000</text:p>
          </table:table-cell>
          <table:table-cell table:formula="of:=[.D377]-[.D37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2" office:value-type="float" office:value="12032" calcext:value-type="float">
            <text:p>1203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39259259259259" calcext:value-type="float">
            <text:p>0,00139259259259259000</text:p>
          </table:table-cell>
          <table:table-cell table:formula="of:=[.D378]-[.D37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2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3962962962963" calcext:value-type="float">
            <text:p>0,00139629629629630000</text:p>
          </table:table-cell>
          <table:table-cell table:formula="of:=[.D379]-[.D3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2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4" calcext:value-type="float">
            <text:p>0,00140000000000000000</text:p>
          </table:table-cell>
          <table:table-cell table:formula="of:=[.D380]-[.D37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2" office:value-type="float" office:value="12128" calcext:value-type="float">
            <text:p>12128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4037037037037" calcext:value-type="float">
            <text:p>0,00140370370370370000</text:p>
          </table:table-cell>
          <table:table-cell table:formula="of:=[.D381]-[.D3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2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40740740740741" calcext:value-type="float">
            <text:p>0,00140740740740741000</text:p>
          </table:table-cell>
          <table:table-cell table:formula="of:=[.D382]-[.D3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2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41111111111111" calcext:value-type="float">
            <text:p>0,00141111111111111000</text:p>
          </table:table-cell>
          <table:table-cell table:formula="of:=[.D383]-[.D38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2" office:value-type="float" office:value="12224" calcext:value-type="float">
            <text:p>1222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41481481481481" calcext:value-type="float">
            <text:p>0,00141481481481481000</text:p>
          </table:table-cell>
          <table:table-cell table:formula="of:=[.D384]-[.D383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2" office:value-type="float" office:value="12256" calcext:value-type="float">
            <text:p>12256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41851851851852" calcext:value-type="float">
            <text:p>0,00141851851851852000</text:p>
          </table:table-cell>
          <table:table-cell table:formula="of:=[.D385]-[.D38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2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42222222222222" calcext:value-type="float">
            <text:p>0,00142222222222222000</text:p>
          </table:table-cell>
          <table:table-cell table:formula="of:=[.D386]-[.D3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2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42592592592593" calcext:value-type="float">
            <text:p>0,00142592592592593000</text:p>
          </table:table-cell>
          <table:table-cell table:formula="of:=[.D387]-[.D38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2" office:value-type="float" office:value="12352" calcext:value-type="float">
            <text:p>1235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42962962962963" calcext:value-type="float">
            <text:p>0,00142962962962963000</text:p>
          </table:table-cell>
          <table:table-cell table:formula="of:=[.D388]-[.D38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2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43333333333333" calcext:value-type="float">
            <text:p>0,00143333333333333000</text:p>
          </table:table-cell>
          <table:table-cell table:formula="of:=[.D389]-[.D3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2" office:value-type="float" office:value="12416" calcext:value-type="float">
            <text:p>1241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43703703703704" calcext:value-type="float">
            <text:p>0,00143703703703704000</text:p>
          </table:table-cell>
          <table:table-cell table:formula="of:=[.D390]-[.D38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2" office:value-type="float" office:value="12448" calcext:value-type="float">
            <text:p>12448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44074074074074" calcext:value-type="float">
            <text:p>0,00144074074074074000</text:p>
          </table:table-cell>
          <table:table-cell table:formula="of:=[.D391]-[.D3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2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44444444444444" calcext:value-type="float">
            <text:p>0,00144444444444444000</text:p>
          </table:table-cell>
          <table:table-cell table:formula="of:=[.D392]-[.D39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2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44814814814815" calcext:value-type="float">
            <text:p>0,00144814814814815000</text:p>
          </table:table-cell>
          <table:table-cell table:formula="of:=[.D393]-[.D392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2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45185185185185" calcext:value-type="float">
            <text:p>0,00145185185185185000</text:p>
          </table:table-cell>
          <table:table-cell table:formula="of:=[.D394]-[.D3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2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45555555555556" calcext:value-type="float">
            <text:p>0,00145555555555556000</text:p>
          </table:table-cell>
          <table:table-cell table:formula="of:=[.D395]-[.D39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2" office:value-type="float" office:value="12608" calcext:value-type="float">
            <text:p>1260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45925925925926" calcext:value-type="float">
            <text:p>0,00145925925925926000</text:p>
          </table:table-cell>
          <table:table-cell table:formula="of:=[.D396]-[.D3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2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46296296296296" calcext:value-type="float">
            <text:p>0,00146296296296296000</text:p>
          </table:table-cell>
          <table:table-cell table:formula="of:=[.D397]-[.D39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2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46666666666667" calcext:value-type="float">
            <text:p>0,00146666666666667000</text:p>
          </table:table-cell>
          <table:table-cell table:formula="of:=[.D398]-[.D3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2" office:value-type="float" office:value="12704" calcext:value-type="float">
            <text:p>12704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47037037037037" calcext:value-type="float">
            <text:p>0,00147037037037037000</text:p>
          </table:table-cell>
          <table:table-cell table:formula="of:=[.D399]-[.D39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2" office:value-type="float" office:value="12736" calcext:value-type="float">
            <text:p>1273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47407407407407" calcext:value-type="float">
            <text:p>0,00147407407407407000</text:p>
          </table:table-cell>
          <table:table-cell table:formula="of:=[.D400]-[.D39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2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47777777777778" calcext:value-type="float">
            <text:p>0,00147777777777778000</text:p>
          </table:table-cell>
          <table:table-cell table:formula="of:=[.D401]-[.D4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2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48148148148148" calcext:value-type="float">
            <text:p>0,00148148148148148000</text:p>
          </table:table-cell>
          <table:table-cell table:formula="of:=[.D402]-[.D40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2" office:value-type="float" office:value="12832" calcext:value-type="float">
            <text:p>12832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48518518518519" calcext:value-type="float">
            <text:p>0,00148518518518518000</text:p>
          </table:table-cell>
          <table:table-cell table:formula="of:=[.D403]-[.D402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2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48888888888889" calcext:value-type="float">
            <text:p>0,00148888888888889000</text:p>
          </table:table-cell>
          <table:table-cell table:formula="of:=[.D404]-[.D40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2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49259259259259" calcext:value-type="float">
            <text:p>0,00149259259259259000</text:p>
          </table:table-cell>
          <table:table-cell table:formula="of:=[.D405]-[.D4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2" office:value-type="float" office:value="12928" calcext:value-type="float">
            <text:p>1292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4962962962963" calcext:value-type="float">
            <text:p>0,00149629629629630000</text:p>
          </table:table-cell>
          <table:table-cell table:formula="of:=[.D406]-[.D40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2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5" calcext:value-type="float">
            <text:p>0,00150000000000000000</text:p>
          </table:table-cell>
          <table:table-cell table:formula="of:=[.D407]-[.D40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2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5037037037037" calcext:value-type="float">
            <text:p>0,00150370370370370000</text:p>
          </table:table-cell>
          <table:table-cell table:formula="of:=[.D408]-[.D40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2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50740740740741" calcext:value-type="float">
            <text:p>0,00150740740740741000</text:p>
          </table:table-cell>
          <table:table-cell table:formula="of:=[.D409]-[.D40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2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51111111111111" calcext:value-type="float">
            <text:p>0,00151111111111111000</text:p>
          </table:table-cell>
          <table:table-cell table:formula="of:=[.D410]-[.D4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2" office:value-type="float" office:value="13088" calcext:value-type="float">
            <text:p>13088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51481481481481" calcext:value-type="float">
            <text:p>0,00151481481481481000</text:p>
          </table:table-cell>
          <table:table-cell table:formula="of:=[.D411]-[.D41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2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51851851851852" calcext:value-type="float">
            <text:p>0,00151851851851852000</text:p>
          </table:table-cell>
          <table:table-cell table:formula="of:=[.D412]-[.D41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2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52222222222222" calcext:value-type="float">
            <text:p>0,00152222222222222000</text:p>
          </table:table-cell>
          <table:table-cell table:formula="of:=[.D413]-[.D412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2" office:value-type="float" office:value="13184" calcext:value-type="float">
            <text:p>1318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52592592592593" calcext:value-type="float">
            <text:p>0,00152592592592593000</text:p>
          </table:table-cell>
          <table:table-cell table:formula="of:=[.D414]-[.D41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2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52962962962963" calcext:value-type="float">
            <text:p>0,00152962962962963000</text:p>
          </table:table-cell>
          <table:table-cell table:formula="of:=[.D415]-[.D4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2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53333333333333" calcext:value-type="float">
            <text:p>0,00153333333333333000</text:p>
          </table:table-cell>
          <table:table-cell table:formula="of:=[.D416]-[.D41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2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53703703703704" calcext:value-type="float">
            <text:p>0,00153703703703704000</text:p>
          </table:table-cell>
          <table:table-cell table:formula="of:=[.D417]-[.D41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2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54074074074074" calcext:value-type="float">
            <text:p>0,00154074074074074000</text:p>
          </table:table-cell>
          <table:table-cell table:formula="of:=[.D418]-[.D4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2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54444444444444" calcext:value-type="float">
            <text:p>0,00154444444444444000</text:p>
          </table:table-cell>
          <table:table-cell table:formula="of:=[.D419]-[.D41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2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54814814814815" calcext:value-type="float">
            <text:p>0,00154814814814815000</text:p>
          </table:table-cell>
          <table:table-cell table:formula="of:=[.D420]-[.D4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2" office:value-type="float" office:value="13408" calcext:value-type="float">
            <text:p>13408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55185185185185" calcext:value-type="float">
            <text:p>0,00155185185185185000</text:p>
          </table:table-cell>
          <table:table-cell table:formula="of:=[.D421]-[.D42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2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55555555555556" calcext:value-type="float">
            <text:p>0,00155555555555556000</text:p>
          </table:table-cell>
          <table:table-cell table:formula="of:=[.D422]-[.D421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2" office:value-type="float" office:value="13472" calcext:value-type="float">
            <text:p>13472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55925925925926" calcext:value-type="float">
            <text:p>0,00155925925925926000</text:p>
          </table:table-cell>
          <table:table-cell table:formula="of:=[.D423]-[.D4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2" office:value-type="float" office:value="13504" calcext:value-type="float">
            <text:p>1350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56296296296296" calcext:value-type="float">
            <text:p>0,00156296296296296000</text:p>
          </table:table-cell>
          <table:table-cell table:formula="of:=[.D424]-[.D42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2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56666666666667" calcext:value-type="float">
            <text:p>0,00156666666666667000</text:p>
          </table:table-cell>
          <table:table-cell table:formula="of:=[.D425]-[.D4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2" office:value-type="float" office:value="13568" calcext:value-type="float">
            <text:p>1356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57037037037037" calcext:value-type="float">
            <text:p>0,00157037037037037000</text:p>
          </table:table-cell>
          <table:table-cell table:formula="of:=[.D426]-[.D42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2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57407407407407" calcext:value-type="float">
            <text:p>0,00157407407407407000</text:p>
          </table:table-cell>
          <table:table-cell table:formula="of:=[.D427]-[.D42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2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57777777777778" calcext:value-type="float">
            <text:p>0,00157777777777778000</text:p>
          </table:table-cell>
          <table:table-cell table:formula="of:=[.D428]-[.D42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2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58148148148148" calcext:value-type="float">
            <text:p>0,00158148148148148000</text:p>
          </table:table-cell>
          <table:table-cell table:formula="of:=[.D429]-[.D4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2" office:value-type="float" office:value="13696" calcext:value-type="float">
            <text:p>1369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58518518518519" calcext:value-type="float">
            <text:p>0,00158518518518519000</text:p>
          </table:table-cell>
          <table:table-cell table:formula="of:=[.D430]-[.D42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2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58888888888889" calcext:value-type="float">
            <text:p>0,00158888888888889000</text:p>
          </table:table-cell>
          <table:table-cell table:formula="of:=[.D431]-[.D43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2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59259259259259" calcext:value-type="float">
            <text:p>0,00159259259259259000</text:p>
          </table:table-cell>
          <table:table-cell table:formula="of:=[.D432]-[.D431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2" office:value-type="float" office:value="13792" calcext:value-type="float">
            <text:p>13792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5962962962963" calcext:value-type="float">
            <text:p>0,00159629629629630000</text:p>
          </table:table-cell>
          <table:table-cell table:formula="of:=[.D433]-[.D4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2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6" calcext:value-type="float">
            <text:p>0,00160000000000000000</text:p>
          </table:table-cell>
          <table:table-cell table:formula="of:=[.D434]-[.D43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2" office:value-type="float" office:value="13856" calcext:value-type="float">
            <text:p>13856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6037037037037" calcext:value-type="float">
            <text:p>0,00160370370370370000</text:p>
          </table:table-cell>
          <table:table-cell table:formula="of:=[.D435]-[.D43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2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60740740740741" calcext:value-type="float">
            <text:p>0,00160740740740741000</text:p>
          </table:table-cell>
          <table:table-cell table:formula="of:=[.D436]-[.D43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2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61111111111111" calcext:value-type="float">
            <text:p>0,00161111111111111000</text:p>
          </table:table-cell>
          <table:table-cell table:formula="of:=[.D437]-[.D4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2" office:value-type="float" office:value="13952" calcext:value-type="float">
            <text:p>1395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61481481481481" calcext:value-type="float">
            <text:p>0,00161481481481481000</text:p>
          </table:table-cell>
          <table:table-cell table:formula="of:=[.D438]-[.D4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2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61851851851852" calcext:value-type="float">
            <text:p>0,00161851851851852000</text:p>
          </table:table-cell>
          <table:table-cell table:formula="of:=[.D439]-[.D4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2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62222222222222" calcext:value-type="float">
            <text:p>0,00162222222222222000</text:p>
          </table:table-cell>
          <table:table-cell table:formula="of:=[.D440]-[.D4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2" office:value-type="float" office:value="14048" calcext:value-type="float">
            <text:p>14048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62592592592593" calcext:value-type="float">
            <text:p>0,00162592592592593000</text:p>
          </table:table-cell>
          <table:table-cell table:formula="of:=[.D441]-[.D44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2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62962962962963" calcext:value-type="float">
            <text:p>0,00162962962962963000</text:p>
          </table:table-cell>
          <table:table-cell table:formula="of:=[.D442]-[.D441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2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63333333333333" calcext:value-type="float">
            <text:p>0,00163333333333333000</text:p>
          </table:table-cell>
          <table:table-cell table:formula="of:=[.D443]-[.D4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2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63703703703704" calcext:value-type="float">
            <text:p>0,00163703703703704000</text:p>
          </table:table-cell>
          <table:table-cell table:formula="of:=[.D444]-[.D44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2" office:value-type="float" office:value="14176" calcext:value-type="float">
            <text:p>14176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64074074074074" calcext:value-type="float">
            <text:p>0,00164074074074074000</text:p>
          </table:table-cell>
          <table:table-cell table:formula="of:=[.D445]-[.D4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2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64444444444444" calcext:value-type="float">
            <text:p>0,00164444444444444000</text:p>
          </table:table-cell>
          <table:table-cell table:formula="of:=[.D446]-[.D44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2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64814814814815" calcext:value-type="float">
            <text:p>0,00164814814814815000</text:p>
          </table:table-cell>
          <table:table-cell table:formula="of:=[.D447]-[.D44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2" office:value-type="float" office:value="14272" calcext:value-type="float">
            <text:p>1427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65185185185185" calcext:value-type="float">
            <text:p>0,00165185185185185000</text:p>
          </table:table-cell>
          <table:table-cell table:formula="of:=[.D448]-[.D4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2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65555555555556" calcext:value-type="float">
            <text:p>0,00165555555555556000</text:p>
          </table:table-cell>
          <table:table-cell table:formula="of:=[.D449]-[.D44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2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65925925925926" calcext:value-type="float">
            <text:p>0,00165925925925926000</text:p>
          </table:table-cell>
          <table:table-cell table:formula="of:=[.D450]-[.D44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2" office:value-type="float" office:value="14368" calcext:value-type="float">
            <text:p>14368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66296296296296" calcext:value-type="float">
            <text:p>0,00166296296296296000</text:p>
          </table:table-cell>
          <table:table-cell table:formula="of:=[.D451]-[.D450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2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66666666666667" calcext:value-type="float">
            <text:p>0,00166666666666667000</text:p>
          </table:table-cell>
          <table:table-cell table:formula="of:=[.D452]-[.D45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2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67037037037037" calcext:value-type="float">
            <text:p>0,00167037037037037000</text:p>
          </table:table-cell>
          <table:table-cell table:formula="of:=[.D453]-[.D45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2" office:value-type="float" office:value="14464" calcext:value-type="float">
            <text:p>1446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67407407407407" calcext:value-type="float">
            <text:p>0,00167407407407407000</text:p>
          </table:table-cell>
          <table:table-cell table:formula="of:=[.D454]-[.D45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2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67777777777778" calcext:value-type="float">
            <text:p>0,00167777777777778000</text:p>
          </table:table-cell>
          <table:table-cell table:formula="of:=[.D455]-[.D45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2" office:value-type="float" office:value="14528" calcext:value-type="float">
            <text:p>1452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68148148148148" calcext:value-type="float">
            <text:p>0,00168148148148148000</text:p>
          </table:table-cell>
          <table:table-cell table:formula="of:=[.D456]-[.D4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2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68518518518519" calcext:value-type="float">
            <text:p>0,00168518518518519000</text:p>
          </table:table-cell>
          <table:table-cell table:formula="of:=[.D457]-[.D45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2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68888888888889" calcext:value-type="float">
            <text:p>0,00168888888888889000</text:p>
          </table:table-cell>
          <table:table-cell table:formula="of:=[.D458]-[.D45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2" office:value-type="float" office:value="14624" calcext:value-type="float">
            <text:p>14624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69259259259259" calcext:value-type="float">
            <text:p>0,00169259259259259000</text:p>
          </table:table-cell>
          <table:table-cell table:formula="of:=[.D459]-[.D45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2" office:value-type="float" office:value="14656" calcext:value-type="float">
            <text:p>1465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6962962962963" calcext:value-type="float">
            <text:p>0,00169629629629630000</text:p>
          </table:table-cell>
          <table:table-cell table:formula="of:=[.D460]-[.D45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2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7" calcext:value-type="float">
            <text:p>0,00170000000000000000</text:p>
          </table:table-cell>
          <table:table-cell table:formula="of:=[.D461]-[.D460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2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7037037037037" calcext:value-type="float">
            <text:p>0,00170370370370370000</text:p>
          </table:table-cell>
          <table:table-cell table:formula="of:=[.D462]-[.D4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2" office:value-type="float" office:value="14752" calcext:value-type="float">
            <text:p>14752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70740740740741" calcext:value-type="float">
            <text:p>0,00170740740740741000</text:p>
          </table:table-cell>
          <table:table-cell table:formula="of:=[.D463]-[.D46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2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71111111111111" calcext:value-type="float">
            <text:p>0,00171111111111111000</text:p>
          </table:table-cell>
          <table:table-cell table:formula="of:=[.D464]-[.D46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2" office:value-type="float" office:value="14816" calcext:value-type="float">
            <text:p>14816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71481481481481" calcext:value-type="float">
            <text:p>0,00171481481481481000</text:p>
          </table:table-cell>
          <table:table-cell table:formula="of:=[.D465]-[.D46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2" office:value-type="float" office:value="14848" calcext:value-type="float">
            <text:p>1484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71851851851852" calcext:value-type="float">
            <text:p>0,00171851851851852000</text:p>
          </table:table-cell>
          <table:table-cell table:formula="of:=[.D466]-[.D46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2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72222222222222" calcext:value-type="float">
            <text:p>0,00172222222222222000</text:p>
          </table:table-cell>
          <table:table-cell table:formula="of:=[.D467]-[.D4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2" office:value-type="float" office:value="14912" calcext:value-type="float">
            <text:p>1491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72592592592593" calcext:value-type="float">
            <text:p>0,00172592592592593000</text:p>
          </table:table-cell>
          <table:table-cell table:formula="of:=[.D468]-[.D46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2" office:value-type="float" office:value="14944" calcext:value-type="float">
            <text:p>14944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72962962962963" calcext:value-type="float">
            <text:p>0,00172962962962963000</text:p>
          </table:table-cell>
          <table:table-cell table:formula="of:=[.D469]-[.D46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2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73333333333333" calcext:value-type="float">
            <text:p>0,00173333333333333000</text:p>
          </table:table-cell>
          <table:table-cell table:formula="of:=[.D470]-[.D46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2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73703703703704" calcext:value-type="float">
            <text:p>0,00173703703703704000</text:p>
          </table:table-cell>
          <table:table-cell table:formula="of:=[.D471]-[.D470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2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74074074074074" calcext:value-type="float">
            <text:p>0,00174074074074074000</text:p>
          </table:table-cell>
          <table:table-cell table:formula="of:=[.D472]-[.D47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2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74444444444444" calcext:value-type="float">
            <text:p>0,00174444444444444000</text:p>
          </table:table-cell>
          <table:table-cell table:formula="of:=[.D473]-[.D47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2" office:value-type="float" office:value="15104" calcext:value-type="float">
            <text:p>1510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74814814814815" calcext:value-type="float">
            <text:p>0,00174814814814815000</text:p>
          </table:table-cell>
          <table:table-cell table:formula="of:=[.D474]-[.D47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2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75185185185185" calcext:value-type="float">
            <text:p>0,00175185185185185000</text:p>
          </table:table-cell>
          <table:table-cell table:formula="of:=[.D475]-[.D47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2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75555555555556" calcext:value-type="float">
            <text:p>0,00175555555555556000</text:p>
          </table:table-cell>
          <table:table-cell table:formula="of:=[.D476]-[.D4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2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75925925925926" calcext:value-type="float">
            <text:p>0,00175925925925926000</text:p>
          </table:table-cell>
          <table:table-cell table:formula="of:=[.D477]-[.D47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2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76296296296296" calcext:value-type="float">
            <text:p>0,00176296296296296000</text:p>
          </table:table-cell>
          <table:table-cell table:formula="of:=[.D478]-[.D47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2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76666666666667" calcext:value-type="float">
            <text:p>0,00176666666666667000</text:p>
          </table:table-cell>
          <table:table-cell table:formula="of:=[.D479]-[.D4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2" office:value-type="float" office:value="15296" calcext:value-type="float">
            <text:p>1529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77037037037037" calcext:value-type="float">
            <text:p>0,00177037037037037000</text:p>
          </table:table-cell>
          <table:table-cell table:formula="of:=[.D480]-[.D479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2" office:value-type="float" office:value="15328" calcext:value-type="float">
            <text:p>15328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77407407407407" calcext:value-type="float">
            <text:p>0,00177407407407407000</text:p>
          </table:table-cell>
          <table:table-cell table:formula="of:=[.D481]-[.D4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2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77777777777778" calcext:value-type="float">
            <text:p>0,00177777777777778000</text:p>
          </table:table-cell>
          <table:table-cell table:formula="of:=[.D482]-[.D4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2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78148148148148" calcext:value-type="float">
            <text:p>0,00178148148148148000</text:p>
          </table:table-cell>
          <table:table-cell table:formula="of:=[.D483]-[.D48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2" office:value-type="float" office:value="15424" calcext:value-type="float">
            <text:p>1542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78518518518519" calcext:value-type="float">
            <text:p>0,00178518518518519000</text:p>
          </table:table-cell>
          <table:table-cell table:formula="of:=[.D484]-[.D48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2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78888888888889" calcext:value-type="float">
            <text:p>0,00178888888888889000</text:p>
          </table:table-cell>
          <table:table-cell table:formula="of:=[.D485]-[.D48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2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79259259259259" calcext:value-type="float">
            <text:p>0,00179259259259259000</text:p>
          </table:table-cell>
          <table:table-cell table:formula="of:=[.D486]-[.D4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2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7962962962963" calcext:value-type="float">
            <text:p>0,00179629629629630000</text:p>
          </table:table-cell>
          <table:table-cell table:formula="of:=[.D487]-[.D48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2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8" calcext:value-type="float">
            <text:p>0,00180000000000000000</text:p>
          </table:table-cell>
          <table:table-cell table:formula="of:=[.D488]-[.D48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2" office:value-type="float" office:value="15584" calcext:value-type="float">
            <text:p>15584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8037037037037" calcext:value-type="float">
            <text:p>0,00180370370370370000</text:p>
          </table:table-cell>
          <table:table-cell table:formula="of:=[.D489]-[.D4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2" office:value-type="float" office:value="15616" calcext:value-type="float">
            <text:p>1561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80740740740741" calcext:value-type="float">
            <text:p>0,00180740740740741000</text:p>
          </table:table-cell>
          <table:table-cell table:formula="of:=[.D490]-[.D489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2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81111111111111" calcext:value-type="float">
            <text:p>0,00181111111111111000</text:p>
          </table:table-cell>
          <table:table-cell table:formula="of:=[.D491]-[.D4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2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81481481481482" calcext:value-type="float">
            <text:p>0,00181481481481482000</text:p>
          </table:table-cell>
          <table:table-cell table:formula="of:=[.D492]-[.D49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2" office:value-type="float" office:value="15712" calcext:value-type="float">
            <text:p>15712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81851851851852" calcext:value-type="float">
            <text:p>0,00181851851851852000</text:p>
          </table:table-cell>
          <table:table-cell table:formula="of:=[.D493]-[.D49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2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82222222222222" calcext:value-type="float">
            <text:p>0,00182222222222222000</text:p>
          </table:table-cell>
          <table:table-cell table:formula="of:=[.D494]-[.D4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2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82592592592593" calcext:value-type="float">
            <text:p>0,00182592592592593000</text:p>
          </table:table-cell>
          <table:table-cell table:formula="of:=[.D495]-[.D49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2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82962962962963" calcext:value-type="float">
            <text:p>0,00182962962962963000</text:p>
          </table:table-cell>
          <table:table-cell table:formula="of:=[.D496]-[.D4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2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83333333333333" calcext:value-type="float">
            <text:p>0,00183333333333333000</text:p>
          </table:table-cell>
          <table:table-cell table:formula="of:=[.D497]-[.D49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2" office:value-type="float" office:value="15872" calcext:value-type="float">
            <text:p>1587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83703703703704" calcext:value-type="float">
            <text:p>0,00183703703703704000</text:p>
          </table:table-cell>
          <table:table-cell table:formula="of:=[.D498]-[.D4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2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84074074074074" calcext:value-type="float">
            <text:p>0,00184074074074074000</text:p>
          </table:table-cell>
          <table:table-cell table:formula="of:=[.D499]-[.D49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2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84444444444444" calcext:value-type="float">
            <text:p>0,00184444444444444000</text:p>
          </table:table-cell>
          <table:table-cell table:formula="of:=[.D500]-[.D499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2" office:value-type="float" office:value="15968" calcext:value-type="float">
            <text:p>15968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84814814814815" calcext:value-type="float">
            <text:p>0,00184814814814815000</text:p>
          </table:table-cell>
          <table:table-cell table:formula="of:=[.D501]-[.D5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2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85185185185185" calcext:value-type="float">
            <text:p>0,00185185185185185000</text:p>
          </table:table-cell>
          <table:table-cell table:formula="of:=[.D502]-[.D50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2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85555555555556" calcext:value-type="float">
            <text:p>0,00185555555555556000</text:p>
          </table:table-cell>
          <table:table-cell table:formula="of:=[.D503]-[.D50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2" office:value-type="float" office:value="16064" calcext:value-type="float">
            <text:p>1606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85925925925926" calcext:value-type="float">
            <text:p>0,00185925925925926000</text:p>
          </table:table-cell>
          <table:table-cell table:formula="of:=[.D504]-[.D50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2" office:value-type="float" office:value="16096" calcext:value-type="float">
            <text:p>16096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86296296296296" calcext:value-type="float">
            <text:p>0,00186296296296296000</text:p>
          </table:table-cell>
          <table:table-cell table:formula="of:=[.D505]-[.D5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2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86666666666667" calcext:value-type="float">
            <text:p>0,00186666666666667000</text:p>
          </table:table-cell>
          <table:table-cell table:formula="of:=[.D506]-[.D50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2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87037037037037" calcext:value-type="float">
            <text:p>0,00187037037037037000</text:p>
          </table:table-cell>
          <table:table-cell table:formula="of:=[.D507]-[.D50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2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87407407407407" calcext:value-type="float">
            <text:p>0,00187407407407407000</text:p>
          </table:table-cell>
          <table:table-cell table:formula="of:=[.D508]-[.D50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2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87777777777778" calcext:value-type="float">
            <text:p>0,00187777777777778000</text:p>
          </table:table-cell>
          <table:table-cell table:formula="of:=[.D509]-[.D508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2" office:value-type="float" office:value="16256" calcext:value-type="float">
            <text:p>1625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88148148148148" calcext:value-type="float">
            <text:p>0,00188148148148148000</text:p>
          </table:table-cell>
          <table:table-cell table:formula="of:=[.D510]-[.D5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2" office:value-type="float" office:value="16288" calcext:value-type="float">
            <text:p>16288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88518518518519" calcext:value-type="float">
            <text:p>0,00188518518518519000</text:p>
          </table:table-cell>
          <table:table-cell table:formula="of:=[.D511]-[.D51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2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88888888888889" calcext:value-type="float">
            <text:p>0,00188888888888889000</text:p>
          </table:table-cell>
          <table:table-cell table:formula="of:=[.D512]-[.D51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2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89259259259259" calcext:value-type="float">
            <text:p>0,00189259259259259000</text:p>
          </table:table-cell>
          <table:table-cell table:formula="of:=[.D513]-[.D51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2" office:value-type="float" office:value="16384" calcext:value-type="float">
            <text:p>1638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8962962962963" calcext:value-type="float">
            <text:p>0,00189629629629630000</text:p>
          </table:table-cell>
          <table:table-cell table:formula="of:=[.D514]-[.D51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2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9" calcext:value-type="float">
            <text:p>0,00190000000000000000</text:p>
          </table:table-cell>
          <table:table-cell table:formula="of:=[.D515]-[.D5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2" office:value-type="float" office:value="16448" calcext:value-type="float">
            <text:p>1644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9037037037037" calcext:value-type="float">
            <text:p>0,00190370370370370000</text:p>
          </table:table-cell>
          <table:table-cell table:formula="of:=[.D516]-[.D51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2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90740740740741" calcext:value-type="float">
            <text:p>0,00190740740740741000</text:p>
          </table:table-cell>
          <table:table-cell table:formula="of:=[.D517]-[.D51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2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91111111111111" calcext:value-type="float">
            <text:p>0,00191111111111111000</text:p>
          </table:table-cell>
          <table:table-cell table:formula="of:=[.D518]-[.D5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2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91481481481481" calcext:value-type="float">
            <text:p>0,00191481481481481000</text:p>
          </table:table-cell>
          <table:table-cell table:formula="of:=[.D519]-[.D518]" office:value-type="float" office:value="0.0000037037037037039" calcext:value-type="float">
            <text:p>0,00000370370370370390</text:p>
          </table:table-cell>
          <table:table-cell table:number-columns-repeated="16379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2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91851851851852" calcext:value-type="float">
            <text:p>0,00191851851851852000</text:p>
          </table:table-cell>
          <table:table-cell table:formula="of:=[.D520]-[.D5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2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92222222222222" calcext:value-type="float">
            <text:p>0,00192222222222222000</text:p>
          </table:table-cell>
          <table:table-cell table:formula="of:=[.D521]-[.D52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2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92592592592593" calcext:value-type="float">
            <text:p>0,00192592592592593000</text:p>
          </table:table-cell>
          <table:table-cell table:formula="of:=[.D522]-[.D52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2" office:value-type="float" office:value="16672" calcext:value-type="float">
            <text:p>16672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92962962962963" calcext:value-type="float">
            <text:p>0,00192962962962963000</text:p>
          </table:table-cell>
          <table:table-cell table:formula="of:=[.D523]-[.D5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2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93333333333333" calcext:value-type="float">
            <text:p>0,00193333333333333000</text:p>
          </table:table-cell>
          <table:table-cell table:formula="of:=[.D524]-[.D52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2" office:value-type="float" office:value="16736" calcext:value-type="float">
            <text:p>16736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93703703703704" calcext:value-type="float">
            <text:p>0,00193703703703704000</text:p>
          </table:table-cell>
          <table:table-cell table:formula="of:=[.D525]-[.D5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2" office:value-type="float" office:value="16768" calcext:value-type="float">
            <text:p>1676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94074074074074" calcext:value-type="float">
            <text:p>0,00194074074074074000</text:p>
          </table:table-cell>
          <table:table-cell table:formula="of:=[.D526]-[.D52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2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94444444444444" calcext:value-type="float">
            <text:p>0,00194444444444444000</text:p>
          </table:table-cell>
          <table:table-cell table:formula="of:=[.D527]-[.D52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2" office:value-type="float" office:value="16832" calcext:value-type="float">
            <text:p>1683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94814814814815" calcext:value-type="float">
            <text:p>0,00194814814814815000</text:p>
          </table:table-cell>
          <table:table-cell table:formula="of:=[.D528]-[.D52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2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95185185185185" calcext:value-type="float">
            <text:p>0,00195185185185185000</text:p>
          </table:table-cell>
          <table:table-cell table:formula="of:=[.D529]-[.D5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2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95555555555556" calcext:value-type="float">
            <text:p>0,00195555555555556000</text:p>
          </table:table-cell>
          <table:table-cell table:formula="of:=[.D530]-[.D52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2" office:value-type="float" office:value="16928" calcext:value-type="float">
            <text:p>16928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95925925925926" calcext:value-type="float">
            <text:p>0,00195925925925926000</text:p>
          </table:table-cell>
          <table:table-cell table:formula="of:=[.D531]-[.D53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2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96296296296296" calcext:value-type="float">
            <text:p>0,00196296296296296000</text:p>
          </table:table-cell>
          <table:table-cell table:formula="of:=[.D532]-[.D53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2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96666666666667" calcext:value-type="float">
            <text:p>0,00196666666666667000</text:p>
          </table:table-cell>
          <table:table-cell table:formula="of:=[.D533]-[.D5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2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97037037037037" calcext:value-type="float">
            <text:p>0,00197037037037037000</text:p>
          </table:table-cell>
          <table:table-cell table:formula="of:=[.D534]-[.D533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2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97407407407407" calcext:value-type="float">
            <text:p>0,00197407407407407000</text:p>
          </table:table-cell>
          <table:table-cell table:formula="of:=[.D535]-[.D53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2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97777777777778" calcext:value-type="float">
            <text:p>0,00197777777777778000</text:p>
          </table:table-cell>
          <table:table-cell table:formula="of:=[.D536]-[.D53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2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98148148148148" calcext:value-type="float">
            <text:p>0,00198148148148148000</text:p>
          </table:table-cell>
          <table:table-cell table:formula="of:=[.D537]-[.D5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2" office:value-type="float" office:value="17152" calcext:value-type="float">
            <text:p>1715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98518518518519" calcext:value-type="float">
            <text:p>0,00198518518518519000</text:p>
          </table:table-cell>
          <table:table-cell table:formula="of:=[.D538]-[.D5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2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98888888888889" calcext:value-type="float">
            <text:p>0,00198888888888889000</text:p>
          </table:table-cell>
          <table:table-cell table:formula="of:=[.D539]-[.D5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2" office:value-type="float" office:value="17216" calcext:value-type="float">
            <text:p>1721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99259259259259" calcext:value-type="float">
            <text:p>0,00199259259259259000</text:p>
          </table:table-cell>
          <table:table-cell table:formula="of:=[.D540]-[.D5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2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9962962962963" calcext:value-type="float">
            <text:p>0,00199629629629630000</text:p>
          </table:table-cell>
          <table:table-cell table:formula="of:=[.D541]-[.D54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2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" calcext:value-type="float">
            <text:p>0,00200000000000000000</text:p>
          </table:table-cell>
          <table:table-cell table:formula="of:=[.D542]-[.D54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2" office:value-type="float" office:value="17312" calcext:value-type="float">
            <text:p>17312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0037037037037" calcext:value-type="float">
            <text:p>0,00200370370370370000</text:p>
          </table:table-cell>
          <table:table-cell table:formula="of:=[.D543]-[.D5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2" office:value-type="float" office:value="17344" calcext:value-type="float">
            <text:p>1734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00740740740741" calcext:value-type="float">
            <text:p>0,00200740740740741000</text:p>
          </table:table-cell>
          <table:table-cell table:formula="of:=[.D544]-[.D54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2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01111111111111" calcext:value-type="float">
            <text:p>0,00201111111111111000</text:p>
          </table:table-cell>
          <table:table-cell table:formula="of:=[.D545]-[.D5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2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01481481481481" calcext:value-type="float">
            <text:p>0,00201481481481481000</text:p>
          </table:table-cell>
          <table:table-cell table:formula="of:=[.D546]-[.D54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2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01851851851852" calcext:value-type="float">
            <text:p>0,00201851851851852000</text:p>
          </table:table-cell>
          <table:table-cell table:formula="of:=[.D547]-[.D54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2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02222222222222" calcext:value-type="float">
            <text:p>0,00202222222222222000</text:p>
          </table:table-cell>
          <table:table-cell table:formula="of:=[.D548]-[.D5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2" office:value-type="float" office:value="17504" calcext:value-type="float">
            <text:p>17504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02592592592593" calcext:value-type="float">
            <text:p>0,00202592592592593000</text:p>
          </table:table-cell>
          <table:table-cell table:formula="of:=[.D549]-[.D54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2" office:value-type="float" office:value="17536" calcext:value-type="float">
            <text:p>1753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02962962962963" calcext:value-type="float">
            <text:p>0,00202962962962963000</text:p>
          </table:table-cell>
          <table:table-cell table:formula="of:=[.D550]-[.D54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2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03333333333333" calcext:value-type="float">
            <text:p>0,00203333333333333000</text:p>
          </table:table-cell>
          <table:table-cell table:formula="of:=[.D551]-[.D55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2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03703703703704" calcext:value-type="float">
            <text:p>0,00203703703703704000</text:p>
          </table:table-cell>
          <table:table-cell table:formula="of:=[.D552]-[.D55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2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04074074074074" calcext:value-type="float">
            <text:p>0,00204074074074074000</text:p>
          </table:table-cell>
          <table:table-cell table:formula="of:=[.D553]-[.D552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2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04444444444444" calcext:value-type="float">
            <text:p>0,00204444444444444000</text:p>
          </table:table-cell>
          <table:table-cell table:formula="of:=[.D554]-[.D55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2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04814814814815" calcext:value-type="float">
            <text:p>0,00204814814814815000</text:p>
          </table:table-cell>
          <table:table-cell table:formula="of:=[.D555]-[.D55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2" office:value-type="float" office:value="17728" calcext:value-type="float">
            <text:p>1772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05185185185185" calcext:value-type="float">
            <text:p>0,00205185185185185000</text:p>
          </table:table-cell>
          <table:table-cell table:formula="of:=[.D556]-[.D5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2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05555555555556" calcext:value-type="float">
            <text:p>0,00205555555555556000</text:p>
          </table:table-cell>
          <table:table-cell table:formula="of:=[.D557]-[.D55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2" office:value-type="float" office:value="17792" calcext:value-type="float">
            <text:p>1779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05925925925926" calcext:value-type="float">
            <text:p>0,00205925925925926000</text:p>
          </table:table-cell>
          <table:table-cell table:formula="of:=[.D558]-[.D55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2" office:value-type="float" office:value="17824" calcext:value-type="float">
            <text:p>17824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06296296296296" calcext:value-type="float">
            <text:p>0,00206296296296296000</text:p>
          </table:table-cell>
          <table:table-cell table:formula="of:=[.D559]-[.D55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2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06666666666667" calcext:value-type="float">
            <text:p>0,00206666666666667000</text:p>
          </table:table-cell>
          <table:table-cell table:formula="of:=[.D560]-[.D55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2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07037037037037" calcext:value-type="float">
            <text:p>0,00207037037037037000</text:p>
          </table:table-cell>
          <table:table-cell table:formula="of:=[.D561]-[.D56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2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07407407407407" calcext:value-type="float">
            <text:p>0,00207407407407407000</text:p>
          </table:table-cell>
          <table:table-cell table:formula="of:=[.D562]-[.D5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2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07777777777778" calcext:value-type="float">
            <text:p>0,00207777777777778000</text:p>
          </table:table-cell>
          <table:table-cell table:formula="of:=[.D563]-[.D56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2" office:value-type="float" office:value="17984" calcext:value-type="float">
            <text:p>1798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08148148148148" calcext:value-type="float">
            <text:p>0,00208148148148148000</text:p>
          </table:table-cell>
          <table:table-cell table:formula="of:=[.D564]-[.D56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2" office:value-type="float" office:value="18016" calcext:value-type="float">
            <text:p>18016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08518518518519" calcext:value-type="float">
            <text:p>0,00208518518518519000</text:p>
          </table:table-cell>
          <table:table-cell table:formula="of:=[.D565]-[.D56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2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08888888888889" calcext:value-type="float">
            <text:p>0,00208888888888889000</text:p>
          </table:table-cell>
          <table:table-cell table:formula="of:=[.D566]-[.D56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2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09259259259259" calcext:value-type="float">
            <text:p>0,00209259259259259000</text:p>
          </table:table-cell>
          <table:table-cell table:formula="of:=[.D567]-[.D5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2" office:value-type="float" office:value="18112" calcext:value-type="float">
            <text:p>1811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0962962962963" calcext:value-type="float">
            <text:p>0,00209629629629630000</text:p>
          </table:table-cell>
          <table:table-cell table:formula="of:=[.D568]-[.D56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2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1" calcext:value-type="float">
            <text:p>0,00210000000000000000</text:p>
          </table:table-cell>
          <table:table-cell table:formula="of:=[.D569]-[.D56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2" office:value-type="float" office:value="18176" calcext:value-type="float">
            <text:p>1817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1037037037037" calcext:value-type="float">
            <text:p>0,00210370370370370000</text:p>
          </table:table-cell>
          <table:table-cell table:formula="of:=[.D570]-[.D56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2" office:value-type="float" office:value="18208" calcext:value-type="float">
            <text:p>18208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10740740740741" calcext:value-type="float">
            <text:p>0,00210740740740741000</text:p>
          </table:table-cell>
          <table:table-cell table:formula="of:=[.D571]-[.D57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2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11111111111111" calcext:value-type="float">
            <text:p>0,00211111111111111000</text:p>
          </table:table-cell>
          <table:table-cell table:formula="of:=[.D572]-[.D571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2" office:value-type="float" office:value="18272" calcext:value-type="float">
            <text:p>18272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11481481481482" calcext:value-type="float">
            <text:p>0,00211481481481482000</text:p>
          </table:table-cell>
          <table:table-cell table:formula="of:=[.D573]-[.D57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2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11851851851852" calcext:value-type="float">
            <text:p>0,00211851851851852000</text:p>
          </table:table-cell>
          <table:table-cell table:formula="of:=[.D574]-[.D57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2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12222222222222" calcext:value-type="float">
            <text:p>0,00212222222222222000</text:p>
          </table:table-cell>
          <table:table-cell table:formula="of:=[.D575]-[.D57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2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12592592592593" calcext:value-type="float">
            <text:p>0,00212592592592593000</text:p>
          </table:table-cell>
          <table:table-cell table:formula="of:=[.D576]-[.D5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2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12962962962963" calcext:value-type="float">
            <text:p>0,00212962962962963000</text:p>
          </table:table-cell>
          <table:table-cell table:formula="of:=[.D577]-[.D57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2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13333333333333" calcext:value-type="float">
            <text:p>0,00213333333333333000</text:p>
          </table:table-cell>
          <table:table-cell table:formula="of:=[.D578]-[.D57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2" office:value-type="float" office:value="18464" calcext:value-type="float">
            <text:p>18464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13703703703704" calcext:value-type="float">
            <text:p>0,00213703703703704000</text:p>
          </table:table-cell>
          <table:table-cell table:formula="of:=[.D579]-[.D5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2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14074074074074" calcext:value-type="float">
            <text:p>0,00214074074074074000</text:p>
          </table:table-cell>
          <table:table-cell table:formula="of:=[.D580]-[.D57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2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14444444444444" calcext:value-type="float">
            <text:p>0,00214444444444444000</text:p>
          </table:table-cell>
          <table:table-cell table:formula="of:=[.D581]-[.D5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2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14814814814815" calcext:value-type="float">
            <text:p>0,00214814814814815000</text:p>
          </table:table-cell>
          <table:table-cell table:formula="of:=[.D582]-[.D5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2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15185185185185" calcext:value-type="float">
            <text:p>0,00215185185185185000</text:p>
          </table:table-cell>
          <table:table-cell table:formula="of:=[.D583]-[.D58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2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15555555555556" calcext:value-type="float">
            <text:p>0,00215555555555556000</text:p>
          </table:table-cell>
          <table:table-cell table:formula="of:=[.D584]-[.D58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2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15925925925926" calcext:value-type="float">
            <text:p>0,00215925925925926000</text:p>
          </table:table-cell>
          <table:table-cell table:formula="of:=[.D585]-[.D58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2" office:value-type="float" office:value="18688" calcext:value-type="float">
            <text:p>1868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16296296296296" calcext:value-type="float">
            <text:p>0,00216296296296296000</text:p>
          </table:table-cell>
          <table:table-cell table:formula="of:=[.D586]-[.D5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2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16666666666667" calcext:value-type="float">
            <text:p>0,00216666666666667000</text:p>
          </table:table-cell>
          <table:table-cell table:formula="of:=[.D587]-[.D58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2" office:value-type="float" office:value="18752" calcext:value-type="float">
            <text:p>1875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17037037037037" calcext:value-type="float">
            <text:p>0,00217037037037037000</text:p>
          </table:table-cell>
          <table:table-cell table:formula="of:=[.D588]-[.D58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2" office:value-type="float" office:value="18784" calcext:value-type="float">
            <text:p>18784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17407407407407" calcext:value-type="float">
            <text:p>0,00217407407407407000</text:p>
          </table:table-cell>
          <table:table-cell table:formula="of:=[.D589]-[.D5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2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17777777777778" calcext:value-type="float">
            <text:p>0,00217777777777778000</text:p>
          </table:table-cell>
          <table:table-cell table:formula="of:=[.D590]-[.D58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2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18148148148148" calcext:value-type="float">
            <text:p>0,00218148148148148000</text:p>
          </table:table-cell>
          <table:table-cell table:formula="of:=[.D591]-[.D5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2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18518518518519" calcext:value-type="float">
            <text:p>0,00218518518518519000</text:p>
          </table:table-cell>
          <table:table-cell table:formula="of:=[.D592]-[.D591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2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18888888888889" calcext:value-type="float">
            <text:p>0,00218888888888889000</text:p>
          </table:table-cell>
          <table:table-cell table:formula="of:=[.D593]-[.D59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2" office:value-type="float" office:value="18944" calcext:value-type="float">
            <text:p>1894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19259259259259" calcext:value-type="float">
            <text:p>0,00219259259259259000</text:p>
          </table:table-cell>
          <table:table-cell table:formula="of:=[.D594]-[.D5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2" office:value-type="float" office:value="18976" calcext:value-type="float">
            <text:p>18976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1962962962963" calcext:value-type="float">
            <text:p>0,00219629629629630000</text:p>
          </table:table-cell>
          <table:table-cell table:formula="of:=[.D595]-[.D59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2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2" calcext:value-type="float">
            <text:p>0,00220000000000000000</text:p>
          </table:table-cell>
          <table:table-cell table:formula="of:=[.D596]-[.D5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2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2037037037037" calcext:value-type="float">
            <text:p>0,00220370370370370000</text:p>
          </table:table-cell>
          <table:table-cell table:formula="of:=[.D597]-[.D59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2" office:value-type="float" office:value="19072" calcext:value-type="float">
            <text:p>1907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20740740740741" calcext:value-type="float">
            <text:p>0,00220740740740741000</text:p>
          </table:table-cell>
          <table:table-cell table:formula="of:=[.D598]-[.D5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2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21111111111111" calcext:value-type="float">
            <text:p>0,00221111111111111000</text:p>
          </table:table-cell>
          <table:table-cell table:formula="of:=[.D599]-[.D59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2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21481481481482" calcext:value-type="float">
            <text:p>0,00221481481481482000</text:p>
          </table:table-cell>
          <table:table-cell table:formula="of:=[.D600]-[.D59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2" office:value-type="float" office:value="19168" calcext:value-type="float">
            <text:p>19168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21851851851852" calcext:value-type="float">
            <text:p>0,00221851851851852000</text:p>
          </table:table-cell>
          <table:table-cell table:formula="of:=[.D601]-[.D6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2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22222222222222" calcext:value-type="float">
            <text:p>0,00222222222222222000</text:p>
          </table:table-cell>
          <table:table-cell table:formula="of:=[.D602]-[.D60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2" office:value-type="float" office:value="19232" calcext:value-type="float">
            <text:p>19232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22592592592593" calcext:value-type="float">
            <text:p>0,00222592592592593000</text:p>
          </table:table-cell>
          <table:table-cell table:formula="of:=[.D603]-[.D60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2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22962962962963" calcext:value-type="float">
            <text:p>0,00222962962962963000</text:p>
          </table:table-cell>
          <table:table-cell table:formula="of:=[.D604]-[.D60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2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23333333333333" calcext:value-type="float">
            <text:p>0,00223333333333333000</text:p>
          </table:table-cell>
          <table:table-cell table:formula="of:=[.D605]-[.D6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2" office:value-type="float" office:value="19328" calcext:value-type="float">
            <text:p>1932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23703703703704" calcext:value-type="float">
            <text:p>0,00223703703703704000</text:p>
          </table:table-cell>
          <table:table-cell table:formula="of:=[.D606]-[.D60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2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24074074074074" calcext:value-type="float">
            <text:p>0,00224074074074074000</text:p>
          </table:table-cell>
          <table:table-cell table:formula="of:=[.D607]-[.D60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2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24444444444444" calcext:value-type="float">
            <text:p>0,00224444444444444000</text:p>
          </table:table-cell>
          <table:table-cell table:formula="of:=[.D608]-[.D60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2" office:value-type="float" office:value="19424" calcext:value-type="float">
            <text:p>19424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24814814814815" calcext:value-type="float">
            <text:p>0,00224814814814815000</text:p>
          </table:table-cell>
          <table:table-cell table:formula="of:=[.D609]-[.D60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2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25185185185185" calcext:value-type="float">
            <text:p>0,00225185185185185000</text:p>
          </table:table-cell>
          <table:table-cell table:formula="of:=[.D610]-[.D6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2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25555555555556" calcext:value-type="float">
            <text:p>0,00225555555555556000</text:p>
          </table:table-cell>
          <table:table-cell table:formula="of:=[.D611]-[.D610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2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25925925925926" calcext:value-type="float">
            <text:p>0,00225925925925926000</text:p>
          </table:table-cell>
          <table:table-cell table:formula="of:=[.D612]-[.D61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2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26296296296296" calcext:value-type="float">
            <text:p>0,00226296296296296000</text:p>
          </table:table-cell>
          <table:table-cell table:formula="of:=[.D613]-[.D61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2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26666666666667" calcext:value-type="float">
            <text:p>0,00226666666666667000</text:p>
          </table:table-cell>
          <table:table-cell table:formula="of:=[.D614]-[.D61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2" office:value-type="float" office:value="19616" calcext:value-type="float">
            <text:p>19616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27037037037037" calcext:value-type="float">
            <text:p>0,00227037037037037000</text:p>
          </table:table-cell>
          <table:table-cell table:formula="of:=[.D615]-[.D6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2" office:value-type="float" office:value="19648" calcext:value-type="float">
            <text:p>1964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27407407407407" calcext:value-type="float">
            <text:p>0,00227407407407407000</text:p>
          </table:table-cell>
          <table:table-cell table:formula="of:=[.D616]-[.D61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2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27777777777778" calcext:value-type="float">
            <text:p>0,00227777777777778000</text:p>
          </table:table-cell>
          <table:table-cell table:formula="of:=[.D617]-[.D61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2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28148148148148" calcext:value-type="float">
            <text:p>0,00228148148148148000</text:p>
          </table:table-cell>
          <table:table-cell table:formula="of:=[.D618]-[.D6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2" office:value-type="float" office:value="19744" calcext:value-type="float">
            <text:p>19744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28518518518519" calcext:value-type="float">
            <text:p>0,00228518518518519000</text:p>
          </table:table-cell>
          <table:table-cell table:formula="of:=[.D619]-[.D61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2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28888888888889" calcext:value-type="float">
            <text:p>0,00228888888888889000</text:p>
          </table:table-cell>
          <table:table-cell table:formula="of:=[.D620]-[.D6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2" office:value-type="float" office:value="19808" calcext:value-type="float">
            <text:p>19808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29259259259259" calcext:value-type="float">
            <text:p>0,00229259259259259000</text:p>
          </table:table-cell>
          <table:table-cell table:formula="of:=[.D621]-[.D62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2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2962962962963" calcext:value-type="float">
            <text:p>0,00229629629629630000</text:p>
          </table:table-cell>
          <table:table-cell table:formula="of:=[.D622]-[.D62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2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3" calcext:value-type="float">
            <text:p>0,00230000000000000000</text:p>
          </table:table-cell>
          <table:table-cell table:formula="of:=[.D623]-[.D6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2" office:value-type="float" office:value="19904" calcext:value-type="float">
            <text:p>1990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3037037037037" calcext:value-type="float">
            <text:p>0,00230370370370370000</text:p>
          </table:table-cell>
          <table:table-cell table:formula="of:=[.D624]-[.D62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2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30740740740741" calcext:value-type="float">
            <text:p>0,00230740740740741000</text:p>
          </table:table-cell>
          <table:table-cell table:formula="of:=[.D625]-[.D6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2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31111111111111" calcext:value-type="float">
            <text:p>0,00231111111111111000</text:p>
          </table:table-cell>
          <table:table-cell table:formula="of:=[.D626]-[.D62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2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31481481481481" calcext:value-type="float">
            <text:p>0,00231481481481481000</text:p>
          </table:table-cell>
          <table:table-cell table:formula="of:=[.D627]-[.D62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2" office:value-type="float" office:value="20032" calcext:value-type="float">
            <text:p>2003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31851851851852" calcext:value-type="float">
            <text:p>0,00231851851851852000</text:p>
          </table:table-cell>
          <table:table-cell table:formula="of:=[.D628]-[.D62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2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32222222222222" calcext:value-type="float">
            <text:p>0,00232222222222222000</text:p>
          </table:table-cell>
          <table:table-cell table:formula="of:=[.D629]-[.D6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2" office:value-type="float" office:value="20096" calcext:value-type="float">
            <text:p>2009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32592592592593" calcext:value-type="float">
            <text:p>0,00232592592592593000</text:p>
          </table:table-cell>
          <table:table-cell table:formula="of:=[.D630]-[.D629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2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32962962962963" calcext:value-type="float">
            <text:p>0,00232962962962963000</text:p>
          </table:table-cell>
          <table:table-cell table:formula="of:=[.D631]-[.D63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2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33333333333333" calcext:value-type="float">
            <text:p>0,00233333333333333000</text:p>
          </table:table-cell>
          <table:table-cell table:formula="of:=[.D632]-[.D63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2" office:value-type="float" office:value="20192" calcext:value-type="float">
            <text:p>20192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33703703703704" calcext:value-type="float">
            <text:p>0,00233703703703704000</text:p>
          </table:table-cell>
          <table:table-cell table:formula="of:=[.D633]-[.D6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2" office:value-type="float" office:value="20224" calcext:value-type="float">
            <text:p>2022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34074074074074" calcext:value-type="float">
            <text:p>0,00234074074074074000</text:p>
          </table:table-cell>
          <table:table-cell table:formula="of:=[.D634]-[.D63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2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34444444444444" calcext:value-type="float">
            <text:p>0,00234444444444444000</text:p>
          </table:table-cell>
          <table:table-cell table:formula="of:=[.D635]-[.D63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2" office:value-type="float" office:value="20288" calcext:value-type="float">
            <text:p>2028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34814814814815" calcext:value-type="float">
            <text:p>0,00234814814814815000</text:p>
          </table:table-cell>
          <table:table-cell table:formula="of:=[.D636]-[.D63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2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35185185185185" calcext:value-type="float">
            <text:p>0,00235185185185185000</text:p>
          </table:table-cell>
          <table:table-cell table:formula="of:=[.D637]-[.D6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2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35555555555556" calcext:value-type="float">
            <text:p>0,00235555555555556000</text:p>
          </table:table-cell>
          <table:table-cell table:formula="of:=[.D638]-[.D6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2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35925925925926" calcext:value-type="float">
            <text:p>0,00235925925925926000</text:p>
          </table:table-cell>
          <table:table-cell table:formula="of:=[.D639]-[.D6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2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36296296296296" calcext:value-type="float">
            <text:p>0,00236296296296296000</text:p>
          </table:table-cell>
          <table:table-cell table:formula="of:=[.D640]-[.D6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2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36666666666667" calcext:value-type="float">
            <text:p>0,00236666666666667000</text:p>
          </table:table-cell>
          <table:table-cell table:formula="of:=[.D641]-[.D64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2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37037037037037" calcext:value-type="float">
            <text:p>0,00237037037037037000</text:p>
          </table:table-cell>
          <table:table-cell table:formula="of:=[.D642]-[.D64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2" office:value-type="float" office:value="20512" calcext:value-type="float">
            <text:p>20512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37407407407407" calcext:value-type="float">
            <text:p>0,00237407407407407000</text:p>
          </table:table-cell>
          <table:table-cell table:formula="of:=[.D643]-[.D6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2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37777777777778" calcext:value-type="float">
            <text:p>0,00237777777777778000</text:p>
          </table:table-cell>
          <table:table-cell table:formula="of:=[.D644]-[.D64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2" office:value-type="float" office:value="20576" calcext:value-type="float">
            <text:p>20576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38148148148148" calcext:value-type="float">
            <text:p>0,00238148148148148000</text:p>
          </table:table-cell>
          <table:table-cell table:formula="of:=[.D645]-[.D6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2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38518518518519" calcext:value-type="float">
            <text:p>0,00238518518518519000</text:p>
          </table:table-cell>
          <table:table-cell table:formula="of:=[.D646]-[.D64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2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38888888888889" calcext:value-type="float">
            <text:p>0,00238888888888889000</text:p>
          </table:table-cell>
          <table:table-cell table:formula="of:=[.D647]-[.D64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2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39259259259259" calcext:value-type="float">
            <text:p>0,00239259259259259000</text:p>
          </table:table-cell>
          <table:table-cell table:formula="of:=[.D648]-[.D6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2" office:value-type="float" office:value="20704" calcext:value-type="float">
            <text:p>20704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3962962962963" calcext:value-type="float">
            <text:p>0,00239629629629630000</text:p>
          </table:table-cell>
          <table:table-cell table:formula="of:=[.D649]-[.D64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2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4" calcext:value-type="float">
            <text:p>0,00240000000000000000</text:p>
          </table:table-cell>
          <table:table-cell table:formula="of:=[.D650]-[.D649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2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4037037037037" calcext:value-type="float">
            <text:p>0,00240370370370370000</text:p>
          </table:table-cell>
          <table:table-cell table:formula="of:=[.D651]-[.D65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2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40740740740741" calcext:value-type="float">
            <text:p>0,00240740740740741000</text:p>
          </table:table-cell>
          <table:table-cell table:formula="of:=[.D652]-[.D65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2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41111111111111" calcext:value-type="float">
            <text:p>0,00241111111111111000</text:p>
          </table:table-cell>
          <table:table-cell table:formula="of:=[.D653]-[.D65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2" office:value-type="float" office:value="20864" calcext:value-type="float">
            <text:p>20864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41481481481482" calcext:value-type="float">
            <text:p>0,00241481481481482000</text:p>
          </table:table-cell>
          <table:table-cell table:formula="of:=[.D654]-[.D65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2" office:value-type="float" office:value="20896" calcext:value-type="float">
            <text:p>20896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41851851851852" calcext:value-type="float">
            <text:p>0,00241851851851852000</text:p>
          </table:table-cell>
          <table:table-cell table:formula="of:=[.D655]-[.D65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2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42222222222222" calcext:value-type="float">
            <text:p>0,00242222222222222000</text:p>
          </table:table-cell>
          <table:table-cell table:formula="of:=[.D656]-[.D65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2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42592592592593" calcext:value-type="float">
            <text:p>0,00242592592592593000</text:p>
          </table:table-cell>
          <table:table-cell table:formula="of:=[.D657]-[.D65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2" office:value-type="float" office:value="20992" calcext:value-type="float">
            <text:p>20992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42962962962963" calcext:value-type="float">
            <text:p>0,00242962962962963000</text:p>
          </table:table-cell>
          <table:table-cell table:formula="of:=[.D658]-[.D65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2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43333333333333" calcext:value-type="float">
            <text:p>0,00243333333333333000</text:p>
          </table:table-cell>
          <table:table-cell table:formula="of:=[.D659]-[.D65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2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43703703703704" calcext:value-type="float">
            <text:p>0,00243703703703704000</text:p>
          </table:table-cell>
          <table:table-cell table:formula="of:=[.D660]-[.D65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2" office:value-type="float" office:value="21088" calcext:value-type="float">
            <text:p>21088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44074074074074" calcext:value-type="float">
            <text:p>0,00244074074074074000</text:p>
          </table:table-cell>
          <table:table-cell table:formula="of:=[.D661]-[.D66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2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44444444444444" calcext:value-type="float">
            <text:p>0,00244444444444444000</text:p>
          </table:table-cell>
          <table:table-cell table:formula="of:=[.D662]-[.D66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2" office:value-type="float" office:value="21152" calcext:value-type="float">
            <text:p>21152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44814814814815" calcext:value-type="float">
            <text:p>0,00244814814814815000</text:p>
          </table:table-cell>
          <table:table-cell table:formula="of:=[.D663]-[.D66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2" office:value-type="float" office:value="21184" calcext:value-type="float">
            <text:p>21184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45185185185185" calcext:value-type="float">
            <text:p>0,00245185185185185000</text:p>
          </table:table-cell>
          <table:table-cell table:formula="of:=[.D664]-[.D66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2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45555555555556" calcext:value-type="float">
            <text:p>0,00245555555555556000</text:p>
          </table:table-cell>
          <table:table-cell table:formula="of:=[.D665]-[.D66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2" office:value-type="float" office:value="21248" calcext:value-type="float">
            <text:p>21248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45925925925926" calcext:value-type="float">
            <text:p>0,00245925925925926000</text:p>
          </table:table-cell>
          <table:table-cell table:formula="of:=[.D666]-[.D66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2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46296296296296" calcext:value-type="float">
            <text:p>0,00246296296296296000</text:p>
          </table:table-cell>
          <table:table-cell table:formula="of:=[.D667]-[.D66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2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46666666666667" calcext:value-type="float">
            <text:p>0,00246666666666667000</text:p>
          </table:table-cell>
          <table:table-cell table:formula="of:=[.D668]-[.D66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32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47037037037037" calcext:value-type="float">
            <text:p>0,00247037037037037000</text:p>
          </table:table-cell>
          <table:table-cell table:formula="of:=[.D669]-[.D668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32" office:value-type="float" office:value="21376" calcext:value-type="float">
            <text:p>21376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47407407407407" calcext:value-type="float">
            <text:p>0,00247407407407407000</text:p>
          </table:table-cell>
          <table:table-cell table:formula="of:=[.D670]-[.D66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32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47777777777778" calcext:value-type="float">
            <text:p>0,00247777777777778000</text:p>
          </table:table-cell>
          <table:table-cell table:formula="of:=[.D671]-[.D67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32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48148148148148" calcext:value-type="float">
            <text:p>0,00248148148148148000</text:p>
          </table:table-cell>
          <table:table-cell table:formula="of:=[.D672]-[.D67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32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48518518518519" calcext:value-type="float">
            <text:p>0,00248518518518519000</text:p>
          </table:table-cell>
          <table:table-cell table:formula="of:=[.D673]-[.D67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32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48888888888889" calcext:value-type="float">
            <text:p>0,00248888888888889000</text:p>
          </table:table-cell>
          <table:table-cell table:formula="of:=[.D674]-[.D67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32" office:value-type="float" office:value="21536" calcext:value-type="float">
            <text:p>21536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49259259259259" calcext:value-type="float">
            <text:p>0,00249259259259259000</text:p>
          </table:table-cell>
          <table:table-cell table:formula="of:=[.D675]-[.D67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32" office:value-type="float" office:value="21568" calcext:value-type="float">
            <text:p>21568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4962962962963" calcext:value-type="float">
            <text:p>0,00249629629629630000</text:p>
          </table:table-cell>
          <table:table-cell table:formula="of:=[.D676]-[.D67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32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5" calcext:value-type="float">
            <text:p>0,00250000000000000000</text:p>
          </table:table-cell>
          <table:table-cell table:formula="of:=[.D677]-[.D67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32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5037037037037" calcext:value-type="float">
            <text:p>0,00250370370370370000</text:p>
          </table:table-cell>
          <table:table-cell table:formula="of:=[.D678]-[.D67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32" office:value-type="float" office:value="21664" calcext:value-type="float">
            <text:p>21664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50740740740741" calcext:value-type="float">
            <text:p>0,00250740740740741000</text:p>
          </table:table-cell>
          <table:table-cell table:formula="of:=[.D679]-[.D67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32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51111111111111" calcext:value-type="float">
            <text:p>0,00251111111111111000</text:p>
          </table:table-cell>
          <table:table-cell table:formula="of:=[.D680]-[.D67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32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51481481481481" calcext:value-type="float">
            <text:p>0,00251481481481481000</text:p>
          </table:table-cell>
          <table:table-cell table:formula="of:=[.D681]-[.D68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32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51851851851852" calcext:value-type="float">
            <text:p>0,00251851851851852000</text:p>
          </table:table-cell>
          <table:table-cell table:formula="of:=[.D682]-[.D68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32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52222222222222" calcext:value-type="float">
            <text:p>0,00252222222222222000</text:p>
          </table:table-cell>
          <table:table-cell table:formula="of:=[.D683]-[.D68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32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52592592592593" calcext:value-type="float">
            <text:p>0,00252592592592593000</text:p>
          </table:table-cell>
          <table:table-cell table:formula="of:=[.D684]-[.D68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32" office:value-type="float" office:value="21856" calcext:value-type="float">
            <text:p>21856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52962962962963" calcext:value-type="float">
            <text:p>0,00252962962962963000</text:p>
          </table:table-cell>
          <table:table-cell table:formula="of:=[.D685]-[.D68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32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53333333333333" calcext:value-type="float">
            <text:p>0,00253333333333333000</text:p>
          </table:table-cell>
          <table:table-cell table:formula="of:=[.D686]-[.D68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32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53703703703704" calcext:value-type="float">
            <text:p>0,00253703703703704000</text:p>
          </table:table-cell>
          <table:table-cell table:formula="of:=[.D687]-[.D68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32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54074074074074" calcext:value-type="float">
            <text:p>0,00254074074074074000</text:p>
          </table:table-cell>
          <table:table-cell table:formula="of:=[.D688]-[.D687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32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54444444444444" calcext:value-type="float">
            <text:p>0,00254444444444444000</text:p>
          </table:table-cell>
          <table:table-cell table:formula="of:=[.D689]-[.D68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32" office:value-type="float" office:value="22016" calcext:value-type="float">
            <text:p>22016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54814814814815" calcext:value-type="float">
            <text:p>0,00254814814814815000</text:p>
          </table:table-cell>
          <table:table-cell table:formula="of:=[.D690]-[.D68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32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55185185185185" calcext:value-type="float">
            <text:p>0,00255185185185185000</text:p>
          </table:table-cell>
          <table:table-cell table:formula="of:=[.D691]-[.D69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32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55555555555556" calcext:value-type="float">
            <text:p>0,00255555555555556000</text:p>
          </table:table-cell>
          <table:table-cell table:formula="of:=[.D692]-[.D69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32" office:value-type="float" office:value="22112" calcext:value-type="float">
            <text:p>22112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55925925925926" calcext:value-type="float">
            <text:p>0,00255925925925926000</text:p>
          </table:table-cell>
          <table:table-cell table:formula="of:=[.D693]-[.D69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32" office:value-type="float" office:value="22144" calcext:value-type="float">
            <text:p>22144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56296296296296" calcext:value-type="float">
            <text:p>0,00256296296296296000</text:p>
          </table:table-cell>
          <table:table-cell table:formula="of:=[.D694]-[.D69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32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56666666666667" calcext:value-type="float">
            <text:p>0,00256666666666667000</text:p>
          </table:table-cell>
          <table:table-cell table:formula="of:=[.D695]-[.D69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32" office:value-type="float" office:value="22208" calcext:value-type="float">
            <text:p>22208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57037037037037" calcext:value-type="float">
            <text:p>0,00257037037037037000</text:p>
          </table:table-cell>
          <table:table-cell table:formula="of:=[.D696]-[.D69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32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57407407407407" calcext:value-type="float">
            <text:p>0,00257407407407407000</text:p>
          </table:table-cell>
          <table:table-cell table:formula="of:=[.D697]-[.D69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32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57777777777778" calcext:value-type="float">
            <text:p>0,00257777777777778000</text:p>
          </table:table-cell>
          <table:table-cell table:formula="of:=[.D698]-[.D69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32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58148148148148" calcext:value-type="float">
            <text:p>0,00258148148148148000</text:p>
          </table:table-cell>
          <table:table-cell table:formula="of:=[.D699]-[.D69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32" office:value-type="float" office:value="22336" calcext:value-type="float">
            <text:p>22336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58518518518519" calcext:value-type="float">
            <text:p>0,00258518518518519000</text:p>
          </table:table-cell>
          <table:table-cell table:formula="of:=[.D700]-[.D69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32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58888888888889" calcext:value-type="float">
            <text:p>0,00258888888888889000</text:p>
          </table:table-cell>
          <table:table-cell table:formula="of:=[.D701]-[.D70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32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59259259259259" calcext:value-type="float">
            <text:p>0,00259259259259259000</text:p>
          </table:table-cell>
          <table:table-cell table:formula="of:=[.D702]-[.D70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32" office:value-type="float" office:value="22432" calcext:value-type="float">
            <text:p>22432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5962962962963" calcext:value-type="float">
            <text:p>0,00259629629629630000</text:p>
          </table:table-cell>
          <table:table-cell table:formula="of:=[.D703]-[.D70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32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6" calcext:value-type="float">
            <text:p>0,00260000000000000000</text:p>
          </table:table-cell>
          <table:table-cell table:formula="of:=[.D704]-[.D70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32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6037037037037" calcext:value-type="float">
            <text:p>0,00260370370370370000</text:p>
          </table:table-cell>
          <table:table-cell table:formula="of:=[.D705]-[.D70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32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60740740740741" calcext:value-type="float">
            <text:p>0,00260740740740741000</text:p>
          </table:table-cell>
          <table:table-cell table:formula="of:=[.D706]-[.D70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32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61111111111111" calcext:value-type="float">
            <text:p>0,00261111111111111000</text:p>
          </table:table-cell>
          <table:table-cell table:formula="of:=[.D707]-[.D70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32" office:value-type="float" office:value="22592" calcext:value-type="float">
            <text:p>22592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61481481481481" calcext:value-type="float">
            <text:p>0,00261481481481481000</text:p>
          </table:table-cell>
          <table:table-cell table:formula="of:=[.D708]-[.D707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32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61851851851852" calcext:value-type="float">
            <text:p>0,00261851851851852000</text:p>
          </table:table-cell>
          <table:table-cell table:formula="of:=[.D709]-[.D70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32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62222222222222" calcext:value-type="float">
            <text:p>0,00262222222222222000</text:p>
          </table:table-cell>
          <table:table-cell table:formula="of:=[.D710]-[.D70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32" office:value-type="float" office:value="22688" calcext:value-type="float">
            <text:p>22688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62592592592593" calcext:value-type="float">
            <text:p>0,00262592592592593000</text:p>
          </table:table-cell>
          <table:table-cell table:formula="of:=[.D711]-[.D71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32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62962962962963" calcext:value-type="float">
            <text:p>0,00262962962962963000</text:p>
          </table:table-cell>
          <table:table-cell table:formula="of:=[.D712]-[.D71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32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63333333333333" calcext:value-type="float">
            <text:p>0,00263333333333333000</text:p>
          </table:table-cell>
          <table:table-cell table:formula="of:=[.D713]-[.D71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32" office:value-type="float" office:value="22784" calcext:value-type="float">
            <text:p>22784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63703703703704" calcext:value-type="float">
            <text:p>0,00263703703703704000</text:p>
          </table:table-cell>
          <table:table-cell table:formula="of:=[.D714]-[.D71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32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64074074074074" calcext:value-type="float">
            <text:p>0,00264074074074074000</text:p>
          </table:table-cell>
          <table:table-cell table:formula="of:=[.D715]-[.D71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32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64444444444444" calcext:value-type="float">
            <text:p>0,00264444444444444000</text:p>
          </table:table-cell>
          <table:table-cell table:formula="of:=[.D716]-[.D71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32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64814814814815" calcext:value-type="float">
            <text:p>0,00264814814814815000</text:p>
          </table:table-cell>
          <table:table-cell table:formula="of:=[.D717]-[.D71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32" office:value-type="float" office:value="22912" calcext:value-type="float">
            <text:p>22912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65185185185185" calcext:value-type="float">
            <text:p>0,00265185185185185000</text:p>
          </table:table-cell>
          <table:table-cell table:formula="of:=[.D718]-[.D71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32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65555555555556" calcext:value-type="float">
            <text:p>0,00265555555555556000</text:p>
          </table:table-cell>
          <table:table-cell table:formula="of:=[.D719]-[.D71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32" office:value-type="float" office:value="22976" calcext:value-type="float">
            <text:p>22976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65925925925926" calcext:value-type="float">
            <text:p>0,00265925925925926000</text:p>
          </table:table-cell>
          <table:table-cell table:formula="of:=[.D720]-[.D71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32" office:value-type="float" office:value="23008" calcext:value-type="float">
            <text:p>23008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66296296296296" calcext:value-type="float">
            <text:p>0,00266296296296296000</text:p>
          </table:table-cell>
          <table:table-cell table:formula="of:=[.D721]-[.D72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32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66666666666667" calcext:value-type="float">
            <text:p>0,00266666666666667000</text:p>
          </table:table-cell>
          <table:table-cell table:formula="of:=[.D722]-[.D72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32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67037037037037" calcext:value-type="float">
            <text:p>0,00267037037037037000</text:p>
          </table:table-cell>
          <table:table-cell table:formula="of:=[.D723]-[.D72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32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67407407407407" calcext:value-type="float">
            <text:p>0,00267407407407407000</text:p>
          </table:table-cell>
          <table:table-cell table:formula="of:=[.D724]-[.D72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32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67777777777778" calcext:value-type="float">
            <text:p>0,00267777777777778000</text:p>
          </table:table-cell>
          <table:table-cell table:formula="of:=[.D725]-[.D72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32" office:value-type="float" office:value="23168" calcext:value-type="float">
            <text:p>23168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68148148148148" calcext:value-type="float">
            <text:p>0,00268148148148148000</text:p>
          </table:table-cell>
          <table:table-cell table:formula="of:=[.D726]-[.D72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32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68518518518519" calcext:value-type="float">
            <text:p>0,00268518518518519000</text:p>
          </table:table-cell>
          <table:table-cell table:formula="of:=[.D727]-[.D726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32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68888888888889" calcext:value-type="float">
            <text:p>0,00268888888888889000</text:p>
          </table:table-cell>
          <table:table-cell table:formula="of:=[.D728]-[.D72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32" office:value-type="float" office:value="23264" calcext:value-type="float">
            <text:p>23264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69259259259259" calcext:value-type="float">
            <text:p>0,00269259259259259000</text:p>
          </table:table-cell>
          <table:table-cell table:formula="of:=[.D729]-[.D72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32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6962962962963" calcext:value-type="float">
            <text:p>0,00269629629629630000</text:p>
          </table:table-cell>
          <table:table-cell table:formula="of:=[.D730]-[.D72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32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7" calcext:value-type="float">
            <text:p>0,00270000000000000000</text:p>
          </table:table-cell>
          <table:table-cell table:formula="of:=[.D731]-[.D73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32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7037037037037" calcext:value-type="float">
            <text:p>0,00270370370370370000</text:p>
          </table:table-cell>
          <table:table-cell table:formula="of:=[.D732]-[.D73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32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70740740740741" calcext:value-type="float">
            <text:p>0,00270740740740741000</text:p>
          </table:table-cell>
          <table:table-cell table:formula="of:=[.D733]-[.D73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32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71111111111111" calcext:value-type="float">
            <text:p>0,00271111111111111000</text:p>
          </table:table-cell>
          <table:table-cell table:formula="of:=[.D734]-[.D73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32" office:value-type="float" office:value="23456" calcext:value-type="float">
            <text:p>23456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71481481481482" calcext:value-type="float">
            <text:p>0,00271481481481482000</text:p>
          </table:table-cell>
          <table:table-cell table:formula="of:=[.D735]-[.D73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32" office:value-type="float" office:value="23488" calcext:value-type="float">
            <text:p>23488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71851851851852" calcext:value-type="float">
            <text:p>0,00271851851851852000</text:p>
          </table:table-cell>
          <table:table-cell table:formula="of:=[.D736]-[.D73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32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72222222222222" calcext:value-type="float">
            <text:p>0,00272222222222222000</text:p>
          </table:table-cell>
          <table:table-cell table:formula="of:=[.D737]-[.D736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32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72592592592593" calcext:value-type="float">
            <text:p>0,00272592592592593000</text:p>
          </table:table-cell>
          <table:table-cell table:formula="of:=[.D738]-[.D73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32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72962962962963" calcext:value-type="float">
            <text:p>0,00272962962962963000</text:p>
          </table:table-cell>
          <table:table-cell table:formula="of:=[.D739]-[.D73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32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73333333333333" calcext:value-type="float">
            <text:p>0,00273333333333333000</text:p>
          </table:table-cell>
          <table:table-cell table:formula="of:=[.D740]-[.D73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32" office:value-type="float" office:value="23648" calcext:value-type="float">
            <text:p>23648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73703703703704" calcext:value-type="float">
            <text:p>0,00273703703703704000</text:p>
          </table:table-cell>
          <table:table-cell table:formula="of:=[.D741]-[.D74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32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74074074074074" calcext:value-type="float">
            <text:p>0,00274074074074074000</text:p>
          </table:table-cell>
          <table:table-cell table:formula="of:=[.D742]-[.D741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32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74444444444444" calcext:value-type="float">
            <text:p>0,00274444444444444000</text:p>
          </table:table-cell>
          <table:table-cell table:formula="of:=[.D743]-[.D742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32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74814814814815" calcext:value-type="float">
            <text:p>0,00274814814814815000</text:p>
          </table:table-cell>
          <table:table-cell table:formula="of:=[.D744]-[.D743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32" office:value-type="float" office:value="23776" calcext:value-type="float">
            <text:p>23776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75185185185185" calcext:value-type="float">
            <text:p>0,00275185185185185000</text:p>
          </table:table-cell>
          <table:table-cell table:formula="of:=[.D745]-[.D744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32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75555555555556" calcext:value-type="float">
            <text:p>0,00275555555555556000</text:p>
          </table:table-cell>
          <table:table-cell table:formula="of:=[.D746]-[.D745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32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75925925925926" calcext:value-type="float">
            <text:p>0,00275925925925926000</text:p>
          </table:table-cell>
          <table:table-cell table:formula="of:=[.D747]-[.D746]" office:value-type="float" office:value="0.00000370370370370412" calcext:value-type="float">
            <text:p>0,00000370370370370412</text:p>
          </table:table-cell>
          <table:table-cell table:number-columns-repeated="16379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32" office:value-type="float" office:value="23872" calcext:value-type="float">
            <text:p>23872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76296296296296" calcext:value-type="float">
            <text:p>0,00276296296296296000</text:p>
          </table:table-cell>
          <table:table-cell table:formula="of:=[.D748]-[.D747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32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76666666666667" calcext:value-type="float">
            <text:p>0,00276666666666667000</text:p>
          </table:table-cell>
          <table:table-cell table:formula="of:=[.D749]-[.D748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32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77037037037037" calcext:value-type="float">
            <text:p>0,00277037037037037000</text:p>
          </table:table-cell>
          <table:table-cell table:formula="of:=[.D750]-[.D749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32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77407407407407" calcext:value-type="float">
            <text:p>0,00277407407407407000</text:p>
          </table:table-cell>
          <table:table-cell table:formula="of:=[.D751]-[.D750]" office:value-type="float" office:value="0.00000370370370370368" calcext:value-type="float">
            <text:p>0,00000370370370370368</text:p>
          </table:table-cell>
          <table:table-cell table:number-columns-repeated="16379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32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77777777777778" calcext:value-type="float">
            <text:p>0,00277777777777778000</text:p>
          </table:table-cell>
          <table:table-cell table:formula="of:=#REF!-[.D75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78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6:04:33.175766333</meta:creation-date>
    <dc:date>2026-05-17T16:06:37.649171040</dc:date>
    <meta:editing-duration>PT2M5S</meta:editing-duration>
    <meta:editing-cycles>1</meta:editing-cycles>
    <meta:document-statistic meta:table-count="1" meta:cell-count="3755" meta:object-count="0"/>
    <meta:generator>LibreOffice/24.2.7.2$Linux_X86_64 LibreOffice_project/420$Build-2</meta:generator>
  </office:meta>
</office:document-meta>
</file>