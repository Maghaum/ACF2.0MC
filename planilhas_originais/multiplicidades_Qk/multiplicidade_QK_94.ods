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4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08796296296296" calcext:value-type="float">
            <text:p>0,00001087962962962960</text:p>
          </table:table-cell>
          <table:table-cell table:formula="of:=[.D3]-[.D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4" office:value-type="float" office:value="188" calcext:value-type="float">
            <text:p>18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17592592592593" calcext:value-type="float">
            <text:p>0,00002175925925925930</text:p>
          </table:table-cell>
          <table:table-cell table:formula="of:=[.D4]-[.D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4" office:value-type="float" office:value="282" calcext:value-type="float">
            <text:p>282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26388888888889" calcext:value-type="float">
            <text:p>0,00003263888888888890</text:p>
          </table:table-cell>
          <table:table-cell table:formula="of:=[.D5]-[.D4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4" office:value-type="float" office:value="376" calcext:value-type="float">
            <text:p>37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35185185185185" calcext:value-type="float">
            <text:p>0,00004351851851851850</text:p>
          </table:table-cell>
          <table:table-cell table:formula="of:=[.D6]-[.D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4" office:value-type="float" office:value="470" calcext:value-type="float">
            <text:p>47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43981481481482" calcext:value-type="float">
            <text:p>0,00005439814814814820</text:p>
          </table:table-cell>
          <table:table-cell table:formula="of:=[.D7]-[.D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4" office:value-type="float" office:value="564" calcext:value-type="float">
            <text:p>56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52777777777778" calcext:value-type="float">
            <text:p>0,00006527777777777780</text:p>
          </table:table-cell>
          <table:table-cell table:formula="of:=[.D8]-[.D7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4" office:value-type="float" office:value="658" calcext:value-type="float">
            <text:p>658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61574074074074" calcext:value-type="float">
            <text:p>0,00007615740740740740</text:p>
          </table:table-cell>
          <table:table-cell table:formula="of:=[.D9]-[.D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4" office:value-type="float" office:value="752" calcext:value-type="float">
            <text:p>75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7037037037037" calcext:value-type="float">
            <text:p>0,00008703703703703700</text:p>
          </table:table-cell>
          <table:table-cell table:formula="of:=[.D10]-[.D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4" office:value-type="float" office:value="846" calcext:value-type="float">
            <text:p>846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979166666666667" calcext:value-type="float">
            <text:p>0,00009791666666666670</text:p>
          </table:table-cell>
          <table:table-cell table:formula="of:=[.D11]-[.D10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4" office:value-type="float" office:value="940" calcext:value-type="float">
            <text:p>94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08796296296296" calcext:value-type="float">
            <text:p>0,00010879629629629600</text:p>
          </table:table-cell>
          <table:table-cell table:formula="of:=[.D12]-[.D11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4" office:value-type="float" office:value="1034" calcext:value-type="float">
            <text:p>1034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19675925925926" calcext:value-type="float">
            <text:p>0,00011967592592592600</text:p>
          </table:table-cell>
          <table:table-cell table:formula="of:=[.D13]-[.D1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4" office:value-type="float" office:value="1128" calcext:value-type="float">
            <text:p>112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30555555555556" calcext:value-type="float">
            <text:p>0,00013055555555555600</text:p>
          </table:table-cell>
          <table:table-cell table:formula="of:=[.D14]-[.D13]" office:value-type="float" office:value="0.0000108796296296296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4" office:value-type="float" office:value="1222" calcext:value-type="float">
            <text:p>1222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41435185185185" calcext:value-type="float">
            <text:p>0,00014143518518518500</text:p>
          </table:table-cell>
          <table:table-cell table:formula="of:=[.D15]-[.D14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4" office:value-type="float" office:value="1316" calcext:value-type="float">
            <text:p>131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52314814814815" calcext:value-type="float">
            <text:p>0,00015231481481481500</text:p>
          </table:table-cell>
          <table:table-cell table:formula="of:=[.D16]-[.D1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4" office:value-type="float" office:value="1410" calcext:value-type="float">
            <text:p>141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63194444444444" calcext:value-type="float">
            <text:p>0,00016319444444444400</text:p>
          </table:table-cell>
          <table:table-cell table:formula="of:=[.D17]-[.D16]" office:value-type="float" office:value="0.0000108796296296296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4" office:value-type="float" office:value="1504" calcext:value-type="float">
            <text:p>150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74074074074074" calcext:value-type="float">
            <text:p>0,00017407407407407400</text:p>
          </table:table-cell>
          <table:table-cell table:formula="of:=[.D18]-[.D17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4" office:value-type="float" office:value="1598" calcext:value-type="float">
            <text:p>1598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84953703703704" calcext:value-type="float">
            <text:p>0,00018495370370370400</text:p>
          </table:table-cell>
          <table:table-cell table:formula="of:=[.D19]-[.D18]" office:value-type="float" office:value="0.0000108796296296296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4" office:value-type="float" office:value="1692" calcext:value-type="float">
            <text:p>169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95833333333333" calcext:value-type="float">
            <text:p>0,00019583333333333300</text:p>
          </table:table-cell>
          <table:table-cell table:formula="of:=[.D20]-[.D1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4" office:value-type="float" office:value="1786" calcext:value-type="float">
            <text:p>1786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206712962962963" calcext:value-type="float">
            <text:p>0,00020671296296296300</text:p>
          </table:table-cell>
          <table:table-cell table:formula="of:=[.D21]-[.D20]" office:value-type="float" office:value="0.0000108796296296296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4" office:value-type="float" office:value="1880" calcext:value-type="float">
            <text:p>18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17592592592593" calcext:value-type="float">
            <text:p>0,00021759259259259300</text:p>
          </table:table-cell>
          <table:table-cell table:formula="of:=[.D22]-[.D21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4" office:value-type="float" office:value="1974" calcext:value-type="float">
            <text:p>1974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28472222222222" calcext:value-type="float">
            <text:p>0,00022847222222222200</text:p>
          </table:table-cell>
          <table:table-cell table:formula="of:=[.D23]-[.D2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4" office:value-type="float" office:value="2068" calcext:value-type="float">
            <text:p>206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39351851851852" calcext:value-type="float">
            <text:p>0,00023935185185185200</text:p>
          </table:table-cell>
          <table:table-cell table:formula="of:=[.D24]-[.D23]" office:value-type="float" office:value="0.0000108796296296296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4" office:value-type="float" office:value="2162" calcext:value-type="float">
            <text:p>2162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50231481481482" calcext:value-type="float">
            <text:p>0,00025023148148148200</text:p>
          </table:table-cell>
          <table:table-cell table:formula="of:=[.D25]-[.D24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4" office:value-type="float" office:value="2256" calcext:value-type="float">
            <text:p>225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61111111111111" calcext:value-type="float">
            <text:p>0,00026111111111111100</text:p>
          </table:table-cell>
          <table:table-cell table:formula="of:=[.D26]-[.D2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4" office:value-type="float" office:value="2350" calcext:value-type="float">
            <text:p>23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71990740740741" calcext:value-type="float">
            <text:p>0,00027199074074074100</text:p>
          </table:table-cell>
          <table:table-cell table:formula="of:=[.D27]-[.D26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4" office:value-type="float" office:value="2444" calcext:value-type="float">
            <text:p>244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8287037037037" calcext:value-type="float">
            <text:p>0,00028287037037037000</text:p>
          </table:table-cell>
          <table:table-cell table:formula="of:=[.D28]-[.D27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4" office:value-type="float" office:value="2538" calcext:value-type="float">
            <text:p>2538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9375" calcext:value-type="float">
            <text:p>0,00029375000000000000</text:p>
          </table:table-cell>
          <table:table-cell table:formula="of:=[.D29]-[.D2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4" office:value-type="float" office:value="2632" calcext:value-type="float">
            <text:p>263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30462962962963" calcext:value-type="float">
            <text:p>0,00030462962962963000</text:p>
          </table:table-cell>
          <table:table-cell table:formula="of:=[.D30]-[.D2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4" office:value-type="float" office:value="2726" calcext:value-type="float">
            <text:p>2726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15509259259259" calcext:value-type="float">
            <text:p>0,00031550925925925900</text:p>
          </table:table-cell>
          <table:table-cell table:formula="of:=[.D31]-[.D30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4" office:value-type="float" office:value="2820" calcext:value-type="float">
            <text:p>282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26388888888889" calcext:value-type="float">
            <text:p>0,00032638888888888900</text:p>
          </table:table-cell>
          <table:table-cell table:formula="of:=[.D32]-[.D31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4" office:value-type="float" office:value="2914" calcext:value-type="float">
            <text:p>2914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37268518518519" calcext:value-type="float">
            <text:p>0,00033726851851851900</text:p>
          </table:table-cell>
          <table:table-cell table:formula="of:=[.D33]-[.D3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4" office:value-type="float" office:value="3008" calcext:value-type="float">
            <text:p>300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48148148148148" calcext:value-type="float">
            <text:p>0,00034814814814814800</text:p>
          </table:table-cell>
          <table:table-cell table:formula="of:=[.D34]-[.D3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4" office:value-type="float" office:value="3102" calcext:value-type="float">
            <text:p>3102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59027777777778" calcext:value-type="float">
            <text:p>0,00035902777777777800</text:p>
          </table:table-cell>
          <table:table-cell table:formula="of:=[.D35]-[.D34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4" office:value-type="float" office:value="3196" calcext:value-type="float">
            <text:p>319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69907407407407" calcext:value-type="float">
            <text:p>0,00036990740740740700</text:p>
          </table:table-cell>
          <table:table-cell table:formula="of:=[.D36]-[.D35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4" office:value-type="float" office:value="3290" calcext:value-type="float">
            <text:p>329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80787037037037" calcext:value-type="float">
            <text:p>0,00038078703703703700</text:p>
          </table:table-cell>
          <table:table-cell table:formula="of:=[.D37]-[.D3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4" office:value-type="float" office:value="3384" calcext:value-type="float">
            <text:p>338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91666666666667" calcext:value-type="float">
            <text:p>0,00039166666666666700</text:p>
          </table:table-cell>
          <table:table-cell table:formula="of:=[.D38]-[.D37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4" office:value-type="float" office:value="3478" calcext:value-type="float">
            <text:p>3478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402546296296296" calcext:value-type="float">
            <text:p>0,00040254629629629600</text:p>
          </table:table-cell>
          <table:table-cell table:formula="of:=[.D39]-[.D3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4" office:value-type="float" office:value="3572" calcext:value-type="float">
            <text:p>357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413425925925926" calcext:value-type="float">
            <text:p>0,00041342592592592600</text:p>
          </table:table-cell>
          <table:table-cell table:formula="of:=[.D40]-[.D3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4" office:value-type="float" office:value="3666" calcext:value-type="float">
            <text:p>3666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24305555555556" calcext:value-type="float">
            <text:p>0,00042430555555555600</text:p>
          </table:table-cell>
          <table:table-cell table:formula="of:=[.D41]-[.D40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4" office:value-type="float" office:value="3760" calcext:value-type="float">
            <text:p>37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35185185185185" calcext:value-type="float">
            <text:p>0,00043518518518518500</text:p>
          </table:table-cell>
          <table:table-cell table:formula="of:=[.D42]-[.D41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4" office:value-type="float" office:value="3854" calcext:value-type="float">
            <text:p>3854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46064814814815" calcext:value-type="float">
            <text:p>0,00044606481481481500</text:p>
          </table:table-cell>
          <table:table-cell table:formula="of:=[.D43]-[.D4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4" office:value-type="float" office:value="3948" calcext:value-type="float">
            <text:p>394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56944444444444" calcext:value-type="float">
            <text:p>0,00045694444444444500</text:p>
          </table:table-cell>
          <table:table-cell table:formula="of:=[.D44]-[.D4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4" office:value-type="float" office:value="4042" calcext:value-type="float">
            <text:p>4042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67824074074074" calcext:value-type="float">
            <text:p>0,00046782407407407400</text:p>
          </table:table-cell>
          <table:table-cell table:formula="of:=[.D45]-[.D44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4" office:value-type="float" office:value="4136" calcext:value-type="float">
            <text:p>413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78703703703704" calcext:value-type="float">
            <text:p>0,00047870370370370400</text:p>
          </table:table-cell>
          <table:table-cell table:formula="of:=[.D46]-[.D4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4" office:value-type="float" office:value="4230" calcext:value-type="float">
            <text:p>423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89583333333333" calcext:value-type="float">
            <text:p>0,00048958333333333300</text:p>
          </table:table-cell>
          <table:table-cell table:formula="of:=[.D47]-[.D46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4" office:value-type="float" office:value="4324" calcext:value-type="float">
            <text:p>432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500462962962963" calcext:value-type="float">
            <text:p>0,00050046296296296300</text:p>
          </table:table-cell>
          <table:table-cell table:formula="of:=[.D48]-[.D47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4" office:value-type="float" office:value="4418" calcext:value-type="float">
            <text:p>4418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511342592592593" calcext:value-type="float">
            <text:p>0,00051134259259259300</text:p>
          </table:table-cell>
          <table:table-cell table:formula="of:=[.D49]-[.D4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4" office:value-type="float" office:value="4512" calcext:value-type="float">
            <text:p>451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22222222222222" calcext:value-type="float">
            <text:p>0,00052222222222222200</text:p>
          </table:table-cell>
          <table:table-cell table:formula="of:=[.D50]-[.D49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4" office:value-type="float" office:value="4606" calcext:value-type="float">
            <text:p>4606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33101851851852" calcext:value-type="float">
            <text:p>0,00053310185185185200</text:p>
          </table:table-cell>
          <table:table-cell table:formula="of:=[.D51]-[.D50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4" office:value-type="float" office:value="4700" calcext:value-type="float">
            <text:p>47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43981481481481" calcext:value-type="float">
            <text:p>0,00054398148148148100</text:p>
          </table:table-cell>
          <table:table-cell table:formula="of:=[.D52]-[.D51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4" office:value-type="float" office:value="4794" calcext:value-type="float">
            <text:p>4794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54861111111111" calcext:value-type="float">
            <text:p>0,00055486111111111100</text:p>
          </table:table-cell>
          <table:table-cell table:formula="of:=[.D53]-[.D52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4" office:value-type="float" office:value="4888" calcext:value-type="float">
            <text:p>488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65740740740741" calcext:value-type="float">
            <text:p>0,00056574074074074100</text:p>
          </table:table-cell>
          <table:table-cell table:formula="of:=[.D54]-[.D5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4" office:value-type="float" office:value="4982" calcext:value-type="float">
            <text:p>4982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7662037037037" calcext:value-type="float">
            <text:p>0,00057662037037037000</text:p>
          </table:table-cell>
          <table:table-cell table:formula="of:=[.D55]-[.D54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4" office:value-type="float" office:value="5076" calcext:value-type="float">
            <text:p>507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875" calcext:value-type="float">
            <text:p>0,00058750000000000000</text:p>
          </table:table-cell>
          <table:table-cell table:formula="of:=[.D56]-[.D5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4" office:value-type="float" office:value="5170" calcext:value-type="float">
            <text:p>517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9837962962963" calcext:value-type="float">
            <text:p>0,00059837962962963000</text:p>
          </table:table-cell>
          <table:table-cell table:formula="of:=[.D57]-[.D56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4" office:value-type="float" office:value="5264" calcext:value-type="float">
            <text:p>526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609259259259259" calcext:value-type="float">
            <text:p>0,00060925925925925900</text:p>
          </table:table-cell>
          <table:table-cell table:formula="of:=[.D58]-[.D57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4" office:value-type="float" office:value="5358" calcext:value-type="float">
            <text:p>5358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620138888888889" calcext:value-type="float">
            <text:p>0,00062013888888888900</text:p>
          </table:table-cell>
          <table:table-cell table:formula="of:=[.D59]-[.D5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4" office:value-type="float" office:value="5452" calcext:value-type="float">
            <text:p>545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31018518518519" calcext:value-type="float">
            <text:p>0,00063101851851851900</text:p>
          </table:table-cell>
          <table:table-cell table:formula="of:=[.D60]-[.D59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4" office:value-type="float" office:value="5546" calcext:value-type="float">
            <text:p>5546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41898148148148" calcext:value-type="float">
            <text:p>0,00064189814814814800</text:p>
          </table:table-cell>
          <table:table-cell table:formula="of:=[.D61]-[.D60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4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52777777777778" calcext:value-type="float">
            <text:p>0,00065277777777777800</text:p>
          </table:table-cell>
          <table:table-cell table:formula="of:=[.D62]-[.D61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4" office:value-type="float" office:value="5734" calcext:value-type="float">
            <text:p>5734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63657407407407" calcext:value-type="float">
            <text:p>0,00066365740740740700</text:p>
          </table:table-cell>
          <table:table-cell table:formula="of:=[.D63]-[.D62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4" office:value-type="float" office:value="5828" calcext:value-type="float">
            <text:p>582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74537037037037" calcext:value-type="float">
            <text:p>0,00067453703703703700</text:p>
          </table:table-cell>
          <table:table-cell table:formula="of:=[.D64]-[.D6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4" office:value-type="float" office:value="5922" calcext:value-type="float">
            <text:p>5922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85416666666667" calcext:value-type="float">
            <text:p>0,00068541666666666700</text:p>
          </table:table-cell>
          <table:table-cell table:formula="of:=[.D65]-[.D64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4" office:value-type="float" office:value="6016" calcext:value-type="float">
            <text:p>601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96296296296296" calcext:value-type="float">
            <text:p>0,00069629629629629600</text:p>
          </table:table-cell>
          <table:table-cell table:formula="of:=[.D66]-[.D6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4" office:value-type="float" office:value="6110" calcext:value-type="float">
            <text:p>611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707175925925926" calcext:value-type="float">
            <text:p>0,00070717592592592600</text:p>
          </table:table-cell>
          <table:table-cell table:formula="of:=[.D67]-[.D66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4" office:value-type="float" office:value="6204" calcext:value-type="float">
            <text:p>620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718055555555556" calcext:value-type="float">
            <text:p>0,00071805555555555600</text:p>
          </table:table-cell>
          <table:table-cell table:formula="of:=[.D68]-[.D67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4" office:value-type="float" office:value="6298" calcext:value-type="float">
            <text:p>6298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728935185185185" calcext:value-type="float">
            <text:p>0,00072893518518518500</text:p>
          </table:table-cell>
          <table:table-cell table:formula="of:=[.D69]-[.D6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4" office:value-type="float" office:value="6392" calcext:value-type="float">
            <text:p>639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39814814814815" calcext:value-type="float">
            <text:p>0,00073981481481481500</text:p>
          </table:table-cell>
          <table:table-cell table:formula="of:=[.D70]-[.D69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4" office:value-type="float" office:value="6486" calcext:value-type="float">
            <text:p>6486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50694444444445" calcext:value-type="float">
            <text:p>0,00075069444444444500</text:p>
          </table:table-cell>
          <table:table-cell table:formula="of:=[.D71]-[.D70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4" office:value-type="float" office:value="6580" calcext:value-type="float">
            <text:p>658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61574074074074" calcext:value-type="float">
            <text:p>0,00076157407407407400</text:p>
          </table:table-cell>
          <table:table-cell table:formula="of:=[.D72]-[.D71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4" office:value-type="float" office:value="6674" calcext:value-type="float">
            <text:p>6674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72453703703704" calcext:value-type="float">
            <text:p>0,00077245370370370400</text:p>
          </table:table-cell>
          <table:table-cell table:formula="of:=[.D73]-[.D72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4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83333333333333" calcext:value-type="float">
            <text:p>0,00078333333333333400</text:p>
          </table:table-cell>
          <table:table-cell table:formula="of:=[.D74]-[.D7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4" office:value-type="float" office:value="6862" calcext:value-type="float">
            <text:p>6862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94212962962963" calcext:value-type="float">
            <text:p>0,00079421296296296300</text:p>
          </table:table-cell>
          <table:table-cell table:formula="of:=[.D75]-[.D74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4" office:value-type="float" office:value="6956" calcext:value-type="float">
            <text:p>695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805092592592593" calcext:value-type="float">
            <text:p>0,00080509259259259300</text:p>
          </table:table-cell>
          <table:table-cell table:formula="of:=[.D76]-[.D75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4" office:value-type="float" office:value="7050" calcext:value-type="float">
            <text:p>70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815972222222222" calcext:value-type="float">
            <text:p>0,00081597222222222200</text:p>
          </table:table-cell>
          <table:table-cell table:formula="of:=[.D77]-[.D7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4" office:value-type="float" office:value="7144" calcext:value-type="float">
            <text:p>714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826851851851852" calcext:value-type="float">
            <text:p>0,00082685185185185200</text:p>
          </table:table-cell>
          <table:table-cell table:formula="of:=[.D78]-[.D77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4" office:value-type="float" office:value="7238" calcext:value-type="float">
            <text:p>7238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37731481481482" calcext:value-type="float">
            <text:p>0,00083773148148148100</text:p>
          </table:table-cell>
          <table:table-cell table:formula="of:=[.D79]-[.D7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4" office:value-type="float" office:value="7332" calcext:value-type="float">
            <text:p>733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48611111111111" calcext:value-type="float">
            <text:p>0,00084861111111111100</text:p>
          </table:table-cell>
          <table:table-cell table:formula="of:=[.D80]-[.D79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4" office:value-type="float" office:value="7426" calcext:value-type="float">
            <text:p>7426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59490740740741" calcext:value-type="float">
            <text:p>0,00085949074074074100</text:p>
          </table:table-cell>
          <table:table-cell table:formula="of:=[.D81]-[.D80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4" office:value-type="float" office:value="7520" calcext:value-type="float">
            <text:p>75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7037037037037" calcext:value-type="float">
            <text:p>0,00087037037037037000</text:p>
          </table:table-cell>
          <table:table-cell table:formula="of:=[.D82]-[.D81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4" office:value-type="float" office:value="7614" calcext:value-type="float">
            <text:p>7614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88125" calcext:value-type="float">
            <text:p>0,00088125000000000000</text:p>
          </table:table-cell>
          <table:table-cell table:formula="of:=[.D83]-[.D82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4" office:value-type="float" office:value="7708" calcext:value-type="float">
            <text:p>770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89212962962963" calcext:value-type="float">
            <text:p>0,00089212962962963000</text:p>
          </table:table-cell>
          <table:table-cell table:formula="of:=[.D84]-[.D8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4" office:value-type="float" office:value="7802" calcext:value-type="float">
            <text:p>7802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903009259259259" calcext:value-type="float">
            <text:p>0,00090300925925925900</text:p>
          </table:table-cell>
          <table:table-cell table:formula="of:=[.D85]-[.D84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4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913888888888889" calcext:value-type="float">
            <text:p>0,00091388888888888900</text:p>
          </table:table-cell>
          <table:table-cell table:formula="of:=[.D86]-[.D85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4" office:value-type="float" office:value="7990" calcext:value-type="float">
            <text:p>799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924768518518519" calcext:value-type="float">
            <text:p>0,00092476851851851900</text:p>
          </table:table-cell>
          <table:table-cell table:formula="of:=[.D87]-[.D8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4" office:value-type="float" office:value="8084" calcext:value-type="float">
            <text:p>808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935648148148148" calcext:value-type="float">
            <text:p>0,00093564814814814800</text:p>
          </table:table-cell>
          <table:table-cell table:formula="of:=[.D88]-[.D87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4" office:value-type="float" office:value="8178" calcext:value-type="float">
            <text:p>8178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946527777777778" calcext:value-type="float">
            <text:p>0,00094652777777777800</text:p>
          </table:table-cell>
          <table:table-cell table:formula="of:=[.D89]-[.D8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4" office:value-type="float" office:value="8272" calcext:value-type="float">
            <text:p>827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957407407407407" calcext:value-type="float">
            <text:p>0,00095740740740740700</text:p>
          </table:table-cell>
          <table:table-cell table:formula="of:=[.D90]-[.D89]" office:value-type="float" office:value="0.0000108796296296297" calcext:value-type="float">
            <text:p>0,0000108796296296297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4" office:value-type="float" office:value="8366" calcext:value-type="float">
            <text:p>8366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968287037037037" calcext:value-type="float">
            <text:p>0,00096828703703703700</text:p>
          </table:table-cell>
          <table:table-cell table:formula="of:=[.D91]-[.D90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4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979166666666667" calcext:value-type="float">
            <text:p>0,00097916666666666700</text:p>
          </table:table-cell>
          <table:table-cell table:formula="of:=[.D92]-[.D9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4" office:value-type="float" office:value="8554" calcext:value-type="float">
            <text:p>8554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990046296296296" calcext:value-type="float">
            <text:p>0,00099004629629629600</text:p>
          </table:table-cell>
          <table:table-cell table:formula="of:=[.D93]-[.D9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4" office:value-type="float" office:value="8648" calcext:value-type="float">
            <text:p>864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100092592592593" calcext:value-type="float">
            <text:p>0,00100092592592593000</text:p>
          </table:table-cell>
          <table:table-cell table:formula="of:=[.D94]-[.D9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4" office:value-type="float" office:value="8742" calcext:value-type="float">
            <text:p>8742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101180555555556" calcext:value-type="float">
            <text:p>0,00101180555555556000</text:p>
          </table:table-cell>
          <table:table-cell table:formula="of:=[.D95]-[.D9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4" office:value-type="float" office:value="8836" calcext:value-type="float">
            <text:p>883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102268518518519" calcext:value-type="float">
            <text:p>0,00102268518518519000</text:p>
          </table:table-cell>
          <table:table-cell table:formula="of:=[.D96]-[.D9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4" office:value-type="float" office:value="8930" calcext:value-type="float">
            <text:p>893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103356481481481" calcext:value-type="float">
            <text:p>0,00103356481481481000</text:p>
          </table:table-cell>
          <table:table-cell table:formula="of:=[.D97]-[.D9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4" office:value-type="float" office:value="9024" calcext:value-type="float">
            <text:p>902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04444444444444" calcext:value-type="float">
            <text:p>0,00104444444444444000</text:p>
          </table:table-cell>
          <table:table-cell table:formula="of:=[.D98]-[.D97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4" office:value-type="float" office:value="9118" calcext:value-type="float">
            <text:p>9118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05532407407407" calcext:value-type="float">
            <text:p>0,00105532407407407000</text:p>
          </table:table-cell>
          <table:table-cell table:formula="of:=[.D99]-[.D98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4" office:value-type="float" office:value="9212" calcext:value-type="float">
            <text:p>921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0662037037037" calcext:value-type="float">
            <text:p>0,00106620370370370000</text:p>
          </table:table-cell>
          <table:table-cell table:formula="of:=[.D100]-[.D9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4" office:value-type="float" office:value="9306" calcext:value-type="float">
            <text:p>9306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07708333333333" calcext:value-type="float">
            <text:p>0,00107708333333333000</text:p>
          </table:table-cell>
          <table:table-cell table:formula="of:=[.D101]-[.D100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4" office:value-type="float" office:value="9400" calcext:value-type="float">
            <text:p>94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08796296296296" calcext:value-type="float">
            <text:p>0,00108796296296296000</text:p>
          </table:table-cell>
          <table:table-cell table:formula="of:=[.D102]-[.D10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4" office:value-type="float" office:value="9494" calcext:value-type="float">
            <text:p>9494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09884259259259" calcext:value-type="float">
            <text:p>0,00109884259259259000</text:p>
          </table:table-cell>
          <table:table-cell table:formula="of:=[.D103]-[.D10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4" office:value-type="float" office:value="9588" calcext:value-type="float">
            <text:p>958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10972222222222" calcext:value-type="float">
            <text:p>0,00110972222222222000</text:p>
          </table:table-cell>
          <table:table-cell table:formula="of:=[.D104]-[.D10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4" office:value-type="float" office:value="9682" calcext:value-type="float">
            <text:p>9682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12060185185185" calcext:value-type="float">
            <text:p>0,00112060185185185000</text:p>
          </table:table-cell>
          <table:table-cell table:formula="of:=[.D105]-[.D10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4" office:value-type="float" office:value="9776" calcext:value-type="float">
            <text:p>977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13148148148148" calcext:value-type="float">
            <text:p>0,00113148148148148000</text:p>
          </table:table-cell>
          <table:table-cell table:formula="of:=[.D106]-[.D10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4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14236111111111" calcext:value-type="float">
            <text:p>0,00114236111111111000</text:p>
          </table:table-cell>
          <table:table-cell table:formula="of:=[.D107]-[.D10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4" office:value-type="float" office:value="9964" calcext:value-type="float">
            <text:p>996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15324074074074" calcext:value-type="float">
            <text:p>0,00115324074074074000</text:p>
          </table:table-cell>
          <table:table-cell table:formula="of:=[.D108]-[.D107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4" office:value-type="float" office:value="10058" calcext:value-type="float">
            <text:p>10058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16412037037037" calcext:value-type="float">
            <text:p>0,00116412037037037000</text:p>
          </table:table-cell>
          <table:table-cell table:formula="of:=[.D109]-[.D108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4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175" calcext:value-type="float">
            <text:p>0,00117500000000000000</text:p>
          </table:table-cell>
          <table:table-cell table:formula="of:=[.D110]-[.D10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4" office:value-type="float" office:value="10246" calcext:value-type="float">
            <text:p>10246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18587962962963" calcext:value-type="float">
            <text:p>0,00118587962962963000</text:p>
          </table:table-cell>
          <table:table-cell table:formula="of:=[.D111]-[.D110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4" office:value-type="float" office:value="10340" calcext:value-type="float">
            <text:p>1034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19675925925926" calcext:value-type="float">
            <text:p>0,00119675925925926000</text:p>
          </table:table-cell>
          <table:table-cell table:formula="of:=[.D112]-[.D11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4" office:value-type="float" office:value="10434" calcext:value-type="float">
            <text:p>10434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20763888888889" calcext:value-type="float">
            <text:p>0,00120763888888889000</text:p>
          </table:table-cell>
          <table:table-cell table:formula="of:=[.D113]-[.D11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4" office:value-type="float" office:value="10528" calcext:value-type="float">
            <text:p>1052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21851851851852" calcext:value-type="float">
            <text:p>0,00121851851851852000</text:p>
          </table:table-cell>
          <table:table-cell table:formula="of:=[.D114]-[.D11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4" office:value-type="float" office:value="10622" calcext:value-type="float">
            <text:p>10622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22939814814815" calcext:value-type="float">
            <text:p>0,00122939814814815000</text:p>
          </table:table-cell>
          <table:table-cell table:formula="of:=[.D115]-[.D11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4" office:value-type="float" office:value="10716" calcext:value-type="float">
            <text:p>1071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24027777777778" calcext:value-type="float">
            <text:p>0,00124027777777778000</text:p>
          </table:table-cell>
          <table:table-cell table:formula="of:=[.D116]-[.D11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4" office:value-type="float" office:value="10810" calcext:value-type="float">
            <text:p>1081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25115740740741" calcext:value-type="float">
            <text:p>0,00125115740740741000</text:p>
          </table:table-cell>
          <table:table-cell table:formula="of:=[.D117]-[.D11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4" office:value-type="float" office:value="10904" calcext:value-type="float">
            <text:p>1090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26203703703704" calcext:value-type="float">
            <text:p>0,00126203703703704000</text:p>
          </table:table-cell>
          <table:table-cell table:formula="of:=[.D118]-[.D11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4" office:value-type="float" office:value="10998" calcext:value-type="float">
            <text:p>10998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27291666666667" calcext:value-type="float">
            <text:p>0,00127291666666667000</text:p>
          </table:table-cell>
          <table:table-cell table:formula="of:=[.D119]-[.D11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4" office:value-type="float" office:value="11092" calcext:value-type="float">
            <text:p>1109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2837962962963" calcext:value-type="float">
            <text:p>0,00128379629629630000</text:p>
          </table:table-cell>
          <table:table-cell table:formula="of:=[.D120]-[.D11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4" office:value-type="float" office:value="11186" calcext:value-type="float">
            <text:p>11186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29467592592593" calcext:value-type="float">
            <text:p>0,00129467592592593000</text:p>
          </table:table-cell>
          <table:table-cell table:formula="of:=[.D121]-[.D120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4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30555555555556" calcext:value-type="float">
            <text:p>0,00130555555555556000</text:p>
          </table:table-cell>
          <table:table-cell table:formula="of:=[.D122]-[.D12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4" office:value-type="float" office:value="11374" calcext:value-type="float">
            <text:p>11374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31643518518519" calcext:value-type="float">
            <text:p>0,00131643518518519000</text:p>
          </table:table-cell>
          <table:table-cell table:formula="of:=[.D123]-[.D12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4" office:value-type="float" office:value="11468" calcext:value-type="float">
            <text:p>1146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32731481481481" calcext:value-type="float">
            <text:p>0,00132731481481481000</text:p>
          </table:table-cell>
          <table:table-cell table:formula="of:=[.D124]-[.D12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4" office:value-type="float" office:value="11562" calcext:value-type="float">
            <text:p>11562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33819444444444" calcext:value-type="float">
            <text:p>0,00133819444444444000</text:p>
          </table:table-cell>
          <table:table-cell table:formula="of:=[.D125]-[.D12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4" office:value-type="float" office:value="11656" calcext:value-type="float">
            <text:p>1165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34907407407407" calcext:value-type="float">
            <text:p>0,00134907407407407000</text:p>
          </table:table-cell>
          <table:table-cell table:formula="of:=[.D126]-[.D12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4" office:value-type="float" office:value="11750" calcext:value-type="float">
            <text:p>11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3599537037037" calcext:value-type="float">
            <text:p>0,00135995370370370000</text:p>
          </table:table-cell>
          <table:table-cell table:formula="of:=[.D127]-[.D12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4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37083333333333" calcext:value-type="float">
            <text:p>0,00137083333333333000</text:p>
          </table:table-cell>
          <table:table-cell table:formula="of:=[.D128]-[.D12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4" office:value-type="float" office:value="11938" calcext:value-type="float">
            <text:p>11938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38171296296296" calcext:value-type="float">
            <text:p>0,00138171296296296000</text:p>
          </table:table-cell>
          <table:table-cell table:formula="of:=[.D129]-[.D12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4" office:value-type="float" office:value="12032" calcext:value-type="float">
            <text:p>1203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39259259259259" calcext:value-type="float">
            <text:p>0,00139259259259259000</text:p>
          </table:table-cell>
          <table:table-cell table:formula="of:=[.D130]-[.D12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4" office:value-type="float" office:value="12126" calcext:value-type="float">
            <text:p>12126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40347222222222" calcext:value-type="float">
            <text:p>0,00140347222222222000</text:p>
          </table:table-cell>
          <table:table-cell table:formula="of:=[.D131]-[.D130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4" office:value-type="float" office:value="12220" calcext:value-type="float">
            <text:p>1222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41435185185185" calcext:value-type="float">
            <text:p>0,00141435185185185000</text:p>
          </table:table-cell>
          <table:table-cell table:formula="of:=[.D132]-[.D13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4" office:value-type="float" office:value="12314" calcext:value-type="float">
            <text:p>12314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42523148148148" calcext:value-type="float">
            <text:p>0,00142523148148148000</text:p>
          </table:table-cell>
          <table:table-cell table:formula="of:=[.D133]-[.D13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4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43611111111111" calcext:value-type="float">
            <text:p>0,00143611111111111000</text:p>
          </table:table-cell>
          <table:table-cell table:formula="of:=[.D134]-[.D13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4" office:value-type="float" office:value="12502" calcext:value-type="float">
            <text:p>12502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44699074074074" calcext:value-type="float">
            <text:p>0,00144699074074074000</text:p>
          </table:table-cell>
          <table:table-cell table:formula="of:=[.D135]-[.D13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4" office:value-type="float" office:value="12596" calcext:value-type="float">
            <text:p>1259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45787037037037" calcext:value-type="float">
            <text:p>0,00145787037037037000</text:p>
          </table:table-cell>
          <table:table-cell table:formula="of:=[.D136]-[.D13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4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46875" calcext:value-type="float">
            <text:p>0,00146875000000000000</text:p>
          </table:table-cell>
          <table:table-cell table:formula="of:=[.D137]-[.D13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4" office:value-type="float" office:value="12784" calcext:value-type="float">
            <text:p>1278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47962962962963" calcext:value-type="float">
            <text:p>0,00147962962962963000</text:p>
          </table:table-cell>
          <table:table-cell table:formula="of:=[.D138]-[.D13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4" office:value-type="float" office:value="12878" calcext:value-type="float">
            <text:p>12878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49050925925926" calcext:value-type="float">
            <text:p>0,00149050925925926000</text:p>
          </table:table-cell>
          <table:table-cell table:formula="of:=[.D139]-[.D13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4" office:value-type="float" office:value="12972" calcext:value-type="float">
            <text:p>1297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50138888888889" calcext:value-type="float">
            <text:p>0,00150138888888889000</text:p>
          </table:table-cell>
          <table:table-cell table:formula="of:=[.D140]-[.D13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4" office:value-type="float" office:value="13066" calcext:value-type="float">
            <text:p>13066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51226851851852" calcext:value-type="float">
            <text:p>0,00151226851851852000</text:p>
          </table:table-cell>
          <table:table-cell table:formula="of:=[.D141]-[.D140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4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52314814814815" calcext:value-type="float">
            <text:p>0,00152314814814815000</text:p>
          </table:table-cell>
          <table:table-cell table:formula="of:=[.D142]-[.D141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4" office:value-type="float" office:value="13254" calcext:value-type="float">
            <text:p>13254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53402777777778" calcext:value-type="float">
            <text:p>0,00153402777777778000</text:p>
          </table:table-cell>
          <table:table-cell table:formula="of:=[.D143]-[.D14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4" office:value-type="float" office:value="13348" calcext:value-type="float">
            <text:p>1334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54490740740741" calcext:value-type="float">
            <text:p>0,00154490740740741000</text:p>
          </table:table-cell>
          <table:table-cell table:formula="of:=[.D144]-[.D14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4" office:value-type="float" office:value="13442" calcext:value-type="float">
            <text:p>13442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55578703703704" calcext:value-type="float">
            <text:p>0,00155578703703704000</text:p>
          </table:table-cell>
          <table:table-cell table:formula="of:=[.D145]-[.D14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4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56666666666667" calcext:value-type="float">
            <text:p>0,00156666666666667000</text:p>
          </table:table-cell>
          <table:table-cell table:formula="of:=[.D146]-[.D14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4" office:value-type="float" office:value="13630" calcext:value-type="float">
            <text:p>1363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5775462962963" calcext:value-type="float">
            <text:p>0,00157754629629630000</text:p>
          </table:table-cell>
          <table:table-cell table:formula="of:=[.D147]-[.D14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4" office:value-type="float" office:value="13724" calcext:value-type="float">
            <text:p>1372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58842592592593" calcext:value-type="float">
            <text:p>0,00158842592592593000</text:p>
          </table:table-cell>
          <table:table-cell table:formula="of:=[.D148]-[.D14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4" office:value-type="float" office:value="13818" calcext:value-type="float">
            <text:p>13818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59930555555556" calcext:value-type="float">
            <text:p>0,00159930555555556000</text:p>
          </table:table-cell>
          <table:table-cell table:formula="of:=[.D149]-[.D14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4" office:value-type="float" office:value="13912" calcext:value-type="float">
            <text:p>1391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61018518518519" calcext:value-type="float">
            <text:p>0,00161018518518519000</text:p>
          </table:table-cell>
          <table:table-cell table:formula="of:=[.D150]-[.D14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4" office:value-type="float" office:value="14006" calcext:value-type="float">
            <text:p>14006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62106481481481" calcext:value-type="float">
            <text:p>0,00162106481481481000</text:p>
          </table:table-cell>
          <table:table-cell table:formula="of:=[.D151]-[.D150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4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63194444444444" calcext:value-type="float">
            <text:p>0,00163194444444444000</text:p>
          </table:table-cell>
          <table:table-cell table:formula="of:=[.D152]-[.D151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4" office:value-type="float" office:value="14194" calcext:value-type="float">
            <text:p>14194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64282407407407" calcext:value-type="float">
            <text:p>0,00164282407407407000</text:p>
          </table:table-cell>
          <table:table-cell table:formula="of:=[.D153]-[.D15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4" office:value-type="float" office:value="14288" calcext:value-type="float">
            <text:p>1428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6537037037037" calcext:value-type="float">
            <text:p>0,00165370370370370000</text:p>
          </table:table-cell>
          <table:table-cell table:formula="of:=[.D154]-[.D15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4" office:value-type="float" office:value="14382" calcext:value-type="float">
            <text:p>14382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66458333333333" calcext:value-type="float">
            <text:p>0,00166458333333333000</text:p>
          </table:table-cell>
          <table:table-cell table:formula="of:=[.D155]-[.D15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4" office:value-type="float" office:value="14476" calcext:value-type="float">
            <text:p>1447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67546296296296" calcext:value-type="float">
            <text:p>0,00167546296296296000</text:p>
          </table:table-cell>
          <table:table-cell table:formula="of:=[.D156]-[.D15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4" office:value-type="float" office:value="14570" calcext:value-type="float">
            <text:p>1457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68634259259259" calcext:value-type="float">
            <text:p>0,00168634259259259000</text:p>
          </table:table-cell>
          <table:table-cell table:formula="of:=[.D157]-[.D15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4" office:value-type="float" office:value="14664" calcext:value-type="float">
            <text:p>1466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69722222222222" calcext:value-type="float">
            <text:p>0,00169722222222222000</text:p>
          </table:table-cell>
          <table:table-cell table:formula="of:=[.D158]-[.D15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4" office:value-type="float" office:value="14758" calcext:value-type="float">
            <text:p>14758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70810185185185" calcext:value-type="float">
            <text:p>0,00170810185185185000</text:p>
          </table:table-cell>
          <table:table-cell table:formula="of:=[.D159]-[.D15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4" office:value-type="float" office:value="14852" calcext:value-type="float">
            <text:p>1485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71898148148148" calcext:value-type="float">
            <text:p>0,00171898148148148000</text:p>
          </table:table-cell>
          <table:table-cell table:formula="of:=[.D160]-[.D15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4" office:value-type="float" office:value="14946" calcext:value-type="float">
            <text:p>14946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72986111111111" calcext:value-type="float">
            <text:p>0,00172986111111111000</text:p>
          </table:table-cell>
          <table:table-cell table:formula="of:=[.D161]-[.D160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4" office:value-type="float" office:value="15040" calcext:value-type="float">
            <text:p>150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74074074074074" calcext:value-type="float">
            <text:p>0,00174074074074074000</text:p>
          </table:table-cell>
          <table:table-cell table:formula="of:=[.D162]-[.D161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4" office:value-type="float" office:value="15134" calcext:value-type="float">
            <text:p>15134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75162037037037" calcext:value-type="float">
            <text:p>0,00175162037037037000</text:p>
          </table:table-cell>
          <table:table-cell table:formula="of:=[.D163]-[.D16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4" office:value-type="float" office:value="15228" calcext:value-type="float">
            <text:p>1522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7625" calcext:value-type="float">
            <text:p>0,00176250000000000000</text:p>
          </table:table-cell>
          <table:table-cell table:formula="of:=[.D164]-[.D163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4" office:value-type="float" office:value="15322" calcext:value-type="float">
            <text:p>15322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77337962962963" calcext:value-type="float">
            <text:p>0,00177337962962963000</text:p>
          </table:table-cell>
          <table:table-cell table:formula="of:=[.D165]-[.D16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4" office:value-type="float" office:value="15416" calcext:value-type="float">
            <text:p>1541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78425925925926" calcext:value-type="float">
            <text:p>0,00178425925925926000</text:p>
          </table:table-cell>
          <table:table-cell table:formula="of:=[.D166]-[.D16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4" office:value-type="float" office:value="15510" calcext:value-type="float">
            <text:p>1551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79513888888889" calcext:value-type="float">
            <text:p>0,00179513888888889000</text:p>
          </table:table-cell>
          <table:table-cell table:formula="of:=[.D167]-[.D16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4" office:value-type="float" office:value="15604" calcext:value-type="float">
            <text:p>1560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80601851851852" calcext:value-type="float">
            <text:p>0,00180601851851852000</text:p>
          </table:table-cell>
          <table:table-cell table:formula="of:=[.D168]-[.D16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4" office:value-type="float" office:value="15698" calcext:value-type="float">
            <text:p>15698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81689814814815" calcext:value-type="float">
            <text:p>0,00181689814814815000</text:p>
          </table:table-cell>
          <table:table-cell table:formula="of:=[.D169]-[.D16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4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82777777777778" calcext:value-type="float">
            <text:p>0,00182777777777778000</text:p>
          </table:table-cell>
          <table:table-cell table:formula="of:=[.D170]-[.D16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4" office:value-type="float" office:value="15886" calcext:value-type="float">
            <text:p>15886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83865740740741" calcext:value-type="float">
            <text:p>0,00183865740740741000</text:p>
          </table:table-cell>
          <table:table-cell table:formula="of:=[.D171]-[.D170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4" office:value-type="float" office:value="15980" calcext:value-type="float">
            <text:p>1598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84953703703704" calcext:value-type="float">
            <text:p>0,00184953703703704000</text:p>
          </table:table-cell>
          <table:table-cell table:formula="of:=[.D172]-[.D171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4" office:value-type="float" office:value="16074" calcext:value-type="float">
            <text:p>16074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86041666666667" calcext:value-type="float">
            <text:p>0,00186041666666667000</text:p>
          </table:table-cell>
          <table:table-cell table:formula="of:=[.D173]-[.D172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4" office:value-type="float" office:value="16168" calcext:value-type="float">
            <text:p>1616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8712962962963" calcext:value-type="float">
            <text:p>0,00187129629629630000</text:p>
          </table:table-cell>
          <table:table-cell table:formula="of:=[.D174]-[.D173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4" office:value-type="float" office:value="16262" calcext:value-type="float">
            <text:p>16262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88217592592593" calcext:value-type="float">
            <text:p>0,00188217592592593000</text:p>
          </table:table-cell>
          <table:table-cell table:formula="of:=[.D175]-[.D174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4" office:value-type="float" office:value="16356" calcext:value-type="float">
            <text:p>1635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89305555555556" calcext:value-type="float">
            <text:p>0,00189305555555556000</text:p>
          </table:table-cell>
          <table:table-cell table:formula="of:=[.D176]-[.D175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4" office:value-type="float" office:value="16450" calcext:value-type="float">
            <text:p>164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90393518518519" calcext:value-type="float">
            <text:p>0,00190393518518519000</text:p>
          </table:table-cell>
          <table:table-cell table:formula="of:=[.D177]-[.D176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4" office:value-type="float" office:value="16544" calcext:value-type="float">
            <text:p>1654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91481481481481" calcext:value-type="float">
            <text:p>0,00191481481481481000</text:p>
          </table:table-cell>
          <table:table-cell table:formula="of:=[.D178]-[.D17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4" office:value-type="float" office:value="16638" calcext:value-type="float">
            <text:p>16638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92569444444444" calcext:value-type="float">
            <text:p>0,00192569444444444000</text:p>
          </table:table-cell>
          <table:table-cell table:formula="of:=[.D179]-[.D178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4" office:value-type="float" office:value="16732" calcext:value-type="float">
            <text:p>1673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93657407407407" calcext:value-type="float">
            <text:p>0,00193657407407407000</text:p>
          </table:table-cell>
          <table:table-cell table:formula="of:=[.D180]-[.D179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4" office:value-type="float" office:value="16826" calcext:value-type="float">
            <text:p>16826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9474537037037" calcext:value-type="float">
            <text:p>0,00194745370370370000</text:p>
          </table:table-cell>
          <table:table-cell table:formula="of:=[.D181]-[.D180]" office:value-type="float" office:value="0.0000108796296296296" calcext:value-type="float">
            <text:p>0,0000108796296296296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4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95833333333333" calcext:value-type="float">
            <text:p>0,00195833333333333000</text:p>
          </table:table-cell>
          <table:table-cell table:formula="of:=[.D182]-[.D18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4" office:value-type="float" office:value="17014" calcext:value-type="float">
            <text:p>17014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96921296296296" calcext:value-type="float">
            <text:p>0,00196921296296296000</text:p>
          </table:table-cell>
          <table:table-cell table:formula="of:=[.D183]-[.D182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4" office:value-type="float" office:value="17108" calcext:value-type="float">
            <text:p>1710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98009259259259" calcext:value-type="float">
            <text:p>0,00198009259259259000</text:p>
          </table:table-cell>
          <table:table-cell table:formula="of:=[.D184]-[.D183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4" office:value-type="float" office:value="17202" calcext:value-type="float">
            <text:p>17202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99097222222222" calcext:value-type="float">
            <text:p>0,00199097222222222000</text:p>
          </table:table-cell>
          <table:table-cell table:formula="of:=[.D185]-[.D18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4" office:value-type="float" office:value="17296" calcext:value-type="float">
            <text:p>1729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200185185185185" calcext:value-type="float">
            <text:p>0,00200185185185185000</text:p>
          </table:table-cell>
          <table:table-cell table:formula="of:=[.D186]-[.D185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4" office:value-type="float" office:value="17390" calcext:value-type="float">
            <text:p>1739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201273148148148" calcext:value-type="float">
            <text:p>0,00201273148148148000</text:p>
          </table:table-cell>
          <table:table-cell table:formula="of:=[.D187]-[.D186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4" office:value-type="float" office:value="17484" calcext:value-type="float">
            <text:p>1748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202361111111111" calcext:value-type="float">
            <text:p>0,00202361111111111000</text:p>
          </table:table-cell>
          <table:table-cell table:formula="of:=[.D188]-[.D18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4" office:value-type="float" office:value="17578" calcext:value-type="float">
            <text:p>17578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203449074074074" calcext:value-type="float">
            <text:p>0,00203449074074074000</text:p>
          </table:table-cell>
          <table:table-cell table:formula="of:=[.D189]-[.D188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4" office:value-type="float" office:value="17672" calcext:value-type="float">
            <text:p>1767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204537037037037" calcext:value-type="float">
            <text:p>0,00204537037037037000</text:p>
          </table:table-cell>
          <table:table-cell table:formula="of:=[.D190]-[.D189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4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205625" calcext:value-type="float">
            <text:p>0,00205625000000000000</text:p>
          </table:table-cell>
          <table:table-cell table:formula="of:=[.D191]-[.D190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4" office:value-type="float" office:value="17860" calcext:value-type="float">
            <text:p>1786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206712962962963" calcext:value-type="float">
            <text:p>0,00206712962962963000</text:p>
          </table:table-cell>
          <table:table-cell table:formula="of:=[.D192]-[.D191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4" office:value-type="float" office:value="17954" calcext:value-type="float">
            <text:p>17954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207800925925926" calcext:value-type="float">
            <text:p>0,00207800925925926000</text:p>
          </table:table-cell>
          <table:table-cell table:formula="of:=[.D193]-[.D192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4" office:value-type="float" office:value="18048" calcext:value-type="float">
            <text:p>1804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08888888888889" calcext:value-type="float">
            <text:p>0,00208888888888889000</text:p>
          </table:table-cell>
          <table:table-cell table:formula="of:=[.D194]-[.D193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4" office:value-type="float" office:value="18142" calcext:value-type="float">
            <text:p>18142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09976851851852" calcext:value-type="float">
            <text:p>0,00209976851851852000</text:p>
          </table:table-cell>
          <table:table-cell table:formula="of:=[.D195]-[.D194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4" office:value-type="float" office:value="18236" calcext:value-type="float">
            <text:p>1823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11064814814815" calcext:value-type="float">
            <text:p>0,00211064814814815000</text:p>
          </table:table-cell>
          <table:table-cell table:formula="of:=[.D196]-[.D195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4" office:value-type="float" office:value="18330" calcext:value-type="float">
            <text:p>1833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12152777777778" calcext:value-type="float">
            <text:p>0,00212152777777778000</text:p>
          </table:table-cell>
          <table:table-cell table:formula="of:=[.D197]-[.D196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4" office:value-type="float" office:value="18424" calcext:value-type="float">
            <text:p>1842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13240740740741" calcext:value-type="float">
            <text:p>0,00213240740740741000</text:p>
          </table:table-cell>
          <table:table-cell table:formula="of:=[.D198]-[.D197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4" office:value-type="float" office:value="18518" calcext:value-type="float">
            <text:p>18518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14328703703704" calcext:value-type="float">
            <text:p>0,00214328703703704000</text:p>
          </table:table-cell>
          <table:table-cell table:formula="of:=[.D199]-[.D198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4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15416666666667" calcext:value-type="float">
            <text:p>0,00215416666666667000</text:p>
          </table:table-cell>
          <table:table-cell table:formula="of:=[.D200]-[.D199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4" office:value-type="float" office:value="18706" calcext:value-type="float">
            <text:p>18706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1650462962963" calcext:value-type="float">
            <text:p>0,00216504629629630000</text:p>
          </table:table-cell>
          <table:table-cell table:formula="of:=[.D201]-[.D200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4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17592592592593" calcext:value-type="float">
            <text:p>0,00217592592592593000</text:p>
          </table:table-cell>
          <table:table-cell table:formula="of:=[.D202]-[.D20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4" office:value-type="float" office:value="18894" calcext:value-type="float">
            <text:p>18894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18680555555556" calcext:value-type="float">
            <text:p>0,00218680555555556000</text:p>
          </table:table-cell>
          <table:table-cell table:formula="of:=[.D203]-[.D202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4" office:value-type="float" office:value="18988" calcext:value-type="float">
            <text:p>1898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19768518518519" calcext:value-type="float">
            <text:p>0,00219768518518519000</text:p>
          </table:table-cell>
          <table:table-cell table:formula="of:=[.D204]-[.D203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4" office:value-type="float" office:value="19082" calcext:value-type="float">
            <text:p>19082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20856481481481" calcext:value-type="float">
            <text:p>0,00220856481481481000</text:p>
          </table:table-cell>
          <table:table-cell table:formula="of:=[.D205]-[.D20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4" office:value-type="float" office:value="19176" calcext:value-type="float">
            <text:p>1917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21944444444444" calcext:value-type="float">
            <text:p>0,00221944444444444000</text:p>
          </table:table-cell>
          <table:table-cell table:formula="of:=[.D206]-[.D205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4" office:value-type="float" office:value="19270" calcext:value-type="float">
            <text:p>1927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23032407407407" calcext:value-type="float">
            <text:p>0,00223032407407407000</text:p>
          </table:table-cell>
          <table:table-cell table:formula="of:=[.D207]-[.D206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4" office:value-type="float" office:value="19364" calcext:value-type="float">
            <text:p>1936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2412037037037" calcext:value-type="float">
            <text:p>0,00224120370370370000</text:p>
          </table:table-cell>
          <table:table-cell table:formula="of:=[.D208]-[.D20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4" office:value-type="float" office:value="19458" calcext:value-type="float">
            <text:p>19458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25208333333333" calcext:value-type="float">
            <text:p>0,00225208333333333000</text:p>
          </table:table-cell>
          <table:table-cell table:formula="of:=[.D209]-[.D208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4" office:value-type="float" office:value="19552" calcext:value-type="float">
            <text:p>1955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26296296296296" calcext:value-type="float">
            <text:p>0,00226296296296296000</text:p>
          </table:table-cell>
          <table:table-cell table:formula="of:=[.D210]-[.D209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4" office:value-type="float" office:value="19646" calcext:value-type="float">
            <text:p>19646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27384259259259" calcext:value-type="float">
            <text:p>0,00227384259259259000</text:p>
          </table:table-cell>
          <table:table-cell table:formula="of:=[.D211]-[.D210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4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28472222222222" calcext:value-type="float">
            <text:p>0,00228472222222222000</text:p>
          </table:table-cell>
          <table:table-cell table:formula="of:=[.D212]-[.D21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4" office:value-type="float" office:value="19834" calcext:value-type="float">
            <text:p>19834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29560185185185" calcext:value-type="float">
            <text:p>0,00229560185185185000</text:p>
          </table:table-cell>
          <table:table-cell table:formula="of:=[.D213]-[.D212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4" office:value-type="float" office:value="19928" calcext:value-type="float">
            <text:p>1992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30648148148148" calcext:value-type="float">
            <text:p>0,00230648148148148000</text:p>
          </table:table-cell>
          <table:table-cell table:formula="of:=[.D214]-[.D213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4" office:value-type="float" office:value="20022" calcext:value-type="float">
            <text:p>20022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31736111111111" calcext:value-type="float">
            <text:p>0,00231736111111111000</text:p>
          </table:table-cell>
          <table:table-cell table:formula="of:=[.D215]-[.D214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4" office:value-type="float" office:value="20116" calcext:value-type="float">
            <text:p>2011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32824074074074" calcext:value-type="float">
            <text:p>0,00232824074074074000</text:p>
          </table:table-cell>
          <table:table-cell table:formula="of:=[.D216]-[.D215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4" office:value-type="float" office:value="20210" calcext:value-type="float">
            <text:p>2021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33912037037037" calcext:value-type="float">
            <text:p>0,00233912037037037000</text:p>
          </table:table-cell>
          <table:table-cell table:formula="of:=[.D217]-[.D216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4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35" calcext:value-type="float">
            <text:p>0,00235000000000000000</text:p>
          </table:table-cell>
          <table:table-cell table:formula="of:=[.D218]-[.D217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4" office:value-type="float" office:value="20398" calcext:value-type="float">
            <text:p>20398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36087962962963" calcext:value-type="float">
            <text:p>0,00236087962962963000</text:p>
          </table:table-cell>
          <table:table-cell table:formula="of:=[.D219]-[.D218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4" office:value-type="float" office:value="20492" calcext:value-type="float">
            <text:p>2049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37175925925926" calcext:value-type="float">
            <text:p>0,00237175925925926000</text:p>
          </table:table-cell>
          <table:table-cell table:formula="of:=[.D220]-[.D219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4" office:value-type="float" office:value="20586" calcext:value-type="float">
            <text:p>20586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38263888888889" calcext:value-type="float">
            <text:p>0,00238263888888889000</text:p>
          </table:table-cell>
          <table:table-cell table:formula="of:=[.D221]-[.D220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4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39351851851852" calcext:value-type="float">
            <text:p>0,00239351851851852000</text:p>
          </table:table-cell>
          <table:table-cell table:formula="of:=[.D222]-[.D22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4" office:value-type="float" office:value="20774" calcext:value-type="float">
            <text:p>20774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40439814814815" calcext:value-type="float">
            <text:p>0,00240439814814815000</text:p>
          </table:table-cell>
          <table:table-cell table:formula="of:=[.D223]-[.D222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4" office:value-type="float" office:value="20868" calcext:value-type="float">
            <text:p>2086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41527777777778" calcext:value-type="float">
            <text:p>0,00241527777777778000</text:p>
          </table:table-cell>
          <table:table-cell table:formula="of:=[.D224]-[.D223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4" office:value-type="float" office:value="20962" calcext:value-type="float">
            <text:p>20962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42615740740741" calcext:value-type="float">
            <text:p>0,00242615740740741000</text:p>
          </table:table-cell>
          <table:table-cell table:formula="of:=[.D225]-[.D22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4" office:value-type="float" office:value="21056" calcext:value-type="float">
            <text:p>2105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43703703703704" calcext:value-type="float">
            <text:p>0,00243703703703704000</text:p>
          </table:table-cell>
          <table:table-cell table:formula="of:=[.D226]-[.D225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4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44791666666667" calcext:value-type="float">
            <text:p>0,00244791666666667000</text:p>
          </table:table-cell>
          <table:table-cell table:formula="of:=[.D227]-[.D226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4" office:value-type="float" office:value="21244" calcext:value-type="float">
            <text:p>2124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4587962962963" calcext:value-type="float">
            <text:p>0,00245879629629630000</text:p>
          </table:table-cell>
          <table:table-cell table:formula="of:=[.D228]-[.D22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4" office:value-type="float" office:value="21338" calcext:value-type="float">
            <text:p>21338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46967592592593" calcext:value-type="float">
            <text:p>0,00246967592592593000</text:p>
          </table:table-cell>
          <table:table-cell table:formula="of:=[.D229]-[.D228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4" office:value-type="float" office:value="21432" calcext:value-type="float">
            <text:p>2143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48055555555556" calcext:value-type="float">
            <text:p>0,00248055555555556000</text:p>
          </table:table-cell>
          <table:table-cell table:formula="of:=[.D230]-[.D229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4" office:value-type="float" office:value="21526" calcext:value-type="float">
            <text:p>21526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49143518518519" calcext:value-type="float">
            <text:p>0,00249143518518519000</text:p>
          </table:table-cell>
          <table:table-cell table:formula="of:=[.D231]-[.D230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4" office:value-type="float" office:value="21620" calcext:value-type="float">
            <text:p>2162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50231481481482" calcext:value-type="float">
            <text:p>0,00250231481481482000</text:p>
          </table:table-cell>
          <table:table-cell table:formula="of:=[.D232]-[.D23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4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51319444444444" calcext:value-type="float">
            <text:p>0,00251319444444444000</text:p>
          </table:table-cell>
          <table:table-cell table:formula="of:=[.D233]-[.D232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4" office:value-type="float" office:value="21808" calcext:value-type="float">
            <text:p>2180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52407407407407" calcext:value-type="float">
            <text:p>0,00252407407407407000</text:p>
          </table:table-cell>
          <table:table-cell table:formula="of:=[.D234]-[.D233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4" office:value-type="float" office:value="21902" calcext:value-type="float">
            <text:p>21902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5349537037037" calcext:value-type="float">
            <text:p>0,00253495370370370000</text:p>
          </table:table-cell>
          <table:table-cell table:formula="of:=[.D235]-[.D23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4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54583333333333" calcext:value-type="float">
            <text:p>0,00254583333333333000</text:p>
          </table:table-cell>
          <table:table-cell table:formula="of:=[.D236]-[.D235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4" office:value-type="float" office:value="22090" calcext:value-type="float">
            <text:p>2209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55671296296296" calcext:value-type="float">
            <text:p>0,00255671296296296000</text:p>
          </table:table-cell>
          <table:table-cell table:formula="of:=[.D237]-[.D236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4" office:value-type="float" office:value="22184" calcext:value-type="float">
            <text:p>2218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56759259259259" calcext:value-type="float">
            <text:p>0,00256759259259259000</text:p>
          </table:table-cell>
          <table:table-cell table:formula="of:=[.D238]-[.D237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4" office:value-type="float" office:value="22278" calcext:value-type="float">
            <text:p>22278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57847222222222" calcext:value-type="float">
            <text:p>0,00257847222222222000</text:p>
          </table:table-cell>
          <table:table-cell table:formula="of:=[.D239]-[.D238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4" office:value-type="float" office:value="22372" calcext:value-type="float">
            <text:p>2237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58935185185185" calcext:value-type="float">
            <text:p>0,00258935185185185000</text:p>
          </table:table-cell>
          <table:table-cell table:formula="of:=[.D240]-[.D239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4" office:value-type="float" office:value="22466" calcext:value-type="float">
            <text:p>22466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60023148148148" calcext:value-type="float">
            <text:p>0,00260023148148148000</text:p>
          </table:table-cell>
          <table:table-cell table:formula="of:=[.D241]-[.D240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94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61111111111111" calcext:value-type="float">
            <text:p>0,00261111111111111000</text:p>
          </table:table-cell>
          <table:table-cell table:formula="of:=[.D242]-[.D24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4" office:value-type="float" office:value="22654" calcext:value-type="float">
            <text:p>22654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62199074074074" calcext:value-type="float">
            <text:p>0,00262199074074074000</text:p>
          </table:table-cell>
          <table:table-cell table:formula="of:=[.D243]-[.D242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4" office:value-type="float" office:value="22748" calcext:value-type="float">
            <text:p>2274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63287037037037" calcext:value-type="float">
            <text:p>0,00263287037037037000</text:p>
          </table:table-cell>
          <table:table-cell table:formula="of:=[.D244]-[.D243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94" office:value-type="float" office:value="22842" calcext:value-type="float">
            <text:p>22842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64375" calcext:value-type="float">
            <text:p>0,00264375000000000000</text:p>
          </table:table-cell>
          <table:table-cell table:formula="of:=[.D245]-[.D24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94" office:value-type="float" office:value="22936" calcext:value-type="float">
            <text:p>2293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65462962962963" calcext:value-type="float">
            <text:p>0,00265462962962963000</text:p>
          </table:table-cell>
          <table:table-cell table:formula="of:=[.D246]-[.D245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94" office:value-type="float" office:value="23030" calcext:value-type="float">
            <text:p>2303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66550925925926" calcext:value-type="float">
            <text:p>0,00266550925925926000</text:p>
          </table:table-cell>
          <table:table-cell table:formula="of:=[.D247]-[.D246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94" office:value-type="float" office:value="23124" calcext:value-type="float">
            <text:p>2312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67638888888889" calcext:value-type="float">
            <text:p>0,00267638888888889000</text:p>
          </table:table-cell>
          <table:table-cell table:formula="of:=[.D248]-[.D247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94" office:value-type="float" office:value="23218" calcext:value-type="float">
            <text:p>23218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68726851851852" calcext:value-type="float">
            <text:p>0,00268726851851852000</text:p>
          </table:table-cell>
          <table:table-cell table:formula="of:=[.D249]-[.D248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94" office:value-type="float" office:value="23312" calcext:value-type="float">
            <text:p>2331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69814814814815" calcext:value-type="float">
            <text:p>0,00269814814814815000</text:p>
          </table:table-cell>
          <table:table-cell table:formula="of:=[.D250]-[.D249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94" office:value-type="float" office:value="23406" calcext:value-type="float">
            <text:p>23406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70902777777778" calcext:value-type="float">
            <text:p>0,00270902777777778000</text:p>
          </table:table-cell>
          <table:table-cell table:formula="of:=[.D251]-[.D250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94" office:value-type="float" office:value="23500" calcext:value-type="float">
            <text:p>23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71990740740741" calcext:value-type="float">
            <text:p>0,00271990740740741000</text:p>
          </table:table-cell>
          <table:table-cell table:formula="of:=[.D252]-[.D251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94" office:value-type="float" office:value="23594" calcext:value-type="float">
            <text:p>23594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73078703703704" calcext:value-type="float">
            <text:p>0,00273078703703704000</text:p>
          </table:table-cell>
          <table:table-cell table:formula="of:=[.D253]-[.D252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94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74166666666667" calcext:value-type="float">
            <text:p>0,00274166666666667000</text:p>
          </table:table-cell>
          <table:table-cell table:formula="of:=[.D254]-[.D253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94" office:value-type="float" office:value="23782" calcext:value-type="float">
            <text:p>23782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7525462962963" calcext:value-type="float">
            <text:p>0,00275254629629630000</text:p>
          </table:table-cell>
          <table:table-cell table:formula="of:=[.D255]-[.D254]" office:value-type="float" office:value="0.0000108796296296298" calcext:value-type="float">
            <text:p>0,0000108796296296298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94" office:value-type="float" office:value="23876" calcext:value-type="float">
            <text:p>2387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76342592592593" calcext:value-type="float">
            <text:p>0,00276342592592593000</text:p>
          </table:table-cell>
          <table:table-cell table:formula="of:=[.D256]-[.D255]" office:value-type="float" office:value="0.0000108796296296293" calcext:value-type="float">
            <text:p>0,0000108796296296294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94" office:value-type="float" office:value="23970" calcext:value-type="float">
            <text:p>2397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77430555555556" calcext:value-type="float">
            <text:p>0,00277430555555556000</text:p>
          </table:table-cell>
          <table:table-cell table:formula="of:=#REF!-[.D256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3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33:15.314305069</meta:creation-date>
    <dc:date>2026-05-17T19:33:22.344190189</dc:date>
    <meta:editing-duration>PT8S</meta:editing-duration>
    <meta:editing-cycles>1</meta:editing-cycles>
    <meta:document-statistic meta:table-count="1" meta:cell-count="1280" meta:object-count="0"/>
    <meta:generator>LibreOffice/24.2.7.2$Linux_X86_64 LibreOffice_project/420$Build-2</meta:generator>
  </office:meta>
</office:document-meta>
</file>