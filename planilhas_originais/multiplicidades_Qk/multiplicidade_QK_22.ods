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9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2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22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25462962962963" calcext:value-type="float">
            <text:p>0,00000254629629629630</text:p>
          </table:table-cell>
          <table:table-cell table:formula="of:=[.D3]-[.D2]" office:value-type="float" office:value="0.0000025462962962963" calcext:value-type="float">
            <text:p>0,000002546296296296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22" office:value-type="float" office:value="44" calcext:value-type="float">
            <text:p>44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0509259259259259" calcext:value-type="float">
            <text:p>0,00000509259259259259</text:p>
          </table:table-cell>
          <table:table-cell table:formula="of:=[.D4]-[.D3]" office:value-type="float" office:value="0.0000025462962962963" calcext:value-type="float">
            <text:p>0,000002546296296296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22" office:value-type="float" office:value="66" calcext:value-type="float">
            <text:p>66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0763888888888889" calcext:value-type="float">
            <text:p>0,00000763888888888889</text:p>
          </table:table-cell>
          <table:table-cell table:formula="of:=[.D5]-[.D4]" office:value-type="float" office:value="0.0000025462962962963" calcext:value-type="float">
            <text:p>0,000002546296296296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22" office:value-type="float" office:value="88" calcext:value-type="float">
            <text:p>88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101851851851852" calcext:value-type="float">
            <text:p>0,00001018518518518520</text:p>
          </table:table-cell>
          <table:table-cell table:formula="of:=[.D6]-[.D5]" office:value-type="float" office:value="0.0000025462962962963" calcext:value-type="float">
            <text:p>0,000002546296296296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22" office:value-type="float" office:value="110" calcext:value-type="float">
            <text:p>11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127314814814815" calcext:value-type="float">
            <text:p>0,00001273148148148150</text:p>
          </table:table-cell>
          <table:table-cell table:formula="of:=[.D7]-[.D6]" office:value-type="float" office:value="0.0000025462962962963" calcext:value-type="float">
            <text:p>0,000002546296296296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22" office:value-type="float" office:value="132" calcext:value-type="float">
            <text:p>132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152777777777778" calcext:value-type="float">
            <text:p>0,00001527777777777780</text:p>
          </table:table-cell>
          <table:table-cell table:formula="of:=[.D8]-[.D7]" office:value-type="float" office:value="0.0000025462962962963" calcext:value-type="float">
            <text:p>0,000002546296296296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22" office:value-type="float" office:value="154" calcext:value-type="float">
            <text:p>154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178240740740741" calcext:value-type="float">
            <text:p>0,00001782407407407410</text:p>
          </table:table-cell>
          <table:table-cell table:formula="of:=[.D9]-[.D8]" office:value-type="float" office:value="0.00000254629629629629" calcext:value-type="float">
            <text:p>0,000002546296296296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22" office:value-type="float" office:value="176" calcext:value-type="float">
            <text:p>176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203703703703704" calcext:value-type="float">
            <text:p>0,00002037037037037040</text:p>
          </table:table-cell>
          <table:table-cell table:formula="of:=[.D10]-[.D9]" office:value-type="float" office:value="0.0000025462962962963" calcext:value-type="float">
            <text:p>0,000002546296296296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22" office:value-type="float" office:value="198" calcext:value-type="float">
            <text:p>198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229166666666667" calcext:value-type="float">
            <text:p>0,00002291666666666670</text:p>
          </table:table-cell>
          <table:table-cell table:formula="of:=[.D11]-[.D10]" office:value-type="float" office:value="0.00000254629629629629" calcext:value-type="float">
            <text:p>0,000002546296296296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22" office:value-type="float" office:value="220" calcext:value-type="float">
            <text:p>22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25462962962963" calcext:value-type="float">
            <text:p>0,00002546296296296300</text:p>
          </table:table-cell>
          <table:table-cell table:formula="of:=[.D12]-[.D11]" office:value-type="float" office:value="0.0000025462962962963" calcext:value-type="float">
            <text:p>0,000002546296296296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22" office:value-type="float" office:value="242" calcext:value-type="float">
            <text:p>242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280092592592593" calcext:value-type="float">
            <text:p>0,00002800925925925930</text:p>
          </table:table-cell>
          <table:table-cell table:formula="of:=[.D13]-[.D12]" office:value-type="float" office:value="0.00000254629629629629" calcext:value-type="float">
            <text:p>0,000002546296296296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22" office:value-type="float" office:value="264" calcext:value-type="float">
            <text:p>264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305555555555556" calcext:value-type="float">
            <text:p>0,00003055555555555560</text:p>
          </table:table-cell>
          <table:table-cell table:formula="of:=[.D14]-[.D13]" office:value-type="float" office:value="0.0000025462962962963" calcext:value-type="float">
            <text:p>0,000002546296296296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22" office:value-type="float" office:value="286" calcext:value-type="float">
            <text:p>286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331018518518519" calcext:value-type="float">
            <text:p>0,00003310185185185190</text:p>
          </table:table-cell>
          <table:table-cell table:formula="of:=[.D15]-[.D14]" office:value-type="float" office:value="0.00000254629629629629" calcext:value-type="float">
            <text:p>0,000002546296296296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22" office:value-type="float" office:value="308" calcext:value-type="float">
            <text:p>308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356481481481482" calcext:value-type="float">
            <text:p>0,00003564814814814820</text:p>
          </table:table-cell>
          <table:table-cell table:formula="of:=[.D16]-[.D15]" office:value-type="float" office:value="0.00000254629629629629" calcext:value-type="float">
            <text:p>0,000002546296296296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22" office:value-type="float" office:value="330" calcext:value-type="float">
            <text:p>33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381944444444444" calcext:value-type="float">
            <text:p>0,00003819444444444450</text:p>
          </table:table-cell>
          <table:table-cell table:formula="of:=[.D17]-[.D16]" office:value-type="float" office:value="0.00000254629629629629" calcext:value-type="float">
            <text:p>0,000002546296296296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22" office:value-type="float" office:value="352" calcext:value-type="float">
            <text:p>352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407407407407407" calcext:value-type="float">
            <text:p>0,00004074074074074070</text:p>
          </table:table-cell>
          <table:table-cell table:formula="of:=[.D18]-[.D17]" office:value-type="float" office:value="0.0000025462962962963" calcext:value-type="float">
            <text:p>0,000002546296296296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22" office:value-type="float" office:value="374" calcext:value-type="float">
            <text:p>374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043287037037037" calcext:value-type="float">
            <text:p>0,00004328703703703700</text:p>
          </table:table-cell>
          <table:table-cell table:formula="of:=[.D19]-[.D18]" office:value-type="float" office:value="0.00000254629629629629" calcext:value-type="float">
            <text:p>0,000002546296296296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22" office:value-type="float" office:value="396" calcext:value-type="float">
            <text:p>396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0458333333333333" calcext:value-type="float">
            <text:p>0,00004583333333333330</text:p>
          </table:table-cell>
          <table:table-cell table:formula="of:=[.D20]-[.D19]" office:value-type="float" office:value="0.00000254629629629629" calcext:value-type="float">
            <text:p>0,000002546296296296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22" office:value-type="float" office:value="418" calcext:value-type="float">
            <text:p>418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0483796296296296" calcext:value-type="float">
            <text:p>0,00004837962962962960</text:p>
          </table:table-cell>
          <table:table-cell table:formula="of:=[.D21]-[.D20]" office:value-type="float" office:value="0.00000254629629629629" calcext:value-type="float">
            <text:p>0,000002546296296296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22" office:value-type="float" office:value="440" calcext:value-type="float">
            <text:p>44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0509259259259259" calcext:value-type="float">
            <text:p>0,00005092592592592590</text:p>
          </table:table-cell>
          <table:table-cell table:formula="of:=[.D22]-[.D21]" office:value-type="float" office:value="0.0000025462962962963" calcext:value-type="float">
            <text:p>0,000002546296296296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22" office:value-type="float" office:value="462" calcext:value-type="float">
            <text:p>462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0534722222222222" calcext:value-type="float">
            <text:p>0,00005347222222222220</text:p>
          </table:table-cell>
          <table:table-cell table:formula="of:=[.D23]-[.D22]" office:value-type="float" office:value="0.00000254629629629629" calcext:value-type="float">
            <text:p>0,000002546296296296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22" office:value-type="float" office:value="484" calcext:value-type="float">
            <text:p>484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0560185185185185" calcext:value-type="float">
            <text:p>0,00005601851851851850</text:p>
          </table:table-cell>
          <table:table-cell table:formula="of:=[.D24]-[.D23]" office:value-type="float" office:value="0.00000254629629629629" calcext:value-type="float">
            <text:p>0,000002546296296296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22" office:value-type="float" office:value="506" calcext:value-type="float">
            <text:p>506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0585648148148148" calcext:value-type="float">
            <text:p>0,00005856481481481480</text:p>
          </table:table-cell>
          <table:table-cell table:formula="of:=[.D25]-[.D24]" office:value-type="float" office:value="0.00000254629629629629" calcext:value-type="float">
            <text:p>0,000002546296296296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22" office:value-type="float" office:value="528" calcext:value-type="float">
            <text:p>528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0611111111111111" calcext:value-type="float">
            <text:p>0,00006111111111111110</text:p>
          </table:table-cell>
          <table:table-cell table:formula="of:=[.D26]-[.D25]" office:value-type="float" office:value="0.00000254629629629629" calcext:value-type="float">
            <text:p>0,000002546296296296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22" office:value-type="float" office:value="550" calcext:value-type="float">
            <text:p>55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0636574074074074" calcext:value-type="float">
            <text:p>0,00006365740740740740</text:p>
          </table:table-cell>
          <table:table-cell table:formula="of:=[.D27]-[.D26]" office:value-type="float" office:value="0.00000254629629629631" calcext:value-type="float">
            <text:p>0,000002546296296296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22" office:value-type="float" office:value="572" calcext:value-type="float">
            <text:p>572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0662037037037037" calcext:value-type="float">
            <text:p>0,00006620370370370370</text:p>
          </table:table-cell>
          <table:table-cell table:formula="of:=[.D28]-[.D27]" office:value-type="float" office:value="0.00000254629629629629" calcext:value-type="float">
            <text:p>0,000002546296296296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22" office:value-type="float" office:value="594" calcext:value-type="float">
            <text:p>594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06875" calcext:value-type="float">
            <text:p>0,00006875000000000000</text:p>
          </table:table-cell>
          <table:table-cell table:formula="of:=[.D29]-[.D28]" office:value-type="float" office:value="0.00000254629629629629" calcext:value-type="float">
            <text:p>0,000002546296296296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22" office:value-type="float" office:value="616" calcext:value-type="float">
            <text:p>616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0712962962962963" calcext:value-type="float">
            <text:p>0,00007129629629629630</text:p>
          </table:table-cell>
          <table:table-cell table:formula="of:=[.D30]-[.D29]" office:value-type="float" office:value="0.00000254629629629629" calcext:value-type="float">
            <text:p>0,000002546296296296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22" office:value-type="float" office:value="638" calcext:value-type="float">
            <text:p>638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0738425925925926" calcext:value-type="float">
            <text:p>0,00007384259259259260</text:p>
          </table:table-cell>
          <table:table-cell table:formula="of:=[.D31]-[.D30]" office:value-type="float" office:value="0.00000254629629629629" calcext:value-type="float">
            <text:p>0,000002546296296296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22" office:value-type="float" office:value="660" calcext:value-type="float">
            <text:p>66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0763888888888889" calcext:value-type="float">
            <text:p>0,00007638888888888890</text:p>
          </table:table-cell>
          <table:table-cell table:formula="of:=[.D32]-[.D31]" office:value-type="float" office:value="0.00000254629629629629" calcext:value-type="float">
            <text:p>0,000002546296296296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22" office:value-type="float" office:value="682" calcext:value-type="float">
            <text:p>682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0789351851851852" calcext:value-type="float">
            <text:p>0,00007893518518518520</text:p>
          </table:table-cell>
          <table:table-cell table:formula="of:=[.D33]-[.D32]" office:value-type="float" office:value="0.00000254629629629629" calcext:value-type="float">
            <text:p>0,000002546296296296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22" office:value-type="float" office:value="704" calcext:value-type="float">
            <text:p>704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0814814814814815" calcext:value-type="float">
            <text:p>0,00008148148148148150</text:p>
          </table:table-cell>
          <table:table-cell table:formula="of:=[.D34]-[.D33]" office:value-type="float" office:value="0.00000254629629629631" calcext:value-type="float">
            <text:p>0,000002546296296296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22" office:value-type="float" office:value="726" calcext:value-type="float">
            <text:p>726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0840277777777778" calcext:value-type="float">
            <text:p>0,00008402777777777780</text:p>
          </table:table-cell>
          <table:table-cell table:formula="of:=[.D35]-[.D34]" office:value-type="float" office:value="0.00000254629629629629" calcext:value-type="float">
            <text:p>0,000002546296296296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22" office:value-type="float" office:value="748" calcext:value-type="float">
            <text:p>748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0865740740740741" calcext:value-type="float">
            <text:p>0,00008657407407407410</text:p>
          </table:table-cell>
          <table:table-cell table:formula="of:=[.D36]-[.D35]" office:value-type="float" office:value="0.00000254629629629629" calcext:value-type="float">
            <text:p>0,000002546296296296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22" office:value-type="float" office:value="770" calcext:value-type="float">
            <text:p>77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0891203703703704" calcext:value-type="float">
            <text:p>0,00008912037037037040</text:p>
          </table:table-cell>
          <table:table-cell table:formula="of:=[.D37]-[.D36]" office:value-type="float" office:value="0.00000254629629629629" calcext:value-type="float">
            <text:p>0,000002546296296296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22" office:value-type="float" office:value="792" calcext:value-type="float">
            <text:p>792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0916666666666667" calcext:value-type="float">
            <text:p>0,00009166666666666670</text:p>
          </table:table-cell>
          <table:table-cell table:formula="of:=[.D38]-[.D37]" office:value-type="float" office:value="0.00000254629629629629" calcext:value-type="float">
            <text:p>0,000002546296296296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22" office:value-type="float" office:value="814" calcext:value-type="float">
            <text:p>814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094212962962963" calcext:value-type="float">
            <text:p>0,00009421296296296300</text:p>
          </table:table-cell>
          <table:table-cell table:formula="of:=[.D39]-[.D38]" office:value-type="float" office:value="0.00000254629629629629" calcext:value-type="float">
            <text:p>0,000002546296296296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22" office:value-type="float" office:value="836" calcext:value-type="float">
            <text:p>836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0967592592592593" calcext:value-type="float">
            <text:p>0,00009675925925925930</text:p>
          </table:table-cell>
          <table:table-cell table:formula="of:=[.D40]-[.D39]" office:value-type="float" office:value="0.00000254629629629629" calcext:value-type="float">
            <text:p>0,000002546296296296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22" office:value-type="float" office:value="858" calcext:value-type="float">
            <text:p>858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0993055555555556" calcext:value-type="float">
            <text:p>0,00009930555555555560</text:p>
          </table:table-cell>
          <table:table-cell table:formula="of:=[.D41]-[.D40]" office:value-type="float" office:value="0.00000254629629629629" calcext:value-type="float">
            <text:p>0,000002546296296296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22" office:value-type="float" office:value="880" calcext:value-type="float">
            <text:p>88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101851851851852" calcext:value-type="float">
            <text:p>0,00010185185185185200</text:p>
          </table:table-cell>
          <table:table-cell table:formula="of:=[.D42]-[.D41]" office:value-type="float" office:value="0.00000254629629629631" calcext:value-type="float">
            <text:p>0,000002546296296296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22" office:value-type="float" office:value="902" calcext:value-type="float">
            <text:p>902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104398148148148" calcext:value-type="float">
            <text:p>0,00010439814814814800</text:p>
          </table:table-cell>
          <table:table-cell table:formula="of:=[.D43]-[.D42]" office:value-type="float" office:value="0.00000254629629629629" calcext:value-type="float">
            <text:p>0,000002546296296296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22" office:value-type="float" office:value="924" calcext:value-type="float">
            <text:p>924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106944444444444" calcext:value-type="float">
            <text:p>0,00010694444444444400</text:p>
          </table:table-cell>
          <table:table-cell table:formula="of:=[.D44]-[.D43]" office:value-type="float" office:value="0.00000254629629629629" calcext:value-type="float">
            <text:p>0,000002546296296296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22" office:value-type="float" office:value="946" calcext:value-type="float">
            <text:p>946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109490740740741" calcext:value-type="float">
            <text:p>0,00010949074074074100</text:p>
          </table:table-cell>
          <table:table-cell table:formula="of:=[.D45]-[.D44]" office:value-type="float" office:value="0.00000254629629629629" calcext:value-type="float">
            <text:p>0,000002546296296296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22" office:value-type="float" office:value="968" calcext:value-type="float">
            <text:p>968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112037037037037" calcext:value-type="float">
            <text:p>0,00011203703703703700</text:p>
          </table:table-cell>
          <table:table-cell table:formula="of:=[.D46]-[.D45]" office:value-type="float" office:value="0.00000254629629629629" calcext:value-type="float">
            <text:p>0,000002546296296296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22" office:value-type="float" office:value="990" calcext:value-type="float">
            <text:p>99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114583333333333" calcext:value-type="float">
            <text:p>0,00011458333333333300</text:p>
          </table:table-cell>
          <table:table-cell table:formula="of:=[.D47]-[.D46]" office:value-type="float" office:value="0.00000254629629629629" calcext:value-type="float">
            <text:p>0,0000025462962962962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22" office:value-type="float" office:value="1012" calcext:value-type="float">
            <text:p>1012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11712962962963" calcext:value-type="float">
            <text:p>0,00011712962962963000</text:p>
          </table:table-cell>
          <table:table-cell table:formula="of:=[.D48]-[.D47]" office:value-type="float" office:value="0.00000254629629629629" calcext:value-type="float">
            <text:p>0,0000025462962962962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22" office:value-type="float" office:value="1034" calcext:value-type="float">
            <text:p>1034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119675925925926" calcext:value-type="float">
            <text:p>0,00011967592592592600</text:p>
          </table:table-cell>
          <table:table-cell table:formula="of:=[.D49]-[.D48]" office:value-type="float" office:value="0.00000254629629629629" calcext:value-type="float">
            <text:p>0,0000025462962962962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22" office:value-type="float" office:value="1056" calcext:value-type="float">
            <text:p>1056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122222222222222" calcext:value-type="float">
            <text:p>0,00012222222222222200</text:p>
          </table:table-cell>
          <table:table-cell table:formula="of:=[.D50]-[.D49]" office:value-type="float" office:value="0.00000254629629629631" calcext:value-type="float">
            <text:p>0,0000025462962962963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22" office:value-type="float" office:value="1078" calcext:value-type="float">
            <text:p>1078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124768518518519" calcext:value-type="float">
            <text:p>0,00012476851851851900</text:p>
          </table:table-cell>
          <table:table-cell table:formula="of:=[.D51]-[.D5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22" office:value-type="float" office:value="1100" calcext:value-type="float">
            <text:p>11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127314814814815" calcext:value-type="float">
            <text:p>0,00012731481481481500</text:p>
          </table:table-cell>
          <table:table-cell table:formula="of:=[.D52]-[.D51]" office:value-type="float" office:value="0.00000254629629629631" calcext:value-type="float">
            <text:p>0,0000025462962962963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22" office:value-type="float" office:value="1122" calcext:value-type="float">
            <text:p>1122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129861111111111" calcext:value-type="float">
            <text:p>0,00012986111111111100</text:p>
          </table:table-cell>
          <table:table-cell table:formula="of:=[.D53]-[.D52]" office:value-type="float" office:value="0.00000254629629629631" calcext:value-type="float">
            <text:p>0,0000025462962962963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22" office:value-type="float" office:value="1144" calcext:value-type="float">
            <text:p>1144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132407407407407" calcext:value-type="float">
            <text:p>0,00013240740740740700</text:p>
          </table:table-cell>
          <table:table-cell table:formula="of:=[.D54]-[.D5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22" office:value-type="float" office:value="1166" calcext:value-type="float">
            <text:p>1166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134953703703704" calcext:value-type="float">
            <text:p>0,00013495370370370400</text:p>
          </table:table-cell>
          <table:table-cell table:formula="of:=[.D55]-[.D54]" office:value-type="float" office:value="0.00000254629629629631" calcext:value-type="float">
            <text:p>0,000002546296296296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22" office:value-type="float" office:value="1188" calcext:value-type="float">
            <text:p>1188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1375" calcext:value-type="float">
            <text:p>0,00013750000000000000</text:p>
          </table:table-cell>
          <table:table-cell table:formula="of:=[.D56]-[.D5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22" office:value-type="float" office:value="1210" calcext:value-type="float">
            <text:p>121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140046296296296" calcext:value-type="float">
            <text:p>0,00014004629629629600</text:p>
          </table:table-cell>
          <table:table-cell table:formula="of:=[.D57]-[.D56]" office:value-type="float" office:value="0.00000254629629629631" calcext:value-type="float">
            <text:p>0,0000025462962962963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22" office:value-type="float" office:value="1232" calcext:value-type="float">
            <text:p>1232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142592592592593" calcext:value-type="float">
            <text:p>0,00014259259259259300</text:p>
          </table:table-cell>
          <table:table-cell table:formula="of:=[.D58]-[.D5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22" office:value-type="float" office:value="1254" calcext:value-type="float">
            <text:p>1254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145138888888889" calcext:value-type="float">
            <text:p>0,00014513888888888900</text:p>
          </table:table-cell>
          <table:table-cell table:formula="of:=[.D59]-[.D58]" office:value-type="float" office:value="0.00000254629629629631" calcext:value-type="float">
            <text:p>0,0000025462962962963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22" office:value-type="float" office:value="1276" calcext:value-type="float">
            <text:p>1276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147685185185185" calcext:value-type="float">
            <text:p>0,00014768518518518500</text:p>
          </table:table-cell>
          <table:table-cell table:formula="of:=[.D60]-[.D59]" office:value-type="float" office:value="0.00000254629629629631" calcext:value-type="float">
            <text:p>0,0000025462962962963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22" office:value-type="float" office:value="1298" calcext:value-type="float">
            <text:p>1298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150231481481482" calcext:value-type="float">
            <text:p>0,00015023148148148200</text:p>
          </table:table-cell>
          <table:table-cell table:formula="of:=[.D61]-[.D6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22" office:value-type="float" office:value="1320" calcext:value-type="float">
            <text:p>132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152777777777778" calcext:value-type="float">
            <text:p>0,00015277777777777800</text:p>
          </table:table-cell>
          <table:table-cell table:formula="of:=[.D62]-[.D61]" office:value-type="float" office:value="0.00000254629629629631" calcext:value-type="float">
            <text:p>0,0000025462962962963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22" office:value-type="float" office:value="1342" calcext:value-type="float">
            <text:p>1342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155324074074074" calcext:value-type="float">
            <text:p>0,00015532407407407400</text:p>
          </table:table-cell>
          <table:table-cell table:formula="of:=[.D63]-[.D6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22" office:value-type="float" office:value="1364" calcext:value-type="float">
            <text:p>1364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15787037037037" calcext:value-type="float">
            <text:p>0,00015787037037037000</text:p>
          </table:table-cell>
          <table:table-cell table:formula="of:=[.D64]-[.D63]" office:value-type="float" office:value="0.00000254629629629631" calcext:value-type="float">
            <text:p>0,0000025462962962963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22" office:value-type="float" office:value="1386" calcext:value-type="float">
            <text:p>1386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160416666666667" calcext:value-type="float">
            <text:p>0,00016041666666666700</text:p>
          </table:table-cell>
          <table:table-cell table:formula="of:=[.D65]-[.D6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22" office:value-type="float" office:value="1408" calcext:value-type="float">
            <text:p>1408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162962962962963" calcext:value-type="float">
            <text:p>0,00016296296296296300</text:p>
          </table:table-cell>
          <table:table-cell table:formula="of:=[.D66]-[.D65]" office:value-type="float" office:value="0.00000254629629629631" calcext:value-type="float">
            <text:p>0,0000025462962962963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22" office:value-type="float" office:value="1430" calcext:value-type="float">
            <text:p>143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165509259259259" calcext:value-type="float">
            <text:p>0,00016550925925925900</text:p>
          </table:table-cell>
          <table:table-cell table:formula="of:=[.D67]-[.D66]" office:value-type="float" office:value="0.00000254629629629631" calcext:value-type="float">
            <text:p>0,000002546296296296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22" office:value-type="float" office:value="1452" calcext:value-type="float">
            <text:p>1452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168055555555556" calcext:value-type="float">
            <text:p>0,00016805555555555600</text:p>
          </table:table-cell>
          <table:table-cell table:formula="of:=[.D68]-[.D6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22" office:value-type="float" office:value="1474" calcext:value-type="float">
            <text:p>1474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170601851851852" calcext:value-type="float">
            <text:p>0,00017060185185185200</text:p>
          </table:table-cell>
          <table:table-cell table:formula="of:=[.D69]-[.D68]" office:value-type="float" office:value="0.00000254629629629631" calcext:value-type="float">
            <text:p>0,0000025462962962963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22" office:value-type="float" office:value="1496" calcext:value-type="float">
            <text:p>1496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173148148148148" calcext:value-type="float">
            <text:p>0,00017314814814814800</text:p>
          </table:table-cell>
          <table:table-cell table:formula="of:=[.D70]-[.D6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22" office:value-type="float" office:value="1518" calcext:value-type="float">
            <text:p>1518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175694444444444" calcext:value-type="float">
            <text:p>0,00017569444444444400</text:p>
          </table:table-cell>
          <table:table-cell table:formula="of:=[.D71]-[.D70]" office:value-type="float" office:value="0.00000254629629629631" calcext:value-type="float">
            <text:p>0,000002546296296296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22" office:value-type="float" office:value="1540" calcext:value-type="float">
            <text:p>154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178240740740741" calcext:value-type="float">
            <text:p>0,00017824074074074100</text:p>
          </table:table-cell>
          <table:table-cell table:formula="of:=[.D72]-[.D7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22" office:value-type="float" office:value="1562" calcext:value-type="float">
            <text:p>1562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180787037037037" calcext:value-type="float">
            <text:p>0,00018078703703703700</text:p>
          </table:table-cell>
          <table:table-cell table:formula="of:=[.D73]-[.D72]" office:value-type="float" office:value="0.00000254629629629631" calcext:value-type="float">
            <text:p>0,0000025462962962963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22" office:value-type="float" office:value="1584" calcext:value-type="float">
            <text:p>1584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183333333333333" calcext:value-type="float">
            <text:p>0,00018333333333333300</text:p>
          </table:table-cell>
          <table:table-cell table:formula="of:=[.D74]-[.D7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22" office:value-type="float" office:value="1606" calcext:value-type="float">
            <text:p>1606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18587962962963" calcext:value-type="float">
            <text:p>0,00018587962962963000</text:p>
          </table:table-cell>
          <table:table-cell table:formula="of:=[.D75]-[.D74]" office:value-type="float" office:value="0.00000254629629629631" calcext:value-type="float">
            <text:p>0,0000025462962962963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22" office:value-type="float" office:value="1628" calcext:value-type="float">
            <text:p>1628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188425925925926" calcext:value-type="float">
            <text:p>0,00018842592592592600</text:p>
          </table:table-cell>
          <table:table-cell table:formula="of:=[.D76]-[.D75]" office:value-type="float" office:value="0.00000254629629629631" calcext:value-type="float">
            <text:p>0,0000025462962962963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22" office:value-type="float" office:value="1650" calcext:value-type="float">
            <text:p>165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190972222222222" calcext:value-type="float">
            <text:p>0,00019097222222222200</text:p>
          </table:table-cell>
          <table:table-cell table:formula="of:=[.D77]-[.D7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22" office:value-type="float" office:value="1672" calcext:value-type="float">
            <text:p>1672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193518518518519" calcext:value-type="float">
            <text:p>0,00019351851851851900</text:p>
          </table:table-cell>
          <table:table-cell table:formula="of:=[.D78]-[.D77]" office:value-type="float" office:value="0.00000254629629629631" calcext:value-type="float">
            <text:p>0,0000025462962962963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22" office:value-type="float" office:value="1694" calcext:value-type="float">
            <text:p>1694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196064814814815" calcext:value-type="float">
            <text:p>0,00019606481481481500</text:p>
          </table:table-cell>
          <table:table-cell table:formula="of:=[.D79]-[.D7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22" office:value-type="float" office:value="1716" calcext:value-type="float">
            <text:p>1716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198611111111111" calcext:value-type="float">
            <text:p>0,00019861111111111100</text:p>
          </table:table-cell>
          <table:table-cell table:formula="of:=[.D80]-[.D79]" office:value-type="float" office:value="0.00000254629629629631" calcext:value-type="float">
            <text:p>0,0000025462962962963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22" office:value-type="float" office:value="1738" calcext:value-type="float">
            <text:p>1738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201157407407407" calcext:value-type="float">
            <text:p>0,00020115740740740700</text:p>
          </table:table-cell>
          <table:table-cell table:formula="of:=[.D81]-[.D8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22" office:value-type="float" office:value="1760" calcext:value-type="float">
            <text:p>176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203703703703704" calcext:value-type="float">
            <text:p>0,00020370370370370400</text:p>
          </table:table-cell>
          <table:table-cell table:formula="of:=[.D82]-[.D81]" office:value-type="float" office:value="0.00000254629629629631" calcext:value-type="float">
            <text:p>0,000002546296296296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22" office:value-type="float" office:value="1782" calcext:value-type="float">
            <text:p>1782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20625" calcext:value-type="float">
            <text:p>0,00020625000000000000</text:p>
          </table:table-cell>
          <table:table-cell table:formula="of:=[.D83]-[.D82]" office:value-type="float" office:value="0.00000254629629629631" calcext:value-type="float">
            <text:p>0,0000025462962962963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22" office:value-type="float" office:value="1804" calcext:value-type="float">
            <text:p>1804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208796296296296" calcext:value-type="float">
            <text:p>0,00020879629629629600</text:p>
          </table:table-cell>
          <table:table-cell table:formula="of:=[.D84]-[.D8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22" office:value-type="float" office:value="1826" calcext:value-type="float">
            <text:p>1826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211342592592593" calcext:value-type="float">
            <text:p>0,00021134259259259300</text:p>
          </table:table-cell>
          <table:table-cell table:formula="of:=[.D85]-[.D84]" office:value-type="float" office:value="0.00000254629629629631" calcext:value-type="float">
            <text:p>0,0000025462962962963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22" office:value-type="float" office:value="1848" calcext:value-type="float">
            <text:p>1848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213888888888889" calcext:value-type="float">
            <text:p>0,00021388888888888900</text:p>
          </table:table-cell>
          <table:table-cell table:formula="of:=[.D86]-[.D8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22" office:value-type="float" office:value="1870" calcext:value-type="float">
            <text:p>187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216435185185185" calcext:value-type="float">
            <text:p>0,00021643518518518500</text:p>
          </table:table-cell>
          <table:table-cell table:formula="of:=[.D87]-[.D86]" office:value-type="float" office:value="0.00000254629629629631" calcext:value-type="float">
            <text:p>0,0000025462962962963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22" office:value-type="float" office:value="1892" calcext:value-type="float">
            <text:p>1892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218981481481481" calcext:value-type="float">
            <text:p>0,00021898148148148100</text:p>
          </table:table-cell>
          <table:table-cell table:formula="of:=[.D88]-[.D8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22" office:value-type="float" office:value="1914" calcext:value-type="float">
            <text:p>1914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221527777777778" calcext:value-type="float">
            <text:p>0,00022152777777777800</text:p>
          </table:table-cell>
          <table:table-cell table:formula="of:=[.D89]-[.D88]" office:value-type="float" office:value="0.00000254629629629631" calcext:value-type="float">
            <text:p>0,0000025462962962963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22" office:value-type="float" office:value="1936" calcext:value-type="float">
            <text:p>1936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224074074074074" calcext:value-type="float">
            <text:p>0,00022407407407407400</text:p>
          </table:table-cell>
          <table:table-cell table:formula="of:=[.D90]-[.D89]" office:value-type="float" office:value="0.00000254629629629631" calcext:value-type="float">
            <text:p>0,0000025462962962963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22" office:value-type="float" office:value="1958" calcext:value-type="float">
            <text:p>1958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22662037037037" calcext:value-type="float">
            <text:p>0,00022662037037037000</text:p>
          </table:table-cell>
          <table:table-cell table:formula="of:=[.D91]-[.D9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22" office:value-type="float" office:value="1980" calcext:value-type="float">
            <text:p>198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229166666666667" calcext:value-type="float">
            <text:p>0,00022916666666666700</text:p>
          </table:table-cell>
          <table:table-cell table:formula="of:=[.D92]-[.D91]" office:value-type="float" office:value="0.00000254629629629631" calcext:value-type="float">
            <text:p>0,0000025462962962963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22" office:value-type="float" office:value="2002" calcext:value-type="float">
            <text:p>2002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231712962962963" calcext:value-type="float">
            <text:p>0,00023171296296296300</text:p>
          </table:table-cell>
          <table:table-cell table:formula="of:=[.D93]-[.D9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22" office:value-type="float" office:value="2024" calcext:value-type="float">
            <text:p>2024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234259259259259" calcext:value-type="float">
            <text:p>0,00023425925925925900</text:p>
          </table:table-cell>
          <table:table-cell table:formula="of:=[.D94]-[.D93]" office:value-type="float" office:value="0.00000254629629629631" calcext:value-type="float">
            <text:p>0,0000025462962962963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22" office:value-type="float" office:value="2046" calcext:value-type="float">
            <text:p>2046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236805555555556" calcext:value-type="float">
            <text:p>0,00023680555555555600</text:p>
          </table:table-cell>
          <table:table-cell table:formula="of:=[.D95]-[.D9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22" office:value-type="float" office:value="2068" calcext:value-type="float">
            <text:p>2068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239351851851852" calcext:value-type="float">
            <text:p>0,00023935185185185200</text:p>
          </table:table-cell>
          <table:table-cell table:formula="of:=[.D96]-[.D95]" office:value-type="float" office:value="0.00000254629629629631" calcext:value-type="float">
            <text:p>0,0000025462962962963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22" office:value-type="float" office:value="2090" calcext:value-type="float">
            <text:p>209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241898148148148" calcext:value-type="float">
            <text:p>0,00024189814814814800</text:p>
          </table:table-cell>
          <table:table-cell table:formula="of:=[.D97]-[.D9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22" office:value-type="float" office:value="2112" calcext:value-type="float">
            <text:p>2112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244444444444444" calcext:value-type="float">
            <text:p>0,00024444444444444400</text:p>
          </table:table-cell>
          <table:table-cell table:formula="of:=[.D98]-[.D97]" office:value-type="float" office:value="0.00000254629629629634" calcext:value-type="float">
            <text:p>0,0000025462962962963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22" office:value-type="float" office:value="2134" calcext:value-type="float">
            <text:p>2134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246990740740741" calcext:value-type="float">
            <text:p>0,00024699074074074100</text:p>
          </table:table-cell>
          <table:table-cell table:formula="of:=[.D99]-[.D9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22" office:value-type="float" office:value="2156" calcext:value-type="float">
            <text:p>2156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249537037037037" calcext:value-type="float">
            <text:p>0,00024953703703703700</text:p>
          </table:table-cell>
          <table:table-cell table:formula="of:=[.D100]-[.D9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22" office:value-type="float" office:value="2178" calcext:value-type="float">
            <text:p>2178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252083333333333" calcext:value-type="float">
            <text:p>0,00025208333333333300</text:p>
          </table:table-cell>
          <table:table-cell table:formula="of:=[.D101]-[.D10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22" office:value-type="float" office:value="2200" calcext:value-type="float">
            <text:p>22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25462962962963" calcext:value-type="float">
            <text:p>0,00025462962962963000</text:p>
          </table:table-cell>
          <table:table-cell table:formula="of:=[.D102]-[.D101]" office:value-type="float" office:value="0.00000254629629629634" calcext:value-type="float">
            <text:p>0,0000025462962962963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22" office:value-type="float" office:value="2222" calcext:value-type="float">
            <text:p>2222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257175925925926" calcext:value-type="float">
            <text:p>0,00025717592592592600</text:p>
          </table:table-cell>
          <table:table-cell table:formula="of:=[.D103]-[.D10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22" office:value-type="float" office:value="2244" calcext:value-type="float">
            <text:p>2244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259722222222222" calcext:value-type="float">
            <text:p>0,00025972222222222200</text:p>
          </table:table-cell>
          <table:table-cell table:formula="of:=[.D104]-[.D10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22" office:value-type="float" office:value="2266" calcext:value-type="float">
            <text:p>2266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262268518518519" calcext:value-type="float">
            <text:p>0,00026226851851851900</text:p>
          </table:table-cell>
          <table:table-cell table:formula="of:=[.D105]-[.D104]" office:value-type="float" office:value="0.00000254629629629634" calcext:value-type="float">
            <text:p>0,0000025462962962963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22" office:value-type="float" office:value="2288" calcext:value-type="float">
            <text:p>2288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264814814814815" calcext:value-type="float">
            <text:p>0,00026481481481481500</text:p>
          </table:table-cell>
          <table:table-cell table:formula="of:=[.D106]-[.D10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22" office:value-type="float" office:value="2310" calcext:value-type="float">
            <text:p>231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267361111111111" calcext:value-type="float">
            <text:p>0,00026736111111111100</text:p>
          </table:table-cell>
          <table:table-cell table:formula="of:=[.D107]-[.D10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22" office:value-type="float" office:value="2332" calcext:value-type="float">
            <text:p>2332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269907407407407" calcext:value-type="float">
            <text:p>0,00026990740740740700</text:p>
          </table:table-cell>
          <table:table-cell table:formula="of:=[.D108]-[.D10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22" office:value-type="float" office:value="2354" calcext:value-type="float">
            <text:p>2354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272453703703704" calcext:value-type="float">
            <text:p>0,00027245370370370400</text:p>
          </table:table-cell>
          <table:table-cell table:formula="of:=[.D109]-[.D108]" office:value-type="float" office:value="0.00000254629629629634" calcext:value-type="float">
            <text:p>0,0000025462962962963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22" office:value-type="float" office:value="2376" calcext:value-type="float">
            <text:p>2376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275" calcext:value-type="float">
            <text:p>0,00027500000000000000</text:p>
          </table:table-cell>
          <table:table-cell table:formula="of:=[.D110]-[.D10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22" office:value-type="float" office:value="2398" calcext:value-type="float">
            <text:p>2398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277546296296296" calcext:value-type="float">
            <text:p>0,00027754629629629600</text:p>
          </table:table-cell>
          <table:table-cell table:formula="of:=[.D111]-[.D11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22" office:value-type="float" office:value="2420" calcext:value-type="float">
            <text:p>242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280092592592593" calcext:value-type="float">
            <text:p>0,00028009259259259300</text:p>
          </table:table-cell>
          <table:table-cell table:formula="of:=[.D112]-[.D111]" office:value-type="float" office:value="0.00000254629629629634" calcext:value-type="float">
            <text:p>0,0000025462962962963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22" office:value-type="float" office:value="2442" calcext:value-type="float">
            <text:p>2442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282638888888889" calcext:value-type="float">
            <text:p>0,00028263888888888900</text:p>
          </table:table-cell>
          <table:table-cell table:formula="of:=[.D113]-[.D11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22" office:value-type="float" office:value="2464" calcext:value-type="float">
            <text:p>2464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285185185185185" calcext:value-type="float">
            <text:p>0,00028518518518518500</text:p>
          </table:table-cell>
          <table:table-cell table:formula="of:=[.D114]-[.D11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22" office:value-type="float" office:value="2486" calcext:value-type="float">
            <text:p>2486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287731481481482" calcext:value-type="float">
            <text:p>0,00028773148148148200</text:p>
          </table:table-cell>
          <table:table-cell table:formula="of:=[.D115]-[.D11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22" office:value-type="float" office:value="2508" calcext:value-type="float">
            <text:p>2508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290277777777778" calcext:value-type="float">
            <text:p>0,00029027777777777800</text:p>
          </table:table-cell>
          <table:table-cell table:formula="of:=[.D116]-[.D115]" office:value-type="float" office:value="0.00000254629629629634" calcext:value-type="float">
            <text:p>0,0000025462962962963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22" office:value-type="float" office:value="2530" calcext:value-type="float">
            <text:p>253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292824074074074" calcext:value-type="float">
            <text:p>0,00029282407407407400</text:p>
          </table:table-cell>
          <table:table-cell table:formula="of:=[.D117]-[.D11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22" office:value-type="float" office:value="2552" calcext:value-type="float">
            <text:p>2552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29537037037037" calcext:value-type="float">
            <text:p>0,00029537037037037000</text:p>
          </table:table-cell>
          <table:table-cell table:formula="of:=[.D118]-[.D11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22" office:value-type="float" office:value="2574" calcext:value-type="float">
            <text:p>2574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297916666666667" calcext:value-type="float">
            <text:p>0,00029791666666666700</text:p>
          </table:table-cell>
          <table:table-cell table:formula="of:=[.D119]-[.D118]" office:value-type="float" office:value="0.00000254629629629634" calcext:value-type="float">
            <text:p>0,0000025462962962963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22" office:value-type="float" office:value="2596" calcext:value-type="float">
            <text:p>2596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300462962962963" calcext:value-type="float">
            <text:p>0,00030046296296296300</text:p>
          </table:table-cell>
          <table:table-cell table:formula="of:=[.D120]-[.D11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22" office:value-type="float" office:value="2618" calcext:value-type="float">
            <text:p>2618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303009259259259" calcext:value-type="float">
            <text:p>0,00030300925925925900</text:p>
          </table:table-cell>
          <table:table-cell table:formula="of:=[.D121]-[.D12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22" office:value-type="float" office:value="2640" calcext:value-type="float">
            <text:p>264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305555555555556" calcext:value-type="float">
            <text:p>0,00030555555555555600</text:p>
          </table:table-cell>
          <table:table-cell table:formula="of:=[.D122]-[.D12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22" office:value-type="float" office:value="2662" calcext:value-type="float">
            <text:p>2662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308101851851852" calcext:value-type="float">
            <text:p>0,00030810185185185200</text:p>
          </table:table-cell>
          <table:table-cell table:formula="of:=[.D123]-[.D122]" office:value-type="float" office:value="0.00000254629629629634" calcext:value-type="float">
            <text:p>0,0000025462962962963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22" office:value-type="float" office:value="2684" calcext:value-type="float">
            <text:p>2684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310648148148148" calcext:value-type="float">
            <text:p>0,00031064814814814800</text:p>
          </table:table-cell>
          <table:table-cell table:formula="of:=[.D124]-[.D12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22" office:value-type="float" office:value="2706" calcext:value-type="float">
            <text:p>2706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313194444444444" calcext:value-type="float">
            <text:p>0,00031319444444444400</text:p>
          </table:table-cell>
          <table:table-cell table:formula="of:=[.D125]-[.D12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22" office:value-type="float" office:value="2728" calcext:value-type="float">
            <text:p>2728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315740740740741" calcext:value-type="float">
            <text:p>0,00031574074074074100</text:p>
          </table:table-cell>
          <table:table-cell table:formula="of:=[.D126]-[.D125]" office:value-type="float" office:value="0.00000254629629629634" calcext:value-type="float">
            <text:p>0,0000025462962962963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22" office:value-type="float" office:value="2750" calcext:value-type="float">
            <text:p>275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318287037037037" calcext:value-type="float">
            <text:p>0,00031828703703703700</text:p>
          </table:table-cell>
          <table:table-cell table:formula="of:=[.D127]-[.D12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22" office:value-type="float" office:value="2772" calcext:value-type="float">
            <text:p>2772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320833333333333" calcext:value-type="float">
            <text:p>0,00032083333333333300</text:p>
          </table:table-cell>
          <table:table-cell table:formula="of:=[.D128]-[.D12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22" office:value-type="float" office:value="2794" calcext:value-type="float">
            <text:p>2794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32337962962963" calcext:value-type="float">
            <text:p>0,00032337962962963000</text:p>
          </table:table-cell>
          <table:table-cell table:formula="of:=[.D129]-[.D12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22" office:value-type="float" office:value="2816" calcext:value-type="float">
            <text:p>2816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325925925925926" calcext:value-type="float">
            <text:p>0,00032592592592592600</text:p>
          </table:table-cell>
          <table:table-cell table:formula="of:=[.D130]-[.D129]" office:value-type="float" office:value="0.00000254629629629634" calcext:value-type="float">
            <text:p>0,0000025462962962963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22" office:value-type="float" office:value="2838" calcext:value-type="float">
            <text:p>2838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328472222222222" calcext:value-type="float">
            <text:p>0,00032847222222222200</text:p>
          </table:table-cell>
          <table:table-cell table:formula="of:=[.D131]-[.D13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22" office:value-type="float" office:value="2860" calcext:value-type="float">
            <text:p>286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331018518518519" calcext:value-type="float">
            <text:p>0,00033101851851851900</text:p>
          </table:table-cell>
          <table:table-cell table:formula="of:=[.D132]-[.D13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22" office:value-type="float" office:value="2882" calcext:value-type="float">
            <text:p>2882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333564814814815" calcext:value-type="float">
            <text:p>0,00033356481481481500</text:p>
          </table:table-cell>
          <table:table-cell table:formula="of:=[.D133]-[.D132]" office:value-type="float" office:value="0.00000254629629629634" calcext:value-type="float">
            <text:p>0,0000025462962962963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22" office:value-type="float" office:value="2904" calcext:value-type="float">
            <text:p>2904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336111111111111" calcext:value-type="float">
            <text:p>0,00033611111111111100</text:p>
          </table:table-cell>
          <table:table-cell table:formula="of:=[.D134]-[.D13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22" office:value-type="float" office:value="2926" calcext:value-type="float">
            <text:p>2926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338657407407407" calcext:value-type="float">
            <text:p>0,00033865740740740700</text:p>
          </table:table-cell>
          <table:table-cell table:formula="of:=[.D135]-[.D13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22" office:value-type="float" office:value="2948" calcext:value-type="float">
            <text:p>2948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341203703703704" calcext:value-type="float">
            <text:p>0,00034120370370370400</text:p>
          </table:table-cell>
          <table:table-cell table:formula="of:=[.D136]-[.D13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22" office:value-type="float" office:value="2970" calcext:value-type="float">
            <text:p>297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34375" calcext:value-type="float">
            <text:p>0,00034375000000000000</text:p>
          </table:table-cell>
          <table:table-cell table:formula="of:=[.D137]-[.D136]" office:value-type="float" office:value="0.00000254629629629634" calcext:value-type="float">
            <text:p>0,0000025462962962963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22" office:value-type="float" office:value="2992" calcext:value-type="float">
            <text:p>2992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346296296296296" calcext:value-type="float">
            <text:p>0,00034629629629629600</text:p>
          </table:table-cell>
          <table:table-cell table:formula="of:=[.D138]-[.D13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22" office:value-type="float" office:value="3014" calcext:value-type="float">
            <text:p>3014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348842592592593" calcext:value-type="float">
            <text:p>0,00034884259259259300</text:p>
          </table:table-cell>
          <table:table-cell table:formula="of:=[.D139]-[.D13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22" office:value-type="float" office:value="3036" calcext:value-type="float">
            <text:p>3036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351388888888889" calcext:value-type="float">
            <text:p>0,00035138888888888900</text:p>
          </table:table-cell>
          <table:table-cell table:formula="of:=[.D140]-[.D139]" office:value-type="float" office:value="0.00000254629629629634" calcext:value-type="float">
            <text:p>0,0000025462962962963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22" office:value-type="float" office:value="3058" calcext:value-type="float">
            <text:p>3058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353935185185185" calcext:value-type="float">
            <text:p>0,00035393518518518500</text:p>
          </table:table-cell>
          <table:table-cell table:formula="of:=[.D141]-[.D14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22" office:value-type="float" office:value="3080" calcext:value-type="float">
            <text:p>308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356481481481482" calcext:value-type="float">
            <text:p>0,00035648148148148200</text:p>
          </table:table-cell>
          <table:table-cell table:formula="of:=[.D142]-[.D14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22" office:value-type="float" office:value="3102" calcext:value-type="float">
            <text:p>3102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359027777777778" calcext:value-type="float">
            <text:p>0,00035902777777777800</text:p>
          </table:table-cell>
          <table:table-cell table:formula="of:=[.D143]-[.D14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22" office:value-type="float" office:value="3124" calcext:value-type="float">
            <text:p>3124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361574074074074" calcext:value-type="float">
            <text:p>0,00036157407407407400</text:p>
          </table:table-cell>
          <table:table-cell table:formula="of:=[.D144]-[.D143]" office:value-type="float" office:value="0.00000254629629629634" calcext:value-type="float">
            <text:p>0,0000025462962962963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22" office:value-type="float" office:value="3146" calcext:value-type="float">
            <text:p>3146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36412037037037" calcext:value-type="float">
            <text:p>0,00036412037037037000</text:p>
          </table:table-cell>
          <table:table-cell table:formula="of:=[.D145]-[.D14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22" office:value-type="float" office:value="3168" calcext:value-type="float">
            <text:p>3168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366666666666667" calcext:value-type="float">
            <text:p>0,00036666666666666700</text:p>
          </table:table-cell>
          <table:table-cell table:formula="of:=[.D146]-[.D14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22" office:value-type="float" office:value="3190" calcext:value-type="float">
            <text:p>319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369212962962963" calcext:value-type="float">
            <text:p>0,00036921296296296300</text:p>
          </table:table-cell>
          <table:table-cell table:formula="of:=[.D147]-[.D14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22" office:value-type="float" office:value="3212" calcext:value-type="float">
            <text:p>3212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371759259259259" calcext:value-type="float">
            <text:p>0,00037175925925925900</text:p>
          </table:table-cell>
          <table:table-cell table:formula="of:=[.D148]-[.D147]" office:value-type="float" office:value="0.00000254629629629634" calcext:value-type="float">
            <text:p>0,0000025462962962963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22" office:value-type="float" office:value="3234" calcext:value-type="float">
            <text:p>3234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374305555555556" calcext:value-type="float">
            <text:p>0,00037430555555555600</text:p>
          </table:table-cell>
          <table:table-cell table:formula="of:=[.D149]-[.D14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22" office:value-type="float" office:value="3256" calcext:value-type="float">
            <text:p>3256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376851851851852" calcext:value-type="float">
            <text:p>0,00037685185185185200</text:p>
          </table:table-cell>
          <table:table-cell table:formula="of:=[.D150]-[.D14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22" office:value-type="float" office:value="3278" calcext:value-type="float">
            <text:p>3278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379398148148148" calcext:value-type="float">
            <text:p>0,00037939814814814800</text:p>
          </table:table-cell>
          <table:table-cell table:formula="of:=[.D151]-[.D150]" office:value-type="float" office:value="0.00000254629629629634" calcext:value-type="float">
            <text:p>0,000002546296296296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22" office:value-type="float" office:value="3300" calcext:value-type="float">
            <text:p>33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381944444444444" calcext:value-type="float">
            <text:p>0,00038194444444444400</text:p>
          </table:table-cell>
          <table:table-cell table:formula="of:=[.D152]-[.D15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22" office:value-type="float" office:value="3322" calcext:value-type="float">
            <text:p>3322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384490740740741" calcext:value-type="float">
            <text:p>0,00038449074074074100</text:p>
          </table:table-cell>
          <table:table-cell table:formula="of:=[.D153]-[.D15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22" office:value-type="float" office:value="3344" calcext:value-type="float">
            <text:p>3344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387037037037037" calcext:value-type="float">
            <text:p>0,00038703703703703700</text:p>
          </table:table-cell>
          <table:table-cell table:formula="of:=[.D154]-[.D15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22" office:value-type="float" office:value="3366" calcext:value-type="float">
            <text:p>3366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389583333333333" calcext:value-type="float">
            <text:p>0,00038958333333333300</text:p>
          </table:table-cell>
          <table:table-cell table:formula="of:=[.D155]-[.D154]" office:value-type="float" office:value="0.00000254629629629634" calcext:value-type="float">
            <text:p>0,0000025462962962963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22" office:value-type="float" office:value="3388" calcext:value-type="float">
            <text:p>3388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39212962962963" calcext:value-type="float">
            <text:p>0,00039212962962963000</text:p>
          </table:table-cell>
          <table:table-cell table:formula="of:=[.D156]-[.D15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22" office:value-type="float" office:value="3410" calcext:value-type="float">
            <text:p>341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394675925925926" calcext:value-type="float">
            <text:p>0,00039467592592592600</text:p>
          </table:table-cell>
          <table:table-cell table:formula="of:=[.D157]-[.D15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22" office:value-type="float" office:value="3432" calcext:value-type="float">
            <text:p>3432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397222222222222" calcext:value-type="float">
            <text:p>0,00039722222222222200</text:p>
          </table:table-cell>
          <table:table-cell table:formula="of:=[.D158]-[.D157]" office:value-type="float" office:value="0.00000254629629629634" calcext:value-type="float">
            <text:p>0,0000025462962962963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22" office:value-type="float" office:value="3454" calcext:value-type="float">
            <text:p>3454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399768518518519" calcext:value-type="float">
            <text:p>0,00039976851851851900</text:p>
          </table:table-cell>
          <table:table-cell table:formula="of:=[.D159]-[.D15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22" office:value-type="float" office:value="3476" calcext:value-type="float">
            <text:p>3476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402314814814815" calcext:value-type="float">
            <text:p>0,00040231481481481500</text:p>
          </table:table-cell>
          <table:table-cell table:formula="of:=[.D160]-[.D15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22" office:value-type="float" office:value="3498" calcext:value-type="float">
            <text:p>3498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404861111111111" calcext:value-type="float">
            <text:p>0,00040486111111111100</text:p>
          </table:table-cell>
          <table:table-cell table:formula="of:=[.D161]-[.D16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22" office:value-type="float" office:value="3520" calcext:value-type="float">
            <text:p>352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407407407407407" calcext:value-type="float">
            <text:p>0,00040740740740740700</text:p>
          </table:table-cell>
          <table:table-cell table:formula="of:=[.D162]-[.D161]" office:value-type="float" office:value="0.00000254629629629634" calcext:value-type="float">
            <text:p>0,0000025462962962963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22" office:value-type="float" office:value="3542" calcext:value-type="float">
            <text:p>3542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409953703703704" calcext:value-type="float">
            <text:p>0,00040995370370370400</text:p>
          </table:table-cell>
          <table:table-cell table:formula="of:=[.D163]-[.D16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22" office:value-type="float" office:value="3564" calcext:value-type="float">
            <text:p>3564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4125" calcext:value-type="float">
            <text:p>0,00041250000000000000</text:p>
          </table:table-cell>
          <table:table-cell table:formula="of:=[.D164]-[.D16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22" office:value-type="float" office:value="3586" calcext:value-type="float">
            <text:p>3586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415046296296296" calcext:value-type="float">
            <text:p>0,00041504629629629600</text:p>
          </table:table-cell>
          <table:table-cell table:formula="of:=[.D165]-[.D164]" office:value-type="float" office:value="0.00000254629629629634" calcext:value-type="float">
            <text:p>0,0000025462962962963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22" office:value-type="float" office:value="3608" calcext:value-type="float">
            <text:p>3608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417592592592593" calcext:value-type="float">
            <text:p>0,00041759259259259300</text:p>
          </table:table-cell>
          <table:table-cell table:formula="of:=[.D166]-[.D16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22" office:value-type="float" office:value="3630" calcext:value-type="float">
            <text:p>363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420138888888889" calcext:value-type="float">
            <text:p>0,00042013888888888900</text:p>
          </table:table-cell>
          <table:table-cell table:formula="of:=[.D167]-[.D16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22" office:value-type="float" office:value="3652" calcext:value-type="float">
            <text:p>3652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422685185185185" calcext:value-type="float">
            <text:p>0,00042268518518518500</text:p>
          </table:table-cell>
          <table:table-cell table:formula="of:=[.D168]-[.D16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22" office:value-type="float" office:value="3674" calcext:value-type="float">
            <text:p>3674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425231481481481" calcext:value-type="float">
            <text:p>0,00042523148148148100</text:p>
          </table:table-cell>
          <table:table-cell table:formula="of:=[.D169]-[.D168]" office:value-type="float" office:value="0.00000254629629629634" calcext:value-type="float">
            <text:p>0,0000025462962962963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22" office:value-type="float" office:value="3696" calcext:value-type="float">
            <text:p>3696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427777777777778" calcext:value-type="float">
            <text:p>0,00042777777777777800</text:p>
          </table:table-cell>
          <table:table-cell table:formula="of:=[.D170]-[.D16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22" office:value-type="float" office:value="3718" calcext:value-type="float">
            <text:p>3718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430324074074074" calcext:value-type="float">
            <text:p>0,00043032407407407400</text:p>
          </table:table-cell>
          <table:table-cell table:formula="of:=[.D171]-[.D17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22" office:value-type="float" office:value="3740" calcext:value-type="float">
            <text:p>374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043287037037037" calcext:value-type="float">
            <text:p>0,00043287037037037000</text:p>
          </table:table-cell>
          <table:table-cell table:formula="of:=[.D172]-[.D171]" office:value-type="float" office:value="0.00000254629629629634" calcext:value-type="float">
            <text:p>0,0000025462962962963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22" office:value-type="float" office:value="3762" calcext:value-type="float">
            <text:p>3762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0435416666666667" calcext:value-type="float">
            <text:p>0,00043541666666666700</text:p>
          </table:table-cell>
          <table:table-cell table:formula="of:=[.D173]-[.D17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22" office:value-type="float" office:value="3784" calcext:value-type="float">
            <text:p>3784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0437962962962963" calcext:value-type="float">
            <text:p>0,00043796296296296300</text:p>
          </table:table-cell>
          <table:table-cell table:formula="of:=[.D174]-[.D17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22" office:value-type="float" office:value="3806" calcext:value-type="float">
            <text:p>3806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0440509259259259" calcext:value-type="float">
            <text:p>0,00044050925925925900</text:p>
          </table:table-cell>
          <table:table-cell table:formula="of:=[.D175]-[.D17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22" office:value-type="float" office:value="3828" calcext:value-type="float">
            <text:p>3828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0443055555555556" calcext:value-type="float">
            <text:p>0,00044305555555555600</text:p>
          </table:table-cell>
          <table:table-cell table:formula="of:=[.D176]-[.D175]" office:value-type="float" office:value="0.00000254629629629634" calcext:value-type="float">
            <text:p>0,0000025462962962963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22" office:value-type="float" office:value="3850" calcext:value-type="float">
            <text:p>385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0445601851851852" calcext:value-type="float">
            <text:p>0,00044560185185185200</text:p>
          </table:table-cell>
          <table:table-cell table:formula="of:=[.D177]-[.D17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22" office:value-type="float" office:value="3872" calcext:value-type="float">
            <text:p>3872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0448148148148148" calcext:value-type="float">
            <text:p>0,00044814814814814800</text:p>
          </table:table-cell>
          <table:table-cell table:formula="of:=[.D178]-[.D17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22" office:value-type="float" office:value="3894" calcext:value-type="float">
            <text:p>3894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0450694444444444" calcext:value-type="float">
            <text:p>0,00045069444444444400</text:p>
          </table:table-cell>
          <table:table-cell table:formula="of:=[.D179]-[.D178]" office:value-type="float" office:value="0.00000254629629629634" calcext:value-type="float">
            <text:p>0,0000025462962962963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22" office:value-type="float" office:value="3916" calcext:value-type="float">
            <text:p>3916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0453240740740741" calcext:value-type="float">
            <text:p>0,00045324074074074100</text:p>
          </table:table-cell>
          <table:table-cell table:formula="of:=[.D180]-[.D17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22" office:value-type="float" office:value="3938" calcext:value-type="float">
            <text:p>3938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0455787037037037" calcext:value-type="float">
            <text:p>0,00045578703703703700</text:p>
          </table:table-cell>
          <table:table-cell table:formula="of:=[.D181]-[.D18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22" office:value-type="float" office:value="3960" calcext:value-type="float">
            <text:p>396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0458333333333333" calcext:value-type="float">
            <text:p>0,00045833333333333300</text:p>
          </table:table-cell>
          <table:table-cell table:formula="of:=[.D182]-[.D18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22" office:value-type="float" office:value="3982" calcext:value-type="float">
            <text:p>3982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046087962962963" calcext:value-type="float">
            <text:p>0,00046087962962963000</text:p>
          </table:table-cell>
          <table:table-cell table:formula="of:=[.D183]-[.D182]" office:value-type="float" office:value="0.00000254629629629634" calcext:value-type="float">
            <text:p>0,0000025462962962963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22" office:value-type="float" office:value="4004" calcext:value-type="float">
            <text:p>4004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0463425925925926" calcext:value-type="float">
            <text:p>0,00046342592592592600</text:p>
          </table:table-cell>
          <table:table-cell table:formula="of:=[.D184]-[.D18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22" office:value-type="float" office:value="4026" calcext:value-type="float">
            <text:p>4026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0465972222222222" calcext:value-type="float">
            <text:p>0,00046597222222222200</text:p>
          </table:table-cell>
          <table:table-cell table:formula="of:=[.D185]-[.D18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22" office:value-type="float" office:value="4048" calcext:value-type="float">
            <text:p>4048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0468518518518519" calcext:value-type="float">
            <text:p>0,00046851851851851900</text:p>
          </table:table-cell>
          <table:table-cell table:formula="of:=[.D186]-[.D185]" office:value-type="float" office:value="0.00000254629629629634" calcext:value-type="float">
            <text:p>0,0000025462962962963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22" office:value-type="float" office:value="4070" calcext:value-type="float">
            <text:p>407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0471064814814815" calcext:value-type="float">
            <text:p>0,00047106481481481500</text:p>
          </table:table-cell>
          <table:table-cell table:formula="of:=[.D187]-[.D18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22" office:value-type="float" office:value="4092" calcext:value-type="float">
            <text:p>4092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0473611111111111" calcext:value-type="float">
            <text:p>0,00047361111111111100</text:p>
          </table:table-cell>
          <table:table-cell table:formula="of:=[.D188]-[.D18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22" office:value-type="float" office:value="4114" calcext:value-type="float">
            <text:p>4114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0476157407407407" calcext:value-type="float">
            <text:p>0,00047615740740740700</text:p>
          </table:table-cell>
          <table:table-cell table:formula="of:=[.D189]-[.D18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22" office:value-type="float" office:value="4136" calcext:value-type="float">
            <text:p>4136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0478703703703704" calcext:value-type="float">
            <text:p>0,00047870370370370400</text:p>
          </table:table-cell>
          <table:table-cell table:formula="of:=[.D190]-[.D189]" office:value-type="float" office:value="0.00000254629629629634" calcext:value-type="float">
            <text:p>0,0000025462962962963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22" office:value-type="float" office:value="4158" calcext:value-type="float">
            <text:p>4158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048125" calcext:value-type="float">
            <text:p>0,00048125000000000000</text:p>
          </table:table-cell>
          <table:table-cell table:formula="of:=[.D191]-[.D19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22" office:value-type="float" office:value="4180" calcext:value-type="float">
            <text:p>418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0483796296296296" calcext:value-type="float">
            <text:p>0,00048379629629629600</text:p>
          </table:table-cell>
          <table:table-cell table:formula="of:=[.D192]-[.D19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22" office:value-type="float" office:value="4202" calcext:value-type="float">
            <text:p>4202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0486342592592593" calcext:value-type="float">
            <text:p>0,00048634259259259300</text:p>
          </table:table-cell>
          <table:table-cell table:formula="of:=[.D193]-[.D19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22" office:value-type="float" office:value="4224" calcext:value-type="float">
            <text:p>4224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0488888888888889" calcext:value-type="float">
            <text:p>0,00048888888888888900</text:p>
          </table:table-cell>
          <table:table-cell table:formula="of:=[.D194]-[.D19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22" office:value-type="float" office:value="4246" calcext:value-type="float">
            <text:p>4246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0491435185185185" calcext:value-type="float">
            <text:p>0,00049143518518518500</text:p>
          </table:table-cell>
          <table:table-cell table:formula="of:=[.D195]-[.D194]" office:value-type="float" office:value="0.00000254629629629639" calcext:value-type="float">
            <text:p>0,0000025462962962963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22" office:value-type="float" office:value="4268" calcext:value-type="float">
            <text:p>4268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0493981481481482" calcext:value-type="float">
            <text:p>0,00049398148148148200</text:p>
          </table:table-cell>
          <table:table-cell table:formula="of:=[.D196]-[.D19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22" office:value-type="float" office:value="4290" calcext:value-type="float">
            <text:p>429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0496527777777778" calcext:value-type="float">
            <text:p>0,00049652777777777800</text:p>
          </table:table-cell>
          <table:table-cell table:formula="of:=[.D197]-[.D19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22" office:value-type="float" office:value="4312" calcext:value-type="float">
            <text:p>4312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0499074074074074" calcext:value-type="float">
            <text:p>0,00049907407407407400</text:p>
          </table:table-cell>
          <table:table-cell table:formula="of:=[.D198]-[.D19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22" office:value-type="float" office:value="4334" calcext:value-type="float">
            <text:p>4334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050162037037037" calcext:value-type="float">
            <text:p>0,00050162037037037000</text:p>
          </table:table-cell>
          <table:table-cell table:formula="of:=[.D199]-[.D19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22" office:value-type="float" office:value="4356" calcext:value-type="float">
            <text:p>4356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0504166666666667" calcext:value-type="float">
            <text:p>0,00050416666666666700</text:p>
          </table:table-cell>
          <table:table-cell table:formula="of:=[.D200]-[.D19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22" office:value-type="float" office:value="4378" calcext:value-type="float">
            <text:p>4378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0506712962962963" calcext:value-type="float">
            <text:p>0,00050671296296296300</text:p>
          </table:table-cell>
          <table:table-cell table:formula="of:=[.D201]-[.D20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22" office:value-type="float" office:value="4400" calcext:value-type="float">
            <text:p>44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0509259259259259" calcext:value-type="float">
            <text:p>0,00050925925925925900</text:p>
          </table:table-cell>
          <table:table-cell table:formula="of:=[.D202]-[.D201]" office:value-type="float" office:value="0.00000254629629629639" calcext:value-type="float">
            <text:p>0,0000025462962962963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22" office:value-type="float" office:value="4422" calcext:value-type="float">
            <text:p>4422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0511805555555556" calcext:value-type="float">
            <text:p>0,00051180555555555600</text:p>
          </table:table-cell>
          <table:table-cell table:formula="of:=[.D203]-[.D20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22" office:value-type="float" office:value="4444" calcext:value-type="float">
            <text:p>4444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0514351851851852" calcext:value-type="float">
            <text:p>0,00051435185185185200</text:p>
          </table:table-cell>
          <table:table-cell table:formula="of:=[.D204]-[.D20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22" office:value-type="float" office:value="4466" calcext:value-type="float">
            <text:p>4466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0516898148148148" calcext:value-type="float">
            <text:p>0,00051689814814814800</text:p>
          </table:table-cell>
          <table:table-cell table:formula="of:=[.D205]-[.D20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22" office:value-type="float" office:value="4488" calcext:value-type="float">
            <text:p>4488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0519444444444444" calcext:value-type="float">
            <text:p>0,00051944444444444400</text:p>
          </table:table-cell>
          <table:table-cell table:formula="of:=[.D206]-[.D20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22" office:value-type="float" office:value="4510" calcext:value-type="float">
            <text:p>451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0521990740740741" calcext:value-type="float">
            <text:p>0,00052199074074074100</text:p>
          </table:table-cell>
          <table:table-cell table:formula="of:=[.D207]-[.D20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22" office:value-type="float" office:value="4532" calcext:value-type="float">
            <text:p>4532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0524537037037037" calcext:value-type="float">
            <text:p>0,00052453703703703700</text:p>
          </table:table-cell>
          <table:table-cell table:formula="of:=[.D208]-[.D20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22" office:value-type="float" office:value="4554" calcext:value-type="float">
            <text:p>4554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0527083333333333" calcext:value-type="float">
            <text:p>0,00052708333333333300</text:p>
          </table:table-cell>
          <table:table-cell table:formula="of:=[.D209]-[.D208]" office:value-type="float" office:value="0.00000254629629629639" calcext:value-type="float">
            <text:p>0,0000025462962962963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22" office:value-type="float" office:value="4576" calcext:value-type="float">
            <text:p>4576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052962962962963" calcext:value-type="float">
            <text:p>0,00052962962962963000</text:p>
          </table:table-cell>
          <table:table-cell table:formula="of:=[.D210]-[.D20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22" office:value-type="float" office:value="4598" calcext:value-type="float">
            <text:p>4598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0532175925925926" calcext:value-type="float">
            <text:p>0,00053217592592592600</text:p>
          </table:table-cell>
          <table:table-cell table:formula="of:=[.D211]-[.D21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22" office:value-type="float" office:value="4620" calcext:value-type="float">
            <text:p>462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0534722222222222" calcext:value-type="float">
            <text:p>0,00053472222222222200</text:p>
          </table:table-cell>
          <table:table-cell table:formula="of:=[.D212]-[.D21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22" office:value-type="float" office:value="4642" calcext:value-type="float">
            <text:p>4642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0537268518518519" calcext:value-type="float">
            <text:p>0,00053726851851851900</text:p>
          </table:table-cell>
          <table:table-cell table:formula="of:=[.D213]-[.D21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22" office:value-type="float" office:value="4664" calcext:value-type="float">
            <text:p>4664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0539814814814815" calcext:value-type="float">
            <text:p>0,00053981481481481500</text:p>
          </table:table-cell>
          <table:table-cell table:formula="of:=[.D214]-[.D21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22" office:value-type="float" office:value="4686" calcext:value-type="float">
            <text:p>4686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0542361111111111" calcext:value-type="float">
            <text:p>0,00054236111111111100</text:p>
          </table:table-cell>
          <table:table-cell table:formula="of:=[.D215]-[.D21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22" office:value-type="float" office:value="4708" calcext:value-type="float">
            <text:p>4708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0544907407407407" calcext:value-type="float">
            <text:p>0,00054490740740740700</text:p>
          </table:table-cell>
          <table:table-cell table:formula="of:=[.D216]-[.D215]" office:value-type="float" office:value="0.00000254629629629639" calcext:value-type="float">
            <text:p>0,0000025462962962963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22" office:value-type="float" office:value="4730" calcext:value-type="float">
            <text:p>473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0547453703703704" calcext:value-type="float">
            <text:p>0,00054745370370370400</text:p>
          </table:table-cell>
          <table:table-cell table:formula="of:=[.D217]-[.D21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22" office:value-type="float" office:value="4752" calcext:value-type="float">
            <text:p>4752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055" calcext:value-type="float">
            <text:p>0,00055000000000000000</text:p>
          </table:table-cell>
          <table:table-cell table:formula="of:=[.D218]-[.D21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22" office:value-type="float" office:value="4774" calcext:value-type="float">
            <text:p>4774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0552546296296296" calcext:value-type="float">
            <text:p>0,00055254629629629600</text:p>
          </table:table-cell>
          <table:table-cell table:formula="of:=[.D219]-[.D21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22" office:value-type="float" office:value="4796" calcext:value-type="float">
            <text:p>4796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0555092592592593" calcext:value-type="float">
            <text:p>0,00055509259259259300</text:p>
          </table:table-cell>
          <table:table-cell table:formula="of:=[.D220]-[.D21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22" office:value-type="float" office:value="4818" calcext:value-type="float">
            <text:p>4818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0557638888888889" calcext:value-type="float">
            <text:p>0,00055763888888888900</text:p>
          </table:table-cell>
          <table:table-cell table:formula="of:=[.D221]-[.D22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22" office:value-type="float" office:value="4840" calcext:value-type="float">
            <text:p>484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0560185185185185" calcext:value-type="float">
            <text:p>0,00056018518518518500</text:p>
          </table:table-cell>
          <table:table-cell table:formula="of:=[.D222]-[.D22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22" office:value-type="float" office:value="4862" calcext:value-type="float">
            <text:p>4862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0562731481481481" calcext:value-type="float">
            <text:p>0,00056273148148148100</text:p>
          </table:table-cell>
          <table:table-cell table:formula="of:=[.D223]-[.D222]" office:value-type="float" office:value="0.00000254629629629639" calcext:value-type="float">
            <text:p>0,0000025462962962963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22" office:value-type="float" office:value="4884" calcext:value-type="float">
            <text:p>4884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0565277777777778" calcext:value-type="float">
            <text:p>0,00056527777777777800</text:p>
          </table:table-cell>
          <table:table-cell table:formula="of:=[.D224]-[.D22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22" office:value-type="float" office:value="4906" calcext:value-type="float">
            <text:p>4906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0567824074074074" calcext:value-type="float">
            <text:p>0,00056782407407407400</text:p>
          </table:table-cell>
          <table:table-cell table:formula="of:=[.D225]-[.D22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22" office:value-type="float" office:value="4928" calcext:value-type="float">
            <text:p>4928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057037037037037" calcext:value-type="float">
            <text:p>0,00057037037037037000</text:p>
          </table:table-cell>
          <table:table-cell table:formula="of:=[.D226]-[.D22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22" office:value-type="float" office:value="4950" calcext:value-type="float">
            <text:p>495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0572916666666667" calcext:value-type="float">
            <text:p>0,00057291666666666700</text:p>
          </table:table-cell>
          <table:table-cell table:formula="of:=[.D227]-[.D22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22" office:value-type="float" office:value="4972" calcext:value-type="float">
            <text:p>4972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0575462962962963" calcext:value-type="float">
            <text:p>0,00057546296296296300</text:p>
          </table:table-cell>
          <table:table-cell table:formula="of:=[.D228]-[.D22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22" office:value-type="float" office:value="4994" calcext:value-type="float">
            <text:p>4994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0578009259259259" calcext:value-type="float">
            <text:p>0,00057800925925925900</text:p>
          </table:table-cell>
          <table:table-cell table:formula="of:=[.D229]-[.D22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22" office:value-type="float" office:value="5016" calcext:value-type="float">
            <text:p>5016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0580555555555556" calcext:value-type="float">
            <text:p>0,00058055555555555600</text:p>
          </table:table-cell>
          <table:table-cell table:formula="of:=[.D230]-[.D229]" office:value-type="float" office:value="0.00000254629629629639" calcext:value-type="float">
            <text:p>0,0000025462962962963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22" office:value-type="float" office:value="5038" calcext:value-type="float">
            <text:p>5038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0583101851851852" calcext:value-type="float">
            <text:p>0,00058310185185185200</text:p>
          </table:table-cell>
          <table:table-cell table:formula="of:=[.D231]-[.D23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22" office:value-type="float" office:value="5060" calcext:value-type="float">
            <text:p>506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0585648148148148" calcext:value-type="float">
            <text:p>0,00058564814814814800</text:p>
          </table:table-cell>
          <table:table-cell table:formula="of:=[.D232]-[.D23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22" office:value-type="float" office:value="5082" calcext:value-type="float">
            <text:p>5082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0588194444444445" calcext:value-type="float">
            <text:p>0,00058819444444444500</text:p>
          </table:table-cell>
          <table:table-cell table:formula="of:=[.D233]-[.D23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22" office:value-type="float" office:value="5104" calcext:value-type="float">
            <text:p>5104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0590740740740741" calcext:value-type="float">
            <text:p>0,00059074074074074100</text:p>
          </table:table-cell>
          <table:table-cell table:formula="of:=[.D234]-[.D23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22" office:value-type="float" office:value="5126" calcext:value-type="float">
            <text:p>5126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0593287037037037" calcext:value-type="float">
            <text:p>0,00059328703703703700</text:p>
          </table:table-cell>
          <table:table-cell table:formula="of:=[.D235]-[.D23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22" office:value-type="float" office:value="5148" calcext:value-type="float">
            <text:p>5148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0595833333333333" calcext:value-type="float">
            <text:p>0,00059583333333333300</text:p>
          </table:table-cell>
          <table:table-cell table:formula="of:=[.D236]-[.D23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22" office:value-type="float" office:value="5170" calcext:value-type="float">
            <text:p>517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059837962962963" calcext:value-type="float">
            <text:p>0,00059837962962963000</text:p>
          </table:table-cell>
          <table:table-cell table:formula="of:=[.D237]-[.D236]" office:value-type="float" office:value="0.00000254629629629639" calcext:value-type="float">
            <text:p>0,0000025462962962963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22" office:value-type="float" office:value="5192" calcext:value-type="float">
            <text:p>5192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0600925925925926" calcext:value-type="float">
            <text:p>0,00060092592592592600</text:p>
          </table:table-cell>
          <table:table-cell table:formula="of:=[.D238]-[.D23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22" office:value-type="float" office:value="5214" calcext:value-type="float">
            <text:p>5214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0603472222222222" calcext:value-type="float">
            <text:p>0,00060347222222222200</text:p>
          </table:table-cell>
          <table:table-cell table:formula="of:=[.D239]-[.D23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22" office:value-type="float" office:value="5236" calcext:value-type="float">
            <text:p>5236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0606018518518519" calcext:value-type="float">
            <text:p>0,00060601851851851900</text:p>
          </table:table-cell>
          <table:table-cell table:formula="of:=[.D240]-[.D23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22" office:value-type="float" office:value="5258" calcext:value-type="float">
            <text:p>5258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0608564814814815" calcext:value-type="float">
            <text:p>0,00060856481481481500</text:p>
          </table:table-cell>
          <table:table-cell table:formula="of:=[.D241]-[.D24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22" office:value-type="float" office:value="5280" calcext:value-type="float">
            <text:p>528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0611111111111111" calcext:value-type="float">
            <text:p>0,00061111111111111100</text:p>
          </table:table-cell>
          <table:table-cell table:formula="of:=[.D242]-[.D24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22" office:value-type="float" office:value="5302" calcext:value-type="float">
            <text:p>5302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0613657407407407" calcext:value-type="float">
            <text:p>0,00061365740740740700</text:p>
          </table:table-cell>
          <table:table-cell table:formula="of:=[.D243]-[.D24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22" office:value-type="float" office:value="5324" calcext:value-type="float">
            <text:p>5324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0616203703703704" calcext:value-type="float">
            <text:p>0,00061620370370370400</text:p>
          </table:table-cell>
          <table:table-cell table:formula="of:=[.D244]-[.D243]" office:value-type="float" office:value="0.00000254629629629639" calcext:value-type="float">
            <text:p>0,0000025462962962963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22" office:value-type="float" office:value="5346" calcext:value-type="float">
            <text:p>5346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061875" calcext:value-type="float">
            <text:p>0,00061875000000000000</text:p>
          </table:table-cell>
          <table:table-cell table:formula="of:=[.D245]-[.D24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22" office:value-type="float" office:value="5368" calcext:value-type="float">
            <text:p>5368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0621296296296296" calcext:value-type="float">
            <text:p>0,00062129629629629600</text:p>
          </table:table-cell>
          <table:table-cell table:formula="of:=[.D246]-[.D24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22" office:value-type="float" office:value="5390" calcext:value-type="float">
            <text:p>539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0623842592592593" calcext:value-type="float">
            <text:p>0,00062384259259259300</text:p>
          </table:table-cell>
          <table:table-cell table:formula="of:=[.D247]-[.D24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22" office:value-type="float" office:value="5412" calcext:value-type="float">
            <text:p>5412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0626388888888889" calcext:value-type="float">
            <text:p>0,00062638888888888900</text:p>
          </table:table-cell>
          <table:table-cell table:formula="of:=[.D248]-[.D24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22" office:value-type="float" office:value="5434" calcext:value-type="float">
            <text:p>5434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0628935185185185" calcext:value-type="float">
            <text:p>0,00062893518518518500</text:p>
          </table:table-cell>
          <table:table-cell table:formula="of:=[.D249]-[.D24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22" office:value-type="float" office:value="5456" calcext:value-type="float">
            <text:p>5456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0631481481481482" calcext:value-type="float">
            <text:p>0,00063148148148148200</text:p>
          </table:table-cell>
          <table:table-cell table:formula="of:=[.D250]-[.D24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22" office:value-type="float" office:value="5478" calcext:value-type="float">
            <text:p>5478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0634027777777778" calcext:value-type="float">
            <text:p>0,00063402777777777800</text:p>
          </table:table-cell>
          <table:table-cell table:formula="of:=[.D251]-[.D250]" office:value-type="float" office:value="0.00000254629629629639" calcext:value-type="float">
            <text:p>0,0000025462962962963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22" office:value-type="float" office:value="5500" calcext:value-type="float">
            <text:p>55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0636574074074074" calcext:value-type="float">
            <text:p>0,00063657407407407400</text:p>
          </table:table-cell>
          <table:table-cell table:formula="of:=[.D252]-[.D25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22" office:value-type="float" office:value="5522" calcext:value-type="float">
            <text:p>5522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063912037037037" calcext:value-type="float">
            <text:p>0,00063912037037037000</text:p>
          </table:table-cell>
          <table:table-cell table:formula="of:=[.D253]-[.D25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22" office:value-type="float" office:value="5544" calcext:value-type="float">
            <text:p>5544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0641666666666667" calcext:value-type="float">
            <text:p>0,00064166666666666700</text:p>
          </table:table-cell>
          <table:table-cell table:formula="of:=[.D254]-[.D25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22" office:value-type="float" office:value="5566" calcext:value-type="float">
            <text:p>5566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0644212962962963" calcext:value-type="float">
            <text:p>0,00064421296296296300</text:p>
          </table:table-cell>
          <table:table-cell table:formula="of:=[.D255]-[.D25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22" office:value-type="float" office:value="5588" calcext:value-type="float">
            <text:p>5588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0646759259259259" calcext:value-type="float">
            <text:p>0,00064675925925925900</text:p>
          </table:table-cell>
          <table:table-cell table:formula="of:=[.D256]-[.D25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22" office:value-type="float" office:value="5610" calcext:value-type="float">
            <text:p>5610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0649305555555556" calcext:value-type="float">
            <text:p>0,00064930555555555600</text:p>
          </table:table-cell>
          <table:table-cell table:formula="of:=[.D257]-[.D25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22" office:value-type="float" office:value="5632" calcext:value-type="float">
            <text:p>5632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0651851851851852" calcext:value-type="float">
            <text:p>0,00065185185185185200</text:p>
          </table:table-cell>
          <table:table-cell table:formula="of:=[.D258]-[.D257]" office:value-type="float" office:value="0.00000254629629629639" calcext:value-type="float">
            <text:p>0,0000025462962962963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22" office:value-type="float" office:value="5654" calcext:value-type="float">
            <text:p>5654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0654398148148148" calcext:value-type="float">
            <text:p>0,00065439814814814800</text:p>
          </table:table-cell>
          <table:table-cell table:formula="of:=[.D259]-[.D25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22" office:value-type="float" office:value="5676" calcext:value-type="float">
            <text:p>5676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0656944444444445" calcext:value-type="float">
            <text:p>0,00065694444444444500</text:p>
          </table:table-cell>
          <table:table-cell table:formula="of:=[.D260]-[.D25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22" office:value-type="float" office:value="5698" calcext:value-type="float">
            <text:p>5698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0659490740740741" calcext:value-type="float">
            <text:p>0,00065949074074074100</text:p>
          </table:table-cell>
          <table:table-cell table:formula="of:=[.D261]-[.D26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22" office:value-type="float" office:value="5720" calcext:value-type="float">
            <text:p>572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0662037037037037" calcext:value-type="float">
            <text:p>0,00066203703703703700</text:p>
          </table:table-cell>
          <table:table-cell table:formula="of:=[.D262]-[.D26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22" office:value-type="float" office:value="5742" calcext:value-type="float">
            <text:p>5742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0664583333333333" calcext:value-type="float">
            <text:p>0,00066458333333333300</text:p>
          </table:table-cell>
          <table:table-cell table:formula="of:=[.D263]-[.D26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22" office:value-type="float" office:value="5764" calcext:value-type="float">
            <text:p>5764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066712962962963" calcext:value-type="float">
            <text:p>0,00066712962962963000</text:p>
          </table:table-cell>
          <table:table-cell table:formula="of:=[.D264]-[.D26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22" office:value-type="float" office:value="5786" calcext:value-type="float">
            <text:p>5786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0669675925925926" calcext:value-type="float">
            <text:p>0,00066967592592592600</text:p>
          </table:table-cell>
          <table:table-cell table:formula="of:=[.D265]-[.D264]" office:value-type="float" office:value="0.00000254629629629639" calcext:value-type="float">
            <text:p>0,0000025462962962963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22" office:value-type="float" office:value="5808" calcext:value-type="float">
            <text:p>5808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0672222222222222" calcext:value-type="float">
            <text:p>0,00067222222222222200</text:p>
          </table:table-cell>
          <table:table-cell table:formula="of:=[.D266]-[.D26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22" office:value-type="float" office:value="5830" calcext:value-type="float">
            <text:p>5830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0674768518518519" calcext:value-type="float">
            <text:p>0,00067476851851851900</text:p>
          </table:table-cell>
          <table:table-cell table:formula="of:=[.D267]-[.D26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22" office:value-type="float" office:value="5852" calcext:value-type="float">
            <text:p>5852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0677314814814815" calcext:value-type="float">
            <text:p>0,00067731481481481500</text:p>
          </table:table-cell>
          <table:table-cell table:formula="of:=[.D268]-[.D26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22" office:value-type="float" office:value="5874" calcext:value-type="float">
            <text:p>5874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0679861111111111" calcext:value-type="float">
            <text:p>0,00067986111111111100</text:p>
          </table:table-cell>
          <table:table-cell table:formula="of:=[.D269]-[.D26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22" office:value-type="float" office:value="5896" calcext:value-type="float">
            <text:p>5896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0682407407407407" calcext:value-type="float">
            <text:p>0,00068240740740740700</text:p>
          </table:table-cell>
          <table:table-cell table:formula="of:=[.D270]-[.D26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22" office:value-type="float" office:value="5918" calcext:value-type="float">
            <text:p>5918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0684953703703704" calcext:value-type="float">
            <text:p>0,00068495370370370400</text:p>
          </table:table-cell>
          <table:table-cell table:formula="of:=[.D271]-[.D27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22" office:value-type="float" office:value="5940" calcext:value-type="float">
            <text:p>594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06875" calcext:value-type="float">
            <text:p>0,00068750000000000000</text:p>
          </table:table-cell>
          <table:table-cell table:formula="of:=[.D272]-[.D271]" office:value-type="float" office:value="0.00000254629629629639" calcext:value-type="float">
            <text:p>0,0000025462962962963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22" office:value-type="float" office:value="5962" calcext:value-type="float">
            <text:p>5962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0690046296296296" calcext:value-type="float">
            <text:p>0,00069004629629629600</text:p>
          </table:table-cell>
          <table:table-cell table:formula="of:=[.D273]-[.D27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22" office:value-type="float" office:value="5984" calcext:value-type="float">
            <text:p>5984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0692592592592593" calcext:value-type="float">
            <text:p>0,00069259259259259300</text:p>
          </table:table-cell>
          <table:table-cell table:formula="of:=[.D274]-[.D27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22" office:value-type="float" office:value="6006" calcext:value-type="float">
            <text:p>6006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0695138888888889" calcext:value-type="float">
            <text:p>0,00069513888888888900</text:p>
          </table:table-cell>
          <table:table-cell table:formula="of:=[.D275]-[.D27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22" office:value-type="float" office:value="6028" calcext:value-type="float">
            <text:p>6028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0697685185185185" calcext:value-type="float">
            <text:p>0,00069768518518518500</text:p>
          </table:table-cell>
          <table:table-cell table:formula="of:=[.D276]-[.D27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22" office:value-type="float" office:value="6050" calcext:value-type="float">
            <text:p>6050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0700231481481482" calcext:value-type="float">
            <text:p>0,00070023148148148200</text:p>
          </table:table-cell>
          <table:table-cell table:formula="of:=[.D277]-[.D27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22" office:value-type="float" office:value="6072" calcext:value-type="float">
            <text:p>6072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0702777777777778" calcext:value-type="float">
            <text:p>0,00070277777777777800</text:p>
          </table:table-cell>
          <table:table-cell table:formula="of:=[.D278]-[.D27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22" office:value-type="float" office:value="6094" calcext:value-type="float">
            <text:p>6094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0705324074074074" calcext:value-type="float">
            <text:p>0,00070532407407407400</text:p>
          </table:table-cell>
          <table:table-cell table:formula="of:=[.D279]-[.D278]" office:value-type="float" office:value="0.00000254629629629639" calcext:value-type="float">
            <text:p>0,0000025462962962963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22" office:value-type="float" office:value="6116" calcext:value-type="float">
            <text:p>6116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070787037037037" calcext:value-type="float">
            <text:p>0,00070787037037037000</text:p>
          </table:table-cell>
          <table:table-cell table:formula="of:=[.D280]-[.D27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22" office:value-type="float" office:value="6138" calcext:value-type="float">
            <text:p>6138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0710416666666667" calcext:value-type="float">
            <text:p>0,00071041666666666700</text:p>
          </table:table-cell>
          <table:table-cell table:formula="of:=[.D281]-[.D28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22" office:value-type="float" office:value="6160" calcext:value-type="float">
            <text:p>616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0712962962962963" calcext:value-type="float">
            <text:p>0,00071296296296296300</text:p>
          </table:table-cell>
          <table:table-cell table:formula="of:=[.D282]-[.D28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22" office:value-type="float" office:value="6182" calcext:value-type="float">
            <text:p>6182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0715509259259259" calcext:value-type="float">
            <text:p>0,00071550925925925900</text:p>
          </table:table-cell>
          <table:table-cell table:formula="of:=[.D283]-[.D28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22" office:value-type="float" office:value="6204" calcext:value-type="float">
            <text:p>6204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0718055555555556" calcext:value-type="float">
            <text:p>0,00071805555555555600</text:p>
          </table:table-cell>
          <table:table-cell table:formula="of:=[.D284]-[.D28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22" office:value-type="float" office:value="6226" calcext:value-type="float">
            <text:p>6226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0720601851851852" calcext:value-type="float">
            <text:p>0,00072060185185185200</text:p>
          </table:table-cell>
          <table:table-cell table:formula="of:=[.D285]-[.D28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22" office:value-type="float" office:value="6248" calcext:value-type="float">
            <text:p>6248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0723148148148148" calcext:value-type="float">
            <text:p>0,00072314814814814800</text:p>
          </table:table-cell>
          <table:table-cell table:formula="of:=[.D286]-[.D28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22" office:value-type="float" office:value="6270" calcext:value-type="float">
            <text:p>6270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0725694444444444" calcext:value-type="float">
            <text:p>0,00072569444444444400</text:p>
          </table:table-cell>
          <table:table-cell table:formula="of:=[.D287]-[.D286]" office:value-type="float" office:value="0.00000254629629629639" calcext:value-type="float">
            <text:p>0,0000025462962962963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22" office:value-type="float" office:value="6292" calcext:value-type="float">
            <text:p>6292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0728240740740741" calcext:value-type="float">
            <text:p>0,00072824074074074100</text:p>
          </table:table-cell>
          <table:table-cell table:formula="of:=[.D288]-[.D28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22" office:value-type="float" office:value="6314" calcext:value-type="float">
            <text:p>6314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0730787037037037" calcext:value-type="float">
            <text:p>0,00073078703703703700</text:p>
          </table:table-cell>
          <table:table-cell table:formula="of:=[.D289]-[.D28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22" office:value-type="float" office:value="6336" calcext:value-type="float">
            <text:p>6336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0733333333333333" calcext:value-type="float">
            <text:p>0,00073333333333333300</text:p>
          </table:table-cell>
          <table:table-cell table:formula="of:=[.D290]-[.D28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22" office:value-type="float" office:value="6358" calcext:value-type="float">
            <text:p>6358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073587962962963" calcext:value-type="float">
            <text:p>0,00073587962962963000</text:p>
          </table:table-cell>
          <table:table-cell table:formula="of:=[.D291]-[.D29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22" office:value-type="float" office:value="6380" calcext:value-type="float">
            <text:p>638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0738425925925926" calcext:value-type="float">
            <text:p>0,00073842592592592600</text:p>
          </table:table-cell>
          <table:table-cell table:formula="of:=[.D292]-[.D29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22" office:value-type="float" office:value="6402" calcext:value-type="float">
            <text:p>6402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0740972222222222" calcext:value-type="float">
            <text:p>0,00074097222222222200</text:p>
          </table:table-cell>
          <table:table-cell table:formula="of:=[.D293]-[.D29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22" office:value-type="float" office:value="6424" calcext:value-type="float">
            <text:p>6424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0743518518518519" calcext:value-type="float">
            <text:p>0,00074351851851851800</text:p>
          </table:table-cell>
          <table:table-cell table:formula="of:=[.D294]-[.D293]" office:value-type="float" office:value="0.00000254629629629639" calcext:value-type="float">
            <text:p>0,0000025462962962963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22" office:value-type="float" office:value="6446" calcext:value-type="float">
            <text:p>6446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0746064814814815" calcext:value-type="float">
            <text:p>0,00074606481481481500</text:p>
          </table:table-cell>
          <table:table-cell table:formula="of:=[.D295]-[.D29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22" office:value-type="float" office:value="6468" calcext:value-type="float">
            <text:p>6468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0748611111111111" calcext:value-type="float">
            <text:p>0,00074861111111111100</text:p>
          </table:table-cell>
          <table:table-cell table:formula="of:=[.D296]-[.D29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22" office:value-type="float" office:value="6490" calcext:value-type="float">
            <text:p>6490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0751157407407407" calcext:value-type="float">
            <text:p>0,00075115740740740700</text:p>
          </table:table-cell>
          <table:table-cell table:formula="of:=[.D297]-[.D29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22" office:value-type="float" office:value="6512" calcext:value-type="float">
            <text:p>6512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0753703703703704" calcext:value-type="float">
            <text:p>0,00075370370370370400</text:p>
          </table:table-cell>
          <table:table-cell table:formula="of:=[.D298]-[.D29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22" office:value-type="float" office:value="6534" calcext:value-type="float">
            <text:p>6534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075625" calcext:value-type="float">
            <text:p>0,00075625000000000000</text:p>
          </table:table-cell>
          <table:table-cell table:formula="of:=[.D299]-[.D29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22" office:value-type="float" office:value="6556" calcext:value-type="float">
            <text:p>6556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0758796296296296" calcext:value-type="float">
            <text:p>0,00075879629629629600</text:p>
          </table:table-cell>
          <table:table-cell table:formula="of:=[.D300]-[.D29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22" office:value-type="float" office:value="6578" calcext:value-type="float">
            <text:p>6578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0761342592592593" calcext:value-type="float">
            <text:p>0,00076134259259259200</text:p>
          </table:table-cell>
          <table:table-cell table:formula="of:=[.D301]-[.D300]" office:value-type="float" office:value="0.00000254629629629639" calcext:value-type="float">
            <text:p>0,0000025462962962963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22" office:value-type="float" office:value="6600" calcext:value-type="float">
            <text:p>66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0763888888888889" calcext:value-type="float">
            <text:p>0,00076388888888888900</text:p>
          </table:table-cell>
          <table:table-cell table:formula="of:=[.D302]-[.D30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22" office:value-type="float" office:value="6622" calcext:value-type="float">
            <text:p>6622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0766435185185185" calcext:value-type="float">
            <text:p>0,00076643518518518500</text:p>
          </table:table-cell>
          <table:table-cell table:formula="of:=[.D303]-[.D30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22" office:value-type="float" office:value="6644" calcext:value-type="float">
            <text:p>6644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0768981481481482" calcext:value-type="float">
            <text:p>0,00076898148148148200</text:p>
          </table:table-cell>
          <table:table-cell table:formula="of:=[.D304]-[.D30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22" office:value-type="float" office:value="6666" calcext:value-type="float">
            <text:p>6666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0771527777777778" calcext:value-type="float">
            <text:p>0,00077152777777777800</text:p>
          </table:table-cell>
          <table:table-cell table:formula="of:=[.D305]-[.D30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22" office:value-type="float" office:value="6688" calcext:value-type="float">
            <text:p>6688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0774074074074074" calcext:value-type="float">
            <text:p>0,00077407407407407400</text:p>
          </table:table-cell>
          <table:table-cell table:formula="of:=[.D306]-[.D30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22" office:value-type="float" office:value="6710" calcext:value-type="float">
            <text:p>6710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077662037037037" calcext:value-type="float">
            <text:p>0,00077662037037037000</text:p>
          </table:table-cell>
          <table:table-cell table:formula="of:=[.D307]-[.D30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22" office:value-type="float" office:value="6732" calcext:value-type="float">
            <text:p>6732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0779166666666667" calcext:value-type="float">
            <text:p>0,00077916666666666700</text:p>
          </table:table-cell>
          <table:table-cell table:formula="of:=[.D308]-[.D307]" office:value-type="float" office:value="0.00000254629629629639" calcext:value-type="float">
            <text:p>0,0000025462962962963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22" office:value-type="float" office:value="6754" calcext:value-type="float">
            <text:p>6754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0781712962962963" calcext:value-type="float">
            <text:p>0,00078171296296296300</text:p>
          </table:table-cell>
          <table:table-cell table:formula="of:=[.D309]-[.D30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22" office:value-type="float" office:value="6776" calcext:value-type="float">
            <text:p>6776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0784259259259259" calcext:value-type="float">
            <text:p>0,00078425925925925900</text:p>
          </table:table-cell>
          <table:table-cell table:formula="of:=[.D310]-[.D30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22" office:value-type="float" office:value="6798" calcext:value-type="float">
            <text:p>6798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0786805555555556" calcext:value-type="float">
            <text:p>0,00078680555555555600</text:p>
          </table:table-cell>
          <table:table-cell table:formula="of:=[.D311]-[.D31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22" office:value-type="float" office:value="6820" calcext:value-type="float">
            <text:p>682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0789351851851852" calcext:value-type="float">
            <text:p>0,00078935185185185200</text:p>
          </table:table-cell>
          <table:table-cell table:formula="of:=[.D312]-[.D31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22" office:value-type="float" office:value="6842" calcext:value-type="float">
            <text:p>6842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0791898148148148" calcext:value-type="float">
            <text:p>0,00079189814814814800</text:p>
          </table:table-cell>
          <table:table-cell table:formula="of:=[.D313]-[.D31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22" office:value-type="float" office:value="6864" calcext:value-type="float">
            <text:p>6864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0794444444444444" calcext:value-type="float">
            <text:p>0,00079444444444444500</text:p>
          </table:table-cell>
          <table:table-cell table:formula="of:=[.D314]-[.D31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22" office:value-type="float" office:value="6886" calcext:value-type="float">
            <text:p>6886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0796990740740741" calcext:value-type="float">
            <text:p>0,00079699074074074100</text:p>
          </table:table-cell>
          <table:table-cell table:formula="of:=[.D315]-[.D314]" office:value-type="float" office:value="0.00000254629629629639" calcext:value-type="float">
            <text:p>0,0000025462962962963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22" office:value-type="float" office:value="6908" calcext:value-type="float">
            <text:p>6908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0799537037037037" calcext:value-type="float">
            <text:p>0,00079953703703703700</text:p>
          </table:table-cell>
          <table:table-cell table:formula="of:=[.D316]-[.D31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22" office:value-type="float" office:value="6930" calcext:value-type="float">
            <text:p>6930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0802083333333333" calcext:value-type="float">
            <text:p>0,00080208333333333300</text:p>
          </table:table-cell>
          <table:table-cell table:formula="of:=[.D317]-[.D31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22" office:value-type="float" office:value="6952" calcext:value-type="float">
            <text:p>6952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080462962962963" calcext:value-type="float">
            <text:p>0,00080462962962963000</text:p>
          </table:table-cell>
          <table:table-cell table:formula="of:=[.D318]-[.D31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22" office:value-type="float" office:value="6974" calcext:value-type="float">
            <text:p>6974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0807175925925926" calcext:value-type="float">
            <text:p>0,00080717592592592600</text:p>
          </table:table-cell>
          <table:table-cell table:formula="of:=[.D319]-[.D31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22" office:value-type="float" office:value="6996" calcext:value-type="float">
            <text:p>6996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0809722222222222" calcext:value-type="float">
            <text:p>0,00080972222222222200</text:p>
          </table:table-cell>
          <table:table-cell table:formula="of:=[.D320]-[.D31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22" office:value-type="float" office:value="7018" calcext:value-type="float">
            <text:p>7018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0812268518518519" calcext:value-type="float">
            <text:p>0,00081226851851851900</text:p>
          </table:table-cell>
          <table:table-cell table:formula="of:=[.D321]-[.D32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22" office:value-type="float" office:value="7040" calcext:value-type="float">
            <text:p>704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0814814814814815" calcext:value-type="float">
            <text:p>0,00081481481481481500</text:p>
          </table:table-cell>
          <table:table-cell table:formula="of:=[.D322]-[.D321]" office:value-type="float" office:value="0.00000254629629629639" calcext:value-type="float">
            <text:p>0,0000025462962962963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22" office:value-type="float" office:value="7062" calcext:value-type="float">
            <text:p>7062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0817361111111111" calcext:value-type="float">
            <text:p>0,00081736111111111100</text:p>
          </table:table-cell>
          <table:table-cell table:formula="of:=[.D323]-[.D32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22" office:value-type="float" office:value="7084" calcext:value-type="float">
            <text:p>7084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0819907407407407" calcext:value-type="float">
            <text:p>0,00081990740740740700</text:p>
          </table:table-cell>
          <table:table-cell table:formula="of:=[.D324]-[.D32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22" office:value-type="float" office:value="7106" calcext:value-type="float">
            <text:p>7106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0822453703703704" calcext:value-type="float">
            <text:p>0,00082245370370370400</text:p>
          </table:table-cell>
          <table:table-cell table:formula="of:=[.D325]-[.D32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22" office:value-type="float" office:value="7128" calcext:value-type="float">
            <text:p>7128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0825" calcext:value-type="float">
            <text:p>0,00082500000000000000</text:p>
          </table:table-cell>
          <table:table-cell table:formula="of:=[.D326]-[.D32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22" office:value-type="float" office:value="7150" calcext:value-type="float">
            <text:p>7150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0827546296296296" calcext:value-type="float">
            <text:p>0,00082754629629629600</text:p>
          </table:table-cell>
          <table:table-cell table:formula="of:=[.D327]-[.D32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22" office:value-type="float" office:value="7172" calcext:value-type="float">
            <text:p>7172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0830092592592593" calcext:value-type="float">
            <text:p>0,00083009259259259200</text:p>
          </table:table-cell>
          <table:table-cell table:formula="of:=[.D328]-[.D32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22" office:value-type="float" office:value="7194" calcext:value-type="float">
            <text:p>7194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0832638888888889" calcext:value-type="float">
            <text:p>0,00083263888888888900</text:p>
          </table:table-cell>
          <table:table-cell table:formula="of:=[.D329]-[.D328]" office:value-type="float" office:value="0.00000254629629629639" calcext:value-type="float">
            <text:p>0,0000025462962962963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22" office:value-type="float" office:value="7216" calcext:value-type="float">
            <text:p>7216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0835185185185185" calcext:value-type="float">
            <text:p>0,00083518518518518500</text:p>
          </table:table-cell>
          <table:table-cell table:formula="of:=[.D330]-[.D32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22" office:value-type="float" office:value="7238" calcext:value-type="float">
            <text:p>7238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0837731481481482" calcext:value-type="float">
            <text:p>0,00083773148148148100</text:p>
          </table:table-cell>
          <table:table-cell table:formula="of:=[.D331]-[.D33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22" office:value-type="float" office:value="7260" calcext:value-type="float">
            <text:p>726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0840277777777778" calcext:value-type="float">
            <text:p>0,00084027777777777800</text:p>
          </table:table-cell>
          <table:table-cell table:formula="of:=[.D332]-[.D33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22" office:value-type="float" office:value="7282" calcext:value-type="float">
            <text:p>7282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0842824074074074" calcext:value-type="float">
            <text:p>0,00084282407407407400</text:p>
          </table:table-cell>
          <table:table-cell table:formula="of:=[.D333]-[.D33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22" office:value-type="float" office:value="7304" calcext:value-type="float">
            <text:p>7304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084537037037037" calcext:value-type="float">
            <text:p>0,00084537037037037000</text:p>
          </table:table-cell>
          <table:table-cell table:formula="of:=[.D334]-[.D33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22" office:value-type="float" office:value="7326" calcext:value-type="float">
            <text:p>7326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0847916666666667" calcext:value-type="float">
            <text:p>0,00084791666666666700</text:p>
          </table:table-cell>
          <table:table-cell table:formula="of:=[.D335]-[.D33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22" office:value-type="float" office:value="7348" calcext:value-type="float">
            <text:p>7348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0850462962962963" calcext:value-type="float">
            <text:p>0,00085046296296296300</text:p>
          </table:table-cell>
          <table:table-cell table:formula="of:=[.D336]-[.D335]" office:value-type="float" office:value="0.00000254629629629639" calcext:value-type="float">
            <text:p>0,0000025462962962963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22" office:value-type="float" office:value="7370" calcext:value-type="float">
            <text:p>7370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0853009259259259" calcext:value-type="float">
            <text:p>0,00085300925925925900</text:p>
          </table:table-cell>
          <table:table-cell table:formula="of:=[.D337]-[.D33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22" office:value-type="float" office:value="7392" calcext:value-type="float">
            <text:p>7392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0855555555555556" calcext:value-type="float">
            <text:p>0,00085555555555555600</text:p>
          </table:table-cell>
          <table:table-cell table:formula="of:=[.D338]-[.D33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22" office:value-type="float" office:value="7414" calcext:value-type="float">
            <text:p>7414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0858101851851852" calcext:value-type="float">
            <text:p>0,00085810185185185200</text:p>
          </table:table-cell>
          <table:table-cell table:formula="of:=[.D339]-[.D33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22" office:value-type="float" office:value="7436" calcext:value-type="float">
            <text:p>7436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0860648148148148" calcext:value-type="float">
            <text:p>0,00086064814814814800</text:p>
          </table:table-cell>
          <table:table-cell table:formula="of:=[.D340]-[.D33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22" office:value-type="float" office:value="7458" calcext:value-type="float">
            <text:p>7458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0863194444444444" calcext:value-type="float">
            <text:p>0,00086319444444444500</text:p>
          </table:table-cell>
          <table:table-cell table:formula="of:=[.D341]-[.D34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22" office:value-type="float" office:value="7480" calcext:value-type="float">
            <text:p>748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0865740740740741" calcext:value-type="float">
            <text:p>0,00086574074074074100</text:p>
          </table:table-cell>
          <table:table-cell table:formula="of:=[.D342]-[.D34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22" office:value-type="float" office:value="7502" calcext:value-type="float">
            <text:p>7502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0868287037037037" calcext:value-type="float">
            <text:p>0,00086828703703703700</text:p>
          </table:table-cell>
          <table:table-cell table:formula="of:=[.D343]-[.D342]" office:value-type="float" office:value="0.00000254629629629639" calcext:value-type="float">
            <text:p>0,0000025462962962963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22" office:value-type="float" office:value="7524" calcext:value-type="float">
            <text:p>7524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0870833333333333" calcext:value-type="float">
            <text:p>0,00087083333333333400</text:p>
          </table:table-cell>
          <table:table-cell table:formula="of:=[.D344]-[.D34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22" office:value-type="float" office:value="7546" calcext:value-type="float">
            <text:p>7546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087337962962963" calcext:value-type="float">
            <text:p>0,00087337962962963000</text:p>
          </table:table-cell>
          <table:table-cell table:formula="of:=[.D345]-[.D34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22" office:value-type="float" office:value="7568" calcext:value-type="float">
            <text:p>7568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0875925925925926" calcext:value-type="float">
            <text:p>0,00087592592592592600</text:p>
          </table:table-cell>
          <table:table-cell table:formula="of:=[.D346]-[.D34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22" office:value-type="float" office:value="7590" calcext:value-type="float">
            <text:p>7590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0878472222222222" calcext:value-type="float">
            <text:p>0,00087847222222222200</text:p>
          </table:table-cell>
          <table:table-cell table:formula="of:=[.D347]-[.D34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22" office:value-type="float" office:value="7612" calcext:value-type="float">
            <text:p>7612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0881018518518519" calcext:value-type="float">
            <text:p>0,00088101851851851900</text:p>
          </table:table-cell>
          <table:table-cell table:formula="of:=[.D348]-[.D34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22" office:value-type="float" office:value="7634" calcext:value-type="float">
            <text:p>7634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0883564814814815" calcext:value-type="float">
            <text:p>0,00088356481481481500</text:p>
          </table:table-cell>
          <table:table-cell table:formula="of:=[.D349]-[.D34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22" office:value-type="float" office:value="7656" calcext:value-type="float">
            <text:p>7656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0886111111111111" calcext:value-type="float">
            <text:p>0,00088611111111111100</text:p>
          </table:table-cell>
          <table:table-cell table:formula="of:=[.D350]-[.D349]" office:value-type="float" office:value="0.00000254629629629639" calcext:value-type="float">
            <text:p>0,0000025462962962963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22" office:value-type="float" office:value="7678" calcext:value-type="float">
            <text:p>7678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0888657407407408" calcext:value-type="float">
            <text:p>0,00088865740740740800</text:p>
          </table:table-cell>
          <table:table-cell table:formula="of:=[.D351]-[.D35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22" office:value-type="float" office:value="7700" calcext:value-type="float">
            <text:p>770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0891203703703704" calcext:value-type="float">
            <text:p>0,00089120370370370400</text:p>
          </table:table-cell>
          <table:table-cell table:formula="of:=[.D352]-[.D35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22" office:value-type="float" office:value="7722" calcext:value-type="float">
            <text:p>7722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089375" calcext:value-type="float">
            <text:p>0,00089375000000000000</text:p>
          </table:table-cell>
          <table:table-cell table:formula="of:=[.D353]-[.D35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22" office:value-type="float" office:value="7744" calcext:value-type="float">
            <text:p>7744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0896296296296296" calcext:value-type="float">
            <text:p>0,00089629629629629600</text:p>
          </table:table-cell>
          <table:table-cell table:formula="of:=[.D354]-[.D35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22" office:value-type="float" office:value="7766" calcext:value-type="float">
            <text:p>7766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0898842592592593" calcext:value-type="float">
            <text:p>0,00089884259259259300</text:p>
          </table:table-cell>
          <table:table-cell table:formula="of:=[.D355]-[.D35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22" office:value-type="float" office:value="7788" calcext:value-type="float">
            <text:p>7788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0901388888888889" calcext:value-type="float">
            <text:p>0,00090138888888888900</text:p>
          </table:table-cell>
          <table:table-cell table:formula="of:=[.D356]-[.D35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22" office:value-type="float" office:value="7810" calcext:value-type="float">
            <text:p>7810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0903935185185185" calcext:value-type="float">
            <text:p>0,00090393518518518500</text:p>
          </table:table-cell>
          <table:table-cell table:formula="of:=[.D357]-[.D356]" office:value-type="float" office:value="0.00000254629629629639" calcext:value-type="float">
            <text:p>0,0000025462962962963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22" office:value-type="float" office:value="7832" calcext:value-type="float">
            <text:p>7832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0906481481481482" calcext:value-type="float">
            <text:p>0,00090648148148148200</text:p>
          </table:table-cell>
          <table:table-cell table:formula="of:=[.D358]-[.D35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22" office:value-type="float" office:value="7854" calcext:value-type="float">
            <text:p>7854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0909027777777778" calcext:value-type="float">
            <text:p>0,00090902777777777800</text:p>
          </table:table-cell>
          <table:table-cell table:formula="of:=[.D359]-[.D35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22" office:value-type="float" office:value="7876" calcext:value-type="float">
            <text:p>7876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0911574074074074" calcext:value-type="float">
            <text:p>0,00091157407407407400</text:p>
          </table:table-cell>
          <table:table-cell table:formula="of:=[.D360]-[.D35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22" office:value-type="float" office:value="7898" calcext:value-type="float">
            <text:p>7898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091412037037037" calcext:value-type="float">
            <text:p>0,00091412037037037000</text:p>
          </table:table-cell>
          <table:table-cell table:formula="of:=[.D361]-[.D36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22" office:value-type="float" office:value="7920" calcext:value-type="float">
            <text:p>792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0916666666666667" calcext:value-type="float">
            <text:p>0,00091666666666666700</text:p>
          </table:table-cell>
          <table:table-cell table:formula="of:=[.D362]-[.D36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22" office:value-type="float" office:value="7942" calcext:value-type="float">
            <text:p>7942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0919212962962963" calcext:value-type="float">
            <text:p>0,00091921296296296300</text:p>
          </table:table-cell>
          <table:table-cell table:formula="of:=[.D363]-[.D36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22" office:value-type="float" office:value="7964" calcext:value-type="float">
            <text:p>7964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0921759259259259" calcext:value-type="float">
            <text:p>0,00092175925925925900</text:p>
          </table:table-cell>
          <table:table-cell table:formula="of:=[.D364]-[.D363]" office:value-type="float" office:value="0.00000254629629629639" calcext:value-type="float">
            <text:p>0,0000025462962962963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22" office:value-type="float" office:value="7986" calcext:value-type="float">
            <text:p>7986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0924305555555556" calcext:value-type="float">
            <text:p>0,00092430555555555600</text:p>
          </table:table-cell>
          <table:table-cell table:formula="of:=[.D365]-[.D36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22" office:value-type="float" office:value="8008" calcext:value-type="float">
            <text:p>8008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0926851851851852" calcext:value-type="float">
            <text:p>0,00092685185185185200</text:p>
          </table:table-cell>
          <table:table-cell table:formula="of:=[.D366]-[.D36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22" office:value-type="float" office:value="8030" calcext:value-type="float">
            <text:p>8030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0929398148148148" calcext:value-type="float">
            <text:p>0,00092939814814814800</text:p>
          </table:table-cell>
          <table:table-cell table:formula="of:=[.D367]-[.D36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22" office:value-type="float" office:value="8052" calcext:value-type="float">
            <text:p>8052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0931944444444444" calcext:value-type="float">
            <text:p>0,00093194444444444400</text:p>
          </table:table-cell>
          <table:table-cell table:formula="of:=[.D368]-[.D36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22" office:value-type="float" office:value="8074" calcext:value-type="float">
            <text:p>8074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0934490740740741" calcext:value-type="float">
            <text:p>0,00093449074074074100</text:p>
          </table:table-cell>
          <table:table-cell table:formula="of:=[.D369]-[.D36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22" office:value-type="float" office:value="8096" calcext:value-type="float">
            <text:p>8096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0937037037037037" calcext:value-type="float">
            <text:p>0,00093703703703703700</text:p>
          </table:table-cell>
          <table:table-cell table:formula="of:=[.D370]-[.D36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22" office:value-type="float" office:value="8118" calcext:value-type="float">
            <text:p>8118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0939583333333333" calcext:value-type="float">
            <text:p>0,00093958333333333300</text:p>
          </table:table-cell>
          <table:table-cell table:formula="of:=[.D371]-[.D370]" office:value-type="float" office:value="0.00000254629629629639" calcext:value-type="float">
            <text:p>0,0000025462962962963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22" office:value-type="float" office:value="8140" calcext:value-type="float">
            <text:p>814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094212962962963" calcext:value-type="float">
            <text:p>0,00094212962962963000</text:p>
          </table:table-cell>
          <table:table-cell table:formula="of:=[.D372]-[.D37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22" office:value-type="float" office:value="8162" calcext:value-type="float">
            <text:p>8162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0944675925925926" calcext:value-type="float">
            <text:p>0,00094467592592592600</text:p>
          </table:table-cell>
          <table:table-cell table:formula="of:=[.D373]-[.D37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22" office:value-type="float" office:value="8184" calcext:value-type="float">
            <text:p>8184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0947222222222222" calcext:value-type="float">
            <text:p>0,00094722222222222200</text:p>
          </table:table-cell>
          <table:table-cell table:formula="of:=[.D374]-[.D37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22" office:value-type="float" office:value="8206" calcext:value-type="float">
            <text:p>8206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0949768518518519" calcext:value-type="float">
            <text:p>0,00094976851851851900</text:p>
          </table:table-cell>
          <table:table-cell table:formula="of:=[.D375]-[.D37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22" office:value-type="float" office:value="8228" calcext:value-type="float">
            <text:p>8228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0952314814814815" calcext:value-type="float">
            <text:p>0,00095231481481481500</text:p>
          </table:table-cell>
          <table:table-cell table:formula="of:=[.D376]-[.D37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22" office:value-type="float" office:value="8250" calcext:value-type="float">
            <text:p>8250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0954861111111111" calcext:value-type="float">
            <text:p>0,00095486111111111100</text:p>
          </table:table-cell>
          <table:table-cell table:formula="of:=[.D377]-[.D37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22" office:value-type="float" office:value="8272" calcext:value-type="float">
            <text:p>8272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0957407407407407" calcext:value-type="float">
            <text:p>0,00095740740740740700</text:p>
          </table:table-cell>
          <table:table-cell table:formula="of:=[.D378]-[.D377]" office:value-type="float" office:value="0.00000254629629629639" calcext:value-type="float">
            <text:p>0,0000025462962962963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22" office:value-type="float" office:value="8294" calcext:value-type="float">
            <text:p>8294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0959953703703704" calcext:value-type="float">
            <text:p>0,00095995370370370400</text:p>
          </table:table-cell>
          <table:table-cell table:formula="of:=[.D379]-[.D37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22" office:value-type="float" office:value="8316" calcext:value-type="float">
            <text:p>8316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09625" calcext:value-type="float">
            <text:p>0,00096250000000000000</text:p>
          </table:table-cell>
          <table:table-cell table:formula="of:=[.D380]-[.D37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22" office:value-type="float" office:value="8338" calcext:value-type="float">
            <text:p>8338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0965046296296296" calcext:value-type="float">
            <text:p>0,00096504629629629600</text:p>
          </table:table-cell>
          <table:table-cell table:formula="of:=[.D381]-[.D38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22" office:value-type="float" office:value="8360" calcext:value-type="float">
            <text:p>836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0967592592592593" calcext:value-type="float">
            <text:p>0,00096759259259259300</text:p>
          </table:table-cell>
          <table:table-cell table:formula="of:=[.D382]-[.D38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22" office:value-type="float" office:value="8382" calcext:value-type="float">
            <text:p>8382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0970138888888889" calcext:value-type="float">
            <text:p>0,00097013888888888900</text:p>
          </table:table-cell>
          <table:table-cell table:formula="of:=[.D383]-[.D38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22" office:value-type="float" office:value="8404" calcext:value-type="float">
            <text:p>8404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0972685185185185" calcext:value-type="float">
            <text:p>0,00097268518518518500</text:p>
          </table:table-cell>
          <table:table-cell table:formula="of:=[.D384]-[.D38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22" office:value-type="float" office:value="8426" calcext:value-type="float">
            <text:p>8426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0975231481481481" calcext:value-type="float">
            <text:p>0,00097523148148148100</text:p>
          </table:table-cell>
          <table:table-cell table:formula="of:=[.D385]-[.D38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22" office:value-type="float" office:value="8448" calcext:value-type="float">
            <text:p>8448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0977777777777778" calcext:value-type="float">
            <text:p>0,00097777777777777800</text:p>
          </table:table-cell>
          <table:table-cell table:formula="of:=[.D386]-[.D38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22" office:value-type="float" office:value="8470" calcext:value-type="float">
            <text:p>8470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0980324074074074" calcext:value-type="float">
            <text:p>0,00098032407407407400</text:p>
          </table:table-cell>
          <table:table-cell table:formula="of:=[.D387]-[.D38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22" office:value-type="float" office:value="8492" calcext:value-type="float">
            <text:p>8492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098287037037037" calcext:value-type="float">
            <text:p>0,00098287037037037000</text:p>
          </table:table-cell>
          <table:table-cell table:formula="of:=[.D388]-[.D38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22" office:value-type="float" office:value="8514" calcext:value-type="float">
            <text:p>8514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0985416666666667" calcext:value-type="float">
            <text:p>0,00098541666666666700</text:p>
          </table:table-cell>
          <table:table-cell table:formula="of:=[.D389]-[.D388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22" office:value-type="float" office:value="8536" calcext:value-type="float">
            <text:p>8536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0987962962962963" calcext:value-type="float">
            <text:p>0,00098796296296296300</text:p>
          </table:table-cell>
          <table:table-cell table:formula="of:=[.D390]-[.D38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22" office:value-type="float" office:value="8558" calcext:value-type="float">
            <text:p>8558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0990509259259259" calcext:value-type="float">
            <text:p>0,00099050925925925900</text:p>
          </table:table-cell>
          <table:table-cell table:formula="of:=[.D391]-[.D39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22" office:value-type="float" office:value="8580" calcext:value-type="float">
            <text:p>858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0993055555555556" calcext:value-type="float">
            <text:p>0,00099305555555555600</text:p>
          </table:table-cell>
          <table:table-cell table:formula="of:=[.D392]-[.D39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22" office:value-type="float" office:value="8602" calcext:value-type="float">
            <text:p>8602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0995601851851852" calcext:value-type="float">
            <text:p>0,00099560185185185200</text:p>
          </table:table-cell>
          <table:table-cell table:formula="of:=[.D393]-[.D39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22" office:value-type="float" office:value="8624" calcext:value-type="float">
            <text:p>8624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0998148148148148" calcext:value-type="float">
            <text:p>0,00099814814814814800</text:p>
          </table:table-cell>
          <table:table-cell table:formula="of:=[.D394]-[.D39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22" office:value-type="float" office:value="8646" calcext:value-type="float">
            <text:p>8646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100069444444444" calcext:value-type="float">
            <text:p>0,00100069444444444000</text:p>
          </table:table-cell>
          <table:table-cell table:formula="of:=[.D395]-[.D39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22" office:value-type="float" office:value="8668" calcext:value-type="float">
            <text:p>8668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100324074074074" calcext:value-type="float">
            <text:p>0,00100324074074074000</text:p>
          </table:table-cell>
          <table:table-cell table:formula="of:=[.D396]-[.D39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22" office:value-type="float" office:value="8690" calcext:value-type="float">
            <text:p>8690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100578703703704" calcext:value-type="float">
            <text:p>0,00100578703703704000</text:p>
          </table:table-cell>
          <table:table-cell table:formula="of:=[.D397]-[.D39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22" office:value-type="float" office:value="8712" calcext:value-type="float">
            <text:p>8712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100833333333333" calcext:value-type="float">
            <text:p>0,00100833333333333000</text:p>
          </table:table-cell>
          <table:table-cell table:formula="of:=[.D398]-[.D39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22" office:value-type="float" office:value="8734" calcext:value-type="float">
            <text:p>8734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101087962962963" calcext:value-type="float">
            <text:p>0,00101087962962963000</text:p>
          </table:table-cell>
          <table:table-cell table:formula="of:=[.D399]-[.D39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22" office:value-type="float" office:value="8756" calcext:value-type="float">
            <text:p>8756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101342592592593" calcext:value-type="float">
            <text:p>0,00101342592592593000</text:p>
          </table:table-cell>
          <table:table-cell table:formula="of:=[.D400]-[.D39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22" office:value-type="float" office:value="8778" calcext:value-type="float">
            <text:p>8778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101597222222222" calcext:value-type="float">
            <text:p>0,00101597222222222000</text:p>
          </table:table-cell>
          <table:table-cell table:formula="of:=[.D401]-[.D40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22" office:value-type="float" office:value="8800" calcext:value-type="float">
            <text:p>88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101851851851852" calcext:value-type="float">
            <text:p>0,00101851851851852000</text:p>
          </table:table-cell>
          <table:table-cell table:formula="of:=[.D402]-[.D40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22" office:value-type="float" office:value="8822" calcext:value-type="float">
            <text:p>8822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102106481481481" calcext:value-type="float">
            <text:p>0,00102106481481481000</text:p>
          </table:table-cell>
          <table:table-cell table:formula="of:=[.D403]-[.D402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22" office:value-type="float" office:value="8844" calcext:value-type="float">
            <text:p>8844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102361111111111" calcext:value-type="float">
            <text:p>0,00102361111111111000</text:p>
          </table:table-cell>
          <table:table-cell table:formula="of:=[.D404]-[.D40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22" office:value-type="float" office:value="8866" calcext:value-type="float">
            <text:p>8866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102615740740741" calcext:value-type="float">
            <text:p>0,00102615740740741000</text:p>
          </table:table-cell>
          <table:table-cell table:formula="of:=[.D405]-[.D40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22" office:value-type="float" office:value="8888" calcext:value-type="float">
            <text:p>8888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10287037037037" calcext:value-type="float">
            <text:p>0,00102870370370370000</text:p>
          </table:table-cell>
          <table:table-cell table:formula="of:=[.D406]-[.D40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22" office:value-type="float" office:value="8910" calcext:value-type="float">
            <text:p>8910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103125" calcext:value-type="float">
            <text:p>0,00103125000000000000</text:p>
          </table:table-cell>
          <table:table-cell table:formula="of:=[.D407]-[.D40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22" office:value-type="float" office:value="8932" calcext:value-type="float">
            <text:p>8932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10337962962963" calcext:value-type="float">
            <text:p>0,00103379629629630000</text:p>
          </table:table-cell>
          <table:table-cell table:formula="of:=[.D408]-[.D40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22" office:value-type="float" office:value="8954" calcext:value-type="float">
            <text:p>8954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103634259259259" calcext:value-type="float">
            <text:p>0,00103634259259259000</text:p>
          </table:table-cell>
          <table:table-cell table:formula="of:=[.D409]-[.D40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22" office:value-type="float" office:value="8976" calcext:value-type="float">
            <text:p>8976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103888888888889" calcext:value-type="float">
            <text:p>0,00103888888888889000</text:p>
          </table:table-cell>
          <table:table-cell table:formula="of:=[.D410]-[.D40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22" office:value-type="float" office:value="8998" calcext:value-type="float">
            <text:p>8998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104143518518519" calcext:value-type="float">
            <text:p>0,00104143518518519000</text:p>
          </table:table-cell>
          <table:table-cell table:formula="of:=[.D411]-[.D41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22" office:value-type="float" office:value="9020" calcext:value-type="float">
            <text:p>902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104398148148148" calcext:value-type="float">
            <text:p>0,00104398148148148000</text:p>
          </table:table-cell>
          <table:table-cell table:formula="of:=[.D412]-[.D41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22" office:value-type="float" office:value="9042" calcext:value-type="float">
            <text:p>9042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104652777777778" calcext:value-type="float">
            <text:p>0,00104652777777778000</text:p>
          </table:table-cell>
          <table:table-cell table:formula="of:=[.D413]-[.D41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22" office:value-type="float" office:value="9064" calcext:value-type="float">
            <text:p>9064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104907407407407" calcext:value-type="float">
            <text:p>0,00104907407407407000</text:p>
          </table:table-cell>
          <table:table-cell table:formula="of:=[.D414]-[.D41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22" office:value-type="float" office:value="9086" calcext:value-type="float">
            <text:p>9086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105162037037037" calcext:value-type="float">
            <text:p>0,00105162037037037000</text:p>
          </table:table-cell>
          <table:table-cell table:formula="of:=[.D415]-[.D41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22" office:value-type="float" office:value="9108" calcext:value-type="float">
            <text:p>9108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105416666666667" calcext:value-type="float">
            <text:p>0,00105416666666667000</text:p>
          </table:table-cell>
          <table:table-cell table:formula="of:=[.D416]-[.D41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22" office:value-type="float" office:value="9130" calcext:value-type="float">
            <text:p>9130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105671296296296" calcext:value-type="float">
            <text:p>0,00105671296296296000</text:p>
          </table:table-cell>
          <table:table-cell table:formula="of:=[.D417]-[.D416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22" office:value-type="float" office:value="9152" calcext:value-type="float">
            <text:p>9152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105925925925926" calcext:value-type="float">
            <text:p>0,00105925925925926000</text:p>
          </table:table-cell>
          <table:table-cell table:formula="of:=[.D418]-[.D41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22" office:value-type="float" office:value="9174" calcext:value-type="float">
            <text:p>9174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106180555555556" calcext:value-type="float">
            <text:p>0,00106180555555556000</text:p>
          </table:table-cell>
          <table:table-cell table:formula="of:=[.D419]-[.D41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22" office:value-type="float" office:value="9196" calcext:value-type="float">
            <text:p>9196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106435185185185" calcext:value-type="float">
            <text:p>0,00106435185185185000</text:p>
          </table:table-cell>
          <table:table-cell table:formula="of:=[.D420]-[.D41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22" office:value-type="float" office:value="9218" calcext:value-type="float">
            <text:p>9218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106689814814815" calcext:value-type="float">
            <text:p>0,00106689814814815000</text:p>
          </table:table-cell>
          <table:table-cell table:formula="of:=[.D421]-[.D42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22" office:value-type="float" office:value="9240" calcext:value-type="float">
            <text:p>924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106944444444444" calcext:value-type="float">
            <text:p>0,00106944444444444000</text:p>
          </table:table-cell>
          <table:table-cell table:formula="of:=[.D422]-[.D42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22" office:value-type="float" office:value="9262" calcext:value-type="float">
            <text:p>9262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107199074074074" calcext:value-type="float">
            <text:p>0,00107199074074074000</text:p>
          </table:table-cell>
          <table:table-cell table:formula="of:=[.D423]-[.D42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22" office:value-type="float" office:value="9284" calcext:value-type="float">
            <text:p>9284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107453703703704" calcext:value-type="float">
            <text:p>0,00107453703703704000</text:p>
          </table:table-cell>
          <table:table-cell table:formula="of:=[.D424]-[.D42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22" office:value-type="float" office:value="9306" calcext:value-type="float">
            <text:p>9306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107708333333333" calcext:value-type="float">
            <text:p>0,00107708333333333000</text:p>
          </table:table-cell>
          <table:table-cell table:formula="of:=[.D425]-[.D42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22" office:value-type="float" office:value="9328" calcext:value-type="float">
            <text:p>9328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107962962962963" calcext:value-type="float">
            <text:p>0,00107962962962963000</text:p>
          </table:table-cell>
          <table:table-cell table:formula="of:=[.D426]-[.D42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22" office:value-type="float" office:value="9350" calcext:value-type="float">
            <text:p>9350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108217592592593" calcext:value-type="float">
            <text:p>0,00108217592592593000</text:p>
          </table:table-cell>
          <table:table-cell table:formula="of:=[.D427]-[.D42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22" office:value-type="float" office:value="9372" calcext:value-type="float">
            <text:p>9372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108472222222222" calcext:value-type="float">
            <text:p>0,00108472222222222000</text:p>
          </table:table-cell>
          <table:table-cell table:formula="of:=[.D428]-[.D42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22" office:value-type="float" office:value="9394" calcext:value-type="float">
            <text:p>9394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108726851851852" calcext:value-type="float">
            <text:p>0,00108726851851852000</text:p>
          </table:table-cell>
          <table:table-cell table:formula="of:=[.D429]-[.D42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22" office:value-type="float" office:value="9416" calcext:value-type="float">
            <text:p>9416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108981481481481" calcext:value-type="float">
            <text:p>0,00108981481481481000</text:p>
          </table:table-cell>
          <table:table-cell table:formula="of:=[.D430]-[.D42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22" office:value-type="float" office:value="9438" calcext:value-type="float">
            <text:p>9438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109236111111111" calcext:value-type="float">
            <text:p>0,00109236111111111000</text:p>
          </table:table-cell>
          <table:table-cell table:formula="of:=[.D431]-[.D430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22" office:value-type="float" office:value="9460" calcext:value-type="float">
            <text:p>946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109490740740741" calcext:value-type="float">
            <text:p>0,00109490740740741000</text:p>
          </table:table-cell>
          <table:table-cell table:formula="of:=[.D432]-[.D43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22" office:value-type="float" office:value="9482" calcext:value-type="float">
            <text:p>9482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10974537037037" calcext:value-type="float">
            <text:p>0,00109745370370370000</text:p>
          </table:table-cell>
          <table:table-cell table:formula="of:=[.D433]-[.D43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22" office:value-type="float" office:value="9504" calcext:value-type="float">
            <text:p>9504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11" calcext:value-type="float">
            <text:p>0,00110000000000000000</text:p>
          </table:table-cell>
          <table:table-cell table:formula="of:=[.D434]-[.D43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22" office:value-type="float" office:value="9526" calcext:value-type="float">
            <text:p>9526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11025462962963" calcext:value-type="float">
            <text:p>0,00110254629629630000</text:p>
          </table:table-cell>
          <table:table-cell table:formula="of:=[.D435]-[.D43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22" office:value-type="float" office:value="9548" calcext:value-type="float">
            <text:p>9548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110509259259259" calcext:value-type="float">
            <text:p>0,00110509259259259000</text:p>
          </table:table-cell>
          <table:table-cell table:formula="of:=[.D436]-[.D43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22" office:value-type="float" office:value="9570" calcext:value-type="float">
            <text:p>9570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110763888888889" calcext:value-type="float">
            <text:p>0,00110763888888889000</text:p>
          </table:table-cell>
          <table:table-cell table:formula="of:=[.D437]-[.D43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22" office:value-type="float" office:value="9592" calcext:value-type="float">
            <text:p>9592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111018518518519" calcext:value-type="float">
            <text:p>0,00111018518518519000</text:p>
          </table:table-cell>
          <table:table-cell table:formula="of:=[.D438]-[.D43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22" office:value-type="float" office:value="9614" calcext:value-type="float">
            <text:p>9614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111273148148148" calcext:value-type="float">
            <text:p>0,00111273148148148000</text:p>
          </table:table-cell>
          <table:table-cell table:formula="of:=[.D439]-[.D43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22" office:value-type="float" office:value="9636" calcext:value-type="float">
            <text:p>9636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111527777777778" calcext:value-type="float">
            <text:p>0,00111527777777778000</text:p>
          </table:table-cell>
          <table:table-cell table:formula="of:=[.D440]-[.D43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22" office:value-type="float" office:value="9658" calcext:value-type="float">
            <text:p>9658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111782407407407" calcext:value-type="float">
            <text:p>0,00111782407407407000</text:p>
          </table:table-cell>
          <table:table-cell table:formula="of:=[.D441]-[.D44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22" office:value-type="float" office:value="9680" calcext:value-type="float">
            <text:p>968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112037037037037" calcext:value-type="float">
            <text:p>0,00112037037037037000</text:p>
          </table:table-cell>
          <table:table-cell table:formula="of:=[.D442]-[.D44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22" office:value-type="float" office:value="9702" calcext:value-type="float">
            <text:p>9702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112291666666667" calcext:value-type="float">
            <text:p>0,00112291666666667000</text:p>
          </table:table-cell>
          <table:table-cell table:formula="of:=[.D443]-[.D44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22" office:value-type="float" office:value="9724" calcext:value-type="float">
            <text:p>9724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112546296296296" calcext:value-type="float">
            <text:p>0,00112546296296296000</text:p>
          </table:table-cell>
          <table:table-cell table:formula="of:=[.D444]-[.D44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22" office:value-type="float" office:value="9746" calcext:value-type="float">
            <text:p>9746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112800925925926" calcext:value-type="float">
            <text:p>0,00112800925925926000</text:p>
          </table:table-cell>
          <table:table-cell table:formula="of:=[.D445]-[.D444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22" office:value-type="float" office:value="9768" calcext:value-type="float">
            <text:p>9768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113055555555556" calcext:value-type="float">
            <text:p>0,00113055555555556000</text:p>
          </table:table-cell>
          <table:table-cell table:formula="of:=[.D446]-[.D44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22" office:value-type="float" office:value="9790" calcext:value-type="float">
            <text:p>9790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113310185185185" calcext:value-type="float">
            <text:p>0,00113310185185185000</text:p>
          </table:table-cell>
          <table:table-cell table:formula="of:=[.D447]-[.D44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22" office:value-type="float" office:value="9812" calcext:value-type="float">
            <text:p>9812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113564814814815" calcext:value-type="float">
            <text:p>0,00113564814814815000</text:p>
          </table:table-cell>
          <table:table-cell table:formula="of:=[.D448]-[.D44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22" office:value-type="float" office:value="9834" calcext:value-type="float">
            <text:p>9834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113819444444444" calcext:value-type="float">
            <text:p>0,00113819444444444000</text:p>
          </table:table-cell>
          <table:table-cell table:formula="of:=[.D449]-[.D44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22" office:value-type="float" office:value="9856" calcext:value-type="float">
            <text:p>9856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114074074074074" calcext:value-type="float">
            <text:p>0,00114074074074074000</text:p>
          </table:table-cell>
          <table:table-cell table:formula="of:=[.D450]-[.D44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22" office:value-type="float" office:value="9878" calcext:value-type="float">
            <text:p>9878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114328703703704" calcext:value-type="float">
            <text:p>0,00114328703703704000</text:p>
          </table:table-cell>
          <table:table-cell table:formula="of:=[.D451]-[.D45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22" office:value-type="float" office:value="9900" calcext:value-type="float">
            <text:p>990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114583333333333" calcext:value-type="float">
            <text:p>0,00114583333333333000</text:p>
          </table:table-cell>
          <table:table-cell table:formula="of:=[.D452]-[.D45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22" office:value-type="float" office:value="9922" calcext:value-type="float">
            <text:p>9922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114837962962963" calcext:value-type="float">
            <text:p>0,00114837962962963000</text:p>
          </table:table-cell>
          <table:table-cell table:formula="of:=[.D453]-[.D45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22" office:value-type="float" office:value="9944" calcext:value-type="float">
            <text:p>9944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115092592592593" calcext:value-type="float">
            <text:p>0,00115092592592593000</text:p>
          </table:table-cell>
          <table:table-cell table:formula="of:=[.D454]-[.D45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22" office:value-type="float" office:value="9966" calcext:value-type="float">
            <text:p>9966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115347222222222" calcext:value-type="float">
            <text:p>0,00115347222222222000</text:p>
          </table:table-cell>
          <table:table-cell table:formula="of:=[.D455]-[.D45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22" office:value-type="float" office:value="9988" calcext:value-type="float">
            <text:p>9988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115601851851852" calcext:value-type="float">
            <text:p>0,00115601851851852000</text:p>
          </table:table-cell>
          <table:table-cell table:formula="of:=[.D456]-[.D45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22" office:value-type="float" office:value="10010" calcext:value-type="float">
            <text:p>10010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115856481481481" calcext:value-type="float">
            <text:p>0,00115856481481481000</text:p>
          </table:table-cell>
          <table:table-cell table:formula="of:=[.D457]-[.D45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22" office:value-type="float" office:value="10032" calcext:value-type="float">
            <text:p>10032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116111111111111" calcext:value-type="float">
            <text:p>0,00116111111111111000</text:p>
          </table:table-cell>
          <table:table-cell table:formula="of:=[.D458]-[.D45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22" office:value-type="float" office:value="10054" calcext:value-type="float">
            <text:p>10054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116365740740741" calcext:value-type="float">
            <text:p>0,00116365740740741000</text:p>
          </table:table-cell>
          <table:table-cell table:formula="of:=[.D459]-[.D458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22" office:value-type="float" office:value="10076" calcext:value-type="float">
            <text:p>10076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11662037037037" calcext:value-type="float">
            <text:p>0,00116620370370370000</text:p>
          </table:table-cell>
          <table:table-cell table:formula="of:=[.D460]-[.D45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22" office:value-type="float" office:value="10098" calcext:value-type="float">
            <text:p>10098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116875" calcext:value-type="float">
            <text:p>0,00116875000000000000</text:p>
          </table:table-cell>
          <table:table-cell table:formula="of:=[.D461]-[.D46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22" office:value-type="float" office:value="10120" calcext:value-type="float">
            <text:p>1012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11712962962963" calcext:value-type="float">
            <text:p>0,00117129629629630000</text:p>
          </table:table-cell>
          <table:table-cell table:formula="of:=[.D462]-[.D46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22" office:value-type="float" office:value="10142" calcext:value-type="float">
            <text:p>10142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117384259259259" calcext:value-type="float">
            <text:p>0,00117384259259259000</text:p>
          </table:table-cell>
          <table:table-cell table:formula="of:=[.D463]-[.D46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22" office:value-type="float" office:value="10164" calcext:value-type="float">
            <text:p>10164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117638888888889" calcext:value-type="float">
            <text:p>0,00117638888888889000</text:p>
          </table:table-cell>
          <table:table-cell table:formula="of:=[.D464]-[.D46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22" office:value-type="float" office:value="10186" calcext:value-type="float">
            <text:p>10186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117893518518519" calcext:value-type="float">
            <text:p>0,00117893518518519000</text:p>
          </table:table-cell>
          <table:table-cell table:formula="of:=[.D465]-[.D46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22" office:value-type="float" office:value="10208" calcext:value-type="float">
            <text:p>10208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118148148148148" calcext:value-type="float">
            <text:p>0,00118148148148148000</text:p>
          </table:table-cell>
          <table:table-cell table:formula="of:=[.D466]-[.D46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22" office:value-type="float" office:value="10230" calcext:value-type="float">
            <text:p>10230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118402777777778" calcext:value-type="float">
            <text:p>0,00118402777777778000</text:p>
          </table:table-cell>
          <table:table-cell table:formula="of:=[.D467]-[.D46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22" office:value-type="float" office:value="10252" calcext:value-type="float">
            <text:p>10252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118657407407407" calcext:value-type="float">
            <text:p>0,00118657407407407000</text:p>
          </table:table-cell>
          <table:table-cell table:formula="of:=[.D468]-[.D46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22" office:value-type="float" office:value="10274" calcext:value-type="float">
            <text:p>10274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118912037037037" calcext:value-type="float">
            <text:p>0,00118912037037037000</text:p>
          </table:table-cell>
          <table:table-cell table:formula="of:=[.D469]-[.D46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22" office:value-type="float" office:value="10296" calcext:value-type="float">
            <text:p>10296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119166666666667" calcext:value-type="float">
            <text:p>0,00119166666666667000</text:p>
          </table:table-cell>
          <table:table-cell table:formula="of:=[.D470]-[.D46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22" office:value-type="float" office:value="10318" calcext:value-type="float">
            <text:p>10318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119421296296296" calcext:value-type="float">
            <text:p>0,00119421296296296000</text:p>
          </table:table-cell>
          <table:table-cell table:formula="of:=[.D471]-[.D47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22" office:value-type="float" office:value="10340" calcext:value-type="float">
            <text:p>1034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119675925925926" calcext:value-type="float">
            <text:p>0,00119675925925926000</text:p>
          </table:table-cell>
          <table:table-cell table:formula="of:=[.D472]-[.D47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22" office:value-type="float" office:value="10362" calcext:value-type="float">
            <text:p>10362</text:p>
          </table:table-cell>
          <table:table-cell office:value-type="float" office:value="8640000" calcext:value-type="float">
            <text:p>8640000</text:p>
          </table:table-cell>
          <table:table-cell table:formula="of:=[.B472]/[.C472]" office:value-type="float" office:value="0.00119930555555556" calcext:value-type="float">
            <text:p>0,00119930555555556000</text:p>
          </table:table-cell>
          <table:table-cell table:formula="of:=[.D473]-[.D472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22" office:value-type="float" office:value="10384" calcext:value-type="float">
            <text:p>10384</text:p>
          </table:table-cell>
          <table:table-cell office:value-type="float" office:value="8640000" calcext:value-type="float">
            <text:p>8640000</text:p>
          </table:table-cell>
          <table:table-cell table:formula="of:=[.B473]/[.C473]" office:value-type="float" office:value="0.00120185185185185" calcext:value-type="float">
            <text:p>0,00120185185185185000</text:p>
          </table:table-cell>
          <table:table-cell table:formula="of:=[.D474]-[.D47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22" office:value-type="float" office:value="10406" calcext:value-type="float">
            <text:p>10406</text:p>
          </table:table-cell>
          <table:table-cell office:value-type="float" office:value="8640000" calcext:value-type="float">
            <text:p>8640000</text:p>
          </table:table-cell>
          <table:table-cell table:formula="of:=[.B474]/[.C474]" office:value-type="float" office:value="0.00120439814814815" calcext:value-type="float">
            <text:p>0,00120439814814815000</text:p>
          </table:table-cell>
          <table:table-cell table:formula="of:=[.D475]-[.D47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22" office:value-type="float" office:value="10428" calcext:value-type="float">
            <text:p>10428</text:p>
          </table:table-cell>
          <table:table-cell office:value-type="float" office:value="8640000" calcext:value-type="float">
            <text:p>8640000</text:p>
          </table:table-cell>
          <table:table-cell table:formula="of:=[.B475]/[.C475]" office:value-type="float" office:value="0.00120694444444444" calcext:value-type="float">
            <text:p>0,00120694444444444000</text:p>
          </table:table-cell>
          <table:table-cell table:formula="of:=[.D476]-[.D47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22" office:value-type="float" office:value="10450" calcext:value-type="float">
            <text:p>10450</text:p>
          </table:table-cell>
          <table:table-cell office:value-type="float" office:value="8640000" calcext:value-type="float">
            <text:p>8640000</text:p>
          </table:table-cell>
          <table:table-cell table:formula="of:=[.B476]/[.C476]" office:value-type="float" office:value="0.00120949074074074" calcext:value-type="float">
            <text:p>0,00120949074074074000</text:p>
          </table:table-cell>
          <table:table-cell table:formula="of:=[.D477]-[.D47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22" office:value-type="float" office:value="10472" calcext:value-type="float">
            <text:p>10472</text:p>
          </table:table-cell>
          <table:table-cell office:value-type="float" office:value="8640000" calcext:value-type="float">
            <text:p>8640000</text:p>
          </table:table-cell>
          <table:table-cell table:formula="of:=[.B477]/[.C477]" office:value-type="float" office:value="0.00121203703703704" calcext:value-type="float">
            <text:p>0,00121203703703704000</text:p>
          </table:table-cell>
          <table:table-cell table:formula="of:=[.D478]-[.D47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22" office:value-type="float" office:value="10494" calcext:value-type="float">
            <text:p>10494</text:p>
          </table:table-cell>
          <table:table-cell office:value-type="float" office:value="8640000" calcext:value-type="float">
            <text:p>8640000</text:p>
          </table:table-cell>
          <table:table-cell table:formula="of:=[.B478]/[.C478]" office:value-type="float" office:value="0.00121458333333333" calcext:value-type="float">
            <text:p>0,00121458333333333000</text:p>
          </table:table-cell>
          <table:table-cell table:formula="of:=[.D479]-[.D47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22" office:value-type="float" office:value="10516" calcext:value-type="float">
            <text:p>10516</text:p>
          </table:table-cell>
          <table:table-cell office:value-type="float" office:value="8640000" calcext:value-type="float">
            <text:p>8640000</text:p>
          </table:table-cell>
          <table:table-cell table:formula="of:=[.B479]/[.C479]" office:value-type="float" office:value="0.00121712962962963" calcext:value-type="float">
            <text:p>0,00121712962962963000</text:p>
          </table:table-cell>
          <table:table-cell table:formula="of:=[.D480]-[.D47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22" office:value-type="float" office:value="10538" calcext:value-type="float">
            <text:p>10538</text:p>
          </table:table-cell>
          <table:table-cell office:value-type="float" office:value="8640000" calcext:value-type="float">
            <text:p>8640000</text:p>
          </table:table-cell>
          <table:table-cell table:formula="of:=[.B480]/[.C480]" office:value-type="float" office:value="0.00121967592592593" calcext:value-type="float">
            <text:p>0,00121967592592593000</text:p>
          </table:table-cell>
          <table:table-cell table:formula="of:=[.D481]-[.D48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22" office:value-type="float" office:value="10560" calcext:value-type="float">
            <text:p>10560</text:p>
          </table:table-cell>
          <table:table-cell office:value-type="float" office:value="8640000" calcext:value-type="float">
            <text:p>8640000</text:p>
          </table:table-cell>
          <table:table-cell table:formula="of:=[.B481]/[.C481]" office:value-type="float" office:value="0.00122222222222222" calcext:value-type="float">
            <text:p>0,00122222222222222000</text:p>
          </table:table-cell>
          <table:table-cell table:formula="of:=[.D482]-[.D48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+22" office:value-type="float" office:value="10582" calcext:value-type="float">
            <text:p>10582</text:p>
          </table:table-cell>
          <table:table-cell office:value-type="float" office:value="8640000" calcext:value-type="float">
            <text:p>8640000</text:p>
          </table:table-cell>
          <table:table-cell table:formula="of:=[.B482]/[.C482]" office:value-type="float" office:value="0.00122476851851852" calcext:value-type="float">
            <text:p>0,00122476851851852000</text:p>
          </table:table-cell>
          <table:table-cell table:formula="of:=[.D483]-[.D48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+22" office:value-type="float" office:value="10604" calcext:value-type="float">
            <text:p>10604</text:p>
          </table:table-cell>
          <table:table-cell office:value-type="float" office:value="8640000" calcext:value-type="float">
            <text:p>8640000</text:p>
          </table:table-cell>
          <table:table-cell table:formula="of:=[.B483]/[.C483]" office:value-type="float" office:value="0.00122731481481481" calcext:value-type="float">
            <text:p>0,00122731481481481000</text:p>
          </table:table-cell>
          <table:table-cell table:formula="of:=[.D484]-[.D48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+22" office:value-type="float" office:value="10626" calcext:value-type="float">
            <text:p>10626</text:p>
          </table:table-cell>
          <table:table-cell office:value-type="float" office:value="8640000" calcext:value-type="float">
            <text:p>8640000</text:p>
          </table:table-cell>
          <table:table-cell table:formula="of:=[.B484]/[.C484]" office:value-type="float" office:value="0.00122986111111111" calcext:value-type="float">
            <text:p>0,00122986111111111000</text:p>
          </table:table-cell>
          <table:table-cell table:formula="of:=[.D485]-[.D48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+22" office:value-type="float" office:value="10648" calcext:value-type="float">
            <text:p>10648</text:p>
          </table:table-cell>
          <table:table-cell office:value-type="float" office:value="8640000" calcext:value-type="float">
            <text:p>8640000</text:p>
          </table:table-cell>
          <table:table-cell table:formula="of:=[.B485]/[.C485]" office:value-type="float" office:value="0.00123240740740741" calcext:value-type="float">
            <text:p>0,00123240740740741000</text:p>
          </table:table-cell>
          <table:table-cell table:formula="of:=[.D486]-[.D48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+22" office:value-type="float" office:value="10670" calcext:value-type="float">
            <text:p>10670</text:p>
          </table:table-cell>
          <table:table-cell office:value-type="float" office:value="8640000" calcext:value-type="float">
            <text:p>8640000</text:p>
          </table:table-cell>
          <table:table-cell table:formula="of:=[.B486]/[.C486]" office:value-type="float" office:value="0.0012349537037037" calcext:value-type="float">
            <text:p>0,00123495370370370000</text:p>
          </table:table-cell>
          <table:table-cell table:formula="of:=[.D487]-[.D486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+22" office:value-type="float" office:value="10692" calcext:value-type="float">
            <text:p>10692</text:p>
          </table:table-cell>
          <table:table-cell office:value-type="float" office:value="8640000" calcext:value-type="float">
            <text:p>8640000</text:p>
          </table:table-cell>
          <table:table-cell table:formula="of:=[.B487]/[.C487]" office:value-type="float" office:value="0.0012375" calcext:value-type="float">
            <text:p>0,00123750000000000000</text:p>
          </table:table-cell>
          <table:table-cell table:formula="of:=[.D488]-[.D48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+22" office:value-type="float" office:value="10714" calcext:value-type="float">
            <text:p>10714</text:p>
          </table:table-cell>
          <table:table-cell office:value-type="float" office:value="8640000" calcext:value-type="float">
            <text:p>8640000</text:p>
          </table:table-cell>
          <table:table-cell table:formula="of:=[.B488]/[.C488]" office:value-type="float" office:value="0.0012400462962963" calcext:value-type="float">
            <text:p>0,00124004629629630000</text:p>
          </table:table-cell>
          <table:table-cell table:formula="of:=[.D489]-[.D48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+22" office:value-type="float" office:value="10736" calcext:value-type="float">
            <text:p>10736</text:p>
          </table:table-cell>
          <table:table-cell office:value-type="float" office:value="8640000" calcext:value-type="float">
            <text:p>8640000</text:p>
          </table:table-cell>
          <table:table-cell table:formula="of:=[.B489]/[.C489]" office:value-type="float" office:value="0.00124259259259259" calcext:value-type="float">
            <text:p>0,00124259259259259000</text:p>
          </table:table-cell>
          <table:table-cell table:formula="of:=[.D490]-[.D48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+22" office:value-type="float" office:value="10758" calcext:value-type="float">
            <text:p>10758</text:p>
          </table:table-cell>
          <table:table-cell office:value-type="float" office:value="8640000" calcext:value-type="float">
            <text:p>8640000</text:p>
          </table:table-cell>
          <table:table-cell table:formula="of:=[.B490]/[.C490]" office:value-type="float" office:value="0.00124513888888889" calcext:value-type="float">
            <text:p>0,00124513888888889000</text:p>
          </table:table-cell>
          <table:table-cell table:formula="of:=[.D491]-[.D49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0]+22" office:value-type="float" office:value="10780" calcext:value-type="float">
            <text:p>10780</text:p>
          </table:table-cell>
          <table:table-cell office:value-type="float" office:value="8640000" calcext:value-type="float">
            <text:p>8640000</text:p>
          </table:table-cell>
          <table:table-cell table:formula="of:=[.B491]/[.C491]" office:value-type="float" office:value="0.00124768518518519" calcext:value-type="float">
            <text:p>0,00124768518518519000</text:p>
          </table:table-cell>
          <table:table-cell table:formula="of:=[.D492]-[.D49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+22" office:value-type="float" office:value="10802" calcext:value-type="float">
            <text:p>10802</text:p>
          </table:table-cell>
          <table:table-cell office:value-type="float" office:value="8640000" calcext:value-type="float">
            <text:p>8640000</text:p>
          </table:table-cell>
          <table:table-cell table:formula="of:=[.B492]/[.C492]" office:value-type="float" office:value="0.00125023148148148" calcext:value-type="float">
            <text:p>0,00125023148148148000</text:p>
          </table:table-cell>
          <table:table-cell table:formula="of:=[.D493]-[.D49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+22" office:value-type="float" office:value="10824" calcext:value-type="float">
            <text:p>10824</text:p>
          </table:table-cell>
          <table:table-cell office:value-type="float" office:value="8640000" calcext:value-type="float">
            <text:p>8640000</text:p>
          </table:table-cell>
          <table:table-cell table:formula="of:=[.B493]/[.C493]" office:value-type="float" office:value="0.00125277777777778" calcext:value-type="float">
            <text:p>0,00125277777777778000</text:p>
          </table:table-cell>
          <table:table-cell table:formula="of:=[.D494]-[.D49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+22" office:value-type="float" office:value="10846" calcext:value-type="float">
            <text:p>10846</text:p>
          </table:table-cell>
          <table:table-cell office:value-type="float" office:value="8640000" calcext:value-type="float">
            <text:p>8640000</text:p>
          </table:table-cell>
          <table:table-cell table:formula="of:=[.B494]/[.C494]" office:value-type="float" office:value="0.00125532407407407" calcext:value-type="float">
            <text:p>0,00125532407407407000</text:p>
          </table:table-cell>
          <table:table-cell table:formula="of:=[.D495]-[.D49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+22" office:value-type="float" office:value="10868" calcext:value-type="float">
            <text:p>10868</text:p>
          </table:table-cell>
          <table:table-cell office:value-type="float" office:value="8640000" calcext:value-type="float">
            <text:p>8640000</text:p>
          </table:table-cell>
          <table:table-cell table:formula="of:=[.B495]/[.C495]" office:value-type="float" office:value="0.00125787037037037" calcext:value-type="float">
            <text:p>0,00125787037037037000</text:p>
          </table:table-cell>
          <table:table-cell table:formula="of:=[.D496]-[.D49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+22" office:value-type="float" office:value="10890" calcext:value-type="float">
            <text:p>10890</text:p>
          </table:table-cell>
          <table:table-cell office:value-type="float" office:value="8640000" calcext:value-type="float">
            <text:p>8640000</text:p>
          </table:table-cell>
          <table:table-cell table:formula="of:=[.B496]/[.C496]" office:value-type="float" office:value="0.00126041666666667" calcext:value-type="float">
            <text:p>0,00126041666666667000</text:p>
          </table:table-cell>
          <table:table-cell table:formula="of:=[.D497]-[.D49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+22" office:value-type="float" office:value="10912" calcext:value-type="float">
            <text:p>10912</text:p>
          </table:table-cell>
          <table:table-cell office:value-type="float" office:value="8640000" calcext:value-type="float">
            <text:p>8640000</text:p>
          </table:table-cell>
          <table:table-cell table:formula="of:=[.B497]/[.C497]" office:value-type="float" office:value="0.00126296296296296" calcext:value-type="float">
            <text:p>0,00126296296296296000</text:p>
          </table:table-cell>
          <table:table-cell table:formula="of:=[.D498]-[.D49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+22" office:value-type="float" office:value="10934" calcext:value-type="float">
            <text:p>10934</text:p>
          </table:table-cell>
          <table:table-cell office:value-type="float" office:value="8640000" calcext:value-type="float">
            <text:p>8640000</text:p>
          </table:table-cell>
          <table:table-cell table:formula="of:=[.B498]/[.C498]" office:value-type="float" office:value="0.00126550925925926" calcext:value-type="float">
            <text:p>0,00126550925925926000</text:p>
          </table:table-cell>
          <table:table-cell table:formula="of:=[.D499]-[.D49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+22" office:value-type="float" office:value="10956" calcext:value-type="float">
            <text:p>10956</text:p>
          </table:table-cell>
          <table:table-cell office:value-type="float" office:value="8640000" calcext:value-type="float">
            <text:p>8640000</text:p>
          </table:table-cell>
          <table:table-cell table:formula="of:=[.B499]/[.C499]" office:value-type="float" office:value="0.00126805555555556" calcext:value-type="float">
            <text:p>0,00126805555555556000</text:p>
          </table:table-cell>
          <table:table-cell table:formula="of:=[.D500]-[.D49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+22" office:value-type="float" office:value="10978" calcext:value-type="float">
            <text:p>10978</text:p>
          </table:table-cell>
          <table:table-cell office:value-type="float" office:value="8640000" calcext:value-type="float">
            <text:p>8640000</text:p>
          </table:table-cell>
          <table:table-cell table:formula="of:=[.B500]/[.C500]" office:value-type="float" office:value="0.00127060185185185" calcext:value-type="float">
            <text:p>0,00127060185185185000</text:p>
          </table:table-cell>
          <table:table-cell table:formula="of:=[.D501]-[.D500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+22" office:value-type="float" office:value="11000" calcext:value-type="float">
            <text:p>11000</text:p>
          </table:table-cell>
          <table:table-cell office:value-type="float" office:value="8640000" calcext:value-type="float">
            <text:p>8640000</text:p>
          </table:table-cell>
          <table:table-cell table:formula="of:=[.B501]/[.C501]" office:value-type="float" office:value="0.00127314814814815" calcext:value-type="float">
            <text:p>0,00127314814814815000</text:p>
          </table:table-cell>
          <table:table-cell table:formula="of:=[.D502]-[.D50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1]+22" office:value-type="float" office:value="11022" calcext:value-type="float">
            <text:p>11022</text:p>
          </table:table-cell>
          <table:table-cell office:value-type="float" office:value="8640000" calcext:value-type="float">
            <text:p>8640000</text:p>
          </table:table-cell>
          <table:table-cell table:formula="of:=[.B502]/[.C502]" office:value-type="float" office:value="0.00127569444444444" calcext:value-type="float">
            <text:p>0,00127569444444444000</text:p>
          </table:table-cell>
          <table:table-cell table:formula="of:=[.D503]-[.D50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2]+22" office:value-type="float" office:value="11044" calcext:value-type="float">
            <text:p>11044</text:p>
          </table:table-cell>
          <table:table-cell office:value-type="float" office:value="8640000" calcext:value-type="float">
            <text:p>8640000</text:p>
          </table:table-cell>
          <table:table-cell table:formula="of:=[.B503]/[.C503]" office:value-type="float" office:value="0.00127824074074074" calcext:value-type="float">
            <text:p>0,00127824074074074000</text:p>
          </table:table-cell>
          <table:table-cell table:formula="of:=[.D504]-[.D50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3]+22" office:value-type="float" office:value="11066" calcext:value-type="float">
            <text:p>11066</text:p>
          </table:table-cell>
          <table:table-cell office:value-type="float" office:value="8640000" calcext:value-type="float">
            <text:p>8640000</text:p>
          </table:table-cell>
          <table:table-cell table:formula="of:=[.B504]/[.C504]" office:value-type="float" office:value="0.00128078703703704" calcext:value-type="float">
            <text:p>0,00128078703703704000</text:p>
          </table:table-cell>
          <table:table-cell table:formula="of:=[.D505]-[.D50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4]+22" office:value-type="float" office:value="11088" calcext:value-type="float">
            <text:p>11088</text:p>
          </table:table-cell>
          <table:table-cell office:value-type="float" office:value="8640000" calcext:value-type="float">
            <text:p>8640000</text:p>
          </table:table-cell>
          <table:table-cell table:formula="of:=[.B505]/[.C505]" office:value-type="float" office:value="0.00128333333333333" calcext:value-type="float">
            <text:p>0,00128333333333333000</text:p>
          </table:table-cell>
          <table:table-cell table:formula="of:=[.D506]-[.D50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5]+22" office:value-type="float" office:value="11110" calcext:value-type="float">
            <text:p>11110</text:p>
          </table:table-cell>
          <table:table-cell office:value-type="float" office:value="8640000" calcext:value-type="float">
            <text:p>8640000</text:p>
          </table:table-cell>
          <table:table-cell table:formula="of:=[.B506]/[.C506]" office:value-type="float" office:value="0.00128587962962963" calcext:value-type="float">
            <text:p>0,00128587962962963000</text:p>
          </table:table-cell>
          <table:table-cell table:formula="of:=[.D507]-[.D50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6]+22" office:value-type="float" office:value="11132" calcext:value-type="float">
            <text:p>11132</text:p>
          </table:table-cell>
          <table:table-cell office:value-type="float" office:value="8640000" calcext:value-type="float">
            <text:p>8640000</text:p>
          </table:table-cell>
          <table:table-cell table:formula="of:=[.B507]/[.C507]" office:value-type="float" office:value="0.00128842592592593" calcext:value-type="float">
            <text:p>0,00128842592592593000</text:p>
          </table:table-cell>
          <table:table-cell table:formula="of:=[.D508]-[.D50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07]+22" office:value-type="float" office:value="11154" calcext:value-type="float">
            <text:p>11154</text:p>
          </table:table-cell>
          <table:table-cell office:value-type="float" office:value="8640000" calcext:value-type="float">
            <text:p>8640000</text:p>
          </table:table-cell>
          <table:table-cell table:formula="of:=[.B508]/[.C508]" office:value-type="float" office:value="0.00129097222222222" calcext:value-type="float">
            <text:p>0,00129097222222222000</text:p>
          </table:table-cell>
          <table:table-cell table:formula="of:=[.D509]-[.D50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08]+22" office:value-type="float" office:value="11176" calcext:value-type="float">
            <text:p>11176</text:p>
          </table:table-cell>
          <table:table-cell office:value-type="float" office:value="8640000" calcext:value-type="float">
            <text:p>8640000</text:p>
          </table:table-cell>
          <table:table-cell table:formula="of:=[.B509]/[.C509]" office:value-type="float" office:value="0.00129351851851852" calcext:value-type="float">
            <text:p>0,00129351851851852000</text:p>
          </table:table-cell>
          <table:table-cell table:formula="of:=[.D510]-[.D50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509]+22" office:value-type="float" office:value="11198" calcext:value-type="float">
            <text:p>11198</text:p>
          </table:table-cell>
          <table:table-cell office:value-type="float" office:value="8640000" calcext:value-type="float">
            <text:p>8640000</text:p>
          </table:table-cell>
          <table:table-cell table:formula="of:=[.B510]/[.C510]" office:value-type="float" office:value="0.00129606481481481" calcext:value-type="float">
            <text:p>0,00129606481481481000</text:p>
          </table:table-cell>
          <table:table-cell table:formula="of:=[.D511]-[.D51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0]+22" office:value-type="float" office:value="11220" calcext:value-type="float">
            <text:p>11220</text:p>
          </table:table-cell>
          <table:table-cell office:value-type="float" office:value="8640000" calcext:value-type="float">
            <text:p>8640000</text:p>
          </table:table-cell>
          <table:table-cell table:formula="of:=[.B511]/[.C511]" office:value-type="float" office:value="0.00129861111111111" calcext:value-type="float">
            <text:p>0,00129861111111111000</text:p>
          </table:table-cell>
          <table:table-cell table:formula="of:=[.D512]-[.D51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511]+22" office:value-type="float" office:value="11242" calcext:value-type="float">
            <text:p>11242</text:p>
          </table:table-cell>
          <table:table-cell office:value-type="float" office:value="8640000" calcext:value-type="float">
            <text:p>8640000</text:p>
          </table:table-cell>
          <table:table-cell table:formula="of:=[.B512]/[.C512]" office:value-type="float" office:value="0.00130115740740741" calcext:value-type="float">
            <text:p>0,00130115740740741000</text:p>
          </table:table-cell>
          <table:table-cell table:formula="of:=[.D513]-[.D51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12]+22" office:value-type="float" office:value="11264" calcext:value-type="float">
            <text:p>11264</text:p>
          </table:table-cell>
          <table:table-cell office:value-type="float" office:value="8640000" calcext:value-type="float">
            <text:p>8640000</text:p>
          </table:table-cell>
          <table:table-cell table:formula="of:=[.B513]/[.C513]" office:value-type="float" office:value="0.0013037037037037" calcext:value-type="float">
            <text:p>0,00130370370370370000</text:p>
          </table:table-cell>
          <table:table-cell table:formula="of:=[.D514]-[.D51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513]+22" office:value-type="float" office:value="11286" calcext:value-type="float">
            <text:p>11286</text:p>
          </table:table-cell>
          <table:table-cell office:value-type="float" office:value="8640000" calcext:value-type="float">
            <text:p>8640000</text:p>
          </table:table-cell>
          <table:table-cell table:formula="of:=[.B514]/[.C514]" office:value-type="float" office:value="0.00130625" calcext:value-type="float">
            <text:p>0,00130625000000000000</text:p>
          </table:table-cell>
          <table:table-cell table:formula="of:=[.D515]-[.D514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514]+22" office:value-type="float" office:value="11308" calcext:value-type="float">
            <text:p>11308</text:p>
          </table:table-cell>
          <table:table-cell office:value-type="float" office:value="8640000" calcext:value-type="float">
            <text:p>8640000</text:p>
          </table:table-cell>
          <table:table-cell table:formula="of:=[.B515]/[.C515]" office:value-type="float" office:value="0.0013087962962963" calcext:value-type="float">
            <text:p>0,00130879629629630000</text:p>
          </table:table-cell>
          <table:table-cell table:formula="of:=[.D516]-[.D51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515]+22" office:value-type="float" office:value="11330" calcext:value-type="float">
            <text:p>11330</text:p>
          </table:table-cell>
          <table:table-cell office:value-type="float" office:value="8640000" calcext:value-type="float">
            <text:p>8640000</text:p>
          </table:table-cell>
          <table:table-cell table:formula="of:=[.B516]/[.C516]" office:value-type="float" office:value="0.00131134259259259" calcext:value-type="float">
            <text:p>0,00131134259259259000</text:p>
          </table:table-cell>
          <table:table-cell table:formula="of:=[.D517]-[.D51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516]+22" office:value-type="float" office:value="11352" calcext:value-type="float">
            <text:p>11352</text:p>
          </table:table-cell>
          <table:table-cell office:value-type="float" office:value="8640000" calcext:value-type="float">
            <text:p>8640000</text:p>
          </table:table-cell>
          <table:table-cell table:formula="of:=[.B517]/[.C517]" office:value-type="float" office:value="0.00131388888888889" calcext:value-type="float">
            <text:p>0,00131388888888889000</text:p>
          </table:table-cell>
          <table:table-cell table:formula="of:=[.D518]-[.D51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517]+22" office:value-type="float" office:value="11374" calcext:value-type="float">
            <text:p>11374</text:p>
          </table:table-cell>
          <table:table-cell office:value-type="float" office:value="8640000" calcext:value-type="float">
            <text:p>8640000</text:p>
          </table:table-cell>
          <table:table-cell table:formula="of:=[.B518]/[.C518]" office:value-type="float" office:value="0.00131643518518519" calcext:value-type="float">
            <text:p>0,00131643518518519000</text:p>
          </table:table-cell>
          <table:table-cell table:formula="of:=[.D519]-[.D51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518]+22" office:value-type="float" office:value="11396" calcext:value-type="float">
            <text:p>11396</text:p>
          </table:table-cell>
          <table:table-cell office:value-type="float" office:value="8640000" calcext:value-type="float">
            <text:p>8640000</text:p>
          </table:table-cell>
          <table:table-cell table:formula="of:=[.B519]/[.C519]" office:value-type="float" office:value="0.00131898148148148" calcext:value-type="float">
            <text:p>0,00131898148148148000</text:p>
          </table:table-cell>
          <table:table-cell table:formula="of:=[.D520]-[.D51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519]+22" office:value-type="float" office:value="11418" calcext:value-type="float">
            <text:p>11418</text:p>
          </table:table-cell>
          <table:table-cell office:value-type="float" office:value="8640000" calcext:value-type="float">
            <text:p>8640000</text:p>
          </table:table-cell>
          <table:table-cell table:formula="of:=[.B520]/[.C520]" office:value-type="float" office:value="0.00132152777777778" calcext:value-type="float">
            <text:p>0,00132152777777778000</text:p>
          </table:table-cell>
          <table:table-cell table:formula="of:=[.D521]-[.D52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520]+22" office:value-type="float" office:value="11440" calcext:value-type="float">
            <text:p>11440</text:p>
          </table:table-cell>
          <table:table-cell office:value-type="float" office:value="8640000" calcext:value-type="float">
            <text:p>8640000</text:p>
          </table:table-cell>
          <table:table-cell table:formula="of:=[.B521]/[.C521]" office:value-type="float" office:value="0.00132407407407407" calcext:value-type="float">
            <text:p>0,00132407407407407000</text:p>
          </table:table-cell>
          <table:table-cell table:formula="of:=[.D522]-[.D52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521]+22" office:value-type="float" office:value="11462" calcext:value-type="float">
            <text:p>11462</text:p>
          </table:table-cell>
          <table:table-cell office:value-type="float" office:value="8640000" calcext:value-type="float">
            <text:p>8640000</text:p>
          </table:table-cell>
          <table:table-cell table:formula="of:=[.B522]/[.C522]" office:value-type="float" office:value="0.00132662037037037" calcext:value-type="float">
            <text:p>0,00132662037037037000</text:p>
          </table:table-cell>
          <table:table-cell table:formula="of:=[.D523]-[.D52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B522]+22" office:value-type="float" office:value="11484" calcext:value-type="float">
            <text:p>11484</text:p>
          </table:table-cell>
          <table:table-cell office:value-type="float" office:value="8640000" calcext:value-type="float">
            <text:p>8640000</text:p>
          </table:table-cell>
          <table:table-cell table:formula="of:=[.B523]/[.C523]" office:value-type="float" office:value="0.00132916666666667" calcext:value-type="float">
            <text:p>0,00132916666666667000</text:p>
          </table:table-cell>
          <table:table-cell table:formula="of:=[.D524]-[.D52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523]+22" office:value-type="float" office:value="11506" calcext:value-type="float">
            <text:p>11506</text:p>
          </table:table-cell>
          <table:table-cell office:value-type="float" office:value="8640000" calcext:value-type="float">
            <text:p>8640000</text:p>
          </table:table-cell>
          <table:table-cell table:formula="of:=[.B524]/[.C524]" office:value-type="float" office:value="0.00133171296296296" calcext:value-type="float">
            <text:p>0,00133171296296296000</text:p>
          </table:table-cell>
          <table:table-cell table:formula="of:=[.D525]-[.D52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B524]+22" office:value-type="float" office:value="11528" calcext:value-type="float">
            <text:p>11528</text:p>
          </table:table-cell>
          <table:table-cell office:value-type="float" office:value="8640000" calcext:value-type="float">
            <text:p>8640000</text:p>
          </table:table-cell>
          <table:table-cell table:formula="of:=[.B525]/[.C525]" office:value-type="float" office:value="0.00133425925925926" calcext:value-type="float">
            <text:p>0,00133425925925926000</text:p>
          </table:table-cell>
          <table:table-cell table:formula="of:=[.D526]-[.D52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B525]+22" office:value-type="float" office:value="11550" calcext:value-type="float">
            <text:p>11550</text:p>
          </table:table-cell>
          <table:table-cell office:value-type="float" office:value="8640000" calcext:value-type="float">
            <text:p>8640000</text:p>
          </table:table-cell>
          <table:table-cell table:formula="of:=[.B526]/[.C526]" office:value-type="float" office:value="0.00133680555555556" calcext:value-type="float">
            <text:p>0,00133680555555556000</text:p>
          </table:table-cell>
          <table:table-cell table:formula="of:=[.D527]-[.D52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B526]+22" office:value-type="float" office:value="11572" calcext:value-type="float">
            <text:p>11572</text:p>
          </table:table-cell>
          <table:table-cell office:value-type="float" office:value="8640000" calcext:value-type="float">
            <text:p>8640000</text:p>
          </table:table-cell>
          <table:table-cell table:formula="of:=[.B527]/[.C527]" office:value-type="float" office:value="0.00133935185185185" calcext:value-type="float">
            <text:p>0,00133935185185185000</text:p>
          </table:table-cell>
          <table:table-cell table:formula="of:=[.D528]-[.D52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B527]+22" office:value-type="float" office:value="11594" calcext:value-type="float">
            <text:p>11594</text:p>
          </table:table-cell>
          <table:table-cell office:value-type="float" office:value="8640000" calcext:value-type="float">
            <text:p>8640000</text:p>
          </table:table-cell>
          <table:table-cell table:formula="of:=[.B528]/[.C528]" office:value-type="float" office:value="0.00134189814814815" calcext:value-type="float">
            <text:p>0,00134189814814815000</text:p>
          </table:table-cell>
          <table:table-cell table:formula="of:=[.D529]-[.D528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528]+22" office:value-type="float" office:value="11616" calcext:value-type="float">
            <text:p>11616</text:p>
          </table:table-cell>
          <table:table-cell office:value-type="float" office:value="8640000" calcext:value-type="float">
            <text:p>8640000</text:p>
          </table:table-cell>
          <table:table-cell table:formula="of:=[.B529]/[.C529]" office:value-type="float" office:value="0.00134444444444444" calcext:value-type="float">
            <text:p>0,00134444444444444000</text:p>
          </table:table-cell>
          <table:table-cell table:formula="of:=[.D530]-[.D52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B529]+22" office:value-type="float" office:value="11638" calcext:value-type="float">
            <text:p>11638</text:p>
          </table:table-cell>
          <table:table-cell office:value-type="float" office:value="8640000" calcext:value-type="float">
            <text:p>8640000</text:p>
          </table:table-cell>
          <table:table-cell table:formula="of:=[.B530]/[.C530]" office:value-type="float" office:value="0.00134699074074074" calcext:value-type="float">
            <text:p>0,00134699074074074000</text:p>
          </table:table-cell>
          <table:table-cell table:formula="of:=[.D531]-[.D53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530]+22" office:value-type="float" office:value="11660" calcext:value-type="float">
            <text:p>11660</text:p>
          </table:table-cell>
          <table:table-cell office:value-type="float" office:value="8640000" calcext:value-type="float">
            <text:p>8640000</text:p>
          </table:table-cell>
          <table:table-cell table:formula="of:=[.B531]/[.C531]" office:value-type="float" office:value="0.00134953703703704" calcext:value-type="float">
            <text:p>0,00134953703703704000</text:p>
          </table:table-cell>
          <table:table-cell table:formula="of:=[.D532]-[.D53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B531]+22" office:value-type="float" office:value="11682" calcext:value-type="float">
            <text:p>11682</text:p>
          </table:table-cell>
          <table:table-cell office:value-type="float" office:value="8640000" calcext:value-type="float">
            <text:p>8640000</text:p>
          </table:table-cell>
          <table:table-cell table:formula="of:=[.B532]/[.C532]" office:value-type="float" office:value="0.00135208333333333" calcext:value-type="float">
            <text:p>0,00135208333333333000</text:p>
          </table:table-cell>
          <table:table-cell table:formula="of:=[.D533]-[.D53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B532]+22" office:value-type="float" office:value="11704" calcext:value-type="float">
            <text:p>11704</text:p>
          </table:table-cell>
          <table:table-cell office:value-type="float" office:value="8640000" calcext:value-type="float">
            <text:p>8640000</text:p>
          </table:table-cell>
          <table:table-cell table:formula="of:=[.B533]/[.C533]" office:value-type="float" office:value="0.00135462962962963" calcext:value-type="float">
            <text:p>0,00135462962962963000</text:p>
          </table:table-cell>
          <table:table-cell table:formula="of:=[.D534]-[.D53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533]+22" office:value-type="float" office:value="11726" calcext:value-type="float">
            <text:p>11726</text:p>
          </table:table-cell>
          <table:table-cell office:value-type="float" office:value="8640000" calcext:value-type="float">
            <text:p>8640000</text:p>
          </table:table-cell>
          <table:table-cell table:formula="of:=[.B534]/[.C534]" office:value-type="float" office:value="0.00135717592592593" calcext:value-type="float">
            <text:p>0,00135717592592593000</text:p>
          </table:table-cell>
          <table:table-cell table:formula="of:=[.D535]-[.D53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534]+22" office:value-type="float" office:value="11748" calcext:value-type="float">
            <text:p>11748</text:p>
          </table:table-cell>
          <table:table-cell office:value-type="float" office:value="8640000" calcext:value-type="float">
            <text:p>8640000</text:p>
          </table:table-cell>
          <table:table-cell table:formula="of:=[.B535]/[.C535]" office:value-type="float" office:value="0.00135972222222222" calcext:value-type="float">
            <text:p>0,00135972222222222000</text:p>
          </table:table-cell>
          <table:table-cell table:formula="of:=[.D536]-[.D53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535]+22" office:value-type="float" office:value="11770" calcext:value-type="float">
            <text:p>11770</text:p>
          </table:table-cell>
          <table:table-cell office:value-type="float" office:value="8640000" calcext:value-type="float">
            <text:p>8640000</text:p>
          </table:table-cell>
          <table:table-cell table:formula="of:=[.B536]/[.C536]" office:value-type="float" office:value="0.00136226851851852" calcext:value-type="float">
            <text:p>0,00136226851851852000</text:p>
          </table:table-cell>
          <table:table-cell table:formula="of:=[.D537]-[.D53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B536]+22" office:value-type="float" office:value="11792" calcext:value-type="float">
            <text:p>11792</text:p>
          </table:table-cell>
          <table:table-cell office:value-type="float" office:value="8640000" calcext:value-type="float">
            <text:p>8640000</text:p>
          </table:table-cell>
          <table:table-cell table:formula="of:=[.B537]/[.C537]" office:value-type="float" office:value="0.00136481481481481" calcext:value-type="float">
            <text:p>0,00136481481481481000</text:p>
          </table:table-cell>
          <table:table-cell table:formula="of:=[.D538]-[.D53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B537]+22" office:value-type="float" office:value="11814" calcext:value-type="float">
            <text:p>11814</text:p>
          </table:table-cell>
          <table:table-cell office:value-type="float" office:value="8640000" calcext:value-type="float">
            <text:p>8640000</text:p>
          </table:table-cell>
          <table:table-cell table:formula="of:=[.B538]/[.C538]" office:value-type="float" office:value="0.00136736111111111" calcext:value-type="float">
            <text:p>0,00136736111111111000</text:p>
          </table:table-cell>
          <table:table-cell table:formula="of:=[.D539]-[.D53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B538]+22" office:value-type="float" office:value="11836" calcext:value-type="float">
            <text:p>11836</text:p>
          </table:table-cell>
          <table:table-cell office:value-type="float" office:value="8640000" calcext:value-type="float">
            <text:p>8640000</text:p>
          </table:table-cell>
          <table:table-cell table:formula="of:=[.B539]/[.C539]" office:value-type="float" office:value="0.00136990740740741" calcext:value-type="float">
            <text:p>0,00136990740740741000</text:p>
          </table:table-cell>
          <table:table-cell table:formula="of:=[.D540]-[.D53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539]+22" office:value-type="float" office:value="11858" calcext:value-type="float">
            <text:p>11858</text:p>
          </table:table-cell>
          <table:table-cell office:value-type="float" office:value="8640000" calcext:value-type="float">
            <text:p>8640000</text:p>
          </table:table-cell>
          <table:table-cell table:formula="of:=[.B540]/[.C540]" office:value-type="float" office:value="0.0013724537037037" calcext:value-type="float">
            <text:p>0,00137245370370370000</text:p>
          </table:table-cell>
          <table:table-cell table:formula="of:=[.D541]-[.D54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B540]+22" office:value-type="float" office:value="11880" calcext:value-type="float">
            <text:p>11880</text:p>
          </table:table-cell>
          <table:table-cell office:value-type="float" office:value="8640000" calcext:value-type="float">
            <text:p>8640000</text:p>
          </table:table-cell>
          <table:table-cell table:formula="of:=[.B541]/[.C541]" office:value-type="float" office:value="0.001375" calcext:value-type="float">
            <text:p>0,00137500000000000000</text:p>
          </table:table-cell>
          <table:table-cell table:formula="of:=[.D542]-[.D54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B541]+22" office:value-type="float" office:value="11902" calcext:value-type="float">
            <text:p>11902</text:p>
          </table:table-cell>
          <table:table-cell office:value-type="float" office:value="8640000" calcext:value-type="float">
            <text:p>8640000</text:p>
          </table:table-cell>
          <table:table-cell table:formula="of:=[.B542]/[.C542]" office:value-type="float" office:value="0.0013775462962963" calcext:value-type="float">
            <text:p>0,00137754629629630000</text:p>
          </table:table-cell>
          <table:table-cell table:formula="of:=[.D543]-[.D542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B542]+22" office:value-type="float" office:value="11924" calcext:value-type="float">
            <text:p>11924</text:p>
          </table:table-cell>
          <table:table-cell office:value-type="float" office:value="8640000" calcext:value-type="float">
            <text:p>8640000</text:p>
          </table:table-cell>
          <table:table-cell table:formula="of:=[.B543]/[.C543]" office:value-type="float" office:value="0.00138009259259259" calcext:value-type="float">
            <text:p>0,00138009259259259000</text:p>
          </table:table-cell>
          <table:table-cell table:formula="of:=[.D544]-[.D54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543]+22" office:value-type="float" office:value="11946" calcext:value-type="float">
            <text:p>11946</text:p>
          </table:table-cell>
          <table:table-cell office:value-type="float" office:value="8640000" calcext:value-type="float">
            <text:p>8640000</text:p>
          </table:table-cell>
          <table:table-cell table:formula="of:=[.B544]/[.C544]" office:value-type="float" office:value="0.00138263888888889" calcext:value-type="float">
            <text:p>0,00138263888888889000</text:p>
          </table:table-cell>
          <table:table-cell table:formula="of:=[.D545]-[.D54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B544]+22" office:value-type="float" office:value="11968" calcext:value-type="float">
            <text:p>11968</text:p>
          </table:table-cell>
          <table:table-cell office:value-type="float" office:value="8640000" calcext:value-type="float">
            <text:p>8640000</text:p>
          </table:table-cell>
          <table:table-cell table:formula="of:=[.B545]/[.C545]" office:value-type="float" office:value="0.00138518518518519" calcext:value-type="float">
            <text:p>0,00138518518518519000</text:p>
          </table:table-cell>
          <table:table-cell table:formula="of:=[.D546]-[.D54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B545]+22" office:value-type="float" office:value="11990" calcext:value-type="float">
            <text:p>11990</text:p>
          </table:table-cell>
          <table:table-cell office:value-type="float" office:value="8640000" calcext:value-type="float">
            <text:p>8640000</text:p>
          </table:table-cell>
          <table:table-cell table:formula="of:=[.B546]/[.C546]" office:value-type="float" office:value="0.00138773148148148" calcext:value-type="float">
            <text:p>0,00138773148148148000</text:p>
          </table:table-cell>
          <table:table-cell table:formula="of:=[.D547]-[.D54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B546]+22" office:value-type="float" office:value="12012" calcext:value-type="float">
            <text:p>12012</text:p>
          </table:table-cell>
          <table:table-cell office:value-type="float" office:value="8640000" calcext:value-type="float">
            <text:p>8640000</text:p>
          </table:table-cell>
          <table:table-cell table:formula="of:=[.B547]/[.C547]" office:value-type="float" office:value="0.00139027777777778" calcext:value-type="float">
            <text:p>0,00139027777777778000</text:p>
          </table:table-cell>
          <table:table-cell table:formula="of:=[.D548]-[.D54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B547]+22" office:value-type="float" office:value="12034" calcext:value-type="float">
            <text:p>12034</text:p>
          </table:table-cell>
          <table:table-cell office:value-type="float" office:value="8640000" calcext:value-type="float">
            <text:p>8640000</text:p>
          </table:table-cell>
          <table:table-cell table:formula="of:=[.B548]/[.C548]" office:value-type="float" office:value="0.00139282407407407" calcext:value-type="float">
            <text:p>0,00139282407407407000</text:p>
          </table:table-cell>
          <table:table-cell table:formula="of:=[.D549]-[.D54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B548]+22" office:value-type="float" office:value="12056" calcext:value-type="float">
            <text:p>12056</text:p>
          </table:table-cell>
          <table:table-cell office:value-type="float" office:value="8640000" calcext:value-type="float">
            <text:p>8640000</text:p>
          </table:table-cell>
          <table:table-cell table:formula="of:=[.B549]/[.C549]" office:value-type="float" office:value="0.00139537037037037" calcext:value-type="float">
            <text:p>0,00139537037037037000</text:p>
          </table:table-cell>
          <table:table-cell table:formula="of:=[.D550]-[.D54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B549]+22" office:value-type="float" office:value="12078" calcext:value-type="float">
            <text:p>12078</text:p>
          </table:table-cell>
          <table:table-cell office:value-type="float" office:value="8640000" calcext:value-type="float">
            <text:p>8640000</text:p>
          </table:table-cell>
          <table:table-cell table:formula="of:=[.B550]/[.C550]" office:value-type="float" office:value="0.00139791666666667" calcext:value-type="float">
            <text:p>0,00139791666666667000</text:p>
          </table:table-cell>
          <table:table-cell table:formula="of:=[.D551]-[.D55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550]+22" office:value-type="float" office:value="12100" calcext:value-type="float">
            <text:p>12100</text:p>
          </table:table-cell>
          <table:table-cell office:value-type="float" office:value="8640000" calcext:value-type="float">
            <text:p>8640000</text:p>
          </table:table-cell>
          <table:table-cell table:formula="of:=[.B551]/[.C551]" office:value-type="float" office:value="0.00140046296296296" calcext:value-type="float">
            <text:p>0,00140046296296296000</text:p>
          </table:table-cell>
          <table:table-cell table:formula="of:=[.D552]-[.D55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B551]+22" office:value-type="float" office:value="12122" calcext:value-type="float">
            <text:p>12122</text:p>
          </table:table-cell>
          <table:table-cell office:value-type="float" office:value="8640000" calcext:value-type="float">
            <text:p>8640000</text:p>
          </table:table-cell>
          <table:table-cell table:formula="of:=[.B552]/[.C552]" office:value-type="float" office:value="0.00140300925925926" calcext:value-type="float">
            <text:p>0,00140300925925926000</text:p>
          </table:table-cell>
          <table:table-cell table:formula="of:=[.D553]-[.D55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B552]+22" office:value-type="float" office:value="12144" calcext:value-type="float">
            <text:p>12144</text:p>
          </table:table-cell>
          <table:table-cell office:value-type="float" office:value="8640000" calcext:value-type="float">
            <text:p>8640000</text:p>
          </table:table-cell>
          <table:table-cell table:formula="of:=[.B553]/[.C553]" office:value-type="float" office:value="0.00140555555555556" calcext:value-type="float">
            <text:p>0,00140555555555556000</text:p>
          </table:table-cell>
          <table:table-cell table:formula="of:=[.D554]-[.D55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B553]+22" office:value-type="float" office:value="12166" calcext:value-type="float">
            <text:p>12166</text:p>
          </table:table-cell>
          <table:table-cell office:value-type="float" office:value="8640000" calcext:value-type="float">
            <text:p>8640000</text:p>
          </table:table-cell>
          <table:table-cell table:formula="of:=[.B554]/[.C554]" office:value-type="float" office:value="0.00140810185185185" calcext:value-type="float">
            <text:p>0,00140810185185185000</text:p>
          </table:table-cell>
          <table:table-cell table:formula="of:=[.D555]-[.D55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B554]+22" office:value-type="float" office:value="12188" calcext:value-type="float">
            <text:p>12188</text:p>
          </table:table-cell>
          <table:table-cell office:value-type="float" office:value="8640000" calcext:value-type="float">
            <text:p>8640000</text:p>
          </table:table-cell>
          <table:table-cell table:formula="of:=[.B555]/[.C555]" office:value-type="float" office:value="0.00141064814814815" calcext:value-type="float">
            <text:p>0,00141064814814815000</text:p>
          </table:table-cell>
          <table:table-cell table:formula="of:=[.D556]-[.D55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B555]+22" office:value-type="float" office:value="12210" calcext:value-type="float">
            <text:p>12210</text:p>
          </table:table-cell>
          <table:table-cell office:value-type="float" office:value="8640000" calcext:value-type="float">
            <text:p>8640000</text:p>
          </table:table-cell>
          <table:table-cell table:formula="of:=[.B556]/[.C556]" office:value-type="float" office:value="0.00141319444444444" calcext:value-type="float">
            <text:p>0,00141319444444444000</text:p>
          </table:table-cell>
          <table:table-cell table:formula="of:=[.D557]-[.D556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B556]+22" office:value-type="float" office:value="12232" calcext:value-type="float">
            <text:p>12232</text:p>
          </table:table-cell>
          <table:table-cell office:value-type="float" office:value="8640000" calcext:value-type="float">
            <text:p>8640000</text:p>
          </table:table-cell>
          <table:table-cell table:formula="of:=[.B557]/[.C557]" office:value-type="float" office:value="0.00141574074074074" calcext:value-type="float">
            <text:p>0,00141574074074074000</text:p>
          </table:table-cell>
          <table:table-cell table:formula="of:=[.D558]-[.D55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B557]+22" office:value-type="float" office:value="12254" calcext:value-type="float">
            <text:p>12254</text:p>
          </table:table-cell>
          <table:table-cell office:value-type="float" office:value="8640000" calcext:value-type="float">
            <text:p>8640000</text:p>
          </table:table-cell>
          <table:table-cell table:formula="of:=[.B558]/[.C558]" office:value-type="float" office:value="0.00141828703703704" calcext:value-type="float">
            <text:p>0,00141828703703704000</text:p>
          </table:table-cell>
          <table:table-cell table:formula="of:=[.D559]-[.D55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B558]+22" office:value-type="float" office:value="12276" calcext:value-type="float">
            <text:p>12276</text:p>
          </table:table-cell>
          <table:table-cell office:value-type="float" office:value="8640000" calcext:value-type="float">
            <text:p>8640000</text:p>
          </table:table-cell>
          <table:table-cell table:formula="of:=[.B559]/[.C559]" office:value-type="float" office:value="0.00142083333333333" calcext:value-type="float">
            <text:p>0,00142083333333333000</text:p>
          </table:table-cell>
          <table:table-cell table:formula="of:=[.D560]-[.D55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B559]+22" office:value-type="float" office:value="12298" calcext:value-type="float">
            <text:p>12298</text:p>
          </table:table-cell>
          <table:table-cell office:value-type="float" office:value="8640000" calcext:value-type="float">
            <text:p>8640000</text:p>
          </table:table-cell>
          <table:table-cell table:formula="of:=[.B560]/[.C560]" office:value-type="float" office:value="0.00142337962962963" calcext:value-type="float">
            <text:p>0,00142337962962963000</text:p>
          </table:table-cell>
          <table:table-cell table:formula="of:=[.D561]-[.D56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B560]+22" office:value-type="float" office:value="12320" calcext:value-type="float">
            <text:p>12320</text:p>
          </table:table-cell>
          <table:table-cell office:value-type="float" office:value="8640000" calcext:value-type="float">
            <text:p>8640000</text:p>
          </table:table-cell>
          <table:table-cell table:formula="of:=[.B561]/[.C561]" office:value-type="float" office:value="0.00142592592592593" calcext:value-type="float">
            <text:p>0,00142592592592593000</text:p>
          </table:table-cell>
          <table:table-cell table:formula="of:=[.D562]-[.D56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B561]+22" office:value-type="float" office:value="12342" calcext:value-type="float">
            <text:p>12342</text:p>
          </table:table-cell>
          <table:table-cell office:value-type="float" office:value="8640000" calcext:value-type="float">
            <text:p>8640000</text:p>
          </table:table-cell>
          <table:table-cell table:formula="of:=[.B562]/[.C562]" office:value-type="float" office:value="0.00142847222222222" calcext:value-type="float">
            <text:p>0,00142847222222222000</text:p>
          </table:table-cell>
          <table:table-cell table:formula="of:=[.D563]-[.D56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B562]+22" office:value-type="float" office:value="12364" calcext:value-type="float">
            <text:p>12364</text:p>
          </table:table-cell>
          <table:table-cell office:value-type="float" office:value="8640000" calcext:value-type="float">
            <text:p>8640000</text:p>
          </table:table-cell>
          <table:table-cell table:formula="of:=[.B563]/[.C563]" office:value-type="float" office:value="0.00143101851851852" calcext:value-type="float">
            <text:p>0,00143101851851852000</text:p>
          </table:table-cell>
          <table:table-cell table:formula="of:=[.D564]-[.D56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B563]+22" office:value-type="float" office:value="12386" calcext:value-type="float">
            <text:p>12386</text:p>
          </table:table-cell>
          <table:table-cell office:value-type="float" office:value="8640000" calcext:value-type="float">
            <text:p>8640000</text:p>
          </table:table-cell>
          <table:table-cell table:formula="of:=[.B564]/[.C564]" office:value-type="float" office:value="0.00143356481481481" calcext:value-type="float">
            <text:p>0,00143356481481481000</text:p>
          </table:table-cell>
          <table:table-cell table:formula="of:=[.D565]-[.D56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B564]+22" office:value-type="float" office:value="12408" calcext:value-type="float">
            <text:p>12408</text:p>
          </table:table-cell>
          <table:table-cell office:value-type="float" office:value="8640000" calcext:value-type="float">
            <text:p>8640000</text:p>
          </table:table-cell>
          <table:table-cell table:formula="of:=[.B565]/[.C565]" office:value-type="float" office:value="0.00143611111111111" calcext:value-type="float">
            <text:p>0,00143611111111111000</text:p>
          </table:table-cell>
          <table:table-cell table:formula="of:=[.D566]-[.D56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B565]+22" office:value-type="float" office:value="12430" calcext:value-type="float">
            <text:p>12430</text:p>
          </table:table-cell>
          <table:table-cell office:value-type="float" office:value="8640000" calcext:value-type="float">
            <text:p>8640000</text:p>
          </table:table-cell>
          <table:table-cell table:formula="of:=[.B566]/[.C566]" office:value-type="float" office:value="0.00143865740740741" calcext:value-type="float">
            <text:p>0,00143865740740741000</text:p>
          </table:table-cell>
          <table:table-cell table:formula="of:=[.D567]-[.D56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B566]+22" office:value-type="float" office:value="12452" calcext:value-type="float">
            <text:p>12452</text:p>
          </table:table-cell>
          <table:table-cell office:value-type="float" office:value="8640000" calcext:value-type="float">
            <text:p>8640000</text:p>
          </table:table-cell>
          <table:table-cell table:formula="of:=[.B567]/[.C567]" office:value-type="float" office:value="0.0014412037037037" calcext:value-type="float">
            <text:p>0,00144120370370370000</text:p>
          </table:table-cell>
          <table:table-cell table:formula="of:=[.D568]-[.D56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B567]+22" office:value-type="float" office:value="12474" calcext:value-type="float">
            <text:p>12474</text:p>
          </table:table-cell>
          <table:table-cell office:value-type="float" office:value="8640000" calcext:value-type="float">
            <text:p>8640000</text:p>
          </table:table-cell>
          <table:table-cell table:formula="of:=[.B568]/[.C568]" office:value-type="float" office:value="0.00144375" calcext:value-type="float">
            <text:p>0,00144375000000000000</text:p>
          </table:table-cell>
          <table:table-cell table:formula="of:=[.D569]-[.D56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B568]+22" office:value-type="float" office:value="12496" calcext:value-type="float">
            <text:p>12496</text:p>
          </table:table-cell>
          <table:table-cell office:value-type="float" office:value="8640000" calcext:value-type="float">
            <text:p>8640000</text:p>
          </table:table-cell>
          <table:table-cell table:formula="of:=[.B569]/[.C569]" office:value-type="float" office:value="0.0014462962962963" calcext:value-type="float">
            <text:p>0,00144629629629630000</text:p>
          </table:table-cell>
          <table:table-cell table:formula="of:=[.D570]-[.D56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B569]+22" office:value-type="float" office:value="12518" calcext:value-type="float">
            <text:p>12518</text:p>
          </table:table-cell>
          <table:table-cell office:value-type="float" office:value="8640000" calcext:value-type="float">
            <text:p>8640000</text:p>
          </table:table-cell>
          <table:table-cell table:formula="of:=[.B570]/[.C570]" office:value-type="float" office:value="0.00144884259259259" calcext:value-type="float">
            <text:p>0,00144884259259259000</text:p>
          </table:table-cell>
          <table:table-cell table:formula="of:=[.D571]-[.D57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B570]+22" office:value-type="float" office:value="12540" calcext:value-type="float">
            <text:p>12540</text:p>
          </table:table-cell>
          <table:table-cell office:value-type="float" office:value="8640000" calcext:value-type="float">
            <text:p>8640000</text:p>
          </table:table-cell>
          <table:table-cell table:formula="of:=[.B571]/[.C571]" office:value-type="float" office:value="0.00145138888888889" calcext:value-type="float">
            <text:p>0,00145138888888889000</text:p>
          </table:table-cell>
          <table:table-cell table:formula="of:=[.D572]-[.D571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B571]+22" office:value-type="float" office:value="12562" calcext:value-type="float">
            <text:p>12562</text:p>
          </table:table-cell>
          <table:table-cell office:value-type="float" office:value="8640000" calcext:value-type="float">
            <text:p>8640000</text:p>
          </table:table-cell>
          <table:table-cell table:formula="of:=[.B572]/[.C572]" office:value-type="float" office:value="0.00145393518518519" calcext:value-type="float">
            <text:p>0,00145393518518519000</text:p>
          </table:table-cell>
          <table:table-cell table:formula="of:=[.D573]-[.D57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B572]+22" office:value-type="float" office:value="12584" calcext:value-type="float">
            <text:p>12584</text:p>
          </table:table-cell>
          <table:table-cell office:value-type="float" office:value="8640000" calcext:value-type="float">
            <text:p>8640000</text:p>
          </table:table-cell>
          <table:table-cell table:formula="of:=[.B573]/[.C573]" office:value-type="float" office:value="0.00145648148148148" calcext:value-type="float">
            <text:p>0,00145648148148148000</text:p>
          </table:table-cell>
          <table:table-cell table:formula="of:=[.D574]-[.D57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B573]+22" office:value-type="float" office:value="12606" calcext:value-type="float">
            <text:p>12606</text:p>
          </table:table-cell>
          <table:table-cell office:value-type="float" office:value="8640000" calcext:value-type="float">
            <text:p>8640000</text:p>
          </table:table-cell>
          <table:table-cell table:formula="of:=[.B574]/[.C574]" office:value-type="float" office:value="0.00145902777777778" calcext:value-type="float">
            <text:p>0,00145902777777778000</text:p>
          </table:table-cell>
          <table:table-cell table:formula="of:=[.D575]-[.D57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B574]+22" office:value-type="float" office:value="12628" calcext:value-type="float">
            <text:p>12628</text:p>
          </table:table-cell>
          <table:table-cell office:value-type="float" office:value="8640000" calcext:value-type="float">
            <text:p>8640000</text:p>
          </table:table-cell>
          <table:table-cell table:formula="of:=[.B575]/[.C575]" office:value-type="float" office:value="0.00146157407407407" calcext:value-type="float">
            <text:p>0,00146157407407407000</text:p>
          </table:table-cell>
          <table:table-cell table:formula="of:=[.D576]-[.D57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B575]+22" office:value-type="float" office:value="12650" calcext:value-type="float">
            <text:p>12650</text:p>
          </table:table-cell>
          <table:table-cell office:value-type="float" office:value="8640000" calcext:value-type="float">
            <text:p>8640000</text:p>
          </table:table-cell>
          <table:table-cell table:formula="of:=[.B576]/[.C576]" office:value-type="float" office:value="0.00146412037037037" calcext:value-type="float">
            <text:p>0,00146412037037037000</text:p>
          </table:table-cell>
          <table:table-cell table:formula="of:=[.D577]-[.D57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B576]+22" office:value-type="float" office:value="12672" calcext:value-type="float">
            <text:p>12672</text:p>
          </table:table-cell>
          <table:table-cell office:value-type="float" office:value="8640000" calcext:value-type="float">
            <text:p>8640000</text:p>
          </table:table-cell>
          <table:table-cell table:formula="of:=[.B577]/[.C577]" office:value-type="float" office:value="0.00146666666666667" calcext:value-type="float">
            <text:p>0,00146666666666667000</text:p>
          </table:table-cell>
          <table:table-cell table:formula="of:=[.D578]-[.D57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B577]+22" office:value-type="float" office:value="12694" calcext:value-type="float">
            <text:p>12694</text:p>
          </table:table-cell>
          <table:table-cell office:value-type="float" office:value="8640000" calcext:value-type="float">
            <text:p>8640000</text:p>
          </table:table-cell>
          <table:table-cell table:formula="of:=[.B578]/[.C578]" office:value-type="float" office:value="0.00146921296296296" calcext:value-type="float">
            <text:p>0,00146921296296296000</text:p>
          </table:table-cell>
          <table:table-cell table:formula="of:=[.D579]-[.D57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B578]+22" office:value-type="float" office:value="12716" calcext:value-type="float">
            <text:p>12716</text:p>
          </table:table-cell>
          <table:table-cell office:value-type="float" office:value="8640000" calcext:value-type="float">
            <text:p>8640000</text:p>
          </table:table-cell>
          <table:table-cell table:formula="of:=[.B579]/[.C579]" office:value-type="float" office:value="0.00147175925925926" calcext:value-type="float">
            <text:p>0,00147175925925926000</text:p>
          </table:table-cell>
          <table:table-cell table:formula="of:=[.D580]-[.D57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B579]+22" office:value-type="float" office:value="12738" calcext:value-type="float">
            <text:p>12738</text:p>
          </table:table-cell>
          <table:table-cell office:value-type="float" office:value="8640000" calcext:value-type="float">
            <text:p>8640000</text:p>
          </table:table-cell>
          <table:table-cell table:formula="of:=[.B580]/[.C580]" office:value-type="float" office:value="0.00147430555555556" calcext:value-type="float">
            <text:p>0,00147430555555556000</text:p>
          </table:table-cell>
          <table:table-cell table:formula="of:=[.D581]-[.D58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B580]+22" office:value-type="float" office:value="12760" calcext:value-type="float">
            <text:p>12760</text:p>
          </table:table-cell>
          <table:table-cell office:value-type="float" office:value="8640000" calcext:value-type="float">
            <text:p>8640000</text:p>
          </table:table-cell>
          <table:table-cell table:formula="of:=[.B581]/[.C581]" office:value-type="float" office:value="0.00147685185185185" calcext:value-type="float">
            <text:p>0,00147685185185185000</text:p>
          </table:table-cell>
          <table:table-cell table:formula="of:=[.D582]-[.D58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B581]+22" office:value-type="float" office:value="12782" calcext:value-type="float">
            <text:p>12782</text:p>
          </table:table-cell>
          <table:table-cell office:value-type="float" office:value="8640000" calcext:value-type="float">
            <text:p>8640000</text:p>
          </table:table-cell>
          <table:table-cell table:formula="of:=[.B582]/[.C582]" office:value-type="float" office:value="0.00147939814814815" calcext:value-type="float">
            <text:p>0,00147939814814815000</text:p>
          </table:table-cell>
          <table:table-cell table:formula="of:=[.D583]-[.D58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B582]+22" office:value-type="float" office:value="12804" calcext:value-type="float">
            <text:p>12804</text:p>
          </table:table-cell>
          <table:table-cell office:value-type="float" office:value="8640000" calcext:value-type="float">
            <text:p>8640000</text:p>
          </table:table-cell>
          <table:table-cell table:formula="of:=[.B583]/[.C583]" office:value-type="float" office:value="0.00148194444444444" calcext:value-type="float">
            <text:p>0,00148194444444444000</text:p>
          </table:table-cell>
          <table:table-cell table:formula="of:=[.D584]-[.D58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B583]+22" office:value-type="float" office:value="12826" calcext:value-type="float">
            <text:p>12826</text:p>
          </table:table-cell>
          <table:table-cell office:value-type="float" office:value="8640000" calcext:value-type="float">
            <text:p>8640000</text:p>
          </table:table-cell>
          <table:table-cell table:formula="of:=[.B584]/[.C584]" office:value-type="float" office:value="0.00148449074074074" calcext:value-type="float">
            <text:p>0,00148449074074074000</text:p>
          </table:table-cell>
          <table:table-cell table:formula="of:=[.D585]-[.D58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B584]+22" office:value-type="float" office:value="12848" calcext:value-type="float">
            <text:p>12848</text:p>
          </table:table-cell>
          <table:table-cell office:value-type="float" office:value="8640000" calcext:value-type="float">
            <text:p>8640000</text:p>
          </table:table-cell>
          <table:table-cell table:formula="of:=[.B585]/[.C585]" office:value-type="float" office:value="0.00148703703703704" calcext:value-type="float">
            <text:p>0,00148703703703704000</text:p>
          </table:table-cell>
          <table:table-cell table:formula="of:=[.D586]-[.D585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B585]+22" office:value-type="float" office:value="12870" calcext:value-type="float">
            <text:p>12870</text:p>
          </table:table-cell>
          <table:table-cell office:value-type="float" office:value="8640000" calcext:value-type="float">
            <text:p>8640000</text:p>
          </table:table-cell>
          <table:table-cell table:formula="of:=[.B586]/[.C586]" office:value-type="float" office:value="0.00148958333333333" calcext:value-type="float">
            <text:p>0,00148958333333333000</text:p>
          </table:table-cell>
          <table:table-cell table:formula="of:=[.D587]-[.D58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B586]+22" office:value-type="float" office:value="12892" calcext:value-type="float">
            <text:p>12892</text:p>
          </table:table-cell>
          <table:table-cell office:value-type="float" office:value="8640000" calcext:value-type="float">
            <text:p>8640000</text:p>
          </table:table-cell>
          <table:table-cell table:formula="of:=[.B587]/[.C587]" office:value-type="float" office:value="0.00149212962962963" calcext:value-type="float">
            <text:p>0,00149212962962963000</text:p>
          </table:table-cell>
          <table:table-cell table:formula="of:=[.D588]-[.D58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B587]+22" office:value-type="float" office:value="12914" calcext:value-type="float">
            <text:p>12914</text:p>
          </table:table-cell>
          <table:table-cell office:value-type="float" office:value="8640000" calcext:value-type="float">
            <text:p>8640000</text:p>
          </table:table-cell>
          <table:table-cell table:formula="of:=[.B588]/[.C588]" office:value-type="float" office:value="0.00149467592592593" calcext:value-type="float">
            <text:p>0,00149467592592593000</text:p>
          </table:table-cell>
          <table:table-cell table:formula="of:=[.D589]-[.D58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B588]+22" office:value-type="float" office:value="12936" calcext:value-type="float">
            <text:p>12936</text:p>
          </table:table-cell>
          <table:table-cell office:value-type="float" office:value="8640000" calcext:value-type="float">
            <text:p>8640000</text:p>
          </table:table-cell>
          <table:table-cell table:formula="of:=[.B589]/[.C589]" office:value-type="float" office:value="0.00149722222222222" calcext:value-type="float">
            <text:p>0,00149722222222222000</text:p>
          </table:table-cell>
          <table:table-cell table:formula="of:=[.D590]-[.D58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B589]+22" office:value-type="float" office:value="12958" calcext:value-type="float">
            <text:p>12958</text:p>
          </table:table-cell>
          <table:table-cell office:value-type="float" office:value="8640000" calcext:value-type="float">
            <text:p>8640000</text:p>
          </table:table-cell>
          <table:table-cell table:formula="of:=[.B590]/[.C590]" office:value-type="float" office:value="0.00149976851851852" calcext:value-type="float">
            <text:p>0,00149976851851852000</text:p>
          </table:table-cell>
          <table:table-cell table:formula="of:=[.D591]-[.D59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B590]+22" office:value-type="float" office:value="12980" calcext:value-type="float">
            <text:p>12980</text:p>
          </table:table-cell>
          <table:table-cell office:value-type="float" office:value="8640000" calcext:value-type="float">
            <text:p>8640000</text:p>
          </table:table-cell>
          <table:table-cell table:formula="of:=[.B591]/[.C591]" office:value-type="float" office:value="0.00150231481481481" calcext:value-type="float">
            <text:p>0,00150231481481481000</text:p>
          </table:table-cell>
          <table:table-cell table:formula="of:=[.D592]-[.D59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B591]+22" office:value-type="float" office:value="13002" calcext:value-type="float">
            <text:p>13002</text:p>
          </table:table-cell>
          <table:table-cell office:value-type="float" office:value="8640000" calcext:value-type="float">
            <text:p>8640000</text:p>
          </table:table-cell>
          <table:table-cell table:formula="of:=[.B592]/[.C592]" office:value-type="float" office:value="0.00150486111111111" calcext:value-type="float">
            <text:p>0,00150486111111111000</text:p>
          </table:table-cell>
          <table:table-cell table:formula="of:=[.D593]-[.D59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B592]+22" office:value-type="float" office:value="13024" calcext:value-type="float">
            <text:p>13024</text:p>
          </table:table-cell>
          <table:table-cell office:value-type="float" office:value="8640000" calcext:value-type="float">
            <text:p>8640000</text:p>
          </table:table-cell>
          <table:table-cell table:formula="of:=[.B593]/[.C593]" office:value-type="float" office:value="0.00150740740740741" calcext:value-type="float">
            <text:p>0,00150740740740741000</text:p>
          </table:table-cell>
          <table:table-cell table:formula="of:=[.D594]-[.D59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B593]+22" office:value-type="float" office:value="13046" calcext:value-type="float">
            <text:p>13046</text:p>
          </table:table-cell>
          <table:table-cell office:value-type="float" office:value="8640000" calcext:value-type="float">
            <text:p>8640000</text:p>
          </table:table-cell>
          <table:table-cell table:formula="of:=[.B594]/[.C594]" office:value-type="float" office:value="0.0015099537037037" calcext:value-type="float">
            <text:p>0,00150995370370370000</text:p>
          </table:table-cell>
          <table:table-cell table:formula="of:=[.D595]-[.D59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B594]+22" office:value-type="float" office:value="13068" calcext:value-type="float">
            <text:p>13068</text:p>
          </table:table-cell>
          <table:table-cell office:value-type="float" office:value="8640000" calcext:value-type="float">
            <text:p>8640000</text:p>
          </table:table-cell>
          <table:table-cell table:formula="of:=[.B595]/[.C595]" office:value-type="float" office:value="0.0015125" calcext:value-type="float">
            <text:p>0,00151250000000000000</text:p>
          </table:table-cell>
          <table:table-cell table:formula="of:=[.D596]-[.D59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B595]+22" office:value-type="float" office:value="13090" calcext:value-type="float">
            <text:p>13090</text:p>
          </table:table-cell>
          <table:table-cell office:value-type="float" office:value="8640000" calcext:value-type="float">
            <text:p>8640000</text:p>
          </table:table-cell>
          <table:table-cell table:formula="of:=[.B596]/[.C596]" office:value-type="float" office:value="0.0015150462962963" calcext:value-type="float">
            <text:p>0,00151504629629630000</text:p>
          </table:table-cell>
          <table:table-cell table:formula="of:=[.D597]-[.D59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B596]+22" office:value-type="float" office:value="13112" calcext:value-type="float">
            <text:p>13112</text:p>
          </table:table-cell>
          <table:table-cell office:value-type="float" office:value="8640000" calcext:value-type="float">
            <text:p>8640000</text:p>
          </table:table-cell>
          <table:table-cell table:formula="of:=[.B597]/[.C597]" office:value-type="float" office:value="0.00151759259259259" calcext:value-type="float">
            <text:p>0,00151759259259259000</text:p>
          </table:table-cell>
          <table:table-cell table:formula="of:=[.D598]-[.D59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B597]+22" office:value-type="float" office:value="13134" calcext:value-type="float">
            <text:p>13134</text:p>
          </table:table-cell>
          <table:table-cell office:value-type="float" office:value="8640000" calcext:value-type="float">
            <text:p>8640000</text:p>
          </table:table-cell>
          <table:table-cell table:formula="of:=[.B598]/[.C598]" office:value-type="float" office:value="0.00152013888888889" calcext:value-type="float">
            <text:p>0,00152013888888889000</text:p>
          </table:table-cell>
          <table:table-cell table:formula="of:=[.D599]-[.D59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B598]+22" office:value-type="float" office:value="13156" calcext:value-type="float">
            <text:p>13156</text:p>
          </table:table-cell>
          <table:table-cell office:value-type="float" office:value="8640000" calcext:value-type="float">
            <text:p>8640000</text:p>
          </table:table-cell>
          <table:table-cell table:formula="of:=[.B599]/[.C599]" office:value-type="float" office:value="0.00152268518518519" calcext:value-type="float">
            <text:p>0,00152268518518518000</text:p>
          </table:table-cell>
          <table:table-cell table:formula="of:=[.D600]-[.D599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B599]+22" office:value-type="float" office:value="13178" calcext:value-type="float">
            <text:p>13178</text:p>
          </table:table-cell>
          <table:table-cell office:value-type="float" office:value="8640000" calcext:value-type="float">
            <text:p>8640000</text:p>
          </table:table-cell>
          <table:table-cell table:formula="of:=[.B600]/[.C600]" office:value-type="float" office:value="0.00152523148148148" calcext:value-type="float">
            <text:p>0,00152523148148148000</text:p>
          </table:table-cell>
          <table:table-cell table:formula="of:=[.D601]-[.D60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B600]+22" office:value-type="float" office:value="13200" calcext:value-type="float">
            <text:p>13200</text:p>
          </table:table-cell>
          <table:table-cell office:value-type="float" office:value="8640000" calcext:value-type="float">
            <text:p>8640000</text:p>
          </table:table-cell>
          <table:table-cell table:formula="of:=[.B601]/[.C601]" office:value-type="float" office:value="0.00152777777777778" calcext:value-type="float">
            <text:p>0,00152777777777778000</text:p>
          </table:table-cell>
          <table:table-cell table:formula="of:=[.D602]-[.D60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B601]+22" office:value-type="float" office:value="13222" calcext:value-type="float">
            <text:p>13222</text:p>
          </table:table-cell>
          <table:table-cell office:value-type="float" office:value="8640000" calcext:value-type="float">
            <text:p>8640000</text:p>
          </table:table-cell>
          <table:table-cell table:formula="of:=[.B602]/[.C602]" office:value-type="float" office:value="0.00153032407407407" calcext:value-type="float">
            <text:p>0,00153032407407407000</text:p>
          </table:table-cell>
          <table:table-cell table:formula="of:=[.D603]-[.D60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B602]+22" office:value-type="float" office:value="13244" calcext:value-type="float">
            <text:p>13244</text:p>
          </table:table-cell>
          <table:table-cell office:value-type="float" office:value="8640000" calcext:value-type="float">
            <text:p>8640000</text:p>
          </table:table-cell>
          <table:table-cell table:formula="of:=[.B603]/[.C603]" office:value-type="float" office:value="0.00153287037037037" calcext:value-type="float">
            <text:p>0,00153287037037037000</text:p>
          </table:table-cell>
          <table:table-cell table:formula="of:=[.D604]-[.D60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B603]+22" office:value-type="float" office:value="13266" calcext:value-type="float">
            <text:p>13266</text:p>
          </table:table-cell>
          <table:table-cell office:value-type="float" office:value="8640000" calcext:value-type="float">
            <text:p>8640000</text:p>
          </table:table-cell>
          <table:table-cell table:formula="of:=[.B604]/[.C604]" office:value-type="float" office:value="0.00153541666666667" calcext:value-type="float">
            <text:p>0,00153541666666667000</text:p>
          </table:table-cell>
          <table:table-cell table:formula="of:=[.D605]-[.D60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B604]+22" office:value-type="float" office:value="13288" calcext:value-type="float">
            <text:p>13288</text:p>
          </table:table-cell>
          <table:table-cell office:value-type="float" office:value="8640000" calcext:value-type="float">
            <text:p>8640000</text:p>
          </table:table-cell>
          <table:table-cell table:formula="of:=[.B605]/[.C605]" office:value-type="float" office:value="0.00153796296296296" calcext:value-type="float">
            <text:p>0,00153796296296296000</text:p>
          </table:table-cell>
          <table:table-cell table:formula="of:=[.D606]-[.D60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B605]+22" office:value-type="float" office:value="13310" calcext:value-type="float">
            <text:p>13310</text:p>
          </table:table-cell>
          <table:table-cell office:value-type="float" office:value="8640000" calcext:value-type="float">
            <text:p>8640000</text:p>
          </table:table-cell>
          <table:table-cell table:formula="of:=[.B606]/[.C606]" office:value-type="float" office:value="0.00154050925925926" calcext:value-type="float">
            <text:p>0,00154050925925926000</text:p>
          </table:table-cell>
          <table:table-cell table:formula="of:=[.D607]-[.D60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B606]+22" office:value-type="float" office:value="13332" calcext:value-type="float">
            <text:p>13332</text:p>
          </table:table-cell>
          <table:table-cell office:value-type="float" office:value="8640000" calcext:value-type="float">
            <text:p>8640000</text:p>
          </table:table-cell>
          <table:table-cell table:formula="of:=[.B607]/[.C607]" office:value-type="float" office:value="0.00154305555555556" calcext:value-type="float">
            <text:p>0,00154305555555556000</text:p>
          </table:table-cell>
          <table:table-cell table:formula="of:=[.D608]-[.D60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B607]+22" office:value-type="float" office:value="13354" calcext:value-type="float">
            <text:p>13354</text:p>
          </table:table-cell>
          <table:table-cell office:value-type="float" office:value="8640000" calcext:value-type="float">
            <text:p>8640000</text:p>
          </table:table-cell>
          <table:table-cell table:formula="of:=[.B608]/[.C608]" office:value-type="float" office:value="0.00154560185185185" calcext:value-type="float">
            <text:p>0,00154560185185185000</text:p>
          </table:table-cell>
          <table:table-cell table:formula="of:=[.D609]-[.D60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B608]+22" office:value-type="float" office:value="13376" calcext:value-type="float">
            <text:p>13376</text:p>
          </table:table-cell>
          <table:table-cell office:value-type="float" office:value="8640000" calcext:value-type="float">
            <text:p>8640000</text:p>
          </table:table-cell>
          <table:table-cell table:formula="of:=[.B609]/[.C609]" office:value-type="float" office:value="0.00154814814814815" calcext:value-type="float">
            <text:p>0,00154814814814815000</text:p>
          </table:table-cell>
          <table:table-cell table:formula="of:=[.D610]-[.D60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B609]+22" office:value-type="float" office:value="13398" calcext:value-type="float">
            <text:p>13398</text:p>
          </table:table-cell>
          <table:table-cell office:value-type="float" office:value="8640000" calcext:value-type="float">
            <text:p>8640000</text:p>
          </table:table-cell>
          <table:table-cell table:formula="of:=[.B610]/[.C610]" office:value-type="float" office:value="0.00155069444444444" calcext:value-type="float">
            <text:p>0,00155069444444444000</text:p>
          </table:table-cell>
          <table:table-cell table:formula="of:=[.D611]-[.D61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B610]+22" office:value-type="float" office:value="13420" calcext:value-type="float">
            <text:p>13420</text:p>
          </table:table-cell>
          <table:table-cell office:value-type="float" office:value="8640000" calcext:value-type="float">
            <text:p>8640000</text:p>
          </table:table-cell>
          <table:table-cell table:formula="of:=[.B611]/[.C611]" office:value-type="float" office:value="0.00155324074074074" calcext:value-type="float">
            <text:p>0,00155324074074074000</text:p>
          </table:table-cell>
          <table:table-cell table:formula="of:=[.D612]-[.D61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B611]+22" office:value-type="float" office:value="13442" calcext:value-type="float">
            <text:p>13442</text:p>
          </table:table-cell>
          <table:table-cell office:value-type="float" office:value="8640000" calcext:value-type="float">
            <text:p>8640000</text:p>
          </table:table-cell>
          <table:table-cell table:formula="of:=[.B612]/[.C612]" office:value-type="float" office:value="0.00155578703703704" calcext:value-type="float">
            <text:p>0,00155578703703704000</text:p>
          </table:table-cell>
          <table:table-cell table:formula="of:=[.D613]-[.D61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B612]+22" office:value-type="float" office:value="13464" calcext:value-type="float">
            <text:p>13464</text:p>
          </table:table-cell>
          <table:table-cell office:value-type="float" office:value="8640000" calcext:value-type="float">
            <text:p>8640000</text:p>
          </table:table-cell>
          <table:table-cell table:formula="of:=[.B613]/[.C613]" office:value-type="float" office:value="0.00155833333333333" calcext:value-type="float">
            <text:p>0,00155833333333333000</text:p>
          </table:table-cell>
          <table:table-cell table:formula="of:=[.D614]-[.D613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B613]+22" office:value-type="float" office:value="13486" calcext:value-type="float">
            <text:p>13486</text:p>
          </table:table-cell>
          <table:table-cell office:value-type="float" office:value="8640000" calcext:value-type="float">
            <text:p>8640000</text:p>
          </table:table-cell>
          <table:table-cell table:formula="of:=[.B614]/[.C614]" office:value-type="float" office:value="0.00156087962962963" calcext:value-type="float">
            <text:p>0,00156087962962963000</text:p>
          </table:table-cell>
          <table:table-cell table:formula="of:=[.D615]-[.D61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B614]+22" office:value-type="float" office:value="13508" calcext:value-type="float">
            <text:p>13508</text:p>
          </table:table-cell>
          <table:table-cell office:value-type="float" office:value="8640000" calcext:value-type="float">
            <text:p>8640000</text:p>
          </table:table-cell>
          <table:table-cell table:formula="of:=[.B615]/[.C615]" office:value-type="float" office:value="0.00156342592592593" calcext:value-type="float">
            <text:p>0,00156342592592593000</text:p>
          </table:table-cell>
          <table:table-cell table:formula="of:=[.D616]-[.D61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B615]+22" office:value-type="float" office:value="13530" calcext:value-type="float">
            <text:p>13530</text:p>
          </table:table-cell>
          <table:table-cell office:value-type="float" office:value="8640000" calcext:value-type="float">
            <text:p>8640000</text:p>
          </table:table-cell>
          <table:table-cell table:formula="of:=[.B616]/[.C616]" office:value-type="float" office:value="0.00156597222222222" calcext:value-type="float">
            <text:p>0,00156597222222222000</text:p>
          </table:table-cell>
          <table:table-cell table:formula="of:=[.D617]-[.D61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B616]+22" office:value-type="float" office:value="13552" calcext:value-type="float">
            <text:p>13552</text:p>
          </table:table-cell>
          <table:table-cell office:value-type="float" office:value="8640000" calcext:value-type="float">
            <text:p>8640000</text:p>
          </table:table-cell>
          <table:table-cell table:formula="of:=[.B617]/[.C617]" office:value-type="float" office:value="0.00156851851851852" calcext:value-type="float">
            <text:p>0,00156851851851852000</text:p>
          </table:table-cell>
          <table:table-cell table:formula="of:=[.D618]-[.D61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B617]+22" office:value-type="float" office:value="13574" calcext:value-type="float">
            <text:p>13574</text:p>
          </table:table-cell>
          <table:table-cell office:value-type="float" office:value="8640000" calcext:value-type="float">
            <text:p>8640000</text:p>
          </table:table-cell>
          <table:table-cell table:formula="of:=[.B618]/[.C618]" office:value-type="float" office:value="0.00157106481481481" calcext:value-type="float">
            <text:p>0,00157106481481481000</text:p>
          </table:table-cell>
          <table:table-cell table:formula="of:=[.D619]-[.D61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B618]+22" office:value-type="float" office:value="13596" calcext:value-type="float">
            <text:p>13596</text:p>
          </table:table-cell>
          <table:table-cell office:value-type="float" office:value="8640000" calcext:value-type="float">
            <text:p>8640000</text:p>
          </table:table-cell>
          <table:table-cell table:formula="of:=[.B619]/[.C619]" office:value-type="float" office:value="0.00157361111111111" calcext:value-type="float">
            <text:p>0,00157361111111111000</text:p>
          </table:table-cell>
          <table:table-cell table:formula="of:=[.D620]-[.D61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B619]+22" office:value-type="float" office:value="13618" calcext:value-type="float">
            <text:p>13618</text:p>
          </table:table-cell>
          <table:table-cell office:value-type="float" office:value="8640000" calcext:value-type="float">
            <text:p>8640000</text:p>
          </table:table-cell>
          <table:table-cell table:formula="of:=[.B620]/[.C620]" office:value-type="float" office:value="0.00157615740740741" calcext:value-type="float">
            <text:p>0,00157615740740741000</text:p>
          </table:table-cell>
          <table:table-cell table:formula="of:=[.D621]-[.D62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B620]+22" office:value-type="float" office:value="13640" calcext:value-type="float">
            <text:p>13640</text:p>
          </table:table-cell>
          <table:table-cell office:value-type="float" office:value="8640000" calcext:value-type="float">
            <text:p>8640000</text:p>
          </table:table-cell>
          <table:table-cell table:formula="of:=[.B621]/[.C621]" office:value-type="float" office:value="0.0015787037037037" calcext:value-type="float">
            <text:p>0,00157870370370370000</text:p>
          </table:table-cell>
          <table:table-cell table:formula="of:=[.D622]-[.D62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B621]+22" office:value-type="float" office:value="13662" calcext:value-type="float">
            <text:p>13662</text:p>
          </table:table-cell>
          <table:table-cell office:value-type="float" office:value="8640000" calcext:value-type="float">
            <text:p>8640000</text:p>
          </table:table-cell>
          <table:table-cell table:formula="of:=[.B622]/[.C622]" office:value-type="float" office:value="0.00158125" calcext:value-type="float">
            <text:p>0,00158125000000000000</text:p>
          </table:table-cell>
          <table:table-cell table:formula="of:=[.D623]-[.D62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B622]+22" office:value-type="float" office:value="13684" calcext:value-type="float">
            <text:p>13684</text:p>
          </table:table-cell>
          <table:table-cell office:value-type="float" office:value="8640000" calcext:value-type="float">
            <text:p>8640000</text:p>
          </table:table-cell>
          <table:table-cell table:formula="of:=[.B623]/[.C623]" office:value-type="float" office:value="0.0015837962962963" calcext:value-type="float">
            <text:p>0,00158379629629630000</text:p>
          </table:table-cell>
          <table:table-cell table:formula="of:=[.D624]-[.D62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B623]+22" office:value-type="float" office:value="13706" calcext:value-type="float">
            <text:p>13706</text:p>
          </table:table-cell>
          <table:table-cell office:value-type="float" office:value="8640000" calcext:value-type="float">
            <text:p>8640000</text:p>
          </table:table-cell>
          <table:table-cell table:formula="of:=[.B624]/[.C624]" office:value-type="float" office:value="0.00158634259259259" calcext:value-type="float">
            <text:p>0,00158634259259259000</text:p>
          </table:table-cell>
          <table:table-cell table:formula="of:=[.D625]-[.D62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B624]+22" office:value-type="float" office:value="13728" calcext:value-type="float">
            <text:p>13728</text:p>
          </table:table-cell>
          <table:table-cell office:value-type="float" office:value="8640000" calcext:value-type="float">
            <text:p>8640000</text:p>
          </table:table-cell>
          <table:table-cell table:formula="of:=[.B625]/[.C625]" office:value-type="float" office:value="0.00158888888888889" calcext:value-type="float">
            <text:p>0,00158888888888889000</text:p>
          </table:table-cell>
          <table:table-cell table:formula="of:=[.D626]-[.D62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B625]+22" office:value-type="float" office:value="13750" calcext:value-type="float">
            <text:p>13750</text:p>
          </table:table-cell>
          <table:table-cell office:value-type="float" office:value="8640000" calcext:value-type="float">
            <text:p>8640000</text:p>
          </table:table-cell>
          <table:table-cell table:formula="of:=[.B626]/[.C626]" office:value-type="float" office:value="0.00159143518518519" calcext:value-type="float">
            <text:p>0,00159143518518518000</text:p>
          </table:table-cell>
          <table:table-cell table:formula="of:=[.D627]-[.D62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B626]+22" office:value-type="float" office:value="13772" calcext:value-type="float">
            <text:p>13772</text:p>
          </table:table-cell>
          <table:table-cell office:value-type="float" office:value="8640000" calcext:value-type="float">
            <text:p>8640000</text:p>
          </table:table-cell>
          <table:table-cell table:formula="of:=[.B627]/[.C627]" office:value-type="float" office:value="0.00159398148148148" calcext:value-type="float">
            <text:p>0,00159398148148148000</text:p>
          </table:table-cell>
          <table:table-cell table:formula="of:=[.D628]-[.D627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B627]+22" office:value-type="float" office:value="13794" calcext:value-type="float">
            <text:p>13794</text:p>
          </table:table-cell>
          <table:table-cell office:value-type="float" office:value="8640000" calcext:value-type="float">
            <text:p>8640000</text:p>
          </table:table-cell>
          <table:table-cell table:formula="of:=[.B628]/[.C628]" office:value-type="float" office:value="0.00159652777777778" calcext:value-type="float">
            <text:p>0,00159652777777778000</text:p>
          </table:table-cell>
          <table:table-cell table:formula="of:=[.D629]-[.D62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B628]+22" office:value-type="float" office:value="13816" calcext:value-type="float">
            <text:p>13816</text:p>
          </table:table-cell>
          <table:table-cell office:value-type="float" office:value="8640000" calcext:value-type="float">
            <text:p>8640000</text:p>
          </table:table-cell>
          <table:table-cell table:formula="of:=[.B629]/[.C629]" office:value-type="float" office:value="0.00159907407407407" calcext:value-type="float">
            <text:p>0,00159907407407407000</text:p>
          </table:table-cell>
          <table:table-cell table:formula="of:=[.D630]-[.D62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B629]+22" office:value-type="float" office:value="13838" calcext:value-type="float">
            <text:p>13838</text:p>
          </table:table-cell>
          <table:table-cell office:value-type="float" office:value="8640000" calcext:value-type="float">
            <text:p>8640000</text:p>
          </table:table-cell>
          <table:table-cell table:formula="of:=[.B630]/[.C630]" office:value-type="float" office:value="0.00160162037037037" calcext:value-type="float">
            <text:p>0,00160162037037037000</text:p>
          </table:table-cell>
          <table:table-cell table:formula="of:=[.D631]-[.D63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B630]+22" office:value-type="float" office:value="13860" calcext:value-type="float">
            <text:p>13860</text:p>
          </table:table-cell>
          <table:table-cell office:value-type="float" office:value="8640000" calcext:value-type="float">
            <text:p>8640000</text:p>
          </table:table-cell>
          <table:table-cell table:formula="of:=[.B631]/[.C631]" office:value-type="float" office:value="0.00160416666666667" calcext:value-type="float">
            <text:p>0,00160416666666667000</text:p>
          </table:table-cell>
          <table:table-cell table:formula="of:=[.D632]-[.D63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B631]+22" office:value-type="float" office:value="13882" calcext:value-type="float">
            <text:p>13882</text:p>
          </table:table-cell>
          <table:table-cell office:value-type="float" office:value="8640000" calcext:value-type="float">
            <text:p>8640000</text:p>
          </table:table-cell>
          <table:table-cell table:formula="of:=[.B632]/[.C632]" office:value-type="float" office:value="0.00160671296296296" calcext:value-type="float">
            <text:p>0,00160671296296296000</text:p>
          </table:table-cell>
          <table:table-cell table:formula="of:=[.D633]-[.D63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B632]+22" office:value-type="float" office:value="13904" calcext:value-type="float">
            <text:p>13904</text:p>
          </table:table-cell>
          <table:table-cell office:value-type="float" office:value="8640000" calcext:value-type="float">
            <text:p>8640000</text:p>
          </table:table-cell>
          <table:table-cell table:formula="of:=[.B633]/[.C633]" office:value-type="float" office:value="0.00160925925925926" calcext:value-type="float">
            <text:p>0,00160925925925926000</text:p>
          </table:table-cell>
          <table:table-cell table:formula="of:=[.D634]-[.D63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B633]+22" office:value-type="float" office:value="13926" calcext:value-type="float">
            <text:p>13926</text:p>
          </table:table-cell>
          <table:table-cell office:value-type="float" office:value="8640000" calcext:value-type="float">
            <text:p>8640000</text:p>
          </table:table-cell>
          <table:table-cell table:formula="of:=[.B634]/[.C634]" office:value-type="float" office:value="0.00161180555555556" calcext:value-type="float">
            <text:p>0,00161180555555556000</text:p>
          </table:table-cell>
          <table:table-cell table:formula="of:=[.D635]-[.D63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B634]+22" office:value-type="float" office:value="13948" calcext:value-type="float">
            <text:p>13948</text:p>
          </table:table-cell>
          <table:table-cell office:value-type="float" office:value="8640000" calcext:value-type="float">
            <text:p>8640000</text:p>
          </table:table-cell>
          <table:table-cell table:formula="of:=[.B635]/[.C635]" office:value-type="float" office:value="0.00161435185185185" calcext:value-type="float">
            <text:p>0,00161435185185185000</text:p>
          </table:table-cell>
          <table:table-cell table:formula="of:=[.D636]-[.D63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B635]+22" office:value-type="float" office:value="13970" calcext:value-type="float">
            <text:p>13970</text:p>
          </table:table-cell>
          <table:table-cell office:value-type="float" office:value="8640000" calcext:value-type="float">
            <text:p>8640000</text:p>
          </table:table-cell>
          <table:table-cell table:formula="of:=[.B636]/[.C636]" office:value-type="float" office:value="0.00161689814814815" calcext:value-type="float">
            <text:p>0,00161689814814815000</text:p>
          </table:table-cell>
          <table:table-cell table:formula="of:=[.D637]-[.D63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B636]+22" office:value-type="float" office:value="13992" calcext:value-type="float">
            <text:p>13992</text:p>
          </table:table-cell>
          <table:table-cell office:value-type="float" office:value="8640000" calcext:value-type="float">
            <text:p>8640000</text:p>
          </table:table-cell>
          <table:table-cell table:formula="of:=[.B637]/[.C637]" office:value-type="float" office:value="0.00161944444444444" calcext:value-type="float">
            <text:p>0,00161944444444444000</text:p>
          </table:table-cell>
          <table:table-cell table:formula="of:=[.D638]-[.D63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B637]+22" office:value-type="float" office:value="14014" calcext:value-type="float">
            <text:p>14014</text:p>
          </table:table-cell>
          <table:table-cell office:value-type="float" office:value="8640000" calcext:value-type="float">
            <text:p>8640000</text:p>
          </table:table-cell>
          <table:table-cell table:formula="of:=[.B638]/[.C638]" office:value-type="float" office:value="0.00162199074074074" calcext:value-type="float">
            <text:p>0,00162199074074074000</text:p>
          </table:table-cell>
          <table:table-cell table:formula="of:=[.D639]-[.D63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B638]+22" office:value-type="float" office:value="14036" calcext:value-type="float">
            <text:p>14036</text:p>
          </table:table-cell>
          <table:table-cell office:value-type="float" office:value="8640000" calcext:value-type="float">
            <text:p>8640000</text:p>
          </table:table-cell>
          <table:table-cell table:formula="of:=[.B639]/[.C639]" office:value-type="float" office:value="0.00162453703703704" calcext:value-type="float">
            <text:p>0,00162453703703704000</text:p>
          </table:table-cell>
          <table:table-cell table:formula="of:=[.D640]-[.D63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B639]+22" office:value-type="float" office:value="14058" calcext:value-type="float">
            <text:p>14058</text:p>
          </table:table-cell>
          <table:table-cell office:value-type="float" office:value="8640000" calcext:value-type="float">
            <text:p>8640000</text:p>
          </table:table-cell>
          <table:table-cell table:formula="of:=[.B640]/[.C640]" office:value-type="float" office:value="0.00162708333333333" calcext:value-type="float">
            <text:p>0,00162708333333333000</text:p>
          </table:table-cell>
          <table:table-cell table:formula="of:=[.D641]-[.D64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640]+22" office:value-type="float" office:value="14080" calcext:value-type="float">
            <text:p>14080</text:p>
          </table:table-cell>
          <table:table-cell office:value-type="float" office:value="8640000" calcext:value-type="float">
            <text:p>8640000</text:p>
          </table:table-cell>
          <table:table-cell table:formula="of:=[.B641]/[.C641]" office:value-type="float" office:value="0.00162962962962963" calcext:value-type="float">
            <text:p>0,00162962962962963000</text:p>
          </table:table-cell>
          <table:table-cell table:formula="of:=[.D642]-[.D641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B641]+22" office:value-type="float" office:value="14102" calcext:value-type="float">
            <text:p>14102</text:p>
          </table:table-cell>
          <table:table-cell office:value-type="float" office:value="8640000" calcext:value-type="float">
            <text:p>8640000</text:p>
          </table:table-cell>
          <table:table-cell table:formula="of:=[.B642]/[.C642]" office:value-type="float" office:value="0.00163217592592593" calcext:value-type="float">
            <text:p>0,00163217592592593000</text:p>
          </table:table-cell>
          <table:table-cell table:formula="of:=[.D643]-[.D64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B642]+22" office:value-type="float" office:value="14124" calcext:value-type="float">
            <text:p>14124</text:p>
          </table:table-cell>
          <table:table-cell office:value-type="float" office:value="8640000" calcext:value-type="float">
            <text:p>8640000</text:p>
          </table:table-cell>
          <table:table-cell table:formula="of:=[.B643]/[.C643]" office:value-type="float" office:value="0.00163472222222222" calcext:value-type="float">
            <text:p>0,00163472222222222000</text:p>
          </table:table-cell>
          <table:table-cell table:formula="of:=[.D644]-[.D64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B643]+22" office:value-type="float" office:value="14146" calcext:value-type="float">
            <text:p>14146</text:p>
          </table:table-cell>
          <table:table-cell office:value-type="float" office:value="8640000" calcext:value-type="float">
            <text:p>8640000</text:p>
          </table:table-cell>
          <table:table-cell table:formula="of:=[.B644]/[.C644]" office:value-type="float" office:value="0.00163726851851852" calcext:value-type="float">
            <text:p>0,00163726851851852000</text:p>
          </table:table-cell>
          <table:table-cell table:formula="of:=[.D645]-[.D64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B644]+22" office:value-type="float" office:value="14168" calcext:value-type="float">
            <text:p>14168</text:p>
          </table:table-cell>
          <table:table-cell office:value-type="float" office:value="8640000" calcext:value-type="float">
            <text:p>8640000</text:p>
          </table:table-cell>
          <table:table-cell table:formula="of:=[.B645]/[.C645]" office:value-type="float" office:value="0.00163981481481481" calcext:value-type="float">
            <text:p>0,00163981481481481000</text:p>
          </table:table-cell>
          <table:table-cell table:formula="of:=[.D646]-[.D64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B645]+22" office:value-type="float" office:value="14190" calcext:value-type="float">
            <text:p>14190</text:p>
          </table:table-cell>
          <table:table-cell office:value-type="float" office:value="8640000" calcext:value-type="float">
            <text:p>8640000</text:p>
          </table:table-cell>
          <table:table-cell table:formula="of:=[.B646]/[.C646]" office:value-type="float" office:value="0.00164236111111111" calcext:value-type="float">
            <text:p>0,00164236111111111000</text:p>
          </table:table-cell>
          <table:table-cell table:formula="of:=[.D647]-[.D64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B646]+22" office:value-type="float" office:value="14212" calcext:value-type="float">
            <text:p>14212</text:p>
          </table:table-cell>
          <table:table-cell office:value-type="float" office:value="8640000" calcext:value-type="float">
            <text:p>8640000</text:p>
          </table:table-cell>
          <table:table-cell table:formula="of:=[.B647]/[.C647]" office:value-type="float" office:value="0.00164490740740741" calcext:value-type="float">
            <text:p>0,00164490740740741000</text:p>
          </table:table-cell>
          <table:table-cell table:formula="of:=[.D648]-[.D64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B647]+22" office:value-type="float" office:value="14234" calcext:value-type="float">
            <text:p>14234</text:p>
          </table:table-cell>
          <table:table-cell office:value-type="float" office:value="8640000" calcext:value-type="float">
            <text:p>8640000</text:p>
          </table:table-cell>
          <table:table-cell table:formula="of:=[.B648]/[.C648]" office:value-type="float" office:value="0.0016474537037037" calcext:value-type="float">
            <text:p>0,00164745370370370000</text:p>
          </table:table-cell>
          <table:table-cell table:formula="of:=[.D649]-[.D64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B648]+22" office:value-type="float" office:value="14256" calcext:value-type="float">
            <text:p>14256</text:p>
          </table:table-cell>
          <table:table-cell office:value-type="float" office:value="8640000" calcext:value-type="float">
            <text:p>8640000</text:p>
          </table:table-cell>
          <table:table-cell table:formula="of:=[.B649]/[.C649]" office:value-type="float" office:value="0.00165" calcext:value-type="float">
            <text:p>0,00165000000000000000</text:p>
          </table:table-cell>
          <table:table-cell table:formula="of:=[.D650]-[.D64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B649]+22" office:value-type="float" office:value="14278" calcext:value-type="float">
            <text:p>14278</text:p>
          </table:table-cell>
          <table:table-cell office:value-type="float" office:value="8640000" calcext:value-type="float">
            <text:p>8640000</text:p>
          </table:table-cell>
          <table:table-cell table:formula="of:=[.B650]/[.C650]" office:value-type="float" office:value="0.0016525462962963" calcext:value-type="float">
            <text:p>0,00165254629629630000</text:p>
          </table:table-cell>
          <table:table-cell table:formula="of:=[.D651]-[.D65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B650]+22" office:value-type="float" office:value="14300" calcext:value-type="float">
            <text:p>14300</text:p>
          </table:table-cell>
          <table:table-cell office:value-type="float" office:value="8640000" calcext:value-type="float">
            <text:p>8640000</text:p>
          </table:table-cell>
          <table:table-cell table:formula="of:=[.B651]/[.C651]" office:value-type="float" office:value="0.00165509259259259" calcext:value-type="float">
            <text:p>0,00165509259259259000</text:p>
          </table:table-cell>
          <table:table-cell table:formula="of:=[.D652]-[.D65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B651]+22" office:value-type="float" office:value="14322" calcext:value-type="float">
            <text:p>14322</text:p>
          </table:table-cell>
          <table:table-cell office:value-type="float" office:value="8640000" calcext:value-type="float">
            <text:p>8640000</text:p>
          </table:table-cell>
          <table:table-cell table:formula="of:=[.B652]/[.C652]" office:value-type="float" office:value="0.00165763888888889" calcext:value-type="float">
            <text:p>0,00165763888888889000</text:p>
          </table:table-cell>
          <table:table-cell table:formula="of:=[.D653]-[.D65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B652]+22" office:value-type="float" office:value="14344" calcext:value-type="float">
            <text:p>14344</text:p>
          </table:table-cell>
          <table:table-cell office:value-type="float" office:value="8640000" calcext:value-type="float">
            <text:p>8640000</text:p>
          </table:table-cell>
          <table:table-cell table:formula="of:=[.B653]/[.C653]" office:value-type="float" office:value="0.00166018518518519" calcext:value-type="float">
            <text:p>0,00166018518518519000</text:p>
          </table:table-cell>
          <table:table-cell table:formula="of:=[.D654]-[.D65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B653]+22" office:value-type="float" office:value="14366" calcext:value-type="float">
            <text:p>14366</text:p>
          </table:table-cell>
          <table:table-cell office:value-type="float" office:value="8640000" calcext:value-type="float">
            <text:p>8640000</text:p>
          </table:table-cell>
          <table:table-cell table:formula="of:=[.B654]/[.C654]" office:value-type="float" office:value="0.00166273148148148" calcext:value-type="float">
            <text:p>0,00166273148148148000</text:p>
          </table:table-cell>
          <table:table-cell table:formula="of:=[.D655]-[.D65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B654]+22" office:value-type="float" office:value="14388" calcext:value-type="float">
            <text:p>14388</text:p>
          </table:table-cell>
          <table:table-cell office:value-type="float" office:value="8640000" calcext:value-type="float">
            <text:p>8640000</text:p>
          </table:table-cell>
          <table:table-cell table:formula="of:=[.B655]/[.C655]" office:value-type="float" office:value="0.00166527777777778" calcext:value-type="float">
            <text:p>0,00166527777777778000</text:p>
          </table:table-cell>
          <table:table-cell table:formula="of:=[.D656]-[.D655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B655]+22" office:value-type="float" office:value="14410" calcext:value-type="float">
            <text:p>14410</text:p>
          </table:table-cell>
          <table:table-cell office:value-type="float" office:value="8640000" calcext:value-type="float">
            <text:p>8640000</text:p>
          </table:table-cell>
          <table:table-cell table:formula="of:=[.B656]/[.C656]" office:value-type="float" office:value="0.00166782407407407" calcext:value-type="float">
            <text:p>0,00166782407407407000</text:p>
          </table:table-cell>
          <table:table-cell table:formula="of:=[.D657]-[.D65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B656]+22" office:value-type="float" office:value="14432" calcext:value-type="float">
            <text:p>14432</text:p>
          </table:table-cell>
          <table:table-cell office:value-type="float" office:value="8640000" calcext:value-type="float">
            <text:p>8640000</text:p>
          </table:table-cell>
          <table:table-cell table:formula="of:=[.B657]/[.C657]" office:value-type="float" office:value="0.00167037037037037" calcext:value-type="float">
            <text:p>0,00167037037037037000</text:p>
          </table:table-cell>
          <table:table-cell table:formula="of:=[.D658]-[.D65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B657]+22" office:value-type="float" office:value="14454" calcext:value-type="float">
            <text:p>14454</text:p>
          </table:table-cell>
          <table:table-cell office:value-type="float" office:value="8640000" calcext:value-type="float">
            <text:p>8640000</text:p>
          </table:table-cell>
          <table:table-cell table:formula="of:=[.B658]/[.C658]" office:value-type="float" office:value="0.00167291666666667" calcext:value-type="float">
            <text:p>0,00167291666666667000</text:p>
          </table:table-cell>
          <table:table-cell table:formula="of:=[.D659]-[.D65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B658]+22" office:value-type="float" office:value="14476" calcext:value-type="float">
            <text:p>14476</text:p>
          </table:table-cell>
          <table:table-cell office:value-type="float" office:value="8640000" calcext:value-type="float">
            <text:p>8640000</text:p>
          </table:table-cell>
          <table:table-cell table:formula="of:=[.B659]/[.C659]" office:value-type="float" office:value="0.00167546296296296" calcext:value-type="float">
            <text:p>0,00167546296296296000</text:p>
          </table:table-cell>
          <table:table-cell table:formula="of:=[.D660]-[.D65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B659]+22" office:value-type="float" office:value="14498" calcext:value-type="float">
            <text:p>14498</text:p>
          </table:table-cell>
          <table:table-cell office:value-type="float" office:value="8640000" calcext:value-type="float">
            <text:p>8640000</text:p>
          </table:table-cell>
          <table:table-cell table:formula="of:=[.B660]/[.C660]" office:value-type="float" office:value="0.00167800925925926" calcext:value-type="float">
            <text:p>0,00167800925925926000</text:p>
          </table:table-cell>
          <table:table-cell table:formula="of:=[.D661]-[.D66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B660]+22" office:value-type="float" office:value="14520" calcext:value-type="float">
            <text:p>14520</text:p>
          </table:table-cell>
          <table:table-cell office:value-type="float" office:value="8640000" calcext:value-type="float">
            <text:p>8640000</text:p>
          </table:table-cell>
          <table:table-cell table:formula="of:=[.B661]/[.C661]" office:value-type="float" office:value="0.00168055555555556" calcext:value-type="float">
            <text:p>0,00168055555555556000</text:p>
          </table:table-cell>
          <table:table-cell table:formula="of:=[.D662]-[.D66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B661]+22" office:value-type="float" office:value="14542" calcext:value-type="float">
            <text:p>14542</text:p>
          </table:table-cell>
          <table:table-cell office:value-type="float" office:value="8640000" calcext:value-type="float">
            <text:p>8640000</text:p>
          </table:table-cell>
          <table:table-cell table:formula="of:=[.B662]/[.C662]" office:value-type="float" office:value="0.00168310185185185" calcext:value-type="float">
            <text:p>0,00168310185185185000</text:p>
          </table:table-cell>
          <table:table-cell table:formula="of:=[.D663]-[.D66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B662]+22" office:value-type="float" office:value="14564" calcext:value-type="float">
            <text:p>14564</text:p>
          </table:table-cell>
          <table:table-cell office:value-type="float" office:value="8640000" calcext:value-type="float">
            <text:p>8640000</text:p>
          </table:table-cell>
          <table:table-cell table:formula="of:=[.B663]/[.C663]" office:value-type="float" office:value="0.00168564814814815" calcext:value-type="float">
            <text:p>0,00168564814814815000</text:p>
          </table:table-cell>
          <table:table-cell table:formula="of:=[.D664]-[.D66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B663]+22" office:value-type="float" office:value="14586" calcext:value-type="float">
            <text:p>14586</text:p>
          </table:table-cell>
          <table:table-cell office:value-type="float" office:value="8640000" calcext:value-type="float">
            <text:p>8640000</text:p>
          </table:table-cell>
          <table:table-cell table:formula="of:=[.B664]/[.C664]" office:value-type="float" office:value="0.00168819444444444" calcext:value-type="float">
            <text:p>0,00168819444444444000</text:p>
          </table:table-cell>
          <table:table-cell table:formula="of:=[.D665]-[.D66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B664]+22" office:value-type="float" office:value="14608" calcext:value-type="float">
            <text:p>14608</text:p>
          </table:table-cell>
          <table:table-cell office:value-type="float" office:value="8640000" calcext:value-type="float">
            <text:p>8640000</text:p>
          </table:table-cell>
          <table:table-cell table:formula="of:=[.B665]/[.C665]" office:value-type="float" office:value="0.00169074074074074" calcext:value-type="float">
            <text:p>0,00169074074074074000</text:p>
          </table:table-cell>
          <table:table-cell table:formula="of:=[.D666]-[.D66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B665]+22" office:value-type="float" office:value="14630" calcext:value-type="float">
            <text:p>14630</text:p>
          </table:table-cell>
          <table:table-cell office:value-type="float" office:value="8640000" calcext:value-type="float">
            <text:p>8640000</text:p>
          </table:table-cell>
          <table:table-cell table:formula="of:=[.B666]/[.C666]" office:value-type="float" office:value="0.00169328703703704" calcext:value-type="float">
            <text:p>0,00169328703703704000</text:p>
          </table:table-cell>
          <table:table-cell table:formula="of:=[.D667]-[.D66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B666]+22" office:value-type="float" office:value="14652" calcext:value-type="float">
            <text:p>14652</text:p>
          </table:table-cell>
          <table:table-cell office:value-type="float" office:value="8640000" calcext:value-type="float">
            <text:p>8640000</text:p>
          </table:table-cell>
          <table:table-cell table:formula="of:=[.B667]/[.C667]" office:value-type="float" office:value="0.00169583333333333" calcext:value-type="float">
            <text:p>0,00169583333333333000</text:p>
          </table:table-cell>
          <table:table-cell table:formula="of:=[.D668]-[.D66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B667]+22" office:value-type="float" office:value="14674" calcext:value-type="float">
            <text:p>14674</text:p>
          </table:table-cell>
          <table:table-cell office:value-type="float" office:value="8640000" calcext:value-type="float">
            <text:p>8640000</text:p>
          </table:table-cell>
          <table:table-cell table:formula="of:=[.B668]/[.C668]" office:value-type="float" office:value="0.00169837962962963" calcext:value-type="float">
            <text:p>0,00169837962962963000</text:p>
          </table:table-cell>
          <table:table-cell table:formula="of:=[.D669]-[.D66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B668]+22" office:value-type="float" office:value="14696" calcext:value-type="float">
            <text:p>14696</text:p>
          </table:table-cell>
          <table:table-cell office:value-type="float" office:value="8640000" calcext:value-type="float">
            <text:p>8640000</text:p>
          </table:table-cell>
          <table:table-cell table:formula="of:=[.B669]/[.C669]" office:value-type="float" office:value="0.00170092592592593" calcext:value-type="float">
            <text:p>0,00170092592592593000</text:p>
          </table:table-cell>
          <table:table-cell table:formula="of:=[.D670]-[.D669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B669]+22" office:value-type="float" office:value="14718" calcext:value-type="float">
            <text:p>14718</text:p>
          </table:table-cell>
          <table:table-cell office:value-type="float" office:value="8640000" calcext:value-type="float">
            <text:p>8640000</text:p>
          </table:table-cell>
          <table:table-cell table:formula="of:=[.B670]/[.C670]" office:value-type="float" office:value="0.00170347222222222" calcext:value-type="float">
            <text:p>0,00170347222222222000</text:p>
          </table:table-cell>
          <table:table-cell table:formula="of:=[.D671]-[.D67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B670]+22" office:value-type="float" office:value="14740" calcext:value-type="float">
            <text:p>14740</text:p>
          </table:table-cell>
          <table:table-cell office:value-type="float" office:value="8640000" calcext:value-type="float">
            <text:p>8640000</text:p>
          </table:table-cell>
          <table:table-cell table:formula="of:=[.B671]/[.C671]" office:value-type="float" office:value="0.00170601851851852" calcext:value-type="float">
            <text:p>0,00170601851851852000</text:p>
          </table:table-cell>
          <table:table-cell table:formula="of:=[.D672]-[.D67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B671]+22" office:value-type="float" office:value="14762" calcext:value-type="float">
            <text:p>14762</text:p>
          </table:table-cell>
          <table:table-cell office:value-type="float" office:value="8640000" calcext:value-type="float">
            <text:p>8640000</text:p>
          </table:table-cell>
          <table:table-cell table:formula="of:=[.B672]/[.C672]" office:value-type="float" office:value="0.00170856481481481" calcext:value-type="float">
            <text:p>0,00170856481481482000</text:p>
          </table:table-cell>
          <table:table-cell table:formula="of:=[.D673]-[.D67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B672]+22" office:value-type="float" office:value="14784" calcext:value-type="float">
            <text:p>14784</text:p>
          </table:table-cell>
          <table:table-cell office:value-type="float" office:value="8640000" calcext:value-type="float">
            <text:p>8640000</text:p>
          </table:table-cell>
          <table:table-cell table:formula="of:=[.B673]/[.C673]" office:value-type="float" office:value="0.00171111111111111" calcext:value-type="float">
            <text:p>0,00171111111111111000</text:p>
          </table:table-cell>
          <table:table-cell table:formula="of:=[.D674]-[.D67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B673]+22" office:value-type="float" office:value="14806" calcext:value-type="float">
            <text:p>14806</text:p>
          </table:table-cell>
          <table:table-cell office:value-type="float" office:value="8640000" calcext:value-type="float">
            <text:p>8640000</text:p>
          </table:table-cell>
          <table:table-cell table:formula="of:=[.B674]/[.C674]" office:value-type="float" office:value="0.00171365740740741" calcext:value-type="float">
            <text:p>0,00171365740740741000</text:p>
          </table:table-cell>
          <table:table-cell table:formula="of:=[.D675]-[.D67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B674]+22" office:value-type="float" office:value="14828" calcext:value-type="float">
            <text:p>14828</text:p>
          </table:table-cell>
          <table:table-cell office:value-type="float" office:value="8640000" calcext:value-type="float">
            <text:p>8640000</text:p>
          </table:table-cell>
          <table:table-cell table:formula="of:=[.B675]/[.C675]" office:value-type="float" office:value="0.0017162037037037" calcext:value-type="float">
            <text:p>0,00171620370370370000</text:p>
          </table:table-cell>
          <table:table-cell table:formula="of:=[.D676]-[.D67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B675]+22" office:value-type="float" office:value="14850" calcext:value-type="float">
            <text:p>14850</text:p>
          </table:table-cell>
          <table:table-cell office:value-type="float" office:value="8640000" calcext:value-type="float">
            <text:p>8640000</text:p>
          </table:table-cell>
          <table:table-cell table:formula="of:=[.B676]/[.C676]" office:value-type="float" office:value="0.00171875" calcext:value-type="float">
            <text:p>0,00171875000000000000</text:p>
          </table:table-cell>
          <table:table-cell table:formula="of:=[.D677]-[.D67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B676]+22" office:value-type="float" office:value="14872" calcext:value-type="float">
            <text:p>14872</text:p>
          </table:table-cell>
          <table:table-cell office:value-type="float" office:value="8640000" calcext:value-type="float">
            <text:p>8640000</text:p>
          </table:table-cell>
          <table:table-cell table:formula="of:=[.B677]/[.C677]" office:value-type="float" office:value="0.0017212962962963" calcext:value-type="float">
            <text:p>0,00172129629629630000</text:p>
          </table:table-cell>
          <table:table-cell table:formula="of:=[.D678]-[.D67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B677]+22" office:value-type="float" office:value="14894" calcext:value-type="float">
            <text:p>14894</text:p>
          </table:table-cell>
          <table:table-cell office:value-type="float" office:value="8640000" calcext:value-type="float">
            <text:p>8640000</text:p>
          </table:table-cell>
          <table:table-cell table:formula="of:=[.B678]/[.C678]" office:value-type="float" office:value="0.00172384259259259" calcext:value-type="float">
            <text:p>0,00172384259259259000</text:p>
          </table:table-cell>
          <table:table-cell table:formula="of:=[.D679]-[.D67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B678]+22" office:value-type="float" office:value="14916" calcext:value-type="float">
            <text:p>14916</text:p>
          </table:table-cell>
          <table:table-cell office:value-type="float" office:value="8640000" calcext:value-type="float">
            <text:p>8640000</text:p>
          </table:table-cell>
          <table:table-cell table:formula="of:=[.B679]/[.C679]" office:value-type="float" office:value="0.00172638888888889" calcext:value-type="float">
            <text:p>0,00172638888888889000</text:p>
          </table:table-cell>
          <table:table-cell table:formula="of:=[.D680]-[.D67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B679]+22" office:value-type="float" office:value="14938" calcext:value-type="float">
            <text:p>14938</text:p>
          </table:table-cell>
          <table:table-cell office:value-type="float" office:value="8640000" calcext:value-type="float">
            <text:p>8640000</text:p>
          </table:table-cell>
          <table:table-cell table:formula="of:=[.B680]/[.C680]" office:value-type="float" office:value="0.00172893518518519" calcext:value-type="float">
            <text:p>0,00172893518518519000</text:p>
          </table:table-cell>
          <table:table-cell table:formula="of:=[.D681]-[.D68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B680]+22" office:value-type="float" office:value="14960" calcext:value-type="float">
            <text:p>14960</text:p>
          </table:table-cell>
          <table:table-cell office:value-type="float" office:value="8640000" calcext:value-type="float">
            <text:p>8640000</text:p>
          </table:table-cell>
          <table:table-cell table:formula="of:=[.B681]/[.C681]" office:value-type="float" office:value="0.00173148148148148" calcext:value-type="float">
            <text:p>0,00173148148148148000</text:p>
          </table:table-cell>
          <table:table-cell table:formula="of:=[.D682]-[.D68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B681]+22" office:value-type="float" office:value="14982" calcext:value-type="float">
            <text:p>14982</text:p>
          </table:table-cell>
          <table:table-cell office:value-type="float" office:value="8640000" calcext:value-type="float">
            <text:p>8640000</text:p>
          </table:table-cell>
          <table:table-cell table:formula="of:=[.B682]/[.C682]" office:value-type="float" office:value="0.00173402777777778" calcext:value-type="float">
            <text:p>0,00173402777777778000</text:p>
          </table:table-cell>
          <table:table-cell table:formula="of:=[.D683]-[.D68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B682]+22" office:value-type="float" office:value="15004" calcext:value-type="float">
            <text:p>15004</text:p>
          </table:table-cell>
          <table:table-cell office:value-type="float" office:value="8640000" calcext:value-type="float">
            <text:p>8640000</text:p>
          </table:table-cell>
          <table:table-cell table:formula="of:=[.B683]/[.C683]" office:value-type="float" office:value="0.00173657407407407" calcext:value-type="float">
            <text:p>0,00173657407407407000</text:p>
          </table:table-cell>
          <table:table-cell table:formula="of:=[.D684]-[.D683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B683]+22" office:value-type="float" office:value="15026" calcext:value-type="float">
            <text:p>15026</text:p>
          </table:table-cell>
          <table:table-cell office:value-type="float" office:value="8640000" calcext:value-type="float">
            <text:p>8640000</text:p>
          </table:table-cell>
          <table:table-cell table:formula="of:=[.B684]/[.C684]" office:value-type="float" office:value="0.00173912037037037" calcext:value-type="float">
            <text:p>0,00173912037037037000</text:p>
          </table:table-cell>
          <table:table-cell table:formula="of:=[.D685]-[.D68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B684]+22" office:value-type="float" office:value="15048" calcext:value-type="float">
            <text:p>15048</text:p>
          </table:table-cell>
          <table:table-cell office:value-type="float" office:value="8640000" calcext:value-type="float">
            <text:p>8640000</text:p>
          </table:table-cell>
          <table:table-cell table:formula="of:=[.B685]/[.C685]" office:value-type="float" office:value="0.00174166666666667" calcext:value-type="float">
            <text:p>0,00174166666666667000</text:p>
          </table:table-cell>
          <table:table-cell table:formula="of:=[.D686]-[.D68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B685]+22" office:value-type="float" office:value="15070" calcext:value-type="float">
            <text:p>15070</text:p>
          </table:table-cell>
          <table:table-cell office:value-type="float" office:value="8640000" calcext:value-type="float">
            <text:p>8640000</text:p>
          </table:table-cell>
          <table:table-cell table:formula="of:=[.B686]/[.C686]" office:value-type="float" office:value="0.00174421296296296" calcext:value-type="float">
            <text:p>0,00174421296296296000</text:p>
          </table:table-cell>
          <table:table-cell table:formula="of:=[.D687]-[.D68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B686]+22" office:value-type="float" office:value="15092" calcext:value-type="float">
            <text:p>15092</text:p>
          </table:table-cell>
          <table:table-cell office:value-type="float" office:value="8640000" calcext:value-type="float">
            <text:p>8640000</text:p>
          </table:table-cell>
          <table:table-cell table:formula="of:=[.B687]/[.C687]" office:value-type="float" office:value="0.00174675925925926" calcext:value-type="float">
            <text:p>0,00174675925925926000</text:p>
          </table:table-cell>
          <table:table-cell table:formula="of:=[.D688]-[.D68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B687]+22" office:value-type="float" office:value="15114" calcext:value-type="float">
            <text:p>15114</text:p>
          </table:table-cell>
          <table:table-cell office:value-type="float" office:value="8640000" calcext:value-type="float">
            <text:p>8640000</text:p>
          </table:table-cell>
          <table:table-cell table:formula="of:=[.B688]/[.C688]" office:value-type="float" office:value="0.00174930555555556" calcext:value-type="float">
            <text:p>0,00174930555555556000</text:p>
          </table:table-cell>
          <table:table-cell table:formula="of:=[.D689]-[.D68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B688]+22" office:value-type="float" office:value="15136" calcext:value-type="float">
            <text:p>15136</text:p>
          </table:table-cell>
          <table:table-cell office:value-type="float" office:value="8640000" calcext:value-type="float">
            <text:p>8640000</text:p>
          </table:table-cell>
          <table:table-cell table:formula="of:=[.B689]/[.C689]" office:value-type="float" office:value="0.00175185185185185" calcext:value-type="float">
            <text:p>0,00175185185185185000</text:p>
          </table:table-cell>
          <table:table-cell table:formula="of:=[.D690]-[.D68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B689]+22" office:value-type="float" office:value="15158" calcext:value-type="float">
            <text:p>15158</text:p>
          </table:table-cell>
          <table:table-cell office:value-type="float" office:value="8640000" calcext:value-type="float">
            <text:p>8640000</text:p>
          </table:table-cell>
          <table:table-cell table:formula="of:=[.B690]/[.C690]" office:value-type="float" office:value="0.00175439814814815" calcext:value-type="float">
            <text:p>0,00175439814814815000</text:p>
          </table:table-cell>
          <table:table-cell table:formula="of:=[.D691]-[.D69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B690]+22" office:value-type="float" office:value="15180" calcext:value-type="float">
            <text:p>15180</text:p>
          </table:table-cell>
          <table:table-cell office:value-type="float" office:value="8640000" calcext:value-type="float">
            <text:p>8640000</text:p>
          </table:table-cell>
          <table:table-cell table:formula="of:=[.B691]/[.C691]" office:value-type="float" office:value="0.00175694444444444" calcext:value-type="float">
            <text:p>0,00175694444444444000</text:p>
          </table:table-cell>
          <table:table-cell table:formula="of:=[.D692]-[.D69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B691]+22" office:value-type="float" office:value="15202" calcext:value-type="float">
            <text:p>15202</text:p>
          </table:table-cell>
          <table:table-cell office:value-type="float" office:value="8640000" calcext:value-type="float">
            <text:p>8640000</text:p>
          </table:table-cell>
          <table:table-cell table:formula="of:=[.B692]/[.C692]" office:value-type="float" office:value="0.00175949074074074" calcext:value-type="float">
            <text:p>0,00175949074074074000</text:p>
          </table:table-cell>
          <table:table-cell table:formula="of:=[.D693]-[.D69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B692]+22" office:value-type="float" office:value="15224" calcext:value-type="float">
            <text:p>15224</text:p>
          </table:table-cell>
          <table:table-cell office:value-type="float" office:value="8640000" calcext:value-type="float">
            <text:p>8640000</text:p>
          </table:table-cell>
          <table:table-cell table:formula="of:=[.B693]/[.C693]" office:value-type="float" office:value="0.00176203703703704" calcext:value-type="float">
            <text:p>0,00176203703703704000</text:p>
          </table:table-cell>
          <table:table-cell table:formula="of:=[.D694]-[.D69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B693]+22" office:value-type="float" office:value="15246" calcext:value-type="float">
            <text:p>15246</text:p>
          </table:table-cell>
          <table:table-cell office:value-type="float" office:value="8640000" calcext:value-type="float">
            <text:p>8640000</text:p>
          </table:table-cell>
          <table:table-cell table:formula="of:=[.B694]/[.C694]" office:value-type="float" office:value="0.00176458333333333" calcext:value-type="float">
            <text:p>0,00176458333333333000</text:p>
          </table:table-cell>
          <table:table-cell table:formula="of:=[.D695]-[.D69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B694]+22" office:value-type="float" office:value="15268" calcext:value-type="float">
            <text:p>15268</text:p>
          </table:table-cell>
          <table:table-cell office:value-type="float" office:value="8640000" calcext:value-type="float">
            <text:p>8640000</text:p>
          </table:table-cell>
          <table:table-cell table:formula="of:=[.B695]/[.C695]" office:value-type="float" office:value="0.00176712962962963" calcext:value-type="float">
            <text:p>0,00176712962962963000</text:p>
          </table:table-cell>
          <table:table-cell table:formula="of:=[.D696]-[.D69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B695]+22" office:value-type="float" office:value="15290" calcext:value-type="float">
            <text:p>15290</text:p>
          </table:table-cell>
          <table:table-cell office:value-type="float" office:value="8640000" calcext:value-type="float">
            <text:p>8640000</text:p>
          </table:table-cell>
          <table:table-cell table:formula="of:=[.B696]/[.C696]" office:value-type="float" office:value="0.00176967592592593" calcext:value-type="float">
            <text:p>0,00176967592592593000</text:p>
          </table:table-cell>
          <table:table-cell table:formula="of:=[.D697]-[.D69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B696]+22" office:value-type="float" office:value="15312" calcext:value-type="float">
            <text:p>15312</text:p>
          </table:table-cell>
          <table:table-cell office:value-type="float" office:value="8640000" calcext:value-type="float">
            <text:p>8640000</text:p>
          </table:table-cell>
          <table:table-cell table:formula="of:=[.B697]/[.C697]" office:value-type="float" office:value="0.00177222222222222" calcext:value-type="float">
            <text:p>0,00177222222222222000</text:p>
          </table:table-cell>
          <table:table-cell table:formula="of:=[.D698]-[.D697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B697]+22" office:value-type="float" office:value="15334" calcext:value-type="float">
            <text:p>15334</text:p>
          </table:table-cell>
          <table:table-cell office:value-type="float" office:value="8640000" calcext:value-type="float">
            <text:p>8640000</text:p>
          </table:table-cell>
          <table:table-cell table:formula="of:=[.B698]/[.C698]" office:value-type="float" office:value="0.00177476851851852" calcext:value-type="float">
            <text:p>0,00177476851851852000</text:p>
          </table:table-cell>
          <table:table-cell table:formula="of:=[.D699]-[.D69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B698]+22" office:value-type="float" office:value="15356" calcext:value-type="float">
            <text:p>15356</text:p>
          </table:table-cell>
          <table:table-cell office:value-type="float" office:value="8640000" calcext:value-type="float">
            <text:p>8640000</text:p>
          </table:table-cell>
          <table:table-cell table:formula="of:=[.B699]/[.C699]" office:value-type="float" office:value="0.00177731481481482" calcext:value-type="float">
            <text:p>0,00177731481481482000</text:p>
          </table:table-cell>
          <table:table-cell table:formula="of:=[.D700]-[.D69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B699]+22" office:value-type="float" office:value="15378" calcext:value-type="float">
            <text:p>15378</text:p>
          </table:table-cell>
          <table:table-cell office:value-type="float" office:value="8640000" calcext:value-type="float">
            <text:p>8640000</text:p>
          </table:table-cell>
          <table:table-cell table:formula="of:=[.B700]/[.C700]" office:value-type="float" office:value="0.00177986111111111" calcext:value-type="float">
            <text:p>0,00177986111111111000</text:p>
          </table:table-cell>
          <table:table-cell table:formula="of:=[.D701]-[.D70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B700]+22" office:value-type="float" office:value="15400" calcext:value-type="float">
            <text:p>15400</text:p>
          </table:table-cell>
          <table:table-cell office:value-type="float" office:value="8640000" calcext:value-type="float">
            <text:p>8640000</text:p>
          </table:table-cell>
          <table:table-cell table:formula="of:=[.B701]/[.C701]" office:value-type="float" office:value="0.00178240740740741" calcext:value-type="float">
            <text:p>0,00178240740740741000</text:p>
          </table:table-cell>
          <table:table-cell table:formula="of:=[.D702]-[.D70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B701]+22" office:value-type="float" office:value="15422" calcext:value-type="float">
            <text:p>15422</text:p>
          </table:table-cell>
          <table:table-cell office:value-type="float" office:value="8640000" calcext:value-type="float">
            <text:p>8640000</text:p>
          </table:table-cell>
          <table:table-cell table:formula="of:=[.B702]/[.C702]" office:value-type="float" office:value="0.0017849537037037" calcext:value-type="float">
            <text:p>0,00178495370370370000</text:p>
          </table:table-cell>
          <table:table-cell table:formula="of:=[.D703]-[.D70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B702]+22" office:value-type="float" office:value="15444" calcext:value-type="float">
            <text:p>15444</text:p>
          </table:table-cell>
          <table:table-cell office:value-type="float" office:value="8640000" calcext:value-type="float">
            <text:p>8640000</text:p>
          </table:table-cell>
          <table:table-cell table:formula="of:=[.B703]/[.C703]" office:value-type="float" office:value="0.0017875" calcext:value-type="float">
            <text:p>0,00178750000000000000</text:p>
          </table:table-cell>
          <table:table-cell table:formula="of:=[.D704]-[.D70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B703]+22" office:value-type="float" office:value="15466" calcext:value-type="float">
            <text:p>15466</text:p>
          </table:table-cell>
          <table:table-cell office:value-type="float" office:value="8640000" calcext:value-type="float">
            <text:p>8640000</text:p>
          </table:table-cell>
          <table:table-cell table:formula="of:=[.B704]/[.C704]" office:value-type="float" office:value="0.0017900462962963" calcext:value-type="float">
            <text:p>0,00179004629629630000</text:p>
          </table:table-cell>
          <table:table-cell table:formula="of:=[.D705]-[.D70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B704]+22" office:value-type="float" office:value="15488" calcext:value-type="float">
            <text:p>15488</text:p>
          </table:table-cell>
          <table:table-cell office:value-type="float" office:value="8640000" calcext:value-type="float">
            <text:p>8640000</text:p>
          </table:table-cell>
          <table:table-cell table:formula="of:=[.B705]/[.C705]" office:value-type="float" office:value="0.00179259259259259" calcext:value-type="float">
            <text:p>0,00179259259259259000</text:p>
          </table:table-cell>
          <table:table-cell table:formula="of:=[.D706]-[.D70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B705]+22" office:value-type="float" office:value="15510" calcext:value-type="float">
            <text:p>15510</text:p>
          </table:table-cell>
          <table:table-cell office:value-type="float" office:value="8640000" calcext:value-type="float">
            <text:p>8640000</text:p>
          </table:table-cell>
          <table:table-cell table:formula="of:=[.B706]/[.C706]" office:value-type="float" office:value="0.00179513888888889" calcext:value-type="float">
            <text:p>0,00179513888888889000</text:p>
          </table:table-cell>
          <table:table-cell table:formula="of:=[.D707]-[.D70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B706]+22" office:value-type="float" office:value="15532" calcext:value-type="float">
            <text:p>15532</text:p>
          </table:table-cell>
          <table:table-cell office:value-type="float" office:value="8640000" calcext:value-type="float">
            <text:p>8640000</text:p>
          </table:table-cell>
          <table:table-cell table:formula="of:=[.B707]/[.C707]" office:value-type="float" office:value="0.00179768518518519" calcext:value-type="float">
            <text:p>0,00179768518518519000</text:p>
          </table:table-cell>
          <table:table-cell table:formula="of:=[.D708]-[.D70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B707]+22" office:value-type="float" office:value="15554" calcext:value-type="float">
            <text:p>15554</text:p>
          </table:table-cell>
          <table:table-cell office:value-type="float" office:value="8640000" calcext:value-type="float">
            <text:p>8640000</text:p>
          </table:table-cell>
          <table:table-cell table:formula="of:=[.B708]/[.C708]" office:value-type="float" office:value="0.00180023148148148" calcext:value-type="float">
            <text:p>0,00180023148148148000</text:p>
          </table:table-cell>
          <table:table-cell table:formula="of:=[.D709]-[.D70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B708]+22" office:value-type="float" office:value="15576" calcext:value-type="float">
            <text:p>15576</text:p>
          </table:table-cell>
          <table:table-cell office:value-type="float" office:value="8640000" calcext:value-type="float">
            <text:p>8640000</text:p>
          </table:table-cell>
          <table:table-cell table:formula="of:=[.B709]/[.C709]" office:value-type="float" office:value="0.00180277777777778" calcext:value-type="float">
            <text:p>0,00180277777777778000</text:p>
          </table:table-cell>
          <table:table-cell table:formula="of:=[.D710]-[.D70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B709]+22" office:value-type="float" office:value="15598" calcext:value-type="float">
            <text:p>15598</text:p>
          </table:table-cell>
          <table:table-cell office:value-type="float" office:value="8640000" calcext:value-type="float">
            <text:p>8640000</text:p>
          </table:table-cell>
          <table:table-cell table:formula="of:=[.B710]/[.C710]" office:value-type="float" office:value="0.00180532407407407" calcext:value-type="float">
            <text:p>0,00180532407407407000</text:p>
          </table:table-cell>
          <table:table-cell table:formula="of:=[.D711]-[.D71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B710]+22" office:value-type="float" office:value="15620" calcext:value-type="float">
            <text:p>15620</text:p>
          </table:table-cell>
          <table:table-cell office:value-type="float" office:value="8640000" calcext:value-type="float">
            <text:p>8640000</text:p>
          </table:table-cell>
          <table:table-cell table:formula="of:=[.B711]/[.C711]" office:value-type="float" office:value="0.00180787037037037" calcext:value-type="float">
            <text:p>0,00180787037037037000</text:p>
          </table:table-cell>
          <table:table-cell table:formula="of:=[.D712]-[.D711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B711]+22" office:value-type="float" office:value="15642" calcext:value-type="float">
            <text:p>15642</text:p>
          </table:table-cell>
          <table:table-cell office:value-type="float" office:value="8640000" calcext:value-type="float">
            <text:p>8640000</text:p>
          </table:table-cell>
          <table:table-cell table:formula="of:=[.B712]/[.C712]" office:value-type="float" office:value="0.00181041666666667" calcext:value-type="float">
            <text:p>0,00181041666666667000</text:p>
          </table:table-cell>
          <table:table-cell table:formula="of:=[.D713]-[.D71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B712]+22" office:value-type="float" office:value="15664" calcext:value-type="float">
            <text:p>15664</text:p>
          </table:table-cell>
          <table:table-cell office:value-type="float" office:value="8640000" calcext:value-type="float">
            <text:p>8640000</text:p>
          </table:table-cell>
          <table:table-cell table:formula="of:=[.B713]/[.C713]" office:value-type="float" office:value="0.00181296296296296" calcext:value-type="float">
            <text:p>0,00181296296296296000</text:p>
          </table:table-cell>
          <table:table-cell table:formula="of:=[.D714]-[.D71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B713]+22" office:value-type="float" office:value="15686" calcext:value-type="float">
            <text:p>15686</text:p>
          </table:table-cell>
          <table:table-cell office:value-type="float" office:value="8640000" calcext:value-type="float">
            <text:p>8640000</text:p>
          </table:table-cell>
          <table:table-cell table:formula="of:=[.B714]/[.C714]" office:value-type="float" office:value="0.00181550925925926" calcext:value-type="float">
            <text:p>0,00181550925925926000</text:p>
          </table:table-cell>
          <table:table-cell table:formula="of:=[.D715]-[.D71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B714]+22" office:value-type="float" office:value="15708" calcext:value-type="float">
            <text:p>15708</text:p>
          </table:table-cell>
          <table:table-cell office:value-type="float" office:value="8640000" calcext:value-type="float">
            <text:p>8640000</text:p>
          </table:table-cell>
          <table:table-cell table:formula="of:=[.B715]/[.C715]" office:value-type="float" office:value="0.00181805555555556" calcext:value-type="float">
            <text:p>0,00181805555555556000</text:p>
          </table:table-cell>
          <table:table-cell table:formula="of:=[.D716]-[.D71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B715]+22" office:value-type="float" office:value="15730" calcext:value-type="float">
            <text:p>15730</text:p>
          </table:table-cell>
          <table:table-cell office:value-type="float" office:value="8640000" calcext:value-type="float">
            <text:p>8640000</text:p>
          </table:table-cell>
          <table:table-cell table:formula="of:=[.B716]/[.C716]" office:value-type="float" office:value="0.00182060185185185" calcext:value-type="float">
            <text:p>0,00182060185185185000</text:p>
          </table:table-cell>
          <table:table-cell table:formula="of:=[.D717]-[.D71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B716]+22" office:value-type="float" office:value="15752" calcext:value-type="float">
            <text:p>15752</text:p>
          </table:table-cell>
          <table:table-cell office:value-type="float" office:value="8640000" calcext:value-type="float">
            <text:p>8640000</text:p>
          </table:table-cell>
          <table:table-cell table:formula="of:=[.B717]/[.C717]" office:value-type="float" office:value="0.00182314814814815" calcext:value-type="float">
            <text:p>0,00182314814814815000</text:p>
          </table:table-cell>
          <table:table-cell table:formula="of:=[.D718]-[.D71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B717]+22" office:value-type="float" office:value="15774" calcext:value-type="float">
            <text:p>15774</text:p>
          </table:table-cell>
          <table:table-cell office:value-type="float" office:value="8640000" calcext:value-type="float">
            <text:p>8640000</text:p>
          </table:table-cell>
          <table:table-cell table:formula="of:=[.B718]/[.C718]" office:value-type="float" office:value="0.00182569444444444" calcext:value-type="float">
            <text:p>0,00182569444444444000</text:p>
          </table:table-cell>
          <table:table-cell table:formula="of:=[.D719]-[.D71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B718]+22" office:value-type="float" office:value="15796" calcext:value-type="float">
            <text:p>15796</text:p>
          </table:table-cell>
          <table:table-cell office:value-type="float" office:value="8640000" calcext:value-type="float">
            <text:p>8640000</text:p>
          </table:table-cell>
          <table:table-cell table:formula="of:=[.B719]/[.C719]" office:value-type="float" office:value="0.00182824074074074" calcext:value-type="float">
            <text:p>0,00182824074074074000</text:p>
          </table:table-cell>
          <table:table-cell table:formula="of:=[.D720]-[.D71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B719]+22" office:value-type="float" office:value="15818" calcext:value-type="float">
            <text:p>15818</text:p>
          </table:table-cell>
          <table:table-cell office:value-type="float" office:value="8640000" calcext:value-type="float">
            <text:p>8640000</text:p>
          </table:table-cell>
          <table:table-cell table:formula="of:=[.B720]/[.C720]" office:value-type="float" office:value="0.00183078703703704" calcext:value-type="float">
            <text:p>0,00183078703703704000</text:p>
          </table:table-cell>
          <table:table-cell table:formula="of:=[.D721]-[.D72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B720]+22" office:value-type="float" office:value="15840" calcext:value-type="float">
            <text:p>15840</text:p>
          </table:table-cell>
          <table:table-cell office:value-type="float" office:value="8640000" calcext:value-type="float">
            <text:p>8640000</text:p>
          </table:table-cell>
          <table:table-cell table:formula="of:=[.B721]/[.C721]" office:value-type="float" office:value="0.00183333333333333" calcext:value-type="float">
            <text:p>0,00183333333333333000</text:p>
          </table:table-cell>
          <table:table-cell table:formula="of:=[.D722]-[.D72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B721]+22" office:value-type="float" office:value="15862" calcext:value-type="float">
            <text:p>15862</text:p>
          </table:table-cell>
          <table:table-cell office:value-type="float" office:value="8640000" calcext:value-type="float">
            <text:p>8640000</text:p>
          </table:table-cell>
          <table:table-cell table:formula="of:=[.B722]/[.C722]" office:value-type="float" office:value="0.00183587962962963" calcext:value-type="float">
            <text:p>0,00183587962962963000</text:p>
          </table:table-cell>
          <table:table-cell table:formula="of:=[.D723]-[.D72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B722]+22" office:value-type="float" office:value="15884" calcext:value-type="float">
            <text:p>15884</text:p>
          </table:table-cell>
          <table:table-cell office:value-type="float" office:value="8640000" calcext:value-type="float">
            <text:p>8640000</text:p>
          </table:table-cell>
          <table:table-cell table:formula="of:=[.B723]/[.C723]" office:value-type="float" office:value="0.00183842592592593" calcext:value-type="float">
            <text:p>0,00183842592592593000</text:p>
          </table:table-cell>
          <table:table-cell table:formula="of:=[.D724]-[.D72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B723]+22" office:value-type="float" office:value="15906" calcext:value-type="float">
            <text:p>15906</text:p>
          </table:table-cell>
          <table:table-cell office:value-type="float" office:value="8640000" calcext:value-type="float">
            <text:p>8640000</text:p>
          </table:table-cell>
          <table:table-cell table:formula="of:=[.B724]/[.C724]" office:value-type="float" office:value="0.00184097222222222" calcext:value-type="float">
            <text:p>0,00184097222222222000</text:p>
          </table:table-cell>
          <table:table-cell table:formula="of:=[.D725]-[.D72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B724]+22" office:value-type="float" office:value="15928" calcext:value-type="float">
            <text:p>15928</text:p>
          </table:table-cell>
          <table:table-cell office:value-type="float" office:value="8640000" calcext:value-type="float">
            <text:p>8640000</text:p>
          </table:table-cell>
          <table:table-cell table:formula="of:=[.B725]/[.C725]" office:value-type="float" office:value="0.00184351851851852" calcext:value-type="float">
            <text:p>0,00184351851851852000</text:p>
          </table:table-cell>
          <table:table-cell table:formula="of:=[.D726]-[.D725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B725]+22" office:value-type="float" office:value="15950" calcext:value-type="float">
            <text:p>15950</text:p>
          </table:table-cell>
          <table:table-cell office:value-type="float" office:value="8640000" calcext:value-type="float">
            <text:p>8640000</text:p>
          </table:table-cell>
          <table:table-cell table:formula="of:=[.B726]/[.C726]" office:value-type="float" office:value="0.00184606481481482" calcext:value-type="float">
            <text:p>0,00184606481481482000</text:p>
          </table:table-cell>
          <table:table-cell table:formula="of:=[.D727]-[.D72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B726]+22" office:value-type="float" office:value="15972" calcext:value-type="float">
            <text:p>15972</text:p>
          </table:table-cell>
          <table:table-cell office:value-type="float" office:value="8640000" calcext:value-type="float">
            <text:p>8640000</text:p>
          </table:table-cell>
          <table:table-cell table:formula="of:=[.B727]/[.C727]" office:value-type="float" office:value="0.00184861111111111" calcext:value-type="float">
            <text:p>0,00184861111111111000</text:p>
          </table:table-cell>
          <table:table-cell table:formula="of:=[.D728]-[.D72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B727]+22" office:value-type="float" office:value="15994" calcext:value-type="float">
            <text:p>15994</text:p>
          </table:table-cell>
          <table:table-cell office:value-type="float" office:value="8640000" calcext:value-type="float">
            <text:p>8640000</text:p>
          </table:table-cell>
          <table:table-cell table:formula="of:=[.B728]/[.C728]" office:value-type="float" office:value="0.00185115740740741" calcext:value-type="float">
            <text:p>0,00185115740740741000</text:p>
          </table:table-cell>
          <table:table-cell table:formula="of:=[.D729]-[.D72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B728]+22" office:value-type="float" office:value="16016" calcext:value-type="float">
            <text:p>16016</text:p>
          </table:table-cell>
          <table:table-cell office:value-type="float" office:value="8640000" calcext:value-type="float">
            <text:p>8640000</text:p>
          </table:table-cell>
          <table:table-cell table:formula="of:=[.B729]/[.C729]" office:value-type="float" office:value="0.0018537037037037" calcext:value-type="float">
            <text:p>0,00185370370370370000</text:p>
          </table:table-cell>
          <table:table-cell table:formula="of:=[.D730]-[.D72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B729]+22" office:value-type="float" office:value="16038" calcext:value-type="float">
            <text:p>16038</text:p>
          </table:table-cell>
          <table:table-cell office:value-type="float" office:value="8640000" calcext:value-type="float">
            <text:p>8640000</text:p>
          </table:table-cell>
          <table:table-cell table:formula="of:=[.B730]/[.C730]" office:value-type="float" office:value="0.00185625" calcext:value-type="float">
            <text:p>0,00185625000000000000</text:p>
          </table:table-cell>
          <table:table-cell table:formula="of:=[.D731]-[.D73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B730]+22" office:value-type="float" office:value="16060" calcext:value-type="float">
            <text:p>16060</text:p>
          </table:table-cell>
          <table:table-cell office:value-type="float" office:value="8640000" calcext:value-type="float">
            <text:p>8640000</text:p>
          </table:table-cell>
          <table:table-cell table:formula="of:=[.B731]/[.C731]" office:value-type="float" office:value="0.0018587962962963" calcext:value-type="float">
            <text:p>0,00185879629629630000</text:p>
          </table:table-cell>
          <table:table-cell table:formula="of:=[.D732]-[.D73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B731]+22" office:value-type="float" office:value="16082" calcext:value-type="float">
            <text:p>16082</text:p>
          </table:table-cell>
          <table:table-cell office:value-type="float" office:value="8640000" calcext:value-type="float">
            <text:p>8640000</text:p>
          </table:table-cell>
          <table:table-cell table:formula="of:=[.B732]/[.C732]" office:value-type="float" office:value="0.00186134259259259" calcext:value-type="float">
            <text:p>0,00186134259259259000</text:p>
          </table:table-cell>
          <table:table-cell table:formula="of:=[.D733]-[.D73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B732]+22" office:value-type="float" office:value="16104" calcext:value-type="float">
            <text:p>16104</text:p>
          </table:table-cell>
          <table:table-cell office:value-type="float" office:value="8640000" calcext:value-type="float">
            <text:p>8640000</text:p>
          </table:table-cell>
          <table:table-cell table:formula="of:=[.B733]/[.C733]" office:value-type="float" office:value="0.00186388888888889" calcext:value-type="float">
            <text:p>0,00186388888888889000</text:p>
          </table:table-cell>
          <table:table-cell table:formula="of:=[.D734]-[.D73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B733]+22" office:value-type="float" office:value="16126" calcext:value-type="float">
            <text:p>16126</text:p>
          </table:table-cell>
          <table:table-cell office:value-type="float" office:value="8640000" calcext:value-type="float">
            <text:p>8640000</text:p>
          </table:table-cell>
          <table:table-cell table:formula="of:=[.B734]/[.C734]" office:value-type="float" office:value="0.00186643518518519" calcext:value-type="float">
            <text:p>0,00186643518518519000</text:p>
          </table:table-cell>
          <table:table-cell table:formula="of:=[.D735]-[.D73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B734]+22" office:value-type="float" office:value="16148" calcext:value-type="float">
            <text:p>16148</text:p>
          </table:table-cell>
          <table:table-cell office:value-type="float" office:value="8640000" calcext:value-type="float">
            <text:p>8640000</text:p>
          </table:table-cell>
          <table:table-cell table:formula="of:=[.B735]/[.C735]" office:value-type="float" office:value="0.00186898148148148" calcext:value-type="float">
            <text:p>0,00186898148148148000</text:p>
          </table:table-cell>
          <table:table-cell table:formula="of:=[.D736]-[.D73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B735]+22" office:value-type="float" office:value="16170" calcext:value-type="float">
            <text:p>16170</text:p>
          </table:table-cell>
          <table:table-cell office:value-type="float" office:value="8640000" calcext:value-type="float">
            <text:p>8640000</text:p>
          </table:table-cell>
          <table:table-cell table:formula="of:=[.B736]/[.C736]" office:value-type="float" office:value="0.00187152777777778" calcext:value-type="float">
            <text:p>0,00187152777777778000</text:p>
          </table:table-cell>
          <table:table-cell table:formula="of:=[.D737]-[.D73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B736]+22" office:value-type="float" office:value="16192" calcext:value-type="float">
            <text:p>16192</text:p>
          </table:table-cell>
          <table:table-cell office:value-type="float" office:value="8640000" calcext:value-type="float">
            <text:p>8640000</text:p>
          </table:table-cell>
          <table:table-cell table:formula="of:=[.B737]/[.C737]" office:value-type="float" office:value="0.00187407407407407" calcext:value-type="float">
            <text:p>0,00187407407407407000</text:p>
          </table:table-cell>
          <table:table-cell table:formula="of:=[.D738]-[.D73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B737]+22" office:value-type="float" office:value="16214" calcext:value-type="float">
            <text:p>16214</text:p>
          </table:table-cell>
          <table:table-cell office:value-type="float" office:value="8640000" calcext:value-type="float">
            <text:p>8640000</text:p>
          </table:table-cell>
          <table:table-cell table:formula="of:=[.B738]/[.C738]" office:value-type="float" office:value="0.00187662037037037" calcext:value-type="float">
            <text:p>0,00187662037037037000</text:p>
          </table:table-cell>
          <table:table-cell table:formula="of:=[.D739]-[.D73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B738]+22" office:value-type="float" office:value="16236" calcext:value-type="float">
            <text:p>16236</text:p>
          </table:table-cell>
          <table:table-cell office:value-type="float" office:value="8640000" calcext:value-type="float">
            <text:p>8640000</text:p>
          </table:table-cell>
          <table:table-cell table:formula="of:=[.B739]/[.C739]" office:value-type="float" office:value="0.00187916666666667" calcext:value-type="float">
            <text:p>0,00187916666666667000</text:p>
          </table:table-cell>
          <table:table-cell table:formula="of:=[.D740]-[.D739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B739]+22" office:value-type="float" office:value="16258" calcext:value-type="float">
            <text:p>16258</text:p>
          </table:table-cell>
          <table:table-cell office:value-type="float" office:value="8640000" calcext:value-type="float">
            <text:p>8640000</text:p>
          </table:table-cell>
          <table:table-cell table:formula="of:=[.B740]/[.C740]" office:value-type="float" office:value="0.00188171296296296" calcext:value-type="float">
            <text:p>0,00188171296296296000</text:p>
          </table:table-cell>
          <table:table-cell table:formula="of:=[.D741]-[.D74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B740]+22" office:value-type="float" office:value="16280" calcext:value-type="float">
            <text:p>16280</text:p>
          </table:table-cell>
          <table:table-cell office:value-type="float" office:value="8640000" calcext:value-type="float">
            <text:p>8640000</text:p>
          </table:table-cell>
          <table:table-cell table:formula="of:=[.B741]/[.C741]" office:value-type="float" office:value="0.00188425925925926" calcext:value-type="float">
            <text:p>0,00188425925925926000</text:p>
          </table:table-cell>
          <table:table-cell table:formula="of:=[.D742]-[.D74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B741]+22" office:value-type="float" office:value="16302" calcext:value-type="float">
            <text:p>16302</text:p>
          </table:table-cell>
          <table:table-cell office:value-type="float" office:value="8640000" calcext:value-type="float">
            <text:p>8640000</text:p>
          </table:table-cell>
          <table:table-cell table:formula="of:=[.B742]/[.C742]" office:value-type="float" office:value="0.00188680555555556" calcext:value-type="float">
            <text:p>0,00188680555555556000</text:p>
          </table:table-cell>
          <table:table-cell table:formula="of:=[.D743]-[.D74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B742]+22" office:value-type="float" office:value="16324" calcext:value-type="float">
            <text:p>16324</text:p>
          </table:table-cell>
          <table:table-cell office:value-type="float" office:value="8640000" calcext:value-type="float">
            <text:p>8640000</text:p>
          </table:table-cell>
          <table:table-cell table:formula="of:=[.B743]/[.C743]" office:value-type="float" office:value="0.00188935185185185" calcext:value-type="float">
            <text:p>0,00188935185185185000</text:p>
          </table:table-cell>
          <table:table-cell table:formula="of:=[.D744]-[.D74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B743]+22" office:value-type="float" office:value="16346" calcext:value-type="float">
            <text:p>16346</text:p>
          </table:table-cell>
          <table:table-cell office:value-type="float" office:value="8640000" calcext:value-type="float">
            <text:p>8640000</text:p>
          </table:table-cell>
          <table:table-cell table:formula="of:=[.B744]/[.C744]" office:value-type="float" office:value="0.00189189814814815" calcext:value-type="float">
            <text:p>0,00189189814814815000</text:p>
          </table:table-cell>
          <table:table-cell table:formula="of:=[.D745]-[.D74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B744]+22" office:value-type="float" office:value="16368" calcext:value-type="float">
            <text:p>16368</text:p>
          </table:table-cell>
          <table:table-cell office:value-type="float" office:value="8640000" calcext:value-type="float">
            <text:p>8640000</text:p>
          </table:table-cell>
          <table:table-cell table:formula="of:=[.B745]/[.C745]" office:value-type="float" office:value="0.00189444444444444" calcext:value-type="float">
            <text:p>0,00189444444444444000</text:p>
          </table:table-cell>
          <table:table-cell table:formula="of:=[.D746]-[.D74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B745]+22" office:value-type="float" office:value="16390" calcext:value-type="float">
            <text:p>16390</text:p>
          </table:table-cell>
          <table:table-cell office:value-type="float" office:value="8640000" calcext:value-type="float">
            <text:p>8640000</text:p>
          </table:table-cell>
          <table:table-cell table:formula="of:=[.B746]/[.C746]" office:value-type="float" office:value="0.00189699074074074" calcext:value-type="float">
            <text:p>0,00189699074074074000</text:p>
          </table:table-cell>
          <table:table-cell table:formula="of:=[.D747]-[.D74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B746]+22" office:value-type="float" office:value="16412" calcext:value-type="float">
            <text:p>16412</text:p>
          </table:table-cell>
          <table:table-cell office:value-type="float" office:value="8640000" calcext:value-type="float">
            <text:p>8640000</text:p>
          </table:table-cell>
          <table:table-cell table:formula="of:=[.B747]/[.C747]" office:value-type="float" office:value="0.00189953703703704" calcext:value-type="float">
            <text:p>0,00189953703703704000</text:p>
          </table:table-cell>
          <table:table-cell table:formula="of:=[.D748]-[.D74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B747]+22" office:value-type="float" office:value="16434" calcext:value-type="float">
            <text:p>16434</text:p>
          </table:table-cell>
          <table:table-cell office:value-type="float" office:value="8640000" calcext:value-type="float">
            <text:p>8640000</text:p>
          </table:table-cell>
          <table:table-cell table:formula="of:=[.B748]/[.C748]" office:value-type="float" office:value="0.00190208333333333" calcext:value-type="float">
            <text:p>0,00190208333333333000</text:p>
          </table:table-cell>
          <table:table-cell table:formula="of:=[.D749]-[.D74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B748]+22" office:value-type="float" office:value="16456" calcext:value-type="float">
            <text:p>16456</text:p>
          </table:table-cell>
          <table:table-cell office:value-type="float" office:value="8640000" calcext:value-type="float">
            <text:p>8640000</text:p>
          </table:table-cell>
          <table:table-cell table:formula="of:=[.B749]/[.C749]" office:value-type="float" office:value="0.00190462962962963" calcext:value-type="float">
            <text:p>0,00190462962962963000</text:p>
          </table:table-cell>
          <table:table-cell table:formula="of:=[.D750]-[.D74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B749]+22" office:value-type="float" office:value="16478" calcext:value-type="float">
            <text:p>16478</text:p>
          </table:table-cell>
          <table:table-cell office:value-type="float" office:value="8640000" calcext:value-type="float">
            <text:p>8640000</text:p>
          </table:table-cell>
          <table:table-cell table:formula="of:=[.B750]/[.C750]" office:value-type="float" office:value="0.00190717592592593" calcext:value-type="float">
            <text:p>0,00190717592592593000</text:p>
          </table:table-cell>
          <table:table-cell table:formula="of:=[.D751]-[.D75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B750]+22" office:value-type="float" office:value="16500" calcext:value-type="float">
            <text:p>16500</text:p>
          </table:table-cell>
          <table:table-cell office:value-type="float" office:value="8640000" calcext:value-type="float">
            <text:p>8640000</text:p>
          </table:table-cell>
          <table:table-cell table:formula="of:=[.B751]/[.C751]" office:value-type="float" office:value="0.00190972222222222" calcext:value-type="float">
            <text:p>0,00190972222222222000</text:p>
          </table:table-cell>
          <table:table-cell table:formula="of:=[.D752]-[.D75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B751]+22" office:value-type="float" office:value="16522" calcext:value-type="float">
            <text:p>16522</text:p>
          </table:table-cell>
          <table:table-cell office:value-type="float" office:value="8640000" calcext:value-type="float">
            <text:p>8640000</text:p>
          </table:table-cell>
          <table:table-cell table:formula="of:=[.B752]/[.C752]" office:value-type="float" office:value="0.00191226851851852" calcext:value-type="float">
            <text:p>0,00191226851851852000</text:p>
          </table:table-cell>
          <table:table-cell table:formula="of:=[.D753]-[.D75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B752]+22" office:value-type="float" office:value="16544" calcext:value-type="float">
            <text:p>16544</text:p>
          </table:table-cell>
          <table:table-cell office:value-type="float" office:value="8640000" calcext:value-type="float">
            <text:p>8640000</text:p>
          </table:table-cell>
          <table:table-cell table:formula="of:=[.B753]/[.C753]" office:value-type="float" office:value="0.00191481481481481" calcext:value-type="float">
            <text:p>0,00191481481481481000</text:p>
          </table:table-cell>
          <table:table-cell table:formula="of:=[.D754]-[.D753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B753]+22" office:value-type="float" office:value="16566" calcext:value-type="float">
            <text:p>16566</text:p>
          </table:table-cell>
          <table:table-cell office:value-type="float" office:value="8640000" calcext:value-type="float">
            <text:p>8640000</text:p>
          </table:table-cell>
          <table:table-cell table:formula="of:=[.B754]/[.C754]" office:value-type="float" office:value="0.00191736111111111" calcext:value-type="float">
            <text:p>0,00191736111111111000</text:p>
          </table:table-cell>
          <table:table-cell table:formula="of:=[.D755]-[.D75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B754]+22" office:value-type="float" office:value="16588" calcext:value-type="float">
            <text:p>16588</text:p>
          </table:table-cell>
          <table:table-cell office:value-type="float" office:value="8640000" calcext:value-type="float">
            <text:p>8640000</text:p>
          </table:table-cell>
          <table:table-cell table:formula="of:=[.B755]/[.C755]" office:value-type="float" office:value="0.00191990740740741" calcext:value-type="float">
            <text:p>0,00191990740740741000</text:p>
          </table:table-cell>
          <table:table-cell table:formula="of:=[.D756]-[.D75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B755]+22" office:value-type="float" office:value="16610" calcext:value-type="float">
            <text:p>16610</text:p>
          </table:table-cell>
          <table:table-cell office:value-type="float" office:value="8640000" calcext:value-type="float">
            <text:p>8640000</text:p>
          </table:table-cell>
          <table:table-cell table:formula="of:=[.B756]/[.C756]" office:value-type="float" office:value="0.0019224537037037" calcext:value-type="float">
            <text:p>0,00192245370370370000</text:p>
          </table:table-cell>
          <table:table-cell table:formula="of:=[.D757]-[.D75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B756]+22" office:value-type="float" office:value="16632" calcext:value-type="float">
            <text:p>16632</text:p>
          </table:table-cell>
          <table:table-cell office:value-type="float" office:value="8640000" calcext:value-type="float">
            <text:p>8640000</text:p>
          </table:table-cell>
          <table:table-cell table:formula="of:=[.B757]/[.C757]" office:value-type="float" office:value="0.001925" calcext:value-type="float">
            <text:p>0,00192500000000000000</text:p>
          </table:table-cell>
          <table:table-cell table:formula="of:=[.D758]-[.D75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B757]+22" office:value-type="float" office:value="16654" calcext:value-type="float">
            <text:p>16654</text:p>
          </table:table-cell>
          <table:table-cell office:value-type="float" office:value="8640000" calcext:value-type="float">
            <text:p>8640000</text:p>
          </table:table-cell>
          <table:table-cell table:formula="of:=[.B758]/[.C758]" office:value-type="float" office:value="0.0019275462962963" calcext:value-type="float">
            <text:p>0,00192754629629630000</text:p>
          </table:table-cell>
          <table:table-cell table:formula="of:=[.D759]-[.D75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B758]+22" office:value-type="float" office:value="16676" calcext:value-type="float">
            <text:p>16676</text:p>
          </table:table-cell>
          <table:table-cell office:value-type="float" office:value="8640000" calcext:value-type="float">
            <text:p>8640000</text:p>
          </table:table-cell>
          <table:table-cell table:formula="of:=[.B759]/[.C759]" office:value-type="float" office:value="0.00193009259259259" calcext:value-type="float">
            <text:p>0,00193009259259259000</text:p>
          </table:table-cell>
          <table:table-cell table:formula="of:=[.D760]-[.D759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B759]+22" office:value-type="float" office:value="16698" calcext:value-type="float">
            <text:p>16698</text:p>
          </table:table-cell>
          <table:table-cell office:value-type="float" office:value="8640000" calcext:value-type="float">
            <text:p>8640000</text:p>
          </table:table-cell>
          <table:table-cell table:formula="of:=[.B760]/[.C760]" office:value-type="float" office:value="0.00193263888888889" calcext:value-type="float">
            <text:p>0,00193263888888889000</text:p>
          </table:table-cell>
          <table:table-cell table:formula="of:=[.D761]-[.D760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B760]+22" office:value-type="float" office:value="16720" calcext:value-type="float">
            <text:p>16720</text:p>
          </table:table-cell>
          <table:table-cell office:value-type="float" office:value="8640000" calcext:value-type="float">
            <text:p>8640000</text:p>
          </table:table-cell>
          <table:table-cell table:formula="of:=[.B761]/[.C761]" office:value-type="float" office:value="0.00193518518518519" calcext:value-type="float">
            <text:p>0,00193518518518519000</text:p>
          </table:table-cell>
          <table:table-cell table:formula="of:=[.D762]-[.D761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B761]+22" office:value-type="float" office:value="16742" calcext:value-type="float">
            <text:p>16742</text:p>
          </table:table-cell>
          <table:table-cell office:value-type="float" office:value="8640000" calcext:value-type="float">
            <text:p>8640000</text:p>
          </table:table-cell>
          <table:table-cell table:formula="of:=[.B762]/[.C762]" office:value-type="float" office:value="0.00193773148148148" calcext:value-type="float">
            <text:p>0,00193773148148148000</text:p>
          </table:table-cell>
          <table:table-cell table:formula="of:=[.D763]-[.D762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B762]+22" office:value-type="float" office:value="16764" calcext:value-type="float">
            <text:p>16764</text:p>
          </table:table-cell>
          <table:table-cell office:value-type="float" office:value="8640000" calcext:value-type="float">
            <text:p>8640000</text:p>
          </table:table-cell>
          <table:table-cell table:formula="of:=[.B763]/[.C763]" office:value-type="float" office:value="0.00194027777777778" calcext:value-type="float">
            <text:p>0,00194027777777778000</text:p>
          </table:table-cell>
          <table:table-cell table:formula="of:=[.D764]-[.D763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B763]+22" office:value-type="float" office:value="16786" calcext:value-type="float">
            <text:p>16786</text:p>
          </table:table-cell>
          <table:table-cell office:value-type="float" office:value="8640000" calcext:value-type="float">
            <text:p>8640000</text:p>
          </table:table-cell>
          <table:table-cell table:formula="of:=[.B764]/[.C764]" office:value-type="float" office:value="0.00194282407407407" calcext:value-type="float">
            <text:p>0,00194282407407407000</text:p>
          </table:table-cell>
          <table:table-cell table:formula="of:=[.D765]-[.D764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B764]+22" office:value-type="float" office:value="16808" calcext:value-type="float">
            <text:p>16808</text:p>
          </table:table-cell>
          <table:table-cell office:value-type="float" office:value="8640000" calcext:value-type="float">
            <text:p>8640000</text:p>
          </table:table-cell>
          <table:table-cell table:formula="of:=[.B765]/[.C765]" office:value-type="float" office:value="0.00194537037037037" calcext:value-type="float">
            <text:p>0,00194537037037037000</text:p>
          </table:table-cell>
          <table:table-cell table:formula="of:=[.D766]-[.D765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B765]+22" office:value-type="float" office:value="16830" calcext:value-type="float">
            <text:p>16830</text:p>
          </table:table-cell>
          <table:table-cell office:value-type="float" office:value="8640000" calcext:value-type="float">
            <text:p>8640000</text:p>
          </table:table-cell>
          <table:table-cell table:formula="of:=[.B766]/[.C766]" office:value-type="float" office:value="0.00194791666666667" calcext:value-type="float">
            <text:p>0,00194791666666667000</text:p>
          </table:table-cell>
          <table:table-cell table:formula="of:=[.D767]-[.D766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B766]+22" office:value-type="float" office:value="16852" calcext:value-type="float">
            <text:p>16852</text:p>
          </table:table-cell>
          <table:table-cell office:value-type="float" office:value="8640000" calcext:value-type="float">
            <text:p>8640000</text:p>
          </table:table-cell>
          <table:table-cell table:formula="of:=[.B767]/[.C767]" office:value-type="float" office:value="0.00195046296296296" calcext:value-type="float">
            <text:p>0,00195046296296296000</text:p>
          </table:table-cell>
          <table:table-cell table:formula="of:=[.D768]-[.D767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B767]+22" office:value-type="float" office:value="16874" calcext:value-type="float">
            <text:p>16874</text:p>
          </table:table-cell>
          <table:table-cell office:value-type="float" office:value="8640000" calcext:value-type="float">
            <text:p>8640000</text:p>
          </table:table-cell>
          <table:table-cell table:formula="of:=[.B768]/[.C768]" office:value-type="float" office:value="0.00195300925925926" calcext:value-type="float">
            <text:p>0,00195300925925926000</text:p>
          </table:table-cell>
          <table:table-cell table:formula="of:=[.D769]-[.D768]" office:value-type="float" office:value="0.00000254629629629628" calcext:value-type="float">
            <text:p>0,0000025462962962962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B768]+22" office:value-type="float" office:value="16896" calcext:value-type="float">
            <text:p>16896</text:p>
          </table:table-cell>
          <table:table-cell office:value-type="float" office:value="8640000" calcext:value-type="float">
            <text:p>8640000</text:p>
          </table:table-cell>
          <table:table-cell table:formula="of:=[.B769]/[.C769]" office:value-type="float" office:value="0.00195555555555556" calcext:value-type="float">
            <text:p>0,00195555555555556000</text:p>
          </table:table-cell>
          <table:table-cell table:formula="of:=[.D770]-[.D769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B769]+22" office:value-type="float" office:value="16918" calcext:value-type="float">
            <text:p>16918</text:p>
          </table:table-cell>
          <table:table-cell office:value-type="float" office:value="8640000" calcext:value-type="float">
            <text:p>8640000</text:p>
          </table:table-cell>
          <table:table-cell table:formula="of:=[.B770]/[.C770]" office:value-type="float" office:value="0.00195810185185185" calcext:value-type="float">
            <text:p>0,00195810185185185000</text:p>
          </table:table-cell>
          <table:table-cell table:formula="of:=[.D771]-[.D770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B770]+22" office:value-type="float" office:value="16940" calcext:value-type="float">
            <text:p>16940</text:p>
          </table:table-cell>
          <table:table-cell office:value-type="float" office:value="8640000" calcext:value-type="float">
            <text:p>8640000</text:p>
          </table:table-cell>
          <table:table-cell table:formula="of:=[.B771]/[.C771]" office:value-type="float" office:value="0.00196064814814815" calcext:value-type="float">
            <text:p>0,00196064814814815000</text:p>
          </table:table-cell>
          <table:table-cell table:formula="of:=[.D772]-[.D771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B771]+22" office:value-type="float" office:value="16962" calcext:value-type="float">
            <text:p>16962</text:p>
          </table:table-cell>
          <table:table-cell office:value-type="float" office:value="8640000" calcext:value-type="float">
            <text:p>8640000</text:p>
          </table:table-cell>
          <table:table-cell table:formula="of:=[.B772]/[.C772]" office:value-type="float" office:value="0.00196319444444444" calcext:value-type="float">
            <text:p>0,00196319444444444000</text:p>
          </table:table-cell>
          <table:table-cell table:formula="of:=[.D773]-[.D772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B772]+22" office:value-type="float" office:value="16984" calcext:value-type="float">
            <text:p>16984</text:p>
          </table:table-cell>
          <table:table-cell office:value-type="float" office:value="8640000" calcext:value-type="float">
            <text:p>8640000</text:p>
          </table:table-cell>
          <table:table-cell table:formula="of:=[.B773]/[.C773]" office:value-type="float" office:value="0.00196574074074074" calcext:value-type="float">
            <text:p>0,00196574074074074000</text:p>
          </table:table-cell>
          <table:table-cell table:formula="of:=[.D774]-[.D773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B773]+22" office:value-type="float" office:value="17006" calcext:value-type="float">
            <text:p>17006</text:p>
          </table:table-cell>
          <table:table-cell office:value-type="float" office:value="8640000" calcext:value-type="float">
            <text:p>8640000</text:p>
          </table:table-cell>
          <table:table-cell table:formula="of:=[.B774]/[.C774]" office:value-type="float" office:value="0.00196828703703704" calcext:value-type="float">
            <text:p>0,00196828703703704000</text:p>
          </table:table-cell>
          <table:table-cell table:formula="of:=[.D775]-[.D774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B774]+22" office:value-type="float" office:value="17028" calcext:value-type="float">
            <text:p>17028</text:p>
          </table:table-cell>
          <table:table-cell office:value-type="float" office:value="8640000" calcext:value-type="float">
            <text:p>8640000</text:p>
          </table:table-cell>
          <table:table-cell table:formula="of:=[.B775]/[.C775]" office:value-type="float" office:value="0.00197083333333333" calcext:value-type="float">
            <text:p>0,00197083333333333000</text:p>
          </table:table-cell>
          <table:table-cell table:formula="of:=[.D776]-[.D775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B775]+22" office:value-type="float" office:value="17050" calcext:value-type="float">
            <text:p>17050</text:p>
          </table:table-cell>
          <table:table-cell office:value-type="float" office:value="8640000" calcext:value-type="float">
            <text:p>8640000</text:p>
          </table:table-cell>
          <table:table-cell table:formula="of:=[.B776]/[.C776]" office:value-type="float" office:value="0.00197337962962963" calcext:value-type="float">
            <text:p>0,00197337962962963000</text:p>
          </table:table-cell>
          <table:table-cell table:formula="of:=[.D777]-[.D776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B776]+22" office:value-type="float" office:value="17072" calcext:value-type="float">
            <text:p>17072</text:p>
          </table:table-cell>
          <table:table-cell office:value-type="float" office:value="8640000" calcext:value-type="float">
            <text:p>8640000</text:p>
          </table:table-cell>
          <table:table-cell table:formula="of:=[.B777]/[.C777]" office:value-type="float" office:value="0.00197592592592593" calcext:value-type="float">
            <text:p>0,00197592592592593000</text:p>
          </table:table-cell>
          <table:table-cell table:formula="of:=[.D778]-[.D777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B777]+22" office:value-type="float" office:value="17094" calcext:value-type="float">
            <text:p>17094</text:p>
          </table:table-cell>
          <table:table-cell office:value-type="float" office:value="8640000" calcext:value-type="float">
            <text:p>8640000</text:p>
          </table:table-cell>
          <table:table-cell table:formula="of:=[.B778]/[.C778]" office:value-type="float" office:value="0.00197847222222222" calcext:value-type="float">
            <text:p>0,00197847222222222000</text:p>
          </table:table-cell>
          <table:table-cell table:formula="of:=[.D779]-[.D778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B778]+22" office:value-type="float" office:value="17116" calcext:value-type="float">
            <text:p>17116</text:p>
          </table:table-cell>
          <table:table-cell office:value-type="float" office:value="8640000" calcext:value-type="float">
            <text:p>8640000</text:p>
          </table:table-cell>
          <table:table-cell table:formula="of:=[.B779]/[.C779]" office:value-type="float" office:value="0.00198101851851852" calcext:value-type="float">
            <text:p>0,00198101851851852000</text:p>
          </table:table-cell>
          <table:table-cell table:formula="of:=[.D780]-[.D779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B779]+22" office:value-type="float" office:value="17138" calcext:value-type="float">
            <text:p>17138</text:p>
          </table:table-cell>
          <table:table-cell office:value-type="float" office:value="8640000" calcext:value-type="float">
            <text:p>8640000</text:p>
          </table:table-cell>
          <table:table-cell table:formula="of:=[.B780]/[.C780]" office:value-type="float" office:value="0.00198356481481481" calcext:value-type="float">
            <text:p>0,00198356481481481000</text:p>
          </table:table-cell>
          <table:table-cell table:formula="of:=[.D781]-[.D780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B780]+22" office:value-type="float" office:value="17160" calcext:value-type="float">
            <text:p>17160</text:p>
          </table:table-cell>
          <table:table-cell office:value-type="float" office:value="8640000" calcext:value-type="float">
            <text:p>8640000</text:p>
          </table:table-cell>
          <table:table-cell table:formula="of:=[.B781]/[.C781]" office:value-type="float" office:value="0.00198611111111111" calcext:value-type="float">
            <text:p>0,00198611111111111000</text:p>
          </table:table-cell>
          <table:table-cell table:formula="of:=[.D782]-[.D781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B781]+22" office:value-type="float" office:value="17182" calcext:value-type="float">
            <text:p>17182</text:p>
          </table:table-cell>
          <table:table-cell office:value-type="float" office:value="8640000" calcext:value-type="float">
            <text:p>8640000</text:p>
          </table:table-cell>
          <table:table-cell table:formula="of:=[.B782]/[.C782]" office:value-type="float" office:value="0.00198865740740741" calcext:value-type="float">
            <text:p>0,00198865740740741000</text:p>
          </table:table-cell>
          <table:table-cell table:formula="of:=[.D783]-[.D782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B782]+22" office:value-type="float" office:value="17204" calcext:value-type="float">
            <text:p>17204</text:p>
          </table:table-cell>
          <table:table-cell office:value-type="float" office:value="8640000" calcext:value-type="float">
            <text:p>8640000</text:p>
          </table:table-cell>
          <table:table-cell table:formula="of:=[.B783]/[.C783]" office:value-type="float" office:value="0.0019912037037037" calcext:value-type="float">
            <text:p>0,00199120370370370000</text:p>
          </table:table-cell>
          <table:table-cell table:formula="of:=[.D784]-[.D783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B783]+22" office:value-type="float" office:value="17226" calcext:value-type="float">
            <text:p>17226</text:p>
          </table:table-cell>
          <table:table-cell office:value-type="float" office:value="8640000" calcext:value-type="float">
            <text:p>8640000</text:p>
          </table:table-cell>
          <table:table-cell table:formula="of:=[.B784]/[.C784]" office:value-type="float" office:value="0.00199375" calcext:value-type="float">
            <text:p>0,00199375000000000000</text:p>
          </table:table-cell>
          <table:table-cell table:formula="of:=[.D785]-[.D784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B784]+22" office:value-type="float" office:value="17248" calcext:value-type="float">
            <text:p>17248</text:p>
          </table:table-cell>
          <table:table-cell office:value-type="float" office:value="8640000" calcext:value-type="float">
            <text:p>8640000</text:p>
          </table:table-cell>
          <table:table-cell table:formula="of:=[.B785]/[.C785]" office:value-type="float" office:value="0.0019962962962963" calcext:value-type="float">
            <text:p>0,00199629629629630000</text:p>
          </table:table-cell>
          <table:table-cell table:formula="of:=[.D786]-[.D785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B785]+22" office:value-type="float" office:value="17270" calcext:value-type="float">
            <text:p>17270</text:p>
          </table:table-cell>
          <table:table-cell office:value-type="float" office:value="8640000" calcext:value-type="float">
            <text:p>8640000</text:p>
          </table:table-cell>
          <table:table-cell table:formula="of:=[.B786]/[.C786]" office:value-type="float" office:value="0.00199884259259259" calcext:value-type="float">
            <text:p>0,00199884259259259000</text:p>
          </table:table-cell>
          <table:table-cell table:formula="of:=[.D787]-[.D786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B786]+22" office:value-type="float" office:value="17292" calcext:value-type="float">
            <text:p>17292</text:p>
          </table:table-cell>
          <table:table-cell office:value-type="float" office:value="8640000" calcext:value-type="float">
            <text:p>8640000</text:p>
          </table:table-cell>
          <table:table-cell table:formula="of:=[.B787]/[.C787]" office:value-type="float" office:value="0.00200138888888889" calcext:value-type="float">
            <text:p>0,00200138888888889000</text:p>
          </table:table-cell>
          <table:table-cell table:formula="of:=[.D788]-[.D787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B787]+22" office:value-type="float" office:value="17314" calcext:value-type="float">
            <text:p>17314</text:p>
          </table:table-cell>
          <table:table-cell office:value-type="float" office:value="8640000" calcext:value-type="float">
            <text:p>8640000</text:p>
          </table:table-cell>
          <table:table-cell table:formula="of:=[.B788]/[.C788]" office:value-type="float" office:value="0.00200393518518519" calcext:value-type="float">
            <text:p>0,00200393518518519000</text:p>
          </table:table-cell>
          <table:table-cell table:formula="of:=[.D789]-[.D788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B788]+22" office:value-type="float" office:value="17336" calcext:value-type="float">
            <text:p>17336</text:p>
          </table:table-cell>
          <table:table-cell office:value-type="float" office:value="8640000" calcext:value-type="float">
            <text:p>8640000</text:p>
          </table:table-cell>
          <table:table-cell table:formula="of:=[.B789]/[.C789]" office:value-type="float" office:value="0.00200648148148148" calcext:value-type="float">
            <text:p>0,00200648148148148000</text:p>
          </table:table-cell>
          <table:table-cell table:formula="of:=[.D790]-[.D789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B789]+22" office:value-type="float" office:value="17358" calcext:value-type="float">
            <text:p>17358</text:p>
          </table:table-cell>
          <table:table-cell office:value-type="float" office:value="8640000" calcext:value-type="float">
            <text:p>8640000</text:p>
          </table:table-cell>
          <table:table-cell table:formula="of:=[.B790]/[.C790]" office:value-type="float" office:value="0.00200902777777778" calcext:value-type="float">
            <text:p>0,00200902777777778000</text:p>
          </table:table-cell>
          <table:table-cell table:formula="of:=[.D791]-[.D790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B790]+22" office:value-type="float" office:value="17380" calcext:value-type="float">
            <text:p>17380</text:p>
          </table:table-cell>
          <table:table-cell office:value-type="float" office:value="8640000" calcext:value-type="float">
            <text:p>8640000</text:p>
          </table:table-cell>
          <table:table-cell table:formula="of:=[.B791]/[.C791]" office:value-type="float" office:value="0.00201157407407407" calcext:value-type="float">
            <text:p>0,00201157407407407000</text:p>
          </table:table-cell>
          <table:table-cell table:formula="of:=[.D792]-[.D791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B791]+22" office:value-type="float" office:value="17402" calcext:value-type="float">
            <text:p>17402</text:p>
          </table:table-cell>
          <table:table-cell office:value-type="float" office:value="8640000" calcext:value-type="float">
            <text:p>8640000</text:p>
          </table:table-cell>
          <table:table-cell table:formula="of:=[.B792]/[.C792]" office:value-type="float" office:value="0.00201412037037037" calcext:value-type="float">
            <text:p>0,00201412037037037000</text:p>
          </table:table-cell>
          <table:table-cell table:formula="of:=[.D793]-[.D792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B792]+22" office:value-type="float" office:value="17424" calcext:value-type="float">
            <text:p>17424</text:p>
          </table:table-cell>
          <table:table-cell office:value-type="float" office:value="8640000" calcext:value-type="float">
            <text:p>8640000</text:p>
          </table:table-cell>
          <table:table-cell table:formula="of:=[.B793]/[.C793]" office:value-type="float" office:value="0.00201666666666667" calcext:value-type="float">
            <text:p>0,00201666666666667000</text:p>
          </table:table-cell>
          <table:table-cell table:formula="of:=[.D794]-[.D793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B793]+22" office:value-type="float" office:value="17446" calcext:value-type="float">
            <text:p>17446</text:p>
          </table:table-cell>
          <table:table-cell office:value-type="float" office:value="8640000" calcext:value-type="float">
            <text:p>8640000</text:p>
          </table:table-cell>
          <table:table-cell table:formula="of:=[.B794]/[.C794]" office:value-type="float" office:value="0.00201921296296296" calcext:value-type="float">
            <text:p>0,00201921296296296000</text:p>
          </table:table-cell>
          <table:table-cell table:formula="of:=[.D795]-[.D794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B794]+22" office:value-type="float" office:value="17468" calcext:value-type="float">
            <text:p>17468</text:p>
          </table:table-cell>
          <table:table-cell office:value-type="float" office:value="8640000" calcext:value-type="float">
            <text:p>8640000</text:p>
          </table:table-cell>
          <table:table-cell table:formula="of:=[.B795]/[.C795]" office:value-type="float" office:value="0.00202175925925926" calcext:value-type="float">
            <text:p>0,00202175925925926000</text:p>
          </table:table-cell>
          <table:table-cell table:formula="of:=[.D796]-[.D795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B795]+22" office:value-type="float" office:value="17490" calcext:value-type="float">
            <text:p>17490</text:p>
          </table:table-cell>
          <table:table-cell office:value-type="float" office:value="8640000" calcext:value-type="float">
            <text:p>8640000</text:p>
          </table:table-cell>
          <table:table-cell table:formula="of:=[.B796]/[.C796]" office:value-type="float" office:value="0.00202430555555556" calcext:value-type="float">
            <text:p>0,00202430555555556000</text:p>
          </table:table-cell>
          <table:table-cell table:formula="of:=[.D797]-[.D796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B796]+22" office:value-type="float" office:value="17512" calcext:value-type="float">
            <text:p>17512</text:p>
          </table:table-cell>
          <table:table-cell office:value-type="float" office:value="8640000" calcext:value-type="float">
            <text:p>8640000</text:p>
          </table:table-cell>
          <table:table-cell table:formula="of:=[.B797]/[.C797]" office:value-type="float" office:value="0.00202685185185185" calcext:value-type="float">
            <text:p>0,00202685185185185000</text:p>
          </table:table-cell>
          <table:table-cell table:formula="of:=[.D798]-[.D797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B797]+22" office:value-type="float" office:value="17534" calcext:value-type="float">
            <text:p>17534</text:p>
          </table:table-cell>
          <table:table-cell office:value-type="float" office:value="8640000" calcext:value-type="float">
            <text:p>8640000</text:p>
          </table:table-cell>
          <table:table-cell table:formula="of:=[.B798]/[.C798]" office:value-type="float" office:value="0.00202939814814815" calcext:value-type="float">
            <text:p>0,00202939814814815000</text:p>
          </table:table-cell>
          <table:table-cell table:formula="of:=[.D799]-[.D798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B798]+22" office:value-type="float" office:value="17556" calcext:value-type="float">
            <text:p>17556</text:p>
          </table:table-cell>
          <table:table-cell office:value-type="float" office:value="8640000" calcext:value-type="float">
            <text:p>8640000</text:p>
          </table:table-cell>
          <table:table-cell table:formula="of:=[.B799]/[.C799]" office:value-type="float" office:value="0.00203194444444444" calcext:value-type="float">
            <text:p>0,00203194444444444000</text:p>
          </table:table-cell>
          <table:table-cell table:formula="of:=[.D800]-[.D799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B799]+22" office:value-type="float" office:value="17578" calcext:value-type="float">
            <text:p>17578</text:p>
          </table:table-cell>
          <table:table-cell office:value-type="float" office:value="8640000" calcext:value-type="float">
            <text:p>8640000</text:p>
          </table:table-cell>
          <table:table-cell table:formula="of:=[.B800]/[.C800]" office:value-type="float" office:value="0.00203449074074074" calcext:value-type="float">
            <text:p>0,00203449074074074000</text:p>
          </table:table-cell>
          <table:table-cell table:formula="of:=[.D801]-[.D800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B800]+22" office:value-type="float" office:value="17600" calcext:value-type="float">
            <text:p>17600</text:p>
          </table:table-cell>
          <table:table-cell office:value-type="float" office:value="8640000" calcext:value-type="float">
            <text:p>8640000</text:p>
          </table:table-cell>
          <table:table-cell table:formula="of:=[.B801]/[.C801]" office:value-type="float" office:value="0.00203703703703704" calcext:value-type="float">
            <text:p>0,00203703703703704000</text:p>
          </table:table-cell>
          <table:table-cell table:formula="of:=[.D802]-[.D801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B801]+22" office:value-type="float" office:value="17622" calcext:value-type="float">
            <text:p>17622</text:p>
          </table:table-cell>
          <table:table-cell office:value-type="float" office:value="8640000" calcext:value-type="float">
            <text:p>8640000</text:p>
          </table:table-cell>
          <table:table-cell table:formula="of:=[.B802]/[.C802]" office:value-type="float" office:value="0.00203958333333333" calcext:value-type="float">
            <text:p>0,00203958333333333000</text:p>
          </table:table-cell>
          <table:table-cell table:formula="of:=[.D803]-[.D802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B802]+22" office:value-type="float" office:value="17644" calcext:value-type="float">
            <text:p>17644</text:p>
          </table:table-cell>
          <table:table-cell office:value-type="float" office:value="8640000" calcext:value-type="float">
            <text:p>8640000</text:p>
          </table:table-cell>
          <table:table-cell table:formula="of:=[.B803]/[.C803]" office:value-type="float" office:value="0.00204212962962963" calcext:value-type="float">
            <text:p>0,00204212962962963000</text:p>
          </table:table-cell>
          <table:table-cell table:formula="of:=[.D804]-[.D803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B803]+22" office:value-type="float" office:value="17666" calcext:value-type="float">
            <text:p>17666</text:p>
          </table:table-cell>
          <table:table-cell office:value-type="float" office:value="8640000" calcext:value-type="float">
            <text:p>8640000</text:p>
          </table:table-cell>
          <table:table-cell table:formula="of:=[.B804]/[.C804]" office:value-type="float" office:value="0.00204467592592593" calcext:value-type="float">
            <text:p>0,00204467592592593000</text:p>
          </table:table-cell>
          <table:table-cell table:formula="of:=[.D805]-[.D804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B804]+22" office:value-type="float" office:value="17688" calcext:value-type="float">
            <text:p>17688</text:p>
          </table:table-cell>
          <table:table-cell office:value-type="float" office:value="8640000" calcext:value-type="float">
            <text:p>8640000</text:p>
          </table:table-cell>
          <table:table-cell table:formula="of:=[.B805]/[.C805]" office:value-type="float" office:value="0.00204722222222222" calcext:value-type="float">
            <text:p>0,00204722222222222000</text:p>
          </table:table-cell>
          <table:table-cell table:formula="of:=[.D806]-[.D805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B805]+22" office:value-type="float" office:value="17710" calcext:value-type="float">
            <text:p>17710</text:p>
          </table:table-cell>
          <table:table-cell office:value-type="float" office:value="8640000" calcext:value-type="float">
            <text:p>8640000</text:p>
          </table:table-cell>
          <table:table-cell table:formula="of:=[.B806]/[.C806]" office:value-type="float" office:value="0.00204976851851852" calcext:value-type="float">
            <text:p>0,00204976851851852000</text:p>
          </table:table-cell>
          <table:table-cell table:formula="of:=[.D807]-[.D806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B806]+22" office:value-type="float" office:value="17732" calcext:value-type="float">
            <text:p>17732</text:p>
          </table:table-cell>
          <table:table-cell office:value-type="float" office:value="8640000" calcext:value-type="float">
            <text:p>8640000</text:p>
          </table:table-cell>
          <table:table-cell table:formula="of:=[.B807]/[.C807]" office:value-type="float" office:value="0.00205231481481482" calcext:value-type="float">
            <text:p>0,00205231481481482000</text:p>
          </table:table-cell>
          <table:table-cell table:formula="of:=[.D808]-[.D807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B807]+22" office:value-type="float" office:value="17754" calcext:value-type="float">
            <text:p>17754</text:p>
          </table:table-cell>
          <table:table-cell office:value-type="float" office:value="8640000" calcext:value-type="float">
            <text:p>8640000</text:p>
          </table:table-cell>
          <table:table-cell table:formula="of:=[.B808]/[.C808]" office:value-type="float" office:value="0.00205486111111111" calcext:value-type="float">
            <text:p>0,00205486111111111000</text:p>
          </table:table-cell>
          <table:table-cell table:formula="of:=[.D809]-[.D808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B808]+22" office:value-type="float" office:value="17776" calcext:value-type="float">
            <text:p>17776</text:p>
          </table:table-cell>
          <table:table-cell office:value-type="float" office:value="8640000" calcext:value-type="float">
            <text:p>8640000</text:p>
          </table:table-cell>
          <table:table-cell table:formula="of:=[.B809]/[.C809]" office:value-type="float" office:value="0.00205740740740741" calcext:value-type="float">
            <text:p>0,00205740740740741000</text:p>
          </table:table-cell>
          <table:table-cell table:formula="of:=[.D810]-[.D809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B809]+22" office:value-type="float" office:value="17798" calcext:value-type="float">
            <text:p>17798</text:p>
          </table:table-cell>
          <table:table-cell office:value-type="float" office:value="8640000" calcext:value-type="float">
            <text:p>8640000</text:p>
          </table:table-cell>
          <table:table-cell table:formula="of:=[.B810]/[.C810]" office:value-type="float" office:value="0.0020599537037037" calcext:value-type="float">
            <text:p>0,00205995370370370000</text:p>
          </table:table-cell>
          <table:table-cell table:formula="of:=[.D811]-[.D810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B810]+22" office:value-type="float" office:value="17820" calcext:value-type="float">
            <text:p>17820</text:p>
          </table:table-cell>
          <table:table-cell office:value-type="float" office:value="8640000" calcext:value-type="float">
            <text:p>8640000</text:p>
          </table:table-cell>
          <table:table-cell table:formula="of:=[.B811]/[.C811]" office:value-type="float" office:value="0.0020625" calcext:value-type="float">
            <text:p>0,00206250000000000000</text:p>
          </table:table-cell>
          <table:table-cell table:formula="of:=[.D812]-[.D811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B811]+22" office:value-type="float" office:value="17842" calcext:value-type="float">
            <text:p>17842</text:p>
          </table:table-cell>
          <table:table-cell office:value-type="float" office:value="8640000" calcext:value-type="float">
            <text:p>8640000</text:p>
          </table:table-cell>
          <table:table-cell table:formula="of:=[.B812]/[.C812]" office:value-type="float" office:value="0.0020650462962963" calcext:value-type="float">
            <text:p>0,00206504629629630000</text:p>
          </table:table-cell>
          <table:table-cell table:formula="of:=[.D813]-[.D812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B812]+22" office:value-type="float" office:value="17864" calcext:value-type="float">
            <text:p>17864</text:p>
          </table:table-cell>
          <table:table-cell office:value-type="float" office:value="8640000" calcext:value-type="float">
            <text:p>8640000</text:p>
          </table:table-cell>
          <table:table-cell table:formula="of:=[.B813]/[.C813]" office:value-type="float" office:value="0.00206759259259259" calcext:value-type="float">
            <text:p>0,00206759259259259000</text:p>
          </table:table-cell>
          <table:table-cell table:formula="of:=[.D814]-[.D813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B813]+22" office:value-type="float" office:value="17886" calcext:value-type="float">
            <text:p>17886</text:p>
          </table:table-cell>
          <table:table-cell office:value-type="float" office:value="8640000" calcext:value-type="float">
            <text:p>8640000</text:p>
          </table:table-cell>
          <table:table-cell table:formula="of:=[.B814]/[.C814]" office:value-type="float" office:value="0.00207013888888889" calcext:value-type="float">
            <text:p>0,00207013888888889000</text:p>
          </table:table-cell>
          <table:table-cell table:formula="of:=[.D815]-[.D814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B814]+22" office:value-type="float" office:value="17908" calcext:value-type="float">
            <text:p>17908</text:p>
          </table:table-cell>
          <table:table-cell office:value-type="float" office:value="8640000" calcext:value-type="float">
            <text:p>8640000</text:p>
          </table:table-cell>
          <table:table-cell table:formula="of:=[.B815]/[.C815]" office:value-type="float" office:value="0.00207268518518519" calcext:value-type="float">
            <text:p>0,00207268518518519000</text:p>
          </table:table-cell>
          <table:table-cell table:formula="of:=[.D816]-[.D815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B815]+22" office:value-type="float" office:value="17930" calcext:value-type="float">
            <text:p>17930</text:p>
          </table:table-cell>
          <table:table-cell office:value-type="float" office:value="8640000" calcext:value-type="float">
            <text:p>8640000</text:p>
          </table:table-cell>
          <table:table-cell table:formula="of:=[.B816]/[.C816]" office:value-type="float" office:value="0.00207523148148148" calcext:value-type="float">
            <text:p>0,00207523148148148000</text:p>
          </table:table-cell>
          <table:table-cell table:formula="of:=[.D817]-[.D816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B816]+22" office:value-type="float" office:value="17952" calcext:value-type="float">
            <text:p>17952</text:p>
          </table:table-cell>
          <table:table-cell office:value-type="float" office:value="8640000" calcext:value-type="float">
            <text:p>8640000</text:p>
          </table:table-cell>
          <table:table-cell table:formula="of:=[.B817]/[.C817]" office:value-type="float" office:value="0.00207777777777778" calcext:value-type="float">
            <text:p>0,00207777777777778000</text:p>
          </table:table-cell>
          <table:table-cell table:formula="of:=[.D818]-[.D817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B817]+22" office:value-type="float" office:value="17974" calcext:value-type="float">
            <text:p>17974</text:p>
          </table:table-cell>
          <table:table-cell office:value-type="float" office:value="8640000" calcext:value-type="float">
            <text:p>8640000</text:p>
          </table:table-cell>
          <table:table-cell table:formula="of:=[.B818]/[.C818]" office:value-type="float" office:value="0.00208032407407407" calcext:value-type="float">
            <text:p>0,00208032407407407000</text:p>
          </table:table-cell>
          <table:table-cell table:formula="of:=[.D819]-[.D818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B818]+22" office:value-type="float" office:value="17996" calcext:value-type="float">
            <text:p>17996</text:p>
          </table:table-cell>
          <table:table-cell office:value-type="float" office:value="8640000" calcext:value-type="float">
            <text:p>8640000</text:p>
          </table:table-cell>
          <table:table-cell table:formula="of:=[.B819]/[.C819]" office:value-type="float" office:value="0.00208287037037037" calcext:value-type="float">
            <text:p>0,00208287037037037000</text:p>
          </table:table-cell>
          <table:table-cell table:formula="of:=[.D820]-[.D819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B819]+22" office:value-type="float" office:value="18018" calcext:value-type="float">
            <text:p>18018</text:p>
          </table:table-cell>
          <table:table-cell office:value-type="float" office:value="8640000" calcext:value-type="float">
            <text:p>8640000</text:p>
          </table:table-cell>
          <table:table-cell table:formula="of:=[.B820]/[.C820]" office:value-type="float" office:value="0.00208541666666667" calcext:value-type="float">
            <text:p>0,00208541666666667000</text:p>
          </table:table-cell>
          <table:table-cell table:formula="of:=[.D821]-[.D820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B820]+22" office:value-type="float" office:value="18040" calcext:value-type="float">
            <text:p>18040</text:p>
          </table:table-cell>
          <table:table-cell office:value-type="float" office:value="8640000" calcext:value-type="float">
            <text:p>8640000</text:p>
          </table:table-cell>
          <table:table-cell table:formula="of:=[.B821]/[.C821]" office:value-type="float" office:value="0.00208796296296296" calcext:value-type="float">
            <text:p>0,00208796296296296000</text:p>
          </table:table-cell>
          <table:table-cell table:formula="of:=[.D822]-[.D821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B821]+22" office:value-type="float" office:value="18062" calcext:value-type="float">
            <text:p>18062</text:p>
          </table:table-cell>
          <table:table-cell office:value-type="float" office:value="8640000" calcext:value-type="float">
            <text:p>8640000</text:p>
          </table:table-cell>
          <table:table-cell table:formula="of:=[.B822]/[.C822]" office:value-type="float" office:value="0.00209050925925926" calcext:value-type="float">
            <text:p>0,00209050925925926000</text:p>
          </table:table-cell>
          <table:table-cell table:formula="of:=[.D823]-[.D822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B822]+22" office:value-type="float" office:value="18084" calcext:value-type="float">
            <text:p>18084</text:p>
          </table:table-cell>
          <table:table-cell office:value-type="float" office:value="8640000" calcext:value-type="float">
            <text:p>8640000</text:p>
          </table:table-cell>
          <table:table-cell table:formula="of:=[.B823]/[.C823]" office:value-type="float" office:value="0.00209305555555556" calcext:value-type="float">
            <text:p>0,00209305555555556000</text:p>
          </table:table-cell>
          <table:table-cell table:formula="of:=[.D824]-[.D823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B823]+22" office:value-type="float" office:value="18106" calcext:value-type="float">
            <text:p>18106</text:p>
          </table:table-cell>
          <table:table-cell office:value-type="float" office:value="8640000" calcext:value-type="float">
            <text:p>8640000</text:p>
          </table:table-cell>
          <table:table-cell table:formula="of:=[.B824]/[.C824]" office:value-type="float" office:value="0.00209560185185185" calcext:value-type="float">
            <text:p>0,00209560185185185000</text:p>
          </table:table-cell>
          <table:table-cell table:formula="of:=[.D825]-[.D824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B824]+22" office:value-type="float" office:value="18128" calcext:value-type="float">
            <text:p>18128</text:p>
          </table:table-cell>
          <table:table-cell office:value-type="float" office:value="8640000" calcext:value-type="float">
            <text:p>8640000</text:p>
          </table:table-cell>
          <table:table-cell table:formula="of:=[.B825]/[.C825]" office:value-type="float" office:value="0.00209814814814815" calcext:value-type="float">
            <text:p>0,00209814814814815000</text:p>
          </table:table-cell>
          <table:table-cell table:formula="of:=[.D826]-[.D825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B825]+22" office:value-type="float" office:value="18150" calcext:value-type="float">
            <text:p>18150</text:p>
          </table:table-cell>
          <table:table-cell office:value-type="float" office:value="8640000" calcext:value-type="float">
            <text:p>8640000</text:p>
          </table:table-cell>
          <table:table-cell table:formula="of:=[.B826]/[.C826]" office:value-type="float" office:value="0.00210069444444444" calcext:value-type="float">
            <text:p>0,00210069444444444000</text:p>
          </table:table-cell>
          <table:table-cell table:formula="of:=[.D827]-[.D826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B826]+22" office:value-type="float" office:value="18172" calcext:value-type="float">
            <text:p>18172</text:p>
          </table:table-cell>
          <table:table-cell office:value-type="float" office:value="8640000" calcext:value-type="float">
            <text:p>8640000</text:p>
          </table:table-cell>
          <table:table-cell table:formula="of:=[.B827]/[.C827]" office:value-type="float" office:value="0.00210324074074074" calcext:value-type="float">
            <text:p>0,00210324074074074000</text:p>
          </table:table-cell>
          <table:table-cell table:formula="of:=[.D828]-[.D827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B827]+22" office:value-type="float" office:value="18194" calcext:value-type="float">
            <text:p>18194</text:p>
          </table:table-cell>
          <table:table-cell office:value-type="float" office:value="8640000" calcext:value-type="float">
            <text:p>8640000</text:p>
          </table:table-cell>
          <table:table-cell table:formula="of:=[.B828]/[.C828]" office:value-type="float" office:value="0.00210578703703704" calcext:value-type="float">
            <text:p>0,00210578703703704000</text:p>
          </table:table-cell>
          <table:table-cell table:formula="of:=[.D829]-[.D828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B828]+22" office:value-type="float" office:value="18216" calcext:value-type="float">
            <text:p>18216</text:p>
          </table:table-cell>
          <table:table-cell office:value-type="float" office:value="8640000" calcext:value-type="float">
            <text:p>8640000</text:p>
          </table:table-cell>
          <table:table-cell table:formula="of:=[.B829]/[.C829]" office:value-type="float" office:value="0.00210833333333333" calcext:value-type="float">
            <text:p>0,00210833333333333000</text:p>
          </table:table-cell>
          <table:table-cell table:formula="of:=[.D830]-[.D829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B829]+22" office:value-type="float" office:value="18238" calcext:value-type="float">
            <text:p>18238</text:p>
          </table:table-cell>
          <table:table-cell office:value-type="float" office:value="8640000" calcext:value-type="float">
            <text:p>8640000</text:p>
          </table:table-cell>
          <table:table-cell table:formula="of:=[.B830]/[.C830]" office:value-type="float" office:value="0.00211087962962963" calcext:value-type="float">
            <text:p>0,00211087962962963000</text:p>
          </table:table-cell>
          <table:table-cell table:formula="of:=[.D831]-[.D830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B830]+22" office:value-type="float" office:value="18260" calcext:value-type="float">
            <text:p>18260</text:p>
          </table:table-cell>
          <table:table-cell office:value-type="float" office:value="8640000" calcext:value-type="float">
            <text:p>8640000</text:p>
          </table:table-cell>
          <table:table-cell table:formula="of:=[.B831]/[.C831]" office:value-type="float" office:value="0.00211342592592593" calcext:value-type="float">
            <text:p>0,00211342592592593000</text:p>
          </table:table-cell>
          <table:table-cell table:formula="of:=[.D832]-[.D831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B831]+22" office:value-type="float" office:value="18282" calcext:value-type="float">
            <text:p>18282</text:p>
          </table:table-cell>
          <table:table-cell office:value-type="float" office:value="8640000" calcext:value-type="float">
            <text:p>8640000</text:p>
          </table:table-cell>
          <table:table-cell table:formula="of:=[.B832]/[.C832]" office:value-type="float" office:value="0.00211597222222222" calcext:value-type="float">
            <text:p>0,00211597222222222000</text:p>
          </table:table-cell>
          <table:table-cell table:formula="of:=[.D833]-[.D832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B832]+22" office:value-type="float" office:value="18304" calcext:value-type="float">
            <text:p>18304</text:p>
          </table:table-cell>
          <table:table-cell office:value-type="float" office:value="8640000" calcext:value-type="float">
            <text:p>8640000</text:p>
          </table:table-cell>
          <table:table-cell table:formula="of:=[.B833]/[.C833]" office:value-type="float" office:value="0.00211851851851852" calcext:value-type="float">
            <text:p>0,00211851851851852000</text:p>
          </table:table-cell>
          <table:table-cell table:formula="of:=[.D834]-[.D833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B833]+22" office:value-type="float" office:value="18326" calcext:value-type="float">
            <text:p>18326</text:p>
          </table:table-cell>
          <table:table-cell office:value-type="float" office:value="8640000" calcext:value-type="float">
            <text:p>8640000</text:p>
          </table:table-cell>
          <table:table-cell table:formula="of:=[.B834]/[.C834]" office:value-type="float" office:value="0.00212106481481481" calcext:value-type="float">
            <text:p>0,00212106481481481000</text:p>
          </table:table-cell>
          <table:table-cell table:formula="of:=[.D835]-[.D834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B834]+22" office:value-type="float" office:value="18348" calcext:value-type="float">
            <text:p>18348</text:p>
          </table:table-cell>
          <table:table-cell office:value-type="float" office:value="8640000" calcext:value-type="float">
            <text:p>8640000</text:p>
          </table:table-cell>
          <table:table-cell table:formula="of:=[.B835]/[.C835]" office:value-type="float" office:value="0.00212361111111111" calcext:value-type="float">
            <text:p>0,00212361111111111000</text:p>
          </table:table-cell>
          <table:table-cell table:formula="of:=[.D836]-[.D835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B835]+22" office:value-type="float" office:value="18370" calcext:value-type="float">
            <text:p>18370</text:p>
          </table:table-cell>
          <table:table-cell office:value-type="float" office:value="8640000" calcext:value-type="float">
            <text:p>8640000</text:p>
          </table:table-cell>
          <table:table-cell table:formula="of:=[.B836]/[.C836]" office:value-type="float" office:value="0.00212615740740741" calcext:value-type="float">
            <text:p>0,00212615740740741000</text:p>
          </table:table-cell>
          <table:table-cell table:formula="of:=[.D837]-[.D836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B836]+22" office:value-type="float" office:value="18392" calcext:value-type="float">
            <text:p>18392</text:p>
          </table:table-cell>
          <table:table-cell office:value-type="float" office:value="8640000" calcext:value-type="float">
            <text:p>8640000</text:p>
          </table:table-cell>
          <table:table-cell table:formula="of:=[.B837]/[.C837]" office:value-type="float" office:value="0.0021287037037037" calcext:value-type="float">
            <text:p>0,00212870370370370000</text:p>
          </table:table-cell>
          <table:table-cell table:formula="of:=[.D838]-[.D837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B837]+22" office:value-type="float" office:value="18414" calcext:value-type="float">
            <text:p>18414</text:p>
          </table:table-cell>
          <table:table-cell office:value-type="float" office:value="8640000" calcext:value-type="float">
            <text:p>8640000</text:p>
          </table:table-cell>
          <table:table-cell table:formula="of:=[.B838]/[.C838]" office:value-type="float" office:value="0.00213125" calcext:value-type="float">
            <text:p>0,00213125000000000000</text:p>
          </table:table-cell>
          <table:table-cell table:formula="of:=[.D839]-[.D838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B838]+22" office:value-type="float" office:value="18436" calcext:value-type="float">
            <text:p>18436</text:p>
          </table:table-cell>
          <table:table-cell office:value-type="float" office:value="8640000" calcext:value-type="float">
            <text:p>8640000</text:p>
          </table:table-cell>
          <table:table-cell table:formula="of:=[.B839]/[.C839]" office:value-type="float" office:value="0.0021337962962963" calcext:value-type="float">
            <text:p>0,00213379629629630000</text:p>
          </table:table-cell>
          <table:table-cell table:formula="of:=[.D840]-[.D839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B839]+22" office:value-type="float" office:value="18458" calcext:value-type="float">
            <text:p>18458</text:p>
          </table:table-cell>
          <table:table-cell office:value-type="float" office:value="8640000" calcext:value-type="float">
            <text:p>8640000</text:p>
          </table:table-cell>
          <table:table-cell table:formula="of:=[.B840]/[.C840]" office:value-type="float" office:value="0.00213634259259259" calcext:value-type="float">
            <text:p>0,00213634259259259000</text:p>
          </table:table-cell>
          <table:table-cell table:formula="of:=[.D841]-[.D840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B840]+22" office:value-type="float" office:value="18480" calcext:value-type="float">
            <text:p>18480</text:p>
          </table:table-cell>
          <table:table-cell office:value-type="float" office:value="8640000" calcext:value-type="float">
            <text:p>8640000</text:p>
          </table:table-cell>
          <table:table-cell table:formula="of:=[.B841]/[.C841]" office:value-type="float" office:value="0.00213888888888889" calcext:value-type="float">
            <text:p>0,00213888888888889000</text:p>
          </table:table-cell>
          <table:table-cell table:formula="of:=[.D842]-[.D841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B841]+22" office:value-type="float" office:value="18502" calcext:value-type="float">
            <text:p>18502</text:p>
          </table:table-cell>
          <table:table-cell office:value-type="float" office:value="8640000" calcext:value-type="float">
            <text:p>8640000</text:p>
          </table:table-cell>
          <table:table-cell table:formula="of:=[.B842]/[.C842]" office:value-type="float" office:value="0.00214143518518519" calcext:value-type="float">
            <text:p>0,00214143518518519000</text:p>
          </table:table-cell>
          <table:table-cell table:formula="of:=[.D843]-[.D842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B842]+22" office:value-type="float" office:value="18524" calcext:value-type="float">
            <text:p>18524</text:p>
          </table:table-cell>
          <table:table-cell office:value-type="float" office:value="8640000" calcext:value-type="float">
            <text:p>8640000</text:p>
          </table:table-cell>
          <table:table-cell table:formula="of:=[.B843]/[.C843]" office:value-type="float" office:value="0.00214398148148148" calcext:value-type="float">
            <text:p>0,00214398148148148000</text:p>
          </table:table-cell>
          <table:table-cell table:formula="of:=[.D844]-[.D843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B843]+22" office:value-type="float" office:value="18546" calcext:value-type="float">
            <text:p>18546</text:p>
          </table:table-cell>
          <table:table-cell office:value-type="float" office:value="8640000" calcext:value-type="float">
            <text:p>8640000</text:p>
          </table:table-cell>
          <table:table-cell table:formula="of:=[.B844]/[.C844]" office:value-type="float" office:value="0.00214652777777778" calcext:value-type="float">
            <text:p>0,00214652777777778000</text:p>
          </table:table-cell>
          <table:table-cell table:formula="of:=[.D845]-[.D844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B844]+22" office:value-type="float" office:value="18568" calcext:value-type="float">
            <text:p>18568</text:p>
          </table:table-cell>
          <table:table-cell office:value-type="float" office:value="8640000" calcext:value-type="float">
            <text:p>8640000</text:p>
          </table:table-cell>
          <table:table-cell table:formula="of:=[.B845]/[.C845]" office:value-type="float" office:value="0.00214907407407407" calcext:value-type="float">
            <text:p>0,00214907407407407000</text:p>
          </table:table-cell>
          <table:table-cell table:formula="of:=[.D846]-[.D845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B845]+22" office:value-type="float" office:value="18590" calcext:value-type="float">
            <text:p>18590</text:p>
          </table:table-cell>
          <table:table-cell office:value-type="float" office:value="8640000" calcext:value-type="float">
            <text:p>8640000</text:p>
          </table:table-cell>
          <table:table-cell table:formula="of:=[.B846]/[.C846]" office:value-type="float" office:value="0.00215162037037037" calcext:value-type="float">
            <text:p>0,00215162037037037000</text:p>
          </table:table-cell>
          <table:table-cell table:formula="of:=[.D847]-[.D846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B846]+22" office:value-type="float" office:value="18612" calcext:value-type="float">
            <text:p>18612</text:p>
          </table:table-cell>
          <table:table-cell office:value-type="float" office:value="8640000" calcext:value-type="float">
            <text:p>8640000</text:p>
          </table:table-cell>
          <table:table-cell table:formula="of:=[.B847]/[.C847]" office:value-type="float" office:value="0.00215416666666667" calcext:value-type="float">
            <text:p>0,00215416666666667000</text:p>
          </table:table-cell>
          <table:table-cell table:formula="of:=[.D848]-[.D847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B847]+22" office:value-type="float" office:value="18634" calcext:value-type="float">
            <text:p>18634</text:p>
          </table:table-cell>
          <table:table-cell office:value-type="float" office:value="8640000" calcext:value-type="float">
            <text:p>8640000</text:p>
          </table:table-cell>
          <table:table-cell table:formula="of:=[.B848]/[.C848]" office:value-type="float" office:value="0.00215671296296296" calcext:value-type="float">
            <text:p>0,00215671296296296000</text:p>
          </table:table-cell>
          <table:table-cell table:formula="of:=[.D849]-[.D848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B848]+22" office:value-type="float" office:value="18656" calcext:value-type="float">
            <text:p>18656</text:p>
          </table:table-cell>
          <table:table-cell office:value-type="float" office:value="8640000" calcext:value-type="float">
            <text:p>8640000</text:p>
          </table:table-cell>
          <table:table-cell table:formula="of:=[.B849]/[.C849]" office:value-type="float" office:value="0.00215925925925926" calcext:value-type="float">
            <text:p>0,00215925925925926000</text:p>
          </table:table-cell>
          <table:table-cell table:formula="of:=[.D850]-[.D849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B849]+22" office:value-type="float" office:value="18678" calcext:value-type="float">
            <text:p>18678</text:p>
          </table:table-cell>
          <table:table-cell office:value-type="float" office:value="8640000" calcext:value-type="float">
            <text:p>8640000</text:p>
          </table:table-cell>
          <table:table-cell table:formula="of:=[.B850]/[.C850]" office:value-type="float" office:value="0.00216180555555556" calcext:value-type="float">
            <text:p>0,00216180555555556000</text:p>
          </table:table-cell>
          <table:table-cell table:formula="of:=[.D851]-[.D850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B850]+22" office:value-type="float" office:value="18700" calcext:value-type="float">
            <text:p>18700</text:p>
          </table:table-cell>
          <table:table-cell office:value-type="float" office:value="8640000" calcext:value-type="float">
            <text:p>8640000</text:p>
          </table:table-cell>
          <table:table-cell table:formula="of:=[.B851]/[.C851]" office:value-type="float" office:value="0.00216435185185185" calcext:value-type="float">
            <text:p>0,00216435185185185000</text:p>
          </table:table-cell>
          <table:table-cell table:formula="of:=[.D852]-[.D851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B851]+22" office:value-type="float" office:value="18722" calcext:value-type="float">
            <text:p>18722</text:p>
          </table:table-cell>
          <table:table-cell office:value-type="float" office:value="8640000" calcext:value-type="float">
            <text:p>8640000</text:p>
          </table:table-cell>
          <table:table-cell table:formula="of:=[.B852]/[.C852]" office:value-type="float" office:value="0.00216689814814815" calcext:value-type="float">
            <text:p>0,00216689814814815000</text:p>
          </table:table-cell>
          <table:table-cell table:formula="of:=[.D853]-[.D852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B852]+22" office:value-type="float" office:value="18744" calcext:value-type="float">
            <text:p>18744</text:p>
          </table:table-cell>
          <table:table-cell office:value-type="float" office:value="8640000" calcext:value-type="float">
            <text:p>8640000</text:p>
          </table:table-cell>
          <table:table-cell table:formula="of:=[.B853]/[.C853]" office:value-type="float" office:value="0.00216944444444444" calcext:value-type="float">
            <text:p>0,00216944444444444000</text:p>
          </table:table-cell>
          <table:table-cell table:formula="of:=[.D854]-[.D853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B853]+22" office:value-type="float" office:value="18766" calcext:value-type="float">
            <text:p>18766</text:p>
          </table:table-cell>
          <table:table-cell office:value-type="float" office:value="8640000" calcext:value-type="float">
            <text:p>8640000</text:p>
          </table:table-cell>
          <table:table-cell table:formula="of:=[.B854]/[.C854]" office:value-type="float" office:value="0.00217199074074074" calcext:value-type="float">
            <text:p>0,00217199074074074000</text:p>
          </table:table-cell>
          <table:table-cell table:formula="of:=[.D855]-[.D854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B854]+22" office:value-type="float" office:value="18788" calcext:value-type="float">
            <text:p>18788</text:p>
          </table:table-cell>
          <table:table-cell office:value-type="float" office:value="8640000" calcext:value-type="float">
            <text:p>8640000</text:p>
          </table:table-cell>
          <table:table-cell table:formula="of:=[.B855]/[.C855]" office:value-type="float" office:value="0.00217453703703704" calcext:value-type="float">
            <text:p>0,00217453703703704000</text:p>
          </table:table-cell>
          <table:table-cell table:formula="of:=[.D856]-[.D855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B855]+22" office:value-type="float" office:value="18810" calcext:value-type="float">
            <text:p>18810</text:p>
          </table:table-cell>
          <table:table-cell office:value-type="float" office:value="8640000" calcext:value-type="float">
            <text:p>8640000</text:p>
          </table:table-cell>
          <table:table-cell table:formula="of:=[.B856]/[.C856]" office:value-type="float" office:value="0.00217708333333333" calcext:value-type="float">
            <text:p>0,00217708333333333000</text:p>
          </table:table-cell>
          <table:table-cell table:formula="of:=[.D857]-[.D856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B856]+22" office:value-type="float" office:value="18832" calcext:value-type="float">
            <text:p>18832</text:p>
          </table:table-cell>
          <table:table-cell office:value-type="float" office:value="8640000" calcext:value-type="float">
            <text:p>8640000</text:p>
          </table:table-cell>
          <table:table-cell table:formula="of:=[.B857]/[.C857]" office:value-type="float" office:value="0.00217962962962963" calcext:value-type="float">
            <text:p>0,00217962962962963000</text:p>
          </table:table-cell>
          <table:table-cell table:formula="of:=[.D858]-[.D857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B857]+22" office:value-type="float" office:value="18854" calcext:value-type="float">
            <text:p>18854</text:p>
          </table:table-cell>
          <table:table-cell office:value-type="float" office:value="8640000" calcext:value-type="float">
            <text:p>8640000</text:p>
          </table:table-cell>
          <table:table-cell table:formula="of:=[.B858]/[.C858]" office:value-type="float" office:value="0.00218217592592593" calcext:value-type="float">
            <text:p>0,00218217592592593000</text:p>
          </table:table-cell>
          <table:table-cell table:formula="of:=[.D859]-[.D858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B858]+22" office:value-type="float" office:value="18876" calcext:value-type="float">
            <text:p>18876</text:p>
          </table:table-cell>
          <table:table-cell office:value-type="float" office:value="8640000" calcext:value-type="float">
            <text:p>8640000</text:p>
          </table:table-cell>
          <table:table-cell table:formula="of:=[.B859]/[.C859]" office:value-type="float" office:value="0.00218472222222222" calcext:value-type="float">
            <text:p>0,00218472222222222000</text:p>
          </table:table-cell>
          <table:table-cell table:formula="of:=[.D860]-[.D859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B859]+22" office:value-type="float" office:value="18898" calcext:value-type="float">
            <text:p>18898</text:p>
          </table:table-cell>
          <table:table-cell office:value-type="float" office:value="8640000" calcext:value-type="float">
            <text:p>8640000</text:p>
          </table:table-cell>
          <table:table-cell table:formula="of:=[.B860]/[.C860]" office:value-type="float" office:value="0.00218726851851852" calcext:value-type="float">
            <text:p>0,00218726851851852000</text:p>
          </table:table-cell>
          <table:table-cell table:formula="of:=[.D861]-[.D860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B860]+22" office:value-type="float" office:value="18920" calcext:value-type="float">
            <text:p>18920</text:p>
          </table:table-cell>
          <table:table-cell office:value-type="float" office:value="8640000" calcext:value-type="float">
            <text:p>8640000</text:p>
          </table:table-cell>
          <table:table-cell table:formula="of:=[.B861]/[.C861]" office:value-type="float" office:value="0.00218981481481482" calcext:value-type="float">
            <text:p>0,00218981481481482000</text:p>
          </table:table-cell>
          <table:table-cell table:formula="of:=[.D862]-[.D861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B861]+22" office:value-type="float" office:value="18942" calcext:value-type="float">
            <text:p>18942</text:p>
          </table:table-cell>
          <table:table-cell office:value-type="float" office:value="8640000" calcext:value-type="float">
            <text:p>8640000</text:p>
          </table:table-cell>
          <table:table-cell table:formula="of:=[.B862]/[.C862]" office:value-type="float" office:value="0.00219236111111111" calcext:value-type="float">
            <text:p>0,00219236111111111000</text:p>
          </table:table-cell>
          <table:table-cell table:formula="of:=[.D863]-[.D862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B862]+22" office:value-type="float" office:value="18964" calcext:value-type="float">
            <text:p>18964</text:p>
          </table:table-cell>
          <table:table-cell office:value-type="float" office:value="8640000" calcext:value-type="float">
            <text:p>8640000</text:p>
          </table:table-cell>
          <table:table-cell table:formula="of:=[.B863]/[.C863]" office:value-type="float" office:value="0.00219490740740741" calcext:value-type="float">
            <text:p>0,00219490740740741000</text:p>
          </table:table-cell>
          <table:table-cell table:formula="of:=[.D864]-[.D863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B863]+22" office:value-type="float" office:value="18986" calcext:value-type="float">
            <text:p>18986</text:p>
          </table:table-cell>
          <table:table-cell office:value-type="float" office:value="8640000" calcext:value-type="float">
            <text:p>8640000</text:p>
          </table:table-cell>
          <table:table-cell table:formula="of:=[.B864]/[.C864]" office:value-type="float" office:value="0.0021974537037037" calcext:value-type="float">
            <text:p>0,00219745370370370000</text:p>
          </table:table-cell>
          <table:table-cell table:formula="of:=[.D865]-[.D864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B864]+22" office:value-type="float" office:value="19008" calcext:value-type="float">
            <text:p>19008</text:p>
          </table:table-cell>
          <table:table-cell office:value-type="float" office:value="8640000" calcext:value-type="float">
            <text:p>8640000</text:p>
          </table:table-cell>
          <table:table-cell table:formula="of:=[.B865]/[.C865]" office:value-type="float" office:value="0.0022" calcext:value-type="float">
            <text:p>0,00220000000000000000</text:p>
          </table:table-cell>
          <table:table-cell table:formula="of:=[.D866]-[.D865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B865]+22" office:value-type="float" office:value="19030" calcext:value-type="float">
            <text:p>19030</text:p>
          </table:table-cell>
          <table:table-cell office:value-type="float" office:value="8640000" calcext:value-type="float">
            <text:p>8640000</text:p>
          </table:table-cell>
          <table:table-cell table:formula="of:=[.B866]/[.C866]" office:value-type="float" office:value="0.0022025462962963" calcext:value-type="float">
            <text:p>0,00220254629629630000</text:p>
          </table:table-cell>
          <table:table-cell table:formula="of:=[.D867]-[.D866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B866]+22" office:value-type="float" office:value="19052" calcext:value-type="float">
            <text:p>19052</text:p>
          </table:table-cell>
          <table:table-cell office:value-type="float" office:value="8640000" calcext:value-type="float">
            <text:p>8640000</text:p>
          </table:table-cell>
          <table:table-cell table:formula="of:=[.B867]/[.C867]" office:value-type="float" office:value="0.00220509259259259" calcext:value-type="float">
            <text:p>0,00220509259259259000</text:p>
          </table:table-cell>
          <table:table-cell table:formula="of:=[.D868]-[.D867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B867]+22" office:value-type="float" office:value="19074" calcext:value-type="float">
            <text:p>19074</text:p>
          </table:table-cell>
          <table:table-cell office:value-type="float" office:value="8640000" calcext:value-type="float">
            <text:p>8640000</text:p>
          </table:table-cell>
          <table:table-cell table:formula="of:=[.B868]/[.C868]" office:value-type="float" office:value="0.00220763888888889" calcext:value-type="float">
            <text:p>0,00220763888888889000</text:p>
          </table:table-cell>
          <table:table-cell table:formula="of:=[.D869]-[.D868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B868]+22" office:value-type="float" office:value="19096" calcext:value-type="float">
            <text:p>19096</text:p>
          </table:table-cell>
          <table:table-cell office:value-type="float" office:value="8640000" calcext:value-type="float">
            <text:p>8640000</text:p>
          </table:table-cell>
          <table:table-cell table:formula="of:=[.B869]/[.C869]" office:value-type="float" office:value="0.00221018518518519" calcext:value-type="float">
            <text:p>0,00221018518518519000</text:p>
          </table:table-cell>
          <table:table-cell table:formula="of:=[.D870]-[.D869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B869]+22" office:value-type="float" office:value="19118" calcext:value-type="float">
            <text:p>19118</text:p>
          </table:table-cell>
          <table:table-cell office:value-type="float" office:value="8640000" calcext:value-type="float">
            <text:p>8640000</text:p>
          </table:table-cell>
          <table:table-cell table:formula="of:=[.B870]/[.C870]" office:value-type="float" office:value="0.00221273148148148" calcext:value-type="float">
            <text:p>0,00221273148148148000</text:p>
          </table:table-cell>
          <table:table-cell table:formula="of:=[.D871]-[.D870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B870]+22" office:value-type="float" office:value="19140" calcext:value-type="float">
            <text:p>19140</text:p>
          </table:table-cell>
          <table:table-cell office:value-type="float" office:value="8640000" calcext:value-type="float">
            <text:p>8640000</text:p>
          </table:table-cell>
          <table:table-cell table:formula="of:=[.B871]/[.C871]" office:value-type="float" office:value="0.00221527777777778" calcext:value-type="float">
            <text:p>0,00221527777777778000</text:p>
          </table:table-cell>
          <table:table-cell table:formula="of:=[.D872]-[.D871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B871]+22" office:value-type="float" office:value="19162" calcext:value-type="float">
            <text:p>19162</text:p>
          </table:table-cell>
          <table:table-cell office:value-type="float" office:value="8640000" calcext:value-type="float">
            <text:p>8640000</text:p>
          </table:table-cell>
          <table:table-cell table:formula="of:=[.B872]/[.C872]" office:value-type="float" office:value="0.00221782407407407" calcext:value-type="float">
            <text:p>0,00221782407407407000</text:p>
          </table:table-cell>
          <table:table-cell table:formula="of:=[.D873]-[.D872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B872]+22" office:value-type="float" office:value="19184" calcext:value-type="float">
            <text:p>19184</text:p>
          </table:table-cell>
          <table:table-cell office:value-type="float" office:value="8640000" calcext:value-type="float">
            <text:p>8640000</text:p>
          </table:table-cell>
          <table:table-cell table:formula="of:=[.B873]/[.C873]" office:value-type="float" office:value="0.00222037037037037" calcext:value-type="float">
            <text:p>0,00222037037037037000</text:p>
          </table:table-cell>
          <table:table-cell table:formula="of:=[.D874]-[.D873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B873]+22" office:value-type="float" office:value="19206" calcext:value-type="float">
            <text:p>19206</text:p>
          </table:table-cell>
          <table:table-cell office:value-type="float" office:value="8640000" calcext:value-type="float">
            <text:p>8640000</text:p>
          </table:table-cell>
          <table:table-cell table:formula="of:=[.B874]/[.C874]" office:value-type="float" office:value="0.00222291666666667" calcext:value-type="float">
            <text:p>0,00222291666666667000</text:p>
          </table:table-cell>
          <table:table-cell table:formula="of:=[.D875]-[.D874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B874]+22" office:value-type="float" office:value="19228" calcext:value-type="float">
            <text:p>19228</text:p>
          </table:table-cell>
          <table:table-cell office:value-type="float" office:value="8640000" calcext:value-type="float">
            <text:p>8640000</text:p>
          </table:table-cell>
          <table:table-cell table:formula="of:=[.B875]/[.C875]" office:value-type="float" office:value="0.00222546296296296" calcext:value-type="float">
            <text:p>0,00222546296296296000</text:p>
          </table:table-cell>
          <table:table-cell table:formula="of:=[.D876]-[.D875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B875]+22" office:value-type="float" office:value="19250" calcext:value-type="float">
            <text:p>19250</text:p>
          </table:table-cell>
          <table:table-cell office:value-type="float" office:value="8640000" calcext:value-type="float">
            <text:p>8640000</text:p>
          </table:table-cell>
          <table:table-cell table:formula="of:=[.B876]/[.C876]" office:value-type="float" office:value="0.00222800925925926" calcext:value-type="float">
            <text:p>0,00222800925925926000</text:p>
          </table:table-cell>
          <table:table-cell table:formula="of:=[.D877]-[.D876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B876]+22" office:value-type="float" office:value="19272" calcext:value-type="float">
            <text:p>19272</text:p>
          </table:table-cell>
          <table:table-cell office:value-type="float" office:value="8640000" calcext:value-type="float">
            <text:p>8640000</text:p>
          </table:table-cell>
          <table:table-cell table:formula="of:=[.B877]/[.C877]" office:value-type="float" office:value="0.00223055555555556" calcext:value-type="float">
            <text:p>0,00223055555555556000</text:p>
          </table:table-cell>
          <table:table-cell table:formula="of:=[.D878]-[.D877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B877]+22" office:value-type="float" office:value="19294" calcext:value-type="float">
            <text:p>19294</text:p>
          </table:table-cell>
          <table:table-cell office:value-type="float" office:value="8640000" calcext:value-type="float">
            <text:p>8640000</text:p>
          </table:table-cell>
          <table:table-cell table:formula="of:=[.B878]/[.C878]" office:value-type="float" office:value="0.00223310185185185" calcext:value-type="float">
            <text:p>0,00223310185185185000</text:p>
          </table:table-cell>
          <table:table-cell table:formula="of:=[.D879]-[.D878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B878]+22" office:value-type="float" office:value="19316" calcext:value-type="float">
            <text:p>19316</text:p>
          </table:table-cell>
          <table:table-cell office:value-type="float" office:value="8640000" calcext:value-type="float">
            <text:p>8640000</text:p>
          </table:table-cell>
          <table:table-cell table:formula="of:=[.B879]/[.C879]" office:value-type="float" office:value="0.00223564814814815" calcext:value-type="float">
            <text:p>0,00223564814814815000</text:p>
          </table:table-cell>
          <table:table-cell table:formula="of:=[.D880]-[.D879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B879]+22" office:value-type="float" office:value="19338" calcext:value-type="float">
            <text:p>19338</text:p>
          </table:table-cell>
          <table:table-cell office:value-type="float" office:value="8640000" calcext:value-type="float">
            <text:p>8640000</text:p>
          </table:table-cell>
          <table:table-cell table:formula="of:=[.B880]/[.C880]" office:value-type="float" office:value="0.00223819444444444" calcext:value-type="float">
            <text:p>0,00223819444444444000</text:p>
          </table:table-cell>
          <table:table-cell table:formula="of:=[.D881]-[.D880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B880]+22" office:value-type="float" office:value="19360" calcext:value-type="float">
            <text:p>19360</text:p>
          </table:table-cell>
          <table:table-cell office:value-type="float" office:value="8640000" calcext:value-type="float">
            <text:p>8640000</text:p>
          </table:table-cell>
          <table:table-cell table:formula="of:=[.B881]/[.C881]" office:value-type="float" office:value="0.00224074074074074" calcext:value-type="float">
            <text:p>0,00224074074074074000</text:p>
          </table:table-cell>
          <table:table-cell table:formula="of:=[.D882]-[.D881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B881]+22" office:value-type="float" office:value="19382" calcext:value-type="float">
            <text:p>19382</text:p>
          </table:table-cell>
          <table:table-cell office:value-type="float" office:value="8640000" calcext:value-type="float">
            <text:p>8640000</text:p>
          </table:table-cell>
          <table:table-cell table:formula="of:=[.B882]/[.C882]" office:value-type="float" office:value="0.00224328703703704" calcext:value-type="float">
            <text:p>0,00224328703703704000</text:p>
          </table:table-cell>
          <table:table-cell table:formula="of:=[.D883]-[.D882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B882]+22" office:value-type="float" office:value="19404" calcext:value-type="float">
            <text:p>19404</text:p>
          </table:table-cell>
          <table:table-cell office:value-type="float" office:value="8640000" calcext:value-type="float">
            <text:p>8640000</text:p>
          </table:table-cell>
          <table:table-cell table:formula="of:=[.B883]/[.C883]" office:value-type="float" office:value="0.00224583333333333" calcext:value-type="float">
            <text:p>0,00224583333333333000</text:p>
          </table:table-cell>
          <table:table-cell table:formula="of:=[.D884]-[.D883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B883]+22" office:value-type="float" office:value="19426" calcext:value-type="float">
            <text:p>19426</text:p>
          </table:table-cell>
          <table:table-cell office:value-type="float" office:value="8640000" calcext:value-type="float">
            <text:p>8640000</text:p>
          </table:table-cell>
          <table:table-cell table:formula="of:=[.B884]/[.C884]" office:value-type="float" office:value="0.00224837962962963" calcext:value-type="float">
            <text:p>0,00224837962962963000</text:p>
          </table:table-cell>
          <table:table-cell table:formula="of:=[.D885]-[.D884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B884]+22" office:value-type="float" office:value="19448" calcext:value-type="float">
            <text:p>19448</text:p>
          </table:table-cell>
          <table:table-cell office:value-type="float" office:value="8640000" calcext:value-type="float">
            <text:p>8640000</text:p>
          </table:table-cell>
          <table:table-cell table:formula="of:=[.B885]/[.C885]" office:value-type="float" office:value="0.00225092592592593" calcext:value-type="float">
            <text:p>0,00225092592592593000</text:p>
          </table:table-cell>
          <table:table-cell table:formula="of:=[.D886]-[.D885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B885]+22" office:value-type="float" office:value="19470" calcext:value-type="float">
            <text:p>19470</text:p>
          </table:table-cell>
          <table:table-cell office:value-type="float" office:value="8640000" calcext:value-type="float">
            <text:p>8640000</text:p>
          </table:table-cell>
          <table:table-cell table:formula="of:=[.B886]/[.C886]" office:value-type="float" office:value="0.00225347222222222" calcext:value-type="float">
            <text:p>0,00225347222222222000</text:p>
          </table:table-cell>
          <table:table-cell table:formula="of:=[.D887]-[.D886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B886]+22" office:value-type="float" office:value="19492" calcext:value-type="float">
            <text:p>19492</text:p>
          </table:table-cell>
          <table:table-cell office:value-type="float" office:value="8640000" calcext:value-type="float">
            <text:p>8640000</text:p>
          </table:table-cell>
          <table:table-cell table:formula="of:=[.B887]/[.C887]" office:value-type="float" office:value="0.00225601851851852" calcext:value-type="float">
            <text:p>0,00225601851851852000</text:p>
          </table:table-cell>
          <table:table-cell table:formula="of:=[.D888]-[.D887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B887]+22" office:value-type="float" office:value="19514" calcext:value-type="float">
            <text:p>19514</text:p>
          </table:table-cell>
          <table:table-cell office:value-type="float" office:value="8640000" calcext:value-type="float">
            <text:p>8640000</text:p>
          </table:table-cell>
          <table:table-cell table:formula="of:=[.B888]/[.C888]" office:value-type="float" office:value="0.00225856481481482" calcext:value-type="float">
            <text:p>0,00225856481481482000</text:p>
          </table:table-cell>
          <table:table-cell table:formula="of:=[.D889]-[.D888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B888]+22" office:value-type="float" office:value="19536" calcext:value-type="float">
            <text:p>19536</text:p>
          </table:table-cell>
          <table:table-cell office:value-type="float" office:value="8640000" calcext:value-type="float">
            <text:p>8640000</text:p>
          </table:table-cell>
          <table:table-cell table:formula="of:=[.B889]/[.C889]" office:value-type="float" office:value="0.00226111111111111" calcext:value-type="float">
            <text:p>0,00226111111111111000</text:p>
          </table:table-cell>
          <table:table-cell table:formula="of:=[.D890]-[.D889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B889]+22" office:value-type="float" office:value="19558" calcext:value-type="float">
            <text:p>19558</text:p>
          </table:table-cell>
          <table:table-cell office:value-type="float" office:value="8640000" calcext:value-type="float">
            <text:p>8640000</text:p>
          </table:table-cell>
          <table:table-cell table:formula="of:=[.B890]/[.C890]" office:value-type="float" office:value="0.00226365740740741" calcext:value-type="float">
            <text:p>0,00226365740740741000</text:p>
          </table:table-cell>
          <table:table-cell table:formula="of:=[.D891]-[.D890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B890]+22" office:value-type="float" office:value="19580" calcext:value-type="float">
            <text:p>19580</text:p>
          </table:table-cell>
          <table:table-cell office:value-type="float" office:value="8640000" calcext:value-type="float">
            <text:p>8640000</text:p>
          </table:table-cell>
          <table:table-cell table:formula="of:=[.B891]/[.C891]" office:value-type="float" office:value="0.0022662037037037" calcext:value-type="float">
            <text:p>0,00226620370370370000</text:p>
          </table:table-cell>
          <table:table-cell table:formula="of:=[.D892]-[.D891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B891]+22" office:value-type="float" office:value="19602" calcext:value-type="float">
            <text:p>19602</text:p>
          </table:table-cell>
          <table:table-cell office:value-type="float" office:value="8640000" calcext:value-type="float">
            <text:p>8640000</text:p>
          </table:table-cell>
          <table:table-cell table:formula="of:=[.B892]/[.C892]" office:value-type="float" office:value="0.00226875" calcext:value-type="float">
            <text:p>0,00226875000000000000</text:p>
          </table:table-cell>
          <table:table-cell table:formula="of:=[.D893]-[.D892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B892]+22" office:value-type="float" office:value="19624" calcext:value-type="float">
            <text:p>19624</text:p>
          </table:table-cell>
          <table:table-cell office:value-type="float" office:value="8640000" calcext:value-type="float">
            <text:p>8640000</text:p>
          </table:table-cell>
          <table:table-cell table:formula="of:=[.B893]/[.C893]" office:value-type="float" office:value="0.0022712962962963" calcext:value-type="float">
            <text:p>0,00227129629629630000</text:p>
          </table:table-cell>
          <table:table-cell table:formula="of:=[.D894]-[.D893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B893]+22" office:value-type="float" office:value="19646" calcext:value-type="float">
            <text:p>19646</text:p>
          </table:table-cell>
          <table:table-cell office:value-type="float" office:value="8640000" calcext:value-type="float">
            <text:p>8640000</text:p>
          </table:table-cell>
          <table:table-cell table:formula="of:=[.B894]/[.C894]" office:value-type="float" office:value="0.00227384259259259" calcext:value-type="float">
            <text:p>0,00227384259259259000</text:p>
          </table:table-cell>
          <table:table-cell table:formula="of:=[.D895]-[.D894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B894]+22" office:value-type="float" office:value="19668" calcext:value-type="float">
            <text:p>19668</text:p>
          </table:table-cell>
          <table:table-cell office:value-type="float" office:value="8640000" calcext:value-type="float">
            <text:p>8640000</text:p>
          </table:table-cell>
          <table:table-cell table:formula="of:=[.B895]/[.C895]" office:value-type="float" office:value="0.00227638888888889" calcext:value-type="float">
            <text:p>0,00227638888888889000</text:p>
          </table:table-cell>
          <table:table-cell table:formula="of:=[.D896]-[.D895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B895]+22" office:value-type="float" office:value="19690" calcext:value-type="float">
            <text:p>19690</text:p>
          </table:table-cell>
          <table:table-cell office:value-type="float" office:value="8640000" calcext:value-type="float">
            <text:p>8640000</text:p>
          </table:table-cell>
          <table:table-cell table:formula="of:=[.B896]/[.C896]" office:value-type="float" office:value="0.00227893518518519" calcext:value-type="float">
            <text:p>0,00227893518518519000</text:p>
          </table:table-cell>
          <table:table-cell table:formula="of:=[.D897]-[.D896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B896]+22" office:value-type="float" office:value="19712" calcext:value-type="float">
            <text:p>19712</text:p>
          </table:table-cell>
          <table:table-cell office:value-type="float" office:value="8640000" calcext:value-type="float">
            <text:p>8640000</text:p>
          </table:table-cell>
          <table:table-cell table:formula="of:=[.B897]/[.C897]" office:value-type="float" office:value="0.00228148148148148" calcext:value-type="float">
            <text:p>0,00228148148148148000</text:p>
          </table:table-cell>
          <table:table-cell table:formula="of:=[.D898]-[.D897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B897]+22" office:value-type="float" office:value="19734" calcext:value-type="float">
            <text:p>19734</text:p>
          </table:table-cell>
          <table:table-cell office:value-type="float" office:value="8640000" calcext:value-type="float">
            <text:p>8640000</text:p>
          </table:table-cell>
          <table:table-cell table:formula="of:=[.B898]/[.C898]" office:value-type="float" office:value="0.00228402777777778" calcext:value-type="float">
            <text:p>0,00228402777777778000</text:p>
          </table:table-cell>
          <table:table-cell table:formula="of:=[.D899]-[.D898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B898]+22" office:value-type="float" office:value="19756" calcext:value-type="float">
            <text:p>19756</text:p>
          </table:table-cell>
          <table:table-cell office:value-type="float" office:value="8640000" calcext:value-type="float">
            <text:p>8640000</text:p>
          </table:table-cell>
          <table:table-cell table:formula="of:=[.B899]/[.C899]" office:value-type="float" office:value="0.00228657407407407" calcext:value-type="float">
            <text:p>0,00228657407407407000</text:p>
          </table:table-cell>
          <table:table-cell table:formula="of:=[.D900]-[.D899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B899]+22" office:value-type="float" office:value="19778" calcext:value-type="float">
            <text:p>19778</text:p>
          </table:table-cell>
          <table:table-cell office:value-type="float" office:value="8640000" calcext:value-type="float">
            <text:p>8640000</text:p>
          </table:table-cell>
          <table:table-cell table:formula="of:=[.B900]/[.C900]" office:value-type="float" office:value="0.00228912037037037" calcext:value-type="float">
            <text:p>0,00228912037037037000</text:p>
          </table:table-cell>
          <table:table-cell table:formula="of:=[.D901]-[.D900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B900]+22" office:value-type="float" office:value="19800" calcext:value-type="float">
            <text:p>19800</text:p>
          </table:table-cell>
          <table:table-cell office:value-type="float" office:value="8640000" calcext:value-type="float">
            <text:p>8640000</text:p>
          </table:table-cell>
          <table:table-cell table:formula="of:=[.B901]/[.C901]" office:value-type="float" office:value="0.00229166666666667" calcext:value-type="float">
            <text:p>0,00229166666666667000</text:p>
          </table:table-cell>
          <table:table-cell table:formula="of:=[.D902]-[.D901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B901]+22" office:value-type="float" office:value="19822" calcext:value-type="float">
            <text:p>19822</text:p>
          </table:table-cell>
          <table:table-cell office:value-type="float" office:value="8640000" calcext:value-type="float">
            <text:p>8640000</text:p>
          </table:table-cell>
          <table:table-cell table:formula="of:=[.B902]/[.C902]" office:value-type="float" office:value="0.00229421296296296" calcext:value-type="float">
            <text:p>0,00229421296296296000</text:p>
          </table:table-cell>
          <table:table-cell table:formula="of:=[.D903]-[.D902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B902]+22" office:value-type="float" office:value="19844" calcext:value-type="float">
            <text:p>19844</text:p>
          </table:table-cell>
          <table:table-cell office:value-type="float" office:value="8640000" calcext:value-type="float">
            <text:p>8640000</text:p>
          </table:table-cell>
          <table:table-cell table:formula="of:=[.B903]/[.C903]" office:value-type="float" office:value="0.00229675925925926" calcext:value-type="float">
            <text:p>0,00229675925925926000</text:p>
          </table:table-cell>
          <table:table-cell table:formula="of:=[.D904]-[.D903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B903]+22" office:value-type="float" office:value="19866" calcext:value-type="float">
            <text:p>19866</text:p>
          </table:table-cell>
          <table:table-cell office:value-type="float" office:value="8640000" calcext:value-type="float">
            <text:p>8640000</text:p>
          </table:table-cell>
          <table:table-cell table:formula="of:=[.B904]/[.C904]" office:value-type="float" office:value="0.00229930555555556" calcext:value-type="float">
            <text:p>0,00229930555555556000</text:p>
          </table:table-cell>
          <table:table-cell table:formula="of:=[.D905]-[.D904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B904]+22" office:value-type="float" office:value="19888" calcext:value-type="float">
            <text:p>19888</text:p>
          </table:table-cell>
          <table:table-cell office:value-type="float" office:value="8640000" calcext:value-type="float">
            <text:p>8640000</text:p>
          </table:table-cell>
          <table:table-cell table:formula="of:=[.B905]/[.C905]" office:value-type="float" office:value="0.00230185185185185" calcext:value-type="float">
            <text:p>0,00230185185185185000</text:p>
          </table:table-cell>
          <table:table-cell table:formula="of:=[.D906]-[.D905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B905]+22" office:value-type="float" office:value="19910" calcext:value-type="float">
            <text:p>19910</text:p>
          </table:table-cell>
          <table:table-cell office:value-type="float" office:value="8640000" calcext:value-type="float">
            <text:p>8640000</text:p>
          </table:table-cell>
          <table:table-cell table:formula="of:=[.B906]/[.C906]" office:value-type="float" office:value="0.00230439814814815" calcext:value-type="float">
            <text:p>0,00230439814814815000</text:p>
          </table:table-cell>
          <table:table-cell table:formula="of:=[.D907]-[.D906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B906]+22" office:value-type="float" office:value="19932" calcext:value-type="float">
            <text:p>19932</text:p>
          </table:table-cell>
          <table:table-cell office:value-type="float" office:value="8640000" calcext:value-type="float">
            <text:p>8640000</text:p>
          </table:table-cell>
          <table:table-cell table:formula="of:=[.B907]/[.C907]" office:value-type="float" office:value="0.00230694444444444" calcext:value-type="float">
            <text:p>0,00230694444444444000</text:p>
          </table:table-cell>
          <table:table-cell table:formula="of:=[.D908]-[.D907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B907]+22" office:value-type="float" office:value="19954" calcext:value-type="float">
            <text:p>19954</text:p>
          </table:table-cell>
          <table:table-cell office:value-type="float" office:value="8640000" calcext:value-type="float">
            <text:p>8640000</text:p>
          </table:table-cell>
          <table:table-cell table:formula="of:=[.B908]/[.C908]" office:value-type="float" office:value="0.00230949074074074" calcext:value-type="float">
            <text:p>0,00230949074074074000</text:p>
          </table:table-cell>
          <table:table-cell table:formula="of:=[.D909]-[.D908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B908]+22" office:value-type="float" office:value="19976" calcext:value-type="float">
            <text:p>19976</text:p>
          </table:table-cell>
          <table:table-cell office:value-type="float" office:value="8640000" calcext:value-type="float">
            <text:p>8640000</text:p>
          </table:table-cell>
          <table:table-cell table:formula="of:=[.B909]/[.C909]" office:value-type="float" office:value="0.00231203703703704" calcext:value-type="float">
            <text:p>0,00231203703703704000</text:p>
          </table:table-cell>
          <table:table-cell table:formula="of:=[.D910]-[.D909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B909]+22" office:value-type="float" office:value="19998" calcext:value-type="float">
            <text:p>19998</text:p>
          </table:table-cell>
          <table:table-cell office:value-type="float" office:value="8640000" calcext:value-type="float">
            <text:p>8640000</text:p>
          </table:table-cell>
          <table:table-cell table:formula="of:=[.B910]/[.C910]" office:value-type="float" office:value="0.00231458333333333" calcext:value-type="float">
            <text:p>0,00231458333333333000</text:p>
          </table:table-cell>
          <table:table-cell table:formula="of:=[.D911]-[.D910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B910]+22" office:value-type="float" office:value="20020" calcext:value-type="float">
            <text:p>20020</text:p>
          </table:table-cell>
          <table:table-cell office:value-type="float" office:value="8640000" calcext:value-type="float">
            <text:p>8640000</text:p>
          </table:table-cell>
          <table:table-cell table:formula="of:=[.B911]/[.C911]" office:value-type="float" office:value="0.00231712962962963" calcext:value-type="float">
            <text:p>0,00231712962962963000</text:p>
          </table:table-cell>
          <table:table-cell table:formula="of:=[.D912]-[.D911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B911]+22" office:value-type="float" office:value="20042" calcext:value-type="float">
            <text:p>20042</text:p>
          </table:table-cell>
          <table:table-cell office:value-type="float" office:value="8640000" calcext:value-type="float">
            <text:p>8640000</text:p>
          </table:table-cell>
          <table:table-cell table:formula="of:=[.B912]/[.C912]" office:value-type="float" office:value="0.00231967592592593" calcext:value-type="float">
            <text:p>0,00231967592592593000</text:p>
          </table:table-cell>
          <table:table-cell table:formula="of:=[.D913]-[.D912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B912]+22" office:value-type="float" office:value="20064" calcext:value-type="float">
            <text:p>20064</text:p>
          </table:table-cell>
          <table:table-cell office:value-type="float" office:value="8640000" calcext:value-type="float">
            <text:p>8640000</text:p>
          </table:table-cell>
          <table:table-cell table:formula="of:=[.B913]/[.C913]" office:value-type="float" office:value="0.00232222222222222" calcext:value-type="float">
            <text:p>0,00232222222222222000</text:p>
          </table:table-cell>
          <table:table-cell table:formula="of:=[.D914]-[.D913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B913]+22" office:value-type="float" office:value="20086" calcext:value-type="float">
            <text:p>20086</text:p>
          </table:table-cell>
          <table:table-cell office:value-type="float" office:value="8640000" calcext:value-type="float">
            <text:p>8640000</text:p>
          </table:table-cell>
          <table:table-cell table:formula="of:=[.B914]/[.C914]" office:value-type="float" office:value="0.00232476851851852" calcext:value-type="float">
            <text:p>0,00232476851851852000</text:p>
          </table:table-cell>
          <table:table-cell table:formula="of:=[.D915]-[.D914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B914]+22" office:value-type="float" office:value="20108" calcext:value-type="float">
            <text:p>20108</text:p>
          </table:table-cell>
          <table:table-cell office:value-type="float" office:value="8640000" calcext:value-type="float">
            <text:p>8640000</text:p>
          </table:table-cell>
          <table:table-cell table:formula="of:=[.B915]/[.C915]" office:value-type="float" office:value="0.00232731481481481" calcext:value-type="float">
            <text:p>0,00232731481481481000</text:p>
          </table:table-cell>
          <table:table-cell table:formula="of:=[.D916]-[.D915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B915]+22" office:value-type="float" office:value="20130" calcext:value-type="float">
            <text:p>20130</text:p>
          </table:table-cell>
          <table:table-cell office:value-type="float" office:value="8640000" calcext:value-type="float">
            <text:p>8640000</text:p>
          </table:table-cell>
          <table:table-cell table:formula="of:=[.B916]/[.C916]" office:value-type="float" office:value="0.00232986111111111" calcext:value-type="float">
            <text:p>0,00232986111111111000</text:p>
          </table:table-cell>
          <table:table-cell table:formula="of:=[.D917]-[.D916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B916]+22" office:value-type="float" office:value="20152" calcext:value-type="float">
            <text:p>20152</text:p>
          </table:table-cell>
          <table:table-cell office:value-type="float" office:value="8640000" calcext:value-type="float">
            <text:p>8640000</text:p>
          </table:table-cell>
          <table:table-cell table:formula="of:=[.B917]/[.C917]" office:value-type="float" office:value="0.00233240740740741" calcext:value-type="float">
            <text:p>0,00233240740740741000</text:p>
          </table:table-cell>
          <table:table-cell table:formula="of:=[.D918]-[.D917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B917]+22" office:value-type="float" office:value="20174" calcext:value-type="float">
            <text:p>20174</text:p>
          </table:table-cell>
          <table:table-cell office:value-type="float" office:value="8640000" calcext:value-type="float">
            <text:p>8640000</text:p>
          </table:table-cell>
          <table:table-cell table:formula="of:=[.B918]/[.C918]" office:value-type="float" office:value="0.0023349537037037" calcext:value-type="float">
            <text:p>0,00233495370370370000</text:p>
          </table:table-cell>
          <table:table-cell table:formula="of:=[.D919]-[.D918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B918]+22" office:value-type="float" office:value="20196" calcext:value-type="float">
            <text:p>20196</text:p>
          </table:table-cell>
          <table:table-cell office:value-type="float" office:value="8640000" calcext:value-type="float">
            <text:p>8640000</text:p>
          </table:table-cell>
          <table:table-cell table:formula="of:=[.B919]/[.C919]" office:value-type="float" office:value="0.0023375" calcext:value-type="float">
            <text:p>0,00233750000000000000</text:p>
          </table:table-cell>
          <table:table-cell table:formula="of:=[.D920]-[.D919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B919]+22" office:value-type="float" office:value="20218" calcext:value-type="float">
            <text:p>20218</text:p>
          </table:table-cell>
          <table:table-cell office:value-type="float" office:value="8640000" calcext:value-type="float">
            <text:p>8640000</text:p>
          </table:table-cell>
          <table:table-cell table:formula="of:=[.B920]/[.C920]" office:value-type="float" office:value="0.0023400462962963" calcext:value-type="float">
            <text:p>0,00234004629629630000</text:p>
          </table:table-cell>
          <table:table-cell table:formula="of:=[.D921]-[.D920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B920]+22" office:value-type="float" office:value="20240" calcext:value-type="float">
            <text:p>20240</text:p>
          </table:table-cell>
          <table:table-cell office:value-type="float" office:value="8640000" calcext:value-type="float">
            <text:p>8640000</text:p>
          </table:table-cell>
          <table:table-cell table:formula="of:=[.B921]/[.C921]" office:value-type="float" office:value="0.00234259259259259" calcext:value-type="float">
            <text:p>0,00234259259259259000</text:p>
          </table:table-cell>
          <table:table-cell table:formula="of:=[.D922]-[.D921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B921]+22" office:value-type="float" office:value="20262" calcext:value-type="float">
            <text:p>20262</text:p>
          </table:table-cell>
          <table:table-cell office:value-type="float" office:value="8640000" calcext:value-type="float">
            <text:p>8640000</text:p>
          </table:table-cell>
          <table:table-cell table:formula="of:=[.B922]/[.C922]" office:value-type="float" office:value="0.00234513888888889" calcext:value-type="float">
            <text:p>0,00234513888888889000</text:p>
          </table:table-cell>
          <table:table-cell table:formula="of:=[.D923]-[.D922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B922]+22" office:value-type="float" office:value="20284" calcext:value-type="float">
            <text:p>20284</text:p>
          </table:table-cell>
          <table:table-cell office:value-type="float" office:value="8640000" calcext:value-type="float">
            <text:p>8640000</text:p>
          </table:table-cell>
          <table:table-cell table:formula="of:=[.B923]/[.C923]" office:value-type="float" office:value="0.00234768518518519" calcext:value-type="float">
            <text:p>0,00234768518518519000</text:p>
          </table:table-cell>
          <table:table-cell table:formula="of:=[.D924]-[.D923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B923]+22" office:value-type="float" office:value="20306" calcext:value-type="float">
            <text:p>20306</text:p>
          </table:table-cell>
          <table:table-cell office:value-type="float" office:value="8640000" calcext:value-type="float">
            <text:p>8640000</text:p>
          </table:table-cell>
          <table:table-cell table:formula="of:=[.B924]/[.C924]" office:value-type="float" office:value="0.00235023148148148" calcext:value-type="float">
            <text:p>0,00235023148148148000</text:p>
          </table:table-cell>
          <table:table-cell table:formula="of:=[.D925]-[.D924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B924]+22" office:value-type="float" office:value="20328" calcext:value-type="float">
            <text:p>20328</text:p>
          </table:table-cell>
          <table:table-cell office:value-type="float" office:value="8640000" calcext:value-type="float">
            <text:p>8640000</text:p>
          </table:table-cell>
          <table:table-cell table:formula="of:=[.B925]/[.C925]" office:value-type="float" office:value="0.00235277777777778" calcext:value-type="float">
            <text:p>0,00235277777777778000</text:p>
          </table:table-cell>
          <table:table-cell table:formula="of:=[.D926]-[.D925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B925]+22" office:value-type="float" office:value="20350" calcext:value-type="float">
            <text:p>20350</text:p>
          </table:table-cell>
          <table:table-cell office:value-type="float" office:value="8640000" calcext:value-type="float">
            <text:p>8640000</text:p>
          </table:table-cell>
          <table:table-cell table:formula="of:=[.B926]/[.C926]" office:value-type="float" office:value="0.00235532407407407" calcext:value-type="float">
            <text:p>0,00235532407407407000</text:p>
          </table:table-cell>
          <table:table-cell table:formula="of:=[.D927]-[.D926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B926]+22" office:value-type="float" office:value="20372" calcext:value-type="float">
            <text:p>20372</text:p>
          </table:table-cell>
          <table:table-cell office:value-type="float" office:value="8640000" calcext:value-type="float">
            <text:p>8640000</text:p>
          </table:table-cell>
          <table:table-cell table:formula="of:=[.B927]/[.C927]" office:value-type="float" office:value="0.00235787037037037" calcext:value-type="float">
            <text:p>0,00235787037037037000</text:p>
          </table:table-cell>
          <table:table-cell table:formula="of:=[.D928]-[.D927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B927]+22" office:value-type="float" office:value="20394" calcext:value-type="float">
            <text:p>20394</text:p>
          </table:table-cell>
          <table:table-cell office:value-type="float" office:value="8640000" calcext:value-type="float">
            <text:p>8640000</text:p>
          </table:table-cell>
          <table:table-cell table:formula="of:=[.B928]/[.C928]" office:value-type="float" office:value="0.00236041666666667" calcext:value-type="float">
            <text:p>0,00236041666666667000</text:p>
          </table:table-cell>
          <table:table-cell table:formula="of:=[.D929]-[.D928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B928]+22" office:value-type="float" office:value="20416" calcext:value-type="float">
            <text:p>20416</text:p>
          </table:table-cell>
          <table:table-cell office:value-type="float" office:value="8640000" calcext:value-type="float">
            <text:p>8640000</text:p>
          </table:table-cell>
          <table:table-cell table:formula="of:=[.B929]/[.C929]" office:value-type="float" office:value="0.00236296296296296" calcext:value-type="float">
            <text:p>0,00236296296296296000</text:p>
          </table:table-cell>
          <table:table-cell table:formula="of:=[.D930]-[.D929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B929]+22" office:value-type="float" office:value="20438" calcext:value-type="float">
            <text:p>20438</text:p>
          </table:table-cell>
          <table:table-cell office:value-type="float" office:value="8640000" calcext:value-type="float">
            <text:p>8640000</text:p>
          </table:table-cell>
          <table:table-cell table:formula="of:=[.B930]/[.C930]" office:value-type="float" office:value="0.00236550925925926" calcext:value-type="float">
            <text:p>0,00236550925925926000</text:p>
          </table:table-cell>
          <table:table-cell table:formula="of:=[.D931]-[.D930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B930]+22" office:value-type="float" office:value="20460" calcext:value-type="float">
            <text:p>20460</text:p>
          </table:table-cell>
          <table:table-cell office:value-type="float" office:value="8640000" calcext:value-type="float">
            <text:p>8640000</text:p>
          </table:table-cell>
          <table:table-cell table:formula="of:=[.B931]/[.C931]" office:value-type="float" office:value="0.00236805555555556" calcext:value-type="float">
            <text:p>0,00236805555555556000</text:p>
          </table:table-cell>
          <table:table-cell table:formula="of:=[.D932]-[.D931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B931]+22" office:value-type="float" office:value="20482" calcext:value-type="float">
            <text:p>20482</text:p>
          </table:table-cell>
          <table:table-cell office:value-type="float" office:value="8640000" calcext:value-type="float">
            <text:p>8640000</text:p>
          </table:table-cell>
          <table:table-cell table:formula="of:=[.B932]/[.C932]" office:value-type="float" office:value="0.00237060185185185" calcext:value-type="float">
            <text:p>0,00237060185185185000</text:p>
          </table:table-cell>
          <table:table-cell table:formula="of:=[.D933]-[.D932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B932]+22" office:value-type="float" office:value="20504" calcext:value-type="float">
            <text:p>20504</text:p>
          </table:table-cell>
          <table:table-cell office:value-type="float" office:value="8640000" calcext:value-type="float">
            <text:p>8640000</text:p>
          </table:table-cell>
          <table:table-cell table:formula="of:=[.B933]/[.C933]" office:value-type="float" office:value="0.00237314814814815" calcext:value-type="float">
            <text:p>0,00237314814814815000</text:p>
          </table:table-cell>
          <table:table-cell table:formula="of:=[.D934]-[.D933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B933]+22" office:value-type="float" office:value="20526" calcext:value-type="float">
            <text:p>20526</text:p>
          </table:table-cell>
          <table:table-cell office:value-type="float" office:value="8640000" calcext:value-type="float">
            <text:p>8640000</text:p>
          </table:table-cell>
          <table:table-cell table:formula="of:=[.B934]/[.C934]" office:value-type="float" office:value="0.00237569444444444" calcext:value-type="float">
            <text:p>0,00237569444444444000</text:p>
          </table:table-cell>
          <table:table-cell table:formula="of:=[.D935]-[.D934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B934]+22" office:value-type="float" office:value="20548" calcext:value-type="float">
            <text:p>20548</text:p>
          </table:table-cell>
          <table:table-cell office:value-type="float" office:value="8640000" calcext:value-type="float">
            <text:p>8640000</text:p>
          </table:table-cell>
          <table:table-cell table:formula="of:=[.B935]/[.C935]" office:value-type="float" office:value="0.00237824074074074" calcext:value-type="float">
            <text:p>0,00237824074074074000</text:p>
          </table:table-cell>
          <table:table-cell table:formula="of:=[.D936]-[.D935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B935]+22" office:value-type="float" office:value="20570" calcext:value-type="float">
            <text:p>20570</text:p>
          </table:table-cell>
          <table:table-cell office:value-type="float" office:value="8640000" calcext:value-type="float">
            <text:p>8640000</text:p>
          </table:table-cell>
          <table:table-cell table:formula="of:=[.B936]/[.C936]" office:value-type="float" office:value="0.00238078703703704" calcext:value-type="float">
            <text:p>0,00238078703703704000</text:p>
          </table:table-cell>
          <table:table-cell table:formula="of:=[.D937]-[.D936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B936]+22" office:value-type="float" office:value="20592" calcext:value-type="float">
            <text:p>20592</text:p>
          </table:table-cell>
          <table:table-cell office:value-type="float" office:value="8640000" calcext:value-type="float">
            <text:p>8640000</text:p>
          </table:table-cell>
          <table:table-cell table:formula="of:=[.B937]/[.C937]" office:value-type="float" office:value="0.00238333333333333" calcext:value-type="float">
            <text:p>0,00238333333333333000</text:p>
          </table:table-cell>
          <table:table-cell table:formula="of:=[.D938]-[.D937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B937]+22" office:value-type="float" office:value="20614" calcext:value-type="float">
            <text:p>20614</text:p>
          </table:table-cell>
          <table:table-cell office:value-type="float" office:value="8640000" calcext:value-type="float">
            <text:p>8640000</text:p>
          </table:table-cell>
          <table:table-cell table:formula="of:=[.B938]/[.C938]" office:value-type="float" office:value="0.00238587962962963" calcext:value-type="float">
            <text:p>0,00238587962962963000</text:p>
          </table:table-cell>
          <table:table-cell table:formula="of:=[.D939]-[.D938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B938]+22" office:value-type="float" office:value="20636" calcext:value-type="float">
            <text:p>20636</text:p>
          </table:table-cell>
          <table:table-cell office:value-type="float" office:value="8640000" calcext:value-type="float">
            <text:p>8640000</text:p>
          </table:table-cell>
          <table:table-cell table:formula="of:=[.B939]/[.C939]" office:value-type="float" office:value="0.00238842592592593" calcext:value-type="float">
            <text:p>0,00238842592592593000</text:p>
          </table:table-cell>
          <table:table-cell table:formula="of:=[.D940]-[.D939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B939]+22" office:value-type="float" office:value="20658" calcext:value-type="float">
            <text:p>20658</text:p>
          </table:table-cell>
          <table:table-cell office:value-type="float" office:value="8640000" calcext:value-type="float">
            <text:p>8640000</text:p>
          </table:table-cell>
          <table:table-cell table:formula="of:=[.B940]/[.C940]" office:value-type="float" office:value="0.00239097222222222" calcext:value-type="float">
            <text:p>0,00239097222222222000</text:p>
          </table:table-cell>
          <table:table-cell table:formula="of:=[.D941]-[.D940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B940]+22" office:value-type="float" office:value="20680" calcext:value-type="float">
            <text:p>20680</text:p>
          </table:table-cell>
          <table:table-cell office:value-type="float" office:value="8640000" calcext:value-type="float">
            <text:p>8640000</text:p>
          </table:table-cell>
          <table:table-cell table:formula="of:=[.B941]/[.C941]" office:value-type="float" office:value="0.00239351851851852" calcext:value-type="float">
            <text:p>0,00239351851851852000</text:p>
          </table:table-cell>
          <table:table-cell table:formula="of:=[.D942]-[.D941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B941]+22" office:value-type="float" office:value="20702" calcext:value-type="float">
            <text:p>20702</text:p>
          </table:table-cell>
          <table:table-cell office:value-type="float" office:value="8640000" calcext:value-type="float">
            <text:p>8640000</text:p>
          </table:table-cell>
          <table:table-cell table:formula="of:=[.B942]/[.C942]" office:value-type="float" office:value="0.00239606481481482" calcext:value-type="float">
            <text:p>0,00239606481481482000</text:p>
          </table:table-cell>
          <table:table-cell table:formula="of:=[.D943]-[.D942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B942]+22" office:value-type="float" office:value="20724" calcext:value-type="float">
            <text:p>20724</text:p>
          </table:table-cell>
          <table:table-cell office:value-type="float" office:value="8640000" calcext:value-type="float">
            <text:p>8640000</text:p>
          </table:table-cell>
          <table:table-cell table:formula="of:=[.B943]/[.C943]" office:value-type="float" office:value="0.00239861111111111" calcext:value-type="float">
            <text:p>0,00239861111111111000</text:p>
          </table:table-cell>
          <table:table-cell table:formula="of:=[.D944]-[.D943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B943]+22" office:value-type="float" office:value="20746" calcext:value-type="float">
            <text:p>20746</text:p>
          </table:table-cell>
          <table:table-cell office:value-type="float" office:value="8640000" calcext:value-type="float">
            <text:p>8640000</text:p>
          </table:table-cell>
          <table:table-cell table:formula="of:=[.B944]/[.C944]" office:value-type="float" office:value="0.00240115740740741" calcext:value-type="float">
            <text:p>0,00240115740740741000</text:p>
          </table:table-cell>
          <table:table-cell table:formula="of:=[.D945]-[.D944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B944]+22" office:value-type="float" office:value="20768" calcext:value-type="float">
            <text:p>20768</text:p>
          </table:table-cell>
          <table:table-cell office:value-type="float" office:value="8640000" calcext:value-type="float">
            <text:p>8640000</text:p>
          </table:table-cell>
          <table:table-cell table:formula="of:=[.B945]/[.C945]" office:value-type="float" office:value="0.0024037037037037" calcext:value-type="float">
            <text:p>0,00240370370370370000</text:p>
          </table:table-cell>
          <table:table-cell table:formula="of:=[.D946]-[.D945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B945]+22" office:value-type="float" office:value="20790" calcext:value-type="float">
            <text:p>20790</text:p>
          </table:table-cell>
          <table:table-cell office:value-type="float" office:value="8640000" calcext:value-type="float">
            <text:p>8640000</text:p>
          </table:table-cell>
          <table:table-cell table:formula="of:=[.B946]/[.C946]" office:value-type="float" office:value="0.00240625" calcext:value-type="float">
            <text:p>0,00240625000000000000</text:p>
          </table:table-cell>
          <table:table-cell table:formula="of:=[.D947]-[.D946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B946]+22" office:value-type="float" office:value="20812" calcext:value-type="float">
            <text:p>20812</text:p>
          </table:table-cell>
          <table:table-cell office:value-type="float" office:value="8640000" calcext:value-type="float">
            <text:p>8640000</text:p>
          </table:table-cell>
          <table:table-cell table:formula="of:=[.B947]/[.C947]" office:value-type="float" office:value="0.0024087962962963" calcext:value-type="float">
            <text:p>0,00240879629629630000</text:p>
          </table:table-cell>
          <table:table-cell table:formula="of:=[.D948]-[.D947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B947]+22" office:value-type="float" office:value="20834" calcext:value-type="float">
            <text:p>20834</text:p>
          </table:table-cell>
          <table:table-cell office:value-type="float" office:value="8640000" calcext:value-type="float">
            <text:p>8640000</text:p>
          </table:table-cell>
          <table:table-cell table:formula="of:=[.B948]/[.C948]" office:value-type="float" office:value="0.00241134259259259" calcext:value-type="float">
            <text:p>0,00241134259259259000</text:p>
          </table:table-cell>
          <table:table-cell table:formula="of:=[.D949]-[.D948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B948]+22" office:value-type="float" office:value="20856" calcext:value-type="float">
            <text:p>20856</text:p>
          </table:table-cell>
          <table:table-cell office:value-type="float" office:value="8640000" calcext:value-type="float">
            <text:p>8640000</text:p>
          </table:table-cell>
          <table:table-cell table:formula="of:=[.B949]/[.C949]" office:value-type="float" office:value="0.00241388888888889" calcext:value-type="float">
            <text:p>0,00241388888888889000</text:p>
          </table:table-cell>
          <table:table-cell table:formula="of:=[.D950]-[.D949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B949]+22" office:value-type="float" office:value="20878" calcext:value-type="float">
            <text:p>20878</text:p>
          </table:table-cell>
          <table:table-cell office:value-type="float" office:value="8640000" calcext:value-type="float">
            <text:p>8640000</text:p>
          </table:table-cell>
          <table:table-cell table:formula="of:=[.B950]/[.C950]" office:value-type="float" office:value="0.00241643518518519" calcext:value-type="float">
            <text:p>0,00241643518518519000</text:p>
          </table:table-cell>
          <table:table-cell table:formula="of:=[.D951]-[.D950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B950]+22" office:value-type="float" office:value="20900" calcext:value-type="float">
            <text:p>20900</text:p>
          </table:table-cell>
          <table:table-cell office:value-type="float" office:value="8640000" calcext:value-type="float">
            <text:p>8640000</text:p>
          </table:table-cell>
          <table:table-cell table:formula="of:=[.B951]/[.C951]" office:value-type="float" office:value="0.00241898148148148" calcext:value-type="float">
            <text:p>0,00241898148148148000</text:p>
          </table:table-cell>
          <table:table-cell table:formula="of:=[.D952]-[.D951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B951]+22" office:value-type="float" office:value="20922" calcext:value-type="float">
            <text:p>20922</text:p>
          </table:table-cell>
          <table:table-cell office:value-type="float" office:value="8640000" calcext:value-type="float">
            <text:p>8640000</text:p>
          </table:table-cell>
          <table:table-cell table:formula="of:=[.B952]/[.C952]" office:value-type="float" office:value="0.00242152777777778" calcext:value-type="float">
            <text:p>0,00242152777777778000</text:p>
          </table:table-cell>
          <table:table-cell table:formula="of:=[.D953]-[.D952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B952]+22" office:value-type="float" office:value="20944" calcext:value-type="float">
            <text:p>20944</text:p>
          </table:table-cell>
          <table:table-cell office:value-type="float" office:value="8640000" calcext:value-type="float">
            <text:p>8640000</text:p>
          </table:table-cell>
          <table:table-cell table:formula="of:=[.B953]/[.C953]" office:value-type="float" office:value="0.00242407407407407" calcext:value-type="float">
            <text:p>0,00242407407407407000</text:p>
          </table:table-cell>
          <table:table-cell table:formula="of:=[.D954]-[.D953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B953]+22" office:value-type="float" office:value="20966" calcext:value-type="float">
            <text:p>20966</text:p>
          </table:table-cell>
          <table:table-cell office:value-type="float" office:value="8640000" calcext:value-type="float">
            <text:p>8640000</text:p>
          </table:table-cell>
          <table:table-cell table:formula="of:=[.B954]/[.C954]" office:value-type="float" office:value="0.00242662037037037" calcext:value-type="float">
            <text:p>0,00242662037037037000</text:p>
          </table:table-cell>
          <table:table-cell table:formula="of:=[.D955]-[.D954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B954]+22" office:value-type="float" office:value="20988" calcext:value-type="float">
            <text:p>20988</text:p>
          </table:table-cell>
          <table:table-cell office:value-type="float" office:value="8640000" calcext:value-type="float">
            <text:p>8640000</text:p>
          </table:table-cell>
          <table:table-cell table:formula="of:=[.B955]/[.C955]" office:value-type="float" office:value="0.00242916666666667" calcext:value-type="float">
            <text:p>0,00242916666666667000</text:p>
          </table:table-cell>
          <table:table-cell table:formula="of:=[.D956]-[.D955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B955]+22" office:value-type="float" office:value="21010" calcext:value-type="float">
            <text:p>21010</text:p>
          </table:table-cell>
          <table:table-cell office:value-type="float" office:value="8640000" calcext:value-type="float">
            <text:p>8640000</text:p>
          </table:table-cell>
          <table:table-cell table:formula="of:=[.B956]/[.C956]" office:value-type="float" office:value="0.00243171296296296" calcext:value-type="float">
            <text:p>0,00243171296296296000</text:p>
          </table:table-cell>
          <table:table-cell table:formula="of:=[.D957]-[.D956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B956]+22" office:value-type="float" office:value="21032" calcext:value-type="float">
            <text:p>21032</text:p>
          </table:table-cell>
          <table:table-cell office:value-type="float" office:value="8640000" calcext:value-type="float">
            <text:p>8640000</text:p>
          </table:table-cell>
          <table:table-cell table:formula="of:=[.B957]/[.C957]" office:value-type="float" office:value="0.00243425925925926" calcext:value-type="float">
            <text:p>0,00243425925925926000</text:p>
          </table:table-cell>
          <table:table-cell table:formula="of:=[.D958]-[.D957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B957]+22" office:value-type="float" office:value="21054" calcext:value-type="float">
            <text:p>21054</text:p>
          </table:table-cell>
          <table:table-cell office:value-type="float" office:value="8640000" calcext:value-type="float">
            <text:p>8640000</text:p>
          </table:table-cell>
          <table:table-cell table:formula="of:=[.B958]/[.C958]" office:value-type="float" office:value="0.00243680555555556" calcext:value-type="float">
            <text:p>0,00243680555555556000</text:p>
          </table:table-cell>
          <table:table-cell table:formula="of:=[.D959]-[.D958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B958]+22" office:value-type="float" office:value="21076" calcext:value-type="float">
            <text:p>21076</text:p>
          </table:table-cell>
          <table:table-cell office:value-type="float" office:value="8640000" calcext:value-type="float">
            <text:p>8640000</text:p>
          </table:table-cell>
          <table:table-cell table:formula="of:=[.B959]/[.C959]" office:value-type="float" office:value="0.00243935185185185" calcext:value-type="float">
            <text:p>0,00243935185185185000</text:p>
          </table:table-cell>
          <table:table-cell table:formula="of:=[.D960]-[.D959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B959]+22" office:value-type="float" office:value="21098" calcext:value-type="float">
            <text:p>21098</text:p>
          </table:table-cell>
          <table:table-cell office:value-type="float" office:value="8640000" calcext:value-type="float">
            <text:p>8640000</text:p>
          </table:table-cell>
          <table:table-cell table:formula="of:=[.B960]/[.C960]" office:value-type="float" office:value="0.00244189814814815" calcext:value-type="float">
            <text:p>0,00244189814814815000</text:p>
          </table:table-cell>
          <table:table-cell table:formula="of:=[.D961]-[.D960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B960]+22" office:value-type="float" office:value="21120" calcext:value-type="float">
            <text:p>21120</text:p>
          </table:table-cell>
          <table:table-cell office:value-type="float" office:value="8640000" calcext:value-type="float">
            <text:p>8640000</text:p>
          </table:table-cell>
          <table:table-cell table:formula="of:=[.B961]/[.C961]" office:value-type="float" office:value="0.00244444444444444" calcext:value-type="float">
            <text:p>0,00244444444444444000</text:p>
          </table:table-cell>
          <table:table-cell table:formula="of:=[.D962]-[.D961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B961]+22" office:value-type="float" office:value="21142" calcext:value-type="float">
            <text:p>21142</text:p>
          </table:table-cell>
          <table:table-cell office:value-type="float" office:value="8640000" calcext:value-type="float">
            <text:p>8640000</text:p>
          </table:table-cell>
          <table:table-cell table:formula="of:=[.B962]/[.C962]" office:value-type="float" office:value="0.00244699074074074" calcext:value-type="float">
            <text:p>0,00244699074074074000</text:p>
          </table:table-cell>
          <table:table-cell table:formula="of:=[.D963]-[.D962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B962]+22" office:value-type="float" office:value="21164" calcext:value-type="float">
            <text:p>21164</text:p>
          </table:table-cell>
          <table:table-cell office:value-type="float" office:value="8640000" calcext:value-type="float">
            <text:p>8640000</text:p>
          </table:table-cell>
          <table:table-cell table:formula="of:=[.B963]/[.C963]" office:value-type="float" office:value="0.00244953703703704" calcext:value-type="float">
            <text:p>0,00244953703703704000</text:p>
          </table:table-cell>
          <table:table-cell table:formula="of:=[.D964]-[.D963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B963]+22" office:value-type="float" office:value="21186" calcext:value-type="float">
            <text:p>21186</text:p>
          </table:table-cell>
          <table:table-cell office:value-type="float" office:value="8640000" calcext:value-type="float">
            <text:p>8640000</text:p>
          </table:table-cell>
          <table:table-cell table:formula="of:=[.B964]/[.C964]" office:value-type="float" office:value="0.00245208333333333" calcext:value-type="float">
            <text:p>0,00245208333333333000</text:p>
          </table:table-cell>
          <table:table-cell table:formula="of:=[.D965]-[.D964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B964]+22" office:value-type="float" office:value="21208" calcext:value-type="float">
            <text:p>21208</text:p>
          </table:table-cell>
          <table:table-cell office:value-type="float" office:value="8640000" calcext:value-type="float">
            <text:p>8640000</text:p>
          </table:table-cell>
          <table:table-cell table:formula="of:=[.B965]/[.C965]" office:value-type="float" office:value="0.00245462962962963" calcext:value-type="float">
            <text:p>0,00245462962962963000</text:p>
          </table:table-cell>
          <table:table-cell table:formula="of:=[.D966]-[.D965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B965]+22" office:value-type="float" office:value="21230" calcext:value-type="float">
            <text:p>21230</text:p>
          </table:table-cell>
          <table:table-cell office:value-type="float" office:value="8640000" calcext:value-type="float">
            <text:p>8640000</text:p>
          </table:table-cell>
          <table:table-cell table:formula="of:=[.B966]/[.C966]" office:value-type="float" office:value="0.00245717592592593" calcext:value-type="float">
            <text:p>0,00245717592592593000</text:p>
          </table:table-cell>
          <table:table-cell table:formula="of:=[.D967]-[.D966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B966]+22" office:value-type="float" office:value="21252" calcext:value-type="float">
            <text:p>21252</text:p>
          </table:table-cell>
          <table:table-cell office:value-type="float" office:value="8640000" calcext:value-type="float">
            <text:p>8640000</text:p>
          </table:table-cell>
          <table:table-cell table:formula="of:=[.B967]/[.C967]" office:value-type="float" office:value="0.00245972222222222" calcext:value-type="float">
            <text:p>0,00245972222222222000</text:p>
          </table:table-cell>
          <table:table-cell table:formula="of:=[.D968]-[.D967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B967]+22" office:value-type="float" office:value="21274" calcext:value-type="float">
            <text:p>21274</text:p>
          </table:table-cell>
          <table:table-cell office:value-type="float" office:value="8640000" calcext:value-type="float">
            <text:p>8640000</text:p>
          </table:table-cell>
          <table:table-cell table:formula="of:=[.B968]/[.C968]" office:value-type="float" office:value="0.00246226851851852" calcext:value-type="float">
            <text:p>0,00246226851851852000</text:p>
          </table:table-cell>
          <table:table-cell table:formula="of:=[.D969]-[.D968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B968]+22" office:value-type="float" office:value="21296" calcext:value-type="float">
            <text:p>21296</text:p>
          </table:table-cell>
          <table:table-cell office:value-type="float" office:value="8640000" calcext:value-type="float">
            <text:p>8640000</text:p>
          </table:table-cell>
          <table:table-cell table:formula="of:=[.B969]/[.C969]" office:value-type="float" office:value="0.00246481481481481" calcext:value-type="float">
            <text:p>0,00246481481481481000</text:p>
          </table:table-cell>
          <table:table-cell table:formula="of:=[.D970]-[.D969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B969]+22" office:value-type="float" office:value="21318" calcext:value-type="float">
            <text:p>21318</text:p>
          </table:table-cell>
          <table:table-cell office:value-type="float" office:value="8640000" calcext:value-type="float">
            <text:p>8640000</text:p>
          </table:table-cell>
          <table:table-cell table:formula="of:=[.B970]/[.C970]" office:value-type="float" office:value="0.00246736111111111" calcext:value-type="float">
            <text:p>0,00246736111111111000</text:p>
          </table:table-cell>
          <table:table-cell table:formula="of:=[.D971]-[.D970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B970]+22" office:value-type="float" office:value="21340" calcext:value-type="float">
            <text:p>21340</text:p>
          </table:table-cell>
          <table:table-cell office:value-type="float" office:value="8640000" calcext:value-type="float">
            <text:p>8640000</text:p>
          </table:table-cell>
          <table:table-cell table:formula="of:=[.B971]/[.C971]" office:value-type="float" office:value="0.00246990740740741" calcext:value-type="float">
            <text:p>0,00246990740740741000</text:p>
          </table:table-cell>
          <table:table-cell table:formula="of:=[.D972]-[.D971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B971]+22" office:value-type="float" office:value="21362" calcext:value-type="float">
            <text:p>21362</text:p>
          </table:table-cell>
          <table:table-cell office:value-type="float" office:value="8640000" calcext:value-type="float">
            <text:p>8640000</text:p>
          </table:table-cell>
          <table:table-cell table:formula="of:=[.B972]/[.C972]" office:value-type="float" office:value="0.0024724537037037" calcext:value-type="float">
            <text:p>0,00247245370370370000</text:p>
          </table:table-cell>
          <table:table-cell table:formula="of:=[.D973]-[.D972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B972]+22" office:value-type="float" office:value="21384" calcext:value-type="float">
            <text:p>21384</text:p>
          </table:table-cell>
          <table:table-cell office:value-type="float" office:value="8640000" calcext:value-type="float">
            <text:p>8640000</text:p>
          </table:table-cell>
          <table:table-cell table:formula="of:=[.B973]/[.C973]" office:value-type="float" office:value="0.002475" calcext:value-type="float">
            <text:p>0,00247500000000000000</text:p>
          </table:table-cell>
          <table:table-cell table:formula="of:=[.D974]-[.D973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B973]+22" office:value-type="float" office:value="21406" calcext:value-type="float">
            <text:p>21406</text:p>
          </table:table-cell>
          <table:table-cell office:value-type="float" office:value="8640000" calcext:value-type="float">
            <text:p>8640000</text:p>
          </table:table-cell>
          <table:table-cell table:formula="of:=[.B974]/[.C974]" office:value-type="float" office:value="0.0024775462962963" calcext:value-type="float">
            <text:p>0,00247754629629630000</text:p>
          </table:table-cell>
          <table:table-cell table:formula="of:=[.D975]-[.D974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B974]+22" office:value-type="float" office:value="21428" calcext:value-type="float">
            <text:p>21428</text:p>
          </table:table-cell>
          <table:table-cell office:value-type="float" office:value="8640000" calcext:value-type="float">
            <text:p>8640000</text:p>
          </table:table-cell>
          <table:table-cell table:formula="of:=[.B975]/[.C975]" office:value-type="float" office:value="0.00248009259259259" calcext:value-type="float">
            <text:p>0,00248009259259259000</text:p>
          </table:table-cell>
          <table:table-cell table:formula="of:=[.D976]-[.D975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B975]+22" office:value-type="float" office:value="21450" calcext:value-type="float">
            <text:p>21450</text:p>
          </table:table-cell>
          <table:table-cell office:value-type="float" office:value="8640000" calcext:value-type="float">
            <text:p>8640000</text:p>
          </table:table-cell>
          <table:table-cell table:formula="of:=[.B976]/[.C976]" office:value-type="float" office:value="0.00248263888888889" calcext:value-type="float">
            <text:p>0,00248263888888889000</text:p>
          </table:table-cell>
          <table:table-cell table:formula="of:=[.D977]-[.D976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B976]+22" office:value-type="float" office:value="21472" calcext:value-type="float">
            <text:p>21472</text:p>
          </table:table-cell>
          <table:table-cell office:value-type="float" office:value="8640000" calcext:value-type="float">
            <text:p>8640000</text:p>
          </table:table-cell>
          <table:table-cell table:formula="of:=[.B977]/[.C977]" office:value-type="float" office:value="0.00248518518518519" calcext:value-type="float">
            <text:p>0,00248518518518519000</text:p>
          </table:table-cell>
          <table:table-cell table:formula="of:=[.D978]-[.D977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B977]+22" office:value-type="float" office:value="21494" calcext:value-type="float">
            <text:p>21494</text:p>
          </table:table-cell>
          <table:table-cell office:value-type="float" office:value="8640000" calcext:value-type="float">
            <text:p>8640000</text:p>
          </table:table-cell>
          <table:table-cell table:formula="of:=[.B978]/[.C978]" office:value-type="float" office:value="0.00248773148148148" calcext:value-type="float">
            <text:p>0,00248773148148148000</text:p>
          </table:table-cell>
          <table:table-cell table:formula="of:=[.D979]-[.D978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B978]+22" office:value-type="float" office:value="21516" calcext:value-type="float">
            <text:p>21516</text:p>
          </table:table-cell>
          <table:table-cell office:value-type="float" office:value="8640000" calcext:value-type="float">
            <text:p>8640000</text:p>
          </table:table-cell>
          <table:table-cell table:formula="of:=[.B979]/[.C979]" office:value-type="float" office:value="0.00249027777777778" calcext:value-type="float">
            <text:p>0,00249027777777778000</text:p>
          </table:table-cell>
          <table:table-cell table:formula="of:=[.D980]-[.D979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B979]+22" office:value-type="float" office:value="21538" calcext:value-type="float">
            <text:p>21538</text:p>
          </table:table-cell>
          <table:table-cell office:value-type="float" office:value="8640000" calcext:value-type="float">
            <text:p>8640000</text:p>
          </table:table-cell>
          <table:table-cell table:formula="of:=[.B980]/[.C980]" office:value-type="float" office:value="0.00249282407407407" calcext:value-type="float">
            <text:p>0,00249282407407407000</text:p>
          </table:table-cell>
          <table:table-cell table:formula="of:=[.D981]-[.D980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B980]+22" office:value-type="float" office:value="21560" calcext:value-type="float">
            <text:p>21560</text:p>
          </table:table-cell>
          <table:table-cell office:value-type="float" office:value="8640000" calcext:value-type="float">
            <text:p>8640000</text:p>
          </table:table-cell>
          <table:table-cell table:formula="of:=[.B981]/[.C981]" office:value-type="float" office:value="0.00249537037037037" calcext:value-type="float">
            <text:p>0,00249537037037037000</text:p>
          </table:table-cell>
          <table:table-cell table:formula="of:=[.D982]-[.D981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B981]+22" office:value-type="float" office:value="21582" calcext:value-type="float">
            <text:p>21582</text:p>
          </table:table-cell>
          <table:table-cell office:value-type="float" office:value="8640000" calcext:value-type="float">
            <text:p>8640000</text:p>
          </table:table-cell>
          <table:table-cell table:formula="of:=[.B982]/[.C982]" office:value-type="float" office:value="0.00249791666666667" calcext:value-type="float">
            <text:p>0,00249791666666667000</text:p>
          </table:table-cell>
          <table:table-cell table:formula="of:=[.D983]-[.D982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B982]+22" office:value-type="float" office:value="21604" calcext:value-type="float">
            <text:p>21604</text:p>
          </table:table-cell>
          <table:table-cell office:value-type="float" office:value="8640000" calcext:value-type="float">
            <text:p>8640000</text:p>
          </table:table-cell>
          <table:table-cell table:formula="of:=[.B983]/[.C983]" office:value-type="float" office:value="0.00250046296296296" calcext:value-type="float">
            <text:p>0,00250046296296296000</text:p>
          </table:table-cell>
          <table:table-cell table:formula="of:=[.D984]-[.D983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B983]+22" office:value-type="float" office:value="21626" calcext:value-type="float">
            <text:p>21626</text:p>
          </table:table-cell>
          <table:table-cell office:value-type="float" office:value="8640000" calcext:value-type="float">
            <text:p>8640000</text:p>
          </table:table-cell>
          <table:table-cell table:formula="of:=[.B984]/[.C984]" office:value-type="float" office:value="0.00250300925925926" calcext:value-type="float">
            <text:p>0,00250300925925926000</text:p>
          </table:table-cell>
          <table:table-cell table:formula="of:=[.D985]-[.D984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B984]+22" office:value-type="float" office:value="21648" calcext:value-type="float">
            <text:p>21648</text:p>
          </table:table-cell>
          <table:table-cell office:value-type="float" office:value="8640000" calcext:value-type="float">
            <text:p>8640000</text:p>
          </table:table-cell>
          <table:table-cell table:formula="of:=[.B985]/[.C985]" office:value-type="float" office:value="0.00250555555555556" calcext:value-type="float">
            <text:p>0,00250555555555556000</text:p>
          </table:table-cell>
          <table:table-cell table:formula="of:=[.D986]-[.D985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B985]+22" office:value-type="float" office:value="21670" calcext:value-type="float">
            <text:p>21670</text:p>
          </table:table-cell>
          <table:table-cell office:value-type="float" office:value="8640000" calcext:value-type="float">
            <text:p>8640000</text:p>
          </table:table-cell>
          <table:table-cell table:formula="of:=[.B986]/[.C986]" office:value-type="float" office:value="0.00250810185185185" calcext:value-type="float">
            <text:p>0,00250810185185185000</text:p>
          </table:table-cell>
          <table:table-cell table:formula="of:=[.D987]-[.D986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B986]+22" office:value-type="float" office:value="21692" calcext:value-type="float">
            <text:p>21692</text:p>
          </table:table-cell>
          <table:table-cell office:value-type="float" office:value="8640000" calcext:value-type="float">
            <text:p>8640000</text:p>
          </table:table-cell>
          <table:table-cell table:formula="of:=[.B987]/[.C987]" office:value-type="float" office:value="0.00251064814814815" calcext:value-type="float">
            <text:p>0,00251064814814815000</text:p>
          </table:table-cell>
          <table:table-cell table:formula="of:=[.D988]-[.D987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B987]+22" office:value-type="float" office:value="21714" calcext:value-type="float">
            <text:p>21714</text:p>
          </table:table-cell>
          <table:table-cell office:value-type="float" office:value="8640000" calcext:value-type="float">
            <text:p>8640000</text:p>
          </table:table-cell>
          <table:table-cell table:formula="of:=[.B988]/[.C988]" office:value-type="float" office:value="0.00251319444444444" calcext:value-type="float">
            <text:p>0,00251319444444444000</text:p>
          </table:table-cell>
          <table:table-cell table:formula="of:=[.D989]-[.D988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B988]+22" office:value-type="float" office:value="21736" calcext:value-type="float">
            <text:p>21736</text:p>
          </table:table-cell>
          <table:table-cell office:value-type="float" office:value="8640000" calcext:value-type="float">
            <text:p>8640000</text:p>
          </table:table-cell>
          <table:table-cell table:formula="of:=[.B989]/[.C989]" office:value-type="float" office:value="0.00251574074074074" calcext:value-type="float">
            <text:p>0,00251574074074074000</text:p>
          </table:table-cell>
          <table:table-cell table:formula="of:=[.D990]-[.D989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B989]+22" office:value-type="float" office:value="21758" calcext:value-type="float">
            <text:p>21758</text:p>
          </table:table-cell>
          <table:table-cell office:value-type="float" office:value="8640000" calcext:value-type="float">
            <text:p>8640000</text:p>
          </table:table-cell>
          <table:table-cell table:formula="of:=[.B990]/[.C990]" office:value-type="float" office:value="0.00251828703703704" calcext:value-type="float">
            <text:p>0,00251828703703704000</text:p>
          </table:table-cell>
          <table:table-cell table:formula="of:=[.D991]-[.D990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B990]+22" office:value-type="float" office:value="21780" calcext:value-type="float">
            <text:p>21780</text:p>
          </table:table-cell>
          <table:table-cell office:value-type="float" office:value="8640000" calcext:value-type="float">
            <text:p>8640000</text:p>
          </table:table-cell>
          <table:table-cell table:formula="of:=[.B991]/[.C991]" office:value-type="float" office:value="0.00252083333333333" calcext:value-type="float">
            <text:p>0,00252083333333333000</text:p>
          </table:table-cell>
          <table:table-cell table:formula="of:=[.D992]-[.D991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B991]+22" office:value-type="float" office:value="21802" calcext:value-type="float">
            <text:p>21802</text:p>
          </table:table-cell>
          <table:table-cell office:value-type="float" office:value="8640000" calcext:value-type="float">
            <text:p>8640000</text:p>
          </table:table-cell>
          <table:table-cell table:formula="of:=[.B992]/[.C992]" office:value-type="float" office:value="0.00252337962962963" calcext:value-type="float">
            <text:p>0,00252337962962963000</text:p>
          </table:table-cell>
          <table:table-cell table:formula="of:=[.D993]-[.D992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B992]+22" office:value-type="float" office:value="21824" calcext:value-type="float">
            <text:p>21824</text:p>
          </table:table-cell>
          <table:table-cell office:value-type="float" office:value="8640000" calcext:value-type="float">
            <text:p>8640000</text:p>
          </table:table-cell>
          <table:table-cell table:formula="of:=[.B993]/[.C993]" office:value-type="float" office:value="0.00252592592592593" calcext:value-type="float">
            <text:p>0,00252592592592593000</text:p>
          </table:table-cell>
          <table:table-cell table:formula="of:=[.D994]-[.D993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B993]+22" office:value-type="float" office:value="21846" calcext:value-type="float">
            <text:p>21846</text:p>
          </table:table-cell>
          <table:table-cell office:value-type="float" office:value="8640000" calcext:value-type="float">
            <text:p>8640000</text:p>
          </table:table-cell>
          <table:table-cell table:formula="of:=[.B994]/[.C994]" office:value-type="float" office:value="0.00252847222222222" calcext:value-type="float">
            <text:p>0,00252847222222222000</text:p>
          </table:table-cell>
          <table:table-cell table:formula="of:=[.D995]-[.D994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B994]+22" office:value-type="float" office:value="21868" calcext:value-type="float">
            <text:p>21868</text:p>
          </table:table-cell>
          <table:table-cell office:value-type="float" office:value="8640000" calcext:value-type="float">
            <text:p>8640000</text:p>
          </table:table-cell>
          <table:table-cell table:formula="of:=[.B995]/[.C995]" office:value-type="float" office:value="0.00253101851851852" calcext:value-type="float">
            <text:p>0,00253101851851852000</text:p>
          </table:table-cell>
          <table:table-cell table:formula="of:=[.D996]-[.D995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B995]+22" office:value-type="float" office:value="21890" calcext:value-type="float">
            <text:p>21890</text:p>
          </table:table-cell>
          <table:table-cell office:value-type="float" office:value="8640000" calcext:value-type="float">
            <text:p>8640000</text:p>
          </table:table-cell>
          <table:table-cell table:formula="of:=[.B996]/[.C996]" office:value-type="float" office:value="0.00253356481481482" calcext:value-type="float">
            <text:p>0,00253356481481482000</text:p>
          </table:table-cell>
          <table:table-cell table:formula="of:=[.D997]-[.D996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B996]+22" office:value-type="float" office:value="21912" calcext:value-type="float">
            <text:p>21912</text:p>
          </table:table-cell>
          <table:table-cell office:value-type="float" office:value="8640000" calcext:value-type="float">
            <text:p>8640000</text:p>
          </table:table-cell>
          <table:table-cell table:formula="of:=[.B997]/[.C997]" office:value-type="float" office:value="0.00253611111111111" calcext:value-type="float">
            <text:p>0,00253611111111111000</text:p>
          </table:table-cell>
          <table:table-cell table:formula="of:=[.D998]-[.D997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B997]+22" office:value-type="float" office:value="21934" calcext:value-type="float">
            <text:p>21934</text:p>
          </table:table-cell>
          <table:table-cell office:value-type="float" office:value="8640000" calcext:value-type="float">
            <text:p>8640000</text:p>
          </table:table-cell>
          <table:table-cell table:formula="of:=[.B998]/[.C998]" office:value-type="float" office:value="0.00253865740740741" calcext:value-type="float">
            <text:p>0,00253865740740741000</text:p>
          </table:table-cell>
          <table:table-cell table:formula="of:=[.D999]-[.D998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B998]+22" office:value-type="float" office:value="21956" calcext:value-type="float">
            <text:p>21956</text:p>
          </table:table-cell>
          <table:table-cell office:value-type="float" office:value="8640000" calcext:value-type="float">
            <text:p>8640000</text:p>
          </table:table-cell>
          <table:table-cell table:formula="of:=[.B999]/[.C999]" office:value-type="float" office:value="0.0025412037037037" calcext:value-type="float">
            <text:p>0,00254120370370370000</text:p>
          </table:table-cell>
          <table:table-cell table:formula="of:=[.D1000]-[.D999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B999]+22" office:value-type="float" office:value="21978" calcext:value-type="float">
            <text:p>21978</text:p>
          </table:table-cell>
          <table:table-cell office:value-type="float" office:value="8640000" calcext:value-type="float">
            <text:p>8640000</text:p>
          </table:table-cell>
          <table:table-cell table:formula="of:=[.B1000]/[.C1000]" office:value-type="float" office:value="0.00254375" calcext:value-type="float">
            <text:p>0,00254375000000000000</text:p>
          </table:table-cell>
          <table:table-cell table:formula="of:=[.D1001]-[.D1000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1000]+22" office:value-type="float" office:value="22000" calcext:value-type="float">
            <text:p>22000</text:p>
          </table:table-cell>
          <table:table-cell office:value-type="float" office:value="8640000" calcext:value-type="float">
            <text:p>8640000</text:p>
          </table:table-cell>
          <table:table-cell table:formula="of:=[.B1001]/[.C1001]" office:value-type="float" office:value="0.0025462962962963" calcext:value-type="float">
            <text:p>0,00254629629629630000</text:p>
          </table:table-cell>
          <table:table-cell table:formula="of:=[.D1002]-[.D1001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[.B1001]+22" office:value-type="float" office:value="22022" calcext:value-type="float">
            <text:p>22022</text:p>
          </table:table-cell>
          <table:table-cell office:value-type="float" office:value="8640000" calcext:value-type="float">
            <text:p>8640000</text:p>
          </table:table-cell>
          <table:table-cell table:formula="of:=[.B1002]/[.C1002]" office:value-type="float" office:value="0.00254884259259259" calcext:value-type="float">
            <text:p>0,00254884259259259000</text:p>
          </table:table-cell>
          <table:table-cell table:formula="of:=[.D1003]-[.D1002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[.B1002]+22" office:value-type="float" office:value="22044" calcext:value-type="float">
            <text:p>22044</text:p>
          </table:table-cell>
          <table:table-cell office:value-type="float" office:value="8640000" calcext:value-type="float">
            <text:p>8640000</text:p>
          </table:table-cell>
          <table:table-cell table:formula="of:=[.B1003]/[.C1003]" office:value-type="float" office:value="0.00255138888888889" calcext:value-type="float">
            <text:p>0,00255138888888889000</text:p>
          </table:table-cell>
          <table:table-cell table:formula="of:=[.D1004]-[.D1003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[.B1003]+22" office:value-type="float" office:value="22066" calcext:value-type="float">
            <text:p>22066</text:p>
          </table:table-cell>
          <table:table-cell office:value-type="float" office:value="8640000" calcext:value-type="float">
            <text:p>8640000</text:p>
          </table:table-cell>
          <table:table-cell table:formula="of:=[.B1004]/[.C1004]" office:value-type="float" office:value="0.00255393518518519" calcext:value-type="float">
            <text:p>0,00255393518518519000</text:p>
          </table:table-cell>
          <table:table-cell table:formula="of:=[.D1005]-[.D1004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[.B1004]+22" office:value-type="float" office:value="22088" calcext:value-type="float">
            <text:p>22088</text:p>
          </table:table-cell>
          <table:table-cell office:value-type="float" office:value="8640000" calcext:value-type="float">
            <text:p>8640000</text:p>
          </table:table-cell>
          <table:table-cell table:formula="of:=[.B1005]/[.C1005]" office:value-type="float" office:value="0.00255648148148148" calcext:value-type="float">
            <text:p>0,00255648148148148000</text:p>
          </table:table-cell>
          <table:table-cell table:formula="of:=[.D1006]-[.D1005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[.B1005]+22" office:value-type="float" office:value="22110" calcext:value-type="float">
            <text:p>22110</text:p>
          </table:table-cell>
          <table:table-cell office:value-type="float" office:value="8640000" calcext:value-type="float">
            <text:p>8640000</text:p>
          </table:table-cell>
          <table:table-cell table:formula="of:=[.B1006]/[.C1006]" office:value-type="float" office:value="0.00255902777777778" calcext:value-type="float">
            <text:p>0,00255902777777778000</text:p>
          </table:table-cell>
          <table:table-cell table:formula="of:=[.D1007]-[.D1006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[.B1006]+22" office:value-type="float" office:value="22132" calcext:value-type="float">
            <text:p>22132</text:p>
          </table:table-cell>
          <table:table-cell office:value-type="float" office:value="8640000" calcext:value-type="float">
            <text:p>8640000</text:p>
          </table:table-cell>
          <table:table-cell table:formula="of:=[.B1007]/[.C1007]" office:value-type="float" office:value="0.00256157407407407" calcext:value-type="float">
            <text:p>0,00256157407407407000</text:p>
          </table:table-cell>
          <table:table-cell table:formula="of:=[.D1008]-[.D1007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[.B1007]+22" office:value-type="float" office:value="22154" calcext:value-type="float">
            <text:p>22154</text:p>
          </table:table-cell>
          <table:table-cell office:value-type="float" office:value="8640000" calcext:value-type="float">
            <text:p>8640000</text:p>
          </table:table-cell>
          <table:table-cell table:formula="of:=[.B1008]/[.C1008]" office:value-type="float" office:value="0.00256412037037037" calcext:value-type="float">
            <text:p>0,00256412037037037000</text:p>
          </table:table-cell>
          <table:table-cell table:formula="of:=[.D1009]-[.D1008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[.B1008]+22" office:value-type="float" office:value="22176" calcext:value-type="float">
            <text:p>22176</text:p>
          </table:table-cell>
          <table:table-cell office:value-type="float" office:value="8640000" calcext:value-type="float">
            <text:p>8640000</text:p>
          </table:table-cell>
          <table:table-cell table:formula="of:=[.B1009]/[.C1009]" office:value-type="float" office:value="0.00256666666666667" calcext:value-type="float">
            <text:p>0,00256666666666667000</text:p>
          </table:table-cell>
          <table:table-cell table:formula="of:=[.D1010]-[.D1009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[.B1009]+22" office:value-type="float" office:value="22198" calcext:value-type="float">
            <text:p>22198</text:p>
          </table:table-cell>
          <table:table-cell office:value-type="float" office:value="8640000" calcext:value-type="float">
            <text:p>8640000</text:p>
          </table:table-cell>
          <table:table-cell table:formula="of:=[.B1010]/[.C1010]" office:value-type="float" office:value="0.00256921296296296" calcext:value-type="float">
            <text:p>0,00256921296296296000</text:p>
          </table:table-cell>
          <table:table-cell table:formula="of:=[.D1011]-[.D1010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B1010]+22" office:value-type="float" office:value="22220" calcext:value-type="float">
            <text:p>22220</text:p>
          </table:table-cell>
          <table:table-cell office:value-type="float" office:value="8640000" calcext:value-type="float">
            <text:p>8640000</text:p>
          </table:table-cell>
          <table:table-cell table:formula="of:=[.B1011]/[.C1011]" office:value-type="float" office:value="0.00257175925925926" calcext:value-type="float">
            <text:p>0,00257175925925926000</text:p>
          </table:table-cell>
          <table:table-cell table:formula="of:=[.D1012]-[.D1011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[.B1011]+22" office:value-type="float" office:value="22242" calcext:value-type="float">
            <text:p>22242</text:p>
          </table:table-cell>
          <table:table-cell office:value-type="float" office:value="8640000" calcext:value-type="float">
            <text:p>8640000</text:p>
          </table:table-cell>
          <table:table-cell table:formula="of:=[.B1012]/[.C1012]" office:value-type="float" office:value="0.00257430555555556" calcext:value-type="float">
            <text:p>0,00257430555555556000</text:p>
          </table:table-cell>
          <table:table-cell table:formula="of:=[.D1013]-[.D1012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[.B1012]+22" office:value-type="float" office:value="22264" calcext:value-type="float">
            <text:p>22264</text:p>
          </table:table-cell>
          <table:table-cell office:value-type="float" office:value="8640000" calcext:value-type="float">
            <text:p>8640000</text:p>
          </table:table-cell>
          <table:table-cell table:formula="of:=[.B1013]/[.C1013]" office:value-type="float" office:value="0.00257685185185185" calcext:value-type="float">
            <text:p>0,00257685185185185000</text:p>
          </table:table-cell>
          <table:table-cell table:formula="of:=[.D1014]-[.D1013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[.B1013]+22" office:value-type="float" office:value="22286" calcext:value-type="float">
            <text:p>22286</text:p>
          </table:table-cell>
          <table:table-cell office:value-type="float" office:value="8640000" calcext:value-type="float">
            <text:p>8640000</text:p>
          </table:table-cell>
          <table:table-cell table:formula="of:=[.B1014]/[.C1014]" office:value-type="float" office:value="0.00257939814814815" calcext:value-type="float">
            <text:p>0,00257939814814815000</text:p>
          </table:table-cell>
          <table:table-cell table:formula="of:=[.D1015]-[.D1014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[.B1014]+22" office:value-type="float" office:value="22308" calcext:value-type="float">
            <text:p>22308</text:p>
          </table:table-cell>
          <table:table-cell office:value-type="float" office:value="8640000" calcext:value-type="float">
            <text:p>8640000</text:p>
          </table:table-cell>
          <table:table-cell table:formula="of:=[.B1015]/[.C1015]" office:value-type="float" office:value="0.00258194444444444" calcext:value-type="float">
            <text:p>0,00258194444444444000</text:p>
          </table:table-cell>
          <table:table-cell table:formula="of:=[.D1016]-[.D1015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[.B1015]+22" office:value-type="float" office:value="22330" calcext:value-type="float">
            <text:p>22330</text:p>
          </table:table-cell>
          <table:table-cell office:value-type="float" office:value="8640000" calcext:value-type="float">
            <text:p>8640000</text:p>
          </table:table-cell>
          <table:table-cell table:formula="of:=[.B1016]/[.C1016]" office:value-type="float" office:value="0.00258449074074074" calcext:value-type="float">
            <text:p>0,00258449074074074000</text:p>
          </table:table-cell>
          <table:table-cell table:formula="of:=[.D1017]-[.D1016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[.B1016]+22" office:value-type="float" office:value="22352" calcext:value-type="float">
            <text:p>22352</text:p>
          </table:table-cell>
          <table:table-cell office:value-type="float" office:value="8640000" calcext:value-type="float">
            <text:p>8640000</text:p>
          </table:table-cell>
          <table:table-cell table:formula="of:=[.B1017]/[.C1017]" office:value-type="float" office:value="0.00258703703703704" calcext:value-type="float">
            <text:p>0,00258703703703704000</text:p>
          </table:table-cell>
          <table:table-cell table:formula="of:=[.D1018]-[.D1017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[.B1017]+22" office:value-type="float" office:value="22374" calcext:value-type="float">
            <text:p>22374</text:p>
          </table:table-cell>
          <table:table-cell office:value-type="float" office:value="8640000" calcext:value-type="float">
            <text:p>8640000</text:p>
          </table:table-cell>
          <table:table-cell table:formula="of:=[.B1018]/[.C1018]" office:value-type="float" office:value="0.00258958333333333" calcext:value-type="float">
            <text:p>0,00258958333333333000</text:p>
          </table:table-cell>
          <table:table-cell table:formula="of:=[.D1019]-[.D1018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[.B1018]+22" office:value-type="float" office:value="22396" calcext:value-type="float">
            <text:p>22396</text:p>
          </table:table-cell>
          <table:table-cell office:value-type="float" office:value="8640000" calcext:value-type="float">
            <text:p>8640000</text:p>
          </table:table-cell>
          <table:table-cell table:formula="of:=[.B1019]/[.C1019]" office:value-type="float" office:value="0.00259212962962963" calcext:value-type="float">
            <text:p>0,00259212962962963000</text:p>
          </table:table-cell>
          <table:table-cell table:formula="of:=[.D1020]-[.D1019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[.B1019]+22" office:value-type="float" office:value="22418" calcext:value-type="float">
            <text:p>22418</text:p>
          </table:table-cell>
          <table:table-cell office:value-type="float" office:value="8640000" calcext:value-type="float">
            <text:p>8640000</text:p>
          </table:table-cell>
          <table:table-cell table:formula="of:=[.B1020]/[.C1020]" office:value-type="float" office:value="0.00259467592592593" calcext:value-type="float">
            <text:p>0,00259467592592593000</text:p>
          </table:table-cell>
          <table:table-cell table:formula="of:=[.D1021]-[.D1020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[.B1020]+22" office:value-type="float" office:value="22440" calcext:value-type="float">
            <text:p>22440</text:p>
          </table:table-cell>
          <table:table-cell office:value-type="float" office:value="8640000" calcext:value-type="float">
            <text:p>8640000</text:p>
          </table:table-cell>
          <table:table-cell table:formula="of:=[.B1021]/[.C1021]" office:value-type="float" office:value="0.00259722222222222" calcext:value-type="float">
            <text:p>0,00259722222222222000</text:p>
          </table:table-cell>
          <table:table-cell table:formula="of:=[.D1022]-[.D1021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[.B1021]+22" office:value-type="float" office:value="22462" calcext:value-type="float">
            <text:p>22462</text:p>
          </table:table-cell>
          <table:table-cell office:value-type="float" office:value="8640000" calcext:value-type="float">
            <text:p>8640000</text:p>
          </table:table-cell>
          <table:table-cell table:formula="of:=[.B1022]/[.C1022]" office:value-type="float" office:value="0.00259976851851852" calcext:value-type="float">
            <text:p>0,00259976851851852000</text:p>
          </table:table-cell>
          <table:table-cell table:formula="of:=[.D1023]-[.D1022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[.B1022]+22" office:value-type="float" office:value="22484" calcext:value-type="float">
            <text:p>22484</text:p>
          </table:table-cell>
          <table:table-cell office:value-type="float" office:value="8640000" calcext:value-type="float">
            <text:p>8640000</text:p>
          </table:table-cell>
          <table:table-cell table:formula="of:=[.B1023]/[.C1023]" office:value-type="float" office:value="0.00260231481481481" calcext:value-type="float">
            <text:p>0,00260231481481481000</text:p>
          </table:table-cell>
          <table:table-cell table:formula="of:=[.D1024]-[.D1023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[.B1023]+22" office:value-type="float" office:value="22506" calcext:value-type="float">
            <text:p>22506</text:p>
          </table:table-cell>
          <table:table-cell office:value-type="float" office:value="8640000" calcext:value-type="float">
            <text:p>8640000</text:p>
          </table:table-cell>
          <table:table-cell table:formula="of:=[.B1024]/[.C1024]" office:value-type="float" office:value="0.00260486111111111" calcext:value-type="float">
            <text:p>0,00260486111111111000</text:p>
          </table:table-cell>
          <table:table-cell table:formula="of:=[.D1025]-[.D1024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B1024]+22" office:value-type="float" office:value="22528" calcext:value-type="float">
            <text:p>22528</text:p>
          </table:table-cell>
          <table:table-cell office:value-type="float" office:value="8640000" calcext:value-type="float">
            <text:p>8640000</text:p>
          </table:table-cell>
          <table:table-cell table:formula="of:=[.B1025]/[.C1025]" office:value-type="float" office:value="0.00260740740740741" calcext:value-type="float">
            <text:p>0,00260740740740741000</text:p>
          </table:table-cell>
          <table:table-cell table:formula="of:=[.D1026]-[.D1025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[.B1025]+22" office:value-type="float" office:value="22550" calcext:value-type="float">
            <text:p>22550</text:p>
          </table:table-cell>
          <table:table-cell office:value-type="float" office:value="8640000" calcext:value-type="float">
            <text:p>8640000</text:p>
          </table:table-cell>
          <table:table-cell table:formula="of:=[.B1026]/[.C1026]" office:value-type="float" office:value="0.0026099537037037" calcext:value-type="float">
            <text:p>0,00260995370370370000</text:p>
          </table:table-cell>
          <table:table-cell table:formula="of:=[.D1027]-[.D1026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[.B1026]+22" office:value-type="float" office:value="22572" calcext:value-type="float">
            <text:p>22572</text:p>
          </table:table-cell>
          <table:table-cell office:value-type="float" office:value="8640000" calcext:value-type="float">
            <text:p>8640000</text:p>
          </table:table-cell>
          <table:table-cell table:formula="of:=[.B1027]/[.C1027]" office:value-type="float" office:value="0.0026125" calcext:value-type="float">
            <text:p>0,00261250000000000000</text:p>
          </table:table-cell>
          <table:table-cell table:formula="of:=[.D1028]-[.D1027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[.B1027]+22" office:value-type="float" office:value="22594" calcext:value-type="float">
            <text:p>22594</text:p>
          </table:table-cell>
          <table:table-cell office:value-type="float" office:value="8640000" calcext:value-type="float">
            <text:p>8640000</text:p>
          </table:table-cell>
          <table:table-cell table:formula="of:=[.B1028]/[.C1028]" office:value-type="float" office:value="0.0026150462962963" calcext:value-type="float">
            <text:p>0,00261504629629630000</text:p>
          </table:table-cell>
          <table:table-cell table:formula="of:=[.D1029]-[.D1028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[.B1028]+22" office:value-type="float" office:value="22616" calcext:value-type="float">
            <text:p>22616</text:p>
          </table:table-cell>
          <table:table-cell office:value-type="float" office:value="8640000" calcext:value-type="float">
            <text:p>8640000</text:p>
          </table:table-cell>
          <table:table-cell table:formula="of:=[.B1029]/[.C1029]" office:value-type="float" office:value="0.00261759259259259" calcext:value-type="float">
            <text:p>0,00261759259259259000</text:p>
          </table:table-cell>
          <table:table-cell table:formula="of:=[.D1030]-[.D1029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[.B1029]+22" office:value-type="float" office:value="22638" calcext:value-type="float">
            <text:p>22638</text:p>
          </table:table-cell>
          <table:table-cell office:value-type="float" office:value="8640000" calcext:value-type="float">
            <text:p>8640000</text:p>
          </table:table-cell>
          <table:table-cell table:formula="of:=[.B1030]/[.C1030]" office:value-type="float" office:value="0.00262013888888889" calcext:value-type="float">
            <text:p>0,00262013888888889000</text:p>
          </table:table-cell>
          <table:table-cell table:formula="of:=[.D1031]-[.D1030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[.B1030]+22" office:value-type="float" office:value="22660" calcext:value-type="float">
            <text:p>22660</text:p>
          </table:table-cell>
          <table:table-cell office:value-type="float" office:value="8640000" calcext:value-type="float">
            <text:p>8640000</text:p>
          </table:table-cell>
          <table:table-cell table:formula="of:=[.B1031]/[.C1031]" office:value-type="float" office:value="0.00262268518518519" calcext:value-type="float">
            <text:p>0,00262268518518519000</text:p>
          </table:table-cell>
          <table:table-cell table:formula="of:=[.D1032]-[.D1031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[.B1031]+22" office:value-type="float" office:value="22682" calcext:value-type="float">
            <text:p>22682</text:p>
          </table:table-cell>
          <table:table-cell office:value-type="float" office:value="8640000" calcext:value-type="float">
            <text:p>8640000</text:p>
          </table:table-cell>
          <table:table-cell table:formula="of:=[.B1032]/[.C1032]" office:value-type="float" office:value="0.00262523148148148" calcext:value-type="float">
            <text:p>0,00262523148148148000</text:p>
          </table:table-cell>
          <table:table-cell table:formula="of:=[.D1033]-[.D1032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[.B1032]+22" office:value-type="float" office:value="22704" calcext:value-type="float">
            <text:p>22704</text:p>
          </table:table-cell>
          <table:table-cell office:value-type="float" office:value="8640000" calcext:value-type="float">
            <text:p>8640000</text:p>
          </table:table-cell>
          <table:table-cell table:formula="of:=[.B1033]/[.C1033]" office:value-type="float" office:value="0.00262777777777778" calcext:value-type="float">
            <text:p>0,00262777777777778000</text:p>
          </table:table-cell>
          <table:table-cell table:formula="of:=[.D1034]-[.D1033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[.B1033]+22" office:value-type="float" office:value="22726" calcext:value-type="float">
            <text:p>22726</text:p>
          </table:table-cell>
          <table:table-cell office:value-type="float" office:value="8640000" calcext:value-type="float">
            <text:p>8640000</text:p>
          </table:table-cell>
          <table:table-cell table:formula="of:=[.B1034]/[.C1034]" office:value-type="float" office:value="0.00263032407407407" calcext:value-type="float">
            <text:p>0,00263032407407407000</text:p>
          </table:table-cell>
          <table:table-cell table:formula="of:=[.D1035]-[.D1034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[.B1034]+22" office:value-type="float" office:value="22748" calcext:value-type="float">
            <text:p>22748</text:p>
          </table:table-cell>
          <table:table-cell office:value-type="float" office:value="8640000" calcext:value-type="float">
            <text:p>8640000</text:p>
          </table:table-cell>
          <table:table-cell table:formula="of:=[.B1035]/[.C1035]" office:value-type="float" office:value="0.00263287037037037" calcext:value-type="float">
            <text:p>0,00263287037037037000</text:p>
          </table:table-cell>
          <table:table-cell table:formula="of:=[.D1036]-[.D1035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[.B1035]+22" office:value-type="float" office:value="22770" calcext:value-type="float">
            <text:p>22770</text:p>
          </table:table-cell>
          <table:table-cell office:value-type="float" office:value="8640000" calcext:value-type="float">
            <text:p>8640000</text:p>
          </table:table-cell>
          <table:table-cell table:formula="of:=[.B1036]/[.C1036]" office:value-type="float" office:value="0.00263541666666667" calcext:value-type="float">
            <text:p>0,00263541666666667000</text:p>
          </table:table-cell>
          <table:table-cell table:formula="of:=[.D1037]-[.D1036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[.B1036]+22" office:value-type="float" office:value="22792" calcext:value-type="float">
            <text:p>22792</text:p>
          </table:table-cell>
          <table:table-cell office:value-type="float" office:value="8640000" calcext:value-type="float">
            <text:p>8640000</text:p>
          </table:table-cell>
          <table:table-cell table:formula="of:=[.B1037]/[.C1037]" office:value-type="float" office:value="0.00263796296296296" calcext:value-type="float">
            <text:p>0,00263796296296296000</text:p>
          </table:table-cell>
          <table:table-cell table:formula="of:=[.D1038]-[.D1037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[.B1037]+22" office:value-type="float" office:value="22814" calcext:value-type="float">
            <text:p>22814</text:p>
          </table:table-cell>
          <table:table-cell office:value-type="float" office:value="8640000" calcext:value-type="float">
            <text:p>8640000</text:p>
          </table:table-cell>
          <table:table-cell table:formula="of:=[.B1038]/[.C1038]" office:value-type="float" office:value="0.00264050925925926" calcext:value-type="float">
            <text:p>0,00264050925925926000</text:p>
          </table:table-cell>
          <table:table-cell table:formula="of:=[.D1039]-[.D1038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[.B1038]+22" office:value-type="float" office:value="22836" calcext:value-type="float">
            <text:p>22836</text:p>
          </table:table-cell>
          <table:table-cell office:value-type="float" office:value="8640000" calcext:value-type="float">
            <text:p>8640000</text:p>
          </table:table-cell>
          <table:table-cell table:formula="of:=[.B1039]/[.C1039]" office:value-type="float" office:value="0.00264305555555556" calcext:value-type="float">
            <text:p>0,00264305555555556000</text:p>
          </table:table-cell>
          <table:table-cell table:formula="of:=[.D1040]-[.D1039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[.B1039]+22" office:value-type="float" office:value="22858" calcext:value-type="float">
            <text:p>22858</text:p>
          </table:table-cell>
          <table:table-cell office:value-type="float" office:value="8640000" calcext:value-type="float">
            <text:p>8640000</text:p>
          </table:table-cell>
          <table:table-cell table:formula="of:=[.B1040]/[.C1040]" office:value-type="float" office:value="0.00264560185185185" calcext:value-type="float">
            <text:p>0,00264560185185185000</text:p>
          </table:table-cell>
          <table:table-cell table:formula="of:=[.D1041]-[.D1040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[.B1040]+22" office:value-type="float" office:value="22880" calcext:value-type="float">
            <text:p>22880</text:p>
          </table:table-cell>
          <table:table-cell office:value-type="float" office:value="8640000" calcext:value-type="float">
            <text:p>8640000</text:p>
          </table:table-cell>
          <table:table-cell table:formula="of:=[.B1041]/[.C1041]" office:value-type="float" office:value="0.00264814814814815" calcext:value-type="float">
            <text:p>0,00264814814814815000</text:p>
          </table:table-cell>
          <table:table-cell table:formula="of:=[.D1042]-[.D1041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[.B1041]+22" office:value-type="float" office:value="22902" calcext:value-type="float">
            <text:p>22902</text:p>
          </table:table-cell>
          <table:table-cell office:value-type="float" office:value="8640000" calcext:value-type="float">
            <text:p>8640000</text:p>
          </table:table-cell>
          <table:table-cell table:formula="of:=[.B1042]/[.C1042]" office:value-type="float" office:value="0.00265069444444444" calcext:value-type="float">
            <text:p>0,00265069444444444000</text:p>
          </table:table-cell>
          <table:table-cell table:formula="of:=[.D1043]-[.D1042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table:formula="of:=[.B1042]+22" office:value-type="float" office:value="22924" calcext:value-type="float">
            <text:p>22924</text:p>
          </table:table-cell>
          <table:table-cell office:value-type="float" office:value="8640000" calcext:value-type="float">
            <text:p>8640000</text:p>
          </table:table-cell>
          <table:table-cell table:formula="of:=[.B1043]/[.C1043]" office:value-type="float" office:value="0.00265324074074074" calcext:value-type="float">
            <text:p>0,00265324074074074000</text:p>
          </table:table-cell>
          <table:table-cell table:formula="of:=[.D1044]-[.D1043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[.B1043]+22" office:value-type="float" office:value="22946" calcext:value-type="float">
            <text:p>22946</text:p>
          </table:table-cell>
          <table:table-cell office:value-type="float" office:value="8640000" calcext:value-type="float">
            <text:p>8640000</text:p>
          </table:table-cell>
          <table:table-cell table:formula="of:=[.B1044]/[.C1044]" office:value-type="float" office:value="0.00265578703703704" calcext:value-type="float">
            <text:p>0,00265578703703704000</text:p>
          </table:table-cell>
          <table:table-cell table:formula="of:=[.D1045]-[.D1044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[.B1044]+22" office:value-type="float" office:value="22968" calcext:value-type="float">
            <text:p>22968</text:p>
          </table:table-cell>
          <table:table-cell office:value-type="float" office:value="8640000" calcext:value-type="float">
            <text:p>8640000</text:p>
          </table:table-cell>
          <table:table-cell table:formula="of:=[.B1045]/[.C1045]" office:value-type="float" office:value="0.00265833333333333" calcext:value-type="float">
            <text:p>0,00265833333333333000</text:p>
          </table:table-cell>
          <table:table-cell table:formula="of:=[.D1046]-[.D1045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[.B1045]+22" office:value-type="float" office:value="22990" calcext:value-type="float">
            <text:p>22990</text:p>
          </table:table-cell>
          <table:table-cell office:value-type="float" office:value="8640000" calcext:value-type="float">
            <text:p>8640000</text:p>
          </table:table-cell>
          <table:table-cell table:formula="of:=[.B1046]/[.C1046]" office:value-type="float" office:value="0.00266087962962963" calcext:value-type="float">
            <text:p>0,00266087962962963000</text:p>
          </table:table-cell>
          <table:table-cell table:formula="of:=[.D1047]-[.D1046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[.B1046]+22" office:value-type="float" office:value="23012" calcext:value-type="float">
            <text:p>23012</text:p>
          </table:table-cell>
          <table:table-cell office:value-type="float" office:value="8640000" calcext:value-type="float">
            <text:p>8640000</text:p>
          </table:table-cell>
          <table:table-cell table:formula="of:=[.B1047]/[.C1047]" office:value-type="float" office:value="0.00266342592592593" calcext:value-type="float">
            <text:p>0,00266342592592593000</text:p>
          </table:table-cell>
          <table:table-cell table:formula="of:=[.D1048]-[.D1047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[.B1047]+22" office:value-type="float" office:value="23034" calcext:value-type="float">
            <text:p>23034</text:p>
          </table:table-cell>
          <table:table-cell office:value-type="float" office:value="8640000" calcext:value-type="float">
            <text:p>8640000</text:p>
          </table:table-cell>
          <table:table-cell table:formula="of:=[.B1048]/[.C1048]" office:value-type="float" office:value="0.00266597222222222" calcext:value-type="float">
            <text:p>0,00266597222222222000</text:p>
          </table:table-cell>
          <table:table-cell table:formula="of:=[.D1049]-[.D1048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[.B1048]+22" office:value-type="float" office:value="23056" calcext:value-type="float">
            <text:p>23056</text:p>
          </table:table-cell>
          <table:table-cell office:value-type="float" office:value="8640000" calcext:value-type="float">
            <text:p>8640000</text:p>
          </table:table-cell>
          <table:table-cell table:formula="of:=[.B1049]/[.C1049]" office:value-type="float" office:value="0.00266851851851852" calcext:value-type="float">
            <text:p>0,00266851851851852000</text:p>
          </table:table-cell>
          <table:table-cell table:formula="of:=[.D1050]-[.D1049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[.B1049]+22" office:value-type="float" office:value="23078" calcext:value-type="float">
            <text:p>23078</text:p>
          </table:table-cell>
          <table:table-cell office:value-type="float" office:value="8640000" calcext:value-type="float">
            <text:p>8640000</text:p>
          </table:table-cell>
          <table:table-cell table:formula="of:=[.B1050]/[.C1050]" office:value-type="float" office:value="0.00267106481481482" calcext:value-type="float">
            <text:p>0,00267106481481482000</text:p>
          </table:table-cell>
          <table:table-cell table:formula="of:=[.D1051]-[.D1050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.B1050]+22" office:value-type="float" office:value="23100" calcext:value-type="float">
            <text:p>23100</text:p>
          </table:table-cell>
          <table:table-cell office:value-type="float" office:value="8640000" calcext:value-type="float">
            <text:p>8640000</text:p>
          </table:table-cell>
          <table:table-cell table:formula="of:=[.B1051]/[.C1051]" office:value-type="float" office:value="0.00267361111111111" calcext:value-type="float">
            <text:p>0,00267361111111111000</text:p>
          </table:table-cell>
          <table:table-cell table:formula="of:=[.D1052]-[.D1051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[.B1051]+22" office:value-type="float" office:value="23122" calcext:value-type="float">
            <text:p>23122</text:p>
          </table:table-cell>
          <table:table-cell office:value-type="float" office:value="8640000" calcext:value-type="float">
            <text:p>8640000</text:p>
          </table:table-cell>
          <table:table-cell table:formula="of:=[.B1052]/[.C1052]" office:value-type="float" office:value="0.00267615740740741" calcext:value-type="float">
            <text:p>0,00267615740740741000</text:p>
          </table:table-cell>
          <table:table-cell table:formula="of:=[.D1053]-[.D1052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[.B1052]+22" office:value-type="float" office:value="23144" calcext:value-type="float">
            <text:p>23144</text:p>
          </table:table-cell>
          <table:table-cell office:value-type="float" office:value="8640000" calcext:value-type="float">
            <text:p>8640000</text:p>
          </table:table-cell>
          <table:table-cell table:formula="of:=[.B1053]/[.C1053]" office:value-type="float" office:value="0.0026787037037037" calcext:value-type="float">
            <text:p>0,00267870370370370000</text:p>
          </table:table-cell>
          <table:table-cell table:formula="of:=[.D1054]-[.D1053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[.B1053]+22" office:value-type="float" office:value="23166" calcext:value-type="float">
            <text:p>23166</text:p>
          </table:table-cell>
          <table:table-cell office:value-type="float" office:value="8640000" calcext:value-type="float">
            <text:p>8640000</text:p>
          </table:table-cell>
          <table:table-cell table:formula="of:=[.B1054]/[.C1054]" office:value-type="float" office:value="0.00268125" calcext:value-type="float">
            <text:p>0,00268125000000000000</text:p>
          </table:table-cell>
          <table:table-cell table:formula="of:=[.D1055]-[.D1054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[.B1054]+22" office:value-type="float" office:value="23188" calcext:value-type="float">
            <text:p>23188</text:p>
          </table:table-cell>
          <table:table-cell office:value-type="float" office:value="8640000" calcext:value-type="float">
            <text:p>8640000</text:p>
          </table:table-cell>
          <table:table-cell table:formula="of:=[.B1055]/[.C1055]" office:value-type="float" office:value="0.0026837962962963" calcext:value-type="float">
            <text:p>0,00268379629629630000</text:p>
          </table:table-cell>
          <table:table-cell table:formula="of:=[.D1056]-[.D1055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[.B1055]+22" office:value-type="float" office:value="23210" calcext:value-type="float">
            <text:p>23210</text:p>
          </table:table-cell>
          <table:table-cell office:value-type="float" office:value="8640000" calcext:value-type="float">
            <text:p>8640000</text:p>
          </table:table-cell>
          <table:table-cell table:formula="of:=[.B1056]/[.C1056]" office:value-type="float" office:value="0.00268634259259259" calcext:value-type="float">
            <text:p>0,00268634259259259000</text:p>
          </table:table-cell>
          <table:table-cell table:formula="of:=[.D1057]-[.D1056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[.B1056]+22" office:value-type="float" office:value="23232" calcext:value-type="float">
            <text:p>23232</text:p>
          </table:table-cell>
          <table:table-cell office:value-type="float" office:value="8640000" calcext:value-type="float">
            <text:p>8640000</text:p>
          </table:table-cell>
          <table:table-cell table:formula="of:=[.B1057]/[.C1057]" office:value-type="float" office:value="0.00268888888888889" calcext:value-type="float">
            <text:p>0,00268888888888889000</text:p>
          </table:table-cell>
          <table:table-cell table:formula="of:=[.D1058]-[.D1057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[.B1057]+22" office:value-type="float" office:value="23254" calcext:value-type="float">
            <text:p>23254</text:p>
          </table:table-cell>
          <table:table-cell office:value-type="float" office:value="8640000" calcext:value-type="float">
            <text:p>8640000</text:p>
          </table:table-cell>
          <table:table-cell table:formula="of:=[.B1058]/[.C1058]" office:value-type="float" office:value="0.00269143518518519" calcext:value-type="float">
            <text:p>0,00269143518518519000</text:p>
          </table:table-cell>
          <table:table-cell table:formula="of:=[.D1059]-[.D1058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[.B1058]+22" office:value-type="float" office:value="23276" calcext:value-type="float">
            <text:p>23276</text:p>
          </table:table-cell>
          <table:table-cell office:value-type="float" office:value="8640000" calcext:value-type="float">
            <text:p>8640000</text:p>
          </table:table-cell>
          <table:table-cell table:formula="of:=[.B1059]/[.C1059]" office:value-type="float" office:value="0.00269398148148148" calcext:value-type="float">
            <text:p>0,00269398148148148000</text:p>
          </table:table-cell>
          <table:table-cell table:formula="of:=[.D1060]-[.D1059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[.B1059]+22" office:value-type="float" office:value="23298" calcext:value-type="float">
            <text:p>23298</text:p>
          </table:table-cell>
          <table:table-cell office:value-type="float" office:value="8640000" calcext:value-type="float">
            <text:p>8640000</text:p>
          </table:table-cell>
          <table:table-cell table:formula="of:=[.B1060]/[.C1060]" office:value-type="float" office:value="0.00269652777777778" calcext:value-type="float">
            <text:p>0,00269652777777778000</text:p>
          </table:table-cell>
          <table:table-cell table:formula="of:=[.D1061]-[.D1060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[.B1060]+22" office:value-type="float" office:value="23320" calcext:value-type="float">
            <text:p>23320</text:p>
          </table:table-cell>
          <table:table-cell office:value-type="float" office:value="8640000" calcext:value-type="float">
            <text:p>8640000</text:p>
          </table:table-cell>
          <table:table-cell table:formula="of:=[.B1061]/[.C1061]" office:value-type="float" office:value="0.00269907407407407" calcext:value-type="float">
            <text:p>0,00269907407407407000</text:p>
          </table:table-cell>
          <table:table-cell table:formula="of:=[.D1062]-[.D1061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[.B1061]+22" office:value-type="float" office:value="23342" calcext:value-type="float">
            <text:p>23342</text:p>
          </table:table-cell>
          <table:table-cell office:value-type="float" office:value="8640000" calcext:value-type="float">
            <text:p>8640000</text:p>
          </table:table-cell>
          <table:table-cell table:formula="of:=[.B1062]/[.C1062]" office:value-type="float" office:value="0.00270162037037037" calcext:value-type="float">
            <text:p>0,00270162037037037000</text:p>
          </table:table-cell>
          <table:table-cell table:formula="of:=[.D1063]-[.D1062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[.B1062]+22" office:value-type="float" office:value="23364" calcext:value-type="float">
            <text:p>23364</text:p>
          </table:table-cell>
          <table:table-cell office:value-type="float" office:value="8640000" calcext:value-type="float">
            <text:p>8640000</text:p>
          </table:table-cell>
          <table:table-cell table:formula="of:=[.B1063]/[.C1063]" office:value-type="float" office:value="0.00270416666666667" calcext:value-type="float">
            <text:p>0,00270416666666667000</text:p>
          </table:table-cell>
          <table:table-cell table:formula="of:=[.D1064]-[.D1063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[.B1063]+22" office:value-type="float" office:value="23386" calcext:value-type="float">
            <text:p>23386</text:p>
          </table:table-cell>
          <table:table-cell office:value-type="float" office:value="8640000" calcext:value-type="float">
            <text:p>8640000</text:p>
          </table:table-cell>
          <table:table-cell table:formula="of:=[.B1064]/[.C1064]" office:value-type="float" office:value="0.00270671296296296" calcext:value-type="float">
            <text:p>0,00270671296296296000</text:p>
          </table:table-cell>
          <table:table-cell table:formula="of:=[.D1065]-[.D1064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[.B1064]+22" office:value-type="float" office:value="23408" calcext:value-type="float">
            <text:p>23408</text:p>
          </table:table-cell>
          <table:table-cell office:value-type="float" office:value="8640000" calcext:value-type="float">
            <text:p>8640000</text:p>
          </table:table-cell>
          <table:table-cell table:formula="of:=[.B1065]/[.C1065]" office:value-type="float" office:value="0.00270925925925926" calcext:value-type="float">
            <text:p>0,00270925925925926000</text:p>
          </table:table-cell>
          <table:table-cell table:formula="of:=[.D1066]-[.D1065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[.B1065]+22" office:value-type="float" office:value="23430" calcext:value-type="float">
            <text:p>23430</text:p>
          </table:table-cell>
          <table:table-cell office:value-type="float" office:value="8640000" calcext:value-type="float">
            <text:p>8640000</text:p>
          </table:table-cell>
          <table:table-cell table:formula="of:=[.B1066]/[.C1066]" office:value-type="float" office:value="0.00271180555555556" calcext:value-type="float">
            <text:p>0,00271180555555556000</text:p>
          </table:table-cell>
          <table:table-cell table:formula="of:=[.D1067]-[.D1066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[.B1066]+22" office:value-type="float" office:value="23452" calcext:value-type="float">
            <text:p>23452</text:p>
          </table:table-cell>
          <table:table-cell office:value-type="float" office:value="8640000" calcext:value-type="float">
            <text:p>8640000</text:p>
          </table:table-cell>
          <table:table-cell table:formula="of:=[.B1067]/[.C1067]" office:value-type="float" office:value="0.00271435185185185" calcext:value-type="float">
            <text:p>0,00271435185185185000</text:p>
          </table:table-cell>
          <table:table-cell table:formula="of:=[.D1068]-[.D1067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[.B1067]+22" office:value-type="float" office:value="23474" calcext:value-type="float">
            <text:p>23474</text:p>
          </table:table-cell>
          <table:table-cell office:value-type="float" office:value="8640000" calcext:value-type="float">
            <text:p>8640000</text:p>
          </table:table-cell>
          <table:table-cell table:formula="of:=[.B1068]/[.C1068]" office:value-type="float" office:value="0.00271689814814815" calcext:value-type="float">
            <text:p>0,00271689814814815000</text:p>
          </table:table-cell>
          <table:table-cell table:formula="of:=[.D1069]-[.D1068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[.B1068]+22" office:value-type="float" office:value="23496" calcext:value-type="float">
            <text:p>23496</text:p>
          </table:table-cell>
          <table:table-cell office:value-type="float" office:value="8640000" calcext:value-type="float">
            <text:p>8640000</text:p>
          </table:table-cell>
          <table:table-cell table:formula="of:=[.B1069]/[.C1069]" office:value-type="float" office:value="0.00271944444444444" calcext:value-type="float">
            <text:p>0,00271944444444444000</text:p>
          </table:table-cell>
          <table:table-cell table:formula="of:=[.D1070]-[.D1069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[.B1069]+22" office:value-type="float" office:value="23518" calcext:value-type="float">
            <text:p>23518</text:p>
          </table:table-cell>
          <table:table-cell office:value-type="float" office:value="8640000" calcext:value-type="float">
            <text:p>8640000</text:p>
          </table:table-cell>
          <table:table-cell table:formula="of:=[.B1070]/[.C1070]" office:value-type="float" office:value="0.00272199074074074" calcext:value-type="float">
            <text:p>0,00272199074074074000</text:p>
          </table:table-cell>
          <table:table-cell table:formula="of:=[.D1071]-[.D1070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[.B1070]+22" office:value-type="float" office:value="23540" calcext:value-type="float">
            <text:p>23540</text:p>
          </table:table-cell>
          <table:table-cell office:value-type="float" office:value="8640000" calcext:value-type="float">
            <text:p>8640000</text:p>
          </table:table-cell>
          <table:table-cell table:formula="of:=[.B1071]/[.C1071]" office:value-type="float" office:value="0.00272453703703704" calcext:value-type="float">
            <text:p>0,00272453703703704000</text:p>
          </table:table-cell>
          <table:table-cell table:formula="of:=[.D1072]-[.D1071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[.B1071]+22" office:value-type="float" office:value="23562" calcext:value-type="float">
            <text:p>23562</text:p>
          </table:table-cell>
          <table:table-cell office:value-type="float" office:value="8640000" calcext:value-type="float">
            <text:p>8640000</text:p>
          </table:table-cell>
          <table:table-cell table:formula="of:=[.B1072]/[.C1072]" office:value-type="float" office:value="0.00272708333333333" calcext:value-type="float">
            <text:p>0,00272708333333333000</text:p>
          </table:table-cell>
          <table:table-cell table:formula="of:=[.D1073]-[.D1072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[.B1072]+22" office:value-type="float" office:value="23584" calcext:value-type="float">
            <text:p>23584</text:p>
          </table:table-cell>
          <table:table-cell office:value-type="float" office:value="8640000" calcext:value-type="float">
            <text:p>8640000</text:p>
          </table:table-cell>
          <table:table-cell table:formula="of:=[.B1073]/[.C1073]" office:value-type="float" office:value="0.00272962962962963" calcext:value-type="float">
            <text:p>0,00272962962962963000</text:p>
          </table:table-cell>
          <table:table-cell table:formula="of:=[.D1074]-[.D1073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[.B1073]+22" office:value-type="float" office:value="23606" calcext:value-type="float">
            <text:p>23606</text:p>
          </table:table-cell>
          <table:table-cell office:value-type="float" office:value="8640000" calcext:value-type="float">
            <text:p>8640000</text:p>
          </table:table-cell>
          <table:table-cell table:formula="of:=[.B1074]/[.C1074]" office:value-type="float" office:value="0.00273217592592593" calcext:value-type="float">
            <text:p>0,00273217592592593000</text:p>
          </table:table-cell>
          <table:table-cell table:formula="of:=[.D1075]-[.D1074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[.B1074]+22" office:value-type="float" office:value="23628" calcext:value-type="float">
            <text:p>23628</text:p>
          </table:table-cell>
          <table:table-cell office:value-type="float" office:value="8640000" calcext:value-type="float">
            <text:p>8640000</text:p>
          </table:table-cell>
          <table:table-cell table:formula="of:=[.B1075]/[.C1075]" office:value-type="float" office:value="0.00273472222222222" calcext:value-type="float">
            <text:p>0,00273472222222222000</text:p>
          </table:table-cell>
          <table:table-cell table:formula="of:=[.D1076]-[.D1075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[.B1075]+22" office:value-type="float" office:value="23650" calcext:value-type="float">
            <text:p>23650</text:p>
          </table:table-cell>
          <table:table-cell office:value-type="float" office:value="8640000" calcext:value-type="float">
            <text:p>8640000</text:p>
          </table:table-cell>
          <table:table-cell table:formula="of:=[.B1076]/[.C1076]" office:value-type="float" office:value="0.00273726851851852" calcext:value-type="float">
            <text:p>0,00273726851851852000</text:p>
          </table:table-cell>
          <table:table-cell table:formula="of:=[.D1077]-[.D1076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[.B1076]+22" office:value-type="float" office:value="23672" calcext:value-type="float">
            <text:p>23672</text:p>
          </table:table-cell>
          <table:table-cell office:value-type="float" office:value="8640000" calcext:value-type="float">
            <text:p>8640000</text:p>
          </table:table-cell>
          <table:table-cell table:formula="of:=[.B1077]/[.C1077]" office:value-type="float" office:value="0.00273981481481481" calcext:value-type="float">
            <text:p>0,00273981481481481000</text:p>
          </table:table-cell>
          <table:table-cell table:formula="of:=[.D1078]-[.D1077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[.B1077]+22" office:value-type="float" office:value="23694" calcext:value-type="float">
            <text:p>23694</text:p>
          </table:table-cell>
          <table:table-cell office:value-type="float" office:value="8640000" calcext:value-type="float">
            <text:p>8640000</text:p>
          </table:table-cell>
          <table:table-cell table:formula="of:=[.B1078]/[.C1078]" office:value-type="float" office:value="0.00274236111111111" calcext:value-type="float">
            <text:p>0,00274236111111111000</text:p>
          </table:table-cell>
          <table:table-cell table:formula="of:=[.D1079]-[.D1078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[.B1078]+22" office:value-type="float" office:value="23716" calcext:value-type="float">
            <text:p>23716</text:p>
          </table:table-cell>
          <table:table-cell office:value-type="float" office:value="8640000" calcext:value-type="float">
            <text:p>8640000</text:p>
          </table:table-cell>
          <table:table-cell table:formula="of:=[.B1079]/[.C1079]" office:value-type="float" office:value="0.00274490740740741" calcext:value-type="float">
            <text:p>0,00274490740740741000</text:p>
          </table:table-cell>
          <table:table-cell table:formula="of:=[.D1080]-[.D1079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[.B1079]+22" office:value-type="float" office:value="23738" calcext:value-type="float">
            <text:p>23738</text:p>
          </table:table-cell>
          <table:table-cell office:value-type="float" office:value="8640000" calcext:value-type="float">
            <text:p>8640000</text:p>
          </table:table-cell>
          <table:table-cell table:formula="of:=[.B1080]/[.C1080]" office:value-type="float" office:value="0.0027474537037037" calcext:value-type="float">
            <text:p>0,00274745370370370000</text:p>
          </table:table-cell>
          <table:table-cell table:formula="of:=[.D1081]-[.D1080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[.B1080]+22" office:value-type="float" office:value="23760" calcext:value-type="float">
            <text:p>23760</text:p>
          </table:table-cell>
          <table:table-cell office:value-type="float" office:value="8640000" calcext:value-type="float">
            <text:p>8640000</text:p>
          </table:table-cell>
          <table:table-cell table:formula="of:=[.B1081]/[.C1081]" office:value-type="float" office:value="0.00275" calcext:value-type="float">
            <text:p>0,00275000000000000000</text:p>
          </table:table-cell>
          <table:table-cell table:formula="of:=[.D1082]-[.D1081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[.B1081]+22" office:value-type="float" office:value="23782" calcext:value-type="float">
            <text:p>23782</text:p>
          </table:table-cell>
          <table:table-cell office:value-type="float" office:value="8640000" calcext:value-type="float">
            <text:p>8640000</text:p>
          </table:table-cell>
          <table:table-cell table:formula="of:=[.B1082]/[.C1082]" office:value-type="float" office:value="0.0027525462962963" calcext:value-type="float">
            <text:p>0,00275254629629630000</text:p>
          </table:table-cell>
          <table:table-cell table:formula="of:=[.D1083]-[.D1082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[.B1082]+22" office:value-type="float" office:value="23804" calcext:value-type="float">
            <text:p>23804</text:p>
          </table:table-cell>
          <table:table-cell office:value-type="float" office:value="8640000" calcext:value-type="float">
            <text:p>8640000</text:p>
          </table:table-cell>
          <table:table-cell table:formula="of:=[.B1083]/[.C1083]" office:value-type="float" office:value="0.00275509259259259" calcext:value-type="float">
            <text:p>0,00275509259259259000</text:p>
          </table:table-cell>
          <table:table-cell table:formula="of:=[.D1084]-[.D1083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[.B1083]+22" office:value-type="float" office:value="23826" calcext:value-type="float">
            <text:p>23826</text:p>
          </table:table-cell>
          <table:table-cell office:value-type="float" office:value="8640000" calcext:value-type="float">
            <text:p>8640000</text:p>
          </table:table-cell>
          <table:table-cell table:formula="of:=[.B1084]/[.C1084]" office:value-type="float" office:value="0.00275763888888889" calcext:value-type="float">
            <text:p>0,00275763888888889000</text:p>
          </table:table-cell>
          <table:table-cell table:formula="of:=[.D1085]-[.D1084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[.B1084]+22" office:value-type="float" office:value="23848" calcext:value-type="float">
            <text:p>23848</text:p>
          </table:table-cell>
          <table:table-cell office:value-type="float" office:value="8640000" calcext:value-type="float">
            <text:p>8640000</text:p>
          </table:table-cell>
          <table:table-cell table:formula="of:=[.B1085]/[.C1085]" office:value-type="float" office:value="0.00276018518518519" calcext:value-type="float">
            <text:p>0,00276018518518519000</text:p>
          </table:table-cell>
          <table:table-cell table:formula="of:=[.D1086]-[.D1085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[.B1085]+22" office:value-type="float" office:value="23870" calcext:value-type="float">
            <text:p>23870</text:p>
          </table:table-cell>
          <table:table-cell office:value-type="float" office:value="8640000" calcext:value-type="float">
            <text:p>8640000</text:p>
          </table:table-cell>
          <table:table-cell table:formula="of:=[.B1086]/[.C1086]" office:value-type="float" office:value="0.00276273148148148" calcext:value-type="float">
            <text:p>0,00276273148148148000</text:p>
          </table:table-cell>
          <table:table-cell table:formula="of:=[.D1087]-[.D1086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[.B1086]+22" office:value-type="float" office:value="23892" calcext:value-type="float">
            <text:p>23892</text:p>
          </table:table-cell>
          <table:table-cell office:value-type="float" office:value="8640000" calcext:value-type="float">
            <text:p>8640000</text:p>
          </table:table-cell>
          <table:table-cell table:formula="of:=[.B1087]/[.C1087]" office:value-type="float" office:value="0.00276527777777778" calcext:value-type="float">
            <text:p>0,00276527777777778000</text:p>
          </table:table-cell>
          <table:table-cell table:formula="of:=[.D1088]-[.D1087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[.B1087]+22" office:value-type="float" office:value="23914" calcext:value-type="float">
            <text:p>23914</text:p>
          </table:table-cell>
          <table:table-cell office:value-type="float" office:value="8640000" calcext:value-type="float">
            <text:p>8640000</text:p>
          </table:table-cell>
          <table:table-cell table:formula="of:=[.B1088]/[.C1088]" office:value-type="float" office:value="0.00276782407407407" calcext:value-type="float">
            <text:p>0,00276782407407407000</text:p>
          </table:table-cell>
          <table:table-cell table:formula="of:=[.D1089]-[.D1088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[.B1088]+22" office:value-type="float" office:value="23936" calcext:value-type="float">
            <text:p>23936</text:p>
          </table:table-cell>
          <table:table-cell office:value-type="float" office:value="8640000" calcext:value-type="float">
            <text:p>8640000</text:p>
          </table:table-cell>
          <table:table-cell table:formula="of:=[.B1089]/[.C1089]" office:value-type="float" office:value="0.00277037037037037" calcext:value-type="float">
            <text:p>0,00277037037037037000</text:p>
          </table:table-cell>
          <table:table-cell table:formula="of:=[.D1090]-[.D1089]" office:value-type="float" office:value="0.00000254629629629606" calcext:value-type="float">
            <text:p>0,00000254629629629606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[.B1089]+22" office:value-type="float" office:value="23958" calcext:value-type="float">
            <text:p>23958</text:p>
          </table:table-cell>
          <table:table-cell office:value-type="float" office:value="8640000" calcext:value-type="float">
            <text:p>8640000</text:p>
          </table:table-cell>
          <table:table-cell table:formula="of:=[.B1090]/[.C1090]" office:value-type="float" office:value="0.00277291666666667" calcext:value-type="float">
            <text:p>0,00277291666666667000</text:p>
          </table:table-cell>
          <table:table-cell table:formula="of:=[.D1091]-[.D1090]" office:value-type="float" office:value="0.0000025462962962965" calcext:value-type="float">
            <text:p>0,0000025462962962965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[.B1090]+22" office:value-type="float" office:value="23980" calcext:value-type="float">
            <text:p>23980</text:p>
          </table:table-cell>
          <table:table-cell office:value-type="float" office:value="8640000" calcext:value-type="float">
            <text:p>8640000</text:p>
          </table:table-cell>
          <table:table-cell table:formula="of:=[.B1091]/[.C1091]" office:value-type="float" office:value="0.00277546296296296" calcext:value-type="float">
            <text:p>0,00277546296296296000</text:p>
          </table:table-cell>
          <table:table-cell table:formula="of:=#REF!-[.D1091]" office:value-type="string" office:string-value="" calcext:value-type="error">
            <text:p>#REF!</text:p>
          </table:table-cell>
        </table:table-row>
        <table:table-row table:style-name="ro1" table:number-rows-repeated="104748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5:50:53.345567650</meta:creation-date>
    <dc:date>2026-05-17T15:51:01.797335669</dc:date>
    <meta:editing-duration>PT10S</meta:editing-duration>
    <meta:editing-cycles>1</meta:editing-cycles>
    <meta:document-statistic meta:table-count="1" meta:cell-count="5455" meta:object-count="0"/>
    <meta:generator>LibreOffice/24.2.7.2$Linux_X86_64 LibreOffice_project/420$Build-2</meta:generator>
  </office:meta>
</office:document-meta>
</file>