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4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4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509259259259259" calcext:value-type="float">
            <text:p>0,00000509259259259259</text:p>
          </table:table-cell>
          <table:table-cell table:formula="of:=[.D3]-[.D2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44" office:value-type="float" office:value="88" calcext:value-type="float">
            <text:p>8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01851851851852" calcext:value-type="float">
            <text:p>0,00001018518518518520</text:p>
          </table:table-cell>
          <table:table-cell table:formula="of:=[.D4]-[.D3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44" office:value-type="float" office:value="132" calcext:value-type="float">
            <text:p>13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52777777777778" calcext:value-type="float">
            <text:p>0,00001527777777777780</text:p>
          </table:table-cell>
          <table:table-cell table:formula="of:=[.D5]-[.D4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44" office:value-type="float" office:value="176" calcext:value-type="float">
            <text:p>17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03703703703704" calcext:value-type="float">
            <text:p>0,00002037037037037040</text:p>
          </table:table-cell>
          <table:table-cell table:formula="of:=[.D6]-[.D5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44" office:value-type="float" office:value="220" calcext:value-type="float">
            <text:p>22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25462962962963" calcext:value-type="float">
            <text:p>0,00002546296296296300</text:p>
          </table:table-cell>
          <table:table-cell table:formula="of:=[.D7]-[.D6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44" office:value-type="float" office:value="264" calcext:value-type="float">
            <text:p>26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05555555555556" calcext:value-type="float">
            <text:p>0,00003055555555555560</text:p>
          </table:table-cell>
          <table:table-cell table:formula="of:=[.D8]-[.D7]" office:value-type="float" office:value="0.0000050925925925926" calcext:value-type="float">
            <text:p>0,00000509259259259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44" office:value-type="float" office:value="308" calcext:value-type="float">
            <text:p>30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356481481481482" calcext:value-type="float">
            <text:p>0,00003564814814814820</text:p>
          </table:table-cell>
          <table:table-cell table:formula="of:=[.D9]-[.D8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44" office:value-type="float" office:value="352" calcext:value-type="float">
            <text:p>35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07407407407407" calcext:value-type="float">
            <text:p>0,00004074074074074070</text:p>
          </table:table-cell>
          <table:table-cell table:formula="of:=[.D10]-[.D9]" office:value-type="float" office:value="0.0000050925925925926" calcext:value-type="float">
            <text:p>0,000005092592592592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44" office:value-type="float" office:value="396" calcext:value-type="float">
            <text:p>39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458333333333333" calcext:value-type="float">
            <text:p>0,00004583333333333330</text:p>
          </table:table-cell>
          <table:table-cell table:formula="of:=[.D11]-[.D10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44" office:value-type="float" office:value="440" calcext:value-type="float">
            <text:p>4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509259259259259" calcext:value-type="float">
            <text:p>0,00005092592592592590</text:p>
          </table:table-cell>
          <table:table-cell table:formula="of:=[.D12]-[.D11]" office:value-type="float" office:value="0.0000050925925925926" calcext:value-type="float">
            <text:p>0,00000509259259259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44" office:value-type="float" office:value="484" calcext:value-type="float">
            <text:p>48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560185185185185" calcext:value-type="float">
            <text:p>0,00005601851851851850</text:p>
          </table:table-cell>
          <table:table-cell table:formula="of:=[.D13]-[.D12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44" office:value-type="float" office:value="528" calcext:value-type="float">
            <text:p>52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611111111111111" calcext:value-type="float">
            <text:p>0,00006111111111111110</text:p>
          </table:table-cell>
          <table:table-cell table:formula="of:=[.D14]-[.D13]" office:value-type="float" office:value="0.0000050925925925926" calcext:value-type="float">
            <text:p>0,00000509259259259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44" office:value-type="float" office:value="572" calcext:value-type="float">
            <text:p>57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662037037037037" calcext:value-type="float">
            <text:p>0,00006620370370370370</text:p>
          </table:table-cell>
          <table:table-cell table:formula="of:=[.D15]-[.D14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44" office:value-type="float" office:value="616" calcext:value-type="float">
            <text:p>61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712962962962963" calcext:value-type="float">
            <text:p>0,00007129629629629630</text:p>
          </table:table-cell>
          <table:table-cell table:formula="of:=[.D16]-[.D15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44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763888888888889" calcext:value-type="float">
            <text:p>0,00007638888888888890</text:p>
          </table:table-cell>
          <table:table-cell table:formula="of:=[.D17]-[.D16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44" office:value-type="float" office:value="704" calcext:value-type="float">
            <text:p>70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814814814814815" calcext:value-type="float">
            <text:p>0,00008148148148148150</text:p>
          </table:table-cell>
          <table:table-cell table:formula="of:=[.D18]-[.D17]" office:value-type="float" office:value="0.0000050925925925926" calcext:value-type="float">
            <text:p>0,000005092592592592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44" office:value-type="float" office:value="748" calcext:value-type="float">
            <text:p>74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865740740740741" calcext:value-type="float">
            <text:p>0,00008657407407407410</text:p>
          </table:table-cell>
          <table:table-cell table:formula="of:=[.D19]-[.D18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44" office:value-type="float" office:value="792" calcext:value-type="float">
            <text:p>79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916666666666667" calcext:value-type="float">
            <text:p>0,00009166666666666670</text:p>
          </table:table-cell>
          <table:table-cell table:formula="of:=[.D20]-[.D19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44" office:value-type="float" office:value="836" calcext:value-type="float">
            <text:p>83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967592592592593" calcext:value-type="float">
            <text:p>0,00009675925925925930</text:p>
          </table:table-cell>
          <table:table-cell table:formula="of:=[.D21]-[.D20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44" office:value-type="float" office:value="880" calcext:value-type="float">
            <text:p>8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01851851851852" calcext:value-type="float">
            <text:p>0,00010185185185185200</text:p>
          </table:table-cell>
          <table:table-cell table:formula="of:=[.D22]-[.D21]" office:value-type="float" office:value="0.0000050925925925926" calcext:value-type="float">
            <text:p>0,000005092592592592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44" office:value-type="float" office:value="924" calcext:value-type="float">
            <text:p>92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06944444444444" calcext:value-type="float">
            <text:p>0,00010694444444444400</text:p>
          </table:table-cell>
          <table:table-cell table:formula="of:=[.D23]-[.D22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44" office:value-type="float" office:value="968" calcext:value-type="float">
            <text:p>96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12037037037037" calcext:value-type="float">
            <text:p>0,00011203703703703700</text:p>
          </table:table-cell>
          <table:table-cell table:formula="of:=[.D24]-[.D23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44" office:value-type="float" office:value="1012" calcext:value-type="float">
            <text:p>101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1712962962963" calcext:value-type="float">
            <text:p>0,00011712962962963000</text:p>
          </table:table-cell>
          <table:table-cell table:formula="of:=[.D25]-[.D24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44" office:value-type="float" office:value="1056" calcext:value-type="float">
            <text:p>105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22222222222222" calcext:value-type="float">
            <text:p>0,00012222222222222200</text:p>
          </table:table-cell>
          <table:table-cell table:formula="of:=[.D26]-[.D25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44" office:value-type="float" office:value="1100" calcext:value-type="float">
            <text:p>11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27314814814815" calcext:value-type="float">
            <text:p>0,00012731481481481500</text:p>
          </table:table-cell>
          <table:table-cell table:formula="of:=[.D27]-[.D26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44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32407407407407" calcext:value-type="float">
            <text:p>0,00013240740740740700</text:p>
          </table:table-cell>
          <table:table-cell table:formula="of:=[.D28]-[.D27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44" office:value-type="float" office:value="1188" calcext:value-type="float">
            <text:p>118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375" calcext:value-type="float">
            <text:p>0,00013750000000000000</text:p>
          </table:table-cell>
          <table:table-cell table:formula="of:=[.D29]-[.D28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44" office:value-type="float" office:value="1232" calcext:value-type="float">
            <text:p>123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42592592592593" calcext:value-type="float">
            <text:p>0,00014259259259259300</text:p>
          </table:table-cell>
          <table:table-cell table:formula="of:=[.D30]-[.D29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44" office:value-type="float" office:value="1276" calcext:value-type="float">
            <text:p>127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47685185185185" calcext:value-type="float">
            <text:p>0,00014768518518518500</text:p>
          </table:table-cell>
          <table:table-cell table:formula="of:=[.D31]-[.D30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44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52777777777778" calcext:value-type="float">
            <text:p>0,00015277777777777800</text:p>
          </table:table-cell>
          <table:table-cell table:formula="of:=[.D32]-[.D31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44" office:value-type="float" office:value="1364" calcext:value-type="float">
            <text:p>136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5787037037037" calcext:value-type="float">
            <text:p>0,00015787037037037000</text:p>
          </table:table-cell>
          <table:table-cell table:formula="of:=[.D33]-[.D32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44" office:value-type="float" office:value="1408" calcext:value-type="float">
            <text:p>140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62962962962963" calcext:value-type="float">
            <text:p>0,00016296296296296300</text:p>
          </table:table-cell>
          <table:table-cell table:formula="of:=[.D34]-[.D33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44" office:value-type="float" office:value="1452" calcext:value-type="float">
            <text:p>145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68055555555556" calcext:value-type="float">
            <text:p>0,00016805555555555600</text:p>
          </table:table-cell>
          <table:table-cell table:formula="of:=[.D35]-[.D34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44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73148148148148" calcext:value-type="float">
            <text:p>0,00017314814814814800</text:p>
          </table:table-cell>
          <table:table-cell table:formula="of:=[.D36]-[.D35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44" office:value-type="float" office:value="1540" calcext:value-type="float">
            <text:p>154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78240740740741" calcext:value-type="float">
            <text:p>0,00017824074074074100</text:p>
          </table:table-cell>
          <table:table-cell table:formula="of:=[.D37]-[.D36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44" office:value-type="float" office:value="1584" calcext:value-type="float">
            <text:p>158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83333333333333" calcext:value-type="float">
            <text:p>0,00018333333333333300</text:p>
          </table:table-cell>
          <table:table-cell table:formula="of:=[.D38]-[.D37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44" office:value-type="float" office:value="1628" calcext:value-type="float">
            <text:p>162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88425925925926" calcext:value-type="float">
            <text:p>0,00018842592592592600</text:p>
          </table:table-cell>
          <table:table-cell table:formula="of:=[.D39]-[.D38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44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93518518518519" calcext:value-type="float">
            <text:p>0,00019351851851851900</text:p>
          </table:table-cell>
          <table:table-cell table:formula="of:=[.D40]-[.D39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44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98611111111111" calcext:value-type="float">
            <text:p>0,00019861111111111100</text:p>
          </table:table-cell>
          <table:table-cell table:formula="of:=[.D41]-[.D40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44" office:value-type="float" office:value="1760" calcext:value-type="float">
            <text:p>17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03703703703704" calcext:value-type="float">
            <text:p>0,00020370370370370400</text:p>
          </table:table-cell>
          <table:table-cell table:formula="of:=[.D42]-[.D41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44" office:value-type="float" office:value="1804" calcext:value-type="float">
            <text:p>180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08796296296296" calcext:value-type="float">
            <text:p>0,00020879629629629600</text:p>
          </table:table-cell>
          <table:table-cell table:formula="of:=[.D43]-[.D42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44" office:value-type="float" office:value="1848" calcext:value-type="float">
            <text:p>184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13888888888889" calcext:value-type="float">
            <text:p>0,00021388888888888900</text:p>
          </table:table-cell>
          <table:table-cell table:formula="of:=[.D44]-[.D43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44" office:value-type="float" office:value="1892" calcext:value-type="float">
            <text:p>189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18981481481481" calcext:value-type="float">
            <text:p>0,00021898148148148100</text:p>
          </table:table-cell>
          <table:table-cell table:formula="of:=[.D45]-[.D44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44" office:value-type="float" office:value="1936" calcext:value-type="float">
            <text:p>193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24074074074074" calcext:value-type="float">
            <text:p>0,00022407407407407400</text:p>
          </table:table-cell>
          <table:table-cell table:formula="of:=[.D46]-[.D45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44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29166666666667" calcext:value-type="float">
            <text:p>0,00022916666666666700</text:p>
          </table:table-cell>
          <table:table-cell table:formula="of:=[.D47]-[.D46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44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34259259259259" calcext:value-type="float">
            <text:p>0,00023425925925925900</text:p>
          </table:table-cell>
          <table:table-cell table:formula="of:=[.D48]-[.D47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44" office:value-type="float" office:value="2068" calcext:value-type="float">
            <text:p>206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39351851851852" calcext:value-type="float">
            <text:p>0,00023935185185185200</text:p>
          </table:table-cell>
          <table:table-cell table:formula="of:=[.D49]-[.D48]" office:value-type="float" office:value="0.00000509259259259259" calcext:value-type="float">
            <text:p>0,000005092592592592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44" office:value-type="float" office:value="2112" calcext:value-type="float">
            <text:p>211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44444444444444" calcext:value-type="float">
            <text:p>0,00024444444444444400</text:p>
          </table:table-cell>
          <table:table-cell table:formula="of:=[.D50]-[.D49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44" office:value-type="float" office:value="2156" calcext:value-type="float">
            <text:p>215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49537037037037" calcext:value-type="float">
            <text:p>0,00024953703703703700</text:p>
          </table:table-cell>
          <table:table-cell table:formula="of:=[.D51]-[.D5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44" office:value-type="float" office:value="2200" calcext:value-type="float">
            <text:p>22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25462962962963" calcext:value-type="float">
            <text:p>0,00025462962962963000</text:p>
          </table:table-cell>
          <table:table-cell table:formula="of:=[.D52]-[.D51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44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59722222222222" calcext:value-type="float">
            <text:p>0,00025972222222222200</text:p>
          </table:table-cell>
          <table:table-cell table:formula="of:=[.D53]-[.D52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44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64814814814815" calcext:value-type="float">
            <text:p>0,00026481481481481500</text:p>
          </table:table-cell>
          <table:table-cell table:formula="of:=[.D54]-[.D5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44" office:value-type="float" office:value="2332" calcext:value-type="float">
            <text:p>233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69907407407407" calcext:value-type="float">
            <text:p>0,00026990740740740700</text:p>
          </table:table-cell>
          <table:table-cell table:formula="of:=[.D55]-[.D54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44" office:value-type="float" office:value="2376" calcext:value-type="float">
            <text:p>237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75" calcext:value-type="float">
            <text:p>0,00027500000000000000</text:p>
          </table:table-cell>
          <table:table-cell table:formula="of:=[.D56]-[.D5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44" office:value-type="float" office:value="2420" calcext:value-type="float">
            <text:p>242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80092592592593" calcext:value-type="float">
            <text:p>0,00028009259259259300</text:p>
          </table:table-cell>
          <table:table-cell table:formula="of:=[.D57]-[.D56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44" office:value-type="float" office:value="2464" calcext:value-type="float">
            <text:p>246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85185185185185" calcext:value-type="float">
            <text:p>0,00028518518518518500</text:p>
          </table:table-cell>
          <table:table-cell table:formula="of:=[.D58]-[.D5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44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90277777777778" calcext:value-type="float">
            <text:p>0,00029027777777777800</text:p>
          </table:table-cell>
          <table:table-cell table:formula="of:=[.D59]-[.D58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44" office:value-type="float" office:value="2552" calcext:value-type="float">
            <text:p>255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9537037037037" calcext:value-type="float">
            <text:p>0,00029537037037037000</text:p>
          </table:table-cell>
          <table:table-cell table:formula="of:=[.D60]-[.D59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44" office:value-type="float" office:value="2596" calcext:value-type="float">
            <text:p>259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00462962962963" calcext:value-type="float">
            <text:p>0,00030046296296296300</text:p>
          </table:table-cell>
          <table:table-cell table:formula="of:=[.D61]-[.D6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44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05555555555556" calcext:value-type="float">
            <text:p>0,00030555555555555600</text:p>
          </table:table-cell>
          <table:table-cell table:formula="of:=[.D62]-[.D61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44" office:value-type="float" office:value="2684" calcext:value-type="float">
            <text:p>268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10648148148148" calcext:value-type="float">
            <text:p>0,00031064814814814800</text:p>
          </table:table-cell>
          <table:table-cell table:formula="of:=[.D63]-[.D6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44" office:value-type="float" office:value="2728" calcext:value-type="float">
            <text:p>272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15740740740741" calcext:value-type="float">
            <text:p>0,00031574074074074100</text:p>
          </table:table-cell>
          <table:table-cell table:formula="of:=[.D64]-[.D63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44" office:value-type="float" office:value="2772" calcext:value-type="float">
            <text:p>277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20833333333333" calcext:value-type="float">
            <text:p>0,00032083333333333300</text:p>
          </table:table-cell>
          <table:table-cell table:formula="of:=[.D65]-[.D6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44" office:value-type="float" office:value="2816" calcext:value-type="float">
            <text:p>281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25925925925926" calcext:value-type="float">
            <text:p>0,00032592592592592600</text:p>
          </table:table-cell>
          <table:table-cell table:formula="of:=[.D66]-[.D65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44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31018518518519" calcext:value-type="float">
            <text:p>0,00033101851851851900</text:p>
          </table:table-cell>
          <table:table-cell table:formula="of:=[.D67]-[.D66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44" office:value-type="float" office:value="2904" calcext:value-type="float">
            <text:p>290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36111111111111" calcext:value-type="float">
            <text:p>0,00033611111111111100</text:p>
          </table:table-cell>
          <table:table-cell table:formula="of:=[.D68]-[.D6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44" office:value-type="float" office:value="2948" calcext:value-type="float">
            <text:p>294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341203703703704" calcext:value-type="float">
            <text:p>0,00034120370370370400</text:p>
          </table:table-cell>
          <table:table-cell table:formula="of:=[.D69]-[.D68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44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346296296296296" calcext:value-type="float">
            <text:p>0,00034629629629629600</text:p>
          </table:table-cell>
          <table:table-cell table:formula="of:=[.D70]-[.D6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44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351388888888889" calcext:value-type="float">
            <text:p>0,00035138888888888900</text:p>
          </table:table-cell>
          <table:table-cell table:formula="of:=[.D71]-[.D70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44" office:value-type="float" office:value="3080" calcext:value-type="float">
            <text:p>30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356481481481482" calcext:value-type="float">
            <text:p>0,00035648148148148200</text:p>
          </table:table-cell>
          <table:table-cell table:formula="of:=[.D72]-[.D7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44" office:value-type="float" office:value="3124" calcext:value-type="float">
            <text:p>312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361574074074074" calcext:value-type="float">
            <text:p>0,00036157407407407400</text:p>
          </table:table-cell>
          <table:table-cell table:formula="of:=[.D73]-[.D72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44" office:value-type="float" office:value="3168" calcext:value-type="float">
            <text:p>316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366666666666667" calcext:value-type="float">
            <text:p>0,00036666666666666700</text:p>
          </table:table-cell>
          <table:table-cell table:formula="of:=[.D74]-[.D7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44" office:value-type="float" office:value="3212" calcext:value-type="float">
            <text:p>321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371759259259259" calcext:value-type="float">
            <text:p>0,00037175925925925900</text:p>
          </table:table-cell>
          <table:table-cell table:formula="of:=[.D75]-[.D74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44" office:value-type="float" office:value="3256" calcext:value-type="float">
            <text:p>325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376851851851852" calcext:value-type="float">
            <text:p>0,00037685185185185200</text:p>
          </table:table-cell>
          <table:table-cell table:formula="of:=[.D76]-[.D75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44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381944444444444" calcext:value-type="float">
            <text:p>0,00038194444444444400</text:p>
          </table:table-cell>
          <table:table-cell table:formula="of:=[.D77]-[.D7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44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387037037037037" calcext:value-type="float">
            <text:p>0,00038703703703703700</text:p>
          </table:table-cell>
          <table:table-cell table:formula="of:=[.D78]-[.D77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44" office:value-type="float" office:value="3388" calcext:value-type="float">
            <text:p>338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9212962962963" calcext:value-type="float">
            <text:p>0,00039212962962963000</text:p>
          </table:table-cell>
          <table:table-cell table:formula="of:=[.D79]-[.D7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44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97222222222222" calcext:value-type="float">
            <text:p>0,00039722222222222200</text:p>
          </table:table-cell>
          <table:table-cell table:formula="of:=[.D80]-[.D79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44" office:value-type="float" office:value="3476" calcext:value-type="float">
            <text:p>347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02314814814815" calcext:value-type="float">
            <text:p>0,00040231481481481500</text:p>
          </table:table-cell>
          <table:table-cell table:formula="of:=[.D81]-[.D8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44" office:value-type="float" office:value="3520" calcext:value-type="float">
            <text:p>35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07407407407407" calcext:value-type="float">
            <text:p>0,00040740740740740700</text:p>
          </table:table-cell>
          <table:table-cell table:formula="of:=[.D82]-[.D81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44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125" calcext:value-type="float">
            <text:p>0,00041250000000000000</text:p>
          </table:table-cell>
          <table:table-cell table:formula="of:=[.D83]-[.D82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44" office:value-type="float" office:value="3608" calcext:value-type="float">
            <text:p>360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17592592592593" calcext:value-type="float">
            <text:p>0,00041759259259259300</text:p>
          </table:table-cell>
          <table:table-cell table:formula="of:=[.D84]-[.D8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44" office:value-type="float" office:value="3652" calcext:value-type="float">
            <text:p>365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22685185185185" calcext:value-type="float">
            <text:p>0,00042268518518518500</text:p>
          </table:table-cell>
          <table:table-cell table:formula="of:=[.D85]-[.D84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44" office:value-type="float" office:value="3696" calcext:value-type="float">
            <text:p>369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427777777777778" calcext:value-type="float">
            <text:p>0,00042777777777777800</text:p>
          </table:table-cell>
          <table:table-cell table:formula="of:=[.D86]-[.D8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44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43287037037037" calcext:value-type="float">
            <text:p>0,00043287037037037000</text:p>
          </table:table-cell>
          <table:table-cell table:formula="of:=[.D87]-[.D86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44" office:value-type="float" office:value="3784" calcext:value-type="float">
            <text:p>378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437962962962963" calcext:value-type="float">
            <text:p>0,00043796296296296300</text:p>
          </table:table-cell>
          <table:table-cell table:formula="of:=[.D88]-[.D8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44" office:value-type="float" office:value="3828" calcext:value-type="float">
            <text:p>382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443055555555556" calcext:value-type="float">
            <text:p>0,00044305555555555600</text:p>
          </table:table-cell>
          <table:table-cell table:formula="of:=[.D89]-[.D88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44" office:value-type="float" office:value="3872" calcext:value-type="float">
            <text:p>387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448148148148148" calcext:value-type="float">
            <text:p>0,00044814814814814800</text:p>
          </table:table-cell>
          <table:table-cell table:formula="of:=[.D90]-[.D89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44" office:value-type="float" office:value="3916" calcext:value-type="float">
            <text:p>391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453240740740741" calcext:value-type="float">
            <text:p>0,00045324074074074100</text:p>
          </table:table-cell>
          <table:table-cell table:formula="of:=[.D91]-[.D9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44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458333333333333" calcext:value-type="float">
            <text:p>0,00045833333333333300</text:p>
          </table:table-cell>
          <table:table-cell table:formula="of:=[.D92]-[.D91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44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463425925925926" calcext:value-type="float">
            <text:p>0,00046342592592592600</text:p>
          </table:table-cell>
          <table:table-cell table:formula="of:=[.D93]-[.D9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44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468518518518519" calcext:value-type="float">
            <text:p>0,00046851851851851900</text:p>
          </table:table-cell>
          <table:table-cell table:formula="of:=[.D94]-[.D93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44" office:value-type="float" office:value="4092" calcext:value-type="float">
            <text:p>409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473611111111111" calcext:value-type="float">
            <text:p>0,00047361111111111100</text:p>
          </table:table-cell>
          <table:table-cell table:formula="of:=[.D95]-[.D9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44" office:value-type="float" office:value="4136" calcext:value-type="float">
            <text:p>413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478703703703704" calcext:value-type="float">
            <text:p>0,00047870370370370400</text:p>
          </table:table-cell>
          <table:table-cell table:formula="of:=[.D96]-[.D95]" office:value-type="float" office:value="0.00000509259259259262" calcext:value-type="float">
            <text:p>0,000005092592592592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44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483796296296296" calcext:value-type="float">
            <text:p>0,00048379629629629600</text:p>
          </table:table-cell>
          <table:table-cell table:formula="of:=[.D97]-[.D9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44" office:value-type="float" office:value="4224" calcext:value-type="float">
            <text:p>422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488888888888889" calcext:value-type="float">
            <text:p>0,00048888888888888900</text:p>
          </table:table-cell>
          <table:table-cell table:formula="of:=[.D98]-[.D97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44" office:value-type="float" office:value="4268" calcext:value-type="float">
            <text:p>426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493981481481482" calcext:value-type="float">
            <text:p>0,00049398148148148200</text:p>
          </table:table-cell>
          <table:table-cell table:formula="of:=[.D99]-[.D9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44" office:value-type="float" office:value="4312" calcext:value-type="float">
            <text:p>431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499074074074074" calcext:value-type="float">
            <text:p>0,00049907407407407400</text:p>
          </table:table-cell>
          <table:table-cell table:formula="of:=[.D100]-[.D9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44" office:value-type="float" office:value="4356" calcext:value-type="float">
            <text:p>435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04166666666667" calcext:value-type="float">
            <text:p>0,00050416666666666700</text:p>
          </table:table-cell>
          <table:table-cell table:formula="of:=[.D101]-[.D10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44" office:value-type="float" office:value="4400" calcext:value-type="float">
            <text:p>4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509259259259259" calcext:value-type="float">
            <text:p>0,00050925925925925900</text:p>
          </table:table-cell>
          <table:table-cell table:formula="of:=[.D102]-[.D101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44" office:value-type="float" office:value="4444" calcext:value-type="float">
            <text:p>444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514351851851852" calcext:value-type="float">
            <text:p>0,00051435185185185200</text:p>
          </table:table-cell>
          <table:table-cell table:formula="of:=[.D103]-[.D10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44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519444444444444" calcext:value-type="float">
            <text:p>0,00051944444444444400</text:p>
          </table:table-cell>
          <table:table-cell table:formula="of:=[.D104]-[.D10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44" office:value-type="float" office:value="4532" calcext:value-type="float">
            <text:p>453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524537037037037" calcext:value-type="float">
            <text:p>0,00052453703703703700</text:p>
          </table:table-cell>
          <table:table-cell table:formula="of:=[.D105]-[.D104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44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52962962962963" calcext:value-type="float">
            <text:p>0,00052962962962963000</text:p>
          </table:table-cell>
          <table:table-cell table:formula="of:=[.D106]-[.D10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44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534722222222222" calcext:value-type="float">
            <text:p>0,00053472222222222200</text:p>
          </table:table-cell>
          <table:table-cell table:formula="of:=[.D107]-[.D10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44" office:value-type="float" office:value="4664" calcext:value-type="float">
            <text:p>466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539814814814815" calcext:value-type="float">
            <text:p>0,00053981481481481500</text:p>
          </table:table-cell>
          <table:table-cell table:formula="of:=[.D108]-[.D10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44" office:value-type="float" office:value="4708" calcext:value-type="float">
            <text:p>470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544907407407407" calcext:value-type="float">
            <text:p>0,00054490740740740700</text:p>
          </table:table-cell>
          <table:table-cell table:formula="of:=[.D109]-[.D108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44" office:value-type="float" office:value="4752" calcext:value-type="float">
            <text:p>475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55" calcext:value-type="float">
            <text:p>0,00055000000000000000</text:p>
          </table:table-cell>
          <table:table-cell table:formula="of:=[.D110]-[.D10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44" office:value-type="float" office:value="4796" calcext:value-type="float">
            <text:p>479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555092592592593" calcext:value-type="float">
            <text:p>0,00055509259259259300</text:p>
          </table:table-cell>
          <table:table-cell table:formula="of:=[.D111]-[.D11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44" office:value-type="float" office:value="4840" calcext:value-type="float">
            <text:p>48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560185185185185" calcext:value-type="float">
            <text:p>0,00056018518518518500</text:p>
          </table:table-cell>
          <table:table-cell table:formula="of:=[.D112]-[.D111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44" office:value-type="float" office:value="4884" calcext:value-type="float">
            <text:p>488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565277777777778" calcext:value-type="float">
            <text:p>0,00056527777777777800</text:p>
          </table:table-cell>
          <table:table-cell table:formula="of:=[.D113]-[.D11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44" office:value-type="float" office:value="4928" calcext:value-type="float">
            <text:p>492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57037037037037" calcext:value-type="float">
            <text:p>0,00057037037037037000</text:p>
          </table:table-cell>
          <table:table-cell table:formula="of:=[.D114]-[.D11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44" office:value-type="float" office:value="4972" calcext:value-type="float">
            <text:p>497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575462962962963" calcext:value-type="float">
            <text:p>0,00057546296296296300</text:p>
          </table:table-cell>
          <table:table-cell table:formula="of:=[.D115]-[.D11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44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580555555555556" calcext:value-type="float">
            <text:p>0,00058055555555555600</text:p>
          </table:table-cell>
          <table:table-cell table:formula="of:=[.D116]-[.D115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44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585648148148148" calcext:value-type="float">
            <text:p>0,00058564814814814800</text:p>
          </table:table-cell>
          <table:table-cell table:formula="of:=[.D117]-[.D11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44" office:value-type="float" office:value="5104" calcext:value-type="float">
            <text:p>510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590740740740741" calcext:value-type="float">
            <text:p>0,00059074074074074100</text:p>
          </table:table-cell>
          <table:table-cell table:formula="of:=[.D118]-[.D11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44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595833333333333" calcext:value-type="float">
            <text:p>0,00059583333333333300</text:p>
          </table:table-cell>
          <table:table-cell table:formula="of:=[.D119]-[.D118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44" office:value-type="float" office:value="5192" calcext:value-type="float">
            <text:p>519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600925925925926" calcext:value-type="float">
            <text:p>0,00060092592592592600</text:p>
          </table:table-cell>
          <table:table-cell table:formula="of:=[.D120]-[.D11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44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606018518518519" calcext:value-type="float">
            <text:p>0,00060601851851851900</text:p>
          </table:table-cell>
          <table:table-cell table:formula="of:=[.D121]-[.D12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44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611111111111111" calcext:value-type="float">
            <text:p>0,00061111111111111100</text:p>
          </table:table-cell>
          <table:table-cell table:formula="of:=[.D122]-[.D12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44" office:value-type="float" office:value="5324" calcext:value-type="float">
            <text:p>532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616203703703704" calcext:value-type="float">
            <text:p>0,00061620370370370400</text:p>
          </table:table-cell>
          <table:table-cell table:formula="of:=[.D123]-[.D122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44" office:value-type="float" office:value="5368" calcext:value-type="float">
            <text:p>536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621296296296296" calcext:value-type="float">
            <text:p>0,00062129629629629600</text:p>
          </table:table-cell>
          <table:table-cell table:formula="of:=[.D124]-[.D12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44" office:value-type="float" office:value="5412" calcext:value-type="float">
            <text:p>541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626388888888889" calcext:value-type="float">
            <text:p>0,00062638888888888900</text:p>
          </table:table-cell>
          <table:table-cell table:formula="of:=[.D125]-[.D12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44" office:value-type="float" office:value="5456" calcext:value-type="float">
            <text:p>545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631481481481482" calcext:value-type="float">
            <text:p>0,00063148148148148200</text:p>
          </table:table-cell>
          <table:table-cell table:formula="of:=[.D126]-[.D125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44" office:value-type="float" office:value="5500" calcext:value-type="float">
            <text:p>5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636574074074074" calcext:value-type="float">
            <text:p>0,00063657407407407400</text:p>
          </table:table-cell>
          <table:table-cell table:formula="of:=[.D127]-[.D12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44" office:value-type="float" office:value="5544" calcext:value-type="float">
            <text:p>554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641666666666667" calcext:value-type="float">
            <text:p>0,00064166666666666700</text:p>
          </table:table-cell>
          <table:table-cell table:formula="of:=[.D128]-[.D12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44" office:value-type="float" office:value="5588" calcext:value-type="float">
            <text:p>558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646759259259259" calcext:value-type="float">
            <text:p>0,00064675925925925900</text:p>
          </table:table-cell>
          <table:table-cell table:formula="of:=[.D129]-[.D12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44" office:value-type="float" office:value="5632" calcext:value-type="float">
            <text:p>563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651851851851852" calcext:value-type="float">
            <text:p>0,00065185185185185200</text:p>
          </table:table-cell>
          <table:table-cell table:formula="of:=[.D130]-[.D129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44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656944444444445" calcext:value-type="float">
            <text:p>0,00065694444444444500</text:p>
          </table:table-cell>
          <table:table-cell table:formula="of:=[.D131]-[.D13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44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662037037037037" calcext:value-type="float">
            <text:p>0,00066203703703703700</text:p>
          </table:table-cell>
          <table:table-cell table:formula="of:=[.D132]-[.D13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44" office:value-type="float" office:value="5764" calcext:value-type="float">
            <text:p>576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66712962962963" calcext:value-type="float">
            <text:p>0,00066712962962963000</text:p>
          </table:table-cell>
          <table:table-cell table:formula="of:=[.D133]-[.D132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44" office:value-type="float" office:value="5808" calcext:value-type="float">
            <text:p>580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672222222222222" calcext:value-type="float">
            <text:p>0,00067222222222222200</text:p>
          </table:table-cell>
          <table:table-cell table:formula="of:=[.D134]-[.D13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44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677314814814815" calcext:value-type="float">
            <text:p>0,00067731481481481500</text:p>
          </table:table-cell>
          <table:table-cell table:formula="of:=[.D135]-[.D13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44" office:value-type="float" office:value="5896" calcext:value-type="float">
            <text:p>589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682407407407407" calcext:value-type="float">
            <text:p>0,00068240740740740700</text:p>
          </table:table-cell>
          <table:table-cell table:formula="of:=[.D136]-[.D13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44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6875" calcext:value-type="float">
            <text:p>0,00068750000000000000</text:p>
          </table:table-cell>
          <table:table-cell table:formula="of:=[.D137]-[.D136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44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692592592592593" calcext:value-type="float">
            <text:p>0,00069259259259259300</text:p>
          </table:table-cell>
          <table:table-cell table:formula="of:=[.D138]-[.D13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44" office:value-type="float" office:value="6028" calcext:value-type="float">
            <text:p>602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697685185185185" calcext:value-type="float">
            <text:p>0,00069768518518518500</text:p>
          </table:table-cell>
          <table:table-cell table:formula="of:=[.D139]-[.D13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44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702777777777778" calcext:value-type="float">
            <text:p>0,00070277777777777800</text:p>
          </table:table-cell>
          <table:table-cell table:formula="of:=[.D140]-[.D139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44" office:value-type="float" office:value="6116" calcext:value-type="float">
            <text:p>611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70787037037037" calcext:value-type="float">
            <text:p>0,00070787037037037000</text:p>
          </table:table-cell>
          <table:table-cell table:formula="of:=[.D141]-[.D14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44" office:value-type="float" office:value="6160" calcext:value-type="float">
            <text:p>61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712962962962963" calcext:value-type="float">
            <text:p>0,00071296296296296300</text:p>
          </table:table-cell>
          <table:table-cell table:formula="of:=[.D142]-[.D14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44" office:value-type="float" office:value="6204" calcext:value-type="float">
            <text:p>620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718055555555556" calcext:value-type="float">
            <text:p>0,00071805555555555600</text:p>
          </table:table-cell>
          <table:table-cell table:formula="of:=[.D143]-[.D14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44" office:value-type="float" office:value="6248" calcext:value-type="float">
            <text:p>624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723148148148148" calcext:value-type="float">
            <text:p>0,00072314814814814800</text:p>
          </table:table-cell>
          <table:table-cell table:formula="of:=[.D144]-[.D143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44" office:value-type="float" office:value="6292" calcext:value-type="float">
            <text:p>629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728240740740741" calcext:value-type="float">
            <text:p>0,00072824074074074100</text:p>
          </table:table-cell>
          <table:table-cell table:formula="of:=[.D145]-[.D14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44" office:value-type="float" office:value="6336" calcext:value-type="float">
            <text:p>633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733333333333333" calcext:value-type="float">
            <text:p>0,00073333333333333300</text:p>
          </table:table-cell>
          <table:table-cell table:formula="of:=[.D146]-[.D14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44" office:value-type="float" office:value="6380" calcext:value-type="float">
            <text:p>638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738425925925926" calcext:value-type="float">
            <text:p>0,00073842592592592600</text:p>
          </table:table-cell>
          <table:table-cell table:formula="of:=[.D147]-[.D14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44" office:value-type="float" office:value="6424" calcext:value-type="float">
            <text:p>642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743518518518519" calcext:value-type="float">
            <text:p>0,00074351851851851800</text:p>
          </table:table-cell>
          <table:table-cell table:formula="of:=[.D148]-[.D147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44" office:value-type="float" office:value="6468" calcext:value-type="float">
            <text:p>646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748611111111111" calcext:value-type="float">
            <text:p>0,00074861111111111100</text:p>
          </table:table-cell>
          <table:table-cell table:formula="of:=[.D149]-[.D14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44" office:value-type="float" office:value="6512" calcext:value-type="float">
            <text:p>651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753703703703704" calcext:value-type="float">
            <text:p>0,00075370370370370400</text:p>
          </table:table-cell>
          <table:table-cell table:formula="of:=[.D150]-[.D14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44" office:value-type="float" office:value="6556" calcext:value-type="float">
            <text:p>655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758796296296296" calcext:value-type="float">
            <text:p>0,00075879629629629600</text:p>
          </table:table-cell>
          <table:table-cell table:formula="of:=[.D151]-[.D150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44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763888888888889" calcext:value-type="float">
            <text:p>0,00076388888888888900</text:p>
          </table:table-cell>
          <table:table-cell table:formula="of:=[.D152]-[.D15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44" office:value-type="float" office:value="6644" calcext:value-type="float">
            <text:p>664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768981481481482" calcext:value-type="float">
            <text:p>0,00076898148148148200</text:p>
          </table:table-cell>
          <table:table-cell table:formula="of:=[.D153]-[.D15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44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774074074074074" calcext:value-type="float">
            <text:p>0,00077407407407407400</text:p>
          </table:table-cell>
          <table:table-cell table:formula="of:=[.D154]-[.D15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44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779166666666667" calcext:value-type="float">
            <text:p>0,00077916666666666700</text:p>
          </table:table-cell>
          <table:table-cell table:formula="of:=[.D155]-[.D154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44" office:value-type="float" office:value="6776" calcext:value-type="float">
            <text:p>677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784259259259259" calcext:value-type="float">
            <text:p>0,00078425925925925900</text:p>
          </table:table-cell>
          <table:table-cell table:formula="of:=[.D156]-[.D15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44" office:value-type="float" office:value="6820" calcext:value-type="float">
            <text:p>682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789351851851852" calcext:value-type="float">
            <text:p>0,00078935185185185200</text:p>
          </table:table-cell>
          <table:table-cell table:formula="of:=[.D157]-[.D15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44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794444444444444" calcext:value-type="float">
            <text:p>0,00079444444444444500</text:p>
          </table:table-cell>
          <table:table-cell table:formula="of:=[.D158]-[.D157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44" office:value-type="float" office:value="6908" calcext:value-type="float">
            <text:p>690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799537037037037" calcext:value-type="float">
            <text:p>0,00079953703703703700</text:p>
          </table:table-cell>
          <table:table-cell table:formula="of:=[.D159]-[.D15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44" office:value-type="float" office:value="6952" calcext:value-type="float">
            <text:p>695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80462962962963" calcext:value-type="float">
            <text:p>0,00080462962962963000</text:p>
          </table:table-cell>
          <table:table-cell table:formula="of:=[.D160]-[.D15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44" office:value-type="float" office:value="6996" calcext:value-type="float">
            <text:p>699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809722222222222" calcext:value-type="float">
            <text:p>0,00080972222222222200</text:p>
          </table:table-cell>
          <table:table-cell table:formula="of:=[.D161]-[.D16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44" office:value-type="float" office:value="7040" calcext:value-type="float">
            <text:p>70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814814814814815" calcext:value-type="float">
            <text:p>0,00081481481481481500</text:p>
          </table:table-cell>
          <table:table-cell table:formula="of:=[.D162]-[.D161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44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819907407407407" calcext:value-type="float">
            <text:p>0,00081990740740740700</text:p>
          </table:table-cell>
          <table:table-cell table:formula="of:=[.D163]-[.D16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44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825" calcext:value-type="float">
            <text:p>0,00082500000000000000</text:p>
          </table:table-cell>
          <table:table-cell table:formula="of:=[.D164]-[.D16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44" office:value-type="float" office:value="7172" calcext:value-type="float">
            <text:p>717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830092592592593" calcext:value-type="float">
            <text:p>0,00083009259259259200</text:p>
          </table:table-cell>
          <table:table-cell table:formula="of:=[.D165]-[.D164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44" office:value-type="float" office:value="7216" calcext:value-type="float">
            <text:p>721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835185185185185" calcext:value-type="float">
            <text:p>0,00083518518518518500</text:p>
          </table:table-cell>
          <table:table-cell table:formula="of:=[.D166]-[.D16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44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840277777777778" calcext:value-type="float">
            <text:p>0,00084027777777777800</text:p>
          </table:table-cell>
          <table:table-cell table:formula="of:=[.D167]-[.D16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44" office:value-type="float" office:value="7304" calcext:value-type="float">
            <text:p>730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84537037037037" calcext:value-type="float">
            <text:p>0,00084537037037037000</text:p>
          </table:table-cell>
          <table:table-cell table:formula="of:=[.D168]-[.D16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44" office:value-type="float" office:value="7348" calcext:value-type="float">
            <text:p>734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850462962962963" calcext:value-type="float">
            <text:p>0,00085046296296296300</text:p>
          </table:table-cell>
          <table:table-cell table:formula="of:=[.D169]-[.D168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44" office:value-type="float" office:value="7392" calcext:value-type="float">
            <text:p>739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855555555555556" calcext:value-type="float">
            <text:p>0,00085555555555555600</text:p>
          </table:table-cell>
          <table:table-cell table:formula="of:=[.D170]-[.D16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44" office:value-type="float" office:value="7436" calcext:value-type="float">
            <text:p>743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860648148148148" calcext:value-type="float">
            <text:p>0,00086064814814814800</text:p>
          </table:table-cell>
          <table:table-cell table:formula="of:=[.D171]-[.D17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44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865740740740741" calcext:value-type="float">
            <text:p>0,00086574074074074100</text:p>
          </table:table-cell>
          <table:table-cell table:formula="of:=[.D172]-[.D171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44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870833333333333" calcext:value-type="float">
            <text:p>0,00087083333333333400</text:p>
          </table:table-cell>
          <table:table-cell table:formula="of:=[.D173]-[.D17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44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875925925925926" calcext:value-type="float">
            <text:p>0,00087592592592592600</text:p>
          </table:table-cell>
          <table:table-cell table:formula="of:=[.D174]-[.D17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44" office:value-type="float" office:value="7612" calcext:value-type="float">
            <text:p>761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881018518518519" calcext:value-type="float">
            <text:p>0,00088101851851851900</text:p>
          </table:table-cell>
          <table:table-cell table:formula="of:=[.D175]-[.D17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44" office:value-type="float" office:value="7656" calcext:value-type="float">
            <text:p>765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886111111111111" calcext:value-type="float">
            <text:p>0,00088611111111111100</text:p>
          </table:table-cell>
          <table:table-cell table:formula="of:=[.D176]-[.D175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44" office:value-type="float" office:value="7700" calcext:value-type="float">
            <text:p>77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891203703703704" calcext:value-type="float">
            <text:p>0,00089120370370370400</text:p>
          </table:table-cell>
          <table:table-cell table:formula="of:=[.D177]-[.D17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44" office:value-type="float" office:value="7744" calcext:value-type="float">
            <text:p>774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896296296296296" calcext:value-type="float">
            <text:p>0,00089629629629629600</text:p>
          </table:table-cell>
          <table:table-cell table:formula="of:=[.D178]-[.D17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44" office:value-type="float" office:value="7788" calcext:value-type="float">
            <text:p>778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901388888888889" calcext:value-type="float">
            <text:p>0,00090138888888888900</text:p>
          </table:table-cell>
          <table:table-cell table:formula="of:=[.D179]-[.D178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44" office:value-type="float" office:value="7832" calcext:value-type="float">
            <text:p>783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906481481481482" calcext:value-type="float">
            <text:p>0,00090648148148148200</text:p>
          </table:table-cell>
          <table:table-cell table:formula="of:=[.D180]-[.D17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44" office:value-type="float" office:value="7876" calcext:value-type="float">
            <text:p>787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911574074074074" calcext:value-type="float">
            <text:p>0,00091157407407407400</text:p>
          </table:table-cell>
          <table:table-cell table:formula="of:=[.D181]-[.D18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44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916666666666667" calcext:value-type="float">
            <text:p>0,00091666666666666700</text:p>
          </table:table-cell>
          <table:table-cell table:formula="of:=[.D182]-[.D18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44" office:value-type="float" office:value="7964" calcext:value-type="float">
            <text:p>796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921759259259259" calcext:value-type="float">
            <text:p>0,00092175925925925900</text:p>
          </table:table-cell>
          <table:table-cell table:formula="of:=[.D183]-[.D182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44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926851851851852" calcext:value-type="float">
            <text:p>0,00092685185185185200</text:p>
          </table:table-cell>
          <table:table-cell table:formula="of:=[.D184]-[.D18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44" office:value-type="float" office:value="8052" calcext:value-type="float">
            <text:p>805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931944444444444" calcext:value-type="float">
            <text:p>0,00093194444444444400</text:p>
          </table:table-cell>
          <table:table-cell table:formula="of:=[.D185]-[.D18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44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937037037037037" calcext:value-type="float">
            <text:p>0,00093703703703703700</text:p>
          </table:table-cell>
          <table:table-cell table:formula="of:=[.D186]-[.D185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44" office:value-type="float" office:value="8140" calcext:value-type="float">
            <text:p>814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94212962962963" calcext:value-type="float">
            <text:p>0,00094212962962963000</text:p>
          </table:table-cell>
          <table:table-cell table:formula="of:=[.D187]-[.D18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44" office:value-type="float" office:value="8184" calcext:value-type="float">
            <text:p>818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947222222222222" calcext:value-type="float">
            <text:p>0,00094722222222222200</text:p>
          </table:table-cell>
          <table:table-cell table:formula="of:=[.D188]-[.D18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44" office:value-type="float" office:value="8228" calcext:value-type="float">
            <text:p>822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952314814814815" calcext:value-type="float">
            <text:p>0,00095231481481481500</text:p>
          </table:table-cell>
          <table:table-cell table:formula="of:=[.D189]-[.D18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44" office:value-type="float" office:value="8272" calcext:value-type="float">
            <text:p>827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957407407407407" calcext:value-type="float">
            <text:p>0,00095740740740740700</text:p>
          </table:table-cell>
          <table:table-cell table:formula="of:=[.D190]-[.D189]" office:value-type="float" office:value="0.00000509259259259267" calcext:value-type="float">
            <text:p>0,000005092592592592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44" office:value-type="float" office:value="8316" calcext:value-type="float">
            <text:p>831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9625" calcext:value-type="float">
            <text:p>0,00096250000000000000</text:p>
          </table:table-cell>
          <table:table-cell table:formula="of:=[.D191]-[.D19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44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967592592592593" calcext:value-type="float">
            <text:p>0,00096759259259259300</text:p>
          </table:table-cell>
          <table:table-cell table:formula="of:=[.D192]-[.D19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44" office:value-type="float" office:value="8404" calcext:value-type="float">
            <text:p>840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972685185185185" calcext:value-type="float">
            <text:p>0,00097268518518518500</text:p>
          </table:table-cell>
          <table:table-cell table:formula="of:=[.D193]-[.D19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44" office:value-type="float" office:value="8448" calcext:value-type="float">
            <text:p>844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977777777777778" calcext:value-type="float">
            <text:p>0,00097777777777777800</text:p>
          </table:table-cell>
          <table:table-cell table:formula="of:=[.D194]-[.D19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44" office:value-type="float" office:value="8492" calcext:value-type="float">
            <text:p>849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98287037037037" calcext:value-type="float">
            <text:p>0,00098287037037037000</text:p>
          </table:table-cell>
          <table:table-cell table:formula="of:=[.D195]-[.D194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44" office:value-type="float" office:value="8536" calcext:value-type="float">
            <text:p>853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987962962962963" calcext:value-type="float">
            <text:p>0,00098796296296296300</text:p>
          </table:table-cell>
          <table:table-cell table:formula="of:=[.D196]-[.D19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44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993055555555556" calcext:value-type="float">
            <text:p>0,00099305555555555600</text:p>
          </table:table-cell>
          <table:table-cell table:formula="of:=[.D197]-[.D19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44" office:value-type="float" office:value="8624" calcext:value-type="float">
            <text:p>862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998148148148148" calcext:value-type="float">
            <text:p>0,00099814814814814800</text:p>
          </table:table-cell>
          <table:table-cell table:formula="of:=[.D198]-[.D19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44" office:value-type="float" office:value="8668" calcext:value-type="float">
            <text:p>866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00324074074074" calcext:value-type="float">
            <text:p>0,00100324074074074000</text:p>
          </table:table-cell>
          <table:table-cell table:formula="of:=[.D199]-[.D19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44" office:value-type="float" office:value="8712" calcext:value-type="float">
            <text:p>871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00833333333333" calcext:value-type="float">
            <text:p>0,00100833333333333000</text:p>
          </table:table-cell>
          <table:table-cell table:formula="of:=[.D200]-[.D19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44" office:value-type="float" office:value="8756" calcext:value-type="float">
            <text:p>875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01342592592593" calcext:value-type="float">
            <text:p>0,00101342592592593000</text:p>
          </table:table-cell>
          <table:table-cell table:formula="of:=[.D201]-[.D20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44" office:value-type="float" office:value="8800" calcext:value-type="float">
            <text:p>8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01851851851852" calcext:value-type="float">
            <text:p>0,00101851851851852000</text:p>
          </table:table-cell>
          <table:table-cell table:formula="of:=[.D202]-[.D201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44" office:value-type="float" office:value="8844" calcext:value-type="float">
            <text:p>884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02361111111111" calcext:value-type="float">
            <text:p>0,00102361111111111000</text:p>
          </table:table-cell>
          <table:table-cell table:formula="of:=[.D203]-[.D20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44" office:value-type="float" office:value="8888" calcext:value-type="float">
            <text:p>888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0287037037037" calcext:value-type="float">
            <text:p>0,00102870370370370000</text:p>
          </table:table-cell>
          <table:table-cell table:formula="of:=[.D204]-[.D20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44" office:value-type="float" office:value="8932" calcext:value-type="float">
            <text:p>893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0337962962963" calcext:value-type="float">
            <text:p>0,00103379629629630000</text:p>
          </table:table-cell>
          <table:table-cell table:formula="of:=[.D205]-[.D20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44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03888888888889" calcext:value-type="float">
            <text:p>0,00103888888888889000</text:p>
          </table:table-cell>
          <table:table-cell table:formula="of:=[.D206]-[.D20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44" office:value-type="float" office:value="9020" calcext:value-type="float">
            <text:p>902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04398148148148" calcext:value-type="float">
            <text:p>0,00104398148148148000</text:p>
          </table:table-cell>
          <table:table-cell table:formula="of:=[.D207]-[.D20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44" office:value-type="float" office:value="9064" calcext:value-type="float">
            <text:p>906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04907407407407" calcext:value-type="float">
            <text:p>0,00104907407407407000</text:p>
          </table:table-cell>
          <table:table-cell table:formula="of:=[.D208]-[.D20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44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05416666666667" calcext:value-type="float">
            <text:p>0,00105416666666667000</text:p>
          </table:table-cell>
          <table:table-cell table:formula="of:=[.D209]-[.D208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44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05925925925926" calcext:value-type="float">
            <text:p>0,00105925925925926000</text:p>
          </table:table-cell>
          <table:table-cell table:formula="of:=[.D210]-[.D20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44" office:value-type="float" office:value="9196" calcext:value-type="float">
            <text:p>919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06435185185185" calcext:value-type="float">
            <text:p>0,00106435185185185000</text:p>
          </table:table-cell>
          <table:table-cell table:formula="of:=[.D211]-[.D21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44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06944444444444" calcext:value-type="float">
            <text:p>0,00106944444444444000</text:p>
          </table:table-cell>
          <table:table-cell table:formula="of:=[.D212]-[.D21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44" office:value-type="float" office:value="9284" calcext:value-type="float">
            <text:p>928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07453703703704" calcext:value-type="float">
            <text:p>0,00107453703703704000</text:p>
          </table:table-cell>
          <table:table-cell table:formula="of:=[.D213]-[.D21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44" office:value-type="float" office:value="9328" calcext:value-type="float">
            <text:p>932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07962962962963" calcext:value-type="float">
            <text:p>0,00107962962962963000</text:p>
          </table:table-cell>
          <table:table-cell table:formula="of:=[.D214]-[.D21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44" office:value-type="float" office:value="9372" calcext:value-type="float">
            <text:p>937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08472222222222" calcext:value-type="float">
            <text:p>0,00108472222222222000</text:p>
          </table:table-cell>
          <table:table-cell table:formula="of:=[.D215]-[.D21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44" office:value-type="float" office:value="9416" calcext:value-type="float">
            <text:p>941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08981481481481" calcext:value-type="float">
            <text:p>0,00108981481481481000</text:p>
          </table:table-cell>
          <table:table-cell table:formula="of:=[.D216]-[.D215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44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09490740740741" calcext:value-type="float">
            <text:p>0,00109490740740741000</text:p>
          </table:table-cell>
          <table:table-cell table:formula="of:=[.D217]-[.D21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44" office:value-type="float" office:value="9504" calcext:value-type="float">
            <text:p>950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1" calcext:value-type="float">
            <text:p>0,00110000000000000000</text:p>
          </table:table-cell>
          <table:table-cell table:formula="of:=[.D218]-[.D21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44" office:value-type="float" office:value="9548" calcext:value-type="float">
            <text:p>954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10509259259259" calcext:value-type="float">
            <text:p>0,00110509259259259000</text:p>
          </table:table-cell>
          <table:table-cell table:formula="of:=[.D219]-[.D21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44" office:value-type="float" office:value="9592" calcext:value-type="float">
            <text:p>959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11018518518519" calcext:value-type="float">
            <text:p>0,00111018518518519000</text:p>
          </table:table-cell>
          <table:table-cell table:formula="of:=[.D220]-[.D21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44" office:value-type="float" office:value="9636" calcext:value-type="float">
            <text:p>963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11527777777778" calcext:value-type="float">
            <text:p>0,00111527777777778000</text:p>
          </table:table-cell>
          <table:table-cell table:formula="of:=[.D221]-[.D22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44" office:value-type="float" office:value="9680" calcext:value-type="float">
            <text:p>96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12037037037037" calcext:value-type="float">
            <text:p>0,00112037037037037000</text:p>
          </table:table-cell>
          <table:table-cell table:formula="of:=[.D222]-[.D22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44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12546296296296" calcext:value-type="float">
            <text:p>0,00112546296296296000</text:p>
          </table:table-cell>
          <table:table-cell table:formula="of:=[.D223]-[.D222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44" office:value-type="float" office:value="9768" calcext:value-type="float">
            <text:p>976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13055555555556" calcext:value-type="float">
            <text:p>0,00113055555555556000</text:p>
          </table:table-cell>
          <table:table-cell table:formula="of:=[.D224]-[.D22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44" office:value-type="float" office:value="9812" calcext:value-type="float">
            <text:p>981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13564814814815" calcext:value-type="float">
            <text:p>0,00113564814814815000</text:p>
          </table:table-cell>
          <table:table-cell table:formula="of:=[.D225]-[.D22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44" office:value-type="float" office:value="9856" calcext:value-type="float">
            <text:p>985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14074074074074" calcext:value-type="float">
            <text:p>0,00114074074074074000</text:p>
          </table:table-cell>
          <table:table-cell table:formula="of:=[.D226]-[.D22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44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14583333333333" calcext:value-type="float">
            <text:p>0,00114583333333333000</text:p>
          </table:table-cell>
          <table:table-cell table:formula="of:=[.D227]-[.D22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44" office:value-type="float" office:value="9944" calcext:value-type="float">
            <text:p>994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15092592592593" calcext:value-type="float">
            <text:p>0,00115092592592593000</text:p>
          </table:table-cell>
          <table:table-cell table:formula="of:=[.D228]-[.D22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44" office:value-type="float" office:value="9988" calcext:value-type="float">
            <text:p>998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15601851851852" calcext:value-type="float">
            <text:p>0,00115601851851852000</text:p>
          </table:table-cell>
          <table:table-cell table:formula="of:=[.D229]-[.D22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44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16111111111111" calcext:value-type="float">
            <text:p>0,00116111111111111000</text:p>
          </table:table-cell>
          <table:table-cell table:formula="of:=[.D230]-[.D229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44" office:value-type="float" office:value="10076" calcext:value-type="float">
            <text:p>1007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1662037037037" calcext:value-type="float">
            <text:p>0,00116620370370370000</text:p>
          </table:table-cell>
          <table:table-cell table:formula="of:=[.D231]-[.D23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44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1712962962963" calcext:value-type="float">
            <text:p>0,00117129629629630000</text:p>
          </table:table-cell>
          <table:table-cell table:formula="of:=[.D232]-[.D23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44" office:value-type="float" office:value="10164" calcext:value-type="float">
            <text:p>1016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17638888888889" calcext:value-type="float">
            <text:p>0,00117638888888889000</text:p>
          </table:table-cell>
          <table:table-cell table:formula="of:=[.D233]-[.D23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44" office:value-type="float" office:value="10208" calcext:value-type="float">
            <text:p>1020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18148148148148" calcext:value-type="float">
            <text:p>0,00118148148148148000</text:p>
          </table:table-cell>
          <table:table-cell table:formula="of:=[.D234]-[.D23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44" office:value-type="float" office:value="10252" calcext:value-type="float">
            <text:p>1025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18657407407407" calcext:value-type="float">
            <text:p>0,00118657407407407000</text:p>
          </table:table-cell>
          <table:table-cell table:formula="of:=[.D235]-[.D23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44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19166666666667" calcext:value-type="float">
            <text:p>0,00119166666666667000</text:p>
          </table:table-cell>
          <table:table-cell table:formula="of:=[.D236]-[.D23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44" office:value-type="float" office:value="10340" calcext:value-type="float">
            <text:p>1034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19675925925926" calcext:value-type="float">
            <text:p>0,00119675925925926000</text:p>
          </table:table-cell>
          <table:table-cell table:formula="of:=[.D237]-[.D236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44" office:value-type="float" office:value="10384" calcext:value-type="float">
            <text:p>1038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20185185185185" calcext:value-type="float">
            <text:p>0,00120185185185185000</text:p>
          </table:table-cell>
          <table:table-cell table:formula="of:=[.D238]-[.D23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44" office:value-type="float" office:value="10428" calcext:value-type="float">
            <text:p>1042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20694444444444" calcext:value-type="float">
            <text:p>0,00120694444444444000</text:p>
          </table:table-cell>
          <table:table-cell table:formula="of:=[.D239]-[.D23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44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21203703703704" calcext:value-type="float">
            <text:p>0,00121203703703704000</text:p>
          </table:table-cell>
          <table:table-cell table:formula="of:=[.D240]-[.D23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44" office:value-type="float" office:value="10516" calcext:value-type="float">
            <text:p>1051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21712962962963" calcext:value-type="float">
            <text:p>0,00121712962962963000</text:p>
          </table:table-cell>
          <table:table-cell table:formula="of:=[.D241]-[.D24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44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22222222222222" calcext:value-type="float">
            <text:p>0,00122222222222222000</text:p>
          </table:table-cell>
          <table:table-cell table:formula="of:=[.D242]-[.D24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44" office:value-type="float" office:value="10604" calcext:value-type="float">
            <text:p>1060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22731481481481" calcext:value-type="float">
            <text:p>0,00122731481481481000</text:p>
          </table:table-cell>
          <table:table-cell table:formula="of:=[.D243]-[.D24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44" office:value-type="float" office:value="10648" calcext:value-type="float">
            <text:p>1064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23240740740741" calcext:value-type="float">
            <text:p>0,00123240740740741000</text:p>
          </table:table-cell>
          <table:table-cell table:formula="of:=[.D244]-[.D243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44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2375" calcext:value-type="float">
            <text:p>0,00123750000000000000</text:p>
          </table:table-cell>
          <table:table-cell table:formula="of:=[.D245]-[.D24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44" office:value-type="float" office:value="10736" calcext:value-type="float">
            <text:p>1073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24259259259259" calcext:value-type="float">
            <text:p>0,00124259259259259000</text:p>
          </table:table-cell>
          <table:table-cell table:formula="of:=[.D246]-[.D24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44" office:value-type="float" office:value="10780" calcext:value-type="float">
            <text:p>1078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24768518518519" calcext:value-type="float">
            <text:p>0,00124768518518519000</text:p>
          </table:table-cell>
          <table:table-cell table:formula="of:=[.D247]-[.D24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44" office:value-type="float" office:value="10824" calcext:value-type="float">
            <text:p>1082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25277777777778" calcext:value-type="float">
            <text:p>0,00125277777777778000</text:p>
          </table:table-cell>
          <table:table-cell table:formula="of:=[.D248]-[.D24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44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25787037037037" calcext:value-type="float">
            <text:p>0,00125787037037037000</text:p>
          </table:table-cell>
          <table:table-cell table:formula="of:=[.D249]-[.D24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44" office:value-type="float" office:value="10912" calcext:value-type="float">
            <text:p>1091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26296296296296" calcext:value-type="float">
            <text:p>0,00126296296296296000</text:p>
          </table:table-cell>
          <table:table-cell table:formula="of:=[.D250]-[.D24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44" office:value-type="float" office:value="10956" calcext:value-type="float">
            <text:p>1095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26805555555556" calcext:value-type="float">
            <text:p>0,00126805555555556000</text:p>
          </table:table-cell>
          <table:table-cell table:formula="of:=[.D251]-[.D250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44" office:value-type="float" office:value="11000" calcext:value-type="float">
            <text:p>11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27314814814815" calcext:value-type="float">
            <text:p>0,00127314814814815000</text:p>
          </table:table-cell>
          <table:table-cell table:formula="of:=[.D252]-[.D25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44" office:value-type="float" office:value="11044" calcext:value-type="float">
            <text:p>1104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27824074074074" calcext:value-type="float">
            <text:p>0,00127824074074074000</text:p>
          </table:table-cell>
          <table:table-cell table:formula="of:=[.D253]-[.D25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44" office:value-type="float" office:value="11088" calcext:value-type="float">
            <text:p>1108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28333333333333" calcext:value-type="float">
            <text:p>0,00128333333333333000</text:p>
          </table:table-cell>
          <table:table-cell table:formula="of:=[.D254]-[.D25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44" office:value-type="float" office:value="11132" calcext:value-type="float">
            <text:p>1113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28842592592593" calcext:value-type="float">
            <text:p>0,00128842592592593000</text:p>
          </table:table-cell>
          <table:table-cell table:formula="of:=[.D255]-[.D25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44" office:value-type="float" office:value="11176" calcext:value-type="float">
            <text:p>1117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29351851851852" calcext:value-type="float">
            <text:p>0,00129351851851852000</text:p>
          </table:table-cell>
          <table:table-cell table:formula="of:=[.D256]-[.D25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44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29861111111111" calcext:value-type="float">
            <text:p>0,00129861111111111000</text:p>
          </table:table-cell>
          <table:table-cell table:formula="of:=[.D257]-[.D25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44" office:value-type="float" office:value="11264" calcext:value-type="float">
            <text:p>1126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3037037037037" calcext:value-type="float">
            <text:p>0,00130370370370370000</text:p>
          </table:table-cell>
          <table:table-cell table:formula="of:=[.D258]-[.D257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44" office:value-type="float" office:value="11308" calcext:value-type="float">
            <text:p>1130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3087962962963" calcext:value-type="float">
            <text:p>0,00130879629629630000</text:p>
          </table:table-cell>
          <table:table-cell table:formula="of:=[.D259]-[.D25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44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31388888888889" calcext:value-type="float">
            <text:p>0,00131388888888889000</text:p>
          </table:table-cell>
          <table:table-cell table:formula="of:=[.D260]-[.D25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44" office:value-type="float" office:value="11396" calcext:value-type="float">
            <text:p>1139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31898148148148" calcext:value-type="float">
            <text:p>0,00131898148148148000</text:p>
          </table:table-cell>
          <table:table-cell table:formula="of:=[.D261]-[.D26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44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32407407407407" calcext:value-type="float">
            <text:p>0,00132407407407407000</text:p>
          </table:table-cell>
          <table:table-cell table:formula="of:=[.D262]-[.D26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44" office:value-type="float" office:value="11484" calcext:value-type="float">
            <text:p>1148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32916666666667" calcext:value-type="float">
            <text:p>0,00132916666666667000</text:p>
          </table:table-cell>
          <table:table-cell table:formula="of:=[.D263]-[.D26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44" office:value-type="float" office:value="11528" calcext:value-type="float">
            <text:p>1152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33425925925926" calcext:value-type="float">
            <text:p>0,00133425925925926000</text:p>
          </table:table-cell>
          <table:table-cell table:formula="of:=[.D264]-[.D26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44" office:value-type="float" office:value="11572" calcext:value-type="float">
            <text:p>1157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33935185185185" calcext:value-type="float">
            <text:p>0,00133935185185185000</text:p>
          </table:table-cell>
          <table:table-cell table:formula="of:=[.D265]-[.D264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44" office:value-type="float" office:value="11616" calcext:value-type="float">
            <text:p>1161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34444444444444" calcext:value-type="float">
            <text:p>0,00134444444444444000</text:p>
          </table:table-cell>
          <table:table-cell table:formula="of:=[.D266]-[.D26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44" office:value-type="float" office:value="11660" calcext:value-type="float">
            <text:p>1166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34953703703704" calcext:value-type="float">
            <text:p>0,00134953703703704000</text:p>
          </table:table-cell>
          <table:table-cell table:formula="of:=[.D267]-[.D26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44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35462962962963" calcext:value-type="float">
            <text:p>0,00135462962962963000</text:p>
          </table:table-cell>
          <table:table-cell table:formula="of:=[.D268]-[.D26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44" office:value-type="float" office:value="11748" calcext:value-type="float">
            <text:p>1174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35972222222222" calcext:value-type="float">
            <text:p>0,00135972222222222000</text:p>
          </table:table-cell>
          <table:table-cell table:formula="of:=[.D269]-[.D26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44" office:value-type="float" office:value="11792" calcext:value-type="float">
            <text:p>1179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36481481481481" calcext:value-type="float">
            <text:p>0,00136481481481481000</text:p>
          </table:table-cell>
          <table:table-cell table:formula="of:=[.D270]-[.D26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44" office:value-type="float" office:value="11836" calcext:value-type="float">
            <text:p>1183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36990740740741" calcext:value-type="float">
            <text:p>0,00136990740740741000</text:p>
          </table:table-cell>
          <table:table-cell table:formula="of:=[.D271]-[.D27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44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375" calcext:value-type="float">
            <text:p>0,00137500000000000000</text:p>
          </table:table-cell>
          <table:table-cell table:formula="of:=[.D272]-[.D271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44" office:value-type="float" office:value="11924" calcext:value-type="float">
            <text:p>1192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38009259259259" calcext:value-type="float">
            <text:p>0,00138009259259259000</text:p>
          </table:table-cell>
          <table:table-cell table:formula="of:=[.D273]-[.D27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44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38518518518519" calcext:value-type="float">
            <text:p>0,00138518518518519000</text:p>
          </table:table-cell>
          <table:table-cell table:formula="of:=[.D274]-[.D27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44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39027777777778" calcext:value-type="float">
            <text:p>0,00139027777777778000</text:p>
          </table:table-cell>
          <table:table-cell table:formula="of:=[.D275]-[.D27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44" office:value-type="float" office:value="12056" calcext:value-type="float">
            <text:p>1205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39537037037037" calcext:value-type="float">
            <text:p>0,00139537037037037000</text:p>
          </table:table-cell>
          <table:table-cell table:formula="of:=[.D276]-[.D27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44" office:value-type="float" office:value="12100" calcext:value-type="float">
            <text:p>121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40046296296296" calcext:value-type="float">
            <text:p>0,00140046296296296000</text:p>
          </table:table-cell>
          <table:table-cell table:formula="of:=[.D277]-[.D27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44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40555555555556" calcext:value-type="float">
            <text:p>0,00140555555555556000</text:p>
          </table:table-cell>
          <table:table-cell table:formula="of:=[.D278]-[.D27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44" office:value-type="float" office:value="12188" calcext:value-type="float">
            <text:p>1218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41064814814815" calcext:value-type="float">
            <text:p>0,00141064814814815000</text:p>
          </table:table-cell>
          <table:table-cell table:formula="of:=[.D279]-[.D278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44" office:value-type="float" office:value="12232" calcext:value-type="float">
            <text:p>1223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41574074074074" calcext:value-type="float">
            <text:p>0,00141574074074074000</text:p>
          </table:table-cell>
          <table:table-cell table:formula="of:=[.D280]-[.D27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44" office:value-type="float" office:value="12276" calcext:value-type="float">
            <text:p>1227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42083333333333" calcext:value-type="float">
            <text:p>0,00142083333333333000</text:p>
          </table:table-cell>
          <table:table-cell table:formula="of:=[.D281]-[.D28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44" office:value-type="float" office:value="12320" calcext:value-type="float">
            <text:p>123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42592592592593" calcext:value-type="float">
            <text:p>0,00142592592592593000</text:p>
          </table:table-cell>
          <table:table-cell table:formula="of:=[.D282]-[.D28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44" office:value-type="float" office:value="12364" calcext:value-type="float">
            <text:p>1236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43101851851852" calcext:value-type="float">
            <text:p>0,00143101851851852000</text:p>
          </table:table-cell>
          <table:table-cell table:formula="of:=[.D283]-[.D28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44" office:value-type="float" office:value="12408" calcext:value-type="float">
            <text:p>1240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43611111111111" calcext:value-type="float">
            <text:p>0,00143611111111111000</text:p>
          </table:table-cell>
          <table:table-cell table:formula="of:=[.D284]-[.D28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44" office:value-type="float" office:value="12452" calcext:value-type="float">
            <text:p>1245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4412037037037" calcext:value-type="float">
            <text:p>0,00144120370370370000</text:p>
          </table:table-cell>
          <table:table-cell table:formula="of:=[.D285]-[.D28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44" office:value-type="float" office:value="12496" calcext:value-type="float">
            <text:p>1249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4462962962963" calcext:value-type="float">
            <text:p>0,00144629629629630000</text:p>
          </table:table-cell>
          <table:table-cell table:formula="of:=[.D286]-[.D28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44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45138888888889" calcext:value-type="float">
            <text:p>0,00145138888888889000</text:p>
          </table:table-cell>
          <table:table-cell table:formula="of:=[.D287]-[.D286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44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45648148148148" calcext:value-type="float">
            <text:p>0,00145648148148148000</text:p>
          </table:table-cell>
          <table:table-cell table:formula="of:=[.D288]-[.D28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44" office:value-type="float" office:value="12628" calcext:value-type="float">
            <text:p>12628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46157407407407" calcext:value-type="float">
            <text:p>0,00146157407407407000</text:p>
          </table:table-cell>
          <table:table-cell table:formula="of:=[.D289]-[.D28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44" office:value-type="float" office:value="12672" calcext:value-type="float">
            <text:p>1267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46666666666667" calcext:value-type="float">
            <text:p>0,00146666666666667000</text:p>
          </table:table-cell>
          <table:table-cell table:formula="of:=[.D290]-[.D28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44" office:value-type="float" office:value="12716" calcext:value-type="float">
            <text:p>12716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47175925925926" calcext:value-type="float">
            <text:p>0,00147175925925926000</text:p>
          </table:table-cell>
          <table:table-cell table:formula="of:=[.D291]-[.D29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44" office:value-type="float" office:value="12760" calcext:value-type="float">
            <text:p>1276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47685185185185" calcext:value-type="float">
            <text:p>0,00147685185185185000</text:p>
          </table:table-cell>
          <table:table-cell table:formula="of:=[.D292]-[.D29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44" office:value-type="float" office:value="12804" calcext:value-type="float">
            <text:p>12804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48194444444444" calcext:value-type="float">
            <text:p>0,00148194444444444000</text:p>
          </table:table-cell>
          <table:table-cell table:formula="of:=[.D293]-[.D29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44" office:value-type="float" office:value="12848" calcext:value-type="float">
            <text:p>1284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48703703703704" calcext:value-type="float">
            <text:p>0,00148703703703704000</text:p>
          </table:table-cell>
          <table:table-cell table:formula="of:=[.D294]-[.D293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44" office:value-type="float" office:value="12892" calcext:value-type="float">
            <text:p>12892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49212962962963" calcext:value-type="float">
            <text:p>0,00149212962962963000</text:p>
          </table:table-cell>
          <table:table-cell table:formula="of:=[.D295]-[.D29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44" office:value-type="float" office:value="12936" calcext:value-type="float">
            <text:p>1293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49722222222222" calcext:value-type="float">
            <text:p>0,00149722222222222000</text:p>
          </table:table-cell>
          <table:table-cell table:formula="of:=[.D296]-[.D29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44" office:value-type="float" office:value="12980" calcext:value-type="float">
            <text:p>1298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50231481481481" calcext:value-type="float">
            <text:p>0,00150231481481481000</text:p>
          </table:table-cell>
          <table:table-cell table:formula="of:=[.D297]-[.D29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44" office:value-type="float" office:value="13024" calcext:value-type="float">
            <text:p>1302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50740740740741" calcext:value-type="float">
            <text:p>0,00150740740740741000</text:p>
          </table:table-cell>
          <table:table-cell table:formula="of:=[.D298]-[.D29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44" office:value-type="float" office:value="13068" calcext:value-type="float">
            <text:p>13068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5125" calcext:value-type="float">
            <text:p>0,00151250000000000000</text:p>
          </table:table-cell>
          <table:table-cell table:formula="of:=[.D299]-[.D29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44" office:value-type="float" office:value="13112" calcext:value-type="float">
            <text:p>1311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51759259259259" calcext:value-type="float">
            <text:p>0,00151759259259259000</text:p>
          </table:table-cell>
          <table:table-cell table:formula="of:=[.D300]-[.D29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44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52268518518519" calcext:value-type="float">
            <text:p>0,00152268518518518000</text:p>
          </table:table-cell>
          <table:table-cell table:formula="of:=[.D301]-[.D300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44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52777777777778" calcext:value-type="float">
            <text:p>0,00152777777777778000</text:p>
          </table:table-cell>
          <table:table-cell table:formula="of:=[.D302]-[.D30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44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53287037037037" calcext:value-type="float">
            <text:p>0,00153287037037037000</text:p>
          </table:table-cell>
          <table:table-cell table:formula="of:=[.D303]-[.D30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44" office:value-type="float" office:value="13288" calcext:value-type="float">
            <text:p>1328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53796296296296" calcext:value-type="float">
            <text:p>0,00153796296296296000</text:p>
          </table:table-cell>
          <table:table-cell table:formula="of:=[.D304]-[.D30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44" office:value-type="float" office:value="13332" calcext:value-type="float">
            <text:p>13332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54305555555556" calcext:value-type="float">
            <text:p>0,00154305555555556000</text:p>
          </table:table-cell>
          <table:table-cell table:formula="of:=[.D305]-[.D30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44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54814814814815" calcext:value-type="float">
            <text:p>0,00154814814814815000</text:p>
          </table:table-cell>
          <table:table-cell table:formula="of:=[.D306]-[.D30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44" office:value-type="float" office:value="13420" calcext:value-type="float">
            <text:p>1342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55324074074074" calcext:value-type="float">
            <text:p>0,00155324074074074000</text:p>
          </table:table-cell>
          <table:table-cell table:formula="of:=[.D307]-[.D30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44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55833333333333" calcext:value-type="float">
            <text:p>0,00155833333333333000</text:p>
          </table:table-cell>
          <table:table-cell table:formula="of:=[.D308]-[.D307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44" office:value-type="float" office:value="13508" calcext:value-type="float">
            <text:p>13508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56342592592593" calcext:value-type="float">
            <text:p>0,00156342592592593000</text:p>
          </table:table-cell>
          <table:table-cell table:formula="of:=[.D309]-[.D30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44" office:value-type="float" office:value="13552" calcext:value-type="float">
            <text:p>1355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56851851851852" calcext:value-type="float">
            <text:p>0,00156851851851852000</text:p>
          </table:table-cell>
          <table:table-cell table:formula="of:=[.D310]-[.D30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44" office:value-type="float" office:value="13596" calcext:value-type="float">
            <text:p>13596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57361111111111" calcext:value-type="float">
            <text:p>0,00157361111111111000</text:p>
          </table:table-cell>
          <table:table-cell table:formula="of:=[.D311]-[.D31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44" office:value-type="float" office:value="13640" calcext:value-type="float">
            <text:p>1364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5787037037037" calcext:value-type="float">
            <text:p>0,00157870370370370000</text:p>
          </table:table-cell>
          <table:table-cell table:formula="of:=[.D312]-[.D31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44" office:value-type="float" office:value="13684" calcext:value-type="float">
            <text:p>13684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5837962962963" calcext:value-type="float">
            <text:p>0,00158379629629630000</text:p>
          </table:table-cell>
          <table:table-cell table:formula="of:=[.D313]-[.D31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44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58888888888889" calcext:value-type="float">
            <text:p>0,00158888888888889000</text:p>
          </table:table-cell>
          <table:table-cell table:formula="of:=[.D314]-[.D31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44" office:value-type="float" office:value="13772" calcext:value-type="float">
            <text:p>13772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59398148148148" calcext:value-type="float">
            <text:p>0,00159398148148148000</text:p>
          </table:table-cell>
          <table:table-cell table:formula="of:=[.D315]-[.D314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44" office:value-type="float" office:value="13816" calcext:value-type="float">
            <text:p>1381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59907407407407" calcext:value-type="float">
            <text:p>0,00159907407407407000</text:p>
          </table:table-cell>
          <table:table-cell table:formula="of:=[.D316]-[.D31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44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60416666666667" calcext:value-type="float">
            <text:p>0,00160416666666667000</text:p>
          </table:table-cell>
          <table:table-cell table:formula="of:=[.D317]-[.D31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44" office:value-type="float" office:value="13904" calcext:value-type="float">
            <text:p>1390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60925925925926" calcext:value-type="float">
            <text:p>0,00160925925925926000</text:p>
          </table:table-cell>
          <table:table-cell table:formula="of:=[.D318]-[.D31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44" office:value-type="float" office:value="13948" calcext:value-type="float">
            <text:p>13948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61435185185185" calcext:value-type="float">
            <text:p>0,00161435185185185000</text:p>
          </table:table-cell>
          <table:table-cell table:formula="of:=[.D319]-[.D31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44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61944444444444" calcext:value-type="float">
            <text:p>0,00161944444444444000</text:p>
          </table:table-cell>
          <table:table-cell table:formula="of:=[.D320]-[.D31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44" office:value-type="float" office:value="14036" calcext:value-type="float">
            <text:p>14036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62453703703704" calcext:value-type="float">
            <text:p>0,00162453703703704000</text:p>
          </table:table-cell>
          <table:table-cell table:formula="of:=[.D321]-[.D32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44" office:value-type="float" office:value="14080" calcext:value-type="float">
            <text:p>140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62962962962963" calcext:value-type="float">
            <text:p>0,00162962962962963000</text:p>
          </table:table-cell>
          <table:table-cell table:formula="of:=[.D322]-[.D321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44" office:value-type="float" office:value="14124" calcext:value-type="float">
            <text:p>14124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63472222222222" calcext:value-type="float">
            <text:p>0,00163472222222222000</text:p>
          </table:table-cell>
          <table:table-cell table:formula="of:=[.D323]-[.D32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44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63981481481481" calcext:value-type="float">
            <text:p>0,00163981481481481000</text:p>
          </table:table-cell>
          <table:table-cell table:formula="of:=[.D324]-[.D32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44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64490740740741" calcext:value-type="float">
            <text:p>0,00164490740740741000</text:p>
          </table:table-cell>
          <table:table-cell table:formula="of:=[.D325]-[.D32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44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65" calcext:value-type="float">
            <text:p>0,00165000000000000000</text:p>
          </table:table-cell>
          <table:table-cell table:formula="of:=[.D326]-[.D32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44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65509259259259" calcext:value-type="float">
            <text:p>0,00165509259259259000</text:p>
          </table:table-cell>
          <table:table-cell table:formula="of:=[.D327]-[.D32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44" office:value-type="float" office:value="14344" calcext:value-type="float">
            <text:p>1434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66018518518519" calcext:value-type="float">
            <text:p>0,00166018518518519000</text:p>
          </table:table-cell>
          <table:table-cell table:formula="of:=[.D328]-[.D32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44" office:value-type="float" office:value="14388" calcext:value-type="float">
            <text:p>14388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66527777777778" calcext:value-type="float">
            <text:p>0,00166527777777778000</text:p>
          </table:table-cell>
          <table:table-cell table:formula="of:=[.D329]-[.D328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44" office:value-type="float" office:value="14432" calcext:value-type="float">
            <text:p>1443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67037037037037" calcext:value-type="float">
            <text:p>0,00167037037037037000</text:p>
          </table:table-cell>
          <table:table-cell table:formula="of:=[.D330]-[.D32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44" office:value-type="float" office:value="14476" calcext:value-type="float">
            <text:p>14476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67546296296296" calcext:value-type="float">
            <text:p>0,00167546296296296000</text:p>
          </table:table-cell>
          <table:table-cell table:formula="of:=[.D331]-[.D33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44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68055555555556" calcext:value-type="float">
            <text:p>0,00168055555555556000</text:p>
          </table:table-cell>
          <table:table-cell table:formula="of:=[.D332]-[.D33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44" office:value-type="float" office:value="14564" calcext:value-type="float">
            <text:p>14564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68564814814815" calcext:value-type="float">
            <text:p>0,00168564814814815000</text:p>
          </table:table-cell>
          <table:table-cell table:formula="of:=[.D333]-[.D33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44" office:value-type="float" office:value="14608" calcext:value-type="float">
            <text:p>1460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69074074074074" calcext:value-type="float">
            <text:p>0,00169074074074074000</text:p>
          </table:table-cell>
          <table:table-cell table:formula="of:=[.D334]-[.D33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44" office:value-type="float" office:value="14652" calcext:value-type="float">
            <text:p>14652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69583333333333" calcext:value-type="float">
            <text:p>0,00169583333333333000</text:p>
          </table:table-cell>
          <table:table-cell table:formula="of:=[.D335]-[.D33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44" office:value-type="float" office:value="14696" calcext:value-type="float">
            <text:p>1469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70092592592593" calcext:value-type="float">
            <text:p>0,00170092592592593000</text:p>
          </table:table-cell>
          <table:table-cell table:formula="of:=[.D336]-[.D335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44" office:value-type="float" office:value="14740" calcext:value-type="float">
            <text:p>1474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70601851851852" calcext:value-type="float">
            <text:p>0,00170601851851852000</text:p>
          </table:table-cell>
          <table:table-cell table:formula="of:=[.D337]-[.D33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44" office:value-type="float" office:value="14784" calcext:value-type="float">
            <text:p>1478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71111111111111" calcext:value-type="float">
            <text:p>0,00171111111111111000</text:p>
          </table:table-cell>
          <table:table-cell table:formula="of:=[.D338]-[.D33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44" office:value-type="float" office:value="14828" calcext:value-type="float">
            <text:p>14828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7162037037037" calcext:value-type="float">
            <text:p>0,00171620370370370000</text:p>
          </table:table-cell>
          <table:table-cell table:formula="of:=[.D339]-[.D33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44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7212962962963" calcext:value-type="float">
            <text:p>0,00172129629629630000</text:p>
          </table:table-cell>
          <table:table-cell table:formula="of:=[.D340]-[.D33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44" office:value-type="float" office:value="14916" calcext:value-type="float">
            <text:p>14916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72638888888889" calcext:value-type="float">
            <text:p>0,00172638888888889000</text:p>
          </table:table-cell>
          <table:table-cell table:formula="of:=[.D341]-[.D34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44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73148148148148" calcext:value-type="float">
            <text:p>0,00173148148148148000</text:p>
          </table:table-cell>
          <table:table-cell table:formula="of:=[.D342]-[.D34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44" office:value-type="float" office:value="15004" calcext:value-type="float">
            <text:p>15004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73657407407407" calcext:value-type="float">
            <text:p>0,00173657407407407000</text:p>
          </table:table-cell>
          <table:table-cell table:formula="of:=[.D343]-[.D342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44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74166666666667" calcext:value-type="float">
            <text:p>0,00174166666666667000</text:p>
          </table:table-cell>
          <table:table-cell table:formula="of:=[.D344]-[.D34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44" office:value-type="float" office:value="15092" calcext:value-type="float">
            <text:p>15092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74675925925926" calcext:value-type="float">
            <text:p>0,00174675925925926000</text:p>
          </table:table-cell>
          <table:table-cell table:formula="of:=[.D345]-[.D34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44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75185185185185" calcext:value-type="float">
            <text:p>0,00175185185185185000</text:p>
          </table:table-cell>
          <table:table-cell table:formula="of:=[.D346]-[.D34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44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75694444444444" calcext:value-type="float">
            <text:p>0,00175694444444444000</text:p>
          </table:table-cell>
          <table:table-cell table:formula="of:=[.D347]-[.D34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44" office:value-type="float" office:value="15224" calcext:value-type="float">
            <text:p>1522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76203703703704" calcext:value-type="float">
            <text:p>0,00176203703703704000</text:p>
          </table:table-cell>
          <table:table-cell table:formula="of:=[.D348]-[.D34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44" office:value-type="float" office:value="15268" calcext:value-type="float">
            <text:p>15268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76712962962963" calcext:value-type="float">
            <text:p>0,00176712962962963000</text:p>
          </table:table-cell>
          <table:table-cell table:formula="of:=[.D349]-[.D34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44" office:value-type="float" office:value="15312" calcext:value-type="float">
            <text:p>1531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77222222222222" calcext:value-type="float">
            <text:p>0,00177222222222222000</text:p>
          </table:table-cell>
          <table:table-cell table:formula="of:=[.D350]-[.D349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44" office:value-type="float" office:value="15356" calcext:value-type="float">
            <text:p>15356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77731481481482" calcext:value-type="float">
            <text:p>0,00177731481481482000</text:p>
          </table:table-cell>
          <table:table-cell table:formula="of:=[.D351]-[.D35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44" office:value-type="float" office:value="15400" calcext:value-type="float">
            <text:p>154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78240740740741" calcext:value-type="float">
            <text:p>0,00178240740740741000</text:p>
          </table:table-cell>
          <table:table-cell table:formula="of:=[.D352]-[.D35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44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7875" calcext:value-type="float">
            <text:p>0,00178750000000000000</text:p>
          </table:table-cell>
          <table:table-cell table:formula="of:=[.D353]-[.D35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44" office:value-type="float" office:value="15488" calcext:value-type="float">
            <text:p>1548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79259259259259" calcext:value-type="float">
            <text:p>0,00179259259259259000</text:p>
          </table:table-cell>
          <table:table-cell table:formula="of:=[.D354]-[.D35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44" office:value-type="float" office:value="15532" calcext:value-type="float">
            <text:p>15532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79768518518519" calcext:value-type="float">
            <text:p>0,00179768518518519000</text:p>
          </table:table-cell>
          <table:table-cell table:formula="of:=[.D355]-[.D35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44" office:value-type="float" office:value="15576" calcext:value-type="float">
            <text:p>1557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80277777777778" calcext:value-type="float">
            <text:p>0,00180277777777778000</text:p>
          </table:table-cell>
          <table:table-cell table:formula="of:=[.D356]-[.D35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44" office:value-type="float" office:value="15620" calcext:value-type="float">
            <text:p>1562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80787037037037" calcext:value-type="float">
            <text:p>0,00180787037037037000</text:p>
          </table:table-cell>
          <table:table-cell table:formula="of:=[.D357]-[.D356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44" office:value-type="float" office:value="15664" calcext:value-type="float">
            <text:p>1566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81296296296296" calcext:value-type="float">
            <text:p>0,00181296296296296000</text:p>
          </table:table-cell>
          <table:table-cell table:formula="of:=[.D358]-[.D35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44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81805555555556" calcext:value-type="float">
            <text:p>0,00181805555555556000</text:p>
          </table:table-cell>
          <table:table-cell table:formula="of:=[.D359]-[.D35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44" office:value-type="float" office:value="15752" calcext:value-type="float">
            <text:p>1575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82314814814815" calcext:value-type="float">
            <text:p>0,00182314814814815000</text:p>
          </table:table-cell>
          <table:table-cell table:formula="of:=[.D360]-[.D35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44" office:value-type="float" office:value="15796" calcext:value-type="float">
            <text:p>15796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82824074074074" calcext:value-type="float">
            <text:p>0,00182824074074074000</text:p>
          </table:table-cell>
          <table:table-cell table:formula="of:=[.D361]-[.D36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44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83333333333333" calcext:value-type="float">
            <text:p>0,00183333333333333000</text:p>
          </table:table-cell>
          <table:table-cell table:formula="of:=[.D362]-[.D36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44" office:value-type="float" office:value="15884" calcext:value-type="float">
            <text:p>15884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83842592592593" calcext:value-type="float">
            <text:p>0,00183842592592593000</text:p>
          </table:table-cell>
          <table:table-cell table:formula="of:=[.D363]-[.D36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44" office:value-type="float" office:value="15928" calcext:value-type="float">
            <text:p>1592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84351851851852" calcext:value-type="float">
            <text:p>0,00184351851851852000</text:p>
          </table:table-cell>
          <table:table-cell table:formula="of:=[.D364]-[.D363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44" office:value-type="float" office:value="15972" calcext:value-type="float">
            <text:p>15972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84861111111111" calcext:value-type="float">
            <text:p>0,00184861111111111000</text:p>
          </table:table-cell>
          <table:table-cell table:formula="of:=[.D365]-[.D36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44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8537037037037" calcext:value-type="float">
            <text:p>0,00185370370370370000</text:p>
          </table:table-cell>
          <table:table-cell table:formula="of:=[.D366]-[.D36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44" office:value-type="float" office:value="16060" calcext:value-type="float">
            <text:p>1606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8587962962963" calcext:value-type="float">
            <text:p>0,00185879629629630000</text:p>
          </table:table-cell>
          <table:table-cell table:formula="of:=[.D367]-[.D36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44" office:value-type="float" office:value="16104" calcext:value-type="float">
            <text:p>1610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86388888888889" calcext:value-type="float">
            <text:p>0,00186388888888889000</text:p>
          </table:table-cell>
          <table:table-cell table:formula="of:=[.D368]-[.D36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44" office:value-type="float" office:value="16148" calcext:value-type="float">
            <text:p>16148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86898148148148" calcext:value-type="float">
            <text:p>0,00186898148148148000</text:p>
          </table:table-cell>
          <table:table-cell table:formula="of:=[.D369]-[.D36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44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87407407407407" calcext:value-type="float">
            <text:p>0,00187407407407407000</text:p>
          </table:table-cell>
          <table:table-cell table:formula="of:=[.D370]-[.D36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44" office:value-type="float" office:value="16236" calcext:value-type="float">
            <text:p>16236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87916666666667" calcext:value-type="float">
            <text:p>0,00187916666666667000</text:p>
          </table:table-cell>
          <table:table-cell table:formula="of:=[.D371]-[.D370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44" office:value-type="float" office:value="16280" calcext:value-type="float">
            <text:p>1628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88425925925926" calcext:value-type="float">
            <text:p>0,00188425925925926000</text:p>
          </table:table-cell>
          <table:table-cell table:formula="of:=[.D372]-[.D37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44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88935185185185" calcext:value-type="float">
            <text:p>0,00188935185185185000</text:p>
          </table:table-cell>
          <table:table-cell table:formula="of:=[.D373]-[.D37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44" office:value-type="float" office:value="16368" calcext:value-type="float">
            <text:p>1636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89444444444444" calcext:value-type="float">
            <text:p>0,00189444444444444000</text:p>
          </table:table-cell>
          <table:table-cell table:formula="of:=[.D374]-[.D37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44" office:value-type="float" office:value="16412" calcext:value-type="float">
            <text:p>16412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89953703703704" calcext:value-type="float">
            <text:p>0,00189953703703704000</text:p>
          </table:table-cell>
          <table:table-cell table:formula="of:=[.D375]-[.D37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44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90462962962963" calcext:value-type="float">
            <text:p>0,00190462962962963000</text:p>
          </table:table-cell>
          <table:table-cell table:formula="of:=[.D376]-[.D37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44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90972222222222" calcext:value-type="float">
            <text:p>0,00190972222222222000</text:p>
          </table:table-cell>
          <table:table-cell table:formula="of:=[.D377]-[.D37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44" office:value-type="float" office:value="16544" calcext:value-type="float">
            <text:p>1654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91481481481481" calcext:value-type="float">
            <text:p>0,00191481481481481000</text:p>
          </table:table-cell>
          <table:table-cell table:formula="of:=[.D378]-[.D377]" office:value-type="float" office:value="0.00000509259259259278" calcext:value-type="float">
            <text:p>0,000005092592592592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44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91990740740741" calcext:value-type="float">
            <text:p>0,00191990740740741000</text:p>
          </table:table-cell>
          <table:table-cell table:formula="of:=[.D379]-[.D37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44" office:value-type="float" office:value="16632" calcext:value-type="float">
            <text:p>1663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925" calcext:value-type="float">
            <text:p>0,00192500000000000000</text:p>
          </table:table-cell>
          <table:table-cell table:formula="of:=[.D380]-[.D37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44" office:value-type="float" office:value="16676" calcext:value-type="float">
            <text:p>16676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93009259259259" calcext:value-type="float">
            <text:p>0,00193009259259259000</text:p>
          </table:table-cell>
          <table:table-cell table:formula="of:=[.D381]-[.D38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44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93518518518519" calcext:value-type="float">
            <text:p>0,00193518518518519000</text:p>
          </table:table-cell>
          <table:table-cell table:formula="of:=[.D382]-[.D38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44" office:value-type="float" office:value="16764" calcext:value-type="float">
            <text:p>16764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94027777777778" calcext:value-type="float">
            <text:p>0,00194027777777778000</text:p>
          </table:table-cell>
          <table:table-cell table:formula="of:=[.D383]-[.D38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44" office:value-type="float" office:value="16808" calcext:value-type="float">
            <text:p>1680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94537037037037" calcext:value-type="float">
            <text:p>0,00194537037037037000</text:p>
          </table:table-cell>
          <table:table-cell table:formula="of:=[.D384]-[.D38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44" office:value-type="float" office:value="16852" calcext:value-type="float">
            <text:p>16852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95046296296296" calcext:value-type="float">
            <text:p>0,00195046296296296000</text:p>
          </table:table-cell>
          <table:table-cell table:formula="of:=[.D385]-[.D38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44" office:value-type="float" office:value="16896" calcext:value-type="float">
            <text:p>1689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95555555555556" calcext:value-type="float">
            <text:p>0,00195555555555556000</text:p>
          </table:table-cell>
          <table:table-cell table:formula="of:=[.D386]-[.D38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44" office:value-type="float" office:value="16940" calcext:value-type="float">
            <text:p>1694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96064814814815" calcext:value-type="float">
            <text:p>0,00196064814814815000</text:p>
          </table:table-cell>
          <table:table-cell table:formula="of:=[.D387]-[.D38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44" office:value-type="float" office:value="16984" calcext:value-type="float">
            <text:p>1698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96574074074074" calcext:value-type="float">
            <text:p>0,00196574074074074000</text:p>
          </table:table-cell>
          <table:table-cell table:formula="of:=[.D388]-[.D38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44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97083333333333" calcext:value-type="float">
            <text:p>0,00197083333333333000</text:p>
          </table:table-cell>
          <table:table-cell table:formula="of:=[.D389]-[.D388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44" office:value-type="float" office:value="17072" calcext:value-type="float">
            <text:p>1707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97592592592593" calcext:value-type="float">
            <text:p>0,00197592592592593000</text:p>
          </table:table-cell>
          <table:table-cell table:formula="of:=[.D390]-[.D38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44" office:value-type="float" office:value="17116" calcext:value-type="float">
            <text:p>17116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98101851851852" calcext:value-type="float">
            <text:p>0,00198101851851852000</text:p>
          </table:table-cell>
          <table:table-cell table:formula="of:=[.D391]-[.D39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44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98611111111111" calcext:value-type="float">
            <text:p>0,00198611111111111000</text:p>
          </table:table-cell>
          <table:table-cell table:formula="of:=[.D392]-[.D39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44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9912037037037" calcext:value-type="float">
            <text:p>0,00199120370370370000</text:p>
          </table:table-cell>
          <table:table-cell table:formula="of:=[.D393]-[.D39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44" office:value-type="float" office:value="17248" calcext:value-type="float">
            <text:p>1724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9962962962963" calcext:value-type="float">
            <text:p>0,00199629629629630000</text:p>
          </table:table-cell>
          <table:table-cell table:formula="of:=[.D394]-[.D39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44" office:value-type="float" office:value="17292" calcext:value-type="float">
            <text:p>17292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00138888888889" calcext:value-type="float">
            <text:p>0,00200138888888889000</text:p>
          </table:table-cell>
          <table:table-cell table:formula="of:=[.D395]-[.D39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44" office:value-type="float" office:value="17336" calcext:value-type="float">
            <text:p>1733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00648148148148" calcext:value-type="float">
            <text:p>0,00200648148148148000</text:p>
          </table:table-cell>
          <table:table-cell table:formula="of:=[.D396]-[.D39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44" office:value-type="float" office:value="17380" calcext:value-type="float">
            <text:p>1738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01157407407407" calcext:value-type="float">
            <text:p>0,00201157407407407000</text:p>
          </table:table-cell>
          <table:table-cell table:formula="of:=[.D397]-[.D39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44" office:value-type="float" office:value="17424" calcext:value-type="float">
            <text:p>1742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01666666666667" calcext:value-type="float">
            <text:p>0,00201666666666667000</text:p>
          </table:table-cell>
          <table:table-cell table:formula="of:=[.D398]-[.D39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44" office:value-type="float" office:value="17468" calcext:value-type="float">
            <text:p>17468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02175925925926" calcext:value-type="float">
            <text:p>0,00202175925925926000</text:p>
          </table:table-cell>
          <table:table-cell table:formula="of:=[.D399]-[.D39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44" office:value-type="float" office:value="17512" calcext:value-type="float">
            <text:p>1751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02685185185185" calcext:value-type="float">
            <text:p>0,00202685185185185000</text:p>
          </table:table-cell>
          <table:table-cell table:formula="of:=[.D400]-[.D39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44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03194444444444" calcext:value-type="float">
            <text:p>0,00203194444444444000</text:p>
          </table:table-cell>
          <table:table-cell table:formula="of:=[.D401]-[.D40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44" office:value-type="float" office:value="17600" calcext:value-type="float">
            <text:p>17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03703703703704" calcext:value-type="float">
            <text:p>0,00203703703703704000</text:p>
          </table:table-cell>
          <table:table-cell table:formula="of:=[.D402]-[.D40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44" office:value-type="float" office:value="17644" calcext:value-type="float">
            <text:p>17644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04212962962963" calcext:value-type="float">
            <text:p>0,00204212962962963000</text:p>
          </table:table-cell>
          <table:table-cell table:formula="of:=[.D403]-[.D402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44" office:value-type="float" office:value="17688" calcext:value-type="float">
            <text:p>1768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04722222222222" calcext:value-type="float">
            <text:p>0,00204722222222222000</text:p>
          </table:table-cell>
          <table:table-cell table:formula="of:=[.D404]-[.D40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44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05231481481482" calcext:value-type="float">
            <text:p>0,00205231481481482000</text:p>
          </table:table-cell>
          <table:table-cell table:formula="of:=[.D405]-[.D40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44" office:value-type="float" office:value="17776" calcext:value-type="float">
            <text:p>1777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05740740740741" calcext:value-type="float">
            <text:p>0,00205740740740741000</text:p>
          </table:table-cell>
          <table:table-cell table:formula="of:=[.D406]-[.D40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44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0625" calcext:value-type="float">
            <text:p>0,00206250000000000000</text:p>
          </table:table-cell>
          <table:table-cell table:formula="of:=[.D407]-[.D40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44" office:value-type="float" office:value="17864" calcext:value-type="float">
            <text:p>1786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06759259259259" calcext:value-type="float">
            <text:p>0,00206759259259259000</text:p>
          </table:table-cell>
          <table:table-cell table:formula="of:=[.D408]-[.D40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44" office:value-type="float" office:value="17908" calcext:value-type="float">
            <text:p>17908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07268518518519" calcext:value-type="float">
            <text:p>0,00207268518518519000</text:p>
          </table:table-cell>
          <table:table-cell table:formula="of:=[.D409]-[.D40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44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07777777777778" calcext:value-type="float">
            <text:p>0,00207777777777778000</text:p>
          </table:table-cell>
          <table:table-cell table:formula="of:=[.D410]-[.D40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44" office:value-type="float" office:value="17996" calcext:value-type="float">
            <text:p>17996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08287037037037" calcext:value-type="float">
            <text:p>0,00208287037037037000</text:p>
          </table:table-cell>
          <table:table-cell table:formula="of:=[.D411]-[.D41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44" office:value-type="float" office:value="18040" calcext:value-type="float">
            <text:p>1804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08796296296296" calcext:value-type="float">
            <text:p>0,00208796296296296000</text:p>
          </table:table-cell>
          <table:table-cell table:formula="of:=[.D412]-[.D41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44" office:value-type="float" office:value="18084" calcext:value-type="float">
            <text:p>18084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09305555555556" calcext:value-type="float">
            <text:p>0,00209305555555556000</text:p>
          </table:table-cell>
          <table:table-cell table:formula="of:=[.D413]-[.D41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44" office:value-type="float" office:value="18128" calcext:value-type="float">
            <text:p>1812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09814814814815" calcext:value-type="float">
            <text:p>0,00209814814814815000</text:p>
          </table:table-cell>
          <table:table-cell table:formula="of:=[.D414]-[.D41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44" office:value-type="float" office:value="18172" calcext:value-type="float">
            <text:p>18172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10324074074074" calcext:value-type="float">
            <text:p>0,00210324074074074000</text:p>
          </table:table-cell>
          <table:table-cell table:formula="of:=[.D415]-[.D41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44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10833333333333" calcext:value-type="float">
            <text:p>0,00210833333333333000</text:p>
          </table:table-cell>
          <table:table-cell table:formula="of:=[.D416]-[.D41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44" office:value-type="float" office:value="18260" calcext:value-type="float">
            <text:p>1826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11342592592593" calcext:value-type="float">
            <text:p>0,00211342592592593000</text:p>
          </table:table-cell>
          <table:table-cell table:formula="of:=[.D417]-[.D416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44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11851851851852" calcext:value-type="float">
            <text:p>0,00211851851851852000</text:p>
          </table:table-cell>
          <table:table-cell table:formula="of:=[.D418]-[.D41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44" office:value-type="float" office:value="18348" calcext:value-type="float">
            <text:p>18348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12361111111111" calcext:value-type="float">
            <text:p>0,00212361111111111000</text:p>
          </table:table-cell>
          <table:table-cell table:formula="of:=[.D419]-[.D41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44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1287037037037" calcext:value-type="float">
            <text:p>0,00212870370370370000</text:p>
          </table:table-cell>
          <table:table-cell table:formula="of:=[.D420]-[.D41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44" office:value-type="float" office:value="18436" calcext:value-type="float">
            <text:p>18436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1337962962963" calcext:value-type="float">
            <text:p>0,00213379629629630000</text:p>
          </table:table-cell>
          <table:table-cell table:formula="of:=[.D421]-[.D42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44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13888888888889" calcext:value-type="float">
            <text:p>0,00213888888888889000</text:p>
          </table:table-cell>
          <table:table-cell table:formula="of:=[.D422]-[.D42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44" office:value-type="float" office:value="18524" calcext:value-type="float">
            <text:p>18524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14398148148148" calcext:value-type="float">
            <text:p>0,00214398148148148000</text:p>
          </table:table-cell>
          <table:table-cell table:formula="of:=[.D423]-[.D42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44" office:value-type="float" office:value="18568" calcext:value-type="float">
            <text:p>1856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14907407407407" calcext:value-type="float">
            <text:p>0,00214907407407407000</text:p>
          </table:table-cell>
          <table:table-cell table:formula="of:=[.D424]-[.D42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44" office:value-type="float" office:value="18612" calcext:value-type="float">
            <text:p>18612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15416666666667" calcext:value-type="float">
            <text:p>0,00215416666666667000</text:p>
          </table:table-cell>
          <table:table-cell table:formula="of:=[.D425]-[.D42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44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15925925925926" calcext:value-type="float">
            <text:p>0,00215925925925926000</text:p>
          </table:table-cell>
          <table:table-cell table:formula="of:=[.D426]-[.D42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44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16435185185185" calcext:value-type="float">
            <text:p>0,00216435185185185000</text:p>
          </table:table-cell>
          <table:table-cell table:formula="of:=[.D427]-[.D42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44" office:value-type="float" office:value="18744" calcext:value-type="float">
            <text:p>1874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16944444444444" calcext:value-type="float">
            <text:p>0,00216944444444444000</text:p>
          </table:table-cell>
          <table:table-cell table:formula="of:=[.D428]-[.D42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44" office:value-type="float" office:value="18788" calcext:value-type="float">
            <text:p>18788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17453703703704" calcext:value-type="float">
            <text:p>0,00217453703703704000</text:p>
          </table:table-cell>
          <table:table-cell table:formula="of:=[.D429]-[.D42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44" office:value-type="float" office:value="18832" calcext:value-type="float">
            <text:p>1883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17962962962963" calcext:value-type="float">
            <text:p>0,00217962962962963000</text:p>
          </table:table-cell>
          <table:table-cell table:formula="of:=[.D430]-[.D42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44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18472222222222" calcext:value-type="float">
            <text:p>0,00218472222222222000</text:p>
          </table:table-cell>
          <table:table-cell table:formula="of:=[.D431]-[.D430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44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18981481481482" calcext:value-type="float">
            <text:p>0,00218981481481482000</text:p>
          </table:table-cell>
          <table:table-cell table:formula="of:=[.D432]-[.D43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44" office:value-type="float" office:value="18964" calcext:value-type="float">
            <text:p>18964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19490740740741" calcext:value-type="float">
            <text:p>0,00219490740740741000</text:p>
          </table:table-cell>
          <table:table-cell table:formula="of:=[.D433]-[.D43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44" office:value-type="float" office:value="19008" calcext:value-type="float">
            <text:p>1900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2" calcext:value-type="float">
            <text:p>0,00220000000000000000</text:p>
          </table:table-cell>
          <table:table-cell table:formula="of:=[.D434]-[.D43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44" office:value-type="float" office:value="19052" calcext:value-type="float">
            <text:p>19052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20509259259259" calcext:value-type="float">
            <text:p>0,00220509259259259000</text:p>
          </table:table-cell>
          <table:table-cell table:formula="of:=[.D435]-[.D43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44" office:value-type="float" office:value="19096" calcext:value-type="float">
            <text:p>1909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21018518518519" calcext:value-type="float">
            <text:p>0,00221018518518519000</text:p>
          </table:table-cell>
          <table:table-cell table:formula="of:=[.D436]-[.D43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44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21527777777778" calcext:value-type="float">
            <text:p>0,00221527777777778000</text:p>
          </table:table-cell>
          <table:table-cell table:formula="of:=[.D437]-[.D43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44" office:value-type="float" office:value="19184" calcext:value-type="float">
            <text:p>1918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22037037037037" calcext:value-type="float">
            <text:p>0,00222037037037037000</text:p>
          </table:table-cell>
          <table:table-cell table:formula="of:=[.D438]-[.D43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44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22546296296296" calcext:value-type="float">
            <text:p>0,00222546296296296000</text:p>
          </table:table-cell>
          <table:table-cell table:formula="of:=[.D439]-[.D43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44" office:value-type="float" office:value="19272" calcext:value-type="float">
            <text:p>1927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23055555555556" calcext:value-type="float">
            <text:p>0,00223055555555556000</text:p>
          </table:table-cell>
          <table:table-cell table:formula="of:=[.D440]-[.D43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44" office:value-type="float" office:value="19316" calcext:value-type="float">
            <text:p>19316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23564814814815" calcext:value-type="float">
            <text:p>0,00223564814814815000</text:p>
          </table:table-cell>
          <table:table-cell table:formula="of:=[.D441]-[.D44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44" office:value-type="float" office:value="19360" calcext:value-type="float">
            <text:p>193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24074074074074" calcext:value-type="float">
            <text:p>0,00224074074074074000</text:p>
          </table:table-cell>
          <table:table-cell table:formula="of:=[.D442]-[.D44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44" office:value-type="float" office:value="19404" calcext:value-type="float">
            <text:p>19404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24583333333333" calcext:value-type="float">
            <text:p>0,00224583333333333000</text:p>
          </table:table-cell>
          <table:table-cell table:formula="of:=[.D443]-[.D44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44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25092592592593" calcext:value-type="float">
            <text:p>0,00225092592592593000</text:p>
          </table:table-cell>
          <table:table-cell table:formula="of:=[.D444]-[.D44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44" office:value-type="float" office:value="19492" calcext:value-type="float">
            <text:p>19492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25601851851852" calcext:value-type="float">
            <text:p>0,00225601851851852000</text:p>
          </table:table-cell>
          <table:table-cell table:formula="of:=[.D445]-[.D444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44" office:value-type="float" office:value="19536" calcext:value-type="float">
            <text:p>1953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26111111111111" calcext:value-type="float">
            <text:p>0,00226111111111111000</text:p>
          </table:table-cell>
          <table:table-cell table:formula="of:=[.D446]-[.D44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44" office:value-type="float" office:value="19580" calcext:value-type="float">
            <text:p>1958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2662037037037" calcext:value-type="float">
            <text:p>0,00226620370370370000</text:p>
          </table:table-cell>
          <table:table-cell table:formula="of:=[.D447]-[.D44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44" office:value-type="float" office:value="19624" calcext:value-type="float">
            <text:p>1962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2712962962963" calcext:value-type="float">
            <text:p>0,00227129629629630000</text:p>
          </table:table-cell>
          <table:table-cell table:formula="of:=[.D448]-[.D44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44" office:value-type="float" office:value="19668" calcext:value-type="float">
            <text:p>19668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27638888888889" calcext:value-type="float">
            <text:p>0,00227638888888889000</text:p>
          </table:table-cell>
          <table:table-cell table:formula="of:=[.D449]-[.D44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44" office:value-type="float" office:value="19712" calcext:value-type="float">
            <text:p>1971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28148148148148" calcext:value-type="float">
            <text:p>0,00228148148148148000</text:p>
          </table:table-cell>
          <table:table-cell table:formula="of:=[.D450]-[.D44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44" office:value-type="float" office:value="19756" calcext:value-type="float">
            <text:p>19756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28657407407407" calcext:value-type="float">
            <text:p>0,00228657407407407000</text:p>
          </table:table-cell>
          <table:table-cell table:formula="of:=[.D451]-[.D45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44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29166666666667" calcext:value-type="float">
            <text:p>0,00229166666666667000</text:p>
          </table:table-cell>
          <table:table-cell table:formula="of:=[.D452]-[.D45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44" office:value-type="float" office:value="19844" calcext:value-type="float">
            <text:p>19844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29675925925926" calcext:value-type="float">
            <text:p>0,00229675925925926000</text:p>
          </table:table-cell>
          <table:table-cell table:formula="of:=[.D453]-[.D45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44" office:value-type="float" office:value="19888" calcext:value-type="float">
            <text:p>1988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30185185185185" calcext:value-type="float">
            <text:p>0,00230185185185185000</text:p>
          </table:table-cell>
          <table:table-cell table:formula="of:=[.D454]-[.D45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44" office:value-type="float" office:value="19932" calcext:value-type="float">
            <text:p>19932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30694444444444" calcext:value-type="float">
            <text:p>0,00230694444444444000</text:p>
          </table:table-cell>
          <table:table-cell table:formula="of:=[.D455]-[.D45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44" office:value-type="float" office:value="19976" calcext:value-type="float">
            <text:p>1997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31203703703704" calcext:value-type="float">
            <text:p>0,00231203703703704000</text:p>
          </table:table-cell>
          <table:table-cell table:formula="of:=[.D456]-[.D45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44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31712962962963" calcext:value-type="float">
            <text:p>0,00231712962962963000</text:p>
          </table:table-cell>
          <table:table-cell table:formula="of:=[.D457]-[.D45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44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32222222222222" calcext:value-type="float">
            <text:p>0,00232222222222222000</text:p>
          </table:table-cell>
          <table:table-cell table:formula="of:=[.D458]-[.D45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44" office:value-type="float" office:value="20108" calcext:value-type="float">
            <text:p>20108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32731481481481" calcext:value-type="float">
            <text:p>0,00232731481481481000</text:p>
          </table:table-cell>
          <table:table-cell table:formula="of:=[.D459]-[.D458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44" office:value-type="float" office:value="20152" calcext:value-type="float">
            <text:p>2015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33240740740741" calcext:value-type="float">
            <text:p>0,00233240740740741000</text:p>
          </table:table-cell>
          <table:table-cell table:formula="of:=[.D460]-[.D45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44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3375" calcext:value-type="float">
            <text:p>0,00233750000000000000</text:p>
          </table:table-cell>
          <table:table-cell table:formula="of:=[.D461]-[.D46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44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34259259259259" calcext:value-type="float">
            <text:p>0,00234259259259259000</text:p>
          </table:table-cell>
          <table:table-cell table:formula="of:=[.D462]-[.D46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44" office:value-type="float" office:value="20284" calcext:value-type="float">
            <text:p>20284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34768518518519" calcext:value-type="float">
            <text:p>0,00234768518518519000</text:p>
          </table:table-cell>
          <table:table-cell table:formula="of:=[.D463]-[.D46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44" office:value-type="float" office:value="20328" calcext:value-type="float">
            <text:p>2032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235277777777778" calcext:value-type="float">
            <text:p>0,00235277777777778000</text:p>
          </table:table-cell>
          <table:table-cell table:formula="of:=[.D464]-[.D46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44" office:value-type="float" office:value="20372" calcext:value-type="float">
            <text:p>20372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235787037037037" calcext:value-type="float">
            <text:p>0,00235787037037037000</text:p>
          </table:table-cell>
          <table:table-cell table:formula="of:=[.D465]-[.D46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44" office:value-type="float" office:value="20416" calcext:value-type="float">
            <text:p>2041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236296296296296" calcext:value-type="float">
            <text:p>0,00236296296296296000</text:p>
          </table:table-cell>
          <table:table-cell table:formula="of:=[.D466]-[.D46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44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236805555555556" calcext:value-type="float">
            <text:p>0,00236805555555556000</text:p>
          </table:table-cell>
          <table:table-cell table:formula="of:=[.D467]-[.D46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44" office:value-type="float" office:value="20504" calcext:value-type="float">
            <text:p>2050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237314814814815" calcext:value-type="float">
            <text:p>0,00237314814814815000</text:p>
          </table:table-cell>
          <table:table-cell table:formula="of:=[.D468]-[.D46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44" office:value-type="float" office:value="20548" calcext:value-type="float">
            <text:p>20548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237824074074074" calcext:value-type="float">
            <text:p>0,00237824074074074000</text:p>
          </table:table-cell>
          <table:table-cell table:formula="of:=[.D469]-[.D46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44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238333333333333" calcext:value-type="float">
            <text:p>0,00238333333333333000</text:p>
          </table:table-cell>
          <table:table-cell table:formula="of:=[.D470]-[.D46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44" office:value-type="float" office:value="20636" calcext:value-type="float">
            <text:p>20636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238842592592593" calcext:value-type="float">
            <text:p>0,00238842592592593000</text:p>
          </table:table-cell>
          <table:table-cell table:formula="of:=[.D471]-[.D47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44" office:value-type="float" office:value="20680" calcext:value-type="float">
            <text:p>2068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239351851851852" calcext:value-type="float">
            <text:p>0,00239351851851852000</text:p>
          </table:table-cell>
          <table:table-cell table:formula="of:=[.D472]-[.D47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44" office:value-type="float" office:value="20724" calcext:value-type="float">
            <text:p>20724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239861111111111" calcext:value-type="float">
            <text:p>0,00239861111111111000</text:p>
          </table:table-cell>
          <table:table-cell table:formula="of:=[.D473]-[.D472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44" office:value-type="float" office:value="20768" calcext:value-type="float">
            <text:p>2076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24037037037037" calcext:value-type="float">
            <text:p>0,00240370370370370000</text:p>
          </table:table-cell>
          <table:table-cell table:formula="of:=[.D474]-[.D47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44" office:value-type="float" office:value="20812" calcext:value-type="float">
            <text:p>20812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24087962962963" calcext:value-type="float">
            <text:p>0,00240879629629630000</text:p>
          </table:table-cell>
          <table:table-cell table:formula="of:=[.D475]-[.D47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44" office:value-type="float" office:value="20856" calcext:value-type="float">
            <text:p>2085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241388888888889" calcext:value-type="float">
            <text:p>0,00241388888888889000</text:p>
          </table:table-cell>
          <table:table-cell table:formula="of:=[.D476]-[.D47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44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241898148148148" calcext:value-type="float">
            <text:p>0,00241898148148148000</text:p>
          </table:table-cell>
          <table:table-cell table:formula="of:=[.D477]-[.D47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44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242407407407407" calcext:value-type="float">
            <text:p>0,00242407407407407000</text:p>
          </table:table-cell>
          <table:table-cell table:formula="of:=[.D478]-[.D47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44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242916666666667" calcext:value-type="float">
            <text:p>0,00242916666666667000</text:p>
          </table:table-cell>
          <table:table-cell table:formula="of:=[.D479]-[.D47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44" office:value-type="float" office:value="21032" calcext:value-type="float">
            <text:p>2103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243425925925926" calcext:value-type="float">
            <text:p>0,00243425925925926000</text:p>
          </table:table-cell>
          <table:table-cell table:formula="of:=[.D480]-[.D47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44" office:value-type="float" office:value="21076" calcext:value-type="float">
            <text:p>21076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243935185185185" calcext:value-type="float">
            <text:p>0,00243935185185185000</text:p>
          </table:table-cell>
          <table:table-cell table:formula="of:=[.D481]-[.D48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44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244444444444444" calcext:value-type="float">
            <text:p>0,00244444444444444000</text:p>
          </table:table-cell>
          <table:table-cell table:formula="of:=[.D482]-[.D48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44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244953703703704" calcext:value-type="float">
            <text:p>0,00244953703703704000</text:p>
          </table:table-cell>
          <table:table-cell table:formula="of:=[.D483]-[.D48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44" office:value-type="float" office:value="21208" calcext:value-type="float">
            <text:p>2120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245462962962963" calcext:value-type="float">
            <text:p>0,00245462962962963000</text:p>
          </table:table-cell>
          <table:table-cell table:formula="of:=[.D484]-[.D48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44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245972222222222" calcext:value-type="float">
            <text:p>0,00245972222222222000</text:p>
          </table:table-cell>
          <table:table-cell table:formula="of:=[.D485]-[.D48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44" office:value-type="float" office:value="21296" calcext:value-type="float">
            <text:p>2129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246481481481481" calcext:value-type="float">
            <text:p>0,00246481481481481000</text:p>
          </table:table-cell>
          <table:table-cell table:formula="of:=[.D486]-[.D48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44" office:value-type="float" office:value="21340" calcext:value-type="float">
            <text:p>2134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246990740740741" calcext:value-type="float">
            <text:p>0,00246990740740741000</text:p>
          </table:table-cell>
          <table:table-cell table:formula="of:=[.D487]-[.D486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44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2475" calcext:value-type="float">
            <text:p>0,00247500000000000000</text:p>
          </table:table-cell>
          <table:table-cell table:formula="of:=[.D488]-[.D48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44" office:value-type="float" office:value="21428" calcext:value-type="float">
            <text:p>21428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248009259259259" calcext:value-type="float">
            <text:p>0,00248009259259259000</text:p>
          </table:table-cell>
          <table:table-cell table:formula="of:=[.D489]-[.D48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44" office:value-type="float" office:value="21472" calcext:value-type="float">
            <text:p>2147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248518518518519" calcext:value-type="float">
            <text:p>0,00248518518518519000</text:p>
          </table:table-cell>
          <table:table-cell table:formula="of:=[.D490]-[.D48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44" office:value-type="float" office:value="21516" calcext:value-type="float">
            <text:p>21516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249027777777778" calcext:value-type="float">
            <text:p>0,00249027777777778000</text:p>
          </table:table-cell>
          <table:table-cell table:formula="of:=[.D491]-[.D49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44" office:value-type="float" office:value="21560" calcext:value-type="float">
            <text:p>2156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249537037037037" calcext:value-type="float">
            <text:p>0,00249537037037037000</text:p>
          </table:table-cell>
          <table:table-cell table:formula="of:=[.D492]-[.D49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44" office:value-type="float" office:value="21604" calcext:value-type="float">
            <text:p>21604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250046296296296" calcext:value-type="float">
            <text:p>0,00250046296296296000</text:p>
          </table:table-cell>
          <table:table-cell table:formula="of:=[.D493]-[.D49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44" office:value-type="float" office:value="21648" calcext:value-type="float">
            <text:p>2164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250555555555556" calcext:value-type="float">
            <text:p>0,00250555555555556000</text:p>
          </table:table-cell>
          <table:table-cell table:formula="of:=[.D494]-[.D49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44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251064814814815" calcext:value-type="float">
            <text:p>0,00251064814814815000</text:p>
          </table:table-cell>
          <table:table-cell table:formula="of:=[.D495]-[.D49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44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251574074074074" calcext:value-type="float">
            <text:p>0,00251574074074074000</text:p>
          </table:table-cell>
          <table:table-cell table:formula="of:=[.D496]-[.D49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44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252083333333333" calcext:value-type="float">
            <text:p>0,00252083333333333000</text:p>
          </table:table-cell>
          <table:table-cell table:formula="of:=[.D497]-[.D49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44" office:value-type="float" office:value="21824" calcext:value-type="float">
            <text:p>2182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252592592592593" calcext:value-type="float">
            <text:p>0,00252592592592593000</text:p>
          </table:table-cell>
          <table:table-cell table:formula="of:=[.D498]-[.D49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44" office:value-type="float" office:value="21868" calcext:value-type="float">
            <text:p>21868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253101851851852" calcext:value-type="float">
            <text:p>0,00253101851851852000</text:p>
          </table:table-cell>
          <table:table-cell table:formula="of:=[.D499]-[.D49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44" office:value-type="float" office:value="21912" calcext:value-type="float">
            <text:p>2191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253611111111111" calcext:value-type="float">
            <text:p>0,00253611111111111000</text:p>
          </table:table-cell>
          <table:table-cell table:formula="of:=[.D500]-[.D49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44" office:value-type="float" office:value="21956" calcext:value-type="float">
            <text:p>21956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25412037037037" calcext:value-type="float">
            <text:p>0,00254120370370370000</text:p>
          </table:table-cell>
          <table:table-cell table:formula="of:=[.D501]-[.D500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44" office:value-type="float" office:value="22000" calcext:value-type="float">
            <text:p>22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25462962962963" calcext:value-type="float">
            <text:p>0,00254629629629630000</text:p>
          </table:table-cell>
          <table:table-cell table:formula="of:=[.D502]-[.D50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44" office:value-type="float" office:value="22044" calcext:value-type="float">
            <text:p>22044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255138888888889" calcext:value-type="float">
            <text:p>0,00255138888888889000</text:p>
          </table:table-cell>
          <table:table-cell table:formula="of:=[.D503]-[.D50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44" office:value-type="float" office:value="22088" calcext:value-type="float">
            <text:p>2208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255648148148148" calcext:value-type="float">
            <text:p>0,00255648148148148000</text:p>
          </table:table-cell>
          <table:table-cell table:formula="of:=[.D504]-[.D50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44" office:value-type="float" office:value="22132" calcext:value-type="float">
            <text:p>22132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256157407407407" calcext:value-type="float">
            <text:p>0,00256157407407407000</text:p>
          </table:table-cell>
          <table:table-cell table:formula="of:=[.D505]-[.D50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44" office:value-type="float" office:value="22176" calcext:value-type="float">
            <text:p>2217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256666666666667" calcext:value-type="float">
            <text:p>0,00256666666666667000</text:p>
          </table:table-cell>
          <table:table-cell table:formula="of:=[.D506]-[.D50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44" office:value-type="float" office:value="22220" calcext:value-type="float">
            <text:p>2222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257175925925926" calcext:value-type="float">
            <text:p>0,00257175925925926000</text:p>
          </table:table-cell>
          <table:table-cell table:formula="of:=[.D507]-[.D50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44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257685185185185" calcext:value-type="float">
            <text:p>0,00257685185185185000</text:p>
          </table:table-cell>
          <table:table-cell table:formula="of:=[.D508]-[.D50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44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258194444444444" calcext:value-type="float">
            <text:p>0,00258194444444444000</text:p>
          </table:table-cell>
          <table:table-cell table:formula="of:=[.D509]-[.D50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44" office:value-type="float" office:value="22352" calcext:value-type="float">
            <text:p>2235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258703703703704" calcext:value-type="float">
            <text:p>0,00258703703703704000</text:p>
          </table:table-cell>
          <table:table-cell table:formula="of:=[.D510]-[.D50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44" office:value-type="float" office:value="22396" calcext:value-type="float">
            <text:p>22396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59212962962963" calcext:value-type="float">
            <text:p>0,00259212962962963000</text:p>
          </table:table-cell>
          <table:table-cell table:formula="of:=[.D511]-[.D51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44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59722222222222" calcext:value-type="float">
            <text:p>0,00259722222222222000</text:p>
          </table:table-cell>
          <table:table-cell table:formula="of:=[.D512]-[.D51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44" office:value-type="float" office:value="22484" calcext:value-type="float">
            <text:p>22484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60231481481481" calcext:value-type="float">
            <text:p>0,00260231481481481000</text:p>
          </table:table-cell>
          <table:table-cell table:formula="of:=[.D513]-[.D51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44" office:value-type="float" office:value="22528" calcext:value-type="float">
            <text:p>2252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60740740740741" calcext:value-type="float">
            <text:p>0,00260740740740741000</text:p>
          </table:table-cell>
          <table:table-cell table:formula="of:=[.D514]-[.D51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44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6125" calcext:value-type="float">
            <text:p>0,00261250000000000000</text:p>
          </table:table-cell>
          <table:table-cell table:formula="of:=[.D515]-[.D514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44" office:value-type="float" office:value="22616" calcext:value-type="float">
            <text:p>2261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61759259259259" calcext:value-type="float">
            <text:p>0,00261759259259259000</text:p>
          </table:table-cell>
          <table:table-cell table:formula="of:=[.D516]-[.D51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44" office:value-type="float" office:value="22660" calcext:value-type="float">
            <text:p>2266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62268518518519" calcext:value-type="float">
            <text:p>0,00262268518518519000</text:p>
          </table:table-cell>
          <table:table-cell table:formula="of:=[.D517]-[.D51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44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62777777777778" calcext:value-type="float">
            <text:p>0,00262777777777778000</text:p>
          </table:table-cell>
          <table:table-cell table:formula="of:=[.D518]-[.D51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44" office:value-type="float" office:value="22748" calcext:value-type="float">
            <text:p>22748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63287037037037" calcext:value-type="float">
            <text:p>0,00263287037037037000</text:p>
          </table:table-cell>
          <table:table-cell table:formula="of:=[.D519]-[.D51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44" office:value-type="float" office:value="22792" calcext:value-type="float">
            <text:p>2279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63796296296296" calcext:value-type="float">
            <text:p>0,00263796296296296000</text:p>
          </table:table-cell>
          <table:table-cell table:formula="of:=[.D520]-[.D51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44" office:value-type="float" office:value="22836" calcext:value-type="float">
            <text:p>22836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64305555555556" calcext:value-type="float">
            <text:p>0,00264305555555556000</text:p>
          </table:table-cell>
          <table:table-cell table:formula="of:=[.D521]-[.D52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44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64814814814815" calcext:value-type="float">
            <text:p>0,00264814814814815000</text:p>
          </table:table-cell>
          <table:table-cell table:formula="of:=[.D522]-[.D52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44" office:value-type="float" office:value="22924" calcext:value-type="float">
            <text:p>22924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65324074074074" calcext:value-type="float">
            <text:p>0,00265324074074074000</text:p>
          </table:table-cell>
          <table:table-cell table:formula="of:=[.D523]-[.D52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44" office:value-type="float" office:value="22968" calcext:value-type="float">
            <text:p>2296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65833333333333" calcext:value-type="float">
            <text:p>0,00265833333333333000</text:p>
          </table:table-cell>
          <table:table-cell table:formula="of:=[.D524]-[.D52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44" office:value-type="float" office:value="23012" calcext:value-type="float">
            <text:p>23012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66342592592593" calcext:value-type="float">
            <text:p>0,00266342592592593000</text:p>
          </table:table-cell>
          <table:table-cell table:formula="of:=[.D525]-[.D52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44" office:value-type="float" office:value="23056" calcext:value-type="float">
            <text:p>2305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66851851851852" calcext:value-type="float">
            <text:p>0,00266851851851852000</text:p>
          </table:table-cell>
          <table:table-cell table:formula="of:=[.D526]-[.D52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44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67361111111111" calcext:value-type="float">
            <text:p>0,00267361111111111000</text:p>
          </table:table-cell>
          <table:table-cell table:formula="of:=[.D527]-[.D52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44" office:value-type="float" office:value="23144" calcext:value-type="float">
            <text:p>2314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6787037037037" calcext:value-type="float">
            <text:p>0,00267870370370370000</text:p>
          </table:table-cell>
          <table:table-cell table:formula="of:=[.D528]-[.D52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44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6837962962963" calcext:value-type="float">
            <text:p>0,00268379629629630000</text:p>
          </table:table-cell>
          <table:table-cell table:formula="of:=[.D529]-[.D528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44" office:value-type="float" office:value="23232" calcext:value-type="float">
            <text:p>2323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68888888888889" calcext:value-type="float">
            <text:p>0,00268888888888889000</text:p>
          </table:table-cell>
          <table:table-cell table:formula="of:=[.D530]-[.D52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44" office:value-type="float" office:value="23276" calcext:value-type="float">
            <text:p>23276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69398148148148" calcext:value-type="float">
            <text:p>0,00269398148148148000</text:p>
          </table:table-cell>
          <table:table-cell table:formula="of:=[.D531]-[.D53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44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69907407407407" calcext:value-type="float">
            <text:p>0,00269907407407407000</text:p>
          </table:table-cell>
          <table:table-cell table:formula="of:=[.D532]-[.D53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44" office:value-type="float" office:value="23364" calcext:value-type="float">
            <text:p>23364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70416666666667" calcext:value-type="float">
            <text:p>0,00270416666666667000</text:p>
          </table:table-cell>
          <table:table-cell table:formula="of:=[.D533]-[.D532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44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70925925925926" calcext:value-type="float">
            <text:p>0,00270925925925926000</text:p>
          </table:table-cell>
          <table:table-cell table:formula="of:=[.D534]-[.D53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44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71435185185185" calcext:value-type="float">
            <text:p>0,00271435185185185000</text:p>
          </table:table-cell>
          <table:table-cell table:formula="of:=[.D535]-[.D53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44" office:value-type="float" office:value="23496" calcext:value-type="float">
            <text:p>2349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71944444444444" calcext:value-type="float">
            <text:p>0,00271944444444444000</text:p>
          </table:table-cell>
          <table:table-cell table:formula="of:=[.D536]-[.D53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44" office:value-type="float" office:value="23540" calcext:value-type="float">
            <text:p>2354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72453703703704" calcext:value-type="float">
            <text:p>0,00272453703703704000</text:p>
          </table:table-cell>
          <table:table-cell table:formula="of:=[.D537]-[.D536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44" office:value-type="float" office:value="23584" calcext:value-type="float">
            <text:p>2358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72962962962963" calcext:value-type="float">
            <text:p>0,00272962962962963000</text:p>
          </table:table-cell>
          <table:table-cell table:formula="of:=[.D538]-[.D537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44" office:value-type="float" office:value="23628" calcext:value-type="float">
            <text:p>23628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73472222222222" calcext:value-type="float">
            <text:p>0,00273472222222222000</text:p>
          </table:table-cell>
          <table:table-cell table:formula="of:=[.D539]-[.D538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44" office:value-type="float" office:value="23672" calcext:value-type="float">
            <text:p>2367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73981481481481" calcext:value-type="float">
            <text:p>0,00273981481481481000</text:p>
          </table:table-cell>
          <table:table-cell table:formula="of:=[.D540]-[.D539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44" office:value-type="float" office:value="23716" calcext:value-type="float">
            <text:p>23716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74490740740741" calcext:value-type="float">
            <text:p>0,00274490740740741000</text:p>
          </table:table-cell>
          <table:table-cell table:formula="of:=[.D541]-[.D540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44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75" calcext:value-type="float">
            <text:p>0,00275000000000000000</text:p>
          </table:table-cell>
          <table:table-cell table:formula="of:=[.D542]-[.D541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44" office:value-type="float" office:value="23804" calcext:value-type="float">
            <text:p>23804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75509259259259" calcext:value-type="float">
            <text:p>0,00275509259259259000</text:p>
          </table:table-cell>
          <table:table-cell table:formula="of:=[.D543]-[.D542]" office:value-type="float" office:value="0.000005092592592593" calcext:value-type="float">
            <text:p>0,000005092592592593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44" office:value-type="float" office:value="23848" calcext:value-type="float">
            <text:p>2384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76018518518519" calcext:value-type="float">
            <text:p>0,00276018518518519000</text:p>
          </table:table-cell>
          <table:table-cell table:formula="of:=[.D544]-[.D543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44" office:value-type="float" office:value="23892" calcext:value-type="float">
            <text:p>23892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76527777777778" calcext:value-type="float">
            <text:p>0,00276527777777778000</text:p>
          </table:table-cell>
          <table:table-cell table:formula="of:=[.D545]-[.D544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44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77037037037037" calcext:value-type="float">
            <text:p>0,00277037037037037000</text:p>
          </table:table-cell>
          <table:table-cell table:formula="of:=[.D546]-[.D545]" office:value-type="float" office:value="0.00000509259259259256" calcext:value-type="float">
            <text:p>0,0000050925925925925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44" office:value-type="float" office:value="23980" calcext:value-type="float">
            <text:p>2398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77546296296296" calcext:value-type="float">
            <text:p>0,00277546296296296000</text:p>
          </table:table-cell>
          <table:table-cell table:formula="of:=#REF!-[.D546]" office:value-type="string" office:string-value="" calcext:value-type="error">
            <text:p>#REF!</text:p>
          </table:table-cell>
        </table:table-row>
        <table:table-row table:style-name="ro1" table:number-rows-repeated="10480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7:39:45.821831352</meta:creation-date>
    <dc:date>2026-05-17T17:39:55.930772836</dc:date>
    <meta:editing-duration>PT11S</meta:editing-duration>
    <meta:editing-cycles>1</meta:editing-cycles>
    <meta:document-statistic meta:table-count="1" meta:cell-count="2730" meta:object-count="0"/>
    <meta:generator>LibreOffice/24.2.7.2$Linux_X86_64 LibreOffice_project/420$Build-2</meta:generator>
  </office:meta>
</office:document-meta>
</file>