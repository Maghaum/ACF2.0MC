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7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9"/>
        <table:table-column table:style-name="co2" table:number-columns-repeated="16379" table:default-cell-style-name="ce6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12268518518519" calcext:value-type="float">
            <text:p>0,00001122685185185190</text:p>
          </table:table-cell>
          <table:table-cell table:formula="of:=[.D3]-[.D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7" office:value-type="float" office:value="194" calcext:value-type="float">
            <text:p>19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24537037037037" calcext:value-type="float">
            <text:p>0,00002245370370370370</text:p>
          </table:table-cell>
          <table:table-cell table:formula="of:=[.D4]-[.D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7" office:value-type="float" office:value="291" calcext:value-type="float">
            <text:p>29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36805555555556" calcext:value-type="float">
            <text:p>0,00003368055555555560</text:p>
          </table:table-cell>
          <table:table-cell table:formula="of:=[.D5]-[.D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7" office:value-type="float" office:value="388" calcext:value-type="float">
            <text:p>38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49074074074074" calcext:value-type="float">
            <text:p>0,00004490740740740740</text:p>
          </table:table-cell>
          <table:table-cell table:formula="of:=[.D6]-[.D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7" office:value-type="float" office:value="485" calcext:value-type="float">
            <text:p>48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61342592592593" calcext:value-type="float">
            <text:p>0,00005613425925925930</text:p>
          </table:table-cell>
          <table:table-cell table:formula="of:=[.D7]-[.D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7" office:value-type="float" office:value="582" calcext:value-type="float">
            <text:p>58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73611111111111" calcext:value-type="float">
            <text:p>0,00006736111111111110</text:p>
          </table:table-cell>
          <table:table-cell table:formula="of:=[.D8]-[.D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7" office:value-type="float" office:value="679" calcext:value-type="float">
            <text:p>67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8587962962963" calcext:value-type="float">
            <text:p>0,00007858796296296300</text:p>
          </table:table-cell>
          <table:table-cell table:formula="of:=[.D9]-[.D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7" office:value-type="float" office:value="776" calcext:value-type="float">
            <text:p>77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98148148148148" calcext:value-type="float">
            <text:p>0,00008981481481481480</text:p>
          </table:table-cell>
          <table:table-cell table:formula="of:=[.D10]-[.D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7" office:value-type="float" office:value="873" calcext:value-type="float">
            <text:p>87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101041666666667" calcext:value-type="float">
            <text:p>0,00010104166666666700</text:p>
          </table:table-cell>
          <table:table-cell table:formula="of:=[.D11]-[.D1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7" office:value-type="float" office:value="970" calcext:value-type="float">
            <text:p>9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12268518518519" calcext:value-type="float">
            <text:p>0,00011226851851851900</text:p>
          </table:table-cell>
          <table:table-cell table:formula="of:=[.D12]-[.D1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7" office:value-type="float" office:value="1067" calcext:value-type="float">
            <text:p>106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349537037037" calcext:value-type="float">
            <text:p>0,00012349537037037000</text:p>
          </table:table-cell>
          <table:table-cell table:formula="of:=[.D13]-[.D12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7" office:value-type="float" office:value="1164" calcext:value-type="float">
            <text:p>116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4722222222222" calcext:value-type="float">
            <text:p>0,00013472222222222200</text:p>
          </table:table-cell>
          <table:table-cell table:formula="of:=[.D14]-[.D1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7" office:value-type="float" office:value="1261" calcext:value-type="float">
            <text:p>126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45949074074074" calcext:value-type="float">
            <text:p>0,00014594907407407400</text:p>
          </table:table-cell>
          <table:table-cell table:formula="of:=[.D15]-[.D14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7" office:value-type="float" office:value="1358" calcext:value-type="float">
            <text:p>135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7175925925926" calcext:value-type="float">
            <text:p>0,00015717592592592600</text:p>
          </table:table-cell>
          <table:table-cell table:formula="of:=[.D16]-[.D1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7" office:value-type="float" office:value="1455" calcext:value-type="float">
            <text:p>145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68402777777778" calcext:value-type="float">
            <text:p>0,00016840277777777800</text:p>
          </table:table-cell>
          <table:table-cell table:formula="of:=[.D17]-[.D16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7" office:value-type="float" office:value="1552" calcext:value-type="float">
            <text:p>155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962962962963" calcext:value-type="float">
            <text:p>0,00017962962962963000</text:p>
          </table:table-cell>
          <table:table-cell table:formula="of:=[.D18]-[.D1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7" office:value-type="float" office:value="1649" calcext:value-type="float">
            <text:p>164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90856481481482" calcext:value-type="float">
            <text:p>0,00019085648148148200</text:p>
          </table:table-cell>
          <table:table-cell table:formula="of:=[.D19]-[.D18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7" office:value-type="float" office:value="1746" calcext:value-type="float">
            <text:p>174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202083333333333" calcext:value-type="float">
            <text:p>0,00020208333333333300</text:p>
          </table:table-cell>
          <table:table-cell table:formula="of:=[.D20]-[.D1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7" office:value-type="float" office:value="1843" calcext:value-type="float">
            <text:p>184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13310185185185" calcext:value-type="float">
            <text:p>0,00021331018518518500</text:p>
          </table:table-cell>
          <table:table-cell table:formula="of:=[.D21]-[.D20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7" office:value-type="float" office:value="1940" calcext:value-type="float">
            <text:p>19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24537037037037" calcext:value-type="float">
            <text:p>0,00022453703703703700</text:p>
          </table:table-cell>
          <table:table-cell table:formula="of:=[.D22]-[.D2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7" office:value-type="float" office:value="2037" calcext:value-type="float">
            <text:p>203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35763888888889" calcext:value-type="float">
            <text:p>0,00023576388888888900</text:p>
          </table:table-cell>
          <table:table-cell table:formula="of:=[.D23]-[.D2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7" office:value-type="float" office:value="2134" calcext:value-type="float">
            <text:p>213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46990740740741" calcext:value-type="float">
            <text:p>0,00024699074074074100</text:p>
          </table:table-cell>
          <table:table-cell table:formula="of:=[.D24]-[.D23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7" office:value-type="float" office:value="2231" calcext:value-type="float">
            <text:p>223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58217592592593" calcext:value-type="float">
            <text:p>0,00025821759259259300</text:p>
          </table:table-cell>
          <table:table-cell table:formula="of:=[.D25]-[.D24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7" office:value-type="float" office:value="2328" calcext:value-type="float">
            <text:p>232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69444444444444" calcext:value-type="float">
            <text:p>0,00026944444444444400</text:p>
          </table:table-cell>
          <table:table-cell table:formula="of:=[.D26]-[.D25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7" office:value-type="float" office:value="2425" calcext:value-type="float">
            <text:p>24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80671296296296" calcext:value-type="float">
            <text:p>0,00028067129629629600</text:p>
          </table:table-cell>
          <table:table-cell table:formula="of:=[.D27]-[.D2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7" office:value-type="float" office:value="2522" calcext:value-type="float">
            <text:p>252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91898148148148" calcext:value-type="float">
            <text:p>0,00029189814814814800</text:p>
          </table:table-cell>
          <table:table-cell table:formula="of:=[.D28]-[.D27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7" office:value-type="float" office:value="2619" calcext:value-type="float">
            <text:p>261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303125" calcext:value-type="float">
            <text:p>0,00030312500000000000</text:p>
          </table:table-cell>
          <table:table-cell table:formula="of:=[.D29]-[.D28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7" office:value-type="float" office:value="2716" calcext:value-type="float">
            <text:p>271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14351851851852" calcext:value-type="float">
            <text:p>0,00031435185185185200</text:p>
          </table:table-cell>
          <table:table-cell table:formula="of:=[.D30]-[.D29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7" office:value-type="float" office:value="2813" calcext:value-type="float">
            <text:p>281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25578703703704" calcext:value-type="float">
            <text:p>0,00032557870370370400</text:p>
          </table:table-cell>
          <table:table-cell table:formula="of:=[.D31]-[.D3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7" office:value-type="float" office:value="2910" calcext:value-type="float">
            <text:p>29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36805555555556" calcext:value-type="float">
            <text:p>0,00033680555555555600</text:p>
          </table:table-cell>
          <table:table-cell table:formula="of:=[.D32]-[.D31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7" office:value-type="float" office:value="3007" calcext:value-type="float">
            <text:p>300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48032407407407" calcext:value-type="float">
            <text:p>0,00034803240740740700</text:p>
          </table:table-cell>
          <table:table-cell table:formula="of:=[.D33]-[.D32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7" office:value-type="float" office:value="3104" calcext:value-type="float">
            <text:p>310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59259259259259" calcext:value-type="float">
            <text:p>0,00035925925925925900</text:p>
          </table:table-cell>
          <table:table-cell table:formula="of:=[.D34]-[.D33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7" office:value-type="float" office:value="3201" calcext:value-type="float">
            <text:p>320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70486111111111" calcext:value-type="float">
            <text:p>0,00037048611111111100</text:p>
          </table:table-cell>
          <table:table-cell table:formula="of:=[.D35]-[.D3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7" office:value-type="float" office:value="3298" calcext:value-type="float">
            <text:p>329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81712962962963" calcext:value-type="float">
            <text:p>0,00038171296296296300</text:p>
          </table:table-cell>
          <table:table-cell table:formula="of:=[.D36]-[.D35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7" office:value-type="float" office:value="3395" calcext:value-type="float">
            <text:p>339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92939814814815" calcext:value-type="float">
            <text:p>0,00039293981481481500</text:p>
          </table:table-cell>
          <table:table-cell table:formula="of:=[.D37]-[.D36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7" office:value-type="float" office:value="3492" calcext:value-type="float">
            <text:p>349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404166666666667" calcext:value-type="float">
            <text:p>0,00040416666666666700</text:p>
          </table:table-cell>
          <table:table-cell table:formula="of:=[.D38]-[.D37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7" office:value-type="float" office:value="3589" calcext:value-type="float">
            <text:p>358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15393518518519" calcext:value-type="float">
            <text:p>0,00041539351851851900</text:p>
          </table:table-cell>
          <table:table-cell table:formula="of:=[.D39]-[.D3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7" office:value-type="float" office:value="3686" calcext:value-type="float">
            <text:p>368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2662037037037" calcext:value-type="float">
            <text:p>0,00042662037037037000</text:p>
          </table:table-cell>
          <table:table-cell table:formula="of:=[.D40]-[.D39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7" office:value-type="float" office:value="3783" calcext:value-type="float">
            <text:p>378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37847222222222" calcext:value-type="float">
            <text:p>0,00043784722222222200</text:p>
          </table:table-cell>
          <table:table-cell table:formula="of:=[.D41]-[.D40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7" office:value-type="float" office:value="3880" calcext:value-type="float">
            <text:p>38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49074074074074" calcext:value-type="float">
            <text:p>0,00044907407407407400</text:p>
          </table:table-cell>
          <table:table-cell table:formula="of:=[.D42]-[.D41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7" office:value-type="float" office:value="3977" calcext:value-type="float">
            <text:p>397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60300925925926" calcext:value-type="float">
            <text:p>0,00046030092592592600</text:p>
          </table:table-cell>
          <table:table-cell table:formula="of:=[.D43]-[.D4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7" office:value-type="float" office:value="4074" calcext:value-type="float">
            <text:p>407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71527777777778" calcext:value-type="float">
            <text:p>0,00047152777777777800</text:p>
          </table:table-cell>
          <table:table-cell table:formula="of:=[.D44]-[.D43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7" office:value-type="float" office:value="4171" calcext:value-type="float">
            <text:p>417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8275462962963" calcext:value-type="float">
            <text:p>0,00048275462962963000</text:p>
          </table:table-cell>
          <table:table-cell table:formula="of:=[.D45]-[.D4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7" office:value-type="float" office:value="4268" calcext:value-type="float">
            <text:p>426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93981481481482" calcext:value-type="float">
            <text:p>0,00049398148148148200</text:p>
          </table:table-cell>
          <table:table-cell table:formula="of:=[.D46]-[.D45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7" office:value-type="float" office:value="4365" calcext:value-type="float">
            <text:p>436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505208333333333" calcext:value-type="float">
            <text:p>0,00050520833333333300</text:p>
          </table:table-cell>
          <table:table-cell table:formula="of:=[.D47]-[.D4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7" office:value-type="float" office:value="4462" calcext:value-type="float">
            <text:p>446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16435185185185" calcext:value-type="float">
            <text:p>0,00051643518518518500</text:p>
          </table:table-cell>
          <table:table-cell table:formula="of:=[.D48]-[.D47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7" office:value-type="float" office:value="4559" calcext:value-type="float">
            <text:p>455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27662037037037" calcext:value-type="float">
            <text:p>0,00052766203703703700</text:p>
          </table:table-cell>
          <table:table-cell table:formula="of:=[.D49]-[.D4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7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38888888888889" calcext:value-type="float">
            <text:p>0,00053888888888888900</text:p>
          </table:table-cell>
          <table:table-cell table:formula="of:=[.D50]-[.D4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7" office:value-type="float" office:value="4753" calcext:value-type="float">
            <text:p>475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50115740740741" calcext:value-type="float">
            <text:p>0,00055011574074074100</text:p>
          </table:table-cell>
          <table:table-cell table:formula="of:=[.D51]-[.D50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7" office:value-type="float" office:value="4850" calcext:value-type="float">
            <text:p>48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61342592592593" calcext:value-type="float">
            <text:p>0,00056134259259259300</text:p>
          </table:table-cell>
          <table:table-cell table:formula="of:=[.D52]-[.D5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7" office:value-type="float" office:value="4947" calcext:value-type="float">
            <text:p>494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72569444444444" calcext:value-type="float">
            <text:p>0,00057256944444444400</text:p>
          </table:table-cell>
          <table:table-cell table:formula="of:=[.D53]-[.D5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7" office:value-type="float" office:value="5044" calcext:value-type="float">
            <text:p>504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83796296296296" calcext:value-type="float">
            <text:p>0,00058379629629629600</text:p>
          </table:table-cell>
          <table:table-cell table:formula="of:=[.D54]-[.D53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7" office:value-type="float" office:value="5141" calcext:value-type="float">
            <text:p>514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95023148148148" calcext:value-type="float">
            <text:p>0,00059502314814814800</text:p>
          </table:table-cell>
          <table:table-cell table:formula="of:=[.D55]-[.D5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7" office:value-type="float" office:value="5238" calcext:value-type="float">
            <text:p>523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60625" calcext:value-type="float">
            <text:p>0,00060625000000000000</text:p>
          </table:table-cell>
          <table:table-cell table:formula="of:=[.D56]-[.D55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7" office:value-type="float" office:value="5335" calcext:value-type="float">
            <text:p>533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17476851851852" calcext:value-type="float">
            <text:p>0,00061747685185185200</text:p>
          </table:table-cell>
          <table:table-cell table:formula="of:=[.D57]-[.D5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7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28703703703704" calcext:value-type="float">
            <text:p>0,00062870370370370400</text:p>
          </table:table-cell>
          <table:table-cell table:formula="of:=[.D58]-[.D5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7" office:value-type="float" office:value="5529" calcext:value-type="float">
            <text:p>552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39930555555556" calcext:value-type="float">
            <text:p>0,00063993055555555600</text:p>
          </table:table-cell>
          <table:table-cell table:formula="of:=[.D59]-[.D58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7" office:value-type="float" office:value="5626" calcext:value-type="float">
            <text:p>562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51157407407407" calcext:value-type="float">
            <text:p>0,00065115740740740700</text:p>
          </table:table-cell>
          <table:table-cell table:formula="of:=[.D60]-[.D5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7" office:value-type="float" office:value="5723" calcext:value-type="float">
            <text:p>572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62384259259259" calcext:value-type="float">
            <text:p>0,00066238425925925900</text:p>
          </table:table-cell>
          <table:table-cell table:formula="of:=[.D61]-[.D6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7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73611111111111" calcext:value-type="float">
            <text:p>0,00067361111111111100</text:p>
          </table:table-cell>
          <table:table-cell table:formula="of:=[.D62]-[.D61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7" office:value-type="float" office:value="5917" calcext:value-type="float">
            <text:p>591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84837962962963" calcext:value-type="float">
            <text:p>0,00068483796296296300</text:p>
          </table:table-cell>
          <table:table-cell table:formula="of:=[.D63]-[.D6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7" office:value-type="float" office:value="6014" calcext:value-type="float">
            <text:p>601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96064814814815" calcext:value-type="float">
            <text:p>0,00069606481481481500</text:p>
          </table:table-cell>
          <table:table-cell table:formula="of:=[.D64]-[.D63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7" office:value-type="float" office:value="6111" calcext:value-type="float">
            <text:p>611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707291666666667" calcext:value-type="float">
            <text:p>0,00070729166666666700</text:p>
          </table:table-cell>
          <table:table-cell table:formula="of:=[.D65]-[.D6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7" office:value-type="float" office:value="6208" calcext:value-type="float">
            <text:p>620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18518518518519" calcext:value-type="float">
            <text:p>0,00071851851851851900</text:p>
          </table:table-cell>
          <table:table-cell table:formula="of:=[.D66]-[.D6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7" office:value-type="float" office:value="6305" calcext:value-type="float">
            <text:p>630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2974537037037" calcext:value-type="float">
            <text:p>0,00072974537037037000</text:p>
          </table:table-cell>
          <table:table-cell table:formula="of:=[.D67]-[.D66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7" office:value-type="float" office:value="6402" calcext:value-type="float">
            <text:p>640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40972222222222" calcext:value-type="float">
            <text:p>0,00074097222222222200</text:p>
          </table:table-cell>
          <table:table-cell table:formula="of:=[.D68]-[.D6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7" office:value-type="float" office:value="6499" calcext:value-type="float">
            <text:p>649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52199074074074" calcext:value-type="float">
            <text:p>0,00075219907407407400</text:p>
          </table:table-cell>
          <table:table-cell table:formula="of:=[.D69]-[.D6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7" office:value-type="float" office:value="6596" calcext:value-type="float">
            <text:p>659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63425925925926" calcext:value-type="float">
            <text:p>0,00076342592592592600</text:p>
          </table:table-cell>
          <table:table-cell table:formula="of:=[.D70]-[.D69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7" office:value-type="float" office:value="6693" calcext:value-type="float">
            <text:p>669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74652777777778" calcext:value-type="float">
            <text:p>0,00077465277777777800</text:p>
          </table:table-cell>
          <table:table-cell table:formula="of:=[.D71]-[.D7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7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8587962962963" calcext:value-type="float">
            <text:p>0,00078587962962963000</text:p>
          </table:table-cell>
          <table:table-cell table:formula="of:=[.D72]-[.D71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7" office:value-type="float" office:value="6887" calcext:value-type="float">
            <text:p>688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97106481481481" calcext:value-type="float">
            <text:p>0,00079710648148148100</text:p>
          </table:table-cell>
          <table:table-cell table:formula="of:=[.D73]-[.D7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7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808333333333333" calcext:value-type="float">
            <text:p>0,00080833333333333300</text:p>
          </table:table-cell>
          <table:table-cell table:formula="of:=[.D74]-[.D7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7" office:value-type="float" office:value="7081" calcext:value-type="float">
            <text:p>708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19560185185185" calcext:value-type="float">
            <text:p>0,00081956018518518500</text:p>
          </table:table-cell>
          <table:table-cell table:formula="of:=[.D75]-[.D74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7" office:value-type="float" office:value="7178" calcext:value-type="float">
            <text:p>717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30787037037037" calcext:value-type="float">
            <text:p>0,00083078703703703700</text:p>
          </table:table-cell>
          <table:table-cell table:formula="of:=[.D76]-[.D7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7" office:value-type="float" office:value="7275" calcext:value-type="float">
            <text:p>72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42013888888889" calcext:value-type="float">
            <text:p>0,00084201388888888900</text:p>
          </table:table-cell>
          <table:table-cell table:formula="of:=[.D77]-[.D7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7" office:value-type="float" office:value="7372" calcext:value-type="float">
            <text:p>737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53240740740741" calcext:value-type="float">
            <text:p>0,00085324074074074100</text:p>
          </table:table-cell>
          <table:table-cell table:formula="of:=[.D78]-[.D77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7" office:value-type="float" office:value="7469" calcext:value-type="float">
            <text:p>746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64467592592593" calcext:value-type="float">
            <text:p>0,00086446759259259300</text:p>
          </table:table-cell>
          <table:table-cell table:formula="of:=[.D79]-[.D7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7" office:value-type="float" office:value="7566" calcext:value-type="float">
            <text:p>756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75694444444445" calcext:value-type="float">
            <text:p>0,00087569444444444500</text:p>
          </table:table-cell>
          <table:table-cell table:formula="of:=[.D80]-[.D79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7" office:value-type="float" office:value="7663" calcext:value-type="float">
            <text:p>766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86921296296296" calcext:value-type="float">
            <text:p>0,00088692129629629600</text:p>
          </table:table-cell>
          <table:table-cell table:formula="of:=[.D81]-[.D8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7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98148148148148" calcext:value-type="float">
            <text:p>0,00089814814814814800</text:p>
          </table:table-cell>
          <table:table-cell table:formula="of:=[.D82]-[.D8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7" office:value-type="float" office:value="7857" calcext:value-type="float">
            <text:p>785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909375" calcext:value-type="float">
            <text:p>0,00090937500000000000</text:p>
          </table:table-cell>
          <table:table-cell table:formula="of:=[.D83]-[.D82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7" office:value-type="float" office:value="7954" calcext:value-type="float">
            <text:p>795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20601851851852" calcext:value-type="float">
            <text:p>0,00092060185185185200</text:p>
          </table:table-cell>
          <table:table-cell table:formula="of:=[.D84]-[.D8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7" office:value-type="float" office:value="8051" calcext:value-type="float">
            <text:p>805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31828703703704" calcext:value-type="float">
            <text:p>0,00093182870370370400</text:p>
          </table:table-cell>
          <table:table-cell table:formula="of:=[.D85]-[.D8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7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43055555555556" calcext:value-type="float">
            <text:p>0,00094305555555555600</text:p>
          </table:table-cell>
          <table:table-cell table:formula="of:=[.D86]-[.D85]" office:value-type="float" office:value="0.0000112268518518518" calcext:value-type="float">
            <text:p>0,0000112268518518518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7" office:value-type="float" office:value="8245" calcext:value-type="float">
            <text:p>824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54282407407407" calcext:value-type="float">
            <text:p>0,00095428240740740700</text:p>
          </table:table-cell>
          <table:table-cell table:formula="of:=[.D87]-[.D8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7" office:value-type="float" office:value="8342" calcext:value-type="float">
            <text:p>834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65509259259259" calcext:value-type="float">
            <text:p>0,00096550925925925900</text:p>
          </table:table-cell>
          <table:table-cell table:formula="of:=[.D88]-[.D8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7" office:value-type="float" office:value="8439" calcext:value-type="float">
            <text:p>843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76736111111111" calcext:value-type="float">
            <text:p>0,00097673611111111100</text:p>
          </table:table-cell>
          <table:table-cell table:formula="of:=[.D89]-[.D8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7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87962962962963" calcext:value-type="float">
            <text:p>0,00098796296296296300</text:p>
          </table:table-cell>
          <table:table-cell table:formula="of:=[.D90]-[.D8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7" office:value-type="float" office:value="8633" calcext:value-type="float">
            <text:p>863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99189814814815" calcext:value-type="float">
            <text:p>0,00099918981481481500</text:p>
          </table:table-cell>
          <table:table-cell table:formula="of:=[.D91]-[.D9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7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101041666666667" calcext:value-type="float">
            <text:p>0,00101041666666667000</text:p>
          </table:table-cell>
          <table:table-cell table:formula="of:=[.D92]-[.D9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7" office:value-type="float" office:value="8827" calcext:value-type="float">
            <text:p>882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2164351851852" calcext:value-type="float">
            <text:p>0,00102164351851852000</text:p>
          </table:table-cell>
          <table:table-cell table:formula="of:=[.D93]-[.D9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7" office:value-type="float" office:value="8924" calcext:value-type="float">
            <text:p>892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3287037037037" calcext:value-type="float">
            <text:p>0,00103287037037037000</text:p>
          </table:table-cell>
          <table:table-cell table:formula="of:=[.D94]-[.D9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7" office:value-type="float" office:value="9021" calcext:value-type="float">
            <text:p>902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4409722222222" calcext:value-type="float">
            <text:p>0,00104409722222222000</text:p>
          </table:table-cell>
          <table:table-cell table:formula="of:=[.D95]-[.D9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7" office:value-type="float" office:value="9118" calcext:value-type="float">
            <text:p>911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5532407407407" calcext:value-type="float">
            <text:p>0,00105532407407407000</text:p>
          </table:table-cell>
          <table:table-cell table:formula="of:=[.D96]-[.D9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7" office:value-type="float" office:value="9215" calcext:value-type="float">
            <text:p>921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6655092592593" calcext:value-type="float">
            <text:p>0,00106655092592593000</text:p>
          </table:table-cell>
          <table:table-cell table:formula="of:=[.D97]-[.D9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7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7777777777778" calcext:value-type="float">
            <text:p>0,00107777777777778000</text:p>
          </table:table-cell>
          <table:table-cell table:formula="of:=[.D98]-[.D9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7" office:value-type="float" office:value="9409" calcext:value-type="float">
            <text:p>940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8900462962963" calcext:value-type="float">
            <text:p>0,00108900462962963000</text:p>
          </table:table-cell>
          <table:table-cell table:formula="of:=[.D99]-[.D9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7" office:value-type="float" office:value="9506" calcext:value-type="float">
            <text:p>950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10023148148148" calcext:value-type="float">
            <text:p>0,00110023148148148000</text:p>
          </table:table-cell>
          <table:table-cell table:formula="of:=[.D100]-[.D9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7" office:value-type="float" office:value="9603" calcext:value-type="float">
            <text:p>960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11145833333333" calcext:value-type="float">
            <text:p>0,00111145833333333000</text:p>
          </table:table-cell>
          <table:table-cell table:formula="of:=[.D101]-[.D10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7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12268518518519" calcext:value-type="float">
            <text:p>0,00112268518518519000</text:p>
          </table:table-cell>
          <table:table-cell table:formula="of:=[.D102]-[.D10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7" office:value-type="float" office:value="9797" calcext:value-type="float">
            <text:p>979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3391203703704" calcext:value-type="float">
            <text:p>0,00113391203703704000</text:p>
          </table:table-cell>
          <table:table-cell table:formula="of:=[.D103]-[.D10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7" office:value-type="float" office:value="9894" calcext:value-type="float">
            <text:p>989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4513888888889" calcext:value-type="float">
            <text:p>0,00114513888888889000</text:p>
          </table:table-cell>
          <table:table-cell table:formula="of:=[.D104]-[.D10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7" office:value-type="float" office:value="9991" calcext:value-type="float">
            <text:p>999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5636574074074" calcext:value-type="float">
            <text:p>0,00115636574074074000</text:p>
          </table:table-cell>
          <table:table-cell table:formula="of:=[.D105]-[.D10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7" office:value-type="float" office:value="10088" calcext:value-type="float">
            <text:p>1008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6759259259259" calcext:value-type="float">
            <text:p>0,00116759259259259000</text:p>
          </table:table-cell>
          <table:table-cell table:formula="of:=[.D106]-[.D10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7" office:value-type="float" office:value="10185" calcext:value-type="float">
            <text:p>1018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7881944444444" calcext:value-type="float">
            <text:p>0,00117881944444444000</text:p>
          </table:table-cell>
          <table:table-cell table:formula="of:=[.D107]-[.D10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7" office:value-type="float" office:value="10282" calcext:value-type="float">
            <text:p>1028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900462962963" calcext:value-type="float">
            <text:p>0,00119004629629630000</text:p>
          </table:table-cell>
          <table:table-cell table:formula="of:=[.D108]-[.D10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7" office:value-type="float" office:value="10379" calcext:value-type="float">
            <text:p>1037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20127314814815" calcext:value-type="float">
            <text:p>0,00120127314814815000</text:p>
          </table:table-cell>
          <table:table-cell table:formula="of:=[.D109]-[.D10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7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2125" calcext:value-type="float">
            <text:p>0,00121250000000000000</text:p>
          </table:table-cell>
          <table:table-cell table:formula="of:=[.D110]-[.D10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7" office:value-type="float" office:value="10573" calcext:value-type="float">
            <text:p>1057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22372685185185" calcext:value-type="float">
            <text:p>0,00122372685185185000</text:p>
          </table:table-cell>
          <table:table-cell table:formula="of:=[.D111]-[.D11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7" office:value-type="float" office:value="10670" calcext:value-type="float">
            <text:p>106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349537037037" calcext:value-type="float">
            <text:p>0,00123495370370370000</text:p>
          </table:table-cell>
          <table:table-cell table:formula="of:=[.D112]-[.D11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7" office:value-type="float" office:value="10767" calcext:value-type="float">
            <text:p>1076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4618055555556" calcext:value-type="float">
            <text:p>0,00124618055555556000</text:p>
          </table:table-cell>
          <table:table-cell table:formula="of:=[.D113]-[.D11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7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5740740740741" calcext:value-type="float">
            <text:p>0,00125740740740741000</text:p>
          </table:table-cell>
          <table:table-cell table:formula="of:=[.D114]-[.D11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7" office:value-type="float" office:value="10961" calcext:value-type="float">
            <text:p>1096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6863425925926" calcext:value-type="float">
            <text:p>0,00126863425925926000</text:p>
          </table:table-cell>
          <table:table-cell table:formula="of:=[.D115]-[.D11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7" office:value-type="float" office:value="11058" calcext:value-type="float">
            <text:p>1105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7986111111111" calcext:value-type="float">
            <text:p>0,00127986111111111000</text:p>
          </table:table-cell>
          <table:table-cell table:formula="of:=[.D116]-[.D11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7" office:value-type="float" office:value="11155" calcext:value-type="float">
            <text:p>1115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9108796296296" calcext:value-type="float">
            <text:p>0,00129108796296296000</text:p>
          </table:table-cell>
          <table:table-cell table:formula="of:=[.D117]-[.D116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7" office:value-type="float" office:value="11252" calcext:value-type="float">
            <text:p>1125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30231481481481" calcext:value-type="float">
            <text:p>0,00130231481481481000</text:p>
          </table:table-cell>
          <table:table-cell table:formula="of:=[.D118]-[.D11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7" office:value-type="float" office:value="11349" calcext:value-type="float">
            <text:p>1134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31354166666667" calcext:value-type="float">
            <text:p>0,00131354166666667000</text:p>
          </table:table-cell>
          <table:table-cell table:formula="of:=[.D119]-[.D11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7" office:value-type="float" office:value="11446" calcext:value-type="float">
            <text:p>1144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32476851851852" calcext:value-type="float">
            <text:p>0,00132476851851852000</text:p>
          </table:table-cell>
          <table:table-cell table:formula="of:=[.D120]-[.D11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7" office:value-type="float" office:value="11543" calcext:value-type="float">
            <text:p>1154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3599537037037" calcext:value-type="float">
            <text:p>0,00133599537037037000</text:p>
          </table:table-cell>
          <table:table-cell table:formula="of:=[.D121]-[.D12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7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4722222222222" calcext:value-type="float">
            <text:p>0,00134722222222222000</text:p>
          </table:table-cell>
          <table:table-cell table:formula="of:=[.D122]-[.D121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7" office:value-type="float" office:value="11737" calcext:value-type="float">
            <text:p>1173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5844907407407" calcext:value-type="float">
            <text:p>0,00135844907407407000</text:p>
          </table:table-cell>
          <table:table-cell table:formula="of:=[.D123]-[.D12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7" office:value-type="float" office:value="11834" calcext:value-type="float">
            <text:p>1183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6967592592593" calcext:value-type="float">
            <text:p>0,00136967592592593000</text:p>
          </table:table-cell>
          <table:table-cell table:formula="of:=[.D124]-[.D12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7" office:value-type="float" office:value="11931" calcext:value-type="float">
            <text:p>1193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8090277777778" calcext:value-type="float">
            <text:p>0,00138090277777778000</text:p>
          </table:table-cell>
          <table:table-cell table:formula="of:=[.D125]-[.D12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7" office:value-type="float" office:value="12028" calcext:value-type="float">
            <text:p>1202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9212962962963" calcext:value-type="float">
            <text:p>0,00139212962962963000</text:p>
          </table:table-cell>
          <table:table-cell table:formula="of:=[.D126]-[.D12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7" office:value-type="float" office:value="12125" calcext:value-type="float">
            <text:p>12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40335648148148" calcext:value-type="float">
            <text:p>0,00140335648148148000</text:p>
          </table:table-cell>
          <table:table-cell table:formula="of:=[.D127]-[.D126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7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41458333333333" calcext:value-type="float">
            <text:p>0,00141458333333333000</text:p>
          </table:table-cell>
          <table:table-cell table:formula="of:=[.D128]-[.D12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7" office:value-type="float" office:value="12319" calcext:value-type="float">
            <text:p>1231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42581018518519" calcext:value-type="float">
            <text:p>0,00142581018518519000</text:p>
          </table:table-cell>
          <table:table-cell table:formula="of:=[.D129]-[.D12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7" office:value-type="float" office:value="12416" calcext:value-type="float">
            <text:p>1241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3703703703704" calcext:value-type="float">
            <text:p>0,00143703703703704000</text:p>
          </table:table-cell>
          <table:table-cell table:formula="of:=[.D130]-[.D12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7" office:value-type="float" office:value="12513" calcext:value-type="float">
            <text:p>1251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4826388888889" calcext:value-type="float">
            <text:p>0,00144826388888889000</text:p>
          </table:table-cell>
          <table:table-cell table:formula="of:=[.D131]-[.D13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7" office:value-type="float" office:value="12610" calcext:value-type="float">
            <text:p>126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45949074074074" calcext:value-type="float">
            <text:p>0,00145949074074074000</text:p>
          </table:table-cell>
          <table:table-cell table:formula="of:=[.D132]-[.D13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7" office:value-type="float" office:value="12707" calcext:value-type="float">
            <text:p>1270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7071759259259" calcext:value-type="float">
            <text:p>0,00147071759259259000</text:p>
          </table:table-cell>
          <table:table-cell table:formula="of:=[.D133]-[.D13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7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8194444444444" calcext:value-type="float">
            <text:p>0,00148194444444444000</text:p>
          </table:table-cell>
          <table:table-cell table:formula="of:=[.D134]-[.D13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7" office:value-type="float" office:value="12901" calcext:value-type="float">
            <text:p>1290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931712962963" calcext:value-type="float">
            <text:p>0,00149317129629630000</text:p>
          </table:table-cell>
          <table:table-cell table:formula="of:=[.D135]-[.D13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7" office:value-type="float" office:value="12998" calcext:value-type="float">
            <text:p>1299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50439814814815" calcext:value-type="float">
            <text:p>0,00150439814814815000</text:p>
          </table:table-cell>
          <table:table-cell table:formula="of:=[.D136]-[.D13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7" office:value-type="float" office:value="13095" calcext:value-type="float">
            <text:p>1309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515625" calcext:value-type="float">
            <text:p>0,00151562500000000000</text:p>
          </table:table-cell>
          <table:table-cell table:formula="of:=[.D137]-[.D13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7" office:value-type="float" office:value="13192" calcext:value-type="float">
            <text:p>1319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52685185185185" calcext:value-type="float">
            <text:p>0,00152685185185185000</text:p>
          </table:table-cell>
          <table:table-cell table:formula="of:=[.D138]-[.D13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7" office:value-type="float" office:value="13289" calcext:value-type="float">
            <text:p>1328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380787037037" calcext:value-type="float">
            <text:p>0,00153807870370370000</text:p>
          </table:table-cell>
          <table:table-cell table:formula="of:=[.D139]-[.D13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7" office:value-type="float" office:value="13386" calcext:value-type="float">
            <text:p>1338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4930555555556" calcext:value-type="float">
            <text:p>0,00154930555555556000</text:p>
          </table:table-cell>
          <table:table-cell table:formula="of:=[.D140]-[.D13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7" office:value-type="float" office:value="13483" calcext:value-type="float">
            <text:p>1348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56053240740741" calcext:value-type="float">
            <text:p>0,00156053240740741000</text:p>
          </table:table-cell>
          <table:table-cell table:formula="of:=[.D141]-[.D14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7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7175925925926" calcext:value-type="float">
            <text:p>0,00157175925925926000</text:p>
          </table:table-cell>
          <table:table-cell table:formula="of:=[.D142]-[.D14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7" office:value-type="float" office:value="13677" calcext:value-type="float">
            <text:p>1367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8298611111111" calcext:value-type="float">
            <text:p>0,00158298611111111000</text:p>
          </table:table-cell>
          <table:table-cell table:formula="of:=[.D143]-[.D14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7" office:value-type="float" office:value="13774" calcext:value-type="float">
            <text:p>1377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9421296296296" calcext:value-type="float">
            <text:p>0,00159421296296296000</text:p>
          </table:table-cell>
          <table:table-cell table:formula="of:=[.D144]-[.D14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7" office:value-type="float" office:value="13871" calcext:value-type="float">
            <text:p>1387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60543981481481" calcext:value-type="float">
            <text:p>0,00160543981481481000</text:p>
          </table:table-cell>
          <table:table-cell table:formula="of:=[.D145]-[.D14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7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61666666666667" calcext:value-type="float">
            <text:p>0,00161666666666667000</text:p>
          </table:table-cell>
          <table:table-cell table:formula="of:=[.D146]-[.D14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7" office:value-type="float" office:value="14065" calcext:value-type="float">
            <text:p>1406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62789351851852" calcext:value-type="float">
            <text:p>0,00162789351851852000</text:p>
          </table:table-cell>
          <table:table-cell table:formula="of:=[.D147]-[.D14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7" office:value-type="float" office:value="14162" calcext:value-type="float">
            <text:p>1416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3912037037037" calcext:value-type="float">
            <text:p>0,00163912037037037000</text:p>
          </table:table-cell>
          <table:table-cell table:formula="of:=[.D148]-[.D14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7" office:value-type="float" office:value="14259" calcext:value-type="float">
            <text:p>1425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65034722222222" calcext:value-type="float">
            <text:p>0,00165034722222222000</text:p>
          </table:table-cell>
          <table:table-cell table:formula="of:=[.D149]-[.D148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7" office:value-type="float" office:value="14356" calcext:value-type="float">
            <text:p>1435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66157407407407" calcext:value-type="float">
            <text:p>0,00166157407407407000</text:p>
          </table:table-cell>
          <table:table-cell table:formula="of:=[.D150]-[.D14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7" office:value-type="float" office:value="14453" calcext:value-type="float">
            <text:p>1445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7280092592593" calcext:value-type="float">
            <text:p>0,00167280092592593000</text:p>
          </table:table-cell>
          <table:table-cell table:formula="of:=[.D151]-[.D15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7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68402777777778" calcext:value-type="float">
            <text:p>0,00168402777777778000</text:p>
          </table:table-cell>
          <table:table-cell table:formula="of:=[.D152]-[.D15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7" office:value-type="float" office:value="14647" calcext:value-type="float">
            <text:p>1464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9525462962963" calcext:value-type="float">
            <text:p>0,00169525462962963000</text:p>
          </table:table-cell>
          <table:table-cell table:formula="of:=[.D153]-[.D15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7" office:value-type="float" office:value="14744" calcext:value-type="float">
            <text:p>1474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70648148148148" calcext:value-type="float">
            <text:p>0,00170648148148148000</text:p>
          </table:table-cell>
          <table:table-cell table:formula="of:=[.D154]-[.D153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7" office:value-type="float" office:value="14841" calcext:value-type="float">
            <text:p>1484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71770833333333" calcext:value-type="float">
            <text:p>0,00171770833333333000</text:p>
          </table:table-cell>
          <table:table-cell table:formula="of:=[.D155]-[.D15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7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72893518518519" calcext:value-type="float">
            <text:p>0,00172893518518519000</text:p>
          </table:table-cell>
          <table:table-cell table:formula="of:=[.D156]-[.D15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7" office:value-type="float" office:value="15035" calcext:value-type="float">
            <text:p>1503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4016203703704" calcext:value-type="float">
            <text:p>0,00174016203703704000</text:p>
          </table:table-cell>
          <table:table-cell table:formula="of:=[.D157]-[.D15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7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75138888888889" calcext:value-type="float">
            <text:p>0,00175138888888889000</text:p>
          </table:table-cell>
          <table:table-cell table:formula="of:=[.D158]-[.D15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7" office:value-type="float" office:value="15229" calcext:value-type="float">
            <text:p>1522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76261574074074" calcext:value-type="float">
            <text:p>0,00176261574074074000</text:p>
          </table:table-cell>
          <table:table-cell table:formula="of:=[.D159]-[.D158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7" office:value-type="float" office:value="15326" calcext:value-type="float">
            <text:p>1532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7384259259259" calcext:value-type="float">
            <text:p>0,00177384259259259000</text:p>
          </table:table-cell>
          <table:table-cell table:formula="of:=[.D160]-[.D159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7" office:value-type="float" office:value="15423" calcext:value-type="float">
            <text:p>1542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78506944444444" calcext:value-type="float">
            <text:p>0,00178506944444444000</text:p>
          </table:table-cell>
          <table:table-cell table:formula="of:=[.D161]-[.D16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7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962962962963" calcext:value-type="float">
            <text:p>0,00179629629629630000</text:p>
          </table:table-cell>
          <table:table-cell table:formula="of:=[.D162]-[.D16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7" office:value-type="float" office:value="15617" calcext:value-type="float">
            <text:p>1561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80752314814815" calcext:value-type="float">
            <text:p>0,00180752314814815000</text:p>
          </table:table-cell>
          <table:table-cell table:formula="of:=[.D163]-[.D16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7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81875" calcext:value-type="float">
            <text:p>0,00181875000000000000</text:p>
          </table:table-cell>
          <table:table-cell table:formula="of:=[.D164]-[.D16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7" office:value-type="float" office:value="15811" calcext:value-type="float">
            <text:p>1581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82997685185185" calcext:value-type="float">
            <text:p>0,00182997685185185000</text:p>
          </table:table-cell>
          <table:table-cell table:formula="of:=[.D165]-[.D16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7" office:value-type="float" office:value="15908" calcext:value-type="float">
            <text:p>1590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412037037037" calcext:value-type="float">
            <text:p>0,00184120370370370000</text:p>
          </table:table-cell>
          <table:table-cell table:formula="of:=[.D166]-[.D165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7" office:value-type="float" office:value="16005" calcext:value-type="float">
            <text:p>1600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85243055555556" calcext:value-type="float">
            <text:p>0,00185243055555556000</text:p>
          </table:table-cell>
          <table:table-cell table:formula="of:=[.D167]-[.D166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7" office:value-type="float" office:value="16102" calcext:value-type="float">
            <text:p>1610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86365740740741" calcext:value-type="float">
            <text:p>0,00186365740740741000</text:p>
          </table:table-cell>
          <table:table-cell table:formula="of:=[.D168]-[.D167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7" office:value-type="float" office:value="16199" calcext:value-type="float">
            <text:p>1619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87488425925926" calcext:value-type="float">
            <text:p>0,00187488425925926000</text:p>
          </table:table-cell>
          <table:table-cell table:formula="of:=[.D169]-[.D168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7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88611111111111" calcext:value-type="float">
            <text:p>0,00188611111111111000</text:p>
          </table:table-cell>
          <table:table-cell table:formula="of:=[.D170]-[.D16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7" office:value-type="float" office:value="16393" calcext:value-type="float">
            <text:p>1639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89733796296296" calcext:value-type="float">
            <text:p>0,00189733796296296000</text:p>
          </table:table-cell>
          <table:table-cell table:formula="of:=[.D171]-[.D170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7" office:value-type="float" office:value="16490" calcext:value-type="float">
            <text:p>164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90856481481481" calcext:value-type="float">
            <text:p>0,00190856481481481000</text:p>
          </table:table-cell>
          <table:table-cell table:formula="of:=[.D172]-[.D171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7" office:value-type="float" office:value="16587" calcext:value-type="float">
            <text:p>1658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91979166666667" calcext:value-type="float">
            <text:p>0,00191979166666667000</text:p>
          </table:table-cell>
          <table:table-cell table:formula="of:=[.D173]-[.D172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7" office:value-type="float" office:value="16684" calcext:value-type="float">
            <text:p>1668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93101851851852" calcext:value-type="float">
            <text:p>0,00193101851851852000</text:p>
          </table:table-cell>
          <table:table-cell table:formula="of:=[.D174]-[.D173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7" office:value-type="float" office:value="16781" calcext:value-type="float">
            <text:p>1678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94224537037037" calcext:value-type="float">
            <text:p>0,00194224537037037000</text:p>
          </table:table-cell>
          <table:table-cell table:formula="of:=[.D175]-[.D174]" office:value-type="float" office:value="0.0000112268518518519" calcext:value-type="float">
            <text:p>0,0000112268518518519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7" office:value-type="float" office:value="16878" calcext:value-type="float">
            <text:p>1687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95347222222222" calcext:value-type="float">
            <text:p>0,00195347222222222000</text:p>
          </table:table-cell>
          <table:table-cell table:formula="of:=[.D176]-[.D17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7" office:value-type="float" office:value="16975" calcext:value-type="float">
            <text:p>169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96469907407407" calcext:value-type="float">
            <text:p>0,00196469907407407000</text:p>
          </table:table-cell>
          <table:table-cell table:formula="of:=[.D177]-[.D17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7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97592592592593" calcext:value-type="float">
            <text:p>0,00197592592592593000</text:p>
          </table:table-cell>
          <table:table-cell table:formula="of:=[.D178]-[.D17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7" office:value-type="float" office:value="17169" calcext:value-type="float">
            <text:p>1716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98715277777778" calcext:value-type="float">
            <text:p>0,00198715277777778000</text:p>
          </table:table-cell>
          <table:table-cell table:formula="of:=[.D179]-[.D178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7" office:value-type="float" office:value="17266" calcext:value-type="float">
            <text:p>1726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99837962962963" calcext:value-type="float">
            <text:p>0,00199837962962963000</text:p>
          </table:table-cell>
          <table:table-cell table:formula="of:=[.D180]-[.D179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7" office:value-type="float" office:value="17363" calcext:value-type="float">
            <text:p>1736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200960648148148" calcext:value-type="float">
            <text:p>0,00200960648148148000</text:p>
          </table:table-cell>
          <table:table-cell table:formula="of:=[.D181]-[.D18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7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202083333333333" calcext:value-type="float">
            <text:p>0,00202083333333333000</text:p>
          </table:table-cell>
          <table:table-cell table:formula="of:=[.D182]-[.D181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7" office:value-type="float" office:value="17557" calcext:value-type="float">
            <text:p>1755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203206018518519" calcext:value-type="float">
            <text:p>0,00203206018518519000</text:p>
          </table:table-cell>
          <table:table-cell table:formula="of:=[.D183]-[.D18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7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04328703703704" calcext:value-type="float">
            <text:p>0,00204328703703704000</text:p>
          </table:table-cell>
          <table:table-cell table:formula="of:=[.D184]-[.D183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7" office:value-type="float" office:value="17751" calcext:value-type="float">
            <text:p>1775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05451388888889" calcext:value-type="float">
            <text:p>0,00205451388888889000</text:p>
          </table:table-cell>
          <table:table-cell table:formula="of:=[.D185]-[.D184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7" office:value-type="float" office:value="17848" calcext:value-type="float">
            <text:p>1784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06574074074074" calcext:value-type="float">
            <text:p>0,00206574074074074000</text:p>
          </table:table-cell>
          <table:table-cell table:formula="of:=[.D186]-[.D18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7" office:value-type="float" office:value="17945" calcext:value-type="float">
            <text:p>1794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07696759259259" calcext:value-type="float">
            <text:p>0,00207696759259259000</text:p>
          </table:table-cell>
          <table:table-cell table:formula="of:=[.D187]-[.D18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7" office:value-type="float" office:value="18042" calcext:value-type="float">
            <text:p>1804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08819444444444" calcext:value-type="float">
            <text:p>0,00208819444444444000</text:p>
          </table:table-cell>
          <table:table-cell table:formula="of:=[.D188]-[.D18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7" office:value-type="float" office:value="18139" calcext:value-type="float">
            <text:p>1813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0994212962963" calcext:value-type="float">
            <text:p>0,00209942129629630000</text:p>
          </table:table-cell>
          <table:table-cell table:formula="of:=[.D189]-[.D188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7" office:value-type="float" office:value="18236" calcext:value-type="float">
            <text:p>1823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11064814814815" calcext:value-type="float">
            <text:p>0,00211064814814815000</text:p>
          </table:table-cell>
          <table:table-cell table:formula="of:=[.D190]-[.D189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7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121875" calcext:value-type="float">
            <text:p>0,00212187500000000000</text:p>
          </table:table-cell>
          <table:table-cell table:formula="of:=[.D191]-[.D19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7" office:value-type="float" office:value="18430" calcext:value-type="float">
            <text:p>184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13310185185185" calcext:value-type="float">
            <text:p>0,00213310185185185000</text:p>
          </table:table-cell>
          <table:table-cell table:formula="of:=[.D192]-[.D191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7" office:value-type="float" office:value="18527" calcext:value-type="float">
            <text:p>1852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1443287037037" calcext:value-type="float">
            <text:p>0,00214432870370370000</text:p>
          </table:table-cell>
          <table:table-cell table:formula="of:=[.D193]-[.D19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7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15555555555556" calcext:value-type="float">
            <text:p>0,00215555555555556000</text:p>
          </table:table-cell>
          <table:table-cell table:formula="of:=[.D194]-[.D193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7" office:value-type="float" office:value="18721" calcext:value-type="float">
            <text:p>1872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16678240740741" calcext:value-type="float">
            <text:p>0,00216678240740741000</text:p>
          </table:table-cell>
          <table:table-cell table:formula="of:=[.D195]-[.D194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7" office:value-type="float" office:value="18818" calcext:value-type="float">
            <text:p>1881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17800925925926" calcext:value-type="float">
            <text:p>0,00217800925925926000</text:p>
          </table:table-cell>
          <table:table-cell table:formula="of:=[.D196]-[.D19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7" office:value-type="float" office:value="18915" calcext:value-type="float">
            <text:p>1891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18923611111111" calcext:value-type="float">
            <text:p>0,00218923611111111000</text:p>
          </table:table-cell>
          <table:table-cell table:formula="of:=[.D197]-[.D19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7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20046296296296" calcext:value-type="float">
            <text:p>0,00220046296296296000</text:p>
          </table:table-cell>
          <table:table-cell table:formula="of:=[.D198]-[.D19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7" office:value-type="float" office:value="19109" calcext:value-type="float">
            <text:p>1910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21168981481481" calcext:value-type="float">
            <text:p>0,00221168981481481000</text:p>
          </table:table-cell>
          <table:table-cell table:formula="of:=[.D199]-[.D198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7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22291666666667" calcext:value-type="float">
            <text:p>0,00222291666666667000</text:p>
          </table:table-cell>
          <table:table-cell table:formula="of:=[.D200]-[.D19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7" office:value-type="float" office:value="19303" calcext:value-type="float">
            <text:p>1930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23414351851852" calcext:value-type="float">
            <text:p>0,00223414351851852000</text:p>
          </table:table-cell>
          <table:table-cell table:formula="of:=[.D201]-[.D20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7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24537037037037" calcext:value-type="float">
            <text:p>0,00224537037037037000</text:p>
          </table:table-cell>
          <table:table-cell table:formula="of:=[.D202]-[.D201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7" office:value-type="float" office:value="19497" calcext:value-type="float">
            <text:p>1949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25659722222222" calcext:value-type="float">
            <text:p>0,00225659722222222000</text:p>
          </table:table-cell>
          <table:table-cell table:formula="of:=[.D203]-[.D20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7" office:value-type="float" office:value="19594" calcext:value-type="float">
            <text:p>1959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26782407407407" calcext:value-type="float">
            <text:p>0,00226782407407407000</text:p>
          </table:table-cell>
          <table:table-cell table:formula="of:=[.D204]-[.D203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7" office:value-type="float" office:value="19691" calcext:value-type="float">
            <text:p>1969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27905092592593" calcext:value-type="float">
            <text:p>0,00227905092592593000</text:p>
          </table:table-cell>
          <table:table-cell table:formula="of:=[.D205]-[.D20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7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29027777777778" calcext:value-type="float">
            <text:p>0,00229027777777778000</text:p>
          </table:table-cell>
          <table:table-cell table:formula="of:=[.D206]-[.D20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7" office:value-type="float" office:value="19885" calcext:value-type="float">
            <text:p>1988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30150462962963" calcext:value-type="float">
            <text:p>0,00230150462962963000</text:p>
          </table:table-cell>
          <table:table-cell table:formula="of:=[.D207]-[.D20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7" office:value-type="float" office:value="19982" calcext:value-type="float">
            <text:p>1998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31273148148148" calcext:value-type="float">
            <text:p>0,00231273148148148000</text:p>
          </table:table-cell>
          <table:table-cell table:formula="of:=[.D208]-[.D20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7" office:value-type="float" office:value="20079" calcext:value-type="float">
            <text:p>2007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32395833333333" calcext:value-type="float">
            <text:p>0,00232395833333333000</text:p>
          </table:table-cell>
          <table:table-cell table:formula="of:=[.D209]-[.D208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7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33518518518519" calcext:value-type="float">
            <text:p>0,00233518518518519000</text:p>
          </table:table-cell>
          <table:table-cell table:formula="of:=[.D210]-[.D20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7" office:value-type="float" office:value="20273" calcext:value-type="float">
            <text:p>2027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34641203703704" calcext:value-type="float">
            <text:p>0,00234641203703704000</text:p>
          </table:table-cell>
          <table:table-cell table:formula="of:=[.D211]-[.D21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7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35763888888889" calcext:value-type="float">
            <text:p>0,00235763888888889000</text:p>
          </table:table-cell>
          <table:table-cell table:formula="of:=[.D212]-[.D211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7" office:value-type="float" office:value="20467" calcext:value-type="float">
            <text:p>2046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36886574074074" calcext:value-type="float">
            <text:p>0,00236886574074074000</text:p>
          </table:table-cell>
          <table:table-cell table:formula="of:=[.D213]-[.D21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7" office:value-type="float" office:value="20564" calcext:value-type="float">
            <text:p>2056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38009259259259" calcext:value-type="float">
            <text:p>0,00238009259259259000</text:p>
          </table:table-cell>
          <table:table-cell table:formula="of:=[.D214]-[.D213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7" office:value-type="float" office:value="20661" calcext:value-type="float">
            <text:p>2066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39131944444444" calcext:value-type="float">
            <text:p>0,00239131944444444000</text:p>
          </table:table-cell>
          <table:table-cell table:formula="of:=[.D215]-[.D21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7" office:value-type="float" office:value="20758" calcext:value-type="float">
            <text:p>2075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4025462962963" calcext:value-type="float">
            <text:p>0,00240254629629630000</text:p>
          </table:table-cell>
          <table:table-cell table:formula="of:=[.D216]-[.D21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7" office:value-type="float" office:value="20855" calcext:value-type="float">
            <text:p>2085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41377314814815" calcext:value-type="float">
            <text:p>0,00241377314814815000</text:p>
          </table:table-cell>
          <table:table-cell table:formula="of:=[.D217]-[.D21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7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425" calcext:value-type="float">
            <text:p>0,00242500000000000000</text:p>
          </table:table-cell>
          <table:table-cell table:formula="of:=[.D218]-[.D21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7" office:value-type="float" office:value="21049" calcext:value-type="float">
            <text:p>2104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43622685185185" calcext:value-type="float">
            <text:p>0,00243622685185185000</text:p>
          </table:table-cell>
          <table:table-cell table:formula="of:=[.D219]-[.D218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7" office:value-type="float" office:value="21146" calcext:value-type="float">
            <text:p>2114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4474537037037" calcext:value-type="float">
            <text:p>0,00244745370370370000</text:p>
          </table:table-cell>
          <table:table-cell table:formula="of:=[.D220]-[.D21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7" office:value-type="float" office:value="21243" calcext:value-type="float">
            <text:p>2124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45868055555556" calcext:value-type="float">
            <text:p>0,00245868055555556000</text:p>
          </table:table-cell>
          <table:table-cell table:formula="of:=[.D221]-[.D220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7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46990740740741" calcext:value-type="float">
            <text:p>0,00246990740740741000</text:p>
          </table:table-cell>
          <table:table-cell table:formula="of:=[.D222]-[.D221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7" office:value-type="float" office:value="21437" calcext:value-type="float">
            <text:p>2143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48113425925926" calcext:value-type="float">
            <text:p>0,00248113425925926000</text:p>
          </table:table-cell>
          <table:table-cell table:formula="of:=[.D223]-[.D22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7" office:value-type="float" office:value="21534" calcext:value-type="float">
            <text:p>2153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49236111111111" calcext:value-type="float">
            <text:p>0,00249236111111111000</text:p>
          </table:table-cell>
          <table:table-cell table:formula="of:=[.D224]-[.D223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7" office:value-type="float" office:value="21631" calcext:value-type="float">
            <text:p>2163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50358796296296" calcext:value-type="float">
            <text:p>0,00250358796296296000</text:p>
          </table:table-cell>
          <table:table-cell table:formula="of:=[.D225]-[.D22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7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51481481481481" calcext:value-type="float">
            <text:p>0,00251481481481481000</text:p>
          </table:table-cell>
          <table:table-cell table:formula="of:=[.D226]-[.D225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7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52604166666667" calcext:value-type="float">
            <text:p>0,00252604166666667000</text:p>
          </table:table-cell>
          <table:table-cell table:formula="of:=[.D227]-[.D226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7" office:value-type="float" office:value="21922" calcext:value-type="float">
            <text:p>2192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53726851851852" calcext:value-type="float">
            <text:p>0,00253726851851852000</text:p>
          </table:table-cell>
          <table:table-cell table:formula="of:=[.D228]-[.D22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7" office:value-type="float" office:value="22019" calcext:value-type="float">
            <text:p>2201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54849537037037" calcext:value-type="float">
            <text:p>0,00254849537037037000</text:p>
          </table:table-cell>
          <table:table-cell table:formula="of:=[.D229]-[.D228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7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55972222222222" calcext:value-type="float">
            <text:p>0,00255972222222222000</text:p>
          </table:table-cell>
          <table:table-cell table:formula="of:=[.D230]-[.D22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7" office:value-type="float" office:value="22213" calcext:value-type="float">
            <text:p>2221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57094907407407" calcext:value-type="float">
            <text:p>0,00257094907407407000</text:p>
          </table:table-cell>
          <table:table-cell table:formula="of:=[.D231]-[.D230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7" office:value-type="float" office:value="22310" calcext:value-type="float">
            <text:p>223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58217592592593" calcext:value-type="float">
            <text:p>0,00258217592592593000</text:p>
          </table:table-cell>
          <table:table-cell table:formula="of:=[.D232]-[.D231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7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59340277777778" calcext:value-type="float">
            <text:p>0,00259340277777778000</text:p>
          </table:table-cell>
          <table:table-cell table:formula="of:=[.D233]-[.D23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7" office:value-type="float" office:value="22504" calcext:value-type="float">
            <text:p>2250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60462962962963" calcext:value-type="float">
            <text:p>0,00260462962962963000</text:p>
          </table:table-cell>
          <table:table-cell table:formula="of:=[.D234]-[.D233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7" office:value-type="float" office:value="22601" calcext:value-type="float">
            <text:p>2260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61585648148148" calcext:value-type="float">
            <text:p>0,00261585648148148000</text:p>
          </table:table-cell>
          <table:table-cell table:formula="of:=[.D235]-[.D23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7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62708333333333" calcext:value-type="float">
            <text:p>0,00262708333333333000</text:p>
          </table:table-cell>
          <table:table-cell table:formula="of:=[.D236]-[.D235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7" office:value-type="float" office:value="22795" calcext:value-type="float">
            <text:p>2279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63831018518519" calcext:value-type="float">
            <text:p>0,00263831018518519000</text:p>
          </table:table-cell>
          <table:table-cell table:formula="of:=[.D237]-[.D236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7" office:value-type="float" office:value="22892" calcext:value-type="float">
            <text:p>2289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64953703703704" calcext:value-type="float">
            <text:p>0,00264953703703704000</text:p>
          </table:table-cell>
          <table:table-cell table:formula="of:=[.D238]-[.D23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7" office:value-type="float" office:value="22989" calcext:value-type="float">
            <text:p>2298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66076388888889" calcext:value-type="float">
            <text:p>0,00266076388888889000</text:p>
          </table:table-cell>
          <table:table-cell table:formula="of:=[.D239]-[.D238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7" office:value-type="float" office:value="23086" calcext:value-type="float">
            <text:p>2308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67199074074074" calcext:value-type="float">
            <text:p>0,00267199074074074000</text:p>
          </table:table-cell>
          <table:table-cell table:formula="of:=[.D240]-[.D239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7" office:value-type="float" office:value="23183" calcext:value-type="float">
            <text:p>2318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68321759259259" calcext:value-type="float">
            <text:p>0,00268321759259259000</text:p>
          </table:table-cell>
          <table:table-cell table:formula="of:=[.D241]-[.D240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table:style-name="ce7" office:value-type="float" office:value="240" calcext:value-type="float">
            <text:p>240</text:p>
          </table:table-cell>
          <table:table-cell table:formula="of:=[.B240]+97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69444444444444" calcext:value-type="float">
            <text:p>0,00269444444444444000</text:p>
          </table:table-cell>
          <table:table-cell table:formula="of:=[.D242]-[.D241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7" office:value-type="float" office:value="23377" calcext:value-type="float">
            <text:p>2337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7056712962963" calcext:value-type="float">
            <text:p>0,00270567129629630000</text:p>
          </table:table-cell>
          <table:table-cell table:formula="of:=[.D243]-[.D242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7" office:value-type="float" office:value="23474" calcext:value-type="float">
            <text:p>2347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71689814814815" calcext:value-type="float">
            <text:p>0,00271689814814815000</text:p>
          </table:table-cell>
          <table:table-cell table:formula="of:=[.D244]-[.D243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7" office:value-type="float" office:value="23571" calcext:value-type="float">
            <text:p>2357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728125" calcext:value-type="float">
            <text:p>0,00272812500000000000</text:p>
          </table:table-cell>
          <table:table-cell table:formula="of:=[.D245]-[.D244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7" office:value-type="float" office:value="23668" calcext:value-type="float">
            <text:p>2366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73935185185185" calcext:value-type="float">
            <text:p>0,00273935185185185000</text:p>
          </table:table-cell>
          <table:table-cell table:formula="of:=[.D246]-[.D245]" office:value-type="float" office:value="0.0000112268518518521" calcext:value-type="float">
            <text:p>0,0000112268518518521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7" office:value-type="float" office:value="23765" calcext:value-type="float">
            <text:p>2376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7505787037037" calcext:value-type="float">
            <text:p>0,00275057870370370000</text:p>
          </table:table-cell>
          <table:table-cell table:formula="of:=[.D247]-[.D246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7" office:value-type="float" office:value="23862" calcext:value-type="float">
            <text:p>2386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76180555555556" calcext:value-type="float">
            <text:p>0,00276180555555556000</text:p>
          </table:table-cell>
          <table:table-cell table:formula="of:=[.D248]-[.D247]" office:value-type="float" office:value="0.0000112268518518517" calcext:value-type="float">
            <text:p>0,0000112268518518517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7" office:value-type="float" office:value="23959" calcext:value-type="float">
            <text:p>2395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77303240740741" calcext:value-type="float">
            <text:p>0,00277303240740741000</text:p>
          </table:table-cell>
          <table:table-cell table:formula="of:=[.D249]-[.D248]" office:value-type="float" office:value="-0.00277303240740741" calcext:value-type="float">
            <text:p>-0,00277303240740741000</text:p>
          </table:table-cell>
          <table:table-cell table:number-columns-repeated="16379"/>
        </table:table-row>
        <table:table-row table:style-name="ro1" table:number-rows-repeated="10483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19:41:55.7807343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40:44.574093617</meta:creation-date>
    <dc:date>2026-05-17T19:42:04.787770733</dc:date>
    <meta:editing-duration>PT18S</meta:editing-duration>
    <meta:editing-cycles>2</meta:editing-cycles>
    <meta:generator>LibreOffice/24.2.7.2$Linux_X86_64 LibreOffice_project/420$Build-2</meta:generator>
    <meta:document-statistic meta:table-count="1" meta:cell-count="1240" meta:object-count="0"/>
  </office:meta>
</office:document-meta>
</file>