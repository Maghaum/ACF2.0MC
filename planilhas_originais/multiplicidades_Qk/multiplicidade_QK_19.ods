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9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1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19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219907407407407" calcext:value-type="float">
            <text:p>0,00000219907407407407</text:p>
          </table:table-cell>
          <table:table-cell table:formula="of:=[.D3]-[.D2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19" office:value-type="float" office:value="38" calcext:value-type="float">
            <text:p>38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0439814814814815" calcext:value-type="float">
            <text:p>0,00000439814814814815</text:p>
          </table:table-cell>
          <table:table-cell table:formula="of:=[.D4]-[.D3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19" office:value-type="float" office:value="57" calcext:value-type="float">
            <text:p>57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0659722222222222" calcext:value-type="float">
            <text:p>0,00000659722222222222</text:p>
          </table:table-cell>
          <table:table-cell table:formula="of:=[.D5]-[.D4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19" office:value-type="float" office:value="76" calcext:value-type="float">
            <text:p>76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087962962962963" calcext:value-type="float">
            <text:p>0,00000879629629629630</text:p>
          </table:table-cell>
          <table:table-cell table:formula="of:=[.D6]-[.D5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19" office:value-type="float" office:value="95" calcext:value-type="float">
            <text:p>9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109953703703704" calcext:value-type="float">
            <text:p>0,00001099537037037040</text:p>
          </table:table-cell>
          <table:table-cell table:formula="of:=[.D7]-[.D6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19" office:value-type="float" office:value="114" calcext:value-type="float">
            <text:p>114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131944444444444" calcext:value-type="float">
            <text:p>0,00001319444444444450</text:p>
          </table:table-cell>
          <table:table-cell table:formula="of:=[.D8]-[.D7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19" office:value-type="float" office:value="133" calcext:value-type="float">
            <text:p>133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153935185185185" calcext:value-type="float">
            <text:p>0,00001539351851851850</text:p>
          </table:table-cell>
          <table:table-cell table:formula="of:=[.D9]-[.D8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19" office:value-type="float" office:value="152" calcext:value-type="float">
            <text:p>152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175925925925926" calcext:value-type="float">
            <text:p>0,00001759259259259260</text:p>
          </table:table-cell>
          <table:table-cell table:formula="of:=[.D10]-[.D9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19" office:value-type="float" office:value="171" calcext:value-type="float">
            <text:p>171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197916666666667" calcext:value-type="float">
            <text:p>0,00001979166666666670</text:p>
          </table:table-cell>
          <table:table-cell table:formula="of:=[.D11]-[.D10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19" office:value-type="float" office:value="190" calcext:value-type="float">
            <text:p>19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219907407407407" calcext:value-type="float">
            <text:p>0,00002199074074074070</text:p>
          </table:table-cell>
          <table:table-cell table:formula="of:=[.D12]-[.D11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19" office:value-type="float" office:value="209" calcext:value-type="float">
            <text:p>209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241898148148148" calcext:value-type="float">
            <text:p>0,00002418981481481480</text:p>
          </table:table-cell>
          <table:table-cell table:formula="of:=[.D13]-[.D12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19" office:value-type="float" office:value="228" calcext:value-type="float">
            <text:p>228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263888888888889" calcext:value-type="float">
            <text:p>0,00002638888888888890</text:p>
          </table:table-cell>
          <table:table-cell table:formula="of:=[.D14]-[.D13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19" office:value-type="float" office:value="247" calcext:value-type="float">
            <text:p>247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28587962962963" calcext:value-type="float">
            <text:p>0,00002858796296296300</text:p>
          </table:table-cell>
          <table:table-cell table:formula="of:=[.D15]-[.D14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19" office:value-type="float" office:value="266" calcext:value-type="float">
            <text:p>266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30787037037037" calcext:value-type="float">
            <text:p>0,00003078703703703700</text:p>
          </table:table-cell>
          <table:table-cell table:formula="of:=[.D16]-[.D15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19" office:value-type="float" office:value="285" calcext:value-type="float">
            <text:p>28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329861111111111" calcext:value-type="float">
            <text:p>0,00003298611111111110</text:p>
          </table:table-cell>
          <table:table-cell table:formula="of:=[.D17]-[.D16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19" office:value-type="float" office:value="304" calcext:value-type="float">
            <text:p>304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351851851851852" calcext:value-type="float">
            <text:p>0,00003518518518518520</text:p>
          </table:table-cell>
          <table:table-cell table:formula="of:=[.D18]-[.D17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19" office:value-type="float" office:value="323" calcext:value-type="float">
            <text:p>323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0373842592592593" calcext:value-type="float">
            <text:p>0,00003738425925925930</text:p>
          </table:table-cell>
          <table:table-cell table:formula="of:=[.D19]-[.D18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19" office:value-type="float" office:value="342" calcext:value-type="float">
            <text:p>342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0395833333333333" calcext:value-type="float">
            <text:p>0,00003958333333333330</text:p>
          </table:table-cell>
          <table:table-cell table:formula="of:=[.D20]-[.D19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19" office:value-type="float" office:value="361" calcext:value-type="float">
            <text:p>361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0417824074074074" calcext:value-type="float">
            <text:p>0,00004178240740740740</text:p>
          </table:table-cell>
          <table:table-cell table:formula="of:=[.D21]-[.D20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19" office:value-type="float" office:value="380" calcext:value-type="float">
            <text:p>38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0439814814814815" calcext:value-type="float">
            <text:p>0,00004398148148148150</text:p>
          </table:table-cell>
          <table:table-cell table:formula="of:=[.D22]-[.D21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19" office:value-type="float" office:value="399" calcext:value-type="float">
            <text:p>399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0461805555555556" calcext:value-type="float">
            <text:p>0,00004618055555555560</text:p>
          </table:table-cell>
          <table:table-cell table:formula="of:=[.D23]-[.D22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19" office:value-type="float" office:value="418" calcext:value-type="float">
            <text:p>418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0483796296296296" calcext:value-type="float">
            <text:p>0,00004837962962962960</text:p>
          </table:table-cell>
          <table:table-cell table:formula="of:=[.D24]-[.D23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19" office:value-type="float" office:value="437" calcext:value-type="float">
            <text:p>437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0505787037037037" calcext:value-type="float">
            <text:p>0,00005057870370370370</text:p>
          </table:table-cell>
          <table:table-cell table:formula="of:=[.D25]-[.D24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19" office:value-type="float" office:value="456" calcext:value-type="float">
            <text:p>456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0527777777777778" calcext:value-type="float">
            <text:p>0,00005277777777777780</text:p>
          </table:table-cell>
          <table:table-cell table:formula="of:=[.D26]-[.D25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19" office:value-type="float" office:value="475" calcext:value-type="float">
            <text:p>47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0549768518518519" calcext:value-type="float">
            <text:p>0,00005497685185185190</text:p>
          </table:table-cell>
          <table:table-cell table:formula="of:=[.D27]-[.D26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19" office:value-type="float" office:value="494" calcext:value-type="float">
            <text:p>494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0571759259259259" calcext:value-type="float">
            <text:p>0,00005717592592592590</text:p>
          </table:table-cell>
          <table:table-cell table:formula="of:=[.D28]-[.D27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19" office:value-type="float" office:value="513" calcext:value-type="float">
            <text:p>513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059375" calcext:value-type="float">
            <text:p>0,00005937500000000000</text:p>
          </table:table-cell>
          <table:table-cell table:formula="of:=[.D29]-[.D28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19" office:value-type="float" office:value="532" calcext:value-type="float">
            <text:p>532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0615740740740741" calcext:value-type="float">
            <text:p>0,00006157407407407410</text:p>
          </table:table-cell>
          <table:table-cell table:formula="of:=[.D30]-[.D29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19" office:value-type="float" office:value="551" calcext:value-type="float">
            <text:p>551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0637731481481481" calcext:value-type="float">
            <text:p>0,00006377314814814810</text:p>
          </table:table-cell>
          <table:table-cell table:formula="of:=[.D31]-[.D30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19" office:value-type="float" office:value="570" calcext:value-type="float">
            <text:p>57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0659722222222222" calcext:value-type="float">
            <text:p>0,00006597222222222220</text:p>
          </table:table-cell>
          <table:table-cell table:formula="of:=[.D32]-[.D31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19" office:value-type="float" office:value="589" calcext:value-type="float">
            <text:p>589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0681712962962963" calcext:value-type="float">
            <text:p>0,00006817129629629630</text:p>
          </table:table-cell>
          <table:table-cell table:formula="of:=[.D33]-[.D32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19" office:value-type="float" office:value="608" calcext:value-type="float">
            <text:p>608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0703703703703704" calcext:value-type="float">
            <text:p>0,00007037037037037040</text:p>
          </table:table-cell>
          <table:table-cell table:formula="of:=[.D34]-[.D33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19" office:value-type="float" office:value="627" calcext:value-type="float">
            <text:p>627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0725694444444444" calcext:value-type="float">
            <text:p>0,00007256944444444440</text:p>
          </table:table-cell>
          <table:table-cell table:formula="of:=[.D35]-[.D34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19" office:value-type="float" office:value="646" calcext:value-type="float">
            <text:p>646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0747685185185185" calcext:value-type="float">
            <text:p>0,00007476851851851850</text:p>
          </table:table-cell>
          <table:table-cell table:formula="of:=[.D36]-[.D35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19" office:value-type="float" office:value="665" calcext:value-type="float">
            <text:p>66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0769675925925926" calcext:value-type="float">
            <text:p>0,00007696759259259260</text:p>
          </table:table-cell>
          <table:table-cell table:formula="of:=[.D37]-[.D36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19" office:value-type="float" office:value="684" calcext:value-type="float">
            <text:p>684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0791666666666667" calcext:value-type="float">
            <text:p>0,00007916666666666670</text:p>
          </table:table-cell>
          <table:table-cell table:formula="of:=[.D38]-[.D37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19" office:value-type="float" office:value="703" calcext:value-type="float">
            <text:p>703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0813657407407407" calcext:value-type="float">
            <text:p>0,00008136574074074070</text:p>
          </table:table-cell>
          <table:table-cell table:formula="of:=[.D39]-[.D38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19" office:value-type="float" office:value="722" calcext:value-type="float">
            <text:p>722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0835648148148148" calcext:value-type="float">
            <text:p>0,00008356481481481480</text:p>
          </table:table-cell>
          <table:table-cell table:formula="of:=[.D40]-[.D39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19" office:value-type="float" office:value="741" calcext:value-type="float">
            <text:p>741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0857638888888889" calcext:value-type="float">
            <text:p>0,00008576388888888890</text:p>
          </table:table-cell>
          <table:table-cell table:formula="of:=[.D41]-[.D40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19" office:value-type="float" office:value="760" calcext:value-type="float">
            <text:p>76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087962962962963" calcext:value-type="float">
            <text:p>0,00008796296296296300</text:p>
          </table:table-cell>
          <table:table-cell table:formula="of:=[.D42]-[.D41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19" office:value-type="float" office:value="779" calcext:value-type="float">
            <text:p>779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090162037037037" calcext:value-type="float">
            <text:p>0,00009016203703703700</text:p>
          </table:table-cell>
          <table:table-cell table:formula="of:=[.D43]-[.D42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19" office:value-type="float" office:value="798" calcext:value-type="float">
            <text:p>798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0923611111111111" calcext:value-type="float">
            <text:p>0,00009236111111111110</text:p>
          </table:table-cell>
          <table:table-cell table:formula="of:=[.D44]-[.D43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19" office:value-type="float" office:value="817" calcext:value-type="float">
            <text:p>817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0945601851851852" calcext:value-type="float">
            <text:p>0,00009456018518518520</text:p>
          </table:table-cell>
          <table:table-cell table:formula="of:=[.D45]-[.D44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19" office:value-type="float" office:value="836" calcext:value-type="float">
            <text:p>836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0967592592592593" calcext:value-type="float">
            <text:p>0,00009675925925925930</text:p>
          </table:table-cell>
          <table:table-cell table:formula="of:=[.D46]-[.D45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19" office:value-type="float" office:value="855" calcext:value-type="float">
            <text:p>85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0989583333333333" calcext:value-type="float">
            <text:p>0,00009895833333333330</text:p>
          </table:table-cell>
          <table:table-cell table:formula="of:=[.D47]-[.D46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19" office:value-type="float" office:value="874" calcext:value-type="float">
            <text:p>874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101157407407407" calcext:value-type="float">
            <text:p>0,00010115740740740700</text:p>
          </table:table-cell>
          <table:table-cell table:formula="of:=[.D48]-[.D47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19" office:value-type="float" office:value="893" calcext:value-type="float">
            <text:p>893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103356481481481" calcext:value-type="float">
            <text:p>0,00010335648148148100</text:p>
          </table:table-cell>
          <table:table-cell table:formula="of:=[.D49]-[.D48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19" office:value-type="float" office:value="912" calcext:value-type="float">
            <text:p>912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105555555555556" calcext:value-type="float">
            <text:p>0,00010555555555555600</text:p>
          </table:table-cell>
          <table:table-cell table:formula="of:=[.D50]-[.D49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19" office:value-type="float" office:value="931" calcext:value-type="float">
            <text:p>931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10775462962963" calcext:value-type="float">
            <text:p>0,00010775462962963000</text:p>
          </table:table-cell>
          <table:table-cell table:formula="of:=[.D51]-[.D50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19" office:value-type="float" office:value="950" calcext:value-type="float">
            <text:p>9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109953703703704" calcext:value-type="float">
            <text:p>0,00010995370370370400</text:p>
          </table:table-cell>
          <table:table-cell table:formula="of:=[.D52]-[.D51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19" office:value-type="float" office:value="969" calcext:value-type="float">
            <text:p>969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112152777777778" calcext:value-type="float">
            <text:p>0,00011215277777777800</text:p>
          </table:table-cell>
          <table:table-cell table:formula="of:=[.D53]-[.D52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19" office:value-type="float" office:value="988" calcext:value-type="float">
            <text:p>988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114351851851852" calcext:value-type="float">
            <text:p>0,00011435185185185200</text:p>
          </table:table-cell>
          <table:table-cell table:formula="of:=[.D54]-[.D53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19" office:value-type="float" office:value="1007" calcext:value-type="float">
            <text:p>1007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116550925925926" calcext:value-type="float">
            <text:p>0,00011655092592592600</text:p>
          </table:table-cell>
          <table:table-cell table:formula="of:=[.D55]-[.D54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19" office:value-type="float" office:value="1026" calcext:value-type="float">
            <text:p>1026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11875" calcext:value-type="float">
            <text:p>0,00011875000000000000</text:p>
          </table:table-cell>
          <table:table-cell table:formula="of:=[.D56]-[.D55]" office:value-type="float" office:value="0.00000219907407407407" calcext:value-type="float">
            <text:p>0,0000021990740740740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19" office:value-type="float" office:value="1045" calcext:value-type="float">
            <text:p>104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120949074074074" calcext:value-type="float">
            <text:p>0,00012094907407407400</text:p>
          </table:table-cell>
          <table:table-cell table:formula="of:=[.D57]-[.D56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19" office:value-type="float" office:value="1064" calcext:value-type="float">
            <text:p>1064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123148148148148" calcext:value-type="float">
            <text:p>0,00012314814814814800</text:p>
          </table:table-cell>
          <table:table-cell table:formula="of:=[.D58]-[.D57]" office:value-type="float" office:value="0.00000219907407407409" calcext:value-type="float">
            <text:p>0,0000021990740740740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19" office:value-type="float" office:value="1083" calcext:value-type="float">
            <text:p>1083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125347222222222" calcext:value-type="float">
            <text:p>0,00012534722222222200</text:p>
          </table:table-cell>
          <table:table-cell table:formula="of:=[.D59]-[.D58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19" office:value-type="float" office:value="1102" calcext:value-type="float">
            <text:p>1102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127546296296296" calcext:value-type="float">
            <text:p>0,00012754629629629600</text:p>
          </table:table-cell>
          <table:table-cell table:formula="of:=[.D60]-[.D59]" office:value-type="float" office:value="0.00000219907407407409" calcext:value-type="float">
            <text:p>0,0000021990740740740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19" office:value-type="float" office:value="1121" calcext:value-type="float">
            <text:p>1121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12974537037037" calcext:value-type="float">
            <text:p>0,00012974537037037000</text:p>
          </table:table-cell>
          <table:table-cell table:formula="of:=[.D61]-[.D60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19" office:value-type="float" office:value="1140" calcext:value-type="float">
            <text:p>114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131944444444444" calcext:value-type="float">
            <text:p>0,00013194444444444400</text:p>
          </table:table-cell>
          <table:table-cell table:formula="of:=[.D62]-[.D61]" office:value-type="float" office:value="0.00000219907407407409" calcext:value-type="float">
            <text:p>0,0000021990740740740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19" office:value-type="float" office:value="1159" calcext:value-type="float">
            <text:p>1159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134143518518519" calcext:value-type="float">
            <text:p>0,00013414351851851900</text:p>
          </table:table-cell>
          <table:table-cell table:formula="of:=[.D63]-[.D62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19" office:value-type="float" office:value="1178" calcext:value-type="float">
            <text:p>1178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136342592592593" calcext:value-type="float">
            <text:p>0,00013634259259259300</text:p>
          </table:table-cell>
          <table:table-cell table:formula="of:=[.D64]-[.D63]" office:value-type="float" office:value="0.00000219907407407409" calcext:value-type="float">
            <text:p>0,0000021990740740740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19" office:value-type="float" office:value="1197" calcext:value-type="float">
            <text:p>1197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138541666666667" calcext:value-type="float">
            <text:p>0,00013854166666666700</text:p>
          </table:table-cell>
          <table:table-cell table:formula="of:=[.D65]-[.D64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19" office:value-type="float" office:value="1216" calcext:value-type="float">
            <text:p>1216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140740740740741" calcext:value-type="float">
            <text:p>0,00014074074074074100</text:p>
          </table:table-cell>
          <table:table-cell table:formula="of:=[.D66]-[.D65]" office:value-type="float" office:value="0.00000219907407407409" calcext:value-type="float">
            <text:p>0,0000021990740740740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19" office:value-type="float" office:value="1235" calcext:value-type="float">
            <text:p>123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142939814814815" calcext:value-type="float">
            <text:p>0,00014293981481481500</text:p>
          </table:table-cell>
          <table:table-cell table:formula="of:=[.D67]-[.D66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19" office:value-type="float" office:value="1254" calcext:value-type="float">
            <text:p>1254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145138888888889" calcext:value-type="float">
            <text:p>0,00014513888888888900</text:p>
          </table:table-cell>
          <table:table-cell table:formula="of:=[.D68]-[.D67]" office:value-type="float" office:value="0.00000219907407407409" calcext:value-type="float">
            <text:p>0,000002199074074074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19" office:value-type="float" office:value="1273" calcext:value-type="float">
            <text:p>1273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147337962962963" calcext:value-type="float">
            <text:p>0,00014733796296296300</text:p>
          </table:table-cell>
          <table:table-cell table:formula="of:=[.D69]-[.D68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19" office:value-type="float" office:value="1292" calcext:value-type="float">
            <text:p>1292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149537037037037" calcext:value-type="float">
            <text:p>0,00014953703703703700</text:p>
          </table:table-cell>
          <table:table-cell table:formula="of:=[.D70]-[.D69]" office:value-type="float" office:value="0.00000219907407407409" calcext:value-type="float">
            <text:p>0,0000021990740740740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19" office:value-type="float" office:value="1311" calcext:value-type="float">
            <text:p>1311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151736111111111" calcext:value-type="float">
            <text:p>0,00015173611111111100</text:p>
          </table:table-cell>
          <table:table-cell table:formula="of:=[.D71]-[.D70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19" office:value-type="float" office:value="1330" calcext:value-type="float">
            <text:p>133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153935185185185" calcext:value-type="float">
            <text:p>0,00015393518518518500</text:p>
          </table:table-cell>
          <table:table-cell table:formula="of:=[.D72]-[.D71]" office:value-type="float" office:value="0.00000219907407407409" calcext:value-type="float">
            <text:p>0,0000021990740740740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19" office:value-type="float" office:value="1349" calcext:value-type="float">
            <text:p>1349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156134259259259" calcext:value-type="float">
            <text:p>0,00015613425925925900</text:p>
          </table:table-cell>
          <table:table-cell table:formula="of:=[.D73]-[.D72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19" office:value-type="float" office:value="1368" calcext:value-type="float">
            <text:p>1368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158333333333333" calcext:value-type="float">
            <text:p>0,00015833333333333300</text:p>
          </table:table-cell>
          <table:table-cell table:formula="of:=[.D74]-[.D73]" office:value-type="float" office:value="0.00000219907407407409" calcext:value-type="float">
            <text:p>0,0000021990740740740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19" office:value-type="float" office:value="1387" calcext:value-type="float">
            <text:p>1387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160532407407407" calcext:value-type="float">
            <text:p>0,00016053240740740700</text:p>
          </table:table-cell>
          <table:table-cell table:formula="of:=[.D75]-[.D74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19" office:value-type="float" office:value="1406" calcext:value-type="float">
            <text:p>1406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162731481481481" calcext:value-type="float">
            <text:p>0,00016273148148148100</text:p>
          </table:table-cell>
          <table:table-cell table:formula="of:=[.D76]-[.D75]" office:value-type="float" office:value="0.00000219907407407409" calcext:value-type="float">
            <text:p>0,0000021990740740740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19" office:value-type="float" office:value="1425" calcext:value-type="float">
            <text:p>142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164930555555556" calcext:value-type="float">
            <text:p>0,00016493055555555600</text:p>
          </table:table-cell>
          <table:table-cell table:formula="of:=[.D77]-[.D76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19" office:value-type="float" office:value="1444" calcext:value-type="float">
            <text:p>1444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16712962962963" calcext:value-type="float">
            <text:p>0,00016712962962963000</text:p>
          </table:table-cell>
          <table:table-cell table:formula="of:=[.D78]-[.D77]" office:value-type="float" office:value="0.00000219907407407409" calcext:value-type="float">
            <text:p>0,0000021990740740740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19" office:value-type="float" office:value="1463" calcext:value-type="float">
            <text:p>1463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169328703703704" calcext:value-type="float">
            <text:p>0,00016932870370370400</text:p>
          </table:table-cell>
          <table:table-cell table:formula="of:=[.D79]-[.D78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19" office:value-type="float" office:value="1482" calcext:value-type="float">
            <text:p>1482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171527777777778" calcext:value-type="float">
            <text:p>0,00017152777777777800</text:p>
          </table:table-cell>
          <table:table-cell table:formula="of:=[.D80]-[.D79]" office:value-type="float" office:value="0.00000219907407407409" calcext:value-type="float">
            <text:p>0,0000021990740740740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19" office:value-type="float" office:value="1501" calcext:value-type="float">
            <text:p>1501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173726851851852" calcext:value-type="float">
            <text:p>0,00017372685185185200</text:p>
          </table:table-cell>
          <table:table-cell table:formula="of:=[.D81]-[.D80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19" office:value-type="float" office:value="1520" calcext:value-type="float">
            <text:p>152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175925925925926" calcext:value-type="float">
            <text:p>0,00017592592592592600</text:p>
          </table:table-cell>
          <table:table-cell table:formula="of:=[.D82]-[.D81]" office:value-type="float" office:value="0.00000219907407407409" calcext:value-type="float">
            <text:p>0,0000021990740740740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19" office:value-type="float" office:value="1539" calcext:value-type="float">
            <text:p>1539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178125" calcext:value-type="float">
            <text:p>0,00017812500000000000</text:p>
          </table:table-cell>
          <table:table-cell table:formula="of:=[.D83]-[.D82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19" office:value-type="float" office:value="1558" calcext:value-type="float">
            <text:p>1558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180324074074074" calcext:value-type="float">
            <text:p>0,00018032407407407400</text:p>
          </table:table-cell>
          <table:table-cell table:formula="of:=[.D84]-[.D83]" office:value-type="float" office:value="0.00000219907407407409" calcext:value-type="float">
            <text:p>0,0000021990740740740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19" office:value-type="float" office:value="1577" calcext:value-type="float">
            <text:p>1577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182523148148148" calcext:value-type="float">
            <text:p>0,00018252314814814800</text:p>
          </table:table-cell>
          <table:table-cell table:formula="of:=[.D85]-[.D84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19" office:value-type="float" office:value="1596" calcext:value-type="float">
            <text:p>1596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184722222222222" calcext:value-type="float">
            <text:p>0,00018472222222222200</text:p>
          </table:table-cell>
          <table:table-cell table:formula="of:=[.D86]-[.D85]" office:value-type="float" office:value="0.00000219907407407409" calcext:value-type="float">
            <text:p>0,0000021990740740740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19" office:value-type="float" office:value="1615" calcext:value-type="float">
            <text:p>161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186921296296296" calcext:value-type="float">
            <text:p>0,00018692129629629600</text:p>
          </table:table-cell>
          <table:table-cell table:formula="of:=[.D87]-[.D86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19" office:value-type="float" office:value="1634" calcext:value-type="float">
            <text:p>1634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18912037037037" calcext:value-type="float">
            <text:p>0,00018912037037037000</text:p>
          </table:table-cell>
          <table:table-cell table:formula="of:=[.D88]-[.D87]" office:value-type="float" office:value="0.00000219907407407409" calcext:value-type="float">
            <text:p>0,0000021990740740740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19" office:value-type="float" office:value="1653" calcext:value-type="float">
            <text:p>1653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191319444444444" calcext:value-type="float">
            <text:p>0,00019131944444444400</text:p>
          </table:table-cell>
          <table:table-cell table:formula="of:=[.D89]-[.D88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19" office:value-type="float" office:value="1672" calcext:value-type="float">
            <text:p>1672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193518518518519" calcext:value-type="float">
            <text:p>0,00019351851851851900</text:p>
          </table:table-cell>
          <table:table-cell table:formula="of:=[.D90]-[.D89]" office:value-type="float" office:value="0.00000219907407407409" calcext:value-type="float">
            <text:p>0,0000021990740740740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19" office:value-type="float" office:value="1691" calcext:value-type="float">
            <text:p>1691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195717592592593" calcext:value-type="float">
            <text:p>0,00019571759259259300</text:p>
          </table:table-cell>
          <table:table-cell table:formula="of:=[.D91]-[.D90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19" office:value-type="float" office:value="1710" calcext:value-type="float">
            <text:p>171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197916666666667" calcext:value-type="float">
            <text:p>0,00019791666666666700</text:p>
          </table:table-cell>
          <table:table-cell table:formula="of:=[.D92]-[.D91]" office:value-type="float" office:value="0.00000219907407407409" calcext:value-type="float">
            <text:p>0,0000021990740740740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19" office:value-type="float" office:value="1729" calcext:value-type="float">
            <text:p>1729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200115740740741" calcext:value-type="float">
            <text:p>0,00020011574074074100</text:p>
          </table:table-cell>
          <table:table-cell table:formula="of:=[.D93]-[.D92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19" office:value-type="float" office:value="1748" calcext:value-type="float">
            <text:p>1748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202314814814815" calcext:value-type="float">
            <text:p>0,00020231481481481500</text:p>
          </table:table-cell>
          <table:table-cell table:formula="of:=[.D94]-[.D93]" office:value-type="float" office:value="0.00000219907407407409" calcext:value-type="float">
            <text:p>0,0000021990740740740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19" office:value-type="float" office:value="1767" calcext:value-type="float">
            <text:p>1767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204513888888889" calcext:value-type="float">
            <text:p>0,00020451388888888900</text:p>
          </table:table-cell>
          <table:table-cell table:formula="of:=[.D95]-[.D94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19" office:value-type="float" office:value="1786" calcext:value-type="float">
            <text:p>1786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206712962962963" calcext:value-type="float">
            <text:p>0,00020671296296296300</text:p>
          </table:table-cell>
          <table:table-cell table:formula="of:=[.D96]-[.D95]" office:value-type="float" office:value="0.00000219907407407409" calcext:value-type="float">
            <text:p>0,0000021990740740740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19" office:value-type="float" office:value="1805" calcext:value-type="float">
            <text:p>180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208912037037037" calcext:value-type="float">
            <text:p>0,00020891203703703700</text:p>
          </table:table-cell>
          <table:table-cell table:formula="of:=[.D97]-[.D96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19" office:value-type="float" office:value="1824" calcext:value-type="float">
            <text:p>1824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211111111111111" calcext:value-type="float">
            <text:p>0,00021111111111111100</text:p>
          </table:table-cell>
          <table:table-cell table:formula="of:=[.D98]-[.D97]" office:value-type="float" office:value="0.00000219907407407409" calcext:value-type="float">
            <text:p>0,0000021990740740740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19" office:value-type="float" office:value="1843" calcext:value-type="float">
            <text:p>1843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213310185185185" calcext:value-type="float">
            <text:p>0,00021331018518518500</text:p>
          </table:table-cell>
          <table:table-cell table:formula="of:=[.D99]-[.D98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19" office:value-type="float" office:value="1862" calcext:value-type="float">
            <text:p>1862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215509259259259" calcext:value-type="float">
            <text:p>0,00021550925925925900</text:p>
          </table:table-cell>
          <table:table-cell table:formula="of:=[.D100]-[.D99]" office:value-type="float" office:value="0.00000219907407407409" calcext:value-type="float">
            <text:p>0,0000021990740740740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19" office:value-type="float" office:value="1881" calcext:value-type="float">
            <text:p>1881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217708333333333" calcext:value-type="float">
            <text:p>0,00021770833333333300</text:p>
          </table:table-cell>
          <table:table-cell table:formula="of:=[.D101]-[.D100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19" office:value-type="float" office:value="1900" calcext:value-type="float">
            <text:p>19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219907407407407" calcext:value-type="float">
            <text:p>0,00021990740740740700</text:p>
          </table:table-cell>
          <table:table-cell table:formula="of:=[.D102]-[.D101]" office:value-type="float" office:value="0.00000219907407407409" calcext:value-type="float">
            <text:p>0,0000021990740740740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19" office:value-type="float" office:value="1919" calcext:value-type="float">
            <text:p>1919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222106481481482" calcext:value-type="float">
            <text:p>0,00022210648148148200</text:p>
          </table:table-cell>
          <table:table-cell table:formula="of:=[.D103]-[.D102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19" office:value-type="float" office:value="1938" calcext:value-type="float">
            <text:p>1938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224305555555556" calcext:value-type="float">
            <text:p>0,00022430555555555600</text:p>
          </table:table-cell>
          <table:table-cell table:formula="of:=[.D104]-[.D103]" office:value-type="float" office:value="0.00000219907407407409" calcext:value-type="float">
            <text:p>0,0000021990740740740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19" office:value-type="float" office:value="1957" calcext:value-type="float">
            <text:p>1957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22650462962963" calcext:value-type="float">
            <text:p>0,00022650462962963000</text:p>
          </table:table-cell>
          <table:table-cell table:formula="of:=[.D105]-[.D104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19" office:value-type="float" office:value="1976" calcext:value-type="float">
            <text:p>1976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228703703703704" calcext:value-type="float">
            <text:p>0,00022870370370370400</text:p>
          </table:table-cell>
          <table:table-cell table:formula="of:=[.D106]-[.D105]" office:value-type="float" office:value="0.00000219907407407409" calcext:value-type="float">
            <text:p>0,0000021990740740740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19" office:value-type="float" office:value="1995" calcext:value-type="float">
            <text:p>199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230902777777778" calcext:value-type="float">
            <text:p>0,00023090277777777800</text:p>
          </table:table-cell>
          <table:table-cell table:formula="of:=[.D107]-[.D106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19" office:value-type="float" office:value="2014" calcext:value-type="float">
            <text:p>2014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233101851851852" calcext:value-type="float">
            <text:p>0,00023310185185185200</text:p>
          </table:table-cell>
          <table:table-cell table:formula="of:=[.D108]-[.D107]" office:value-type="float" office:value="0.00000219907407407409" calcext:value-type="float">
            <text:p>0,0000021990740740740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19" office:value-type="float" office:value="2033" calcext:value-type="float">
            <text:p>2033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235300925925926" calcext:value-type="float">
            <text:p>0,00023530092592592600</text:p>
          </table:table-cell>
          <table:table-cell table:formula="of:=[.D109]-[.D108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19" office:value-type="float" office:value="2052" calcext:value-type="float">
            <text:p>2052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2375" calcext:value-type="float">
            <text:p>0,00023750000000000000</text:p>
          </table:table-cell>
          <table:table-cell table:formula="of:=[.D110]-[.D109]" office:value-type="float" office:value="0.00000219907407407409" calcext:value-type="float">
            <text:p>0,0000021990740740740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19" office:value-type="float" office:value="2071" calcext:value-type="float">
            <text:p>2071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239699074074074" calcext:value-type="float">
            <text:p>0,00023969907407407400</text:p>
          </table:table-cell>
          <table:table-cell table:formula="of:=[.D111]-[.D110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19" office:value-type="float" office:value="2090" calcext:value-type="float">
            <text:p>209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241898148148148" calcext:value-type="float">
            <text:p>0,00024189814814814800</text:p>
          </table:table-cell>
          <table:table-cell table:formula="of:=[.D112]-[.D111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19" office:value-type="float" office:value="2109" calcext:value-type="float">
            <text:p>2109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244097222222222" calcext:value-type="float">
            <text:p>0,00024409722222222200</text:p>
          </table:table-cell>
          <table:table-cell table:formula="of:=[.D113]-[.D112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19" office:value-type="float" office:value="2128" calcext:value-type="float">
            <text:p>2128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246296296296296" calcext:value-type="float">
            <text:p>0,00024629629629629600</text:p>
          </table:table-cell>
          <table:table-cell table:formula="of:=[.D114]-[.D113]" office:value-type="float" office:value="0.00000219907407407412" calcext:value-type="float">
            <text:p>0,000002199074074074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19" office:value-type="float" office:value="2147" calcext:value-type="float">
            <text:p>2147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24849537037037" calcext:value-type="float">
            <text:p>0,00024849537037037000</text:p>
          </table:table-cell>
          <table:table-cell table:formula="of:=[.D115]-[.D114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19" office:value-type="float" office:value="2166" calcext:value-type="float">
            <text:p>2166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250694444444444" calcext:value-type="float">
            <text:p>0,00025069444444444400</text:p>
          </table:table-cell>
          <table:table-cell table:formula="of:=[.D116]-[.D115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19" office:value-type="float" office:value="2185" calcext:value-type="float">
            <text:p>218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252893518518519" calcext:value-type="float">
            <text:p>0,00025289351851851900</text:p>
          </table:table-cell>
          <table:table-cell table:formula="of:=[.D117]-[.D116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19" office:value-type="float" office:value="2204" calcext:value-type="float">
            <text:p>2204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255092592592593" calcext:value-type="float">
            <text:p>0,00025509259259259300</text:p>
          </table:table-cell>
          <table:table-cell table:formula="of:=[.D118]-[.D117]" office:value-type="float" office:value="0.00000219907407407412" calcext:value-type="float">
            <text:p>0,0000021990740740741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19" office:value-type="float" office:value="2223" calcext:value-type="float">
            <text:p>2223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257291666666667" calcext:value-type="float">
            <text:p>0,00025729166666666700</text:p>
          </table:table-cell>
          <table:table-cell table:formula="of:=[.D119]-[.D118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19" office:value-type="float" office:value="2242" calcext:value-type="float">
            <text:p>2242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259490740740741" calcext:value-type="float">
            <text:p>0,00025949074074074100</text:p>
          </table:table-cell>
          <table:table-cell table:formula="of:=[.D120]-[.D119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19" office:value-type="float" office:value="2261" calcext:value-type="float">
            <text:p>2261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261689814814815" calcext:value-type="float">
            <text:p>0,00026168981481481500</text:p>
          </table:table-cell>
          <table:table-cell table:formula="of:=[.D121]-[.D120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19" office:value-type="float" office:value="2280" calcext:value-type="float">
            <text:p>228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263888888888889" calcext:value-type="float">
            <text:p>0,00026388888888888900</text:p>
          </table:table-cell>
          <table:table-cell table:formula="of:=[.D122]-[.D121]" office:value-type="float" office:value="0.00000219907407407412" calcext:value-type="float">
            <text:p>0,0000021990740740741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19" office:value-type="float" office:value="2299" calcext:value-type="float">
            <text:p>2299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266087962962963" calcext:value-type="float">
            <text:p>0,00026608796296296300</text:p>
          </table:table-cell>
          <table:table-cell table:formula="of:=[.D123]-[.D122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19" office:value-type="float" office:value="2318" calcext:value-type="float">
            <text:p>2318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268287037037037" calcext:value-type="float">
            <text:p>0,00026828703703703700</text:p>
          </table:table-cell>
          <table:table-cell table:formula="of:=[.D124]-[.D123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19" office:value-type="float" office:value="2337" calcext:value-type="float">
            <text:p>2337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270486111111111" calcext:value-type="float">
            <text:p>0,00027048611111111100</text:p>
          </table:table-cell>
          <table:table-cell table:formula="of:=[.D125]-[.D124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19" office:value-type="float" office:value="2356" calcext:value-type="float">
            <text:p>2356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272685185185185" calcext:value-type="float">
            <text:p>0,00027268518518518500</text:p>
          </table:table-cell>
          <table:table-cell table:formula="of:=[.D126]-[.D125]" office:value-type="float" office:value="0.00000219907407407412" calcext:value-type="float">
            <text:p>0,0000021990740740741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19" office:value-type="float" office:value="2375" calcext:value-type="float">
            <text:p>237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274884259259259" calcext:value-type="float">
            <text:p>0,00027488425925925900</text:p>
          </table:table-cell>
          <table:table-cell table:formula="of:=[.D127]-[.D126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19" office:value-type="float" office:value="2394" calcext:value-type="float">
            <text:p>2394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277083333333333" calcext:value-type="float">
            <text:p>0,00027708333333333300</text:p>
          </table:table-cell>
          <table:table-cell table:formula="of:=[.D128]-[.D127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19" office:value-type="float" office:value="2413" calcext:value-type="float">
            <text:p>2413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279282407407407" calcext:value-type="float">
            <text:p>0,00027928240740740700</text:p>
          </table:table-cell>
          <table:table-cell table:formula="of:=[.D129]-[.D128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19" office:value-type="float" office:value="2432" calcext:value-type="float">
            <text:p>2432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281481481481481" calcext:value-type="float">
            <text:p>0,00028148148148148100</text:p>
          </table:table-cell>
          <table:table-cell table:formula="of:=[.D130]-[.D129]" office:value-type="float" office:value="0.00000219907407407412" calcext:value-type="float">
            <text:p>0,0000021990740740741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19" office:value-type="float" office:value="2451" calcext:value-type="float">
            <text:p>2451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283680555555556" calcext:value-type="float">
            <text:p>0,00028368055555555600</text:p>
          </table:table-cell>
          <table:table-cell table:formula="of:=[.D131]-[.D130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19" office:value-type="float" office:value="2470" calcext:value-type="float">
            <text:p>247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28587962962963" calcext:value-type="float">
            <text:p>0,00028587962962963000</text:p>
          </table:table-cell>
          <table:table-cell table:formula="of:=[.D132]-[.D131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19" office:value-type="float" office:value="2489" calcext:value-type="float">
            <text:p>2489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288078703703704" calcext:value-type="float">
            <text:p>0,00028807870370370400</text:p>
          </table:table-cell>
          <table:table-cell table:formula="of:=[.D133]-[.D132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19" office:value-type="float" office:value="2508" calcext:value-type="float">
            <text:p>2508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290277777777778" calcext:value-type="float">
            <text:p>0,00029027777777777800</text:p>
          </table:table-cell>
          <table:table-cell table:formula="of:=[.D134]-[.D133]" office:value-type="float" office:value="0.00000219907407407412" calcext:value-type="float">
            <text:p>0,0000021990740740741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19" office:value-type="float" office:value="2527" calcext:value-type="float">
            <text:p>2527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292476851851852" calcext:value-type="float">
            <text:p>0,00029247685185185200</text:p>
          </table:table-cell>
          <table:table-cell table:formula="of:=[.D135]-[.D134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19" office:value-type="float" office:value="2546" calcext:value-type="float">
            <text:p>2546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294675925925926" calcext:value-type="float">
            <text:p>0,00029467592592592600</text:p>
          </table:table-cell>
          <table:table-cell table:formula="of:=[.D136]-[.D135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19" office:value-type="float" office:value="2565" calcext:value-type="float">
            <text:p>256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296875" calcext:value-type="float">
            <text:p>0,00029687500000000000</text:p>
          </table:table-cell>
          <table:table-cell table:formula="of:=[.D137]-[.D136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19" office:value-type="float" office:value="2584" calcext:value-type="float">
            <text:p>2584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299074074074074" calcext:value-type="float">
            <text:p>0,00029907407407407400</text:p>
          </table:table-cell>
          <table:table-cell table:formula="of:=[.D138]-[.D137]" office:value-type="float" office:value="0.00000219907407407412" calcext:value-type="float">
            <text:p>0,0000021990740740741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19" office:value-type="float" office:value="2603" calcext:value-type="float">
            <text:p>2603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301273148148148" calcext:value-type="float">
            <text:p>0,00030127314814814800</text:p>
          </table:table-cell>
          <table:table-cell table:formula="of:=[.D139]-[.D138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19" office:value-type="float" office:value="2622" calcext:value-type="float">
            <text:p>2622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303472222222222" calcext:value-type="float">
            <text:p>0,00030347222222222200</text:p>
          </table:table-cell>
          <table:table-cell table:formula="of:=[.D140]-[.D139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19" office:value-type="float" office:value="2641" calcext:value-type="float">
            <text:p>2641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305671296296296" calcext:value-type="float">
            <text:p>0,00030567129629629600</text:p>
          </table:table-cell>
          <table:table-cell table:formula="of:=[.D141]-[.D140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19" office:value-type="float" office:value="2660" calcext:value-type="float">
            <text:p>266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30787037037037" calcext:value-type="float">
            <text:p>0,00030787037037037000</text:p>
          </table:table-cell>
          <table:table-cell table:formula="of:=[.D142]-[.D141]" office:value-type="float" office:value="0.00000219907407407412" calcext:value-type="float">
            <text:p>0,0000021990740740741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19" office:value-type="float" office:value="2679" calcext:value-type="float">
            <text:p>2679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310069444444444" calcext:value-type="float">
            <text:p>0,00031006944444444400</text:p>
          </table:table-cell>
          <table:table-cell table:formula="of:=[.D143]-[.D142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19" office:value-type="float" office:value="2698" calcext:value-type="float">
            <text:p>2698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312268518518519" calcext:value-type="float">
            <text:p>0,00031226851851851900</text:p>
          </table:table-cell>
          <table:table-cell table:formula="of:=[.D144]-[.D143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19" office:value-type="float" office:value="2717" calcext:value-type="float">
            <text:p>2717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314467592592593" calcext:value-type="float">
            <text:p>0,00031446759259259300</text:p>
          </table:table-cell>
          <table:table-cell table:formula="of:=[.D145]-[.D144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19" office:value-type="float" office:value="2736" calcext:value-type="float">
            <text:p>2736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316666666666667" calcext:value-type="float">
            <text:p>0,00031666666666666700</text:p>
          </table:table-cell>
          <table:table-cell table:formula="of:=[.D146]-[.D145]" office:value-type="float" office:value="0.00000219907407407412" calcext:value-type="float">
            <text:p>0,0000021990740740741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19" office:value-type="float" office:value="2755" calcext:value-type="float">
            <text:p>275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318865740740741" calcext:value-type="float">
            <text:p>0,00031886574074074100</text:p>
          </table:table-cell>
          <table:table-cell table:formula="of:=[.D147]-[.D146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19" office:value-type="float" office:value="2774" calcext:value-type="float">
            <text:p>2774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321064814814815" calcext:value-type="float">
            <text:p>0,00032106481481481500</text:p>
          </table:table-cell>
          <table:table-cell table:formula="of:=[.D148]-[.D147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19" office:value-type="float" office:value="2793" calcext:value-type="float">
            <text:p>2793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323263888888889" calcext:value-type="float">
            <text:p>0,00032326388888888900</text:p>
          </table:table-cell>
          <table:table-cell table:formula="of:=[.D149]-[.D148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19" office:value-type="float" office:value="2812" calcext:value-type="float">
            <text:p>2812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325462962962963" calcext:value-type="float">
            <text:p>0,00032546296296296300</text:p>
          </table:table-cell>
          <table:table-cell table:formula="of:=[.D150]-[.D149]" office:value-type="float" office:value="0.00000219907407407412" calcext:value-type="float">
            <text:p>0,0000021990740740741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19" office:value-type="float" office:value="2831" calcext:value-type="float">
            <text:p>2831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327662037037037" calcext:value-type="float">
            <text:p>0,00032766203703703700</text:p>
          </table:table-cell>
          <table:table-cell table:formula="of:=[.D151]-[.D150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19" office:value-type="float" office:value="2850" calcext:value-type="float">
            <text:p>28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329861111111111" calcext:value-type="float">
            <text:p>0,00032986111111111100</text:p>
          </table:table-cell>
          <table:table-cell table:formula="of:=[.D152]-[.D151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19" office:value-type="float" office:value="2869" calcext:value-type="float">
            <text:p>2869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332060185185185" calcext:value-type="float">
            <text:p>0,00033206018518518500</text:p>
          </table:table-cell>
          <table:table-cell table:formula="of:=[.D153]-[.D152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19" office:value-type="float" office:value="2888" calcext:value-type="float">
            <text:p>2888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334259259259259" calcext:value-type="float">
            <text:p>0,00033425925925925900</text:p>
          </table:table-cell>
          <table:table-cell table:formula="of:=[.D154]-[.D153]" office:value-type="float" office:value="0.00000219907407407412" calcext:value-type="float">
            <text:p>0,0000021990740740741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19" office:value-type="float" office:value="2907" calcext:value-type="float">
            <text:p>2907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336458333333333" calcext:value-type="float">
            <text:p>0,00033645833333333300</text:p>
          </table:table-cell>
          <table:table-cell table:formula="of:=[.D155]-[.D154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19" office:value-type="float" office:value="2926" calcext:value-type="float">
            <text:p>2926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338657407407407" calcext:value-type="float">
            <text:p>0,00033865740740740700</text:p>
          </table:table-cell>
          <table:table-cell table:formula="of:=[.D156]-[.D155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19" office:value-type="float" office:value="2945" calcext:value-type="float">
            <text:p>294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340856481481482" calcext:value-type="float">
            <text:p>0,00034085648148148200</text:p>
          </table:table-cell>
          <table:table-cell table:formula="of:=[.D157]-[.D156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19" office:value-type="float" office:value="2964" calcext:value-type="float">
            <text:p>2964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343055555555556" calcext:value-type="float">
            <text:p>0,00034305555555555600</text:p>
          </table:table-cell>
          <table:table-cell table:formula="of:=[.D158]-[.D157]" office:value-type="float" office:value="0.00000219907407407412" calcext:value-type="float">
            <text:p>0,0000021990740740741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19" office:value-type="float" office:value="2983" calcext:value-type="float">
            <text:p>2983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34525462962963" calcext:value-type="float">
            <text:p>0,00034525462962963000</text:p>
          </table:table-cell>
          <table:table-cell table:formula="of:=[.D159]-[.D158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19" office:value-type="float" office:value="3002" calcext:value-type="float">
            <text:p>3002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347453703703704" calcext:value-type="float">
            <text:p>0,00034745370370370400</text:p>
          </table:table-cell>
          <table:table-cell table:formula="of:=[.D160]-[.D159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19" office:value-type="float" office:value="3021" calcext:value-type="float">
            <text:p>3021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349652777777778" calcext:value-type="float">
            <text:p>0,00034965277777777800</text:p>
          </table:table-cell>
          <table:table-cell table:formula="of:=[.D161]-[.D160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19" office:value-type="float" office:value="3040" calcext:value-type="float">
            <text:p>304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351851851851852" calcext:value-type="float">
            <text:p>0,00035185185185185200</text:p>
          </table:table-cell>
          <table:table-cell table:formula="of:=[.D162]-[.D161]" office:value-type="float" office:value="0.00000219907407407412" calcext:value-type="float">
            <text:p>0,0000021990740740741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19" office:value-type="float" office:value="3059" calcext:value-type="float">
            <text:p>3059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354050925925926" calcext:value-type="float">
            <text:p>0,00035405092592592600</text:p>
          </table:table-cell>
          <table:table-cell table:formula="of:=[.D163]-[.D162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19" office:value-type="float" office:value="3078" calcext:value-type="float">
            <text:p>3078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35625" calcext:value-type="float">
            <text:p>0,00035625000000000000</text:p>
          </table:table-cell>
          <table:table-cell table:formula="of:=[.D164]-[.D163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19" office:value-type="float" office:value="3097" calcext:value-type="float">
            <text:p>3097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358449074074074" calcext:value-type="float">
            <text:p>0,00035844907407407400</text:p>
          </table:table-cell>
          <table:table-cell table:formula="of:=[.D165]-[.D164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19" office:value-type="float" office:value="3116" calcext:value-type="float">
            <text:p>3116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360648148148148" calcext:value-type="float">
            <text:p>0,00036064814814814800</text:p>
          </table:table-cell>
          <table:table-cell table:formula="of:=[.D166]-[.D165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19" office:value-type="float" office:value="3135" calcext:value-type="float">
            <text:p>313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362847222222222" calcext:value-type="float">
            <text:p>0,00036284722222222200</text:p>
          </table:table-cell>
          <table:table-cell table:formula="of:=[.D167]-[.D166]" office:value-type="float" office:value="0.00000219907407407412" calcext:value-type="float">
            <text:p>0,0000021990740740741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19" office:value-type="float" office:value="3154" calcext:value-type="float">
            <text:p>3154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365046296296296" calcext:value-type="float">
            <text:p>0,00036504629629629600</text:p>
          </table:table-cell>
          <table:table-cell table:formula="of:=[.D168]-[.D167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19" office:value-type="float" office:value="3173" calcext:value-type="float">
            <text:p>3173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036724537037037" calcext:value-type="float">
            <text:p>0,00036724537037037000</text:p>
          </table:table-cell>
          <table:table-cell table:formula="of:=[.D169]-[.D168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19" office:value-type="float" office:value="3192" calcext:value-type="float">
            <text:p>3192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0369444444444444" calcext:value-type="float">
            <text:p>0,00036944444444444400</text:p>
          </table:table-cell>
          <table:table-cell table:formula="of:=[.D170]-[.D169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19" office:value-type="float" office:value="3211" calcext:value-type="float">
            <text:p>3211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0371643518518519" calcext:value-type="float">
            <text:p>0,00037164351851851900</text:p>
          </table:table-cell>
          <table:table-cell table:formula="of:=[.D171]-[.D170]" office:value-type="float" office:value="0.00000219907407407412" calcext:value-type="float">
            <text:p>0,0000021990740740741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19" office:value-type="float" office:value="3230" calcext:value-type="float">
            <text:p>323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0373842592592593" calcext:value-type="float">
            <text:p>0,00037384259259259300</text:p>
          </table:table-cell>
          <table:table-cell table:formula="of:=[.D172]-[.D171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19" office:value-type="float" office:value="3249" calcext:value-type="float">
            <text:p>3249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0376041666666667" calcext:value-type="float">
            <text:p>0,00037604166666666700</text:p>
          </table:table-cell>
          <table:table-cell table:formula="of:=[.D173]-[.D172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19" office:value-type="float" office:value="3268" calcext:value-type="float">
            <text:p>3268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0378240740740741" calcext:value-type="float">
            <text:p>0,00037824074074074100</text:p>
          </table:table-cell>
          <table:table-cell table:formula="of:=[.D174]-[.D173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19" office:value-type="float" office:value="3287" calcext:value-type="float">
            <text:p>3287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0380439814814815" calcext:value-type="float">
            <text:p>0,00038043981481481500</text:p>
          </table:table-cell>
          <table:table-cell table:formula="of:=[.D175]-[.D174]" office:value-type="float" office:value="0.00000219907407407412" calcext:value-type="float">
            <text:p>0,0000021990740740741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19" office:value-type="float" office:value="3306" calcext:value-type="float">
            <text:p>3306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0382638888888889" calcext:value-type="float">
            <text:p>0,00038263888888888900</text:p>
          </table:table-cell>
          <table:table-cell table:formula="of:=[.D176]-[.D175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19" office:value-type="float" office:value="3325" calcext:value-type="float">
            <text:p>332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0384837962962963" calcext:value-type="float">
            <text:p>0,00038483796296296300</text:p>
          </table:table-cell>
          <table:table-cell table:formula="of:=[.D177]-[.D176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19" office:value-type="float" office:value="3344" calcext:value-type="float">
            <text:p>3344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0387037037037037" calcext:value-type="float">
            <text:p>0,00038703703703703700</text:p>
          </table:table-cell>
          <table:table-cell table:formula="of:=[.D178]-[.D177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19" office:value-type="float" office:value="3363" calcext:value-type="float">
            <text:p>3363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0389236111111111" calcext:value-type="float">
            <text:p>0,00038923611111111100</text:p>
          </table:table-cell>
          <table:table-cell table:formula="of:=[.D179]-[.D178]" office:value-type="float" office:value="0.00000219907407407412" calcext:value-type="float">
            <text:p>0,0000021990740740741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19" office:value-type="float" office:value="3382" calcext:value-type="float">
            <text:p>3382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0391435185185185" calcext:value-type="float">
            <text:p>0,00039143518518518500</text:p>
          </table:table-cell>
          <table:table-cell table:formula="of:=[.D180]-[.D179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19" office:value-type="float" office:value="3401" calcext:value-type="float">
            <text:p>3401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0393634259259259" calcext:value-type="float">
            <text:p>0,00039363425925925900</text:p>
          </table:table-cell>
          <table:table-cell table:formula="of:=[.D181]-[.D180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19" office:value-type="float" office:value="3420" calcext:value-type="float">
            <text:p>342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0395833333333333" calcext:value-type="float">
            <text:p>0,00039583333333333300</text:p>
          </table:table-cell>
          <table:table-cell table:formula="of:=[.D182]-[.D181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19" office:value-type="float" office:value="3439" calcext:value-type="float">
            <text:p>3439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0398032407407407" calcext:value-type="float">
            <text:p>0,00039803240740740700</text:p>
          </table:table-cell>
          <table:table-cell table:formula="of:=[.D183]-[.D182]" office:value-type="float" office:value="0.00000219907407407412" calcext:value-type="float">
            <text:p>0,0000021990740740741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19" office:value-type="float" office:value="3458" calcext:value-type="float">
            <text:p>3458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0400231481481482" calcext:value-type="float">
            <text:p>0,00040023148148148200</text:p>
          </table:table-cell>
          <table:table-cell table:formula="of:=[.D184]-[.D183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19" office:value-type="float" office:value="3477" calcext:value-type="float">
            <text:p>3477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0402430555555556" calcext:value-type="float">
            <text:p>0,00040243055555555600</text:p>
          </table:table-cell>
          <table:table-cell table:formula="of:=[.D185]-[.D184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19" office:value-type="float" office:value="3496" calcext:value-type="float">
            <text:p>3496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040462962962963" calcext:value-type="float">
            <text:p>0,00040462962962963000</text:p>
          </table:table-cell>
          <table:table-cell table:formula="of:=[.D186]-[.D185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19" office:value-type="float" office:value="3515" calcext:value-type="float">
            <text:p>351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0406828703703704" calcext:value-type="float">
            <text:p>0,00040682870370370400</text:p>
          </table:table-cell>
          <table:table-cell table:formula="of:=[.D187]-[.D186]" office:value-type="float" office:value="0.00000219907407407412" calcext:value-type="float">
            <text:p>0,0000021990740740741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19" office:value-type="float" office:value="3534" calcext:value-type="float">
            <text:p>3534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0409027777777778" calcext:value-type="float">
            <text:p>0,00040902777777777800</text:p>
          </table:table-cell>
          <table:table-cell table:formula="of:=[.D188]-[.D187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19" office:value-type="float" office:value="3553" calcext:value-type="float">
            <text:p>3553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0411226851851852" calcext:value-type="float">
            <text:p>0,00041122685185185200</text:p>
          </table:table-cell>
          <table:table-cell table:formula="of:=[.D189]-[.D188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19" office:value-type="float" office:value="3572" calcext:value-type="float">
            <text:p>3572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0413425925925926" calcext:value-type="float">
            <text:p>0,00041342592592592600</text:p>
          </table:table-cell>
          <table:table-cell table:formula="of:=[.D190]-[.D189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19" office:value-type="float" office:value="3591" calcext:value-type="float">
            <text:p>3591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0415625" calcext:value-type="float">
            <text:p>0,00041562500000000000</text:p>
          </table:table-cell>
          <table:table-cell table:formula="of:=[.D191]-[.D190]" office:value-type="float" office:value="0.00000219907407407412" calcext:value-type="float">
            <text:p>0,0000021990740740741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19" office:value-type="float" office:value="3610" calcext:value-type="float">
            <text:p>361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0417824074074074" calcext:value-type="float">
            <text:p>0,00041782407407407400</text:p>
          </table:table-cell>
          <table:table-cell table:formula="of:=[.D192]-[.D191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19" office:value-type="float" office:value="3629" calcext:value-type="float">
            <text:p>3629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0420023148148148" calcext:value-type="float">
            <text:p>0,00042002314814814800</text:p>
          </table:table-cell>
          <table:table-cell table:formula="of:=[.D193]-[.D192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19" office:value-type="float" office:value="3648" calcext:value-type="float">
            <text:p>3648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0422222222222222" calcext:value-type="float">
            <text:p>0,00042222222222222200</text:p>
          </table:table-cell>
          <table:table-cell table:formula="of:=[.D194]-[.D193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19" office:value-type="float" office:value="3667" calcext:value-type="float">
            <text:p>3667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0424421296296296" calcext:value-type="float">
            <text:p>0,00042442129629629600</text:p>
          </table:table-cell>
          <table:table-cell table:formula="of:=[.D195]-[.D194]" office:value-type="float" office:value="0.00000219907407407412" calcext:value-type="float">
            <text:p>0,0000021990740740741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19" office:value-type="float" office:value="3686" calcext:value-type="float">
            <text:p>3686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042662037037037" calcext:value-type="float">
            <text:p>0,00042662037037037000</text:p>
          </table:table-cell>
          <table:table-cell table:formula="of:=[.D196]-[.D195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19" office:value-type="float" office:value="3705" calcext:value-type="float">
            <text:p>370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0428819444444444" calcext:value-type="float">
            <text:p>0,00042881944444444500</text:p>
          </table:table-cell>
          <table:table-cell table:formula="of:=[.D197]-[.D196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19" office:value-type="float" office:value="3724" calcext:value-type="float">
            <text:p>3724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0431018518518519" calcext:value-type="float">
            <text:p>0,00043101851851851800</text:p>
          </table:table-cell>
          <table:table-cell table:formula="of:=[.D198]-[.D197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19" office:value-type="float" office:value="3743" calcext:value-type="float">
            <text:p>3743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0433217592592593" calcext:value-type="float">
            <text:p>0,00043321759259259300</text:p>
          </table:table-cell>
          <table:table-cell table:formula="of:=[.D199]-[.D198]" office:value-type="float" office:value="0.00000219907407407412" calcext:value-type="float">
            <text:p>0,0000021990740740741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19" office:value-type="float" office:value="3762" calcext:value-type="float">
            <text:p>3762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0435416666666667" calcext:value-type="float">
            <text:p>0,00043541666666666700</text:p>
          </table:table-cell>
          <table:table-cell table:formula="of:=[.D200]-[.D199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19" office:value-type="float" office:value="3781" calcext:value-type="float">
            <text:p>3781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0437615740740741" calcext:value-type="float">
            <text:p>0,00043761574074074100</text:p>
          </table:table-cell>
          <table:table-cell table:formula="of:=[.D201]-[.D200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19" office:value-type="float" office:value="3800" calcext:value-type="float">
            <text:p>38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0439814814814815" calcext:value-type="float">
            <text:p>0,00043981481481481500</text:p>
          </table:table-cell>
          <table:table-cell table:formula="of:=[.D202]-[.D201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19" office:value-type="float" office:value="3819" calcext:value-type="float">
            <text:p>3819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0442013888888889" calcext:value-type="float">
            <text:p>0,00044201388888888900</text:p>
          </table:table-cell>
          <table:table-cell table:formula="of:=[.D203]-[.D202]" office:value-type="float" office:value="0.00000219907407407412" calcext:value-type="float">
            <text:p>0,0000021990740740741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19" office:value-type="float" office:value="3838" calcext:value-type="float">
            <text:p>3838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0444212962962963" calcext:value-type="float">
            <text:p>0,00044421296296296300</text:p>
          </table:table-cell>
          <table:table-cell table:formula="of:=[.D204]-[.D203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19" office:value-type="float" office:value="3857" calcext:value-type="float">
            <text:p>3857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0446412037037037" calcext:value-type="float">
            <text:p>0,00044641203703703700</text:p>
          </table:table-cell>
          <table:table-cell table:formula="of:=[.D205]-[.D204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19" office:value-type="float" office:value="3876" calcext:value-type="float">
            <text:p>3876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0448611111111111" calcext:value-type="float">
            <text:p>0,00044861111111111100</text:p>
          </table:table-cell>
          <table:table-cell table:formula="of:=[.D206]-[.D205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19" office:value-type="float" office:value="3895" calcext:value-type="float">
            <text:p>389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0450810185185185" calcext:value-type="float">
            <text:p>0,00045081018518518500</text:p>
          </table:table-cell>
          <table:table-cell table:formula="of:=[.D207]-[.D206]" office:value-type="float" office:value="0.00000219907407407412" calcext:value-type="float">
            <text:p>0,0000021990740740741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19" office:value-type="float" office:value="3914" calcext:value-type="float">
            <text:p>3914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0453009259259259" calcext:value-type="float">
            <text:p>0,00045300925925925900</text:p>
          </table:table-cell>
          <table:table-cell table:formula="of:=[.D208]-[.D207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19" office:value-type="float" office:value="3933" calcext:value-type="float">
            <text:p>3933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0455208333333333" calcext:value-type="float">
            <text:p>0,00045520833333333300</text:p>
          </table:table-cell>
          <table:table-cell table:formula="of:=[.D209]-[.D208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19" office:value-type="float" office:value="3952" calcext:value-type="float">
            <text:p>3952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0457407407407407" calcext:value-type="float">
            <text:p>0,00045740740740740700</text:p>
          </table:table-cell>
          <table:table-cell table:formula="of:=[.D210]-[.D209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19" office:value-type="float" office:value="3971" calcext:value-type="float">
            <text:p>3971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0459606481481481" calcext:value-type="float">
            <text:p>0,00045960648148148100</text:p>
          </table:table-cell>
          <table:table-cell table:formula="of:=[.D211]-[.D210]" office:value-type="float" office:value="0.00000219907407407412" calcext:value-type="float">
            <text:p>0,0000021990740740741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19" office:value-type="float" office:value="3990" calcext:value-type="float">
            <text:p>399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0461805555555556" calcext:value-type="float">
            <text:p>0,00046180555555555600</text:p>
          </table:table-cell>
          <table:table-cell table:formula="of:=[.D212]-[.D211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19" office:value-type="float" office:value="4009" calcext:value-type="float">
            <text:p>4009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046400462962963" calcext:value-type="float">
            <text:p>0,00046400462962963000</text:p>
          </table:table-cell>
          <table:table-cell table:formula="of:=[.D213]-[.D212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19" office:value-type="float" office:value="4028" calcext:value-type="float">
            <text:p>4028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0466203703703704" calcext:value-type="float">
            <text:p>0,00046620370370370400</text:p>
          </table:table-cell>
          <table:table-cell table:formula="of:=[.D214]-[.D213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19" office:value-type="float" office:value="4047" calcext:value-type="float">
            <text:p>4047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0468402777777778" calcext:value-type="float">
            <text:p>0,00046840277777777800</text:p>
          </table:table-cell>
          <table:table-cell table:formula="of:=[.D215]-[.D214]" office:value-type="float" office:value="0.00000219907407407412" calcext:value-type="float">
            <text:p>0,0000021990740740741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19" office:value-type="float" office:value="4066" calcext:value-type="float">
            <text:p>4066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0470601851851852" calcext:value-type="float">
            <text:p>0,00047060185185185200</text:p>
          </table:table-cell>
          <table:table-cell table:formula="of:=[.D216]-[.D215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19" office:value-type="float" office:value="4085" calcext:value-type="float">
            <text:p>408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0472800925925926" calcext:value-type="float">
            <text:p>0,00047280092592592600</text:p>
          </table:table-cell>
          <table:table-cell table:formula="of:=[.D217]-[.D216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19" office:value-type="float" office:value="4104" calcext:value-type="float">
            <text:p>4104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0475" calcext:value-type="float">
            <text:p>0,00047500000000000000</text:p>
          </table:table-cell>
          <table:table-cell table:formula="of:=[.D218]-[.D217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19" office:value-type="float" office:value="4123" calcext:value-type="float">
            <text:p>4123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0477199074074074" calcext:value-type="float">
            <text:p>0,00047719907407407400</text:p>
          </table:table-cell>
          <table:table-cell table:formula="of:=[.D219]-[.D218]" office:value-type="float" office:value="0.00000219907407407412" calcext:value-type="float">
            <text:p>0,0000021990740740741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19" office:value-type="float" office:value="4142" calcext:value-type="float">
            <text:p>4142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0479398148148148" calcext:value-type="float">
            <text:p>0,00047939814814814800</text:p>
          </table:table-cell>
          <table:table-cell table:formula="of:=[.D220]-[.D219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19" office:value-type="float" office:value="4161" calcext:value-type="float">
            <text:p>4161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0481597222222222" calcext:value-type="float">
            <text:p>0,00048159722222222200</text:p>
          </table:table-cell>
          <table:table-cell table:formula="of:=[.D221]-[.D220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19" office:value-type="float" office:value="4180" calcext:value-type="float">
            <text:p>418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0483796296296296" calcext:value-type="float">
            <text:p>0,00048379629629629600</text:p>
          </table:table-cell>
          <table:table-cell table:formula="of:=[.D222]-[.D221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19" office:value-type="float" office:value="4199" calcext:value-type="float">
            <text:p>4199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048599537037037" calcext:value-type="float">
            <text:p>0,00048599537037037000</text:p>
          </table:table-cell>
          <table:table-cell table:formula="of:=[.D223]-[.D222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19" office:value-type="float" office:value="4218" calcext:value-type="float">
            <text:p>4218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0488194444444444" calcext:value-type="float">
            <text:p>0,00048819444444444400</text:p>
          </table:table-cell>
          <table:table-cell table:formula="of:=[.D224]-[.D223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19" office:value-type="float" office:value="4237" calcext:value-type="float">
            <text:p>4237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0490393518518519" calcext:value-type="float">
            <text:p>0,00049039351851851900</text:p>
          </table:table-cell>
          <table:table-cell table:formula="of:=[.D225]-[.D224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19" office:value-type="float" office:value="4256" calcext:value-type="float">
            <text:p>4256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0492592592592593" calcext:value-type="float">
            <text:p>0,00049259259259259300</text:p>
          </table:table-cell>
          <table:table-cell table:formula="of:=[.D226]-[.D22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19" office:value-type="float" office:value="4275" calcext:value-type="float">
            <text:p>427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0494791666666667" calcext:value-type="float">
            <text:p>0,00049479166666666700</text:p>
          </table:table-cell>
          <table:table-cell table:formula="of:=[.D227]-[.D226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19" office:value-type="float" office:value="4294" calcext:value-type="float">
            <text:p>4294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0496990740740741" calcext:value-type="float">
            <text:p>0,00049699074074074100</text:p>
          </table:table-cell>
          <table:table-cell table:formula="of:=[.D228]-[.D227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19" office:value-type="float" office:value="4313" calcext:value-type="float">
            <text:p>4313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0499189814814815" calcext:value-type="float">
            <text:p>0,00049918981481481500</text:p>
          </table:table-cell>
          <table:table-cell table:formula="of:=[.D229]-[.D228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19" office:value-type="float" office:value="4332" calcext:value-type="float">
            <text:p>4332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0501388888888889" calcext:value-type="float">
            <text:p>0,00050138888888888900</text:p>
          </table:table-cell>
          <table:table-cell table:formula="of:=[.D230]-[.D229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19" office:value-type="float" office:value="4351" calcext:value-type="float">
            <text:p>4351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0503587962962963" calcext:value-type="float">
            <text:p>0,00050358796296296300</text:p>
          </table:table-cell>
          <table:table-cell table:formula="of:=[.D231]-[.D230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19" office:value-type="float" office:value="4370" calcext:value-type="float">
            <text:p>437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0505787037037037" calcext:value-type="float">
            <text:p>0,00050578703703703700</text:p>
          </table:table-cell>
          <table:table-cell table:formula="of:=[.D232]-[.D231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19" office:value-type="float" office:value="4389" calcext:value-type="float">
            <text:p>4389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0507986111111111" calcext:value-type="float">
            <text:p>0,00050798611111111100</text:p>
          </table:table-cell>
          <table:table-cell table:formula="of:=[.D233]-[.D232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19" office:value-type="float" office:value="4408" calcext:value-type="float">
            <text:p>4408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0510185185185185" calcext:value-type="float">
            <text:p>0,00051018518518518500</text:p>
          </table:table-cell>
          <table:table-cell table:formula="of:=[.D234]-[.D23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19" office:value-type="float" office:value="4427" calcext:value-type="float">
            <text:p>4427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0512384259259259" calcext:value-type="float">
            <text:p>0,00051238425925925900</text:p>
          </table:table-cell>
          <table:table-cell table:formula="of:=[.D235]-[.D234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19" office:value-type="float" office:value="4446" calcext:value-type="float">
            <text:p>4446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0514583333333333" calcext:value-type="float">
            <text:p>0,00051458333333333300</text:p>
          </table:table-cell>
          <table:table-cell table:formula="of:=[.D236]-[.D235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19" office:value-type="float" office:value="4465" calcext:value-type="float">
            <text:p>446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0516782407407407" calcext:value-type="float">
            <text:p>0,00051678240740740700</text:p>
          </table:table-cell>
          <table:table-cell table:formula="of:=[.D237]-[.D236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19" office:value-type="float" office:value="4484" calcext:value-type="float">
            <text:p>4484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0518981481481482" calcext:value-type="float">
            <text:p>0,00051898148148148200</text:p>
          </table:table-cell>
          <table:table-cell table:formula="of:=[.D238]-[.D237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19" office:value-type="float" office:value="4503" calcext:value-type="float">
            <text:p>4503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0521180555555556" calcext:value-type="float">
            <text:p>0,00052118055555555600</text:p>
          </table:table-cell>
          <table:table-cell table:formula="of:=[.D239]-[.D238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19" office:value-type="float" office:value="4522" calcext:value-type="float">
            <text:p>4522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052337962962963" calcext:value-type="float">
            <text:p>0,00052337962962963000</text:p>
          </table:table-cell>
          <table:table-cell table:formula="of:=[.D240]-[.D239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19" office:value-type="float" office:value="4541" calcext:value-type="float">
            <text:p>4541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0525578703703704" calcext:value-type="float">
            <text:p>0,00052557870370370400</text:p>
          </table:table-cell>
          <table:table-cell table:formula="of:=[.D241]-[.D240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19" office:value-type="float" office:value="4560" calcext:value-type="float">
            <text:p>456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0527777777777778" calcext:value-type="float">
            <text:p>0,00052777777777777800</text:p>
          </table:table-cell>
          <table:table-cell table:formula="of:=[.D242]-[.D24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19" office:value-type="float" office:value="4579" calcext:value-type="float">
            <text:p>4579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0529976851851852" calcext:value-type="float">
            <text:p>0,00052997685185185200</text:p>
          </table:table-cell>
          <table:table-cell table:formula="of:=[.D243]-[.D242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19" office:value-type="float" office:value="4598" calcext:value-type="float">
            <text:p>4598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0532175925925926" calcext:value-type="float">
            <text:p>0,00053217592592592600</text:p>
          </table:table-cell>
          <table:table-cell table:formula="of:=[.D244]-[.D243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19" office:value-type="float" office:value="4617" calcext:value-type="float">
            <text:p>4617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0534375" calcext:value-type="float">
            <text:p>0,00053437500000000000</text:p>
          </table:table-cell>
          <table:table-cell table:formula="of:=[.D245]-[.D244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19" office:value-type="float" office:value="4636" calcext:value-type="float">
            <text:p>4636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0536574074074074" calcext:value-type="float">
            <text:p>0,00053657407407407400</text:p>
          </table:table-cell>
          <table:table-cell table:formula="of:=[.D246]-[.D245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19" office:value-type="float" office:value="4655" calcext:value-type="float">
            <text:p>465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0538773148148148" calcext:value-type="float">
            <text:p>0,00053877314814814800</text:p>
          </table:table-cell>
          <table:table-cell table:formula="of:=[.D247]-[.D246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19" office:value-type="float" office:value="4674" calcext:value-type="float">
            <text:p>4674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0540972222222222" calcext:value-type="float">
            <text:p>0,00054097222222222200</text:p>
          </table:table-cell>
          <table:table-cell table:formula="of:=[.D248]-[.D247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19" office:value-type="float" office:value="4693" calcext:value-type="float">
            <text:p>4693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0543171296296296" calcext:value-type="float">
            <text:p>0,00054317129629629600</text:p>
          </table:table-cell>
          <table:table-cell table:formula="of:=[.D249]-[.D248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19" office:value-type="float" office:value="4712" calcext:value-type="float">
            <text:p>4712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054537037037037" calcext:value-type="float">
            <text:p>0,00054537037037037000</text:p>
          </table:table-cell>
          <table:table-cell table:formula="of:=[.D250]-[.D24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19" office:value-type="float" office:value="4731" calcext:value-type="float">
            <text:p>4731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0547569444444445" calcext:value-type="float">
            <text:p>0,00054756944444444500</text:p>
          </table:table-cell>
          <table:table-cell table:formula="of:=[.D251]-[.D250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19" office:value-type="float" office:value="4750" calcext:value-type="float">
            <text:p>475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0549768518518519" calcext:value-type="float">
            <text:p>0,00054976851851851900</text:p>
          </table:table-cell>
          <table:table-cell table:formula="of:=[.D252]-[.D251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19" office:value-type="float" office:value="4769" calcext:value-type="float">
            <text:p>4769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0551967592592593" calcext:value-type="float">
            <text:p>0,00055196759259259300</text:p>
          </table:table-cell>
          <table:table-cell table:formula="of:=[.D253]-[.D252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19" office:value-type="float" office:value="4788" calcext:value-type="float">
            <text:p>4788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0554166666666667" calcext:value-type="float">
            <text:p>0,00055416666666666700</text:p>
          </table:table-cell>
          <table:table-cell table:formula="of:=[.D254]-[.D253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19" office:value-type="float" office:value="4807" calcext:value-type="float">
            <text:p>4807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0556365740740741" calcext:value-type="float">
            <text:p>0,00055636574074074100</text:p>
          </table:table-cell>
          <table:table-cell table:formula="of:=[.D255]-[.D254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19" office:value-type="float" office:value="4826" calcext:value-type="float">
            <text:p>4826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0558564814814815" calcext:value-type="float">
            <text:p>0,00055856481481481500</text:p>
          </table:table-cell>
          <table:table-cell table:formula="of:=[.D256]-[.D255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19" office:value-type="float" office:value="4845" calcext:value-type="float">
            <text:p>4845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0560763888888889" calcext:value-type="float">
            <text:p>0,00056076388888888900</text:p>
          </table:table-cell>
          <table:table-cell table:formula="of:=[.D257]-[.D256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19" office:value-type="float" office:value="4864" calcext:value-type="float">
            <text:p>4864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0562962962962963" calcext:value-type="float">
            <text:p>0,00056296296296296300</text:p>
          </table:table-cell>
          <table:table-cell table:formula="of:=[.D258]-[.D25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19" office:value-type="float" office:value="4883" calcext:value-type="float">
            <text:p>4883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0565162037037037" calcext:value-type="float">
            <text:p>0,00056516203703703700</text:p>
          </table:table-cell>
          <table:table-cell table:formula="of:=[.D259]-[.D258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19" office:value-type="float" office:value="4902" calcext:value-type="float">
            <text:p>4902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0567361111111111" calcext:value-type="float">
            <text:p>0,00056736111111111100</text:p>
          </table:table-cell>
          <table:table-cell table:formula="of:=[.D260]-[.D259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19" office:value-type="float" office:value="4921" calcext:value-type="float">
            <text:p>4921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0569560185185185" calcext:value-type="float">
            <text:p>0,00056956018518518500</text:p>
          </table:table-cell>
          <table:table-cell table:formula="of:=[.D261]-[.D260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19" office:value-type="float" office:value="4940" calcext:value-type="float">
            <text:p>494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0571759259259259" calcext:value-type="float">
            <text:p>0,00057175925925925900</text:p>
          </table:table-cell>
          <table:table-cell table:formula="of:=[.D262]-[.D261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19" office:value-type="float" office:value="4959" calcext:value-type="float">
            <text:p>4959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0573958333333333" calcext:value-type="float">
            <text:p>0,00057395833333333300</text:p>
          </table:table-cell>
          <table:table-cell table:formula="of:=[.D263]-[.D262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19" office:value-type="float" office:value="4978" calcext:value-type="float">
            <text:p>4978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0576157407407407" calcext:value-type="float">
            <text:p>0,00057615740740740700</text:p>
          </table:table-cell>
          <table:table-cell table:formula="of:=[.D264]-[.D263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19" office:value-type="float" office:value="4997" calcext:value-type="float">
            <text:p>4997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0578356481481482" calcext:value-type="float">
            <text:p>0,00057835648148148200</text:p>
          </table:table-cell>
          <table:table-cell table:formula="of:=[.D265]-[.D264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19" office:value-type="float" office:value="5016" calcext:value-type="float">
            <text:p>5016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0580555555555556" calcext:value-type="float">
            <text:p>0,00058055555555555600</text:p>
          </table:table-cell>
          <table:table-cell table:formula="of:=[.D266]-[.D26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19" office:value-type="float" office:value="5035" calcext:value-type="float">
            <text:p>5035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058275462962963" calcext:value-type="float">
            <text:p>0,00058275462962963000</text:p>
          </table:table-cell>
          <table:table-cell table:formula="of:=[.D267]-[.D266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19" office:value-type="float" office:value="5054" calcext:value-type="float">
            <text:p>5054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0584953703703704" calcext:value-type="float">
            <text:p>0,00058495370370370400</text:p>
          </table:table-cell>
          <table:table-cell table:formula="of:=[.D268]-[.D267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19" office:value-type="float" office:value="5073" calcext:value-type="float">
            <text:p>5073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0587152777777778" calcext:value-type="float">
            <text:p>0,00058715277777777800</text:p>
          </table:table-cell>
          <table:table-cell table:formula="of:=[.D269]-[.D268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19" office:value-type="float" office:value="5092" calcext:value-type="float">
            <text:p>5092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0589351851851852" calcext:value-type="float">
            <text:p>0,00058935185185185200</text:p>
          </table:table-cell>
          <table:table-cell table:formula="of:=[.D270]-[.D269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19" office:value-type="float" office:value="5111" calcext:value-type="float">
            <text:p>5111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0591550925925926" calcext:value-type="float">
            <text:p>0,00059155092592592600</text:p>
          </table:table-cell>
          <table:table-cell table:formula="of:=[.D271]-[.D270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19" office:value-type="float" office:value="5130" calcext:value-type="float">
            <text:p>513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059375" calcext:value-type="float">
            <text:p>0,00059375000000000000</text:p>
          </table:table-cell>
          <table:table-cell table:formula="of:=[.D272]-[.D271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19" office:value-type="float" office:value="5149" calcext:value-type="float">
            <text:p>5149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0595949074074074" calcext:value-type="float">
            <text:p>0,00059594907407407400</text:p>
          </table:table-cell>
          <table:table-cell table:formula="of:=[.D273]-[.D272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19" office:value-type="float" office:value="5168" calcext:value-type="float">
            <text:p>5168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0598148148148148" calcext:value-type="float">
            <text:p>0,00059814814814814800</text:p>
          </table:table-cell>
          <table:table-cell table:formula="of:=[.D274]-[.D27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19" office:value-type="float" office:value="5187" calcext:value-type="float">
            <text:p>5187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0600347222222222" calcext:value-type="float">
            <text:p>0,00060034722222222200</text:p>
          </table:table-cell>
          <table:table-cell table:formula="of:=[.D275]-[.D274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19" office:value-type="float" office:value="5206" calcext:value-type="float">
            <text:p>5206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0602546296296296" calcext:value-type="float">
            <text:p>0,00060254629629629600</text:p>
          </table:table-cell>
          <table:table-cell table:formula="of:=[.D276]-[.D275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19" office:value-type="float" office:value="5225" calcext:value-type="float">
            <text:p>5225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060474537037037" calcext:value-type="float">
            <text:p>0,00060474537037037000</text:p>
          </table:table-cell>
          <table:table-cell table:formula="of:=[.D277]-[.D276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19" office:value-type="float" office:value="5244" calcext:value-type="float">
            <text:p>5244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0606944444444445" calcext:value-type="float">
            <text:p>0,00060694444444444500</text:p>
          </table:table-cell>
          <table:table-cell table:formula="of:=[.D278]-[.D277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19" office:value-type="float" office:value="5263" calcext:value-type="float">
            <text:p>5263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0609143518518519" calcext:value-type="float">
            <text:p>0,00060914351851851900</text:p>
          </table:table-cell>
          <table:table-cell table:formula="of:=[.D279]-[.D278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19" office:value-type="float" office:value="5282" calcext:value-type="float">
            <text:p>5282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0611342592592593" calcext:value-type="float">
            <text:p>0,00061134259259259300</text:p>
          </table:table-cell>
          <table:table-cell table:formula="of:=[.D280]-[.D279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19" office:value-type="float" office:value="5301" calcext:value-type="float">
            <text:p>5301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0613541666666667" calcext:value-type="float">
            <text:p>0,00061354166666666700</text:p>
          </table:table-cell>
          <table:table-cell table:formula="of:=[.D281]-[.D280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19" office:value-type="float" office:value="5320" calcext:value-type="float">
            <text:p>532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0615740740740741" calcext:value-type="float">
            <text:p>0,00061574074074074100</text:p>
          </table:table-cell>
          <table:table-cell table:formula="of:=[.D282]-[.D281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19" office:value-type="float" office:value="5339" calcext:value-type="float">
            <text:p>5339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0617939814814815" calcext:value-type="float">
            <text:p>0,00061793981481481500</text:p>
          </table:table-cell>
          <table:table-cell table:formula="of:=[.D283]-[.D28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19" office:value-type="float" office:value="5358" calcext:value-type="float">
            <text:p>5358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0620138888888889" calcext:value-type="float">
            <text:p>0,00062013888888888900</text:p>
          </table:table-cell>
          <table:table-cell table:formula="of:=[.D284]-[.D283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19" office:value-type="float" office:value="5377" calcext:value-type="float">
            <text:p>5377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0622337962962963" calcext:value-type="float">
            <text:p>0,00062233796296296300</text:p>
          </table:table-cell>
          <table:table-cell table:formula="of:=[.D285]-[.D284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19" office:value-type="float" office:value="5396" calcext:value-type="float">
            <text:p>5396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0624537037037037" calcext:value-type="float">
            <text:p>0,00062453703703703700</text:p>
          </table:table-cell>
          <table:table-cell table:formula="of:=[.D286]-[.D285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19" office:value-type="float" office:value="5415" calcext:value-type="float">
            <text:p>5415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0626736111111111" calcext:value-type="float">
            <text:p>0,00062673611111111100</text:p>
          </table:table-cell>
          <table:table-cell table:formula="of:=[.D287]-[.D286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19" office:value-type="float" office:value="5434" calcext:value-type="float">
            <text:p>5434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0628935185185185" calcext:value-type="float">
            <text:p>0,00062893518518518500</text:p>
          </table:table-cell>
          <table:table-cell table:formula="of:=[.D288]-[.D287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19" office:value-type="float" office:value="5453" calcext:value-type="float">
            <text:p>5453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0631134259259259" calcext:value-type="float">
            <text:p>0,00063113425925925900</text:p>
          </table:table-cell>
          <table:table-cell table:formula="of:=[.D289]-[.D288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19" office:value-type="float" office:value="5472" calcext:value-type="float">
            <text:p>5472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0633333333333333" calcext:value-type="float">
            <text:p>0,00063333333333333300</text:p>
          </table:table-cell>
          <table:table-cell table:formula="of:=[.D290]-[.D289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19" office:value-type="float" office:value="5491" calcext:value-type="float">
            <text:p>5491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0635532407407407" calcext:value-type="float">
            <text:p>0,00063553240740740700</text:p>
          </table:table-cell>
          <table:table-cell table:formula="of:=[.D291]-[.D29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19" office:value-type="float" office:value="5510" calcext:value-type="float">
            <text:p>551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0637731481481482" calcext:value-type="float">
            <text:p>0,00063773148148148200</text:p>
          </table:table-cell>
          <table:table-cell table:formula="of:=[.D292]-[.D291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19" office:value-type="float" office:value="5529" calcext:value-type="float">
            <text:p>5529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0639930555555556" calcext:value-type="float">
            <text:p>0,00063993055555555600</text:p>
          </table:table-cell>
          <table:table-cell table:formula="of:=[.D293]-[.D292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19" office:value-type="float" office:value="5548" calcext:value-type="float">
            <text:p>5548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064212962962963" calcext:value-type="float">
            <text:p>0,00064212962962963000</text:p>
          </table:table-cell>
          <table:table-cell table:formula="of:=[.D294]-[.D293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19" office:value-type="float" office:value="5567" calcext:value-type="float">
            <text:p>5567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0644328703703704" calcext:value-type="float">
            <text:p>0,00064432870370370400</text:p>
          </table:table-cell>
          <table:table-cell table:formula="of:=[.D295]-[.D294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19" office:value-type="float" office:value="5586" calcext:value-type="float">
            <text:p>5586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0646527777777778" calcext:value-type="float">
            <text:p>0,00064652777777777800</text:p>
          </table:table-cell>
          <table:table-cell table:formula="of:=[.D296]-[.D295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19" office:value-type="float" office:value="5605" calcext:value-type="float">
            <text:p>5605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0648726851851852" calcext:value-type="float">
            <text:p>0,00064872685185185200</text:p>
          </table:table-cell>
          <table:table-cell table:formula="of:=[.D297]-[.D296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19" office:value-type="float" office:value="5624" calcext:value-type="float">
            <text:p>5624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0650925925925926" calcext:value-type="float">
            <text:p>0,00065092592592592600</text:p>
          </table:table-cell>
          <table:table-cell table:formula="of:=[.D298]-[.D297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19" office:value-type="float" office:value="5643" calcext:value-type="float">
            <text:p>5643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0653125" calcext:value-type="float">
            <text:p>0,00065312500000000000</text:p>
          </table:table-cell>
          <table:table-cell table:formula="of:=[.D299]-[.D29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19" office:value-type="float" office:value="5662" calcext:value-type="float">
            <text:p>5662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0655324074074074" calcext:value-type="float">
            <text:p>0,00065532407407407400</text:p>
          </table:table-cell>
          <table:table-cell table:formula="of:=[.D300]-[.D299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19" office:value-type="float" office:value="5681" calcext:value-type="float">
            <text:p>5681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0657523148148148" calcext:value-type="float">
            <text:p>0,00065752314814814800</text:p>
          </table:table-cell>
          <table:table-cell table:formula="of:=[.D301]-[.D300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19" office:value-type="float" office:value="5700" calcext:value-type="float">
            <text:p>57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0659722222222222" calcext:value-type="float">
            <text:p>0,00065972222222222200</text:p>
          </table:table-cell>
          <table:table-cell table:formula="of:=[.D302]-[.D301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19" office:value-type="float" office:value="5719" calcext:value-type="float">
            <text:p>5719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0661921296296296" calcext:value-type="float">
            <text:p>0,00066192129629629600</text:p>
          </table:table-cell>
          <table:table-cell table:formula="of:=[.D303]-[.D302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19" office:value-type="float" office:value="5738" calcext:value-type="float">
            <text:p>5738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066412037037037" calcext:value-type="float">
            <text:p>0,00066412037037037000</text:p>
          </table:table-cell>
          <table:table-cell table:formula="of:=[.D304]-[.D303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19" office:value-type="float" office:value="5757" calcext:value-type="float">
            <text:p>5757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0666319444444444" calcext:value-type="float">
            <text:p>0,00066631944444444400</text:p>
          </table:table-cell>
          <table:table-cell table:formula="of:=[.D305]-[.D304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19" office:value-type="float" office:value="5776" calcext:value-type="float">
            <text:p>5776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0668518518518519" calcext:value-type="float">
            <text:p>0,00066851851851851900</text:p>
          </table:table-cell>
          <table:table-cell table:formula="of:=[.D306]-[.D305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19" office:value-type="float" office:value="5795" calcext:value-type="float">
            <text:p>5795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0670717592592593" calcext:value-type="float">
            <text:p>0,00067071759259259300</text:p>
          </table:table-cell>
          <table:table-cell table:formula="of:=[.D307]-[.D30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19" office:value-type="float" office:value="5814" calcext:value-type="float">
            <text:p>5814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0672916666666667" calcext:value-type="float">
            <text:p>0,00067291666666666700</text:p>
          </table:table-cell>
          <table:table-cell table:formula="of:=[.D308]-[.D307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19" office:value-type="float" office:value="5833" calcext:value-type="float">
            <text:p>5833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0675115740740741" calcext:value-type="float">
            <text:p>0,00067511574074074100</text:p>
          </table:table-cell>
          <table:table-cell table:formula="of:=[.D309]-[.D308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19" office:value-type="float" office:value="5852" calcext:value-type="float">
            <text:p>5852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0677314814814815" calcext:value-type="float">
            <text:p>0,00067731481481481500</text:p>
          </table:table-cell>
          <table:table-cell table:formula="of:=[.D310]-[.D309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19" office:value-type="float" office:value="5871" calcext:value-type="float">
            <text:p>5871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0679513888888889" calcext:value-type="float">
            <text:p>0,00067951388888888900</text:p>
          </table:table-cell>
          <table:table-cell table:formula="of:=[.D311]-[.D310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19" office:value-type="float" office:value="5890" calcext:value-type="float">
            <text:p>589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0681712962962963" calcext:value-type="float">
            <text:p>0,00068171296296296300</text:p>
          </table:table-cell>
          <table:table-cell table:formula="of:=[.D312]-[.D311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19" office:value-type="float" office:value="5909" calcext:value-type="float">
            <text:p>5909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0683912037037037" calcext:value-type="float">
            <text:p>0,00068391203703703700</text:p>
          </table:table-cell>
          <table:table-cell table:formula="of:=[.D313]-[.D312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19" office:value-type="float" office:value="5928" calcext:value-type="float">
            <text:p>5928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0686111111111111" calcext:value-type="float">
            <text:p>0,00068611111111111100</text:p>
          </table:table-cell>
          <table:table-cell table:formula="of:=[.D314]-[.D313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19" office:value-type="float" office:value="5947" calcext:value-type="float">
            <text:p>5947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0688310185185185" calcext:value-type="float">
            <text:p>0,00068831018518518500</text:p>
          </table:table-cell>
          <table:table-cell table:formula="of:=[.D315]-[.D31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19" office:value-type="float" office:value="5966" calcext:value-type="float">
            <text:p>5966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0690509259259259" calcext:value-type="float">
            <text:p>0,00069050925925925900</text:p>
          </table:table-cell>
          <table:table-cell table:formula="of:=[.D316]-[.D315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19" office:value-type="float" office:value="5985" calcext:value-type="float">
            <text:p>5985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0692708333333333" calcext:value-type="float">
            <text:p>0,00069270833333333300</text:p>
          </table:table-cell>
          <table:table-cell table:formula="of:=[.D317]-[.D316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19" office:value-type="float" office:value="6004" calcext:value-type="float">
            <text:p>6004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0694907407407407" calcext:value-type="float">
            <text:p>0,00069490740740740700</text:p>
          </table:table-cell>
          <table:table-cell table:formula="of:=[.D318]-[.D317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19" office:value-type="float" office:value="6023" calcext:value-type="float">
            <text:p>6023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0697106481481482" calcext:value-type="float">
            <text:p>0,00069710648148148200</text:p>
          </table:table-cell>
          <table:table-cell table:formula="of:=[.D319]-[.D318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19" office:value-type="float" office:value="6042" calcext:value-type="float">
            <text:p>6042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0699305555555556" calcext:value-type="float">
            <text:p>0,00069930555555555600</text:p>
          </table:table-cell>
          <table:table-cell table:formula="of:=[.D320]-[.D319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19" office:value-type="float" office:value="6061" calcext:value-type="float">
            <text:p>6061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070150462962963" calcext:value-type="float">
            <text:p>0,00070150462962963000</text:p>
          </table:table-cell>
          <table:table-cell table:formula="of:=[.D321]-[.D320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19" office:value-type="float" office:value="6080" calcext:value-type="float">
            <text:p>608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0703703703703704" calcext:value-type="float">
            <text:p>0,00070370370370370400</text:p>
          </table:table-cell>
          <table:table-cell table:formula="of:=[.D322]-[.D321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19" office:value-type="float" office:value="6099" calcext:value-type="float">
            <text:p>6099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0705902777777778" calcext:value-type="float">
            <text:p>0,00070590277777777800</text:p>
          </table:table-cell>
          <table:table-cell table:formula="of:=[.D323]-[.D32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19" office:value-type="float" office:value="6118" calcext:value-type="float">
            <text:p>6118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0708101851851852" calcext:value-type="float">
            <text:p>0,00070810185185185200</text:p>
          </table:table-cell>
          <table:table-cell table:formula="of:=[.D324]-[.D323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19" office:value-type="float" office:value="6137" calcext:value-type="float">
            <text:p>6137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0710300925925926" calcext:value-type="float">
            <text:p>0,00071030092592592600</text:p>
          </table:table-cell>
          <table:table-cell table:formula="of:=[.D325]-[.D324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19" office:value-type="float" office:value="6156" calcext:value-type="float">
            <text:p>6156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07125" calcext:value-type="float">
            <text:p>0,00071250000000000000</text:p>
          </table:table-cell>
          <table:table-cell table:formula="of:=[.D326]-[.D325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19" office:value-type="float" office:value="6175" calcext:value-type="float">
            <text:p>6175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0714699074074074" calcext:value-type="float">
            <text:p>0,00071469907407407400</text:p>
          </table:table-cell>
          <table:table-cell table:formula="of:=[.D327]-[.D326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19" office:value-type="float" office:value="6194" calcext:value-type="float">
            <text:p>6194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0716898148148148" calcext:value-type="float">
            <text:p>0,00071689814814814800</text:p>
          </table:table-cell>
          <table:table-cell table:formula="of:=[.D328]-[.D327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19" office:value-type="float" office:value="6213" calcext:value-type="float">
            <text:p>6213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0719097222222222" calcext:value-type="float">
            <text:p>0,00071909722222222200</text:p>
          </table:table-cell>
          <table:table-cell table:formula="of:=[.D329]-[.D328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19" office:value-type="float" office:value="6232" calcext:value-type="float">
            <text:p>6232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0721296296296296" calcext:value-type="float">
            <text:p>0,00072129629629629600</text:p>
          </table:table-cell>
          <table:table-cell table:formula="of:=[.D330]-[.D329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19" office:value-type="float" office:value="6251" calcext:value-type="float">
            <text:p>6251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072349537037037" calcext:value-type="float">
            <text:p>0,00072349537037037000</text:p>
          </table:table-cell>
          <table:table-cell table:formula="of:=[.D331]-[.D330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19" office:value-type="float" office:value="6270" calcext:value-type="float">
            <text:p>627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0725694444444444" calcext:value-type="float">
            <text:p>0,00072569444444444400</text:p>
          </table:table-cell>
          <table:table-cell table:formula="of:=[.D332]-[.D33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19" office:value-type="float" office:value="6289" calcext:value-type="float">
            <text:p>6289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0727893518518519" calcext:value-type="float">
            <text:p>0,00072789351851851900</text:p>
          </table:table-cell>
          <table:table-cell table:formula="of:=[.D333]-[.D332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19" office:value-type="float" office:value="6308" calcext:value-type="float">
            <text:p>6308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0730092592592593" calcext:value-type="float">
            <text:p>0,00073009259259259300</text:p>
          </table:table-cell>
          <table:table-cell table:formula="of:=[.D334]-[.D333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19" office:value-type="float" office:value="6327" calcext:value-type="float">
            <text:p>6327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0732291666666667" calcext:value-type="float">
            <text:p>0,00073229166666666700</text:p>
          </table:table-cell>
          <table:table-cell table:formula="of:=[.D335]-[.D334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19" office:value-type="float" office:value="6346" calcext:value-type="float">
            <text:p>6346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0734490740740741" calcext:value-type="float">
            <text:p>0,00073449074074074100</text:p>
          </table:table-cell>
          <table:table-cell table:formula="of:=[.D336]-[.D335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19" office:value-type="float" office:value="6365" calcext:value-type="float">
            <text:p>6365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0736689814814815" calcext:value-type="float">
            <text:p>0,00073668981481481500</text:p>
          </table:table-cell>
          <table:table-cell table:formula="of:=[.D337]-[.D336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19" office:value-type="float" office:value="6384" calcext:value-type="float">
            <text:p>6384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0738888888888889" calcext:value-type="float">
            <text:p>0,00073888888888888900</text:p>
          </table:table-cell>
          <table:table-cell table:formula="of:=[.D338]-[.D337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19" office:value-type="float" office:value="6403" calcext:value-type="float">
            <text:p>6403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0741087962962963" calcext:value-type="float">
            <text:p>0,00074108796296296300</text:p>
          </table:table-cell>
          <table:table-cell table:formula="of:=[.D339]-[.D338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19" office:value-type="float" office:value="6422" calcext:value-type="float">
            <text:p>6422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0743287037037037" calcext:value-type="float">
            <text:p>0,00074328703703703700</text:p>
          </table:table-cell>
          <table:table-cell table:formula="of:=[.D340]-[.D33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19" office:value-type="float" office:value="6441" calcext:value-type="float">
            <text:p>6441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0745486111111111" calcext:value-type="float">
            <text:p>0,00074548611111111100</text:p>
          </table:table-cell>
          <table:table-cell table:formula="of:=[.D341]-[.D340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19" office:value-type="float" office:value="6460" calcext:value-type="float">
            <text:p>646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0747685185185185" calcext:value-type="float">
            <text:p>0,00074768518518518500</text:p>
          </table:table-cell>
          <table:table-cell table:formula="of:=[.D342]-[.D341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19" office:value-type="float" office:value="6479" calcext:value-type="float">
            <text:p>6479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0749884259259259" calcext:value-type="float">
            <text:p>0,00074988425925925900</text:p>
          </table:table-cell>
          <table:table-cell table:formula="of:=[.D343]-[.D342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19" office:value-type="float" office:value="6498" calcext:value-type="float">
            <text:p>6498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0752083333333333" calcext:value-type="float">
            <text:p>0,00075208333333333300</text:p>
          </table:table-cell>
          <table:table-cell table:formula="of:=[.D344]-[.D343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19" office:value-type="float" office:value="6517" calcext:value-type="float">
            <text:p>6517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0754282407407407" calcext:value-type="float">
            <text:p>0,00075428240740740700</text:p>
          </table:table-cell>
          <table:table-cell table:formula="of:=[.D345]-[.D344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19" office:value-type="float" office:value="6536" calcext:value-type="float">
            <text:p>6536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0756481481481482" calcext:value-type="float">
            <text:p>0,00075648148148148200</text:p>
          </table:table-cell>
          <table:table-cell table:formula="of:=[.D346]-[.D345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19" office:value-type="float" office:value="6555" calcext:value-type="float">
            <text:p>6555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0758680555555556" calcext:value-type="float">
            <text:p>0,00075868055555555600</text:p>
          </table:table-cell>
          <table:table-cell table:formula="of:=[.D347]-[.D346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19" office:value-type="float" office:value="6574" calcext:value-type="float">
            <text:p>6574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076087962962963" calcext:value-type="float">
            <text:p>0,00076087962962963000</text:p>
          </table:table-cell>
          <table:table-cell table:formula="of:=[.D348]-[.D34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19" office:value-type="float" office:value="6593" calcext:value-type="float">
            <text:p>6593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0763078703703704" calcext:value-type="float">
            <text:p>0,00076307870370370400</text:p>
          </table:table-cell>
          <table:table-cell table:formula="of:=[.D349]-[.D348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19" office:value-type="float" office:value="6612" calcext:value-type="float">
            <text:p>6612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0765277777777778" calcext:value-type="float">
            <text:p>0,00076527777777777800</text:p>
          </table:table-cell>
          <table:table-cell table:formula="of:=[.D350]-[.D349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19" office:value-type="float" office:value="6631" calcext:value-type="float">
            <text:p>6631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0767476851851852" calcext:value-type="float">
            <text:p>0,00076747685185185200</text:p>
          </table:table-cell>
          <table:table-cell table:formula="of:=[.D351]-[.D350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19" office:value-type="float" office:value="6650" calcext:value-type="float">
            <text:p>665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0769675925925926" calcext:value-type="float">
            <text:p>0,00076967592592592600</text:p>
          </table:table-cell>
          <table:table-cell table:formula="of:=[.D352]-[.D351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19" office:value-type="float" office:value="6669" calcext:value-type="float">
            <text:p>6669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0771875" calcext:value-type="float">
            <text:p>0,00077187500000000000</text:p>
          </table:table-cell>
          <table:table-cell table:formula="of:=[.D353]-[.D352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19" office:value-type="float" office:value="6688" calcext:value-type="float">
            <text:p>6688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0774074074074074" calcext:value-type="float">
            <text:p>0,00077407407407407400</text:p>
          </table:table-cell>
          <table:table-cell table:formula="of:=[.D354]-[.D353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19" office:value-type="float" office:value="6707" calcext:value-type="float">
            <text:p>6707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0776273148148148" calcext:value-type="float">
            <text:p>0,00077627314814814800</text:p>
          </table:table-cell>
          <table:table-cell table:formula="of:=[.D355]-[.D354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19" office:value-type="float" office:value="6726" calcext:value-type="float">
            <text:p>6726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0778472222222222" calcext:value-type="float">
            <text:p>0,00077847222222222200</text:p>
          </table:table-cell>
          <table:table-cell table:formula="of:=[.D356]-[.D35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19" office:value-type="float" office:value="6745" calcext:value-type="float">
            <text:p>6745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0780671296296296" calcext:value-type="float">
            <text:p>0,00078067129629629600</text:p>
          </table:table-cell>
          <table:table-cell table:formula="of:=[.D357]-[.D356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19" office:value-type="float" office:value="6764" calcext:value-type="float">
            <text:p>6764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078287037037037" calcext:value-type="float">
            <text:p>0,00078287037037037000</text:p>
          </table:table-cell>
          <table:table-cell table:formula="of:=[.D358]-[.D357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19" office:value-type="float" office:value="6783" calcext:value-type="float">
            <text:p>6783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0785069444444445" calcext:value-type="float">
            <text:p>0,00078506944444444500</text:p>
          </table:table-cell>
          <table:table-cell table:formula="of:=[.D359]-[.D358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19" office:value-type="float" office:value="6802" calcext:value-type="float">
            <text:p>6802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0787268518518519" calcext:value-type="float">
            <text:p>0,00078726851851851900</text:p>
          </table:table-cell>
          <table:table-cell table:formula="of:=[.D360]-[.D359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19" office:value-type="float" office:value="6821" calcext:value-type="float">
            <text:p>6821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0789467592592593" calcext:value-type="float">
            <text:p>0,00078946759259259300</text:p>
          </table:table-cell>
          <table:table-cell table:formula="of:=[.D361]-[.D360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19" office:value-type="float" office:value="6840" calcext:value-type="float">
            <text:p>684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0791666666666667" calcext:value-type="float">
            <text:p>0,00079166666666666700</text:p>
          </table:table-cell>
          <table:table-cell table:formula="of:=[.D362]-[.D361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19" office:value-type="float" office:value="6859" calcext:value-type="float">
            <text:p>6859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0793865740740741" calcext:value-type="float">
            <text:p>0,00079386574074074100</text:p>
          </table:table-cell>
          <table:table-cell table:formula="of:=[.D363]-[.D362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19" office:value-type="float" office:value="6878" calcext:value-type="float">
            <text:p>6878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0796064814814815" calcext:value-type="float">
            <text:p>0,00079606481481481500</text:p>
          </table:table-cell>
          <table:table-cell table:formula="of:=[.D364]-[.D36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19" office:value-type="float" office:value="6897" calcext:value-type="float">
            <text:p>6897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0798263888888889" calcext:value-type="float">
            <text:p>0,00079826388888888900</text:p>
          </table:table-cell>
          <table:table-cell table:formula="of:=[.D365]-[.D364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19" office:value-type="float" office:value="6916" calcext:value-type="float">
            <text:p>6916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0800462962962963" calcext:value-type="float">
            <text:p>0,00080046296296296300</text:p>
          </table:table-cell>
          <table:table-cell table:formula="of:=[.D366]-[.D365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19" office:value-type="float" office:value="6935" calcext:value-type="float">
            <text:p>6935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0802662037037037" calcext:value-type="float">
            <text:p>0,00080266203703703700</text:p>
          </table:table-cell>
          <table:table-cell table:formula="of:=[.D367]-[.D366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19" office:value-type="float" office:value="6954" calcext:value-type="float">
            <text:p>6954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0804861111111111" calcext:value-type="float">
            <text:p>0,00080486111111111100</text:p>
          </table:table-cell>
          <table:table-cell table:formula="of:=[.D368]-[.D367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19" office:value-type="float" office:value="6973" calcext:value-type="float">
            <text:p>6973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0807060185185185" calcext:value-type="float">
            <text:p>0,00080706018518518500</text:p>
          </table:table-cell>
          <table:table-cell table:formula="of:=[.D369]-[.D368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19" office:value-type="float" office:value="6992" calcext:value-type="float">
            <text:p>6992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0809259259259259" calcext:value-type="float">
            <text:p>0,00080925925925925900</text:p>
          </table:table-cell>
          <table:table-cell table:formula="of:=[.D370]-[.D369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19" office:value-type="float" office:value="7011" calcext:value-type="float">
            <text:p>7011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0811458333333333" calcext:value-type="float">
            <text:p>0,00081145833333333300</text:p>
          </table:table-cell>
          <table:table-cell table:formula="of:=[.D371]-[.D370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19" office:value-type="float" office:value="7030" calcext:value-type="float">
            <text:p>703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0813657407407407" calcext:value-type="float">
            <text:p>0,00081365740740740700</text:p>
          </table:table-cell>
          <table:table-cell table:formula="of:=[.D372]-[.D37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19" office:value-type="float" office:value="7049" calcext:value-type="float">
            <text:p>7049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0815856481481482" calcext:value-type="float">
            <text:p>0,00081585648148148200</text:p>
          </table:table-cell>
          <table:table-cell table:formula="of:=[.D373]-[.D372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19" office:value-type="float" office:value="7068" calcext:value-type="float">
            <text:p>7068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0818055555555556" calcext:value-type="float">
            <text:p>0,00081805555555555600</text:p>
          </table:table-cell>
          <table:table-cell table:formula="of:=[.D374]-[.D373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19" office:value-type="float" office:value="7087" calcext:value-type="float">
            <text:p>7087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082025462962963" calcext:value-type="float">
            <text:p>0,00082025462962963000</text:p>
          </table:table-cell>
          <table:table-cell table:formula="of:=[.D375]-[.D374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19" office:value-type="float" office:value="7106" calcext:value-type="float">
            <text:p>7106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0822453703703704" calcext:value-type="float">
            <text:p>0,00082245370370370400</text:p>
          </table:table-cell>
          <table:table-cell table:formula="of:=[.D376]-[.D375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19" office:value-type="float" office:value="7125" calcext:value-type="float">
            <text:p>7125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0824652777777778" calcext:value-type="float">
            <text:p>0,00082465277777777800</text:p>
          </table:table-cell>
          <table:table-cell table:formula="of:=[.D377]-[.D376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19" office:value-type="float" office:value="7144" calcext:value-type="float">
            <text:p>7144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0826851851851852" calcext:value-type="float">
            <text:p>0,00082685185185185200</text:p>
          </table:table-cell>
          <table:table-cell table:formula="of:=[.D378]-[.D377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19" office:value-type="float" office:value="7163" calcext:value-type="float">
            <text:p>7163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0829050925925926" calcext:value-type="float">
            <text:p>0,00082905092592592600</text:p>
          </table:table-cell>
          <table:table-cell table:formula="of:=[.D379]-[.D378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19" office:value-type="float" office:value="7182" calcext:value-type="float">
            <text:p>7182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083125" calcext:value-type="float">
            <text:p>0,00083125000000000000</text:p>
          </table:table-cell>
          <table:table-cell table:formula="of:=[.D380]-[.D37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19" office:value-type="float" office:value="7201" calcext:value-type="float">
            <text:p>7201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0833449074074074" calcext:value-type="float">
            <text:p>0,00083344907407407400</text:p>
          </table:table-cell>
          <table:table-cell table:formula="of:=[.D381]-[.D380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19" office:value-type="float" office:value="7220" calcext:value-type="float">
            <text:p>722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0835648148148148" calcext:value-type="float">
            <text:p>0,00083564814814814800</text:p>
          </table:table-cell>
          <table:table-cell table:formula="of:=[.D382]-[.D381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19" office:value-type="float" office:value="7239" calcext:value-type="float">
            <text:p>7239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0837847222222222" calcext:value-type="float">
            <text:p>0,00083784722222222200</text:p>
          </table:table-cell>
          <table:table-cell table:formula="of:=[.D383]-[.D382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19" office:value-type="float" office:value="7258" calcext:value-type="float">
            <text:p>7258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0840046296296296" calcext:value-type="float">
            <text:p>0,00084004629629629600</text:p>
          </table:table-cell>
          <table:table-cell table:formula="of:=[.D384]-[.D383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19" office:value-type="float" office:value="7277" calcext:value-type="float">
            <text:p>7277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084224537037037" calcext:value-type="float">
            <text:p>0,00084224537037037000</text:p>
          </table:table-cell>
          <table:table-cell table:formula="of:=[.D385]-[.D384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19" office:value-type="float" office:value="7296" calcext:value-type="float">
            <text:p>7296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0844444444444444" calcext:value-type="float">
            <text:p>0,00084444444444444400</text:p>
          </table:table-cell>
          <table:table-cell table:formula="of:=[.D386]-[.D385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19" office:value-type="float" office:value="7315" calcext:value-type="float">
            <text:p>7315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0846643518518519" calcext:value-type="float">
            <text:p>0,00084664351851851900</text:p>
          </table:table-cell>
          <table:table-cell table:formula="of:=[.D387]-[.D386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19" office:value-type="float" office:value="7334" calcext:value-type="float">
            <text:p>7334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0848842592592593" calcext:value-type="float">
            <text:p>0,00084884259259259200</text:p>
          </table:table-cell>
          <table:table-cell table:formula="of:=[.D388]-[.D387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19" office:value-type="float" office:value="7353" calcext:value-type="float">
            <text:p>7353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0851041666666667" calcext:value-type="float">
            <text:p>0,00085104166666666700</text:p>
          </table:table-cell>
          <table:table-cell table:formula="of:=[.D389]-[.D38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19" office:value-type="float" office:value="7372" calcext:value-type="float">
            <text:p>7372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0853240740740741" calcext:value-type="float">
            <text:p>0,00085324074074074100</text:p>
          </table:table-cell>
          <table:table-cell table:formula="of:=[.D390]-[.D389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19" office:value-type="float" office:value="7391" calcext:value-type="float">
            <text:p>7391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0855439814814815" calcext:value-type="float">
            <text:p>0,00085543981481481500</text:p>
          </table:table-cell>
          <table:table-cell table:formula="of:=[.D391]-[.D390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19" office:value-type="float" office:value="7410" calcext:value-type="float">
            <text:p>741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0857638888888889" calcext:value-type="float">
            <text:p>0,00085763888888888900</text:p>
          </table:table-cell>
          <table:table-cell table:formula="of:=[.D392]-[.D391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19" office:value-type="float" office:value="7429" calcext:value-type="float">
            <text:p>7429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0859837962962963" calcext:value-type="float">
            <text:p>0,00085983796296296300</text:p>
          </table:table-cell>
          <table:table-cell table:formula="of:=[.D393]-[.D392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19" office:value-type="float" office:value="7448" calcext:value-type="float">
            <text:p>7448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0862037037037037" calcext:value-type="float">
            <text:p>0,00086203703703703700</text:p>
          </table:table-cell>
          <table:table-cell table:formula="of:=[.D394]-[.D393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19" office:value-type="float" office:value="7467" calcext:value-type="float">
            <text:p>7467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0864236111111111" calcext:value-type="float">
            <text:p>0,00086423611111111100</text:p>
          </table:table-cell>
          <table:table-cell table:formula="of:=[.D395]-[.D394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19" office:value-type="float" office:value="7486" calcext:value-type="float">
            <text:p>7486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0866435185185185" calcext:value-type="float">
            <text:p>0,00086643518518518500</text:p>
          </table:table-cell>
          <table:table-cell table:formula="of:=[.D396]-[.D395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19" office:value-type="float" office:value="7505" calcext:value-type="float">
            <text:p>7505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0868634259259259" calcext:value-type="float">
            <text:p>0,00086863425925925900</text:p>
          </table:table-cell>
          <table:table-cell table:formula="of:=[.D397]-[.D39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19" office:value-type="float" office:value="7524" calcext:value-type="float">
            <text:p>7524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0870833333333333" calcext:value-type="float">
            <text:p>0,00087083333333333400</text:p>
          </table:table-cell>
          <table:table-cell table:formula="of:=[.D398]-[.D397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19" office:value-type="float" office:value="7543" calcext:value-type="float">
            <text:p>7543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0873032407407407" calcext:value-type="float">
            <text:p>0,00087303240740740700</text:p>
          </table:table-cell>
          <table:table-cell table:formula="of:=[.D399]-[.D398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19" office:value-type="float" office:value="7562" calcext:value-type="float">
            <text:p>7562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0875231481481482" calcext:value-type="float">
            <text:p>0,00087523148148148100</text:p>
          </table:table-cell>
          <table:table-cell table:formula="of:=[.D400]-[.D399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19" office:value-type="float" office:value="7581" calcext:value-type="float">
            <text:p>7581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0877430555555556" calcext:value-type="float">
            <text:p>0,00087743055555555600</text:p>
          </table:table-cell>
          <table:table-cell table:formula="of:=[.D401]-[.D400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19" office:value-type="float" office:value="7600" calcext:value-type="float">
            <text:p>76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087962962962963" calcext:value-type="float">
            <text:p>0,00087962962962963000</text:p>
          </table:table-cell>
          <table:table-cell table:formula="of:=[.D402]-[.D401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19" office:value-type="float" office:value="7619" calcext:value-type="float">
            <text:p>7619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0881828703703704" calcext:value-type="float">
            <text:p>0,00088182870370370400</text:p>
          </table:table-cell>
          <table:table-cell table:formula="of:=[.D403]-[.D402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19" office:value-type="float" office:value="7638" calcext:value-type="float">
            <text:p>7638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0884027777777778" calcext:value-type="float">
            <text:p>0,00088402777777777800</text:p>
          </table:table-cell>
          <table:table-cell table:formula="of:=[.D404]-[.D403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19" office:value-type="float" office:value="7657" calcext:value-type="float">
            <text:p>7657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0886226851851852" calcext:value-type="float">
            <text:p>0,00088622685185185200</text:p>
          </table:table-cell>
          <table:table-cell table:formula="of:=[.D405]-[.D40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19" office:value-type="float" office:value="7676" calcext:value-type="float">
            <text:p>7676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0888425925925926" calcext:value-type="float">
            <text:p>0,00088842592592592600</text:p>
          </table:table-cell>
          <table:table-cell table:formula="of:=[.D406]-[.D405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19" office:value-type="float" office:value="7695" calcext:value-type="float">
            <text:p>7695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0890625" calcext:value-type="float">
            <text:p>0,00089062500000000000</text:p>
          </table:table-cell>
          <table:table-cell table:formula="of:=[.D407]-[.D406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19" office:value-type="float" office:value="7714" calcext:value-type="float">
            <text:p>7714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0892824074074074" calcext:value-type="float">
            <text:p>0,00089282407407407400</text:p>
          </table:table-cell>
          <table:table-cell table:formula="of:=[.D408]-[.D407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19" office:value-type="float" office:value="7733" calcext:value-type="float">
            <text:p>7733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0895023148148148" calcext:value-type="float">
            <text:p>0,00089502314814814800</text:p>
          </table:table-cell>
          <table:table-cell table:formula="of:=[.D409]-[.D408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19" office:value-type="float" office:value="7752" calcext:value-type="float">
            <text:p>7752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0897222222222222" calcext:value-type="float">
            <text:p>0,00089722222222222200</text:p>
          </table:table-cell>
          <table:table-cell table:formula="of:=[.D410]-[.D409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19" office:value-type="float" office:value="7771" calcext:value-type="float">
            <text:p>7771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0899421296296296" calcext:value-type="float">
            <text:p>0,00089942129629629600</text:p>
          </table:table-cell>
          <table:table-cell table:formula="of:=[.D411]-[.D410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19" office:value-type="float" office:value="7790" calcext:value-type="float">
            <text:p>779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090162037037037" calcext:value-type="float">
            <text:p>0,00090162037037037000</text:p>
          </table:table-cell>
          <table:table-cell table:formula="of:=[.D412]-[.D411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19" office:value-type="float" office:value="7809" calcext:value-type="float">
            <text:p>7809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0903819444444444" calcext:value-type="float">
            <text:p>0,00090381944444444400</text:p>
          </table:table-cell>
          <table:table-cell table:formula="of:=[.D413]-[.D41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19" office:value-type="float" office:value="7828" calcext:value-type="float">
            <text:p>7828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0906018518518519" calcext:value-type="float">
            <text:p>0,00090601851851851900</text:p>
          </table:table-cell>
          <table:table-cell table:formula="of:=[.D414]-[.D413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19" office:value-type="float" office:value="7847" calcext:value-type="float">
            <text:p>7847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0908217592592593" calcext:value-type="float">
            <text:p>0,00090821759259259300</text:p>
          </table:table-cell>
          <table:table-cell table:formula="of:=[.D415]-[.D414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19" office:value-type="float" office:value="7866" calcext:value-type="float">
            <text:p>7866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0910416666666667" calcext:value-type="float">
            <text:p>0,00091041666666666700</text:p>
          </table:table-cell>
          <table:table-cell table:formula="of:=[.D416]-[.D415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19" office:value-type="float" office:value="7885" calcext:value-type="float">
            <text:p>7885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0912615740740741" calcext:value-type="float">
            <text:p>0,00091261574074074100</text:p>
          </table:table-cell>
          <table:table-cell table:formula="of:=[.D417]-[.D416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19" office:value-type="float" office:value="7904" calcext:value-type="float">
            <text:p>7904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0914814814814815" calcext:value-type="float">
            <text:p>0,00091481481481481500</text:p>
          </table:table-cell>
          <table:table-cell table:formula="of:=[.D418]-[.D417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19" office:value-type="float" office:value="7923" calcext:value-type="float">
            <text:p>7923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0917013888888889" calcext:value-type="float">
            <text:p>0,00091701388888888900</text:p>
          </table:table-cell>
          <table:table-cell table:formula="of:=[.D419]-[.D418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19" office:value-type="float" office:value="7942" calcext:value-type="float">
            <text:p>7942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0919212962962963" calcext:value-type="float">
            <text:p>0,00091921296296296300</text:p>
          </table:table-cell>
          <table:table-cell table:formula="of:=[.D420]-[.D419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19" office:value-type="float" office:value="7961" calcext:value-type="float">
            <text:p>7961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0921412037037037" calcext:value-type="float">
            <text:p>0,00092141203703703700</text:p>
          </table:table-cell>
          <table:table-cell table:formula="of:=[.D421]-[.D42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19" office:value-type="float" office:value="7980" calcext:value-type="float">
            <text:p>798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0923611111111111" calcext:value-type="float">
            <text:p>0,00092361111111111100</text:p>
          </table:table-cell>
          <table:table-cell table:formula="of:=[.D422]-[.D421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19" office:value-type="float" office:value="7999" calcext:value-type="float">
            <text:p>7999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0925810185185185" calcext:value-type="float">
            <text:p>0,00092581018518518500</text:p>
          </table:table-cell>
          <table:table-cell table:formula="of:=[.D423]-[.D422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19" office:value-type="float" office:value="8018" calcext:value-type="float">
            <text:p>8018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0928009259259259" calcext:value-type="float">
            <text:p>0,00092800925925925900</text:p>
          </table:table-cell>
          <table:table-cell table:formula="of:=[.D424]-[.D423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19" office:value-type="float" office:value="8037" calcext:value-type="float">
            <text:p>8037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0930208333333333" calcext:value-type="float">
            <text:p>0,00093020833333333300</text:p>
          </table:table-cell>
          <table:table-cell table:formula="of:=[.D425]-[.D424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19" office:value-type="float" office:value="8056" calcext:value-type="float">
            <text:p>8056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0932407407407407" calcext:value-type="float">
            <text:p>0,00093240740740740700</text:p>
          </table:table-cell>
          <table:table-cell table:formula="of:=[.D426]-[.D425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19" office:value-type="float" office:value="8075" calcext:value-type="float">
            <text:p>8075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0934606481481482" calcext:value-type="float">
            <text:p>0,00093460648148148200</text:p>
          </table:table-cell>
          <table:table-cell table:formula="of:=[.D427]-[.D426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19" office:value-type="float" office:value="8094" calcext:value-type="float">
            <text:p>8094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0936805555555556" calcext:value-type="float">
            <text:p>0,00093680555555555600</text:p>
          </table:table-cell>
          <table:table-cell table:formula="of:=[.D428]-[.D427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19" office:value-type="float" office:value="8113" calcext:value-type="float">
            <text:p>8113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093900462962963" calcext:value-type="float">
            <text:p>0,00093900462962963000</text:p>
          </table:table-cell>
          <table:table-cell table:formula="of:=[.D429]-[.D42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19" office:value-type="float" office:value="8132" calcext:value-type="float">
            <text:p>8132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0941203703703704" calcext:value-type="float">
            <text:p>0,00094120370370370400</text:p>
          </table:table-cell>
          <table:table-cell table:formula="of:=[.D430]-[.D429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19" office:value-type="float" office:value="8151" calcext:value-type="float">
            <text:p>8151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0943402777777778" calcext:value-type="float">
            <text:p>0,00094340277777777800</text:p>
          </table:table-cell>
          <table:table-cell table:formula="of:=[.D431]-[.D430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19" office:value-type="float" office:value="8170" calcext:value-type="float">
            <text:p>817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0945601851851852" calcext:value-type="float">
            <text:p>0,00094560185185185200</text:p>
          </table:table-cell>
          <table:table-cell table:formula="of:=[.D432]-[.D431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19" office:value-type="float" office:value="8189" calcext:value-type="float">
            <text:p>8189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0947800925925926" calcext:value-type="float">
            <text:p>0,00094780092592592600</text:p>
          </table:table-cell>
          <table:table-cell table:formula="of:=[.D433]-[.D432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19" office:value-type="float" office:value="8208" calcext:value-type="float">
            <text:p>8208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095" calcext:value-type="float">
            <text:p>0,00095000000000000000</text:p>
          </table:table-cell>
          <table:table-cell table:formula="of:=[.D434]-[.D433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19" office:value-type="float" office:value="8227" calcext:value-type="float">
            <text:p>8227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0952199074074074" calcext:value-type="float">
            <text:p>0,00095219907407407400</text:p>
          </table:table-cell>
          <table:table-cell table:formula="of:=[.D435]-[.D434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19" office:value-type="float" office:value="8246" calcext:value-type="float">
            <text:p>8246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0954398148148148" calcext:value-type="float">
            <text:p>0,00095439814814814800</text:p>
          </table:table-cell>
          <table:table-cell table:formula="of:=[.D436]-[.D435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19" office:value-type="float" office:value="8265" calcext:value-type="float">
            <text:p>8265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0956597222222222" calcext:value-type="float">
            <text:p>0,00095659722222222200</text:p>
          </table:table-cell>
          <table:table-cell table:formula="of:=[.D437]-[.D43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19" office:value-type="float" office:value="8284" calcext:value-type="float">
            <text:p>8284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0958796296296296" calcext:value-type="float">
            <text:p>0,00095879629629629600</text:p>
          </table:table-cell>
          <table:table-cell table:formula="of:=[.D438]-[.D437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19" office:value-type="float" office:value="8303" calcext:value-type="float">
            <text:p>8303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096099537037037" calcext:value-type="float">
            <text:p>0,00096099537037037000</text:p>
          </table:table-cell>
          <table:table-cell table:formula="of:=[.D439]-[.D438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19" office:value-type="float" office:value="8322" calcext:value-type="float">
            <text:p>8322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0963194444444445" calcext:value-type="float">
            <text:p>0,00096319444444444500</text:p>
          </table:table-cell>
          <table:table-cell table:formula="of:=[.D440]-[.D439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19" office:value-type="float" office:value="8341" calcext:value-type="float">
            <text:p>8341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0965393518518519" calcext:value-type="float">
            <text:p>0,00096539351851851900</text:p>
          </table:table-cell>
          <table:table-cell table:formula="of:=[.D441]-[.D440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19" office:value-type="float" office:value="8360" calcext:value-type="float">
            <text:p>836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0967592592592593" calcext:value-type="float">
            <text:p>0,00096759259259259300</text:p>
          </table:table-cell>
          <table:table-cell table:formula="of:=[.D442]-[.D441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19" office:value-type="float" office:value="8379" calcext:value-type="float">
            <text:p>8379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0969791666666667" calcext:value-type="float">
            <text:p>0,00096979166666666700</text:p>
          </table:table-cell>
          <table:table-cell table:formula="of:=[.D443]-[.D442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19" office:value-type="float" office:value="8398" calcext:value-type="float">
            <text:p>8398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0971990740740741" calcext:value-type="float">
            <text:p>0,00097199074074074100</text:p>
          </table:table-cell>
          <table:table-cell table:formula="of:=[.D444]-[.D443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19" office:value-type="float" office:value="8417" calcext:value-type="float">
            <text:p>8417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0974189814814815" calcext:value-type="float">
            <text:p>0,00097418981481481500</text:p>
          </table:table-cell>
          <table:table-cell table:formula="of:=[.D445]-[.D444]" office:value-type="float" office:value="0.00000219907407407406" calcext:value-type="float">
            <text:p>0,0000021990740740740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19" office:value-type="float" office:value="8436" calcext:value-type="float">
            <text:p>8436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0976388888888889" calcext:value-type="float">
            <text:p>0,00097638888888888900</text:p>
          </table:table-cell>
          <table:table-cell table:formula="of:=[.D446]-[.D44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19" office:value-type="float" office:value="8455" calcext:value-type="float">
            <text:p>8455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0978587962962963" calcext:value-type="float">
            <text:p>0,00097858796296296300</text:p>
          </table:table-cell>
          <table:table-cell table:formula="of:=[.D447]-[.D446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19" office:value-type="float" office:value="8474" calcext:value-type="float">
            <text:p>8474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0980787037037037" calcext:value-type="float">
            <text:p>0,00098078703703703700</text:p>
          </table:table-cell>
          <table:table-cell table:formula="of:=[.D448]-[.D44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19" office:value-type="float" office:value="8493" calcext:value-type="float">
            <text:p>8493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0982986111111111" calcext:value-type="float">
            <text:p>0,00098298611111111100</text:p>
          </table:table-cell>
          <table:table-cell table:formula="of:=[.D449]-[.D448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19" office:value-type="float" office:value="8512" calcext:value-type="float">
            <text:p>8512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0985185185185185" calcext:value-type="float">
            <text:p>0,00098518518518518500</text:p>
          </table:table-cell>
          <table:table-cell table:formula="of:=[.D450]-[.D44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19" office:value-type="float" office:value="8531" calcext:value-type="float">
            <text:p>8531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0987384259259259" calcext:value-type="float">
            <text:p>0,00098738425925925900</text:p>
          </table:table-cell>
          <table:table-cell table:formula="of:=[.D451]-[.D45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19" office:value-type="float" office:value="8550" calcext:value-type="float">
            <text:p>855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0989583333333333" calcext:value-type="float">
            <text:p>0,00098958333333333300</text:p>
          </table:table-cell>
          <table:table-cell table:formula="of:=[.D452]-[.D451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19" office:value-type="float" office:value="8569" calcext:value-type="float">
            <text:p>8569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0991782407407407" calcext:value-type="float">
            <text:p>0,00099178240740740700</text:p>
          </table:table-cell>
          <table:table-cell table:formula="of:=[.D453]-[.D45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19" office:value-type="float" office:value="8588" calcext:value-type="float">
            <text:p>8588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0993981481481482" calcext:value-type="float">
            <text:p>0,00099398148148148200</text:p>
          </table:table-cell>
          <table:table-cell table:formula="of:=[.D454]-[.D453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19" office:value-type="float" office:value="8607" calcext:value-type="float">
            <text:p>8607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0996180555555556" calcext:value-type="float">
            <text:p>0,00099618055555555600</text:p>
          </table:table-cell>
          <table:table-cell table:formula="of:=[.D455]-[.D45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19" office:value-type="float" office:value="8626" calcext:value-type="float">
            <text:p>8626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099837962962963" calcext:value-type="float">
            <text:p>0,00099837962962963000</text:p>
          </table:table-cell>
          <table:table-cell table:formula="of:=[.D456]-[.D455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19" office:value-type="float" office:value="8645" calcext:value-type="float">
            <text:p>8645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10005787037037" calcext:value-type="float">
            <text:p>0,00100057870370370000</text:p>
          </table:table-cell>
          <table:table-cell table:formula="of:=[.D457]-[.D45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19" office:value-type="float" office:value="8664" calcext:value-type="float">
            <text:p>8664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100277777777778" calcext:value-type="float">
            <text:p>0,00100277777777778000</text:p>
          </table:table-cell>
          <table:table-cell table:formula="of:=[.D458]-[.D45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19" office:value-type="float" office:value="8683" calcext:value-type="float">
            <text:p>8683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100497685185185" calcext:value-type="float">
            <text:p>0,00100497685185185000</text:p>
          </table:table-cell>
          <table:table-cell table:formula="of:=[.D459]-[.D458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19" office:value-type="float" office:value="8702" calcext:value-type="float">
            <text:p>8702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100717592592593" calcext:value-type="float">
            <text:p>0,00100717592592593000</text:p>
          </table:table-cell>
          <table:table-cell table:formula="of:=[.D460]-[.D45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19" office:value-type="float" office:value="8721" calcext:value-type="float">
            <text:p>8721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1009375" calcext:value-type="float">
            <text:p>0,00100937500000000000</text:p>
          </table:table-cell>
          <table:table-cell table:formula="of:=[.D461]-[.D460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19" office:value-type="float" office:value="8740" calcext:value-type="float">
            <text:p>874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101157407407407" calcext:value-type="float">
            <text:p>0,00101157407407407000</text:p>
          </table:table-cell>
          <table:table-cell table:formula="of:=[.D462]-[.D46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19" office:value-type="float" office:value="8759" calcext:value-type="float">
            <text:p>8759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101377314814815" calcext:value-type="float">
            <text:p>0,00101377314814815000</text:p>
          </table:table-cell>
          <table:table-cell table:formula="of:=[.D463]-[.D462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19" office:value-type="float" office:value="8778" calcext:value-type="float">
            <text:p>8778</text:p>
          </table:table-cell>
          <table:table-cell office:value-type="float" office:value="8640000" calcext:value-type="float">
            <text:p>8640000</text:p>
          </table:table-cell>
          <table:table-cell table:formula="of:=[.B463]/[.C463]" office:value-type="float" office:value="0.00101597222222222" calcext:value-type="float">
            <text:p>0,00101597222222222000</text:p>
          </table:table-cell>
          <table:table-cell table:formula="of:=[.D464]-[.D46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19" office:value-type="float" office:value="8797" calcext:value-type="float">
            <text:p>8797</text:p>
          </table:table-cell>
          <table:table-cell office:value-type="float" office:value="8640000" calcext:value-type="float">
            <text:p>8640000</text:p>
          </table:table-cell>
          <table:table-cell table:formula="of:=[.B464]/[.C464]" office:value-type="float" office:value="0.0010181712962963" calcext:value-type="float">
            <text:p>0,00101817129629630000</text:p>
          </table:table-cell>
          <table:table-cell table:formula="of:=[.D465]-[.D464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19" office:value-type="float" office:value="8816" calcext:value-type="float">
            <text:p>8816</text:p>
          </table:table-cell>
          <table:table-cell office:value-type="float" office:value="8640000" calcext:value-type="float">
            <text:p>8640000</text:p>
          </table:table-cell>
          <table:table-cell table:formula="of:=[.B465]/[.C465]" office:value-type="float" office:value="0.00102037037037037" calcext:value-type="float">
            <text:p>0,00102037037037037000</text:p>
          </table:table-cell>
          <table:table-cell table:formula="of:=[.D466]-[.D46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19" office:value-type="float" office:value="8835" calcext:value-type="float">
            <text:p>8835</text:p>
          </table:table-cell>
          <table:table-cell office:value-type="float" office:value="8640000" calcext:value-type="float">
            <text:p>8640000</text:p>
          </table:table-cell>
          <table:table-cell table:formula="of:=[.B466]/[.C466]" office:value-type="float" office:value="0.00102256944444444" calcext:value-type="float">
            <text:p>0,00102256944444444000</text:p>
          </table:table-cell>
          <table:table-cell table:formula="of:=[.D467]-[.D46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19" office:value-type="float" office:value="8854" calcext:value-type="float">
            <text:p>8854</text:p>
          </table:table-cell>
          <table:table-cell office:value-type="float" office:value="8640000" calcext:value-type="float">
            <text:p>8640000</text:p>
          </table:table-cell>
          <table:table-cell table:formula="of:=[.B467]/[.C467]" office:value-type="float" office:value="0.00102476851851852" calcext:value-type="float">
            <text:p>0,00102476851851852000</text:p>
          </table:table-cell>
          <table:table-cell table:formula="of:=[.D468]-[.D467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19" office:value-type="float" office:value="8873" calcext:value-type="float">
            <text:p>8873</text:p>
          </table:table-cell>
          <table:table-cell office:value-type="float" office:value="8640000" calcext:value-type="float">
            <text:p>8640000</text:p>
          </table:table-cell>
          <table:table-cell table:formula="of:=[.B468]/[.C468]" office:value-type="float" office:value="0.00102696759259259" calcext:value-type="float">
            <text:p>0,00102696759259259000</text:p>
          </table:table-cell>
          <table:table-cell table:formula="of:=[.D469]-[.D46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19" office:value-type="float" office:value="8892" calcext:value-type="float">
            <text:p>8892</text:p>
          </table:table-cell>
          <table:table-cell office:value-type="float" office:value="8640000" calcext:value-type="float">
            <text:p>8640000</text:p>
          </table:table-cell>
          <table:table-cell table:formula="of:=[.B469]/[.C469]" office:value-type="float" office:value="0.00102916666666667" calcext:value-type="float">
            <text:p>0,00102916666666667000</text:p>
          </table:table-cell>
          <table:table-cell table:formula="of:=[.D470]-[.D469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19" office:value-type="float" office:value="8911" calcext:value-type="float">
            <text:p>8911</text:p>
          </table:table-cell>
          <table:table-cell office:value-type="float" office:value="8640000" calcext:value-type="float">
            <text:p>8640000</text:p>
          </table:table-cell>
          <table:table-cell table:formula="of:=[.B470]/[.C470]" office:value-type="float" office:value="0.00103136574074074" calcext:value-type="float">
            <text:p>0,00103136574074074000</text:p>
          </table:table-cell>
          <table:table-cell table:formula="of:=[.D471]-[.D47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19" office:value-type="float" office:value="8930" calcext:value-type="float">
            <text:p>8930</text:p>
          </table:table-cell>
          <table:table-cell office:value-type="float" office:value="8640000" calcext:value-type="float">
            <text:p>8640000</text:p>
          </table:table-cell>
          <table:table-cell table:formula="of:=[.B471]/[.C471]" office:value-type="float" office:value="0.00103356481481481" calcext:value-type="float">
            <text:p>0,00103356481481481000</text:p>
          </table:table-cell>
          <table:table-cell table:formula="of:=[.D472]-[.D471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+19" office:value-type="float" office:value="8949" calcext:value-type="float">
            <text:p>8949</text:p>
          </table:table-cell>
          <table:table-cell office:value-type="float" office:value="8640000" calcext:value-type="float">
            <text:p>8640000</text:p>
          </table:table-cell>
          <table:table-cell table:formula="of:=[.B472]/[.C472]" office:value-type="float" office:value="0.00103576388888889" calcext:value-type="float">
            <text:p>0,00103576388888889000</text:p>
          </table:table-cell>
          <table:table-cell table:formula="of:=[.D473]-[.D47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+19" office:value-type="float" office:value="8968" calcext:value-type="float">
            <text:p>8968</text:p>
          </table:table-cell>
          <table:table-cell office:value-type="float" office:value="8640000" calcext:value-type="float">
            <text:p>8640000</text:p>
          </table:table-cell>
          <table:table-cell table:formula="of:=[.B473]/[.C473]" office:value-type="float" office:value="0.00103796296296296" calcext:value-type="float">
            <text:p>0,00103796296296296000</text:p>
          </table:table-cell>
          <table:table-cell table:formula="of:=[.D474]-[.D47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+19" office:value-type="float" office:value="8987" calcext:value-type="float">
            <text:p>8987</text:p>
          </table:table-cell>
          <table:table-cell office:value-type="float" office:value="8640000" calcext:value-type="float">
            <text:p>8640000</text:p>
          </table:table-cell>
          <table:table-cell table:formula="of:=[.B474]/[.C474]" office:value-type="float" office:value="0.00104016203703704" calcext:value-type="float">
            <text:p>0,00104016203703704000</text:p>
          </table:table-cell>
          <table:table-cell table:formula="of:=[.D475]-[.D474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+19" office:value-type="float" office:value="9006" calcext:value-type="float">
            <text:p>9006</text:p>
          </table:table-cell>
          <table:table-cell office:value-type="float" office:value="8640000" calcext:value-type="float">
            <text:p>8640000</text:p>
          </table:table-cell>
          <table:table-cell table:formula="of:=[.B475]/[.C475]" office:value-type="float" office:value="0.00104236111111111" calcext:value-type="float">
            <text:p>0,00104236111111111000</text:p>
          </table:table-cell>
          <table:table-cell table:formula="of:=[.D476]-[.D47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+19" office:value-type="float" office:value="9025" calcext:value-type="float">
            <text:p>9025</text:p>
          </table:table-cell>
          <table:table-cell office:value-type="float" office:value="8640000" calcext:value-type="float">
            <text:p>8640000</text:p>
          </table:table-cell>
          <table:table-cell table:formula="of:=[.B476]/[.C476]" office:value-type="float" office:value="0.00104456018518519" calcext:value-type="float">
            <text:p>0,00104456018518519000</text:p>
          </table:table-cell>
          <table:table-cell table:formula="of:=[.D477]-[.D476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+19" office:value-type="float" office:value="9044" calcext:value-type="float">
            <text:p>9044</text:p>
          </table:table-cell>
          <table:table-cell office:value-type="float" office:value="8640000" calcext:value-type="float">
            <text:p>8640000</text:p>
          </table:table-cell>
          <table:table-cell table:formula="of:=[.B477]/[.C477]" office:value-type="float" office:value="0.00104675925925926" calcext:value-type="float">
            <text:p>0,00104675925925926000</text:p>
          </table:table-cell>
          <table:table-cell table:formula="of:=[.D478]-[.D47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+19" office:value-type="float" office:value="9063" calcext:value-type="float">
            <text:p>9063</text:p>
          </table:table-cell>
          <table:table-cell office:value-type="float" office:value="8640000" calcext:value-type="float">
            <text:p>8640000</text:p>
          </table:table-cell>
          <table:table-cell table:formula="of:=[.B478]/[.C478]" office:value-type="float" office:value="0.00104895833333333" calcext:value-type="float">
            <text:p>0,00104895833333333000</text:p>
          </table:table-cell>
          <table:table-cell table:formula="of:=[.D479]-[.D478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+19" office:value-type="float" office:value="9082" calcext:value-type="float">
            <text:p>9082</text:p>
          </table:table-cell>
          <table:table-cell office:value-type="float" office:value="8640000" calcext:value-type="float">
            <text:p>8640000</text:p>
          </table:table-cell>
          <table:table-cell table:formula="of:=[.B479]/[.C479]" office:value-type="float" office:value="0.00105115740740741" calcext:value-type="float">
            <text:p>0,00105115740740741000</text:p>
          </table:table-cell>
          <table:table-cell table:formula="of:=[.D480]-[.D47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+19" office:value-type="float" office:value="9101" calcext:value-type="float">
            <text:p>9101</text:p>
          </table:table-cell>
          <table:table-cell office:value-type="float" office:value="8640000" calcext:value-type="float">
            <text:p>8640000</text:p>
          </table:table-cell>
          <table:table-cell table:formula="of:=[.B480]/[.C480]" office:value-type="float" office:value="0.00105335648148148" calcext:value-type="float">
            <text:p>0,00105335648148148000</text:p>
          </table:table-cell>
          <table:table-cell table:formula="of:=[.D481]-[.D480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+19" office:value-type="float" office:value="9120" calcext:value-type="float">
            <text:p>9120</text:p>
          </table:table-cell>
          <table:table-cell office:value-type="float" office:value="8640000" calcext:value-type="float">
            <text:p>8640000</text:p>
          </table:table-cell>
          <table:table-cell table:formula="of:=[.B481]/[.C481]" office:value-type="float" office:value="0.00105555555555556" calcext:value-type="float">
            <text:p>0,00105555555555556000</text:p>
          </table:table-cell>
          <table:table-cell table:formula="of:=[.D482]-[.D48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+19" office:value-type="float" office:value="9139" calcext:value-type="float">
            <text:p>9139</text:p>
          </table:table-cell>
          <table:table-cell office:value-type="float" office:value="8640000" calcext:value-type="float">
            <text:p>8640000</text:p>
          </table:table-cell>
          <table:table-cell table:formula="of:=[.B482]/[.C482]" office:value-type="float" office:value="0.00105775462962963" calcext:value-type="float">
            <text:p>0,00105775462962963000</text:p>
          </table:table-cell>
          <table:table-cell table:formula="of:=[.D483]-[.D48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+19" office:value-type="float" office:value="9158" calcext:value-type="float">
            <text:p>9158</text:p>
          </table:table-cell>
          <table:table-cell office:value-type="float" office:value="8640000" calcext:value-type="float">
            <text:p>8640000</text:p>
          </table:table-cell>
          <table:table-cell table:formula="of:=[.B483]/[.C483]" office:value-type="float" office:value="0.0010599537037037" calcext:value-type="float">
            <text:p>0,00105995370370370000</text:p>
          </table:table-cell>
          <table:table-cell table:formula="of:=[.D484]-[.D483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+19" office:value-type="float" office:value="9177" calcext:value-type="float">
            <text:p>9177</text:p>
          </table:table-cell>
          <table:table-cell office:value-type="float" office:value="8640000" calcext:value-type="float">
            <text:p>8640000</text:p>
          </table:table-cell>
          <table:table-cell table:formula="of:=[.B484]/[.C484]" office:value-type="float" office:value="0.00106215277777778" calcext:value-type="float">
            <text:p>0,00106215277777778000</text:p>
          </table:table-cell>
          <table:table-cell table:formula="of:=[.D485]-[.D48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+19" office:value-type="float" office:value="9196" calcext:value-type="float">
            <text:p>9196</text:p>
          </table:table-cell>
          <table:table-cell office:value-type="float" office:value="8640000" calcext:value-type="float">
            <text:p>8640000</text:p>
          </table:table-cell>
          <table:table-cell table:formula="of:=[.B485]/[.C485]" office:value-type="float" office:value="0.00106435185185185" calcext:value-type="float">
            <text:p>0,00106435185185185000</text:p>
          </table:table-cell>
          <table:table-cell table:formula="of:=[.D486]-[.D485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+19" office:value-type="float" office:value="9215" calcext:value-type="float">
            <text:p>9215</text:p>
          </table:table-cell>
          <table:table-cell office:value-type="float" office:value="8640000" calcext:value-type="float">
            <text:p>8640000</text:p>
          </table:table-cell>
          <table:table-cell table:formula="of:=[.B486]/[.C486]" office:value-type="float" office:value="0.00106655092592593" calcext:value-type="float">
            <text:p>0,00106655092592593000</text:p>
          </table:table-cell>
          <table:table-cell table:formula="of:=[.D487]-[.D48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+19" office:value-type="float" office:value="9234" calcext:value-type="float">
            <text:p>9234</text:p>
          </table:table-cell>
          <table:table-cell office:value-type="float" office:value="8640000" calcext:value-type="float">
            <text:p>8640000</text:p>
          </table:table-cell>
          <table:table-cell table:formula="of:=[.B487]/[.C487]" office:value-type="float" office:value="0.00106875" calcext:value-type="float">
            <text:p>0,00106875000000000000</text:p>
          </table:table-cell>
          <table:table-cell table:formula="of:=[.D488]-[.D487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+19" office:value-type="float" office:value="9253" calcext:value-type="float">
            <text:p>9253</text:p>
          </table:table-cell>
          <table:table-cell office:value-type="float" office:value="8640000" calcext:value-type="float">
            <text:p>8640000</text:p>
          </table:table-cell>
          <table:table-cell table:formula="of:=[.B488]/[.C488]" office:value-type="float" office:value="0.00107094907407407" calcext:value-type="float">
            <text:p>0,00107094907407407000</text:p>
          </table:table-cell>
          <table:table-cell table:formula="of:=[.D489]-[.D48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+19" office:value-type="float" office:value="9272" calcext:value-type="float">
            <text:p>9272</text:p>
          </table:table-cell>
          <table:table-cell office:value-type="float" office:value="8640000" calcext:value-type="float">
            <text:p>8640000</text:p>
          </table:table-cell>
          <table:table-cell table:formula="of:=[.B489]/[.C489]" office:value-type="float" office:value="0.00107314814814815" calcext:value-type="float">
            <text:p>0,00107314814814815000</text:p>
          </table:table-cell>
          <table:table-cell table:formula="of:=[.D490]-[.D48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+19" office:value-type="float" office:value="9291" calcext:value-type="float">
            <text:p>9291</text:p>
          </table:table-cell>
          <table:table-cell office:value-type="float" office:value="8640000" calcext:value-type="float">
            <text:p>8640000</text:p>
          </table:table-cell>
          <table:table-cell table:formula="of:=[.B490]/[.C490]" office:value-type="float" office:value="0.00107534722222222" calcext:value-type="float">
            <text:p>0,00107534722222222000</text:p>
          </table:table-cell>
          <table:table-cell table:formula="of:=[.D491]-[.D490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490]+19" office:value-type="float" office:value="9310" calcext:value-type="float">
            <text:p>9310</text:p>
          </table:table-cell>
          <table:table-cell office:value-type="float" office:value="8640000" calcext:value-type="float">
            <text:p>8640000</text:p>
          </table:table-cell>
          <table:table-cell table:formula="of:=[.B491]/[.C491]" office:value-type="float" office:value="0.0010775462962963" calcext:value-type="float">
            <text:p>0,00107754629629630000</text:p>
          </table:table-cell>
          <table:table-cell table:formula="of:=[.D492]-[.D49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1]+19" office:value-type="float" office:value="9329" calcext:value-type="float">
            <text:p>9329</text:p>
          </table:table-cell>
          <table:table-cell office:value-type="float" office:value="8640000" calcext:value-type="float">
            <text:p>8640000</text:p>
          </table:table-cell>
          <table:table-cell table:formula="of:=[.B492]/[.C492]" office:value-type="float" office:value="0.00107974537037037" calcext:value-type="float">
            <text:p>0,00107974537037037000</text:p>
          </table:table-cell>
          <table:table-cell table:formula="of:=[.D493]-[.D492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2]+19" office:value-type="float" office:value="9348" calcext:value-type="float">
            <text:p>9348</text:p>
          </table:table-cell>
          <table:table-cell office:value-type="float" office:value="8640000" calcext:value-type="float">
            <text:p>8640000</text:p>
          </table:table-cell>
          <table:table-cell table:formula="of:=[.B493]/[.C493]" office:value-type="float" office:value="0.00108194444444444" calcext:value-type="float">
            <text:p>0,00108194444444444000</text:p>
          </table:table-cell>
          <table:table-cell table:formula="of:=[.D494]-[.D49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3]+19" office:value-type="float" office:value="9367" calcext:value-type="float">
            <text:p>9367</text:p>
          </table:table-cell>
          <table:table-cell office:value-type="float" office:value="8640000" calcext:value-type="float">
            <text:p>8640000</text:p>
          </table:table-cell>
          <table:table-cell table:formula="of:=[.B494]/[.C494]" office:value-type="float" office:value="0.00108414351851852" calcext:value-type="float">
            <text:p>0,00108414351851852000</text:p>
          </table:table-cell>
          <table:table-cell table:formula="of:=[.D495]-[.D494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4]+19" office:value-type="float" office:value="9386" calcext:value-type="float">
            <text:p>9386</text:p>
          </table:table-cell>
          <table:table-cell office:value-type="float" office:value="8640000" calcext:value-type="float">
            <text:p>8640000</text:p>
          </table:table-cell>
          <table:table-cell table:formula="of:=[.B495]/[.C495]" office:value-type="float" office:value="0.00108634259259259" calcext:value-type="float">
            <text:p>0,00108634259259259000</text:p>
          </table:table-cell>
          <table:table-cell table:formula="of:=[.D496]-[.D49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5]+19" office:value-type="float" office:value="9405" calcext:value-type="float">
            <text:p>9405</text:p>
          </table:table-cell>
          <table:table-cell office:value-type="float" office:value="8640000" calcext:value-type="float">
            <text:p>8640000</text:p>
          </table:table-cell>
          <table:table-cell table:formula="of:=[.B496]/[.C496]" office:value-type="float" office:value="0.00108854166666667" calcext:value-type="float">
            <text:p>0,00108854166666667000</text:p>
          </table:table-cell>
          <table:table-cell table:formula="of:=[.D497]-[.D496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6]+19" office:value-type="float" office:value="9424" calcext:value-type="float">
            <text:p>9424</text:p>
          </table:table-cell>
          <table:table-cell office:value-type="float" office:value="8640000" calcext:value-type="float">
            <text:p>8640000</text:p>
          </table:table-cell>
          <table:table-cell table:formula="of:=[.B497]/[.C497]" office:value-type="float" office:value="0.00109074074074074" calcext:value-type="float">
            <text:p>0,00109074074074074000</text:p>
          </table:table-cell>
          <table:table-cell table:formula="of:=[.D498]-[.D49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497]+19" office:value-type="float" office:value="9443" calcext:value-type="float">
            <text:p>9443</text:p>
          </table:table-cell>
          <table:table-cell office:value-type="float" office:value="8640000" calcext:value-type="float">
            <text:p>8640000</text:p>
          </table:table-cell>
          <table:table-cell table:formula="of:=[.B498]/[.C498]" office:value-type="float" office:value="0.00109293981481481" calcext:value-type="float">
            <text:p>0,00109293981481481000</text:p>
          </table:table-cell>
          <table:table-cell table:formula="of:=[.D499]-[.D49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498]+19" office:value-type="float" office:value="9462" calcext:value-type="float">
            <text:p>9462</text:p>
          </table:table-cell>
          <table:table-cell office:value-type="float" office:value="8640000" calcext:value-type="float">
            <text:p>8640000</text:p>
          </table:table-cell>
          <table:table-cell table:formula="of:=[.B499]/[.C499]" office:value-type="float" office:value="0.00109513888888889" calcext:value-type="float">
            <text:p>0,00109513888888889000</text:p>
          </table:table-cell>
          <table:table-cell table:formula="of:=[.D500]-[.D499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499]+19" office:value-type="float" office:value="9481" calcext:value-type="float">
            <text:p>9481</text:p>
          </table:table-cell>
          <table:table-cell office:value-type="float" office:value="8640000" calcext:value-type="float">
            <text:p>8640000</text:p>
          </table:table-cell>
          <table:table-cell table:formula="of:=[.B500]/[.C500]" office:value-type="float" office:value="0.00109733796296296" calcext:value-type="float">
            <text:p>0,00109733796296296000</text:p>
          </table:table-cell>
          <table:table-cell table:formula="of:=[.D501]-[.D50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0]+19" office:value-type="float" office:value="9500" calcext:value-type="float">
            <text:p>9500</text:p>
          </table:table-cell>
          <table:table-cell office:value-type="float" office:value="8640000" calcext:value-type="float">
            <text:p>8640000</text:p>
          </table:table-cell>
          <table:table-cell table:formula="of:=[.B501]/[.C501]" office:value-type="float" office:value="0.00109953703703704" calcext:value-type="float">
            <text:p>0,00109953703703704000</text:p>
          </table:table-cell>
          <table:table-cell table:formula="of:=[.D502]-[.D501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501]+19" office:value-type="float" office:value="9519" calcext:value-type="float">
            <text:p>9519</text:p>
          </table:table-cell>
          <table:table-cell office:value-type="float" office:value="8640000" calcext:value-type="float">
            <text:p>8640000</text:p>
          </table:table-cell>
          <table:table-cell table:formula="of:=[.B502]/[.C502]" office:value-type="float" office:value="0.00110173611111111" calcext:value-type="float">
            <text:p>0,00110173611111111000</text:p>
          </table:table-cell>
          <table:table-cell table:formula="of:=[.D503]-[.D50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502]+19" office:value-type="float" office:value="9538" calcext:value-type="float">
            <text:p>9538</text:p>
          </table:table-cell>
          <table:table-cell office:value-type="float" office:value="8640000" calcext:value-type="float">
            <text:p>8640000</text:p>
          </table:table-cell>
          <table:table-cell table:formula="of:=[.B503]/[.C503]" office:value-type="float" office:value="0.00110393518518519" calcext:value-type="float">
            <text:p>0,00110393518518519000</text:p>
          </table:table-cell>
          <table:table-cell table:formula="of:=[.D504]-[.D503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503]+19" office:value-type="float" office:value="9557" calcext:value-type="float">
            <text:p>9557</text:p>
          </table:table-cell>
          <table:table-cell office:value-type="float" office:value="8640000" calcext:value-type="float">
            <text:p>8640000</text:p>
          </table:table-cell>
          <table:table-cell table:formula="of:=[.B504]/[.C504]" office:value-type="float" office:value="0.00110613425925926" calcext:value-type="float">
            <text:p>0,00110613425925926000</text:p>
          </table:table-cell>
          <table:table-cell table:formula="of:=[.D505]-[.D50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504]+19" office:value-type="float" office:value="9576" calcext:value-type="float">
            <text:p>9576</text:p>
          </table:table-cell>
          <table:table-cell office:value-type="float" office:value="8640000" calcext:value-type="float">
            <text:p>8640000</text:p>
          </table:table-cell>
          <table:table-cell table:formula="of:=[.B505]/[.C505]" office:value-type="float" office:value="0.00110833333333333" calcext:value-type="float">
            <text:p>0,00110833333333333000</text:p>
          </table:table-cell>
          <table:table-cell table:formula="of:=[.D506]-[.D505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505]+19" office:value-type="float" office:value="9595" calcext:value-type="float">
            <text:p>9595</text:p>
          </table:table-cell>
          <table:table-cell office:value-type="float" office:value="8640000" calcext:value-type="float">
            <text:p>8640000</text:p>
          </table:table-cell>
          <table:table-cell table:formula="of:=[.B506]/[.C506]" office:value-type="float" office:value="0.00111053240740741" calcext:value-type="float">
            <text:p>0,00111053240740741000</text:p>
          </table:table-cell>
          <table:table-cell table:formula="of:=[.D507]-[.D50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506]+19" office:value-type="float" office:value="9614" calcext:value-type="float">
            <text:p>9614</text:p>
          </table:table-cell>
          <table:table-cell office:value-type="float" office:value="8640000" calcext:value-type="float">
            <text:p>8640000</text:p>
          </table:table-cell>
          <table:table-cell table:formula="of:=[.B507]/[.C507]" office:value-type="float" office:value="0.00111273148148148" calcext:value-type="float">
            <text:p>0,00111273148148148000</text:p>
          </table:table-cell>
          <table:table-cell table:formula="of:=[.D508]-[.D50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07]+19" office:value-type="float" office:value="9633" calcext:value-type="float">
            <text:p>9633</text:p>
          </table:table-cell>
          <table:table-cell office:value-type="float" office:value="8640000" calcext:value-type="float">
            <text:p>8640000</text:p>
          </table:table-cell>
          <table:table-cell table:formula="of:=[.B508]/[.C508]" office:value-type="float" office:value="0.00111493055555556" calcext:value-type="float">
            <text:p>0,00111493055555556000</text:p>
          </table:table-cell>
          <table:table-cell table:formula="of:=[.D509]-[.D508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508]+19" office:value-type="float" office:value="9652" calcext:value-type="float">
            <text:p>9652</text:p>
          </table:table-cell>
          <table:table-cell office:value-type="float" office:value="8640000" calcext:value-type="float">
            <text:p>8640000</text:p>
          </table:table-cell>
          <table:table-cell table:formula="of:=[.B509]/[.C509]" office:value-type="float" office:value="0.00111712962962963" calcext:value-type="float">
            <text:p>0,00111712962962963000</text:p>
          </table:table-cell>
          <table:table-cell table:formula="of:=[.D510]-[.D50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B509]+19" office:value-type="float" office:value="9671" calcext:value-type="float">
            <text:p>9671</text:p>
          </table:table-cell>
          <table:table-cell office:value-type="float" office:value="8640000" calcext:value-type="float">
            <text:p>8640000</text:p>
          </table:table-cell>
          <table:table-cell table:formula="of:=[.B510]/[.C510]" office:value-type="float" office:value="0.0011193287037037" calcext:value-type="float">
            <text:p>0,00111932870370370000</text:p>
          </table:table-cell>
          <table:table-cell table:formula="of:=[.D511]-[.D510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510]+19" office:value-type="float" office:value="9690" calcext:value-type="float">
            <text:p>9690</text:p>
          </table:table-cell>
          <table:table-cell office:value-type="float" office:value="8640000" calcext:value-type="float">
            <text:p>8640000</text:p>
          </table:table-cell>
          <table:table-cell table:formula="of:=[.B511]/[.C511]" office:value-type="float" office:value="0.00112152777777778" calcext:value-type="float">
            <text:p>0,00112152777777778000</text:p>
          </table:table-cell>
          <table:table-cell table:formula="of:=[.D512]-[.D51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B511]+19" office:value-type="float" office:value="9709" calcext:value-type="float">
            <text:p>9709</text:p>
          </table:table-cell>
          <table:table-cell office:value-type="float" office:value="8640000" calcext:value-type="float">
            <text:p>8640000</text:p>
          </table:table-cell>
          <table:table-cell table:formula="of:=[.B512]/[.C512]" office:value-type="float" office:value="0.00112372685185185" calcext:value-type="float">
            <text:p>0,00112372685185185000</text:p>
          </table:table-cell>
          <table:table-cell table:formula="of:=[.D513]-[.D512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512]+19" office:value-type="float" office:value="9728" calcext:value-type="float">
            <text:p>9728</text:p>
          </table:table-cell>
          <table:table-cell office:value-type="float" office:value="8640000" calcext:value-type="float">
            <text:p>8640000</text:p>
          </table:table-cell>
          <table:table-cell table:formula="of:=[.B513]/[.C513]" office:value-type="float" office:value="0.00112592592592593" calcext:value-type="float">
            <text:p>0,00112592592592593000</text:p>
          </table:table-cell>
          <table:table-cell table:formula="of:=[.D514]-[.D51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513]+19" office:value-type="float" office:value="9747" calcext:value-type="float">
            <text:p>9747</text:p>
          </table:table-cell>
          <table:table-cell office:value-type="float" office:value="8640000" calcext:value-type="float">
            <text:p>8640000</text:p>
          </table:table-cell>
          <table:table-cell table:formula="of:=[.B514]/[.C514]" office:value-type="float" office:value="0.001128125" calcext:value-type="float">
            <text:p>0,00112812500000000000</text:p>
          </table:table-cell>
          <table:table-cell table:formula="of:=[.D515]-[.D51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B514]+19" office:value-type="float" office:value="9766" calcext:value-type="float">
            <text:p>9766</text:p>
          </table:table-cell>
          <table:table-cell office:value-type="float" office:value="8640000" calcext:value-type="float">
            <text:p>8640000</text:p>
          </table:table-cell>
          <table:table-cell table:formula="of:=[.B515]/[.C515]" office:value-type="float" office:value="0.00113032407407407" calcext:value-type="float">
            <text:p>0,00113032407407407000</text:p>
          </table:table-cell>
          <table:table-cell table:formula="of:=[.D516]-[.D515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B515]+19" office:value-type="float" office:value="9785" calcext:value-type="float">
            <text:p>9785</text:p>
          </table:table-cell>
          <table:table-cell office:value-type="float" office:value="8640000" calcext:value-type="float">
            <text:p>8640000</text:p>
          </table:table-cell>
          <table:table-cell table:formula="of:=[.B516]/[.C516]" office:value-type="float" office:value="0.00113252314814815" calcext:value-type="float">
            <text:p>0,00113252314814815000</text:p>
          </table:table-cell>
          <table:table-cell table:formula="of:=[.D517]-[.D51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B516]+19" office:value-type="float" office:value="9804" calcext:value-type="float">
            <text:p>9804</text:p>
          </table:table-cell>
          <table:table-cell office:value-type="float" office:value="8640000" calcext:value-type="float">
            <text:p>8640000</text:p>
          </table:table-cell>
          <table:table-cell table:formula="of:=[.B517]/[.C517]" office:value-type="float" office:value="0.00113472222222222" calcext:value-type="float">
            <text:p>0,00113472222222222000</text:p>
          </table:table-cell>
          <table:table-cell table:formula="of:=[.D518]-[.D517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B517]+19" office:value-type="float" office:value="9823" calcext:value-type="float">
            <text:p>9823</text:p>
          </table:table-cell>
          <table:table-cell office:value-type="float" office:value="8640000" calcext:value-type="float">
            <text:p>8640000</text:p>
          </table:table-cell>
          <table:table-cell table:formula="of:=[.B518]/[.C518]" office:value-type="float" office:value="0.0011369212962963" calcext:value-type="float">
            <text:p>0,00113692129629630000</text:p>
          </table:table-cell>
          <table:table-cell table:formula="of:=[.D519]-[.D51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B518]+19" office:value-type="float" office:value="9842" calcext:value-type="float">
            <text:p>9842</text:p>
          </table:table-cell>
          <table:table-cell office:value-type="float" office:value="8640000" calcext:value-type="float">
            <text:p>8640000</text:p>
          </table:table-cell>
          <table:table-cell table:formula="of:=[.B519]/[.C519]" office:value-type="float" office:value="0.00113912037037037" calcext:value-type="float">
            <text:p>0,00113912037037037000</text:p>
          </table:table-cell>
          <table:table-cell table:formula="of:=[.D520]-[.D519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B519]+19" office:value-type="float" office:value="9861" calcext:value-type="float">
            <text:p>9861</text:p>
          </table:table-cell>
          <table:table-cell office:value-type="float" office:value="8640000" calcext:value-type="float">
            <text:p>8640000</text:p>
          </table:table-cell>
          <table:table-cell table:formula="of:=[.B520]/[.C520]" office:value-type="float" office:value="0.00114131944444444" calcext:value-type="float">
            <text:p>0,00114131944444444000</text:p>
          </table:table-cell>
          <table:table-cell table:formula="of:=[.D521]-[.D52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520]+19" office:value-type="float" office:value="9880" calcext:value-type="float">
            <text:p>9880</text:p>
          </table:table-cell>
          <table:table-cell office:value-type="float" office:value="8640000" calcext:value-type="float">
            <text:p>8640000</text:p>
          </table:table-cell>
          <table:table-cell table:formula="of:=[.B521]/[.C521]" office:value-type="float" office:value="0.00114351851851852" calcext:value-type="float">
            <text:p>0,00114351851851852000</text:p>
          </table:table-cell>
          <table:table-cell table:formula="of:=[.D522]-[.D521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521]+19" office:value-type="float" office:value="9899" calcext:value-type="float">
            <text:p>9899</text:p>
          </table:table-cell>
          <table:table-cell office:value-type="float" office:value="8640000" calcext:value-type="float">
            <text:p>8640000</text:p>
          </table:table-cell>
          <table:table-cell table:formula="of:=[.B522]/[.C522]" office:value-type="float" office:value="0.00114571759259259" calcext:value-type="float">
            <text:p>0,00114571759259259000</text:p>
          </table:table-cell>
          <table:table-cell table:formula="of:=[.D523]-[.D52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B522]+19" office:value-type="float" office:value="9918" calcext:value-type="float">
            <text:p>9918</text:p>
          </table:table-cell>
          <table:table-cell office:value-type="float" office:value="8640000" calcext:value-type="float">
            <text:p>8640000</text:p>
          </table:table-cell>
          <table:table-cell table:formula="of:=[.B523]/[.C523]" office:value-type="float" office:value="0.00114791666666667" calcext:value-type="float">
            <text:p>0,00114791666666667000</text:p>
          </table:table-cell>
          <table:table-cell table:formula="of:=[.D524]-[.D52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523]+19" office:value-type="float" office:value="9937" calcext:value-type="float">
            <text:p>9937</text:p>
          </table:table-cell>
          <table:table-cell office:value-type="float" office:value="8640000" calcext:value-type="float">
            <text:p>8640000</text:p>
          </table:table-cell>
          <table:table-cell table:formula="of:=[.B524]/[.C524]" office:value-type="float" office:value="0.00115011574074074" calcext:value-type="float">
            <text:p>0,00115011574074074000</text:p>
          </table:table-cell>
          <table:table-cell table:formula="of:=[.D525]-[.D524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B524]+19" office:value-type="float" office:value="9956" calcext:value-type="float">
            <text:p>9956</text:p>
          </table:table-cell>
          <table:table-cell office:value-type="float" office:value="8640000" calcext:value-type="float">
            <text:p>8640000</text:p>
          </table:table-cell>
          <table:table-cell table:formula="of:=[.B525]/[.C525]" office:value-type="float" office:value="0.00115231481481481" calcext:value-type="float">
            <text:p>0,00115231481481481000</text:p>
          </table:table-cell>
          <table:table-cell table:formula="of:=[.D526]-[.D52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B525]+19" office:value-type="float" office:value="9975" calcext:value-type="float">
            <text:p>9975</text:p>
          </table:table-cell>
          <table:table-cell office:value-type="float" office:value="8640000" calcext:value-type="float">
            <text:p>8640000</text:p>
          </table:table-cell>
          <table:table-cell table:formula="of:=[.B526]/[.C526]" office:value-type="float" office:value="0.00115451388888889" calcext:value-type="float">
            <text:p>0,00115451388888889000</text:p>
          </table:table-cell>
          <table:table-cell table:formula="of:=[.D527]-[.D526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B526]+19" office:value-type="float" office:value="9994" calcext:value-type="float">
            <text:p>9994</text:p>
          </table:table-cell>
          <table:table-cell office:value-type="float" office:value="8640000" calcext:value-type="float">
            <text:p>8640000</text:p>
          </table:table-cell>
          <table:table-cell table:formula="of:=[.B527]/[.C527]" office:value-type="float" office:value="0.00115671296296296" calcext:value-type="float">
            <text:p>0,00115671296296296000</text:p>
          </table:table-cell>
          <table:table-cell table:formula="of:=[.D528]-[.D52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B527]+19" office:value-type="float" office:value="10013" calcext:value-type="float">
            <text:p>10013</text:p>
          </table:table-cell>
          <table:table-cell office:value-type="float" office:value="8640000" calcext:value-type="float">
            <text:p>8640000</text:p>
          </table:table-cell>
          <table:table-cell table:formula="of:=[.B528]/[.C528]" office:value-type="float" office:value="0.00115891203703704" calcext:value-type="float">
            <text:p>0,00115891203703704000</text:p>
          </table:table-cell>
          <table:table-cell table:formula="of:=[.D529]-[.D528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528]+19" office:value-type="float" office:value="10032" calcext:value-type="float">
            <text:p>10032</text:p>
          </table:table-cell>
          <table:table-cell office:value-type="float" office:value="8640000" calcext:value-type="float">
            <text:p>8640000</text:p>
          </table:table-cell>
          <table:table-cell table:formula="of:=[.B529]/[.C529]" office:value-type="float" office:value="0.00116111111111111" calcext:value-type="float">
            <text:p>0,00116111111111111000</text:p>
          </table:table-cell>
          <table:table-cell table:formula="of:=[.D530]-[.D52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B529]+19" office:value-type="float" office:value="10051" calcext:value-type="float">
            <text:p>10051</text:p>
          </table:table-cell>
          <table:table-cell office:value-type="float" office:value="8640000" calcext:value-type="float">
            <text:p>8640000</text:p>
          </table:table-cell>
          <table:table-cell table:formula="of:=[.B530]/[.C530]" office:value-type="float" office:value="0.00116331018518519" calcext:value-type="float">
            <text:p>0,00116331018518519000</text:p>
          </table:table-cell>
          <table:table-cell table:formula="of:=[.D531]-[.D53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530]+19" office:value-type="float" office:value="10070" calcext:value-type="float">
            <text:p>10070</text:p>
          </table:table-cell>
          <table:table-cell office:value-type="float" office:value="8640000" calcext:value-type="float">
            <text:p>8640000</text:p>
          </table:table-cell>
          <table:table-cell table:formula="of:=[.B531]/[.C531]" office:value-type="float" office:value="0.00116550925925926" calcext:value-type="float">
            <text:p>0,00116550925925926000</text:p>
          </table:table-cell>
          <table:table-cell table:formula="of:=[.D532]-[.D531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B531]+19" office:value-type="float" office:value="10089" calcext:value-type="float">
            <text:p>10089</text:p>
          </table:table-cell>
          <table:table-cell office:value-type="float" office:value="8640000" calcext:value-type="float">
            <text:p>8640000</text:p>
          </table:table-cell>
          <table:table-cell table:formula="of:=[.B532]/[.C532]" office:value-type="float" office:value="0.00116770833333333" calcext:value-type="float">
            <text:p>0,00116770833333333000</text:p>
          </table:table-cell>
          <table:table-cell table:formula="of:=[.D533]-[.D53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B532]+19" office:value-type="float" office:value="10108" calcext:value-type="float">
            <text:p>10108</text:p>
          </table:table-cell>
          <table:table-cell office:value-type="float" office:value="8640000" calcext:value-type="float">
            <text:p>8640000</text:p>
          </table:table-cell>
          <table:table-cell table:formula="of:=[.B533]/[.C533]" office:value-type="float" office:value="0.00116990740740741" calcext:value-type="float">
            <text:p>0,00116990740740741000</text:p>
          </table:table-cell>
          <table:table-cell table:formula="of:=[.D534]-[.D533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533]+19" office:value-type="float" office:value="10127" calcext:value-type="float">
            <text:p>10127</text:p>
          </table:table-cell>
          <table:table-cell office:value-type="float" office:value="8640000" calcext:value-type="float">
            <text:p>8640000</text:p>
          </table:table-cell>
          <table:table-cell table:formula="of:=[.B534]/[.C534]" office:value-type="float" office:value="0.00117210648148148" calcext:value-type="float">
            <text:p>0,00117210648148148000</text:p>
          </table:table-cell>
          <table:table-cell table:formula="of:=[.D535]-[.D53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B534]+19" office:value-type="float" office:value="10146" calcext:value-type="float">
            <text:p>10146</text:p>
          </table:table-cell>
          <table:table-cell office:value-type="float" office:value="8640000" calcext:value-type="float">
            <text:p>8640000</text:p>
          </table:table-cell>
          <table:table-cell table:formula="of:=[.B535]/[.C535]" office:value-type="float" office:value="0.00117430555555556" calcext:value-type="float">
            <text:p>0,00117430555555556000</text:p>
          </table:table-cell>
          <table:table-cell table:formula="of:=[.D536]-[.D535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B535]+19" office:value-type="float" office:value="10165" calcext:value-type="float">
            <text:p>10165</text:p>
          </table:table-cell>
          <table:table-cell office:value-type="float" office:value="8640000" calcext:value-type="float">
            <text:p>8640000</text:p>
          </table:table-cell>
          <table:table-cell table:formula="of:=[.B536]/[.C536]" office:value-type="float" office:value="0.00117650462962963" calcext:value-type="float">
            <text:p>0,00117650462962963000</text:p>
          </table:table-cell>
          <table:table-cell table:formula="of:=[.D537]-[.D53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B536]+19" office:value-type="float" office:value="10184" calcext:value-type="float">
            <text:p>10184</text:p>
          </table:table-cell>
          <table:table-cell office:value-type="float" office:value="8640000" calcext:value-type="float">
            <text:p>8640000</text:p>
          </table:table-cell>
          <table:table-cell table:formula="of:=[.B537]/[.C537]" office:value-type="float" office:value="0.0011787037037037" calcext:value-type="float">
            <text:p>0,00117870370370370000</text:p>
          </table:table-cell>
          <table:table-cell table:formula="of:=[.D538]-[.D537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B537]+19" office:value-type="float" office:value="10203" calcext:value-type="float">
            <text:p>10203</text:p>
          </table:table-cell>
          <table:table-cell office:value-type="float" office:value="8640000" calcext:value-type="float">
            <text:p>8640000</text:p>
          </table:table-cell>
          <table:table-cell table:formula="of:=[.B538]/[.C538]" office:value-type="float" office:value="0.00118090277777778" calcext:value-type="float">
            <text:p>0,00118090277777778000</text:p>
          </table:table-cell>
          <table:table-cell table:formula="of:=[.D539]-[.D53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B538]+19" office:value-type="float" office:value="10222" calcext:value-type="float">
            <text:p>10222</text:p>
          </table:table-cell>
          <table:table-cell office:value-type="float" office:value="8640000" calcext:value-type="float">
            <text:p>8640000</text:p>
          </table:table-cell>
          <table:table-cell table:formula="of:=[.B539]/[.C539]" office:value-type="float" office:value="0.00118310185185185" calcext:value-type="float">
            <text:p>0,00118310185185185000</text:p>
          </table:table-cell>
          <table:table-cell table:formula="of:=[.D540]-[.D53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539]+19" office:value-type="float" office:value="10241" calcext:value-type="float">
            <text:p>10241</text:p>
          </table:table-cell>
          <table:table-cell office:value-type="float" office:value="8640000" calcext:value-type="float">
            <text:p>8640000</text:p>
          </table:table-cell>
          <table:table-cell table:formula="of:=[.B540]/[.C540]" office:value-type="float" office:value="0.00118530092592593" calcext:value-type="float">
            <text:p>0,00118530092592593000</text:p>
          </table:table-cell>
          <table:table-cell table:formula="of:=[.D541]-[.D540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B540]+19" office:value-type="float" office:value="10260" calcext:value-type="float">
            <text:p>10260</text:p>
          </table:table-cell>
          <table:table-cell office:value-type="float" office:value="8640000" calcext:value-type="float">
            <text:p>8640000</text:p>
          </table:table-cell>
          <table:table-cell table:formula="of:=[.B541]/[.C541]" office:value-type="float" office:value="0.0011875" calcext:value-type="float">
            <text:p>0,00118750000000000000</text:p>
          </table:table-cell>
          <table:table-cell table:formula="of:=[.D542]-[.D54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B541]+19" office:value-type="float" office:value="10279" calcext:value-type="float">
            <text:p>10279</text:p>
          </table:table-cell>
          <table:table-cell office:value-type="float" office:value="8640000" calcext:value-type="float">
            <text:p>8640000</text:p>
          </table:table-cell>
          <table:table-cell table:formula="of:=[.B542]/[.C542]" office:value-type="float" office:value="0.00118969907407407" calcext:value-type="float">
            <text:p>0,00118969907407407000</text:p>
          </table:table-cell>
          <table:table-cell table:formula="of:=[.D543]-[.D542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B542]+19" office:value-type="float" office:value="10298" calcext:value-type="float">
            <text:p>10298</text:p>
          </table:table-cell>
          <table:table-cell office:value-type="float" office:value="8640000" calcext:value-type="float">
            <text:p>8640000</text:p>
          </table:table-cell>
          <table:table-cell table:formula="of:=[.B543]/[.C543]" office:value-type="float" office:value="0.00119189814814815" calcext:value-type="float">
            <text:p>0,00119189814814815000</text:p>
          </table:table-cell>
          <table:table-cell table:formula="of:=[.D544]-[.D54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543]+19" office:value-type="float" office:value="10317" calcext:value-type="float">
            <text:p>10317</text:p>
          </table:table-cell>
          <table:table-cell office:value-type="float" office:value="8640000" calcext:value-type="float">
            <text:p>8640000</text:p>
          </table:table-cell>
          <table:table-cell table:formula="of:=[.B544]/[.C544]" office:value-type="float" office:value="0.00119409722222222" calcext:value-type="float">
            <text:p>0,00119409722222222000</text:p>
          </table:table-cell>
          <table:table-cell table:formula="of:=[.D545]-[.D544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B544]+19" office:value-type="float" office:value="10336" calcext:value-type="float">
            <text:p>10336</text:p>
          </table:table-cell>
          <table:table-cell office:value-type="float" office:value="8640000" calcext:value-type="float">
            <text:p>8640000</text:p>
          </table:table-cell>
          <table:table-cell table:formula="of:=[.B545]/[.C545]" office:value-type="float" office:value="0.0011962962962963" calcext:value-type="float">
            <text:p>0,00119629629629630000</text:p>
          </table:table-cell>
          <table:table-cell table:formula="of:=[.D546]-[.D54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B545]+19" office:value-type="float" office:value="10355" calcext:value-type="float">
            <text:p>10355</text:p>
          </table:table-cell>
          <table:table-cell office:value-type="float" office:value="8640000" calcext:value-type="float">
            <text:p>8640000</text:p>
          </table:table-cell>
          <table:table-cell table:formula="of:=[.B546]/[.C546]" office:value-type="float" office:value="0.00119849537037037" calcext:value-type="float">
            <text:p>0,00119849537037037000</text:p>
          </table:table-cell>
          <table:table-cell table:formula="of:=[.D547]-[.D54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B546]+19" office:value-type="float" office:value="10374" calcext:value-type="float">
            <text:p>10374</text:p>
          </table:table-cell>
          <table:table-cell office:value-type="float" office:value="8640000" calcext:value-type="float">
            <text:p>8640000</text:p>
          </table:table-cell>
          <table:table-cell table:formula="of:=[.B547]/[.C547]" office:value-type="float" office:value="0.00120069444444444" calcext:value-type="float">
            <text:p>0,00120069444444444000</text:p>
          </table:table-cell>
          <table:table-cell table:formula="of:=[.D548]-[.D547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B547]+19" office:value-type="float" office:value="10393" calcext:value-type="float">
            <text:p>10393</text:p>
          </table:table-cell>
          <table:table-cell office:value-type="float" office:value="8640000" calcext:value-type="float">
            <text:p>8640000</text:p>
          </table:table-cell>
          <table:table-cell table:formula="of:=[.B548]/[.C548]" office:value-type="float" office:value="0.00120289351851852" calcext:value-type="float">
            <text:p>0,00120289351851852000</text:p>
          </table:table-cell>
          <table:table-cell table:formula="of:=[.D549]-[.D54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B548]+19" office:value-type="float" office:value="10412" calcext:value-type="float">
            <text:p>10412</text:p>
          </table:table-cell>
          <table:table-cell office:value-type="float" office:value="8640000" calcext:value-type="float">
            <text:p>8640000</text:p>
          </table:table-cell>
          <table:table-cell table:formula="of:=[.B549]/[.C549]" office:value-type="float" office:value="0.00120509259259259" calcext:value-type="float">
            <text:p>0,00120509259259259000</text:p>
          </table:table-cell>
          <table:table-cell table:formula="of:=[.D550]-[.D549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B549]+19" office:value-type="float" office:value="10431" calcext:value-type="float">
            <text:p>10431</text:p>
          </table:table-cell>
          <table:table-cell office:value-type="float" office:value="8640000" calcext:value-type="float">
            <text:p>8640000</text:p>
          </table:table-cell>
          <table:table-cell table:formula="of:=[.B550]/[.C550]" office:value-type="float" office:value="0.00120729166666667" calcext:value-type="float">
            <text:p>0,00120729166666667000</text:p>
          </table:table-cell>
          <table:table-cell table:formula="of:=[.D551]-[.D55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550]+19" office:value-type="float" office:value="10450" calcext:value-type="float">
            <text:p>10450</text:p>
          </table:table-cell>
          <table:table-cell office:value-type="float" office:value="8640000" calcext:value-type="float">
            <text:p>8640000</text:p>
          </table:table-cell>
          <table:table-cell table:formula="of:=[.B551]/[.C551]" office:value-type="float" office:value="0.00120949074074074" calcext:value-type="float">
            <text:p>0,00120949074074074000</text:p>
          </table:table-cell>
          <table:table-cell table:formula="of:=[.D552]-[.D551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B551]+19" office:value-type="float" office:value="10469" calcext:value-type="float">
            <text:p>10469</text:p>
          </table:table-cell>
          <table:table-cell office:value-type="float" office:value="8640000" calcext:value-type="float">
            <text:p>8640000</text:p>
          </table:table-cell>
          <table:table-cell table:formula="of:=[.B552]/[.C552]" office:value-type="float" office:value="0.00121168981481481" calcext:value-type="float">
            <text:p>0,00121168981481481000</text:p>
          </table:table-cell>
          <table:table-cell table:formula="of:=[.D553]-[.D55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B552]+19" office:value-type="float" office:value="10488" calcext:value-type="float">
            <text:p>10488</text:p>
          </table:table-cell>
          <table:table-cell office:value-type="float" office:value="8640000" calcext:value-type="float">
            <text:p>8640000</text:p>
          </table:table-cell>
          <table:table-cell table:formula="of:=[.B553]/[.C553]" office:value-type="float" office:value="0.00121388888888889" calcext:value-type="float">
            <text:p>0,00121388888888889000</text:p>
          </table:table-cell>
          <table:table-cell table:formula="of:=[.D554]-[.D553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B553]+19" office:value-type="float" office:value="10507" calcext:value-type="float">
            <text:p>10507</text:p>
          </table:table-cell>
          <table:table-cell office:value-type="float" office:value="8640000" calcext:value-type="float">
            <text:p>8640000</text:p>
          </table:table-cell>
          <table:table-cell table:formula="of:=[.B554]/[.C554]" office:value-type="float" office:value="0.00121608796296296" calcext:value-type="float">
            <text:p>0,00121608796296296000</text:p>
          </table:table-cell>
          <table:table-cell table:formula="of:=[.D555]-[.D55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B554]+19" office:value-type="float" office:value="10526" calcext:value-type="float">
            <text:p>10526</text:p>
          </table:table-cell>
          <table:table-cell office:value-type="float" office:value="8640000" calcext:value-type="float">
            <text:p>8640000</text:p>
          </table:table-cell>
          <table:table-cell table:formula="of:=[.B555]/[.C555]" office:value-type="float" office:value="0.00121828703703704" calcext:value-type="float">
            <text:p>0,00121828703703704000</text:p>
          </table:table-cell>
          <table:table-cell table:formula="of:=[.D556]-[.D55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B555]+19" office:value-type="float" office:value="10545" calcext:value-type="float">
            <text:p>10545</text:p>
          </table:table-cell>
          <table:table-cell office:value-type="float" office:value="8640000" calcext:value-type="float">
            <text:p>8640000</text:p>
          </table:table-cell>
          <table:table-cell table:formula="of:=[.B556]/[.C556]" office:value-type="float" office:value="0.00122048611111111" calcext:value-type="float">
            <text:p>0,00122048611111111000</text:p>
          </table:table-cell>
          <table:table-cell table:formula="of:=[.D557]-[.D556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B556]+19" office:value-type="float" office:value="10564" calcext:value-type="float">
            <text:p>10564</text:p>
          </table:table-cell>
          <table:table-cell office:value-type="float" office:value="8640000" calcext:value-type="float">
            <text:p>8640000</text:p>
          </table:table-cell>
          <table:table-cell table:formula="of:=[.B557]/[.C557]" office:value-type="float" office:value="0.00122268518518519" calcext:value-type="float">
            <text:p>0,00122268518518519000</text:p>
          </table:table-cell>
          <table:table-cell table:formula="of:=[.D558]-[.D55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B557]+19" office:value-type="float" office:value="10583" calcext:value-type="float">
            <text:p>10583</text:p>
          </table:table-cell>
          <table:table-cell office:value-type="float" office:value="8640000" calcext:value-type="float">
            <text:p>8640000</text:p>
          </table:table-cell>
          <table:table-cell table:formula="of:=[.B558]/[.C558]" office:value-type="float" office:value="0.00122488425925926" calcext:value-type="float">
            <text:p>0,00122488425925926000</text:p>
          </table:table-cell>
          <table:table-cell table:formula="of:=[.D559]-[.D558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B558]+19" office:value-type="float" office:value="10602" calcext:value-type="float">
            <text:p>10602</text:p>
          </table:table-cell>
          <table:table-cell office:value-type="float" office:value="8640000" calcext:value-type="float">
            <text:p>8640000</text:p>
          </table:table-cell>
          <table:table-cell table:formula="of:=[.B559]/[.C559]" office:value-type="float" office:value="0.00122708333333333" calcext:value-type="float">
            <text:p>0,00122708333333333000</text:p>
          </table:table-cell>
          <table:table-cell table:formula="of:=[.D560]-[.D55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B559]+19" office:value-type="float" office:value="10621" calcext:value-type="float">
            <text:p>10621</text:p>
          </table:table-cell>
          <table:table-cell office:value-type="float" office:value="8640000" calcext:value-type="float">
            <text:p>8640000</text:p>
          </table:table-cell>
          <table:table-cell table:formula="of:=[.B560]/[.C560]" office:value-type="float" office:value="0.00122928240740741" calcext:value-type="float">
            <text:p>0,00122928240740741000</text:p>
          </table:table-cell>
          <table:table-cell table:formula="of:=[.D561]-[.D560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B560]+19" office:value-type="float" office:value="10640" calcext:value-type="float">
            <text:p>10640</text:p>
          </table:table-cell>
          <table:table-cell office:value-type="float" office:value="8640000" calcext:value-type="float">
            <text:p>8640000</text:p>
          </table:table-cell>
          <table:table-cell table:formula="of:=[.B561]/[.C561]" office:value-type="float" office:value="0.00123148148148148" calcext:value-type="float">
            <text:p>0,00123148148148148000</text:p>
          </table:table-cell>
          <table:table-cell table:formula="of:=[.D562]-[.D56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B561]+19" office:value-type="float" office:value="10659" calcext:value-type="float">
            <text:p>10659</text:p>
          </table:table-cell>
          <table:table-cell office:value-type="float" office:value="8640000" calcext:value-type="float">
            <text:p>8640000</text:p>
          </table:table-cell>
          <table:table-cell table:formula="of:=[.B562]/[.C562]" office:value-type="float" office:value="0.00123368055555556" calcext:value-type="float">
            <text:p>0,00123368055555556000</text:p>
          </table:table-cell>
          <table:table-cell table:formula="of:=[.D563]-[.D562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B562]+19" office:value-type="float" office:value="10678" calcext:value-type="float">
            <text:p>10678</text:p>
          </table:table-cell>
          <table:table-cell office:value-type="float" office:value="8640000" calcext:value-type="float">
            <text:p>8640000</text:p>
          </table:table-cell>
          <table:table-cell table:formula="of:=[.B563]/[.C563]" office:value-type="float" office:value="0.00123587962962963" calcext:value-type="float">
            <text:p>0,00123587962962963000</text:p>
          </table:table-cell>
          <table:table-cell table:formula="of:=[.D564]-[.D56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B563]+19" office:value-type="float" office:value="10697" calcext:value-type="float">
            <text:p>10697</text:p>
          </table:table-cell>
          <table:table-cell office:value-type="float" office:value="8640000" calcext:value-type="float">
            <text:p>8640000</text:p>
          </table:table-cell>
          <table:table-cell table:formula="of:=[.B564]/[.C564]" office:value-type="float" office:value="0.0012380787037037" calcext:value-type="float">
            <text:p>0,00123807870370370000</text:p>
          </table:table-cell>
          <table:table-cell table:formula="of:=[.D565]-[.D56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B564]+19" office:value-type="float" office:value="10716" calcext:value-type="float">
            <text:p>10716</text:p>
          </table:table-cell>
          <table:table-cell office:value-type="float" office:value="8640000" calcext:value-type="float">
            <text:p>8640000</text:p>
          </table:table-cell>
          <table:table-cell table:formula="of:=[.B565]/[.C565]" office:value-type="float" office:value="0.00124027777777778" calcext:value-type="float">
            <text:p>0,00124027777777778000</text:p>
          </table:table-cell>
          <table:table-cell table:formula="of:=[.D566]-[.D565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B565]+19" office:value-type="float" office:value="10735" calcext:value-type="float">
            <text:p>10735</text:p>
          </table:table-cell>
          <table:table-cell office:value-type="float" office:value="8640000" calcext:value-type="float">
            <text:p>8640000</text:p>
          </table:table-cell>
          <table:table-cell table:formula="of:=[.B566]/[.C566]" office:value-type="float" office:value="0.00124247685185185" calcext:value-type="float">
            <text:p>0,00124247685185185000</text:p>
          </table:table-cell>
          <table:table-cell table:formula="of:=[.D567]-[.D56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B566]+19" office:value-type="float" office:value="10754" calcext:value-type="float">
            <text:p>10754</text:p>
          </table:table-cell>
          <table:table-cell office:value-type="float" office:value="8640000" calcext:value-type="float">
            <text:p>8640000</text:p>
          </table:table-cell>
          <table:table-cell table:formula="of:=[.B567]/[.C567]" office:value-type="float" office:value="0.00124467592592593" calcext:value-type="float">
            <text:p>0,00124467592592593000</text:p>
          </table:table-cell>
          <table:table-cell table:formula="of:=[.D568]-[.D567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B567]+19" office:value-type="float" office:value="10773" calcext:value-type="float">
            <text:p>10773</text:p>
          </table:table-cell>
          <table:table-cell office:value-type="float" office:value="8640000" calcext:value-type="float">
            <text:p>8640000</text:p>
          </table:table-cell>
          <table:table-cell table:formula="of:=[.B568]/[.C568]" office:value-type="float" office:value="0.001246875" calcext:value-type="float">
            <text:p>0,00124687500000000000</text:p>
          </table:table-cell>
          <table:table-cell table:formula="of:=[.D569]-[.D56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B568]+19" office:value-type="float" office:value="10792" calcext:value-type="float">
            <text:p>10792</text:p>
          </table:table-cell>
          <table:table-cell office:value-type="float" office:value="8640000" calcext:value-type="float">
            <text:p>8640000</text:p>
          </table:table-cell>
          <table:table-cell table:formula="of:=[.B569]/[.C569]" office:value-type="float" office:value="0.00124907407407407" calcext:value-type="float">
            <text:p>0,00124907407407407000</text:p>
          </table:table-cell>
          <table:table-cell table:formula="of:=[.D570]-[.D569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B569]+19" office:value-type="float" office:value="10811" calcext:value-type="float">
            <text:p>10811</text:p>
          </table:table-cell>
          <table:table-cell office:value-type="float" office:value="8640000" calcext:value-type="float">
            <text:p>8640000</text:p>
          </table:table-cell>
          <table:table-cell table:formula="of:=[.B570]/[.C570]" office:value-type="float" office:value="0.00125127314814815" calcext:value-type="float">
            <text:p>0,00125127314814815000</text:p>
          </table:table-cell>
          <table:table-cell table:formula="of:=[.D571]-[.D57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B570]+19" office:value-type="float" office:value="10830" calcext:value-type="float">
            <text:p>10830</text:p>
          </table:table-cell>
          <table:table-cell office:value-type="float" office:value="8640000" calcext:value-type="float">
            <text:p>8640000</text:p>
          </table:table-cell>
          <table:table-cell table:formula="of:=[.B571]/[.C571]" office:value-type="float" office:value="0.00125347222222222" calcext:value-type="float">
            <text:p>0,00125347222222222000</text:p>
          </table:table-cell>
          <table:table-cell table:formula="of:=[.D572]-[.D57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B571]+19" office:value-type="float" office:value="10849" calcext:value-type="float">
            <text:p>10849</text:p>
          </table:table-cell>
          <table:table-cell office:value-type="float" office:value="8640000" calcext:value-type="float">
            <text:p>8640000</text:p>
          </table:table-cell>
          <table:table-cell table:formula="of:=[.B572]/[.C572]" office:value-type="float" office:value="0.0012556712962963" calcext:value-type="float">
            <text:p>0,00125567129629630000</text:p>
          </table:table-cell>
          <table:table-cell table:formula="of:=[.D573]-[.D572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B572]+19" office:value-type="float" office:value="10868" calcext:value-type="float">
            <text:p>10868</text:p>
          </table:table-cell>
          <table:table-cell office:value-type="float" office:value="8640000" calcext:value-type="float">
            <text:p>8640000</text:p>
          </table:table-cell>
          <table:table-cell table:formula="of:=[.B573]/[.C573]" office:value-type="float" office:value="0.00125787037037037" calcext:value-type="float">
            <text:p>0,00125787037037037000</text:p>
          </table:table-cell>
          <table:table-cell table:formula="of:=[.D574]-[.D57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B573]+19" office:value-type="float" office:value="10887" calcext:value-type="float">
            <text:p>10887</text:p>
          </table:table-cell>
          <table:table-cell office:value-type="float" office:value="8640000" calcext:value-type="float">
            <text:p>8640000</text:p>
          </table:table-cell>
          <table:table-cell table:formula="of:=[.B574]/[.C574]" office:value-type="float" office:value="0.00126006944444444" calcext:value-type="float">
            <text:p>0,00126006944444444000</text:p>
          </table:table-cell>
          <table:table-cell table:formula="of:=[.D575]-[.D574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B574]+19" office:value-type="float" office:value="10906" calcext:value-type="float">
            <text:p>10906</text:p>
          </table:table-cell>
          <table:table-cell office:value-type="float" office:value="8640000" calcext:value-type="float">
            <text:p>8640000</text:p>
          </table:table-cell>
          <table:table-cell table:formula="of:=[.B575]/[.C575]" office:value-type="float" office:value="0.00126226851851852" calcext:value-type="float">
            <text:p>0,00126226851851852000</text:p>
          </table:table-cell>
          <table:table-cell table:formula="of:=[.D576]-[.D57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B575]+19" office:value-type="float" office:value="10925" calcext:value-type="float">
            <text:p>10925</text:p>
          </table:table-cell>
          <table:table-cell office:value-type="float" office:value="8640000" calcext:value-type="float">
            <text:p>8640000</text:p>
          </table:table-cell>
          <table:table-cell table:formula="of:=[.B576]/[.C576]" office:value-type="float" office:value="0.00126446759259259" calcext:value-type="float">
            <text:p>0,00126446759259259000</text:p>
          </table:table-cell>
          <table:table-cell table:formula="of:=[.D577]-[.D576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B576]+19" office:value-type="float" office:value="10944" calcext:value-type="float">
            <text:p>10944</text:p>
          </table:table-cell>
          <table:table-cell office:value-type="float" office:value="8640000" calcext:value-type="float">
            <text:p>8640000</text:p>
          </table:table-cell>
          <table:table-cell table:formula="of:=[.B577]/[.C577]" office:value-type="float" office:value="0.00126666666666667" calcext:value-type="float">
            <text:p>0,00126666666666667000</text:p>
          </table:table-cell>
          <table:table-cell table:formula="of:=[.D578]-[.D57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B577]+19" office:value-type="float" office:value="10963" calcext:value-type="float">
            <text:p>10963</text:p>
          </table:table-cell>
          <table:table-cell office:value-type="float" office:value="8640000" calcext:value-type="float">
            <text:p>8640000</text:p>
          </table:table-cell>
          <table:table-cell table:formula="of:=[.B578]/[.C578]" office:value-type="float" office:value="0.00126886574074074" calcext:value-type="float">
            <text:p>0,00126886574074074000</text:p>
          </table:table-cell>
          <table:table-cell table:formula="of:=[.D579]-[.D578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B578]+19" office:value-type="float" office:value="10982" calcext:value-type="float">
            <text:p>10982</text:p>
          </table:table-cell>
          <table:table-cell office:value-type="float" office:value="8640000" calcext:value-type="float">
            <text:p>8640000</text:p>
          </table:table-cell>
          <table:table-cell table:formula="of:=[.B579]/[.C579]" office:value-type="float" office:value="0.00127106481481481" calcext:value-type="float">
            <text:p>0,00127106481481481000</text:p>
          </table:table-cell>
          <table:table-cell table:formula="of:=[.D580]-[.D57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B579]+19" office:value-type="float" office:value="11001" calcext:value-type="float">
            <text:p>11001</text:p>
          </table:table-cell>
          <table:table-cell office:value-type="float" office:value="8640000" calcext:value-type="float">
            <text:p>8640000</text:p>
          </table:table-cell>
          <table:table-cell table:formula="of:=[.B580]/[.C580]" office:value-type="float" office:value="0.00127326388888889" calcext:value-type="float">
            <text:p>0,00127326388888889000</text:p>
          </table:table-cell>
          <table:table-cell table:formula="of:=[.D581]-[.D58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B580]+19" office:value-type="float" office:value="11020" calcext:value-type="float">
            <text:p>11020</text:p>
          </table:table-cell>
          <table:table-cell office:value-type="float" office:value="8640000" calcext:value-type="float">
            <text:p>8640000</text:p>
          </table:table-cell>
          <table:table-cell table:formula="of:=[.B581]/[.C581]" office:value-type="float" office:value="0.00127546296296296" calcext:value-type="float">
            <text:p>0,00127546296296296000</text:p>
          </table:table-cell>
          <table:table-cell table:formula="of:=[.D582]-[.D581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B581]+19" office:value-type="float" office:value="11039" calcext:value-type="float">
            <text:p>11039</text:p>
          </table:table-cell>
          <table:table-cell office:value-type="float" office:value="8640000" calcext:value-type="float">
            <text:p>8640000</text:p>
          </table:table-cell>
          <table:table-cell table:formula="of:=[.B582]/[.C582]" office:value-type="float" office:value="0.00127766203703704" calcext:value-type="float">
            <text:p>0,00127766203703704000</text:p>
          </table:table-cell>
          <table:table-cell table:formula="of:=[.D583]-[.D58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B582]+19" office:value-type="float" office:value="11058" calcext:value-type="float">
            <text:p>11058</text:p>
          </table:table-cell>
          <table:table-cell office:value-type="float" office:value="8640000" calcext:value-type="float">
            <text:p>8640000</text:p>
          </table:table-cell>
          <table:table-cell table:formula="of:=[.B583]/[.C583]" office:value-type="float" office:value="0.00127986111111111" calcext:value-type="float">
            <text:p>0,00127986111111111000</text:p>
          </table:table-cell>
          <table:table-cell table:formula="of:=[.D584]-[.D583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B583]+19" office:value-type="float" office:value="11077" calcext:value-type="float">
            <text:p>11077</text:p>
          </table:table-cell>
          <table:table-cell office:value-type="float" office:value="8640000" calcext:value-type="float">
            <text:p>8640000</text:p>
          </table:table-cell>
          <table:table-cell table:formula="of:=[.B584]/[.C584]" office:value-type="float" office:value="0.00128206018518519" calcext:value-type="float">
            <text:p>0,00128206018518519000</text:p>
          </table:table-cell>
          <table:table-cell table:formula="of:=[.D585]-[.D58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B584]+19" office:value-type="float" office:value="11096" calcext:value-type="float">
            <text:p>11096</text:p>
          </table:table-cell>
          <table:table-cell office:value-type="float" office:value="8640000" calcext:value-type="float">
            <text:p>8640000</text:p>
          </table:table-cell>
          <table:table-cell table:formula="of:=[.B585]/[.C585]" office:value-type="float" office:value="0.00128425925925926" calcext:value-type="float">
            <text:p>0,00128425925925926000</text:p>
          </table:table-cell>
          <table:table-cell table:formula="of:=[.D586]-[.D585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B585]+19" office:value-type="float" office:value="11115" calcext:value-type="float">
            <text:p>11115</text:p>
          </table:table-cell>
          <table:table-cell office:value-type="float" office:value="8640000" calcext:value-type="float">
            <text:p>8640000</text:p>
          </table:table-cell>
          <table:table-cell table:formula="of:=[.B586]/[.C586]" office:value-type="float" office:value="0.00128645833333333" calcext:value-type="float">
            <text:p>0,00128645833333333000</text:p>
          </table:table-cell>
          <table:table-cell table:formula="of:=[.D587]-[.D58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B586]+19" office:value-type="float" office:value="11134" calcext:value-type="float">
            <text:p>11134</text:p>
          </table:table-cell>
          <table:table-cell office:value-type="float" office:value="8640000" calcext:value-type="float">
            <text:p>8640000</text:p>
          </table:table-cell>
          <table:table-cell table:formula="of:=[.B587]/[.C587]" office:value-type="float" office:value="0.00128865740740741" calcext:value-type="float">
            <text:p>0,00128865740740741000</text:p>
          </table:table-cell>
          <table:table-cell table:formula="of:=[.D588]-[.D58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B587]+19" office:value-type="float" office:value="11153" calcext:value-type="float">
            <text:p>11153</text:p>
          </table:table-cell>
          <table:table-cell office:value-type="float" office:value="8640000" calcext:value-type="float">
            <text:p>8640000</text:p>
          </table:table-cell>
          <table:table-cell table:formula="of:=[.B588]/[.C588]" office:value-type="float" office:value="0.00129085648148148" calcext:value-type="float">
            <text:p>0,00129085648148148000</text:p>
          </table:table-cell>
          <table:table-cell table:formula="of:=[.D589]-[.D588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B588]+19" office:value-type="float" office:value="11172" calcext:value-type="float">
            <text:p>11172</text:p>
          </table:table-cell>
          <table:table-cell office:value-type="float" office:value="8640000" calcext:value-type="float">
            <text:p>8640000</text:p>
          </table:table-cell>
          <table:table-cell table:formula="of:=[.B589]/[.C589]" office:value-type="float" office:value="0.00129305555555556" calcext:value-type="float">
            <text:p>0,00129305555555556000</text:p>
          </table:table-cell>
          <table:table-cell table:formula="of:=[.D590]-[.D58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B589]+19" office:value-type="float" office:value="11191" calcext:value-type="float">
            <text:p>11191</text:p>
          </table:table-cell>
          <table:table-cell office:value-type="float" office:value="8640000" calcext:value-type="float">
            <text:p>8640000</text:p>
          </table:table-cell>
          <table:table-cell table:formula="of:=[.B590]/[.C590]" office:value-type="float" office:value="0.00129525462962963" calcext:value-type="float">
            <text:p>0,00129525462962963000</text:p>
          </table:table-cell>
          <table:table-cell table:formula="of:=[.D591]-[.D590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B590]+19" office:value-type="float" office:value="11210" calcext:value-type="float">
            <text:p>11210</text:p>
          </table:table-cell>
          <table:table-cell office:value-type="float" office:value="8640000" calcext:value-type="float">
            <text:p>8640000</text:p>
          </table:table-cell>
          <table:table-cell table:formula="of:=[.B591]/[.C591]" office:value-type="float" office:value="0.0012974537037037" calcext:value-type="float">
            <text:p>0,00129745370370370000</text:p>
          </table:table-cell>
          <table:table-cell table:formula="of:=[.D592]-[.D59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B591]+19" office:value-type="float" office:value="11229" calcext:value-type="float">
            <text:p>11229</text:p>
          </table:table-cell>
          <table:table-cell office:value-type="float" office:value="8640000" calcext:value-type="float">
            <text:p>8640000</text:p>
          </table:table-cell>
          <table:table-cell table:formula="of:=[.B592]/[.C592]" office:value-type="float" office:value="0.00129965277777778" calcext:value-type="float">
            <text:p>0,00129965277777778000</text:p>
          </table:table-cell>
          <table:table-cell table:formula="of:=[.D593]-[.D592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B592]+19" office:value-type="float" office:value="11248" calcext:value-type="float">
            <text:p>11248</text:p>
          </table:table-cell>
          <table:table-cell office:value-type="float" office:value="8640000" calcext:value-type="float">
            <text:p>8640000</text:p>
          </table:table-cell>
          <table:table-cell table:formula="of:=[.B593]/[.C593]" office:value-type="float" office:value="0.00130185185185185" calcext:value-type="float">
            <text:p>0,00130185185185185000</text:p>
          </table:table-cell>
          <table:table-cell table:formula="of:=[.D594]-[.D59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B593]+19" office:value-type="float" office:value="11267" calcext:value-type="float">
            <text:p>11267</text:p>
          </table:table-cell>
          <table:table-cell office:value-type="float" office:value="8640000" calcext:value-type="float">
            <text:p>8640000</text:p>
          </table:table-cell>
          <table:table-cell table:formula="of:=[.B594]/[.C594]" office:value-type="float" office:value="0.00130405092592593" calcext:value-type="float">
            <text:p>0,00130405092592593000</text:p>
          </table:table-cell>
          <table:table-cell table:formula="of:=[.D595]-[.D594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B594]+19" office:value-type="float" office:value="11286" calcext:value-type="float">
            <text:p>11286</text:p>
          </table:table-cell>
          <table:table-cell office:value-type="float" office:value="8640000" calcext:value-type="float">
            <text:p>8640000</text:p>
          </table:table-cell>
          <table:table-cell table:formula="of:=[.B595]/[.C595]" office:value-type="float" office:value="0.00130625" calcext:value-type="float">
            <text:p>0,00130625000000000000</text:p>
          </table:table-cell>
          <table:table-cell table:formula="of:=[.D596]-[.D59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B595]+19" office:value-type="float" office:value="11305" calcext:value-type="float">
            <text:p>11305</text:p>
          </table:table-cell>
          <table:table-cell office:value-type="float" office:value="8640000" calcext:value-type="float">
            <text:p>8640000</text:p>
          </table:table-cell>
          <table:table-cell table:formula="of:=[.B596]/[.C596]" office:value-type="float" office:value="0.00130844907407407" calcext:value-type="float">
            <text:p>0,00130844907407407000</text:p>
          </table:table-cell>
          <table:table-cell table:formula="of:=[.D597]-[.D59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B596]+19" office:value-type="float" office:value="11324" calcext:value-type="float">
            <text:p>11324</text:p>
          </table:table-cell>
          <table:table-cell office:value-type="float" office:value="8640000" calcext:value-type="float">
            <text:p>8640000</text:p>
          </table:table-cell>
          <table:table-cell table:formula="of:=[.B597]/[.C597]" office:value-type="float" office:value="0.00131064814814815" calcext:value-type="float">
            <text:p>0,00131064814814815000</text:p>
          </table:table-cell>
          <table:table-cell table:formula="of:=[.D598]-[.D597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B597]+19" office:value-type="float" office:value="11343" calcext:value-type="float">
            <text:p>11343</text:p>
          </table:table-cell>
          <table:table-cell office:value-type="float" office:value="8640000" calcext:value-type="float">
            <text:p>8640000</text:p>
          </table:table-cell>
          <table:table-cell table:formula="of:=[.B598]/[.C598]" office:value-type="float" office:value="0.00131284722222222" calcext:value-type="float">
            <text:p>0,00131284722222222000</text:p>
          </table:table-cell>
          <table:table-cell table:formula="of:=[.D599]-[.D59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B598]+19" office:value-type="float" office:value="11362" calcext:value-type="float">
            <text:p>11362</text:p>
          </table:table-cell>
          <table:table-cell office:value-type="float" office:value="8640000" calcext:value-type="float">
            <text:p>8640000</text:p>
          </table:table-cell>
          <table:table-cell table:formula="of:=[.B599]/[.C599]" office:value-type="float" office:value="0.0013150462962963" calcext:value-type="float">
            <text:p>0,00131504629629630000</text:p>
          </table:table-cell>
          <table:table-cell table:formula="of:=[.D600]-[.D599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B599]+19" office:value-type="float" office:value="11381" calcext:value-type="float">
            <text:p>11381</text:p>
          </table:table-cell>
          <table:table-cell office:value-type="float" office:value="8640000" calcext:value-type="float">
            <text:p>8640000</text:p>
          </table:table-cell>
          <table:table-cell table:formula="of:=[.B600]/[.C600]" office:value-type="float" office:value="0.00131724537037037" calcext:value-type="float">
            <text:p>0,00131724537037037000</text:p>
          </table:table-cell>
          <table:table-cell table:formula="of:=[.D601]-[.D60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B600]+19" office:value-type="float" office:value="11400" calcext:value-type="float">
            <text:p>11400</text:p>
          </table:table-cell>
          <table:table-cell office:value-type="float" office:value="8640000" calcext:value-type="float">
            <text:p>8640000</text:p>
          </table:table-cell>
          <table:table-cell table:formula="of:=[.B601]/[.C601]" office:value-type="float" office:value="0.00131944444444444" calcext:value-type="float">
            <text:p>0,00131944444444444000</text:p>
          </table:table-cell>
          <table:table-cell table:formula="of:=[.D602]-[.D601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B601]+19" office:value-type="float" office:value="11419" calcext:value-type="float">
            <text:p>11419</text:p>
          </table:table-cell>
          <table:table-cell office:value-type="float" office:value="8640000" calcext:value-type="float">
            <text:p>8640000</text:p>
          </table:table-cell>
          <table:table-cell table:formula="of:=[.B602]/[.C602]" office:value-type="float" office:value="0.00132164351851852" calcext:value-type="float">
            <text:p>0,00132164351851852000</text:p>
          </table:table-cell>
          <table:table-cell table:formula="of:=[.D603]-[.D60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B602]+19" office:value-type="float" office:value="11438" calcext:value-type="float">
            <text:p>11438</text:p>
          </table:table-cell>
          <table:table-cell office:value-type="float" office:value="8640000" calcext:value-type="float">
            <text:p>8640000</text:p>
          </table:table-cell>
          <table:table-cell table:formula="of:=[.B603]/[.C603]" office:value-type="float" office:value="0.00132384259259259" calcext:value-type="float">
            <text:p>0,00132384259259259000</text:p>
          </table:table-cell>
          <table:table-cell table:formula="of:=[.D604]-[.D60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B603]+19" office:value-type="float" office:value="11457" calcext:value-type="float">
            <text:p>11457</text:p>
          </table:table-cell>
          <table:table-cell office:value-type="float" office:value="8640000" calcext:value-type="float">
            <text:p>8640000</text:p>
          </table:table-cell>
          <table:table-cell table:formula="of:=[.B604]/[.C604]" office:value-type="float" office:value="0.00132604166666667" calcext:value-type="float">
            <text:p>0,00132604166666667000</text:p>
          </table:table-cell>
          <table:table-cell table:formula="of:=[.D605]-[.D604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B604]+19" office:value-type="float" office:value="11476" calcext:value-type="float">
            <text:p>11476</text:p>
          </table:table-cell>
          <table:table-cell office:value-type="float" office:value="8640000" calcext:value-type="float">
            <text:p>8640000</text:p>
          </table:table-cell>
          <table:table-cell table:formula="of:=[.B605]/[.C605]" office:value-type="float" office:value="0.00132824074074074" calcext:value-type="float">
            <text:p>0,00132824074074074000</text:p>
          </table:table-cell>
          <table:table-cell table:formula="of:=[.D606]-[.D60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B605]+19" office:value-type="float" office:value="11495" calcext:value-type="float">
            <text:p>11495</text:p>
          </table:table-cell>
          <table:table-cell office:value-type="float" office:value="8640000" calcext:value-type="float">
            <text:p>8640000</text:p>
          </table:table-cell>
          <table:table-cell table:formula="of:=[.B606]/[.C606]" office:value-type="float" office:value="0.00133043981481482" calcext:value-type="float">
            <text:p>0,00133043981481482000</text:p>
          </table:table-cell>
          <table:table-cell table:formula="of:=[.D607]-[.D606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B606]+19" office:value-type="float" office:value="11514" calcext:value-type="float">
            <text:p>11514</text:p>
          </table:table-cell>
          <table:table-cell office:value-type="float" office:value="8640000" calcext:value-type="float">
            <text:p>8640000</text:p>
          </table:table-cell>
          <table:table-cell table:formula="of:=[.B607]/[.C607]" office:value-type="float" office:value="0.00133263888888889" calcext:value-type="float">
            <text:p>0,00133263888888889000</text:p>
          </table:table-cell>
          <table:table-cell table:formula="of:=[.D608]-[.D60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B607]+19" office:value-type="float" office:value="11533" calcext:value-type="float">
            <text:p>11533</text:p>
          </table:table-cell>
          <table:table-cell office:value-type="float" office:value="8640000" calcext:value-type="float">
            <text:p>8640000</text:p>
          </table:table-cell>
          <table:table-cell table:formula="of:=[.B608]/[.C608]" office:value-type="float" office:value="0.00133483796296296" calcext:value-type="float">
            <text:p>0,00133483796296296000</text:p>
          </table:table-cell>
          <table:table-cell table:formula="of:=[.D609]-[.D608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B608]+19" office:value-type="float" office:value="11552" calcext:value-type="float">
            <text:p>11552</text:p>
          </table:table-cell>
          <table:table-cell office:value-type="float" office:value="8640000" calcext:value-type="float">
            <text:p>8640000</text:p>
          </table:table-cell>
          <table:table-cell table:formula="of:=[.B609]/[.C609]" office:value-type="float" office:value="0.00133703703703704" calcext:value-type="float">
            <text:p>0,00133703703703704000</text:p>
          </table:table-cell>
          <table:table-cell table:formula="of:=[.D610]-[.D60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B609]+19" office:value-type="float" office:value="11571" calcext:value-type="float">
            <text:p>11571</text:p>
          </table:table-cell>
          <table:table-cell office:value-type="float" office:value="8640000" calcext:value-type="float">
            <text:p>8640000</text:p>
          </table:table-cell>
          <table:table-cell table:formula="of:=[.B610]/[.C610]" office:value-type="float" office:value="0.00133923611111111" calcext:value-type="float">
            <text:p>0,00133923611111111000</text:p>
          </table:table-cell>
          <table:table-cell table:formula="of:=[.D611]-[.D610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B610]+19" office:value-type="float" office:value="11590" calcext:value-type="float">
            <text:p>11590</text:p>
          </table:table-cell>
          <table:table-cell office:value-type="float" office:value="8640000" calcext:value-type="float">
            <text:p>8640000</text:p>
          </table:table-cell>
          <table:table-cell table:formula="of:=[.B611]/[.C611]" office:value-type="float" office:value="0.00134143518518519" calcext:value-type="float">
            <text:p>0,00134143518518519000</text:p>
          </table:table-cell>
          <table:table-cell table:formula="of:=[.D612]-[.D61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B611]+19" office:value-type="float" office:value="11609" calcext:value-type="float">
            <text:p>11609</text:p>
          </table:table-cell>
          <table:table-cell office:value-type="float" office:value="8640000" calcext:value-type="float">
            <text:p>8640000</text:p>
          </table:table-cell>
          <table:table-cell table:formula="of:=[.B612]/[.C612]" office:value-type="float" office:value="0.00134363425925926" calcext:value-type="float">
            <text:p>0,00134363425925926000</text:p>
          </table:table-cell>
          <table:table-cell table:formula="of:=[.D613]-[.D61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B612]+19" office:value-type="float" office:value="11628" calcext:value-type="float">
            <text:p>11628</text:p>
          </table:table-cell>
          <table:table-cell office:value-type="float" office:value="8640000" calcext:value-type="float">
            <text:p>8640000</text:p>
          </table:table-cell>
          <table:table-cell table:formula="of:=[.B613]/[.C613]" office:value-type="float" office:value="0.00134583333333333" calcext:value-type="float">
            <text:p>0,00134583333333333000</text:p>
          </table:table-cell>
          <table:table-cell table:formula="of:=[.D614]-[.D613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B613]+19" office:value-type="float" office:value="11647" calcext:value-type="float">
            <text:p>11647</text:p>
          </table:table-cell>
          <table:table-cell office:value-type="float" office:value="8640000" calcext:value-type="float">
            <text:p>8640000</text:p>
          </table:table-cell>
          <table:table-cell table:formula="of:=[.B614]/[.C614]" office:value-type="float" office:value="0.00134803240740741" calcext:value-type="float">
            <text:p>0,00134803240740741000</text:p>
          </table:table-cell>
          <table:table-cell table:formula="of:=[.D615]-[.D61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B614]+19" office:value-type="float" office:value="11666" calcext:value-type="float">
            <text:p>11666</text:p>
          </table:table-cell>
          <table:table-cell office:value-type="float" office:value="8640000" calcext:value-type="float">
            <text:p>8640000</text:p>
          </table:table-cell>
          <table:table-cell table:formula="of:=[.B615]/[.C615]" office:value-type="float" office:value="0.00135023148148148" calcext:value-type="float">
            <text:p>0,00135023148148148000</text:p>
          </table:table-cell>
          <table:table-cell table:formula="of:=[.D616]-[.D615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B615]+19" office:value-type="float" office:value="11685" calcext:value-type="float">
            <text:p>11685</text:p>
          </table:table-cell>
          <table:table-cell office:value-type="float" office:value="8640000" calcext:value-type="float">
            <text:p>8640000</text:p>
          </table:table-cell>
          <table:table-cell table:formula="of:=[.B616]/[.C616]" office:value-type="float" office:value="0.00135243055555556" calcext:value-type="float">
            <text:p>0,00135243055555556000</text:p>
          </table:table-cell>
          <table:table-cell table:formula="of:=[.D617]-[.D61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B616]+19" office:value-type="float" office:value="11704" calcext:value-type="float">
            <text:p>11704</text:p>
          </table:table-cell>
          <table:table-cell office:value-type="float" office:value="8640000" calcext:value-type="float">
            <text:p>8640000</text:p>
          </table:table-cell>
          <table:table-cell table:formula="of:=[.B617]/[.C617]" office:value-type="float" office:value="0.00135462962962963" calcext:value-type="float">
            <text:p>0,00135462962962963000</text:p>
          </table:table-cell>
          <table:table-cell table:formula="of:=[.D618]-[.D617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B617]+19" office:value-type="float" office:value="11723" calcext:value-type="float">
            <text:p>11723</text:p>
          </table:table-cell>
          <table:table-cell office:value-type="float" office:value="8640000" calcext:value-type="float">
            <text:p>8640000</text:p>
          </table:table-cell>
          <table:table-cell table:formula="of:=[.B618]/[.C618]" office:value-type="float" office:value="0.0013568287037037" calcext:value-type="float">
            <text:p>0,00135682870370370000</text:p>
          </table:table-cell>
          <table:table-cell table:formula="of:=[.D619]-[.D61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B618]+19" office:value-type="float" office:value="11742" calcext:value-type="float">
            <text:p>11742</text:p>
          </table:table-cell>
          <table:table-cell office:value-type="float" office:value="8640000" calcext:value-type="float">
            <text:p>8640000</text:p>
          </table:table-cell>
          <table:table-cell table:formula="of:=[.B619]/[.C619]" office:value-type="float" office:value="0.00135902777777778" calcext:value-type="float">
            <text:p>0,00135902777777778000</text:p>
          </table:table-cell>
          <table:table-cell table:formula="of:=[.D620]-[.D619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B619]+19" office:value-type="float" office:value="11761" calcext:value-type="float">
            <text:p>11761</text:p>
          </table:table-cell>
          <table:table-cell office:value-type="float" office:value="8640000" calcext:value-type="float">
            <text:p>8640000</text:p>
          </table:table-cell>
          <table:table-cell table:formula="of:=[.B620]/[.C620]" office:value-type="float" office:value="0.00136122685185185" calcext:value-type="float">
            <text:p>0,00136122685185185000</text:p>
          </table:table-cell>
          <table:table-cell table:formula="of:=[.D621]-[.D62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B620]+19" office:value-type="float" office:value="11780" calcext:value-type="float">
            <text:p>11780</text:p>
          </table:table-cell>
          <table:table-cell office:value-type="float" office:value="8640000" calcext:value-type="float">
            <text:p>8640000</text:p>
          </table:table-cell>
          <table:table-cell table:formula="of:=[.B621]/[.C621]" office:value-type="float" office:value="0.00136342592592593" calcext:value-type="float">
            <text:p>0,00136342592592593000</text:p>
          </table:table-cell>
          <table:table-cell table:formula="of:=[.D622]-[.D62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B621]+19" office:value-type="float" office:value="11799" calcext:value-type="float">
            <text:p>11799</text:p>
          </table:table-cell>
          <table:table-cell office:value-type="float" office:value="8640000" calcext:value-type="float">
            <text:p>8640000</text:p>
          </table:table-cell>
          <table:table-cell table:formula="of:=[.B622]/[.C622]" office:value-type="float" office:value="0.001365625" calcext:value-type="float">
            <text:p>0,00136562500000000000</text:p>
          </table:table-cell>
          <table:table-cell table:formula="of:=[.D623]-[.D622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B622]+19" office:value-type="float" office:value="11818" calcext:value-type="float">
            <text:p>11818</text:p>
          </table:table-cell>
          <table:table-cell office:value-type="float" office:value="8640000" calcext:value-type="float">
            <text:p>8640000</text:p>
          </table:table-cell>
          <table:table-cell table:formula="of:=[.B623]/[.C623]" office:value-type="float" office:value="0.00136782407407407" calcext:value-type="float">
            <text:p>0,00136782407407407000</text:p>
          </table:table-cell>
          <table:table-cell table:formula="of:=[.D624]-[.D62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B623]+19" office:value-type="float" office:value="11837" calcext:value-type="float">
            <text:p>11837</text:p>
          </table:table-cell>
          <table:table-cell office:value-type="float" office:value="8640000" calcext:value-type="float">
            <text:p>8640000</text:p>
          </table:table-cell>
          <table:table-cell table:formula="of:=[.B624]/[.C624]" office:value-type="float" office:value="0.00137002314814815" calcext:value-type="float">
            <text:p>0,00137002314814815000</text:p>
          </table:table-cell>
          <table:table-cell table:formula="of:=[.D625]-[.D624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B624]+19" office:value-type="float" office:value="11856" calcext:value-type="float">
            <text:p>11856</text:p>
          </table:table-cell>
          <table:table-cell office:value-type="float" office:value="8640000" calcext:value-type="float">
            <text:p>8640000</text:p>
          </table:table-cell>
          <table:table-cell table:formula="of:=[.B625]/[.C625]" office:value-type="float" office:value="0.00137222222222222" calcext:value-type="float">
            <text:p>0,00137222222222222000</text:p>
          </table:table-cell>
          <table:table-cell table:formula="of:=[.D626]-[.D62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B625]+19" office:value-type="float" office:value="11875" calcext:value-type="float">
            <text:p>11875</text:p>
          </table:table-cell>
          <table:table-cell office:value-type="float" office:value="8640000" calcext:value-type="float">
            <text:p>8640000</text:p>
          </table:table-cell>
          <table:table-cell table:formula="of:=[.B626]/[.C626]" office:value-type="float" office:value="0.0013744212962963" calcext:value-type="float">
            <text:p>0,00137442129629630000</text:p>
          </table:table-cell>
          <table:table-cell table:formula="of:=[.D627]-[.D626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B626]+19" office:value-type="float" office:value="11894" calcext:value-type="float">
            <text:p>11894</text:p>
          </table:table-cell>
          <table:table-cell office:value-type="float" office:value="8640000" calcext:value-type="float">
            <text:p>8640000</text:p>
          </table:table-cell>
          <table:table-cell table:formula="of:=[.B627]/[.C627]" office:value-type="float" office:value="0.00137662037037037" calcext:value-type="float">
            <text:p>0,00137662037037037000</text:p>
          </table:table-cell>
          <table:table-cell table:formula="of:=[.D628]-[.D62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B627]+19" office:value-type="float" office:value="11913" calcext:value-type="float">
            <text:p>11913</text:p>
          </table:table-cell>
          <table:table-cell office:value-type="float" office:value="8640000" calcext:value-type="float">
            <text:p>8640000</text:p>
          </table:table-cell>
          <table:table-cell table:formula="of:=[.B628]/[.C628]" office:value-type="float" office:value="0.00137881944444444" calcext:value-type="float">
            <text:p>0,00137881944444444000</text:p>
          </table:table-cell>
          <table:table-cell table:formula="of:=[.D629]-[.D62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B628]+19" office:value-type="float" office:value="11932" calcext:value-type="float">
            <text:p>11932</text:p>
          </table:table-cell>
          <table:table-cell office:value-type="float" office:value="8640000" calcext:value-type="float">
            <text:p>8640000</text:p>
          </table:table-cell>
          <table:table-cell table:formula="of:=[.B629]/[.C629]" office:value-type="float" office:value="0.00138101851851852" calcext:value-type="float">
            <text:p>0,00138101851851852000</text:p>
          </table:table-cell>
          <table:table-cell table:formula="of:=[.D630]-[.D629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B629]+19" office:value-type="float" office:value="11951" calcext:value-type="float">
            <text:p>11951</text:p>
          </table:table-cell>
          <table:table-cell office:value-type="float" office:value="8640000" calcext:value-type="float">
            <text:p>8640000</text:p>
          </table:table-cell>
          <table:table-cell table:formula="of:=[.B630]/[.C630]" office:value-type="float" office:value="0.00138321759259259" calcext:value-type="float">
            <text:p>0,00138321759259259000</text:p>
          </table:table-cell>
          <table:table-cell table:formula="of:=[.D631]-[.D63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B630]+19" office:value-type="float" office:value="11970" calcext:value-type="float">
            <text:p>11970</text:p>
          </table:table-cell>
          <table:table-cell office:value-type="float" office:value="8640000" calcext:value-type="float">
            <text:p>8640000</text:p>
          </table:table-cell>
          <table:table-cell table:formula="of:=[.B631]/[.C631]" office:value-type="float" office:value="0.00138541666666667" calcext:value-type="float">
            <text:p>0,00138541666666667000</text:p>
          </table:table-cell>
          <table:table-cell table:formula="of:=[.D632]-[.D631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B631]+19" office:value-type="float" office:value="11989" calcext:value-type="float">
            <text:p>11989</text:p>
          </table:table-cell>
          <table:table-cell office:value-type="float" office:value="8640000" calcext:value-type="float">
            <text:p>8640000</text:p>
          </table:table-cell>
          <table:table-cell table:formula="of:=[.B632]/[.C632]" office:value-type="float" office:value="0.00138761574074074" calcext:value-type="float">
            <text:p>0,00138761574074074000</text:p>
          </table:table-cell>
          <table:table-cell table:formula="of:=[.D633]-[.D63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B632]+19" office:value-type="float" office:value="12008" calcext:value-type="float">
            <text:p>12008</text:p>
          </table:table-cell>
          <table:table-cell office:value-type="float" office:value="8640000" calcext:value-type="float">
            <text:p>8640000</text:p>
          </table:table-cell>
          <table:table-cell table:formula="of:=[.B633]/[.C633]" office:value-type="float" office:value="0.00138981481481481" calcext:value-type="float">
            <text:p>0,00138981481481481000</text:p>
          </table:table-cell>
          <table:table-cell table:formula="of:=[.D634]-[.D633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B633]+19" office:value-type="float" office:value="12027" calcext:value-type="float">
            <text:p>12027</text:p>
          </table:table-cell>
          <table:table-cell office:value-type="float" office:value="8640000" calcext:value-type="float">
            <text:p>8640000</text:p>
          </table:table-cell>
          <table:table-cell table:formula="of:=[.B634]/[.C634]" office:value-type="float" office:value="0.00139201388888889" calcext:value-type="float">
            <text:p>0,00139201388888889000</text:p>
          </table:table-cell>
          <table:table-cell table:formula="of:=[.D635]-[.D63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B634]+19" office:value-type="float" office:value="12046" calcext:value-type="float">
            <text:p>12046</text:p>
          </table:table-cell>
          <table:table-cell office:value-type="float" office:value="8640000" calcext:value-type="float">
            <text:p>8640000</text:p>
          </table:table-cell>
          <table:table-cell table:formula="of:=[.B635]/[.C635]" office:value-type="float" office:value="0.00139421296296296" calcext:value-type="float">
            <text:p>0,00139421296296296000</text:p>
          </table:table-cell>
          <table:table-cell table:formula="of:=[.D636]-[.D635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B635]+19" office:value-type="float" office:value="12065" calcext:value-type="float">
            <text:p>12065</text:p>
          </table:table-cell>
          <table:table-cell office:value-type="float" office:value="8640000" calcext:value-type="float">
            <text:p>8640000</text:p>
          </table:table-cell>
          <table:table-cell table:formula="of:=[.B636]/[.C636]" office:value-type="float" office:value="0.00139641203703704" calcext:value-type="float">
            <text:p>0,00139641203703704000</text:p>
          </table:table-cell>
          <table:table-cell table:formula="of:=[.D637]-[.D63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B636]+19" office:value-type="float" office:value="12084" calcext:value-type="float">
            <text:p>12084</text:p>
          </table:table-cell>
          <table:table-cell office:value-type="float" office:value="8640000" calcext:value-type="float">
            <text:p>8640000</text:p>
          </table:table-cell>
          <table:table-cell table:formula="of:=[.B637]/[.C637]" office:value-type="float" office:value="0.00139861111111111" calcext:value-type="float">
            <text:p>0,00139861111111111000</text:p>
          </table:table-cell>
          <table:table-cell table:formula="of:=[.D638]-[.D63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B637]+19" office:value-type="float" office:value="12103" calcext:value-type="float">
            <text:p>12103</text:p>
          </table:table-cell>
          <table:table-cell office:value-type="float" office:value="8640000" calcext:value-type="float">
            <text:p>8640000</text:p>
          </table:table-cell>
          <table:table-cell table:formula="of:=[.B638]/[.C638]" office:value-type="float" office:value="0.00140081018518519" calcext:value-type="float">
            <text:p>0,00140081018518519000</text:p>
          </table:table-cell>
          <table:table-cell table:formula="of:=[.D639]-[.D638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B638]+19" office:value-type="float" office:value="12122" calcext:value-type="float">
            <text:p>12122</text:p>
          </table:table-cell>
          <table:table-cell office:value-type="float" office:value="8640000" calcext:value-type="float">
            <text:p>8640000</text:p>
          </table:table-cell>
          <table:table-cell table:formula="of:=[.B639]/[.C639]" office:value-type="float" office:value="0.00140300925925926" calcext:value-type="float">
            <text:p>0,00140300925925926000</text:p>
          </table:table-cell>
          <table:table-cell table:formula="of:=[.D640]-[.D63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B639]+19" office:value-type="float" office:value="12141" calcext:value-type="float">
            <text:p>12141</text:p>
          </table:table-cell>
          <table:table-cell office:value-type="float" office:value="8640000" calcext:value-type="float">
            <text:p>8640000</text:p>
          </table:table-cell>
          <table:table-cell table:formula="of:=[.B640]/[.C640]" office:value-type="float" office:value="0.00140520833333333" calcext:value-type="float">
            <text:p>0,00140520833333333000</text:p>
          </table:table-cell>
          <table:table-cell table:formula="of:=[.D641]-[.D640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B640]+19" office:value-type="float" office:value="12160" calcext:value-type="float">
            <text:p>12160</text:p>
          </table:table-cell>
          <table:table-cell office:value-type="float" office:value="8640000" calcext:value-type="float">
            <text:p>8640000</text:p>
          </table:table-cell>
          <table:table-cell table:formula="of:=[.B641]/[.C641]" office:value-type="float" office:value="0.00140740740740741" calcext:value-type="float">
            <text:p>0,00140740740740741000</text:p>
          </table:table-cell>
          <table:table-cell table:formula="of:=[.D642]-[.D64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B641]+19" office:value-type="float" office:value="12179" calcext:value-type="float">
            <text:p>12179</text:p>
          </table:table-cell>
          <table:table-cell office:value-type="float" office:value="8640000" calcext:value-type="float">
            <text:p>8640000</text:p>
          </table:table-cell>
          <table:table-cell table:formula="of:=[.B642]/[.C642]" office:value-type="float" office:value="0.00140960648148148" calcext:value-type="float">
            <text:p>0,00140960648148148000</text:p>
          </table:table-cell>
          <table:table-cell table:formula="of:=[.D643]-[.D642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B642]+19" office:value-type="float" office:value="12198" calcext:value-type="float">
            <text:p>12198</text:p>
          </table:table-cell>
          <table:table-cell office:value-type="float" office:value="8640000" calcext:value-type="float">
            <text:p>8640000</text:p>
          </table:table-cell>
          <table:table-cell table:formula="of:=[.B643]/[.C643]" office:value-type="float" office:value="0.00141180555555556" calcext:value-type="float">
            <text:p>0,00141180555555556000</text:p>
          </table:table-cell>
          <table:table-cell table:formula="of:=[.D644]-[.D64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B643]+19" office:value-type="float" office:value="12217" calcext:value-type="float">
            <text:p>12217</text:p>
          </table:table-cell>
          <table:table-cell office:value-type="float" office:value="8640000" calcext:value-type="float">
            <text:p>8640000</text:p>
          </table:table-cell>
          <table:table-cell table:formula="of:=[.B644]/[.C644]" office:value-type="float" office:value="0.00141400462962963" calcext:value-type="float">
            <text:p>0,00141400462962963000</text:p>
          </table:table-cell>
          <table:table-cell table:formula="of:=[.D645]-[.D64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B644]+19" office:value-type="float" office:value="12236" calcext:value-type="float">
            <text:p>12236</text:p>
          </table:table-cell>
          <table:table-cell office:value-type="float" office:value="8640000" calcext:value-type="float">
            <text:p>8640000</text:p>
          </table:table-cell>
          <table:table-cell table:formula="of:=[.B645]/[.C645]" office:value-type="float" office:value="0.0014162037037037" calcext:value-type="float">
            <text:p>0,00141620370370370000</text:p>
          </table:table-cell>
          <table:table-cell table:formula="of:=[.D646]-[.D645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B645]+19" office:value-type="float" office:value="12255" calcext:value-type="float">
            <text:p>12255</text:p>
          </table:table-cell>
          <table:table-cell office:value-type="float" office:value="8640000" calcext:value-type="float">
            <text:p>8640000</text:p>
          </table:table-cell>
          <table:table-cell table:formula="of:=[.B646]/[.C646]" office:value-type="float" office:value="0.00141840277777778" calcext:value-type="float">
            <text:p>0,00141840277777778000</text:p>
          </table:table-cell>
          <table:table-cell table:formula="of:=[.D647]-[.D64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B646]+19" office:value-type="float" office:value="12274" calcext:value-type="float">
            <text:p>12274</text:p>
          </table:table-cell>
          <table:table-cell office:value-type="float" office:value="8640000" calcext:value-type="float">
            <text:p>8640000</text:p>
          </table:table-cell>
          <table:table-cell table:formula="of:=[.B647]/[.C647]" office:value-type="float" office:value="0.00142060185185185" calcext:value-type="float">
            <text:p>0,00142060185185185000</text:p>
          </table:table-cell>
          <table:table-cell table:formula="of:=[.D648]-[.D647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B647]+19" office:value-type="float" office:value="12293" calcext:value-type="float">
            <text:p>12293</text:p>
          </table:table-cell>
          <table:table-cell office:value-type="float" office:value="8640000" calcext:value-type="float">
            <text:p>8640000</text:p>
          </table:table-cell>
          <table:table-cell table:formula="of:=[.B648]/[.C648]" office:value-type="float" office:value="0.00142280092592593" calcext:value-type="float">
            <text:p>0,00142280092592593000</text:p>
          </table:table-cell>
          <table:table-cell table:formula="of:=[.D649]-[.D64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B648]+19" office:value-type="float" office:value="12312" calcext:value-type="float">
            <text:p>12312</text:p>
          </table:table-cell>
          <table:table-cell office:value-type="float" office:value="8640000" calcext:value-type="float">
            <text:p>8640000</text:p>
          </table:table-cell>
          <table:table-cell table:formula="of:=[.B649]/[.C649]" office:value-type="float" office:value="0.001425" calcext:value-type="float">
            <text:p>0,00142500000000000000</text:p>
          </table:table-cell>
          <table:table-cell table:formula="of:=[.D650]-[.D649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B649]+19" office:value-type="float" office:value="12331" calcext:value-type="float">
            <text:p>12331</text:p>
          </table:table-cell>
          <table:table-cell office:value-type="float" office:value="8640000" calcext:value-type="float">
            <text:p>8640000</text:p>
          </table:table-cell>
          <table:table-cell table:formula="of:=[.B650]/[.C650]" office:value-type="float" office:value="0.00142719907407407" calcext:value-type="float">
            <text:p>0,00142719907407407000</text:p>
          </table:table-cell>
          <table:table-cell table:formula="of:=[.D651]-[.D65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B650]+19" office:value-type="float" office:value="12350" calcext:value-type="float">
            <text:p>12350</text:p>
          </table:table-cell>
          <table:table-cell office:value-type="float" office:value="8640000" calcext:value-type="float">
            <text:p>8640000</text:p>
          </table:table-cell>
          <table:table-cell table:formula="of:=[.B651]/[.C651]" office:value-type="float" office:value="0.00142939814814815" calcext:value-type="float">
            <text:p>0,00142939814814815000</text:p>
          </table:table-cell>
          <table:table-cell table:formula="of:=[.D652]-[.D651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B651]+19" office:value-type="float" office:value="12369" calcext:value-type="float">
            <text:p>12369</text:p>
          </table:table-cell>
          <table:table-cell office:value-type="float" office:value="8640000" calcext:value-type="float">
            <text:p>8640000</text:p>
          </table:table-cell>
          <table:table-cell table:formula="of:=[.B652]/[.C652]" office:value-type="float" office:value="0.00143159722222222" calcext:value-type="float">
            <text:p>0,00143159722222222000</text:p>
          </table:table-cell>
          <table:table-cell table:formula="of:=[.D653]-[.D65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B652]+19" office:value-type="float" office:value="12388" calcext:value-type="float">
            <text:p>12388</text:p>
          </table:table-cell>
          <table:table-cell office:value-type="float" office:value="8640000" calcext:value-type="float">
            <text:p>8640000</text:p>
          </table:table-cell>
          <table:table-cell table:formula="of:=[.B653]/[.C653]" office:value-type="float" office:value="0.0014337962962963" calcext:value-type="float">
            <text:p>0,00143379629629630000</text:p>
          </table:table-cell>
          <table:table-cell table:formula="of:=[.D654]-[.D65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B653]+19" office:value-type="float" office:value="12407" calcext:value-type="float">
            <text:p>12407</text:p>
          </table:table-cell>
          <table:table-cell office:value-type="float" office:value="8640000" calcext:value-type="float">
            <text:p>8640000</text:p>
          </table:table-cell>
          <table:table-cell table:formula="of:=[.B654]/[.C654]" office:value-type="float" office:value="0.00143599537037037" calcext:value-type="float">
            <text:p>0,00143599537037037000</text:p>
          </table:table-cell>
          <table:table-cell table:formula="of:=[.D655]-[.D654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B654]+19" office:value-type="float" office:value="12426" calcext:value-type="float">
            <text:p>12426</text:p>
          </table:table-cell>
          <table:table-cell office:value-type="float" office:value="8640000" calcext:value-type="float">
            <text:p>8640000</text:p>
          </table:table-cell>
          <table:table-cell table:formula="of:=[.B655]/[.C655]" office:value-type="float" office:value="0.00143819444444444" calcext:value-type="float">
            <text:p>0,00143819444444444000</text:p>
          </table:table-cell>
          <table:table-cell table:formula="of:=[.D656]-[.D65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B655]+19" office:value-type="float" office:value="12445" calcext:value-type="float">
            <text:p>12445</text:p>
          </table:table-cell>
          <table:table-cell office:value-type="float" office:value="8640000" calcext:value-type="float">
            <text:p>8640000</text:p>
          </table:table-cell>
          <table:table-cell table:formula="of:=[.B656]/[.C656]" office:value-type="float" office:value="0.00144039351851852" calcext:value-type="float">
            <text:p>0,00144039351851852000</text:p>
          </table:table-cell>
          <table:table-cell table:formula="of:=[.D657]-[.D656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B656]+19" office:value-type="float" office:value="12464" calcext:value-type="float">
            <text:p>12464</text:p>
          </table:table-cell>
          <table:table-cell office:value-type="float" office:value="8640000" calcext:value-type="float">
            <text:p>8640000</text:p>
          </table:table-cell>
          <table:table-cell table:formula="of:=[.B657]/[.C657]" office:value-type="float" office:value="0.00144259259259259" calcext:value-type="float">
            <text:p>0,00144259259259259000</text:p>
          </table:table-cell>
          <table:table-cell table:formula="of:=[.D658]-[.D65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B657]+19" office:value-type="float" office:value="12483" calcext:value-type="float">
            <text:p>12483</text:p>
          </table:table-cell>
          <table:table-cell office:value-type="float" office:value="8640000" calcext:value-type="float">
            <text:p>8640000</text:p>
          </table:table-cell>
          <table:table-cell table:formula="of:=[.B658]/[.C658]" office:value-type="float" office:value="0.00144479166666667" calcext:value-type="float">
            <text:p>0,00144479166666667000</text:p>
          </table:table-cell>
          <table:table-cell table:formula="of:=[.D659]-[.D658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B658]+19" office:value-type="float" office:value="12502" calcext:value-type="float">
            <text:p>12502</text:p>
          </table:table-cell>
          <table:table-cell office:value-type="float" office:value="8640000" calcext:value-type="float">
            <text:p>8640000</text:p>
          </table:table-cell>
          <table:table-cell table:formula="of:=[.B659]/[.C659]" office:value-type="float" office:value="0.00144699074074074" calcext:value-type="float">
            <text:p>0,00144699074074074000</text:p>
          </table:table-cell>
          <table:table-cell table:formula="of:=[.D660]-[.D65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B659]+19" office:value-type="float" office:value="12521" calcext:value-type="float">
            <text:p>12521</text:p>
          </table:table-cell>
          <table:table-cell office:value-type="float" office:value="8640000" calcext:value-type="float">
            <text:p>8640000</text:p>
          </table:table-cell>
          <table:table-cell table:formula="of:=[.B660]/[.C660]" office:value-type="float" office:value="0.00144918981481481" calcext:value-type="float">
            <text:p>0,00144918981481481000</text:p>
          </table:table-cell>
          <table:table-cell table:formula="of:=[.D661]-[.D660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B660]+19" office:value-type="float" office:value="12540" calcext:value-type="float">
            <text:p>12540</text:p>
          </table:table-cell>
          <table:table-cell office:value-type="float" office:value="8640000" calcext:value-type="float">
            <text:p>8640000</text:p>
          </table:table-cell>
          <table:table-cell table:formula="of:=[.B661]/[.C661]" office:value-type="float" office:value="0.00145138888888889" calcext:value-type="float">
            <text:p>0,00145138888888889000</text:p>
          </table:table-cell>
          <table:table-cell table:formula="of:=[.D662]-[.D66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B661]+19" office:value-type="float" office:value="12559" calcext:value-type="float">
            <text:p>12559</text:p>
          </table:table-cell>
          <table:table-cell office:value-type="float" office:value="8640000" calcext:value-type="float">
            <text:p>8640000</text:p>
          </table:table-cell>
          <table:table-cell table:formula="of:=[.B662]/[.C662]" office:value-type="float" office:value="0.00145358796296296" calcext:value-type="float">
            <text:p>0,00145358796296296000</text:p>
          </table:table-cell>
          <table:table-cell table:formula="of:=[.D663]-[.D66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B662]+19" office:value-type="float" office:value="12578" calcext:value-type="float">
            <text:p>12578</text:p>
          </table:table-cell>
          <table:table-cell office:value-type="float" office:value="8640000" calcext:value-type="float">
            <text:p>8640000</text:p>
          </table:table-cell>
          <table:table-cell table:formula="of:=[.B663]/[.C663]" office:value-type="float" office:value="0.00145578703703704" calcext:value-type="float">
            <text:p>0,00145578703703704000</text:p>
          </table:table-cell>
          <table:table-cell table:formula="of:=[.D664]-[.D663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B663]+19" office:value-type="float" office:value="12597" calcext:value-type="float">
            <text:p>12597</text:p>
          </table:table-cell>
          <table:table-cell office:value-type="float" office:value="8640000" calcext:value-type="float">
            <text:p>8640000</text:p>
          </table:table-cell>
          <table:table-cell table:formula="of:=[.B664]/[.C664]" office:value-type="float" office:value="0.00145798611111111" calcext:value-type="float">
            <text:p>0,00145798611111111000</text:p>
          </table:table-cell>
          <table:table-cell table:formula="of:=[.D665]-[.D66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B664]+19" office:value-type="float" office:value="12616" calcext:value-type="float">
            <text:p>12616</text:p>
          </table:table-cell>
          <table:table-cell office:value-type="float" office:value="8640000" calcext:value-type="float">
            <text:p>8640000</text:p>
          </table:table-cell>
          <table:table-cell table:formula="of:=[.B665]/[.C665]" office:value-type="float" office:value="0.00146018518518519" calcext:value-type="float">
            <text:p>0,00146018518518519000</text:p>
          </table:table-cell>
          <table:table-cell table:formula="of:=[.D666]-[.D665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B665]+19" office:value-type="float" office:value="12635" calcext:value-type="float">
            <text:p>12635</text:p>
          </table:table-cell>
          <table:table-cell office:value-type="float" office:value="8640000" calcext:value-type="float">
            <text:p>8640000</text:p>
          </table:table-cell>
          <table:table-cell table:formula="of:=[.B666]/[.C666]" office:value-type="float" office:value="0.00146238425925926" calcext:value-type="float">
            <text:p>0,00146238425925926000</text:p>
          </table:table-cell>
          <table:table-cell table:formula="of:=[.D667]-[.D66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B666]+19" office:value-type="float" office:value="12654" calcext:value-type="float">
            <text:p>12654</text:p>
          </table:table-cell>
          <table:table-cell office:value-type="float" office:value="8640000" calcext:value-type="float">
            <text:p>8640000</text:p>
          </table:table-cell>
          <table:table-cell table:formula="of:=[.B667]/[.C667]" office:value-type="float" office:value="0.00146458333333333" calcext:value-type="float">
            <text:p>0,00146458333333333000</text:p>
          </table:table-cell>
          <table:table-cell table:formula="of:=[.D668]-[.D667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B667]+19" office:value-type="float" office:value="12673" calcext:value-type="float">
            <text:p>12673</text:p>
          </table:table-cell>
          <table:table-cell office:value-type="float" office:value="8640000" calcext:value-type="float">
            <text:p>8640000</text:p>
          </table:table-cell>
          <table:table-cell table:formula="of:=[.B668]/[.C668]" office:value-type="float" office:value="0.00146678240740741" calcext:value-type="float">
            <text:p>0,00146678240740741000</text:p>
          </table:table-cell>
          <table:table-cell table:formula="of:=[.D669]-[.D66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B668]+19" office:value-type="float" office:value="12692" calcext:value-type="float">
            <text:p>12692</text:p>
          </table:table-cell>
          <table:table-cell office:value-type="float" office:value="8640000" calcext:value-type="float">
            <text:p>8640000</text:p>
          </table:table-cell>
          <table:table-cell table:formula="of:=[.B669]/[.C669]" office:value-type="float" office:value="0.00146898148148148" calcext:value-type="float">
            <text:p>0,00146898148148148000</text:p>
          </table:table-cell>
          <table:table-cell table:formula="of:=[.D670]-[.D66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B669]+19" office:value-type="float" office:value="12711" calcext:value-type="float">
            <text:p>12711</text:p>
          </table:table-cell>
          <table:table-cell office:value-type="float" office:value="8640000" calcext:value-type="float">
            <text:p>8640000</text:p>
          </table:table-cell>
          <table:table-cell table:formula="of:=[.B670]/[.C670]" office:value-type="float" office:value="0.00147118055555556" calcext:value-type="float">
            <text:p>0,00147118055555556000</text:p>
          </table:table-cell>
          <table:table-cell table:formula="of:=[.D671]-[.D670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B670]+19" office:value-type="float" office:value="12730" calcext:value-type="float">
            <text:p>12730</text:p>
          </table:table-cell>
          <table:table-cell office:value-type="float" office:value="8640000" calcext:value-type="float">
            <text:p>8640000</text:p>
          </table:table-cell>
          <table:table-cell table:formula="of:=[.B671]/[.C671]" office:value-type="float" office:value="0.00147337962962963" calcext:value-type="float">
            <text:p>0,00147337962962963000</text:p>
          </table:table-cell>
          <table:table-cell table:formula="of:=[.D672]-[.D67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B671]+19" office:value-type="float" office:value="12749" calcext:value-type="float">
            <text:p>12749</text:p>
          </table:table-cell>
          <table:table-cell office:value-type="float" office:value="8640000" calcext:value-type="float">
            <text:p>8640000</text:p>
          </table:table-cell>
          <table:table-cell table:formula="of:=[.B672]/[.C672]" office:value-type="float" office:value="0.0014755787037037" calcext:value-type="float">
            <text:p>0,00147557870370370000</text:p>
          </table:table-cell>
          <table:table-cell table:formula="of:=[.D673]-[.D672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B672]+19" office:value-type="float" office:value="12768" calcext:value-type="float">
            <text:p>12768</text:p>
          </table:table-cell>
          <table:table-cell office:value-type="float" office:value="8640000" calcext:value-type="float">
            <text:p>8640000</text:p>
          </table:table-cell>
          <table:table-cell table:formula="of:=[.B673]/[.C673]" office:value-type="float" office:value="0.00147777777777778" calcext:value-type="float">
            <text:p>0,00147777777777778000</text:p>
          </table:table-cell>
          <table:table-cell table:formula="of:=[.D674]-[.D67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B673]+19" office:value-type="float" office:value="12787" calcext:value-type="float">
            <text:p>12787</text:p>
          </table:table-cell>
          <table:table-cell office:value-type="float" office:value="8640000" calcext:value-type="float">
            <text:p>8640000</text:p>
          </table:table-cell>
          <table:table-cell table:formula="of:=[.B674]/[.C674]" office:value-type="float" office:value="0.00147997685185185" calcext:value-type="float">
            <text:p>0,00147997685185185000</text:p>
          </table:table-cell>
          <table:table-cell table:formula="of:=[.D675]-[.D674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B674]+19" office:value-type="float" office:value="12806" calcext:value-type="float">
            <text:p>12806</text:p>
          </table:table-cell>
          <table:table-cell office:value-type="float" office:value="8640000" calcext:value-type="float">
            <text:p>8640000</text:p>
          </table:table-cell>
          <table:table-cell table:formula="of:=[.B675]/[.C675]" office:value-type="float" office:value="0.00148217592592593" calcext:value-type="float">
            <text:p>0,00148217592592593000</text:p>
          </table:table-cell>
          <table:table-cell table:formula="of:=[.D676]-[.D67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B675]+19" office:value-type="float" office:value="12825" calcext:value-type="float">
            <text:p>12825</text:p>
          </table:table-cell>
          <table:table-cell office:value-type="float" office:value="8640000" calcext:value-type="float">
            <text:p>8640000</text:p>
          </table:table-cell>
          <table:table-cell table:formula="of:=[.B676]/[.C676]" office:value-type="float" office:value="0.001484375" calcext:value-type="float">
            <text:p>0,00148437500000000000</text:p>
          </table:table-cell>
          <table:table-cell table:formula="of:=[.D677]-[.D676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B676]+19" office:value-type="float" office:value="12844" calcext:value-type="float">
            <text:p>12844</text:p>
          </table:table-cell>
          <table:table-cell office:value-type="float" office:value="8640000" calcext:value-type="float">
            <text:p>8640000</text:p>
          </table:table-cell>
          <table:table-cell table:formula="of:=[.B677]/[.C677]" office:value-type="float" office:value="0.00148657407407407" calcext:value-type="float">
            <text:p>0,00148657407407407000</text:p>
          </table:table-cell>
          <table:table-cell table:formula="of:=[.D678]-[.D67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B677]+19" office:value-type="float" office:value="12863" calcext:value-type="float">
            <text:p>12863</text:p>
          </table:table-cell>
          <table:table-cell office:value-type="float" office:value="8640000" calcext:value-type="float">
            <text:p>8640000</text:p>
          </table:table-cell>
          <table:table-cell table:formula="of:=[.B678]/[.C678]" office:value-type="float" office:value="0.00148877314814815" calcext:value-type="float">
            <text:p>0,00148877314814815000</text:p>
          </table:table-cell>
          <table:table-cell table:formula="of:=[.D679]-[.D67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B678]+19" office:value-type="float" office:value="12882" calcext:value-type="float">
            <text:p>12882</text:p>
          </table:table-cell>
          <table:table-cell office:value-type="float" office:value="8640000" calcext:value-type="float">
            <text:p>8640000</text:p>
          </table:table-cell>
          <table:table-cell table:formula="of:=[.B679]/[.C679]" office:value-type="float" office:value="0.00149097222222222" calcext:value-type="float">
            <text:p>0,00149097222222222000</text:p>
          </table:table-cell>
          <table:table-cell table:formula="of:=[.D680]-[.D679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B679]+19" office:value-type="float" office:value="12901" calcext:value-type="float">
            <text:p>12901</text:p>
          </table:table-cell>
          <table:table-cell office:value-type="float" office:value="8640000" calcext:value-type="float">
            <text:p>8640000</text:p>
          </table:table-cell>
          <table:table-cell table:formula="of:=[.B680]/[.C680]" office:value-type="float" office:value="0.0014931712962963" calcext:value-type="float">
            <text:p>0,00149317129629630000</text:p>
          </table:table-cell>
          <table:table-cell table:formula="of:=[.D681]-[.D68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B680]+19" office:value-type="float" office:value="12920" calcext:value-type="float">
            <text:p>12920</text:p>
          </table:table-cell>
          <table:table-cell office:value-type="float" office:value="8640000" calcext:value-type="float">
            <text:p>8640000</text:p>
          </table:table-cell>
          <table:table-cell table:formula="of:=[.B681]/[.C681]" office:value-type="float" office:value="0.00149537037037037" calcext:value-type="float">
            <text:p>0,00149537037037037000</text:p>
          </table:table-cell>
          <table:table-cell table:formula="of:=[.D682]-[.D681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B681]+19" office:value-type="float" office:value="12939" calcext:value-type="float">
            <text:p>12939</text:p>
          </table:table-cell>
          <table:table-cell office:value-type="float" office:value="8640000" calcext:value-type="float">
            <text:p>8640000</text:p>
          </table:table-cell>
          <table:table-cell table:formula="of:=[.B682]/[.C682]" office:value-type="float" office:value="0.00149756944444444" calcext:value-type="float">
            <text:p>0,00149756944444444000</text:p>
          </table:table-cell>
          <table:table-cell table:formula="of:=[.D683]-[.D68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B682]+19" office:value-type="float" office:value="12958" calcext:value-type="float">
            <text:p>12958</text:p>
          </table:table-cell>
          <table:table-cell office:value-type="float" office:value="8640000" calcext:value-type="float">
            <text:p>8640000</text:p>
          </table:table-cell>
          <table:table-cell table:formula="of:=[.B683]/[.C683]" office:value-type="float" office:value="0.00149976851851852" calcext:value-type="float">
            <text:p>0,00149976851851852000</text:p>
          </table:table-cell>
          <table:table-cell table:formula="of:=[.D684]-[.D683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B683]+19" office:value-type="float" office:value="12977" calcext:value-type="float">
            <text:p>12977</text:p>
          </table:table-cell>
          <table:table-cell office:value-type="float" office:value="8640000" calcext:value-type="float">
            <text:p>8640000</text:p>
          </table:table-cell>
          <table:table-cell table:formula="of:=[.B684]/[.C684]" office:value-type="float" office:value="0.00150196759259259" calcext:value-type="float">
            <text:p>0,00150196759259259000</text:p>
          </table:table-cell>
          <table:table-cell table:formula="of:=[.D685]-[.D68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B684]+19" office:value-type="float" office:value="12996" calcext:value-type="float">
            <text:p>12996</text:p>
          </table:table-cell>
          <table:table-cell office:value-type="float" office:value="8640000" calcext:value-type="float">
            <text:p>8640000</text:p>
          </table:table-cell>
          <table:table-cell table:formula="of:=[.B685]/[.C685]" office:value-type="float" office:value="0.00150416666666667" calcext:value-type="float">
            <text:p>0,00150416666666667000</text:p>
          </table:table-cell>
          <table:table-cell table:formula="of:=[.D686]-[.D68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B685]+19" office:value-type="float" office:value="13015" calcext:value-type="float">
            <text:p>13015</text:p>
          </table:table-cell>
          <table:table-cell office:value-type="float" office:value="8640000" calcext:value-type="float">
            <text:p>8640000</text:p>
          </table:table-cell>
          <table:table-cell table:formula="of:=[.B686]/[.C686]" office:value-type="float" office:value="0.00150636574074074" calcext:value-type="float">
            <text:p>0,00150636574074074000</text:p>
          </table:table-cell>
          <table:table-cell table:formula="of:=[.D687]-[.D686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B686]+19" office:value-type="float" office:value="13034" calcext:value-type="float">
            <text:p>13034</text:p>
          </table:table-cell>
          <table:table-cell office:value-type="float" office:value="8640000" calcext:value-type="float">
            <text:p>8640000</text:p>
          </table:table-cell>
          <table:table-cell table:formula="of:=[.B687]/[.C687]" office:value-type="float" office:value="0.00150856481481481" calcext:value-type="float">
            <text:p>0,00150856481481481000</text:p>
          </table:table-cell>
          <table:table-cell table:formula="of:=[.D688]-[.D68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B687]+19" office:value-type="float" office:value="13053" calcext:value-type="float">
            <text:p>13053</text:p>
          </table:table-cell>
          <table:table-cell office:value-type="float" office:value="8640000" calcext:value-type="float">
            <text:p>8640000</text:p>
          </table:table-cell>
          <table:table-cell table:formula="of:=[.B688]/[.C688]" office:value-type="float" office:value="0.00151076388888889" calcext:value-type="float">
            <text:p>0,00151076388888889000</text:p>
          </table:table-cell>
          <table:table-cell table:formula="of:=[.D689]-[.D688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B688]+19" office:value-type="float" office:value="13072" calcext:value-type="float">
            <text:p>13072</text:p>
          </table:table-cell>
          <table:table-cell office:value-type="float" office:value="8640000" calcext:value-type="float">
            <text:p>8640000</text:p>
          </table:table-cell>
          <table:table-cell table:formula="of:=[.B689]/[.C689]" office:value-type="float" office:value="0.00151296296296296" calcext:value-type="float">
            <text:p>0,00151296296296296000</text:p>
          </table:table-cell>
          <table:table-cell table:formula="of:=[.D690]-[.D68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B689]+19" office:value-type="float" office:value="13091" calcext:value-type="float">
            <text:p>13091</text:p>
          </table:table-cell>
          <table:table-cell office:value-type="float" office:value="8640000" calcext:value-type="float">
            <text:p>8640000</text:p>
          </table:table-cell>
          <table:table-cell table:formula="of:=[.B690]/[.C690]" office:value-type="float" office:value="0.00151516203703704" calcext:value-type="float">
            <text:p>0,00151516203703704000</text:p>
          </table:table-cell>
          <table:table-cell table:formula="of:=[.D691]-[.D690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B690]+19" office:value-type="float" office:value="13110" calcext:value-type="float">
            <text:p>13110</text:p>
          </table:table-cell>
          <table:table-cell office:value-type="float" office:value="8640000" calcext:value-type="float">
            <text:p>8640000</text:p>
          </table:table-cell>
          <table:table-cell table:formula="of:=[.B691]/[.C691]" office:value-type="float" office:value="0.00151736111111111" calcext:value-type="float">
            <text:p>0,00151736111111111000</text:p>
          </table:table-cell>
          <table:table-cell table:formula="of:=[.D692]-[.D69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B691]+19" office:value-type="float" office:value="13129" calcext:value-type="float">
            <text:p>13129</text:p>
          </table:table-cell>
          <table:table-cell office:value-type="float" office:value="8640000" calcext:value-type="float">
            <text:p>8640000</text:p>
          </table:table-cell>
          <table:table-cell table:formula="of:=[.B692]/[.C692]" office:value-type="float" office:value="0.00151956018518519" calcext:value-type="float">
            <text:p>0,00151956018518519000</text:p>
          </table:table-cell>
          <table:table-cell table:formula="of:=[.D693]-[.D692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B692]+19" office:value-type="float" office:value="13148" calcext:value-type="float">
            <text:p>13148</text:p>
          </table:table-cell>
          <table:table-cell office:value-type="float" office:value="8640000" calcext:value-type="float">
            <text:p>8640000</text:p>
          </table:table-cell>
          <table:table-cell table:formula="of:=[.B693]/[.C693]" office:value-type="float" office:value="0.00152175925925926" calcext:value-type="float">
            <text:p>0,00152175925925926000</text:p>
          </table:table-cell>
          <table:table-cell table:formula="of:=[.D694]-[.D69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B693]+19" office:value-type="float" office:value="13167" calcext:value-type="float">
            <text:p>13167</text:p>
          </table:table-cell>
          <table:table-cell office:value-type="float" office:value="8640000" calcext:value-type="float">
            <text:p>8640000</text:p>
          </table:table-cell>
          <table:table-cell table:formula="of:=[.B694]/[.C694]" office:value-type="float" office:value="0.00152395833333333" calcext:value-type="float">
            <text:p>0,00152395833333333000</text:p>
          </table:table-cell>
          <table:table-cell table:formula="of:=[.D695]-[.D69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B694]+19" office:value-type="float" office:value="13186" calcext:value-type="float">
            <text:p>13186</text:p>
          </table:table-cell>
          <table:table-cell office:value-type="float" office:value="8640000" calcext:value-type="float">
            <text:p>8640000</text:p>
          </table:table-cell>
          <table:table-cell table:formula="of:=[.B695]/[.C695]" office:value-type="float" office:value="0.00152615740740741" calcext:value-type="float">
            <text:p>0,00152615740740741000</text:p>
          </table:table-cell>
          <table:table-cell table:formula="of:=[.D696]-[.D695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B695]+19" office:value-type="float" office:value="13205" calcext:value-type="float">
            <text:p>13205</text:p>
          </table:table-cell>
          <table:table-cell office:value-type="float" office:value="8640000" calcext:value-type="float">
            <text:p>8640000</text:p>
          </table:table-cell>
          <table:table-cell table:formula="of:=[.B696]/[.C696]" office:value-type="float" office:value="0.00152835648148148" calcext:value-type="float">
            <text:p>0,00152835648148148000</text:p>
          </table:table-cell>
          <table:table-cell table:formula="of:=[.D697]-[.D69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B696]+19" office:value-type="float" office:value="13224" calcext:value-type="float">
            <text:p>13224</text:p>
          </table:table-cell>
          <table:table-cell office:value-type="float" office:value="8640000" calcext:value-type="float">
            <text:p>8640000</text:p>
          </table:table-cell>
          <table:table-cell table:formula="of:=[.B697]/[.C697]" office:value-type="float" office:value="0.00153055555555556" calcext:value-type="float">
            <text:p>0,00153055555555556000</text:p>
          </table:table-cell>
          <table:table-cell table:formula="of:=[.D698]-[.D697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B697]+19" office:value-type="float" office:value="13243" calcext:value-type="float">
            <text:p>13243</text:p>
          </table:table-cell>
          <table:table-cell office:value-type="float" office:value="8640000" calcext:value-type="float">
            <text:p>8640000</text:p>
          </table:table-cell>
          <table:table-cell table:formula="of:=[.B698]/[.C698]" office:value-type="float" office:value="0.00153275462962963" calcext:value-type="float">
            <text:p>0,00153275462962963000</text:p>
          </table:table-cell>
          <table:table-cell table:formula="of:=[.D699]-[.D69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B698]+19" office:value-type="float" office:value="13262" calcext:value-type="float">
            <text:p>13262</text:p>
          </table:table-cell>
          <table:table-cell office:value-type="float" office:value="8640000" calcext:value-type="float">
            <text:p>8640000</text:p>
          </table:table-cell>
          <table:table-cell table:formula="of:=[.B699]/[.C699]" office:value-type="float" office:value="0.0015349537037037" calcext:value-type="float">
            <text:p>0,00153495370370370000</text:p>
          </table:table-cell>
          <table:table-cell table:formula="of:=[.D700]-[.D699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B699]+19" office:value-type="float" office:value="13281" calcext:value-type="float">
            <text:p>13281</text:p>
          </table:table-cell>
          <table:table-cell office:value-type="float" office:value="8640000" calcext:value-type="float">
            <text:p>8640000</text:p>
          </table:table-cell>
          <table:table-cell table:formula="of:=[.B700]/[.C700]" office:value-type="float" office:value="0.00153715277777778" calcext:value-type="float">
            <text:p>0,00153715277777778000</text:p>
          </table:table-cell>
          <table:table-cell table:formula="of:=[.D701]-[.D70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B700]+19" office:value-type="float" office:value="13300" calcext:value-type="float">
            <text:p>13300</text:p>
          </table:table-cell>
          <table:table-cell office:value-type="float" office:value="8640000" calcext:value-type="float">
            <text:p>8640000</text:p>
          </table:table-cell>
          <table:table-cell table:formula="of:=[.B701]/[.C701]" office:value-type="float" office:value="0.00153935185185185" calcext:value-type="float">
            <text:p>0,00153935185185185000</text:p>
          </table:table-cell>
          <table:table-cell table:formula="of:=[.D702]-[.D70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B701]+19" office:value-type="float" office:value="13319" calcext:value-type="float">
            <text:p>13319</text:p>
          </table:table-cell>
          <table:table-cell office:value-type="float" office:value="8640000" calcext:value-type="float">
            <text:p>8640000</text:p>
          </table:table-cell>
          <table:table-cell table:formula="of:=[.B702]/[.C702]" office:value-type="float" office:value="0.00154155092592593" calcext:value-type="float">
            <text:p>0,00154155092592593000</text:p>
          </table:table-cell>
          <table:table-cell table:formula="of:=[.D703]-[.D702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B702]+19" office:value-type="float" office:value="13338" calcext:value-type="float">
            <text:p>13338</text:p>
          </table:table-cell>
          <table:table-cell office:value-type="float" office:value="8640000" calcext:value-type="float">
            <text:p>8640000</text:p>
          </table:table-cell>
          <table:table-cell table:formula="of:=[.B703]/[.C703]" office:value-type="float" office:value="0.00154375" calcext:value-type="float">
            <text:p>0,00154375000000000000</text:p>
          </table:table-cell>
          <table:table-cell table:formula="of:=[.D704]-[.D70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B703]+19" office:value-type="float" office:value="13357" calcext:value-type="float">
            <text:p>13357</text:p>
          </table:table-cell>
          <table:table-cell office:value-type="float" office:value="8640000" calcext:value-type="float">
            <text:p>8640000</text:p>
          </table:table-cell>
          <table:table-cell table:formula="of:=[.B704]/[.C704]" office:value-type="float" office:value="0.00154594907407407" calcext:value-type="float">
            <text:p>0,00154594907407407000</text:p>
          </table:table-cell>
          <table:table-cell table:formula="of:=[.D705]-[.D704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B704]+19" office:value-type="float" office:value="13376" calcext:value-type="float">
            <text:p>13376</text:p>
          </table:table-cell>
          <table:table-cell office:value-type="float" office:value="8640000" calcext:value-type="float">
            <text:p>8640000</text:p>
          </table:table-cell>
          <table:table-cell table:formula="of:=[.B705]/[.C705]" office:value-type="float" office:value="0.00154814814814815" calcext:value-type="float">
            <text:p>0,00154814814814815000</text:p>
          </table:table-cell>
          <table:table-cell table:formula="of:=[.D706]-[.D70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B705]+19" office:value-type="float" office:value="13395" calcext:value-type="float">
            <text:p>13395</text:p>
          </table:table-cell>
          <table:table-cell office:value-type="float" office:value="8640000" calcext:value-type="float">
            <text:p>8640000</text:p>
          </table:table-cell>
          <table:table-cell table:formula="of:=[.B706]/[.C706]" office:value-type="float" office:value="0.00155034722222222" calcext:value-type="float">
            <text:p>0,00155034722222222000</text:p>
          </table:table-cell>
          <table:table-cell table:formula="of:=[.D707]-[.D706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B706]+19" office:value-type="float" office:value="13414" calcext:value-type="float">
            <text:p>13414</text:p>
          </table:table-cell>
          <table:table-cell office:value-type="float" office:value="8640000" calcext:value-type="float">
            <text:p>8640000</text:p>
          </table:table-cell>
          <table:table-cell table:formula="of:=[.B707]/[.C707]" office:value-type="float" office:value="0.0015525462962963" calcext:value-type="float">
            <text:p>0,00155254629629630000</text:p>
          </table:table-cell>
          <table:table-cell table:formula="of:=[.D708]-[.D70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B707]+19" office:value-type="float" office:value="13433" calcext:value-type="float">
            <text:p>13433</text:p>
          </table:table-cell>
          <table:table-cell office:value-type="float" office:value="8640000" calcext:value-type="float">
            <text:p>8640000</text:p>
          </table:table-cell>
          <table:table-cell table:formula="of:=[.B708]/[.C708]" office:value-type="float" office:value="0.00155474537037037" calcext:value-type="float">
            <text:p>0,00155474537037037000</text:p>
          </table:table-cell>
          <table:table-cell table:formula="of:=[.D709]-[.D708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B708]+19" office:value-type="float" office:value="13452" calcext:value-type="float">
            <text:p>13452</text:p>
          </table:table-cell>
          <table:table-cell office:value-type="float" office:value="8640000" calcext:value-type="float">
            <text:p>8640000</text:p>
          </table:table-cell>
          <table:table-cell table:formula="of:=[.B709]/[.C709]" office:value-type="float" office:value="0.00155694444444444" calcext:value-type="float">
            <text:p>0,00155694444444444000</text:p>
          </table:table-cell>
          <table:table-cell table:formula="of:=[.D710]-[.D70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B709]+19" office:value-type="float" office:value="13471" calcext:value-type="float">
            <text:p>13471</text:p>
          </table:table-cell>
          <table:table-cell office:value-type="float" office:value="8640000" calcext:value-type="float">
            <text:p>8640000</text:p>
          </table:table-cell>
          <table:table-cell table:formula="of:=[.B710]/[.C710]" office:value-type="float" office:value="0.00155914351851852" calcext:value-type="float">
            <text:p>0,00155914351851852000</text:p>
          </table:table-cell>
          <table:table-cell table:formula="of:=[.D711]-[.D71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B710]+19" office:value-type="float" office:value="13490" calcext:value-type="float">
            <text:p>13490</text:p>
          </table:table-cell>
          <table:table-cell office:value-type="float" office:value="8640000" calcext:value-type="float">
            <text:p>8640000</text:p>
          </table:table-cell>
          <table:table-cell table:formula="of:=[.B711]/[.C711]" office:value-type="float" office:value="0.00156134259259259" calcext:value-type="float">
            <text:p>0,00156134259259259000</text:p>
          </table:table-cell>
          <table:table-cell table:formula="of:=[.D712]-[.D711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B711]+19" office:value-type="float" office:value="13509" calcext:value-type="float">
            <text:p>13509</text:p>
          </table:table-cell>
          <table:table-cell office:value-type="float" office:value="8640000" calcext:value-type="float">
            <text:p>8640000</text:p>
          </table:table-cell>
          <table:table-cell table:formula="of:=[.B712]/[.C712]" office:value-type="float" office:value="0.00156354166666667" calcext:value-type="float">
            <text:p>0,00156354166666667000</text:p>
          </table:table-cell>
          <table:table-cell table:formula="of:=[.D713]-[.D71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B712]+19" office:value-type="float" office:value="13528" calcext:value-type="float">
            <text:p>13528</text:p>
          </table:table-cell>
          <table:table-cell office:value-type="float" office:value="8640000" calcext:value-type="float">
            <text:p>8640000</text:p>
          </table:table-cell>
          <table:table-cell table:formula="of:=[.B713]/[.C713]" office:value-type="float" office:value="0.00156574074074074" calcext:value-type="float">
            <text:p>0,00156574074074074000</text:p>
          </table:table-cell>
          <table:table-cell table:formula="of:=[.D714]-[.D713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B713]+19" office:value-type="float" office:value="13547" calcext:value-type="float">
            <text:p>13547</text:p>
          </table:table-cell>
          <table:table-cell office:value-type="float" office:value="8640000" calcext:value-type="float">
            <text:p>8640000</text:p>
          </table:table-cell>
          <table:table-cell table:formula="of:=[.B714]/[.C714]" office:value-type="float" office:value="0.00156793981481481" calcext:value-type="float">
            <text:p>0,00156793981481481000</text:p>
          </table:table-cell>
          <table:table-cell table:formula="of:=[.D715]-[.D71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B714]+19" office:value-type="float" office:value="13566" calcext:value-type="float">
            <text:p>13566</text:p>
          </table:table-cell>
          <table:table-cell office:value-type="float" office:value="8640000" calcext:value-type="float">
            <text:p>8640000</text:p>
          </table:table-cell>
          <table:table-cell table:formula="of:=[.B715]/[.C715]" office:value-type="float" office:value="0.00157013888888889" calcext:value-type="float">
            <text:p>0,00157013888888889000</text:p>
          </table:table-cell>
          <table:table-cell table:formula="of:=[.D716]-[.D715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B715]+19" office:value-type="float" office:value="13585" calcext:value-type="float">
            <text:p>13585</text:p>
          </table:table-cell>
          <table:table-cell office:value-type="float" office:value="8640000" calcext:value-type="float">
            <text:p>8640000</text:p>
          </table:table-cell>
          <table:table-cell table:formula="of:=[.B716]/[.C716]" office:value-type="float" office:value="0.00157233796296296" calcext:value-type="float">
            <text:p>0,00157233796296296000</text:p>
          </table:table-cell>
          <table:table-cell table:formula="of:=[.D717]-[.D71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B716]+19" office:value-type="float" office:value="13604" calcext:value-type="float">
            <text:p>13604</text:p>
          </table:table-cell>
          <table:table-cell office:value-type="float" office:value="8640000" calcext:value-type="float">
            <text:p>8640000</text:p>
          </table:table-cell>
          <table:table-cell table:formula="of:=[.B717]/[.C717]" office:value-type="float" office:value="0.00157453703703704" calcext:value-type="float">
            <text:p>0,00157453703703704000</text:p>
          </table:table-cell>
          <table:table-cell table:formula="of:=[.D718]-[.D717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B717]+19" office:value-type="float" office:value="13623" calcext:value-type="float">
            <text:p>13623</text:p>
          </table:table-cell>
          <table:table-cell office:value-type="float" office:value="8640000" calcext:value-type="float">
            <text:p>8640000</text:p>
          </table:table-cell>
          <table:table-cell table:formula="of:=[.B718]/[.C718]" office:value-type="float" office:value="0.00157673611111111" calcext:value-type="float">
            <text:p>0,00157673611111111000</text:p>
          </table:table-cell>
          <table:table-cell table:formula="of:=[.D719]-[.D71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B718]+19" office:value-type="float" office:value="13642" calcext:value-type="float">
            <text:p>13642</text:p>
          </table:table-cell>
          <table:table-cell office:value-type="float" office:value="8640000" calcext:value-type="float">
            <text:p>8640000</text:p>
          </table:table-cell>
          <table:table-cell table:formula="of:=[.B719]/[.C719]" office:value-type="float" office:value="0.00157893518518519" calcext:value-type="float">
            <text:p>0,00157893518518519000</text:p>
          </table:table-cell>
          <table:table-cell table:formula="of:=[.D720]-[.D71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B719]+19" office:value-type="float" office:value="13661" calcext:value-type="float">
            <text:p>13661</text:p>
          </table:table-cell>
          <table:table-cell office:value-type="float" office:value="8640000" calcext:value-type="float">
            <text:p>8640000</text:p>
          </table:table-cell>
          <table:table-cell table:formula="of:=[.B720]/[.C720]" office:value-type="float" office:value="0.00158113425925926" calcext:value-type="float">
            <text:p>0,00158113425925926000</text:p>
          </table:table-cell>
          <table:table-cell table:formula="of:=[.D721]-[.D720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B720]+19" office:value-type="float" office:value="13680" calcext:value-type="float">
            <text:p>13680</text:p>
          </table:table-cell>
          <table:table-cell office:value-type="float" office:value="8640000" calcext:value-type="float">
            <text:p>8640000</text:p>
          </table:table-cell>
          <table:table-cell table:formula="of:=[.B721]/[.C721]" office:value-type="float" office:value="0.00158333333333333" calcext:value-type="float">
            <text:p>0,00158333333333333000</text:p>
          </table:table-cell>
          <table:table-cell table:formula="of:=[.D722]-[.D72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B721]+19" office:value-type="float" office:value="13699" calcext:value-type="float">
            <text:p>13699</text:p>
          </table:table-cell>
          <table:table-cell office:value-type="float" office:value="8640000" calcext:value-type="float">
            <text:p>8640000</text:p>
          </table:table-cell>
          <table:table-cell table:formula="of:=[.B722]/[.C722]" office:value-type="float" office:value="0.00158553240740741" calcext:value-type="float">
            <text:p>0,00158553240740741000</text:p>
          </table:table-cell>
          <table:table-cell table:formula="of:=[.D723]-[.D722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B722]+19" office:value-type="float" office:value="13718" calcext:value-type="float">
            <text:p>13718</text:p>
          </table:table-cell>
          <table:table-cell office:value-type="float" office:value="8640000" calcext:value-type="float">
            <text:p>8640000</text:p>
          </table:table-cell>
          <table:table-cell table:formula="of:=[.B723]/[.C723]" office:value-type="float" office:value="0.00158773148148148" calcext:value-type="float">
            <text:p>0,00158773148148148000</text:p>
          </table:table-cell>
          <table:table-cell table:formula="of:=[.D724]-[.D72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B723]+19" office:value-type="float" office:value="13737" calcext:value-type="float">
            <text:p>13737</text:p>
          </table:table-cell>
          <table:table-cell office:value-type="float" office:value="8640000" calcext:value-type="float">
            <text:p>8640000</text:p>
          </table:table-cell>
          <table:table-cell table:formula="of:=[.B724]/[.C724]" office:value-type="float" office:value="0.00158993055555556" calcext:value-type="float">
            <text:p>0,00158993055555556000</text:p>
          </table:table-cell>
          <table:table-cell table:formula="of:=[.D725]-[.D724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B724]+19" office:value-type="float" office:value="13756" calcext:value-type="float">
            <text:p>13756</text:p>
          </table:table-cell>
          <table:table-cell office:value-type="float" office:value="8640000" calcext:value-type="float">
            <text:p>8640000</text:p>
          </table:table-cell>
          <table:table-cell table:formula="of:=[.B725]/[.C725]" office:value-type="float" office:value="0.00159212962962963" calcext:value-type="float">
            <text:p>0,00159212962962963000</text:p>
          </table:table-cell>
          <table:table-cell table:formula="of:=[.D726]-[.D72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B725]+19" office:value-type="float" office:value="13775" calcext:value-type="float">
            <text:p>13775</text:p>
          </table:table-cell>
          <table:table-cell office:value-type="float" office:value="8640000" calcext:value-type="float">
            <text:p>8640000</text:p>
          </table:table-cell>
          <table:table-cell table:formula="of:=[.B726]/[.C726]" office:value-type="float" office:value="0.0015943287037037" calcext:value-type="float">
            <text:p>0,00159432870370370000</text:p>
          </table:table-cell>
          <table:table-cell table:formula="of:=[.D727]-[.D72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B726]+19" office:value-type="float" office:value="13794" calcext:value-type="float">
            <text:p>13794</text:p>
          </table:table-cell>
          <table:table-cell office:value-type="float" office:value="8640000" calcext:value-type="float">
            <text:p>8640000</text:p>
          </table:table-cell>
          <table:table-cell table:formula="of:=[.B727]/[.C727]" office:value-type="float" office:value="0.00159652777777778" calcext:value-type="float">
            <text:p>0,00159652777777778000</text:p>
          </table:table-cell>
          <table:table-cell table:formula="of:=[.D728]-[.D727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B727]+19" office:value-type="float" office:value="13813" calcext:value-type="float">
            <text:p>13813</text:p>
          </table:table-cell>
          <table:table-cell office:value-type="float" office:value="8640000" calcext:value-type="float">
            <text:p>8640000</text:p>
          </table:table-cell>
          <table:table-cell table:formula="of:=[.B728]/[.C728]" office:value-type="float" office:value="0.00159872685185185" calcext:value-type="float">
            <text:p>0,00159872685185185000</text:p>
          </table:table-cell>
          <table:table-cell table:formula="of:=[.D729]-[.D72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B728]+19" office:value-type="float" office:value="13832" calcext:value-type="float">
            <text:p>13832</text:p>
          </table:table-cell>
          <table:table-cell office:value-type="float" office:value="8640000" calcext:value-type="float">
            <text:p>8640000</text:p>
          </table:table-cell>
          <table:table-cell table:formula="of:=[.B729]/[.C729]" office:value-type="float" office:value="0.00160092592592593" calcext:value-type="float">
            <text:p>0,00160092592592593000</text:p>
          </table:table-cell>
          <table:table-cell table:formula="of:=[.D730]-[.D729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B729]+19" office:value-type="float" office:value="13851" calcext:value-type="float">
            <text:p>13851</text:p>
          </table:table-cell>
          <table:table-cell office:value-type="float" office:value="8640000" calcext:value-type="float">
            <text:p>8640000</text:p>
          </table:table-cell>
          <table:table-cell table:formula="of:=[.B730]/[.C730]" office:value-type="float" office:value="0.001603125" calcext:value-type="float">
            <text:p>0,00160312500000000000</text:p>
          </table:table-cell>
          <table:table-cell table:formula="of:=[.D731]-[.D73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B730]+19" office:value-type="float" office:value="13870" calcext:value-type="float">
            <text:p>13870</text:p>
          </table:table-cell>
          <table:table-cell office:value-type="float" office:value="8640000" calcext:value-type="float">
            <text:p>8640000</text:p>
          </table:table-cell>
          <table:table-cell table:formula="of:=[.B731]/[.C731]" office:value-type="float" office:value="0.00160532407407407" calcext:value-type="float">
            <text:p>0,00160532407407407000</text:p>
          </table:table-cell>
          <table:table-cell table:formula="of:=[.D732]-[.D731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B731]+19" office:value-type="float" office:value="13889" calcext:value-type="float">
            <text:p>13889</text:p>
          </table:table-cell>
          <table:table-cell office:value-type="float" office:value="8640000" calcext:value-type="float">
            <text:p>8640000</text:p>
          </table:table-cell>
          <table:table-cell table:formula="of:=[.B732]/[.C732]" office:value-type="float" office:value="0.00160752314814815" calcext:value-type="float">
            <text:p>0,00160752314814815000</text:p>
          </table:table-cell>
          <table:table-cell table:formula="of:=[.D733]-[.D73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B732]+19" office:value-type="float" office:value="13908" calcext:value-type="float">
            <text:p>13908</text:p>
          </table:table-cell>
          <table:table-cell office:value-type="float" office:value="8640000" calcext:value-type="float">
            <text:p>8640000</text:p>
          </table:table-cell>
          <table:table-cell table:formula="of:=[.B733]/[.C733]" office:value-type="float" office:value="0.00160972222222222" calcext:value-type="float">
            <text:p>0,00160972222222222000</text:p>
          </table:table-cell>
          <table:table-cell table:formula="of:=[.D734]-[.D733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B733]+19" office:value-type="float" office:value="13927" calcext:value-type="float">
            <text:p>13927</text:p>
          </table:table-cell>
          <table:table-cell office:value-type="float" office:value="8640000" calcext:value-type="float">
            <text:p>8640000</text:p>
          </table:table-cell>
          <table:table-cell table:formula="of:=[.B734]/[.C734]" office:value-type="float" office:value="0.0016119212962963" calcext:value-type="float">
            <text:p>0,00161192129629630000</text:p>
          </table:table-cell>
          <table:table-cell table:formula="of:=[.D735]-[.D73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B734]+19" office:value-type="float" office:value="13946" calcext:value-type="float">
            <text:p>13946</text:p>
          </table:table-cell>
          <table:table-cell office:value-type="float" office:value="8640000" calcext:value-type="float">
            <text:p>8640000</text:p>
          </table:table-cell>
          <table:table-cell table:formula="of:=[.B735]/[.C735]" office:value-type="float" office:value="0.00161412037037037" calcext:value-type="float">
            <text:p>0,00161412037037037000</text:p>
          </table:table-cell>
          <table:table-cell table:formula="of:=[.D736]-[.D73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B735]+19" office:value-type="float" office:value="13965" calcext:value-type="float">
            <text:p>13965</text:p>
          </table:table-cell>
          <table:table-cell office:value-type="float" office:value="8640000" calcext:value-type="float">
            <text:p>8640000</text:p>
          </table:table-cell>
          <table:table-cell table:formula="of:=[.B736]/[.C736]" office:value-type="float" office:value="0.00161631944444444" calcext:value-type="float">
            <text:p>0,00161631944444444000</text:p>
          </table:table-cell>
          <table:table-cell table:formula="of:=[.D737]-[.D736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B736]+19" office:value-type="float" office:value="13984" calcext:value-type="float">
            <text:p>13984</text:p>
          </table:table-cell>
          <table:table-cell office:value-type="float" office:value="8640000" calcext:value-type="float">
            <text:p>8640000</text:p>
          </table:table-cell>
          <table:table-cell table:formula="of:=[.B737]/[.C737]" office:value-type="float" office:value="0.00161851851851852" calcext:value-type="float">
            <text:p>0,00161851851851852000</text:p>
          </table:table-cell>
          <table:table-cell table:formula="of:=[.D738]-[.D73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B737]+19" office:value-type="float" office:value="14003" calcext:value-type="float">
            <text:p>14003</text:p>
          </table:table-cell>
          <table:table-cell office:value-type="float" office:value="8640000" calcext:value-type="float">
            <text:p>8640000</text:p>
          </table:table-cell>
          <table:table-cell table:formula="of:=[.B738]/[.C738]" office:value-type="float" office:value="0.00162071759259259" calcext:value-type="float">
            <text:p>0,00162071759259259000</text:p>
          </table:table-cell>
          <table:table-cell table:formula="of:=[.D739]-[.D738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B738]+19" office:value-type="float" office:value="14022" calcext:value-type="float">
            <text:p>14022</text:p>
          </table:table-cell>
          <table:table-cell office:value-type="float" office:value="8640000" calcext:value-type="float">
            <text:p>8640000</text:p>
          </table:table-cell>
          <table:table-cell table:formula="of:=[.B739]/[.C739]" office:value-type="float" office:value="0.00162291666666667" calcext:value-type="float">
            <text:p>0,00162291666666667000</text:p>
          </table:table-cell>
          <table:table-cell table:formula="of:=[.D740]-[.D73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B739]+19" office:value-type="float" office:value="14041" calcext:value-type="float">
            <text:p>14041</text:p>
          </table:table-cell>
          <table:table-cell office:value-type="float" office:value="8640000" calcext:value-type="float">
            <text:p>8640000</text:p>
          </table:table-cell>
          <table:table-cell table:formula="of:=[.B740]/[.C740]" office:value-type="float" office:value="0.00162511574074074" calcext:value-type="float">
            <text:p>0,00162511574074074000</text:p>
          </table:table-cell>
          <table:table-cell table:formula="of:=[.D741]-[.D740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B740]+19" office:value-type="float" office:value="14060" calcext:value-type="float">
            <text:p>14060</text:p>
          </table:table-cell>
          <table:table-cell office:value-type="float" office:value="8640000" calcext:value-type="float">
            <text:p>8640000</text:p>
          </table:table-cell>
          <table:table-cell table:formula="of:=[.B741]/[.C741]" office:value-type="float" office:value="0.00162731481481481" calcext:value-type="float">
            <text:p>0,00162731481481481000</text:p>
          </table:table-cell>
          <table:table-cell table:formula="of:=[.D742]-[.D74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B741]+19" office:value-type="float" office:value="14079" calcext:value-type="float">
            <text:p>14079</text:p>
          </table:table-cell>
          <table:table-cell office:value-type="float" office:value="8640000" calcext:value-type="float">
            <text:p>8640000</text:p>
          </table:table-cell>
          <table:table-cell table:formula="of:=[.B742]/[.C742]" office:value-type="float" office:value="0.00162951388888889" calcext:value-type="float">
            <text:p>0,00162951388888889000</text:p>
          </table:table-cell>
          <table:table-cell table:formula="of:=[.D743]-[.D74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B742]+19" office:value-type="float" office:value="14098" calcext:value-type="float">
            <text:p>14098</text:p>
          </table:table-cell>
          <table:table-cell office:value-type="float" office:value="8640000" calcext:value-type="float">
            <text:p>8640000</text:p>
          </table:table-cell>
          <table:table-cell table:formula="of:=[.B743]/[.C743]" office:value-type="float" office:value="0.00163171296296296" calcext:value-type="float">
            <text:p>0,00163171296296296000</text:p>
          </table:table-cell>
          <table:table-cell table:formula="of:=[.D744]-[.D743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B743]+19" office:value-type="float" office:value="14117" calcext:value-type="float">
            <text:p>14117</text:p>
          </table:table-cell>
          <table:table-cell office:value-type="float" office:value="8640000" calcext:value-type="float">
            <text:p>8640000</text:p>
          </table:table-cell>
          <table:table-cell table:formula="of:=[.B744]/[.C744]" office:value-type="float" office:value="0.00163391203703704" calcext:value-type="float">
            <text:p>0,00163391203703704000</text:p>
          </table:table-cell>
          <table:table-cell table:formula="of:=[.D745]-[.D74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B744]+19" office:value-type="float" office:value="14136" calcext:value-type="float">
            <text:p>14136</text:p>
          </table:table-cell>
          <table:table-cell office:value-type="float" office:value="8640000" calcext:value-type="float">
            <text:p>8640000</text:p>
          </table:table-cell>
          <table:table-cell table:formula="of:=[.B745]/[.C745]" office:value-type="float" office:value="0.00163611111111111" calcext:value-type="float">
            <text:p>0,00163611111111111000</text:p>
          </table:table-cell>
          <table:table-cell table:formula="of:=[.D746]-[.D745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B745]+19" office:value-type="float" office:value="14155" calcext:value-type="float">
            <text:p>14155</text:p>
          </table:table-cell>
          <table:table-cell office:value-type="float" office:value="8640000" calcext:value-type="float">
            <text:p>8640000</text:p>
          </table:table-cell>
          <table:table-cell table:formula="of:=[.B746]/[.C746]" office:value-type="float" office:value="0.00163831018518519" calcext:value-type="float">
            <text:p>0,00163831018518519000</text:p>
          </table:table-cell>
          <table:table-cell table:formula="of:=[.D747]-[.D74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B746]+19" office:value-type="float" office:value="14174" calcext:value-type="float">
            <text:p>14174</text:p>
          </table:table-cell>
          <table:table-cell office:value-type="float" office:value="8640000" calcext:value-type="float">
            <text:p>8640000</text:p>
          </table:table-cell>
          <table:table-cell table:formula="of:=[.B747]/[.C747]" office:value-type="float" office:value="0.00164050925925926" calcext:value-type="float">
            <text:p>0,00164050925925926000</text:p>
          </table:table-cell>
          <table:table-cell table:formula="of:=[.D748]-[.D747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B747]+19" office:value-type="float" office:value="14193" calcext:value-type="float">
            <text:p>14193</text:p>
          </table:table-cell>
          <table:table-cell office:value-type="float" office:value="8640000" calcext:value-type="float">
            <text:p>8640000</text:p>
          </table:table-cell>
          <table:table-cell table:formula="of:=[.B748]/[.C748]" office:value-type="float" office:value="0.00164270833333333" calcext:value-type="float">
            <text:p>0,00164270833333333000</text:p>
          </table:table-cell>
          <table:table-cell table:formula="of:=[.D749]-[.D74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B748]+19" office:value-type="float" office:value="14212" calcext:value-type="float">
            <text:p>14212</text:p>
          </table:table-cell>
          <table:table-cell office:value-type="float" office:value="8640000" calcext:value-type="float">
            <text:p>8640000</text:p>
          </table:table-cell>
          <table:table-cell table:formula="of:=[.B749]/[.C749]" office:value-type="float" office:value="0.00164490740740741" calcext:value-type="float">
            <text:p>0,00164490740740741000</text:p>
          </table:table-cell>
          <table:table-cell table:formula="of:=[.D750]-[.D749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B749]+19" office:value-type="float" office:value="14231" calcext:value-type="float">
            <text:p>14231</text:p>
          </table:table-cell>
          <table:table-cell office:value-type="float" office:value="8640000" calcext:value-type="float">
            <text:p>8640000</text:p>
          </table:table-cell>
          <table:table-cell table:formula="of:=[.B750]/[.C750]" office:value-type="float" office:value="0.00164710648148148" calcext:value-type="float">
            <text:p>0,00164710648148148000</text:p>
          </table:table-cell>
          <table:table-cell table:formula="of:=[.D751]-[.D75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B750]+19" office:value-type="float" office:value="14250" calcext:value-type="float">
            <text:p>14250</text:p>
          </table:table-cell>
          <table:table-cell office:value-type="float" office:value="8640000" calcext:value-type="float">
            <text:p>8640000</text:p>
          </table:table-cell>
          <table:table-cell table:formula="of:=[.B751]/[.C751]" office:value-type="float" office:value="0.00164930555555556" calcext:value-type="float">
            <text:p>0,00164930555555556000</text:p>
          </table:table-cell>
          <table:table-cell table:formula="of:=[.D752]-[.D75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B751]+19" office:value-type="float" office:value="14269" calcext:value-type="float">
            <text:p>14269</text:p>
          </table:table-cell>
          <table:table-cell office:value-type="float" office:value="8640000" calcext:value-type="float">
            <text:p>8640000</text:p>
          </table:table-cell>
          <table:table-cell table:formula="of:=[.B752]/[.C752]" office:value-type="float" office:value="0.00165150462962963" calcext:value-type="float">
            <text:p>0,00165150462962963000</text:p>
          </table:table-cell>
          <table:table-cell table:formula="of:=[.D753]-[.D752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B752]+19" office:value-type="float" office:value="14288" calcext:value-type="float">
            <text:p>14288</text:p>
          </table:table-cell>
          <table:table-cell office:value-type="float" office:value="8640000" calcext:value-type="float">
            <text:p>8640000</text:p>
          </table:table-cell>
          <table:table-cell table:formula="of:=[.B753]/[.C753]" office:value-type="float" office:value="0.0016537037037037" calcext:value-type="float">
            <text:p>0,00165370370370370000</text:p>
          </table:table-cell>
          <table:table-cell table:formula="of:=[.D754]-[.D75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B753]+19" office:value-type="float" office:value="14307" calcext:value-type="float">
            <text:p>14307</text:p>
          </table:table-cell>
          <table:table-cell office:value-type="float" office:value="8640000" calcext:value-type="float">
            <text:p>8640000</text:p>
          </table:table-cell>
          <table:table-cell table:formula="of:=[.B754]/[.C754]" office:value-type="float" office:value="0.00165590277777778" calcext:value-type="float">
            <text:p>0,00165590277777778000</text:p>
          </table:table-cell>
          <table:table-cell table:formula="of:=[.D755]-[.D754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B754]+19" office:value-type="float" office:value="14326" calcext:value-type="float">
            <text:p>14326</text:p>
          </table:table-cell>
          <table:table-cell office:value-type="float" office:value="8640000" calcext:value-type="float">
            <text:p>8640000</text:p>
          </table:table-cell>
          <table:table-cell table:formula="of:=[.B755]/[.C755]" office:value-type="float" office:value="0.00165810185185185" calcext:value-type="float">
            <text:p>0,00165810185185185000</text:p>
          </table:table-cell>
          <table:table-cell table:formula="of:=[.D756]-[.D75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B755]+19" office:value-type="float" office:value="14345" calcext:value-type="float">
            <text:p>14345</text:p>
          </table:table-cell>
          <table:table-cell office:value-type="float" office:value="8640000" calcext:value-type="float">
            <text:p>8640000</text:p>
          </table:table-cell>
          <table:table-cell table:formula="of:=[.B756]/[.C756]" office:value-type="float" office:value="0.00166030092592593" calcext:value-type="float">
            <text:p>0,00166030092592593000</text:p>
          </table:table-cell>
          <table:table-cell table:formula="of:=[.D757]-[.D756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B756]+19" office:value-type="float" office:value="14364" calcext:value-type="float">
            <text:p>14364</text:p>
          </table:table-cell>
          <table:table-cell office:value-type="float" office:value="8640000" calcext:value-type="float">
            <text:p>8640000</text:p>
          </table:table-cell>
          <table:table-cell table:formula="of:=[.B757]/[.C757]" office:value-type="float" office:value="0.0016625" calcext:value-type="float">
            <text:p>0,00166250000000000000</text:p>
          </table:table-cell>
          <table:table-cell table:formula="of:=[.D758]-[.D75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B757]+19" office:value-type="float" office:value="14383" calcext:value-type="float">
            <text:p>14383</text:p>
          </table:table-cell>
          <table:table-cell office:value-type="float" office:value="8640000" calcext:value-type="float">
            <text:p>8640000</text:p>
          </table:table-cell>
          <table:table-cell table:formula="of:=[.B758]/[.C758]" office:value-type="float" office:value="0.00166469907407407" calcext:value-type="float">
            <text:p>0,00166469907407407000</text:p>
          </table:table-cell>
          <table:table-cell table:formula="of:=[.D759]-[.D75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B758]+19" office:value-type="float" office:value="14402" calcext:value-type="float">
            <text:p>14402</text:p>
          </table:table-cell>
          <table:table-cell office:value-type="float" office:value="8640000" calcext:value-type="float">
            <text:p>8640000</text:p>
          </table:table-cell>
          <table:table-cell table:formula="of:=[.B759]/[.C759]" office:value-type="float" office:value="0.00166689814814815" calcext:value-type="float">
            <text:p>0,00166689814814815000</text:p>
          </table:table-cell>
          <table:table-cell table:formula="of:=[.D760]-[.D759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B759]+19" office:value-type="float" office:value="14421" calcext:value-type="float">
            <text:p>14421</text:p>
          </table:table-cell>
          <table:table-cell office:value-type="float" office:value="8640000" calcext:value-type="float">
            <text:p>8640000</text:p>
          </table:table-cell>
          <table:table-cell table:formula="of:=[.B760]/[.C760]" office:value-type="float" office:value="0.00166909722222222" calcext:value-type="float">
            <text:p>0,00166909722222222000</text:p>
          </table:table-cell>
          <table:table-cell table:formula="of:=[.D761]-[.D76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B760]+19" office:value-type="float" office:value="14440" calcext:value-type="float">
            <text:p>14440</text:p>
          </table:table-cell>
          <table:table-cell office:value-type="float" office:value="8640000" calcext:value-type="float">
            <text:p>8640000</text:p>
          </table:table-cell>
          <table:table-cell table:formula="of:=[.B761]/[.C761]" office:value-type="float" office:value="0.0016712962962963" calcext:value-type="float">
            <text:p>0,00167129629629630000</text:p>
          </table:table-cell>
          <table:table-cell table:formula="of:=[.D762]-[.D761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B761]+19" office:value-type="float" office:value="14459" calcext:value-type="float">
            <text:p>14459</text:p>
          </table:table-cell>
          <table:table-cell office:value-type="float" office:value="8640000" calcext:value-type="float">
            <text:p>8640000</text:p>
          </table:table-cell>
          <table:table-cell table:formula="of:=[.B762]/[.C762]" office:value-type="float" office:value="0.00167349537037037" calcext:value-type="float">
            <text:p>0,00167349537037037000</text:p>
          </table:table-cell>
          <table:table-cell table:formula="of:=[.D763]-[.D76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B762]+19" office:value-type="float" office:value="14478" calcext:value-type="float">
            <text:p>14478</text:p>
          </table:table-cell>
          <table:table-cell office:value-type="float" office:value="8640000" calcext:value-type="float">
            <text:p>8640000</text:p>
          </table:table-cell>
          <table:table-cell table:formula="of:=[.B763]/[.C763]" office:value-type="float" office:value="0.00167569444444444" calcext:value-type="float">
            <text:p>0,00167569444444444000</text:p>
          </table:table-cell>
          <table:table-cell table:formula="of:=[.D764]-[.D763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B763]+19" office:value-type="float" office:value="14497" calcext:value-type="float">
            <text:p>14497</text:p>
          </table:table-cell>
          <table:table-cell office:value-type="float" office:value="8640000" calcext:value-type="float">
            <text:p>8640000</text:p>
          </table:table-cell>
          <table:table-cell table:formula="of:=[.B764]/[.C764]" office:value-type="float" office:value="0.00167789351851852" calcext:value-type="float">
            <text:p>0,00167789351851852000</text:p>
          </table:table-cell>
          <table:table-cell table:formula="of:=[.D765]-[.D76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B764]+19" office:value-type="float" office:value="14516" calcext:value-type="float">
            <text:p>14516</text:p>
          </table:table-cell>
          <table:table-cell office:value-type="float" office:value="8640000" calcext:value-type="float">
            <text:p>8640000</text:p>
          </table:table-cell>
          <table:table-cell table:formula="of:=[.B765]/[.C765]" office:value-type="float" office:value="0.00168009259259259" calcext:value-type="float">
            <text:p>0,00168009259259259000</text:p>
          </table:table-cell>
          <table:table-cell table:formula="of:=[.D766]-[.D765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B765]+19" office:value-type="float" office:value="14535" calcext:value-type="float">
            <text:p>14535</text:p>
          </table:table-cell>
          <table:table-cell office:value-type="float" office:value="8640000" calcext:value-type="float">
            <text:p>8640000</text:p>
          </table:table-cell>
          <table:table-cell table:formula="of:=[.B766]/[.C766]" office:value-type="float" office:value="0.00168229166666667" calcext:value-type="float">
            <text:p>0,00168229166666667000</text:p>
          </table:table-cell>
          <table:table-cell table:formula="of:=[.D767]-[.D76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B766]+19" office:value-type="float" office:value="14554" calcext:value-type="float">
            <text:p>14554</text:p>
          </table:table-cell>
          <table:table-cell office:value-type="float" office:value="8640000" calcext:value-type="float">
            <text:p>8640000</text:p>
          </table:table-cell>
          <table:table-cell table:formula="of:=[.B767]/[.C767]" office:value-type="float" office:value="0.00168449074074074" calcext:value-type="float">
            <text:p>0,00168449074074074000</text:p>
          </table:table-cell>
          <table:table-cell table:formula="of:=[.D768]-[.D76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B767]+19" office:value-type="float" office:value="14573" calcext:value-type="float">
            <text:p>14573</text:p>
          </table:table-cell>
          <table:table-cell office:value-type="float" office:value="8640000" calcext:value-type="float">
            <text:p>8640000</text:p>
          </table:table-cell>
          <table:table-cell table:formula="of:=[.B768]/[.C768]" office:value-type="float" office:value="0.00168668981481482" calcext:value-type="float">
            <text:p>0,00168668981481482000</text:p>
          </table:table-cell>
          <table:table-cell table:formula="of:=[.D769]-[.D768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B768]+19" office:value-type="float" office:value="14592" calcext:value-type="float">
            <text:p>14592</text:p>
          </table:table-cell>
          <table:table-cell office:value-type="float" office:value="8640000" calcext:value-type="float">
            <text:p>8640000</text:p>
          </table:table-cell>
          <table:table-cell table:formula="of:=[.B769]/[.C769]" office:value-type="float" office:value="0.00168888888888889" calcext:value-type="float">
            <text:p>0,00168888888888889000</text:p>
          </table:table-cell>
          <table:table-cell table:formula="of:=[.D770]-[.D76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B769]+19" office:value-type="float" office:value="14611" calcext:value-type="float">
            <text:p>14611</text:p>
          </table:table-cell>
          <table:table-cell office:value-type="float" office:value="8640000" calcext:value-type="float">
            <text:p>8640000</text:p>
          </table:table-cell>
          <table:table-cell table:formula="of:=[.B770]/[.C770]" office:value-type="float" office:value="0.00169108796296296" calcext:value-type="float">
            <text:p>0,00169108796296296000</text:p>
          </table:table-cell>
          <table:table-cell table:formula="of:=[.D771]-[.D770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B770]+19" office:value-type="float" office:value="14630" calcext:value-type="float">
            <text:p>14630</text:p>
          </table:table-cell>
          <table:table-cell office:value-type="float" office:value="8640000" calcext:value-type="float">
            <text:p>8640000</text:p>
          </table:table-cell>
          <table:table-cell table:formula="of:=[.B771]/[.C771]" office:value-type="float" office:value="0.00169328703703704" calcext:value-type="float">
            <text:p>0,00169328703703704000</text:p>
          </table:table-cell>
          <table:table-cell table:formula="of:=[.D772]-[.D77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B771]+19" office:value-type="float" office:value="14649" calcext:value-type="float">
            <text:p>14649</text:p>
          </table:table-cell>
          <table:table-cell office:value-type="float" office:value="8640000" calcext:value-type="float">
            <text:p>8640000</text:p>
          </table:table-cell>
          <table:table-cell table:formula="of:=[.B772]/[.C772]" office:value-type="float" office:value="0.00169548611111111" calcext:value-type="float">
            <text:p>0,00169548611111111000</text:p>
          </table:table-cell>
          <table:table-cell table:formula="of:=[.D773]-[.D772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B772]+19" office:value-type="float" office:value="14668" calcext:value-type="float">
            <text:p>14668</text:p>
          </table:table-cell>
          <table:table-cell office:value-type="float" office:value="8640000" calcext:value-type="float">
            <text:p>8640000</text:p>
          </table:table-cell>
          <table:table-cell table:formula="of:=[.B773]/[.C773]" office:value-type="float" office:value="0.00169768518518519" calcext:value-type="float">
            <text:p>0,00169768518518518000</text:p>
          </table:table-cell>
          <table:table-cell table:formula="of:=[.D774]-[.D77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B773]+19" office:value-type="float" office:value="14687" calcext:value-type="float">
            <text:p>14687</text:p>
          </table:table-cell>
          <table:table-cell office:value-type="float" office:value="8640000" calcext:value-type="float">
            <text:p>8640000</text:p>
          </table:table-cell>
          <table:table-cell table:formula="of:=[.B774]/[.C774]" office:value-type="float" office:value="0.00169988425925926" calcext:value-type="float">
            <text:p>0,00169988425925926000</text:p>
          </table:table-cell>
          <table:table-cell table:formula="of:=[.D775]-[.D774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B774]+19" office:value-type="float" office:value="14706" calcext:value-type="float">
            <text:p>14706</text:p>
          </table:table-cell>
          <table:table-cell office:value-type="float" office:value="8640000" calcext:value-type="float">
            <text:p>8640000</text:p>
          </table:table-cell>
          <table:table-cell table:formula="of:=[.B775]/[.C775]" office:value-type="float" office:value="0.00170208333333333" calcext:value-type="float">
            <text:p>0,00170208333333333000</text:p>
          </table:table-cell>
          <table:table-cell table:formula="of:=[.D776]-[.D77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B775]+19" office:value-type="float" office:value="14725" calcext:value-type="float">
            <text:p>14725</text:p>
          </table:table-cell>
          <table:table-cell office:value-type="float" office:value="8640000" calcext:value-type="float">
            <text:p>8640000</text:p>
          </table:table-cell>
          <table:table-cell table:formula="of:=[.B776]/[.C776]" office:value-type="float" office:value="0.00170428240740741" calcext:value-type="float">
            <text:p>0,00170428240740741000</text:p>
          </table:table-cell>
          <table:table-cell table:formula="of:=[.D777]-[.D77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B776]+19" office:value-type="float" office:value="14744" calcext:value-type="float">
            <text:p>14744</text:p>
          </table:table-cell>
          <table:table-cell office:value-type="float" office:value="8640000" calcext:value-type="float">
            <text:p>8640000</text:p>
          </table:table-cell>
          <table:table-cell table:formula="of:=[.B777]/[.C777]" office:value-type="float" office:value="0.00170648148148148" calcext:value-type="float">
            <text:p>0,00170648148148148000</text:p>
          </table:table-cell>
          <table:table-cell table:formula="of:=[.D778]-[.D777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B777]+19" office:value-type="float" office:value="14763" calcext:value-type="float">
            <text:p>14763</text:p>
          </table:table-cell>
          <table:table-cell office:value-type="float" office:value="8640000" calcext:value-type="float">
            <text:p>8640000</text:p>
          </table:table-cell>
          <table:table-cell table:formula="of:=[.B778]/[.C778]" office:value-type="float" office:value="0.00170868055555556" calcext:value-type="float">
            <text:p>0,00170868055555556000</text:p>
          </table:table-cell>
          <table:table-cell table:formula="of:=[.D779]-[.D77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B778]+19" office:value-type="float" office:value="14782" calcext:value-type="float">
            <text:p>14782</text:p>
          </table:table-cell>
          <table:table-cell office:value-type="float" office:value="8640000" calcext:value-type="float">
            <text:p>8640000</text:p>
          </table:table-cell>
          <table:table-cell table:formula="of:=[.B779]/[.C779]" office:value-type="float" office:value="0.00171087962962963" calcext:value-type="float">
            <text:p>0,00171087962962963000</text:p>
          </table:table-cell>
          <table:table-cell table:formula="of:=[.D780]-[.D779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B779]+19" office:value-type="float" office:value="14801" calcext:value-type="float">
            <text:p>14801</text:p>
          </table:table-cell>
          <table:table-cell office:value-type="float" office:value="8640000" calcext:value-type="float">
            <text:p>8640000</text:p>
          </table:table-cell>
          <table:table-cell table:formula="of:=[.B780]/[.C780]" office:value-type="float" office:value="0.0017130787037037" calcext:value-type="float">
            <text:p>0,00171307870370370000</text:p>
          </table:table-cell>
          <table:table-cell table:formula="of:=[.D781]-[.D78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B780]+19" office:value-type="float" office:value="14820" calcext:value-type="float">
            <text:p>14820</text:p>
          </table:table-cell>
          <table:table-cell office:value-type="float" office:value="8640000" calcext:value-type="float">
            <text:p>8640000</text:p>
          </table:table-cell>
          <table:table-cell table:formula="of:=[.B781]/[.C781]" office:value-type="float" office:value="0.00171527777777778" calcext:value-type="float">
            <text:p>0,00171527777777778000</text:p>
          </table:table-cell>
          <table:table-cell table:formula="of:=[.D782]-[.D781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B781]+19" office:value-type="float" office:value="14839" calcext:value-type="float">
            <text:p>14839</text:p>
          </table:table-cell>
          <table:table-cell office:value-type="float" office:value="8640000" calcext:value-type="float">
            <text:p>8640000</text:p>
          </table:table-cell>
          <table:table-cell table:formula="of:=[.B782]/[.C782]" office:value-type="float" office:value="0.00171747685185185" calcext:value-type="float">
            <text:p>0,00171747685185185000</text:p>
          </table:table-cell>
          <table:table-cell table:formula="of:=[.D783]-[.D78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B782]+19" office:value-type="float" office:value="14858" calcext:value-type="float">
            <text:p>14858</text:p>
          </table:table-cell>
          <table:table-cell office:value-type="float" office:value="8640000" calcext:value-type="float">
            <text:p>8640000</text:p>
          </table:table-cell>
          <table:table-cell table:formula="of:=[.B783]/[.C783]" office:value-type="float" office:value="0.00171967592592593" calcext:value-type="float">
            <text:p>0,00171967592592593000</text:p>
          </table:table-cell>
          <table:table-cell table:formula="of:=[.D784]-[.D78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B783]+19" office:value-type="float" office:value="14877" calcext:value-type="float">
            <text:p>14877</text:p>
          </table:table-cell>
          <table:table-cell office:value-type="float" office:value="8640000" calcext:value-type="float">
            <text:p>8640000</text:p>
          </table:table-cell>
          <table:table-cell table:formula="of:=[.B784]/[.C784]" office:value-type="float" office:value="0.001721875" calcext:value-type="float">
            <text:p>0,00172187500000000000</text:p>
          </table:table-cell>
          <table:table-cell table:formula="of:=[.D785]-[.D784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B784]+19" office:value-type="float" office:value="14896" calcext:value-type="float">
            <text:p>14896</text:p>
          </table:table-cell>
          <table:table-cell office:value-type="float" office:value="8640000" calcext:value-type="float">
            <text:p>8640000</text:p>
          </table:table-cell>
          <table:table-cell table:formula="of:=[.B785]/[.C785]" office:value-type="float" office:value="0.00172407407407407" calcext:value-type="float">
            <text:p>0,00172407407407407000</text:p>
          </table:table-cell>
          <table:table-cell table:formula="of:=[.D786]-[.D78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B785]+19" office:value-type="float" office:value="14915" calcext:value-type="float">
            <text:p>14915</text:p>
          </table:table-cell>
          <table:table-cell office:value-type="float" office:value="8640000" calcext:value-type="float">
            <text:p>8640000</text:p>
          </table:table-cell>
          <table:table-cell table:formula="of:=[.B786]/[.C786]" office:value-type="float" office:value="0.00172627314814815" calcext:value-type="float">
            <text:p>0,00172627314814815000</text:p>
          </table:table-cell>
          <table:table-cell table:formula="of:=[.D787]-[.D786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B786]+19" office:value-type="float" office:value="14934" calcext:value-type="float">
            <text:p>14934</text:p>
          </table:table-cell>
          <table:table-cell office:value-type="float" office:value="8640000" calcext:value-type="float">
            <text:p>8640000</text:p>
          </table:table-cell>
          <table:table-cell table:formula="of:=[.B787]/[.C787]" office:value-type="float" office:value="0.00172847222222222" calcext:value-type="float">
            <text:p>0,00172847222222222000</text:p>
          </table:table-cell>
          <table:table-cell table:formula="of:=[.D788]-[.D78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B787]+19" office:value-type="float" office:value="14953" calcext:value-type="float">
            <text:p>14953</text:p>
          </table:table-cell>
          <table:table-cell office:value-type="float" office:value="8640000" calcext:value-type="float">
            <text:p>8640000</text:p>
          </table:table-cell>
          <table:table-cell table:formula="of:=[.B788]/[.C788]" office:value-type="float" office:value="0.0017306712962963" calcext:value-type="float">
            <text:p>0,00173067129629630000</text:p>
          </table:table-cell>
          <table:table-cell table:formula="of:=[.D789]-[.D788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B788]+19" office:value-type="float" office:value="14972" calcext:value-type="float">
            <text:p>14972</text:p>
          </table:table-cell>
          <table:table-cell office:value-type="float" office:value="8640000" calcext:value-type="float">
            <text:p>8640000</text:p>
          </table:table-cell>
          <table:table-cell table:formula="of:=[.B789]/[.C789]" office:value-type="float" office:value="0.00173287037037037" calcext:value-type="float">
            <text:p>0,00173287037037037000</text:p>
          </table:table-cell>
          <table:table-cell table:formula="of:=[.D790]-[.D78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B789]+19" office:value-type="float" office:value="14991" calcext:value-type="float">
            <text:p>14991</text:p>
          </table:table-cell>
          <table:table-cell office:value-type="float" office:value="8640000" calcext:value-type="float">
            <text:p>8640000</text:p>
          </table:table-cell>
          <table:table-cell table:formula="of:=[.B790]/[.C790]" office:value-type="float" office:value="0.00173506944444444" calcext:value-type="float">
            <text:p>0,00173506944444444000</text:p>
          </table:table-cell>
          <table:table-cell table:formula="of:=[.D791]-[.D790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B790]+19" office:value-type="float" office:value="15010" calcext:value-type="float">
            <text:p>15010</text:p>
          </table:table-cell>
          <table:table-cell office:value-type="float" office:value="8640000" calcext:value-type="float">
            <text:p>8640000</text:p>
          </table:table-cell>
          <table:table-cell table:formula="of:=[.B791]/[.C791]" office:value-type="float" office:value="0.00173726851851852" calcext:value-type="float">
            <text:p>0,00173726851851852000</text:p>
          </table:table-cell>
          <table:table-cell table:formula="of:=[.D792]-[.D79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B791]+19" office:value-type="float" office:value="15029" calcext:value-type="float">
            <text:p>15029</text:p>
          </table:table-cell>
          <table:table-cell office:value-type="float" office:value="8640000" calcext:value-type="float">
            <text:p>8640000</text:p>
          </table:table-cell>
          <table:table-cell table:formula="of:=[.B792]/[.C792]" office:value-type="float" office:value="0.00173946759259259" calcext:value-type="float">
            <text:p>0,00173946759259259000</text:p>
          </table:table-cell>
          <table:table-cell table:formula="of:=[.D793]-[.D79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B792]+19" office:value-type="float" office:value="15048" calcext:value-type="float">
            <text:p>15048</text:p>
          </table:table-cell>
          <table:table-cell office:value-type="float" office:value="8640000" calcext:value-type="float">
            <text:p>8640000</text:p>
          </table:table-cell>
          <table:table-cell table:formula="of:=[.B793]/[.C793]" office:value-type="float" office:value="0.00174166666666667" calcext:value-type="float">
            <text:p>0,00174166666666667000</text:p>
          </table:table-cell>
          <table:table-cell table:formula="of:=[.D794]-[.D793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B793]+19" office:value-type="float" office:value="15067" calcext:value-type="float">
            <text:p>15067</text:p>
          </table:table-cell>
          <table:table-cell office:value-type="float" office:value="8640000" calcext:value-type="float">
            <text:p>8640000</text:p>
          </table:table-cell>
          <table:table-cell table:formula="of:=[.B794]/[.C794]" office:value-type="float" office:value="0.00174386574074074" calcext:value-type="float">
            <text:p>0,00174386574074074000</text:p>
          </table:table-cell>
          <table:table-cell table:formula="of:=[.D795]-[.D79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B794]+19" office:value-type="float" office:value="15086" calcext:value-type="float">
            <text:p>15086</text:p>
          </table:table-cell>
          <table:table-cell office:value-type="float" office:value="8640000" calcext:value-type="float">
            <text:p>8640000</text:p>
          </table:table-cell>
          <table:table-cell table:formula="of:=[.B795]/[.C795]" office:value-type="float" office:value="0.00174606481481481" calcext:value-type="float">
            <text:p>0,00174606481481481000</text:p>
          </table:table-cell>
          <table:table-cell table:formula="of:=[.D796]-[.D795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B795]+19" office:value-type="float" office:value="15105" calcext:value-type="float">
            <text:p>15105</text:p>
          </table:table-cell>
          <table:table-cell office:value-type="float" office:value="8640000" calcext:value-type="float">
            <text:p>8640000</text:p>
          </table:table-cell>
          <table:table-cell table:formula="of:=[.B796]/[.C796]" office:value-type="float" office:value="0.00174826388888889" calcext:value-type="float">
            <text:p>0,00174826388888889000</text:p>
          </table:table-cell>
          <table:table-cell table:formula="of:=[.D797]-[.D79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B796]+19" office:value-type="float" office:value="15124" calcext:value-type="float">
            <text:p>15124</text:p>
          </table:table-cell>
          <table:table-cell office:value-type="float" office:value="8640000" calcext:value-type="float">
            <text:p>8640000</text:p>
          </table:table-cell>
          <table:table-cell table:formula="of:=[.B797]/[.C797]" office:value-type="float" office:value="0.00175046296296296" calcext:value-type="float">
            <text:p>0,00175046296296296000</text:p>
          </table:table-cell>
          <table:table-cell table:formula="of:=[.D798]-[.D797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B797]+19" office:value-type="float" office:value="15143" calcext:value-type="float">
            <text:p>15143</text:p>
          </table:table-cell>
          <table:table-cell office:value-type="float" office:value="8640000" calcext:value-type="float">
            <text:p>8640000</text:p>
          </table:table-cell>
          <table:table-cell table:formula="of:=[.B798]/[.C798]" office:value-type="float" office:value="0.00175266203703704" calcext:value-type="float">
            <text:p>0,00175266203703704000</text:p>
          </table:table-cell>
          <table:table-cell table:formula="of:=[.D799]-[.D79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B798]+19" office:value-type="float" office:value="15162" calcext:value-type="float">
            <text:p>15162</text:p>
          </table:table-cell>
          <table:table-cell office:value-type="float" office:value="8640000" calcext:value-type="float">
            <text:p>8640000</text:p>
          </table:table-cell>
          <table:table-cell table:formula="of:=[.B799]/[.C799]" office:value-type="float" office:value="0.00175486111111111" calcext:value-type="float">
            <text:p>0,00175486111111111000</text:p>
          </table:table-cell>
          <table:table-cell table:formula="of:=[.D800]-[.D79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B799]+19" office:value-type="float" office:value="15181" calcext:value-type="float">
            <text:p>15181</text:p>
          </table:table-cell>
          <table:table-cell office:value-type="float" office:value="8640000" calcext:value-type="float">
            <text:p>8640000</text:p>
          </table:table-cell>
          <table:table-cell table:formula="of:=[.B800]/[.C800]" office:value-type="float" office:value="0.00175706018518519" calcext:value-type="float">
            <text:p>0,00175706018518519000</text:p>
          </table:table-cell>
          <table:table-cell table:formula="of:=[.D801]-[.D800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B800]+19" office:value-type="float" office:value="15200" calcext:value-type="float">
            <text:p>15200</text:p>
          </table:table-cell>
          <table:table-cell office:value-type="float" office:value="8640000" calcext:value-type="float">
            <text:p>8640000</text:p>
          </table:table-cell>
          <table:table-cell table:formula="of:=[.B801]/[.C801]" office:value-type="float" office:value="0.00175925925925926" calcext:value-type="float">
            <text:p>0,00175925925925926000</text:p>
          </table:table-cell>
          <table:table-cell table:formula="of:=[.D802]-[.D80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B801]+19" office:value-type="float" office:value="15219" calcext:value-type="float">
            <text:p>15219</text:p>
          </table:table-cell>
          <table:table-cell office:value-type="float" office:value="8640000" calcext:value-type="float">
            <text:p>8640000</text:p>
          </table:table-cell>
          <table:table-cell table:formula="of:=[.B802]/[.C802]" office:value-type="float" office:value="0.00176145833333333" calcext:value-type="float">
            <text:p>0,00176145833333333000</text:p>
          </table:table-cell>
          <table:table-cell table:formula="of:=[.D803]-[.D802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B802]+19" office:value-type="float" office:value="15238" calcext:value-type="float">
            <text:p>15238</text:p>
          </table:table-cell>
          <table:table-cell office:value-type="float" office:value="8640000" calcext:value-type="float">
            <text:p>8640000</text:p>
          </table:table-cell>
          <table:table-cell table:formula="of:=[.B803]/[.C803]" office:value-type="float" office:value="0.00176365740740741" calcext:value-type="float">
            <text:p>0,00176365740740741000</text:p>
          </table:table-cell>
          <table:table-cell table:formula="of:=[.D804]-[.D80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B803]+19" office:value-type="float" office:value="15257" calcext:value-type="float">
            <text:p>15257</text:p>
          </table:table-cell>
          <table:table-cell office:value-type="float" office:value="8640000" calcext:value-type="float">
            <text:p>8640000</text:p>
          </table:table-cell>
          <table:table-cell table:formula="of:=[.B804]/[.C804]" office:value-type="float" office:value="0.00176585648148148" calcext:value-type="float">
            <text:p>0,00176585648148148000</text:p>
          </table:table-cell>
          <table:table-cell table:formula="of:=[.D805]-[.D804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B804]+19" office:value-type="float" office:value="15276" calcext:value-type="float">
            <text:p>15276</text:p>
          </table:table-cell>
          <table:table-cell office:value-type="float" office:value="8640000" calcext:value-type="float">
            <text:p>8640000</text:p>
          </table:table-cell>
          <table:table-cell table:formula="of:=[.B805]/[.C805]" office:value-type="float" office:value="0.00176805555555556" calcext:value-type="float">
            <text:p>0,00176805555555556000</text:p>
          </table:table-cell>
          <table:table-cell table:formula="of:=[.D806]-[.D80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B805]+19" office:value-type="float" office:value="15295" calcext:value-type="float">
            <text:p>15295</text:p>
          </table:table-cell>
          <table:table-cell office:value-type="float" office:value="8640000" calcext:value-type="float">
            <text:p>8640000</text:p>
          </table:table-cell>
          <table:table-cell table:formula="of:=[.B806]/[.C806]" office:value-type="float" office:value="0.00177025462962963" calcext:value-type="float">
            <text:p>0,00177025462962963000</text:p>
          </table:table-cell>
          <table:table-cell table:formula="of:=[.D807]-[.D806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B806]+19" office:value-type="float" office:value="15314" calcext:value-type="float">
            <text:p>15314</text:p>
          </table:table-cell>
          <table:table-cell office:value-type="float" office:value="8640000" calcext:value-type="float">
            <text:p>8640000</text:p>
          </table:table-cell>
          <table:table-cell table:formula="of:=[.B807]/[.C807]" office:value-type="float" office:value="0.0017724537037037" calcext:value-type="float">
            <text:p>0,00177245370370370000</text:p>
          </table:table-cell>
          <table:table-cell table:formula="of:=[.D808]-[.D80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B807]+19" office:value-type="float" office:value="15333" calcext:value-type="float">
            <text:p>15333</text:p>
          </table:table-cell>
          <table:table-cell office:value-type="float" office:value="8640000" calcext:value-type="float">
            <text:p>8640000</text:p>
          </table:table-cell>
          <table:table-cell table:formula="of:=[.B808]/[.C808]" office:value-type="float" office:value="0.00177465277777778" calcext:value-type="float">
            <text:p>0,00177465277777778000</text:p>
          </table:table-cell>
          <table:table-cell table:formula="of:=[.D809]-[.D80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B808]+19" office:value-type="float" office:value="15352" calcext:value-type="float">
            <text:p>15352</text:p>
          </table:table-cell>
          <table:table-cell office:value-type="float" office:value="8640000" calcext:value-type="float">
            <text:p>8640000</text:p>
          </table:table-cell>
          <table:table-cell table:formula="of:=[.B809]/[.C809]" office:value-type="float" office:value="0.00177685185185185" calcext:value-type="float">
            <text:p>0,00177685185185185000</text:p>
          </table:table-cell>
          <table:table-cell table:formula="of:=[.D810]-[.D809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B809]+19" office:value-type="float" office:value="15371" calcext:value-type="float">
            <text:p>15371</text:p>
          </table:table-cell>
          <table:table-cell office:value-type="float" office:value="8640000" calcext:value-type="float">
            <text:p>8640000</text:p>
          </table:table-cell>
          <table:table-cell table:formula="of:=[.B810]/[.C810]" office:value-type="float" office:value="0.00177905092592593" calcext:value-type="float">
            <text:p>0,00177905092592593000</text:p>
          </table:table-cell>
          <table:table-cell table:formula="of:=[.D811]-[.D81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B810]+19" office:value-type="float" office:value="15390" calcext:value-type="float">
            <text:p>15390</text:p>
          </table:table-cell>
          <table:table-cell office:value-type="float" office:value="8640000" calcext:value-type="float">
            <text:p>8640000</text:p>
          </table:table-cell>
          <table:table-cell table:formula="of:=[.B811]/[.C811]" office:value-type="float" office:value="0.00178125" calcext:value-type="float">
            <text:p>0,00178125000000000000</text:p>
          </table:table-cell>
          <table:table-cell table:formula="of:=[.D812]-[.D811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B811]+19" office:value-type="float" office:value="15409" calcext:value-type="float">
            <text:p>15409</text:p>
          </table:table-cell>
          <table:table-cell office:value-type="float" office:value="8640000" calcext:value-type="float">
            <text:p>8640000</text:p>
          </table:table-cell>
          <table:table-cell table:formula="of:=[.B812]/[.C812]" office:value-type="float" office:value="0.00178344907407407" calcext:value-type="float">
            <text:p>0,00178344907407407000</text:p>
          </table:table-cell>
          <table:table-cell table:formula="of:=[.D813]-[.D81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B812]+19" office:value-type="float" office:value="15428" calcext:value-type="float">
            <text:p>15428</text:p>
          </table:table-cell>
          <table:table-cell office:value-type="float" office:value="8640000" calcext:value-type="float">
            <text:p>8640000</text:p>
          </table:table-cell>
          <table:table-cell table:formula="of:=[.B813]/[.C813]" office:value-type="float" office:value="0.00178564814814815" calcext:value-type="float">
            <text:p>0,00178564814814815000</text:p>
          </table:table-cell>
          <table:table-cell table:formula="of:=[.D814]-[.D813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B813]+19" office:value-type="float" office:value="15447" calcext:value-type="float">
            <text:p>15447</text:p>
          </table:table-cell>
          <table:table-cell office:value-type="float" office:value="8640000" calcext:value-type="float">
            <text:p>8640000</text:p>
          </table:table-cell>
          <table:table-cell table:formula="of:=[.B814]/[.C814]" office:value-type="float" office:value="0.00178784722222222" calcext:value-type="float">
            <text:p>0,00178784722222222000</text:p>
          </table:table-cell>
          <table:table-cell table:formula="of:=[.D815]-[.D81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B814]+19" office:value-type="float" office:value="15466" calcext:value-type="float">
            <text:p>15466</text:p>
          </table:table-cell>
          <table:table-cell office:value-type="float" office:value="8640000" calcext:value-type="float">
            <text:p>8640000</text:p>
          </table:table-cell>
          <table:table-cell table:formula="of:=[.B815]/[.C815]" office:value-type="float" office:value="0.0017900462962963" calcext:value-type="float">
            <text:p>0,00179004629629630000</text:p>
          </table:table-cell>
          <table:table-cell table:formula="of:=[.D816]-[.D81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B815]+19" office:value-type="float" office:value="15485" calcext:value-type="float">
            <text:p>15485</text:p>
          </table:table-cell>
          <table:table-cell office:value-type="float" office:value="8640000" calcext:value-type="float">
            <text:p>8640000</text:p>
          </table:table-cell>
          <table:table-cell table:formula="of:=[.B816]/[.C816]" office:value-type="float" office:value="0.00179224537037037" calcext:value-type="float">
            <text:p>0,00179224537037037000</text:p>
          </table:table-cell>
          <table:table-cell table:formula="of:=[.D817]-[.D816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B816]+19" office:value-type="float" office:value="15504" calcext:value-type="float">
            <text:p>15504</text:p>
          </table:table-cell>
          <table:table-cell office:value-type="float" office:value="8640000" calcext:value-type="float">
            <text:p>8640000</text:p>
          </table:table-cell>
          <table:table-cell table:formula="of:=[.B817]/[.C817]" office:value-type="float" office:value="0.00179444444444444" calcext:value-type="float">
            <text:p>0,00179444444444444000</text:p>
          </table:table-cell>
          <table:table-cell table:formula="of:=[.D818]-[.D81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B817]+19" office:value-type="float" office:value="15523" calcext:value-type="float">
            <text:p>15523</text:p>
          </table:table-cell>
          <table:table-cell office:value-type="float" office:value="8640000" calcext:value-type="float">
            <text:p>8640000</text:p>
          </table:table-cell>
          <table:table-cell table:formula="of:=[.B818]/[.C818]" office:value-type="float" office:value="0.00179664351851852" calcext:value-type="float">
            <text:p>0,00179664351851852000</text:p>
          </table:table-cell>
          <table:table-cell table:formula="of:=[.D819]-[.D818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B818]+19" office:value-type="float" office:value="15542" calcext:value-type="float">
            <text:p>15542</text:p>
          </table:table-cell>
          <table:table-cell office:value-type="float" office:value="8640000" calcext:value-type="float">
            <text:p>8640000</text:p>
          </table:table-cell>
          <table:table-cell table:formula="of:=[.B819]/[.C819]" office:value-type="float" office:value="0.00179884259259259" calcext:value-type="float">
            <text:p>0,00179884259259259000</text:p>
          </table:table-cell>
          <table:table-cell table:formula="of:=[.D820]-[.D81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B819]+19" office:value-type="float" office:value="15561" calcext:value-type="float">
            <text:p>15561</text:p>
          </table:table-cell>
          <table:table-cell office:value-type="float" office:value="8640000" calcext:value-type="float">
            <text:p>8640000</text:p>
          </table:table-cell>
          <table:table-cell table:formula="of:=[.B820]/[.C820]" office:value-type="float" office:value="0.00180104166666667" calcext:value-type="float">
            <text:p>0,00180104166666667000</text:p>
          </table:table-cell>
          <table:table-cell table:formula="of:=[.D821]-[.D820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B820]+19" office:value-type="float" office:value="15580" calcext:value-type="float">
            <text:p>15580</text:p>
          </table:table-cell>
          <table:table-cell office:value-type="float" office:value="8640000" calcext:value-type="float">
            <text:p>8640000</text:p>
          </table:table-cell>
          <table:table-cell table:formula="of:=[.B821]/[.C821]" office:value-type="float" office:value="0.00180324074074074" calcext:value-type="float">
            <text:p>0,00180324074074074000</text:p>
          </table:table-cell>
          <table:table-cell table:formula="of:=[.D822]-[.D82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B821]+19" office:value-type="float" office:value="15599" calcext:value-type="float">
            <text:p>15599</text:p>
          </table:table-cell>
          <table:table-cell office:value-type="float" office:value="8640000" calcext:value-type="float">
            <text:p>8640000</text:p>
          </table:table-cell>
          <table:table-cell table:formula="of:=[.B822]/[.C822]" office:value-type="float" office:value="0.00180543981481481" calcext:value-type="float">
            <text:p>0,00180543981481481000</text:p>
          </table:table-cell>
          <table:table-cell table:formula="of:=[.D823]-[.D822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B822]+19" office:value-type="float" office:value="15618" calcext:value-type="float">
            <text:p>15618</text:p>
          </table:table-cell>
          <table:table-cell office:value-type="float" office:value="8640000" calcext:value-type="float">
            <text:p>8640000</text:p>
          </table:table-cell>
          <table:table-cell table:formula="of:=[.B823]/[.C823]" office:value-type="float" office:value="0.00180763888888889" calcext:value-type="float">
            <text:p>0,00180763888888889000</text:p>
          </table:table-cell>
          <table:table-cell table:formula="of:=[.D824]-[.D82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B823]+19" office:value-type="float" office:value="15637" calcext:value-type="float">
            <text:p>15637</text:p>
          </table:table-cell>
          <table:table-cell office:value-type="float" office:value="8640000" calcext:value-type="float">
            <text:p>8640000</text:p>
          </table:table-cell>
          <table:table-cell table:formula="of:=[.B824]/[.C824]" office:value-type="float" office:value="0.00180983796296296" calcext:value-type="float">
            <text:p>0,00180983796296296000</text:p>
          </table:table-cell>
          <table:table-cell table:formula="of:=[.D825]-[.D82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B824]+19" office:value-type="float" office:value="15656" calcext:value-type="float">
            <text:p>15656</text:p>
          </table:table-cell>
          <table:table-cell office:value-type="float" office:value="8640000" calcext:value-type="float">
            <text:p>8640000</text:p>
          </table:table-cell>
          <table:table-cell table:formula="of:=[.B825]/[.C825]" office:value-type="float" office:value="0.00181203703703704" calcext:value-type="float">
            <text:p>0,00181203703703704000</text:p>
          </table:table-cell>
          <table:table-cell table:formula="of:=[.D826]-[.D825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B825]+19" office:value-type="float" office:value="15675" calcext:value-type="float">
            <text:p>15675</text:p>
          </table:table-cell>
          <table:table-cell office:value-type="float" office:value="8640000" calcext:value-type="float">
            <text:p>8640000</text:p>
          </table:table-cell>
          <table:table-cell table:formula="of:=[.B826]/[.C826]" office:value-type="float" office:value="0.00181423611111111" calcext:value-type="float">
            <text:p>0,00181423611111111000</text:p>
          </table:table-cell>
          <table:table-cell table:formula="of:=[.D827]-[.D82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B826]+19" office:value-type="float" office:value="15694" calcext:value-type="float">
            <text:p>15694</text:p>
          </table:table-cell>
          <table:table-cell office:value-type="float" office:value="8640000" calcext:value-type="float">
            <text:p>8640000</text:p>
          </table:table-cell>
          <table:table-cell table:formula="of:=[.B827]/[.C827]" office:value-type="float" office:value="0.00181643518518519" calcext:value-type="float">
            <text:p>0,00181643518518519000</text:p>
          </table:table-cell>
          <table:table-cell table:formula="of:=[.D828]-[.D827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B827]+19" office:value-type="float" office:value="15713" calcext:value-type="float">
            <text:p>15713</text:p>
          </table:table-cell>
          <table:table-cell office:value-type="float" office:value="8640000" calcext:value-type="float">
            <text:p>8640000</text:p>
          </table:table-cell>
          <table:table-cell table:formula="of:=[.B828]/[.C828]" office:value-type="float" office:value="0.00181863425925926" calcext:value-type="float">
            <text:p>0,00181863425925926000</text:p>
          </table:table-cell>
          <table:table-cell table:formula="of:=[.D829]-[.D82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B828]+19" office:value-type="float" office:value="15732" calcext:value-type="float">
            <text:p>15732</text:p>
          </table:table-cell>
          <table:table-cell office:value-type="float" office:value="8640000" calcext:value-type="float">
            <text:p>8640000</text:p>
          </table:table-cell>
          <table:table-cell table:formula="of:=[.B829]/[.C829]" office:value-type="float" office:value="0.00182083333333333" calcext:value-type="float">
            <text:p>0,00182083333333333000</text:p>
          </table:table-cell>
          <table:table-cell table:formula="of:=[.D830]-[.D829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B829]+19" office:value-type="float" office:value="15751" calcext:value-type="float">
            <text:p>15751</text:p>
          </table:table-cell>
          <table:table-cell office:value-type="float" office:value="8640000" calcext:value-type="float">
            <text:p>8640000</text:p>
          </table:table-cell>
          <table:table-cell table:formula="of:=[.B830]/[.C830]" office:value-type="float" office:value="0.00182303240740741" calcext:value-type="float">
            <text:p>0,00182303240740741000</text:p>
          </table:table-cell>
          <table:table-cell table:formula="of:=[.D831]-[.D83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B830]+19" office:value-type="float" office:value="15770" calcext:value-type="float">
            <text:p>15770</text:p>
          </table:table-cell>
          <table:table-cell office:value-type="float" office:value="8640000" calcext:value-type="float">
            <text:p>8640000</text:p>
          </table:table-cell>
          <table:table-cell table:formula="of:=[.B831]/[.C831]" office:value-type="float" office:value="0.00182523148148148" calcext:value-type="float">
            <text:p>0,00182523148148148000</text:p>
          </table:table-cell>
          <table:table-cell table:formula="of:=[.D832]-[.D831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B831]+19" office:value-type="float" office:value="15789" calcext:value-type="float">
            <text:p>15789</text:p>
          </table:table-cell>
          <table:table-cell office:value-type="float" office:value="8640000" calcext:value-type="float">
            <text:p>8640000</text:p>
          </table:table-cell>
          <table:table-cell table:formula="of:=[.B832]/[.C832]" office:value-type="float" office:value="0.00182743055555556" calcext:value-type="float">
            <text:p>0,00182743055555556000</text:p>
          </table:table-cell>
          <table:table-cell table:formula="of:=[.D833]-[.D83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B832]+19" office:value-type="float" office:value="15808" calcext:value-type="float">
            <text:p>15808</text:p>
          </table:table-cell>
          <table:table-cell office:value-type="float" office:value="8640000" calcext:value-type="float">
            <text:p>8640000</text:p>
          </table:table-cell>
          <table:table-cell table:formula="of:=[.B833]/[.C833]" office:value-type="float" office:value="0.00182962962962963" calcext:value-type="float">
            <text:p>0,00182962962962963000</text:p>
          </table:table-cell>
          <table:table-cell table:formula="of:=[.D834]-[.D83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B833]+19" office:value-type="float" office:value="15827" calcext:value-type="float">
            <text:p>15827</text:p>
          </table:table-cell>
          <table:table-cell office:value-type="float" office:value="8640000" calcext:value-type="float">
            <text:p>8640000</text:p>
          </table:table-cell>
          <table:table-cell table:formula="of:=[.B834]/[.C834]" office:value-type="float" office:value="0.0018318287037037" calcext:value-type="float">
            <text:p>0,00183182870370370000</text:p>
          </table:table-cell>
          <table:table-cell table:formula="of:=[.D835]-[.D834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B834]+19" office:value-type="float" office:value="15846" calcext:value-type="float">
            <text:p>15846</text:p>
          </table:table-cell>
          <table:table-cell office:value-type="float" office:value="8640000" calcext:value-type="float">
            <text:p>8640000</text:p>
          </table:table-cell>
          <table:table-cell table:formula="of:=[.B835]/[.C835]" office:value-type="float" office:value="0.00183402777777778" calcext:value-type="float">
            <text:p>0,00183402777777778000</text:p>
          </table:table-cell>
          <table:table-cell table:formula="of:=[.D836]-[.D83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B835]+19" office:value-type="float" office:value="15865" calcext:value-type="float">
            <text:p>15865</text:p>
          </table:table-cell>
          <table:table-cell office:value-type="float" office:value="8640000" calcext:value-type="float">
            <text:p>8640000</text:p>
          </table:table-cell>
          <table:table-cell table:formula="of:=[.B836]/[.C836]" office:value-type="float" office:value="0.00183622685185185" calcext:value-type="float">
            <text:p>0,00183622685185185000</text:p>
          </table:table-cell>
          <table:table-cell table:formula="of:=[.D837]-[.D836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B836]+19" office:value-type="float" office:value="15884" calcext:value-type="float">
            <text:p>15884</text:p>
          </table:table-cell>
          <table:table-cell office:value-type="float" office:value="8640000" calcext:value-type="float">
            <text:p>8640000</text:p>
          </table:table-cell>
          <table:table-cell table:formula="of:=[.B837]/[.C837]" office:value-type="float" office:value="0.00183842592592593" calcext:value-type="float">
            <text:p>0,00183842592592593000</text:p>
          </table:table-cell>
          <table:table-cell table:formula="of:=[.D838]-[.D83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B837]+19" office:value-type="float" office:value="15903" calcext:value-type="float">
            <text:p>15903</text:p>
          </table:table-cell>
          <table:table-cell office:value-type="float" office:value="8640000" calcext:value-type="float">
            <text:p>8640000</text:p>
          </table:table-cell>
          <table:table-cell table:formula="of:=[.B838]/[.C838]" office:value-type="float" office:value="0.001840625" calcext:value-type="float">
            <text:p>0,00184062500000000000</text:p>
          </table:table-cell>
          <table:table-cell table:formula="of:=[.D839]-[.D838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B838]+19" office:value-type="float" office:value="15922" calcext:value-type="float">
            <text:p>15922</text:p>
          </table:table-cell>
          <table:table-cell office:value-type="float" office:value="8640000" calcext:value-type="float">
            <text:p>8640000</text:p>
          </table:table-cell>
          <table:table-cell table:formula="of:=[.B839]/[.C839]" office:value-type="float" office:value="0.00184282407407407" calcext:value-type="float">
            <text:p>0,00184282407407407000</text:p>
          </table:table-cell>
          <table:table-cell table:formula="of:=[.D840]-[.D83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B839]+19" office:value-type="float" office:value="15941" calcext:value-type="float">
            <text:p>15941</text:p>
          </table:table-cell>
          <table:table-cell office:value-type="float" office:value="8640000" calcext:value-type="float">
            <text:p>8640000</text:p>
          </table:table-cell>
          <table:table-cell table:formula="of:=[.B840]/[.C840]" office:value-type="float" office:value="0.00184502314814815" calcext:value-type="float">
            <text:p>0,00184502314814815000</text:p>
          </table:table-cell>
          <table:table-cell table:formula="of:=[.D841]-[.D84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B840]+19" office:value-type="float" office:value="15960" calcext:value-type="float">
            <text:p>15960</text:p>
          </table:table-cell>
          <table:table-cell office:value-type="float" office:value="8640000" calcext:value-type="float">
            <text:p>8640000</text:p>
          </table:table-cell>
          <table:table-cell table:formula="of:=[.B841]/[.C841]" office:value-type="float" office:value="0.00184722222222222" calcext:value-type="float">
            <text:p>0,00184722222222222000</text:p>
          </table:table-cell>
          <table:table-cell table:formula="of:=[.D842]-[.D841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B841]+19" office:value-type="float" office:value="15979" calcext:value-type="float">
            <text:p>15979</text:p>
          </table:table-cell>
          <table:table-cell office:value-type="float" office:value="8640000" calcext:value-type="float">
            <text:p>8640000</text:p>
          </table:table-cell>
          <table:table-cell table:formula="of:=[.B842]/[.C842]" office:value-type="float" office:value="0.0018494212962963" calcext:value-type="float">
            <text:p>0,00184942129629630000</text:p>
          </table:table-cell>
          <table:table-cell table:formula="of:=[.D843]-[.D84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B842]+19" office:value-type="float" office:value="15998" calcext:value-type="float">
            <text:p>15998</text:p>
          </table:table-cell>
          <table:table-cell office:value-type="float" office:value="8640000" calcext:value-type="float">
            <text:p>8640000</text:p>
          </table:table-cell>
          <table:table-cell table:formula="of:=[.B843]/[.C843]" office:value-type="float" office:value="0.00185162037037037" calcext:value-type="float">
            <text:p>0,00185162037037037000</text:p>
          </table:table-cell>
          <table:table-cell table:formula="of:=[.D844]-[.D843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B843]+19" office:value-type="float" office:value="16017" calcext:value-type="float">
            <text:p>16017</text:p>
          </table:table-cell>
          <table:table-cell office:value-type="float" office:value="8640000" calcext:value-type="float">
            <text:p>8640000</text:p>
          </table:table-cell>
          <table:table-cell table:formula="of:=[.B844]/[.C844]" office:value-type="float" office:value="0.00185381944444444" calcext:value-type="float">
            <text:p>0,00185381944444444000</text:p>
          </table:table-cell>
          <table:table-cell table:formula="of:=[.D845]-[.D84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B844]+19" office:value-type="float" office:value="16036" calcext:value-type="float">
            <text:p>16036</text:p>
          </table:table-cell>
          <table:table-cell office:value-type="float" office:value="8640000" calcext:value-type="float">
            <text:p>8640000</text:p>
          </table:table-cell>
          <table:table-cell table:formula="of:=[.B845]/[.C845]" office:value-type="float" office:value="0.00185601851851852" calcext:value-type="float">
            <text:p>0,00185601851851852000</text:p>
          </table:table-cell>
          <table:table-cell table:formula="of:=[.D846]-[.D845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B845]+19" office:value-type="float" office:value="16055" calcext:value-type="float">
            <text:p>16055</text:p>
          </table:table-cell>
          <table:table-cell office:value-type="float" office:value="8640000" calcext:value-type="float">
            <text:p>8640000</text:p>
          </table:table-cell>
          <table:table-cell table:formula="of:=[.B846]/[.C846]" office:value-type="float" office:value="0.00185821759259259" calcext:value-type="float">
            <text:p>0,00185821759259259000</text:p>
          </table:table-cell>
          <table:table-cell table:formula="of:=[.D847]-[.D84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B846]+19" office:value-type="float" office:value="16074" calcext:value-type="float">
            <text:p>16074</text:p>
          </table:table-cell>
          <table:table-cell office:value-type="float" office:value="8640000" calcext:value-type="float">
            <text:p>8640000</text:p>
          </table:table-cell>
          <table:table-cell table:formula="of:=[.B847]/[.C847]" office:value-type="float" office:value="0.00186041666666667" calcext:value-type="float">
            <text:p>0,00186041666666667000</text:p>
          </table:table-cell>
          <table:table-cell table:formula="of:=[.D848]-[.D847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B847]+19" office:value-type="float" office:value="16093" calcext:value-type="float">
            <text:p>16093</text:p>
          </table:table-cell>
          <table:table-cell office:value-type="float" office:value="8640000" calcext:value-type="float">
            <text:p>8640000</text:p>
          </table:table-cell>
          <table:table-cell table:formula="of:=[.B848]/[.C848]" office:value-type="float" office:value="0.00186261574074074" calcext:value-type="float">
            <text:p>0,00186261574074074000</text:p>
          </table:table-cell>
          <table:table-cell table:formula="of:=[.D849]-[.D84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B848]+19" office:value-type="float" office:value="16112" calcext:value-type="float">
            <text:p>16112</text:p>
          </table:table-cell>
          <table:table-cell office:value-type="float" office:value="8640000" calcext:value-type="float">
            <text:p>8640000</text:p>
          </table:table-cell>
          <table:table-cell table:formula="of:=[.B849]/[.C849]" office:value-type="float" office:value="0.00186481481481481" calcext:value-type="float">
            <text:p>0,00186481481481481000</text:p>
          </table:table-cell>
          <table:table-cell table:formula="of:=[.D850]-[.D84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B849]+19" office:value-type="float" office:value="16131" calcext:value-type="float">
            <text:p>16131</text:p>
          </table:table-cell>
          <table:table-cell office:value-type="float" office:value="8640000" calcext:value-type="float">
            <text:p>8640000</text:p>
          </table:table-cell>
          <table:table-cell table:formula="of:=[.B850]/[.C850]" office:value-type="float" office:value="0.00186701388888889" calcext:value-type="float">
            <text:p>0,00186701388888889000</text:p>
          </table:table-cell>
          <table:table-cell table:formula="of:=[.D851]-[.D850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B850]+19" office:value-type="float" office:value="16150" calcext:value-type="float">
            <text:p>16150</text:p>
          </table:table-cell>
          <table:table-cell office:value-type="float" office:value="8640000" calcext:value-type="float">
            <text:p>8640000</text:p>
          </table:table-cell>
          <table:table-cell table:formula="of:=[.B851]/[.C851]" office:value-type="float" office:value="0.00186921296296296" calcext:value-type="float">
            <text:p>0,00186921296296296000</text:p>
          </table:table-cell>
          <table:table-cell table:formula="of:=[.D852]-[.D85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B851]+19" office:value-type="float" office:value="16169" calcext:value-type="float">
            <text:p>16169</text:p>
          </table:table-cell>
          <table:table-cell office:value-type="float" office:value="8640000" calcext:value-type="float">
            <text:p>8640000</text:p>
          </table:table-cell>
          <table:table-cell table:formula="of:=[.B852]/[.C852]" office:value-type="float" office:value="0.00187141203703704" calcext:value-type="float">
            <text:p>0,00187141203703704000</text:p>
          </table:table-cell>
          <table:table-cell table:formula="of:=[.D853]-[.D852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B852]+19" office:value-type="float" office:value="16188" calcext:value-type="float">
            <text:p>16188</text:p>
          </table:table-cell>
          <table:table-cell office:value-type="float" office:value="8640000" calcext:value-type="float">
            <text:p>8640000</text:p>
          </table:table-cell>
          <table:table-cell table:formula="of:=[.B853]/[.C853]" office:value-type="float" office:value="0.00187361111111111" calcext:value-type="float">
            <text:p>0,00187361111111111000</text:p>
          </table:table-cell>
          <table:table-cell table:formula="of:=[.D854]-[.D85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B853]+19" office:value-type="float" office:value="16207" calcext:value-type="float">
            <text:p>16207</text:p>
          </table:table-cell>
          <table:table-cell office:value-type="float" office:value="8640000" calcext:value-type="float">
            <text:p>8640000</text:p>
          </table:table-cell>
          <table:table-cell table:formula="of:=[.B854]/[.C854]" office:value-type="float" office:value="0.00187581018518519" calcext:value-type="float">
            <text:p>0,00187581018518519000</text:p>
          </table:table-cell>
          <table:table-cell table:formula="of:=[.D855]-[.D854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B854]+19" office:value-type="float" office:value="16226" calcext:value-type="float">
            <text:p>16226</text:p>
          </table:table-cell>
          <table:table-cell office:value-type="float" office:value="8640000" calcext:value-type="float">
            <text:p>8640000</text:p>
          </table:table-cell>
          <table:table-cell table:formula="of:=[.B855]/[.C855]" office:value-type="float" office:value="0.00187800925925926" calcext:value-type="float">
            <text:p>0,00187800925925926000</text:p>
          </table:table-cell>
          <table:table-cell table:formula="of:=[.D856]-[.D85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B855]+19" office:value-type="float" office:value="16245" calcext:value-type="float">
            <text:p>16245</text:p>
          </table:table-cell>
          <table:table-cell office:value-type="float" office:value="8640000" calcext:value-type="float">
            <text:p>8640000</text:p>
          </table:table-cell>
          <table:table-cell table:formula="of:=[.B856]/[.C856]" office:value-type="float" office:value="0.00188020833333333" calcext:value-type="float">
            <text:p>0,00188020833333333000</text:p>
          </table:table-cell>
          <table:table-cell table:formula="of:=[.D857]-[.D85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B856]+19" office:value-type="float" office:value="16264" calcext:value-type="float">
            <text:p>16264</text:p>
          </table:table-cell>
          <table:table-cell office:value-type="float" office:value="8640000" calcext:value-type="float">
            <text:p>8640000</text:p>
          </table:table-cell>
          <table:table-cell table:formula="of:=[.B857]/[.C857]" office:value-type="float" office:value="0.00188240740740741" calcext:value-type="float">
            <text:p>0,00188240740740741000</text:p>
          </table:table-cell>
          <table:table-cell table:formula="of:=[.D858]-[.D857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B857]+19" office:value-type="float" office:value="16283" calcext:value-type="float">
            <text:p>16283</text:p>
          </table:table-cell>
          <table:table-cell office:value-type="float" office:value="8640000" calcext:value-type="float">
            <text:p>8640000</text:p>
          </table:table-cell>
          <table:table-cell table:formula="of:=[.B858]/[.C858]" office:value-type="float" office:value="0.00188460648148148" calcext:value-type="float">
            <text:p>0,00188460648148148000</text:p>
          </table:table-cell>
          <table:table-cell table:formula="of:=[.D859]-[.D85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B858]+19" office:value-type="float" office:value="16302" calcext:value-type="float">
            <text:p>16302</text:p>
          </table:table-cell>
          <table:table-cell office:value-type="float" office:value="8640000" calcext:value-type="float">
            <text:p>8640000</text:p>
          </table:table-cell>
          <table:table-cell table:formula="of:=[.B859]/[.C859]" office:value-type="float" office:value="0.00188680555555556" calcext:value-type="float">
            <text:p>0,00188680555555556000</text:p>
          </table:table-cell>
          <table:table-cell table:formula="of:=[.D860]-[.D859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B859]+19" office:value-type="float" office:value="16321" calcext:value-type="float">
            <text:p>16321</text:p>
          </table:table-cell>
          <table:table-cell office:value-type="float" office:value="8640000" calcext:value-type="float">
            <text:p>8640000</text:p>
          </table:table-cell>
          <table:table-cell table:formula="of:=[.B860]/[.C860]" office:value-type="float" office:value="0.00188900462962963" calcext:value-type="float">
            <text:p>0,00188900462962963000</text:p>
          </table:table-cell>
          <table:table-cell table:formula="of:=[.D861]-[.D86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B860]+19" office:value-type="float" office:value="16340" calcext:value-type="float">
            <text:p>16340</text:p>
          </table:table-cell>
          <table:table-cell office:value-type="float" office:value="8640000" calcext:value-type="float">
            <text:p>8640000</text:p>
          </table:table-cell>
          <table:table-cell table:formula="of:=[.B861]/[.C861]" office:value-type="float" office:value="0.0018912037037037" calcext:value-type="float">
            <text:p>0,00189120370370370000</text:p>
          </table:table-cell>
          <table:table-cell table:formula="of:=[.D862]-[.D861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B861]+19" office:value-type="float" office:value="16359" calcext:value-type="float">
            <text:p>16359</text:p>
          </table:table-cell>
          <table:table-cell office:value-type="float" office:value="8640000" calcext:value-type="float">
            <text:p>8640000</text:p>
          </table:table-cell>
          <table:table-cell table:formula="of:=[.B862]/[.C862]" office:value-type="float" office:value="0.00189340277777778" calcext:value-type="float">
            <text:p>0,00189340277777778000</text:p>
          </table:table-cell>
          <table:table-cell table:formula="of:=[.D863]-[.D86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B862]+19" office:value-type="float" office:value="16378" calcext:value-type="float">
            <text:p>16378</text:p>
          </table:table-cell>
          <table:table-cell office:value-type="float" office:value="8640000" calcext:value-type="float">
            <text:p>8640000</text:p>
          </table:table-cell>
          <table:table-cell table:formula="of:=[.B863]/[.C863]" office:value-type="float" office:value="0.00189560185185185" calcext:value-type="float">
            <text:p>0,00189560185185185000</text:p>
          </table:table-cell>
          <table:table-cell table:formula="of:=[.D864]-[.D863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B863]+19" office:value-type="float" office:value="16397" calcext:value-type="float">
            <text:p>16397</text:p>
          </table:table-cell>
          <table:table-cell office:value-type="float" office:value="8640000" calcext:value-type="float">
            <text:p>8640000</text:p>
          </table:table-cell>
          <table:table-cell table:formula="of:=[.B864]/[.C864]" office:value-type="float" office:value="0.00189780092592593" calcext:value-type="float">
            <text:p>0,00189780092592593000</text:p>
          </table:table-cell>
          <table:table-cell table:formula="of:=[.D865]-[.D86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B864]+19" office:value-type="float" office:value="16416" calcext:value-type="float">
            <text:p>16416</text:p>
          </table:table-cell>
          <table:table-cell office:value-type="float" office:value="8640000" calcext:value-type="float">
            <text:p>8640000</text:p>
          </table:table-cell>
          <table:table-cell table:formula="of:=[.B865]/[.C865]" office:value-type="float" office:value="0.0019" calcext:value-type="float">
            <text:p>0,00190000000000000000</text:p>
          </table:table-cell>
          <table:table-cell table:formula="of:=[.D866]-[.D86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B865]+19" office:value-type="float" office:value="16435" calcext:value-type="float">
            <text:p>16435</text:p>
          </table:table-cell>
          <table:table-cell office:value-type="float" office:value="8640000" calcext:value-type="float">
            <text:p>8640000</text:p>
          </table:table-cell>
          <table:table-cell table:formula="of:=[.B866]/[.C866]" office:value-type="float" office:value="0.00190219907407407" calcext:value-type="float">
            <text:p>0,00190219907407407000</text:p>
          </table:table-cell>
          <table:table-cell table:formula="of:=[.D867]-[.D866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B866]+19" office:value-type="float" office:value="16454" calcext:value-type="float">
            <text:p>16454</text:p>
          </table:table-cell>
          <table:table-cell office:value-type="float" office:value="8640000" calcext:value-type="float">
            <text:p>8640000</text:p>
          </table:table-cell>
          <table:table-cell table:formula="of:=[.B867]/[.C867]" office:value-type="float" office:value="0.00190439814814815" calcext:value-type="float">
            <text:p>0,00190439814814815000</text:p>
          </table:table-cell>
          <table:table-cell table:formula="of:=[.D868]-[.D86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B867]+19" office:value-type="float" office:value="16473" calcext:value-type="float">
            <text:p>16473</text:p>
          </table:table-cell>
          <table:table-cell office:value-type="float" office:value="8640000" calcext:value-type="float">
            <text:p>8640000</text:p>
          </table:table-cell>
          <table:table-cell table:formula="of:=[.B868]/[.C868]" office:value-type="float" office:value="0.00190659722222222" calcext:value-type="float">
            <text:p>0,00190659722222222000</text:p>
          </table:table-cell>
          <table:table-cell table:formula="of:=[.D869]-[.D868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B868]+19" office:value-type="float" office:value="16492" calcext:value-type="float">
            <text:p>16492</text:p>
          </table:table-cell>
          <table:table-cell office:value-type="float" office:value="8640000" calcext:value-type="float">
            <text:p>8640000</text:p>
          </table:table-cell>
          <table:table-cell table:formula="of:=[.B869]/[.C869]" office:value-type="float" office:value="0.0019087962962963" calcext:value-type="float">
            <text:p>0,00190879629629630000</text:p>
          </table:table-cell>
          <table:table-cell table:formula="of:=[.D870]-[.D86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B869]+19" office:value-type="float" office:value="16511" calcext:value-type="float">
            <text:p>16511</text:p>
          </table:table-cell>
          <table:table-cell office:value-type="float" office:value="8640000" calcext:value-type="float">
            <text:p>8640000</text:p>
          </table:table-cell>
          <table:table-cell table:formula="of:=[.B870]/[.C870]" office:value-type="float" office:value="0.00191099537037037" calcext:value-type="float">
            <text:p>0,00191099537037037000</text:p>
          </table:table-cell>
          <table:table-cell table:formula="of:=[.D871]-[.D870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B870]+19" office:value-type="float" office:value="16530" calcext:value-type="float">
            <text:p>16530</text:p>
          </table:table-cell>
          <table:table-cell office:value-type="float" office:value="8640000" calcext:value-type="float">
            <text:p>8640000</text:p>
          </table:table-cell>
          <table:table-cell table:formula="of:=[.B871]/[.C871]" office:value-type="float" office:value="0.00191319444444444" calcext:value-type="float">
            <text:p>0,00191319444444444000</text:p>
          </table:table-cell>
          <table:table-cell table:formula="of:=[.D872]-[.D87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B871]+19" office:value-type="float" office:value="16549" calcext:value-type="float">
            <text:p>16549</text:p>
          </table:table-cell>
          <table:table-cell office:value-type="float" office:value="8640000" calcext:value-type="float">
            <text:p>8640000</text:p>
          </table:table-cell>
          <table:table-cell table:formula="of:=[.B872]/[.C872]" office:value-type="float" office:value="0.00191539351851852" calcext:value-type="float">
            <text:p>0,00191539351851852000</text:p>
          </table:table-cell>
          <table:table-cell table:formula="of:=[.D873]-[.D87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B872]+19" office:value-type="float" office:value="16568" calcext:value-type="float">
            <text:p>16568</text:p>
          </table:table-cell>
          <table:table-cell office:value-type="float" office:value="8640000" calcext:value-type="float">
            <text:p>8640000</text:p>
          </table:table-cell>
          <table:table-cell table:formula="of:=[.B873]/[.C873]" office:value-type="float" office:value="0.00191759259259259" calcext:value-type="float">
            <text:p>0,00191759259259259000</text:p>
          </table:table-cell>
          <table:table-cell table:formula="of:=[.D874]-[.D873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B873]+19" office:value-type="float" office:value="16587" calcext:value-type="float">
            <text:p>16587</text:p>
          </table:table-cell>
          <table:table-cell office:value-type="float" office:value="8640000" calcext:value-type="float">
            <text:p>8640000</text:p>
          </table:table-cell>
          <table:table-cell table:formula="of:=[.B874]/[.C874]" office:value-type="float" office:value="0.00191979166666667" calcext:value-type="float">
            <text:p>0,00191979166666667000</text:p>
          </table:table-cell>
          <table:table-cell table:formula="of:=[.D875]-[.D87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B874]+19" office:value-type="float" office:value="16606" calcext:value-type="float">
            <text:p>16606</text:p>
          </table:table-cell>
          <table:table-cell office:value-type="float" office:value="8640000" calcext:value-type="float">
            <text:p>8640000</text:p>
          </table:table-cell>
          <table:table-cell table:formula="of:=[.B875]/[.C875]" office:value-type="float" office:value="0.00192199074074074" calcext:value-type="float">
            <text:p>0,00192199074074074000</text:p>
          </table:table-cell>
          <table:table-cell table:formula="of:=[.D876]-[.D875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B875]+19" office:value-type="float" office:value="16625" calcext:value-type="float">
            <text:p>16625</text:p>
          </table:table-cell>
          <table:table-cell office:value-type="float" office:value="8640000" calcext:value-type="float">
            <text:p>8640000</text:p>
          </table:table-cell>
          <table:table-cell table:formula="of:=[.B876]/[.C876]" office:value-type="float" office:value="0.00192418981481481" calcext:value-type="float">
            <text:p>0,00192418981481481000</text:p>
          </table:table-cell>
          <table:table-cell table:formula="of:=[.D877]-[.D87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B876]+19" office:value-type="float" office:value="16644" calcext:value-type="float">
            <text:p>16644</text:p>
          </table:table-cell>
          <table:table-cell office:value-type="float" office:value="8640000" calcext:value-type="float">
            <text:p>8640000</text:p>
          </table:table-cell>
          <table:table-cell table:formula="of:=[.B877]/[.C877]" office:value-type="float" office:value="0.00192638888888889" calcext:value-type="float">
            <text:p>0,00192638888888889000</text:p>
          </table:table-cell>
          <table:table-cell table:formula="of:=[.D878]-[.D877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B877]+19" office:value-type="float" office:value="16663" calcext:value-type="float">
            <text:p>16663</text:p>
          </table:table-cell>
          <table:table-cell office:value-type="float" office:value="8640000" calcext:value-type="float">
            <text:p>8640000</text:p>
          </table:table-cell>
          <table:table-cell table:formula="of:=[.B878]/[.C878]" office:value-type="float" office:value="0.00192858796296296" calcext:value-type="float">
            <text:p>0,00192858796296296000</text:p>
          </table:table-cell>
          <table:table-cell table:formula="of:=[.D879]-[.D87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B878]+19" office:value-type="float" office:value="16682" calcext:value-type="float">
            <text:p>16682</text:p>
          </table:table-cell>
          <table:table-cell office:value-type="float" office:value="8640000" calcext:value-type="float">
            <text:p>8640000</text:p>
          </table:table-cell>
          <table:table-cell table:formula="of:=[.B879]/[.C879]" office:value-type="float" office:value="0.00193078703703704" calcext:value-type="float">
            <text:p>0,00193078703703704000</text:p>
          </table:table-cell>
          <table:table-cell table:formula="of:=[.D880]-[.D879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B879]+19" office:value-type="float" office:value="16701" calcext:value-type="float">
            <text:p>16701</text:p>
          </table:table-cell>
          <table:table-cell office:value-type="float" office:value="8640000" calcext:value-type="float">
            <text:p>8640000</text:p>
          </table:table-cell>
          <table:table-cell table:formula="of:=[.B880]/[.C880]" office:value-type="float" office:value="0.00193298611111111" calcext:value-type="float">
            <text:p>0,00193298611111111000</text:p>
          </table:table-cell>
          <table:table-cell table:formula="of:=[.D881]-[.D88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B880]+19" office:value-type="float" office:value="16720" calcext:value-type="float">
            <text:p>16720</text:p>
          </table:table-cell>
          <table:table-cell office:value-type="float" office:value="8640000" calcext:value-type="float">
            <text:p>8640000</text:p>
          </table:table-cell>
          <table:table-cell table:formula="of:=[.B881]/[.C881]" office:value-type="float" office:value="0.00193518518518519" calcext:value-type="float">
            <text:p>0,00193518518518519000</text:p>
          </table:table-cell>
          <table:table-cell table:formula="of:=[.D882]-[.D88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B881]+19" office:value-type="float" office:value="16739" calcext:value-type="float">
            <text:p>16739</text:p>
          </table:table-cell>
          <table:table-cell office:value-type="float" office:value="8640000" calcext:value-type="float">
            <text:p>8640000</text:p>
          </table:table-cell>
          <table:table-cell table:formula="of:=[.B882]/[.C882]" office:value-type="float" office:value="0.00193738425925926" calcext:value-type="float">
            <text:p>0,00193738425925926000</text:p>
          </table:table-cell>
          <table:table-cell table:formula="of:=[.D883]-[.D882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B882]+19" office:value-type="float" office:value="16758" calcext:value-type="float">
            <text:p>16758</text:p>
          </table:table-cell>
          <table:table-cell office:value-type="float" office:value="8640000" calcext:value-type="float">
            <text:p>8640000</text:p>
          </table:table-cell>
          <table:table-cell table:formula="of:=[.B883]/[.C883]" office:value-type="float" office:value="0.00193958333333333" calcext:value-type="float">
            <text:p>0,00193958333333333000</text:p>
          </table:table-cell>
          <table:table-cell table:formula="of:=[.D884]-[.D88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B883]+19" office:value-type="float" office:value="16777" calcext:value-type="float">
            <text:p>16777</text:p>
          </table:table-cell>
          <table:table-cell office:value-type="float" office:value="8640000" calcext:value-type="float">
            <text:p>8640000</text:p>
          </table:table-cell>
          <table:table-cell table:formula="of:=[.B884]/[.C884]" office:value-type="float" office:value="0.00194178240740741" calcext:value-type="float">
            <text:p>0,00194178240740741000</text:p>
          </table:table-cell>
          <table:table-cell table:formula="of:=[.D885]-[.D884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B884]+19" office:value-type="float" office:value="16796" calcext:value-type="float">
            <text:p>16796</text:p>
          </table:table-cell>
          <table:table-cell office:value-type="float" office:value="8640000" calcext:value-type="float">
            <text:p>8640000</text:p>
          </table:table-cell>
          <table:table-cell table:formula="of:=[.B885]/[.C885]" office:value-type="float" office:value="0.00194398148148148" calcext:value-type="float">
            <text:p>0,00194398148148148000</text:p>
          </table:table-cell>
          <table:table-cell table:formula="of:=[.D886]-[.D88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B885]+19" office:value-type="float" office:value="16815" calcext:value-type="float">
            <text:p>16815</text:p>
          </table:table-cell>
          <table:table-cell office:value-type="float" office:value="8640000" calcext:value-type="float">
            <text:p>8640000</text:p>
          </table:table-cell>
          <table:table-cell table:formula="of:=[.B886]/[.C886]" office:value-type="float" office:value="0.00194618055555556" calcext:value-type="float">
            <text:p>0,00194618055555556000</text:p>
          </table:table-cell>
          <table:table-cell table:formula="of:=[.D887]-[.D886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B886]+19" office:value-type="float" office:value="16834" calcext:value-type="float">
            <text:p>16834</text:p>
          </table:table-cell>
          <table:table-cell office:value-type="float" office:value="8640000" calcext:value-type="float">
            <text:p>8640000</text:p>
          </table:table-cell>
          <table:table-cell table:formula="of:=[.B887]/[.C887]" office:value-type="float" office:value="0.00194837962962963" calcext:value-type="float">
            <text:p>0,00194837962962963000</text:p>
          </table:table-cell>
          <table:table-cell table:formula="of:=[.D888]-[.D88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B887]+19" office:value-type="float" office:value="16853" calcext:value-type="float">
            <text:p>16853</text:p>
          </table:table-cell>
          <table:table-cell office:value-type="float" office:value="8640000" calcext:value-type="float">
            <text:p>8640000</text:p>
          </table:table-cell>
          <table:table-cell table:formula="of:=[.B888]/[.C888]" office:value-type="float" office:value="0.0019505787037037" calcext:value-type="float">
            <text:p>0,00195057870370370000</text:p>
          </table:table-cell>
          <table:table-cell table:formula="of:=[.D889]-[.D888]" office:value-type="float" office:value="0.00000219907407407395" calcext:value-type="float">
            <text:p>0,0000021990740740739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B888]+19" office:value-type="float" office:value="16872" calcext:value-type="float">
            <text:p>16872</text:p>
          </table:table-cell>
          <table:table-cell office:value-type="float" office:value="8640000" calcext:value-type="float">
            <text:p>8640000</text:p>
          </table:table-cell>
          <table:table-cell table:formula="of:=[.B889]/[.C889]" office:value-type="float" office:value="0.00195277777777778" calcext:value-type="float">
            <text:p>0,00195277777777778000</text:p>
          </table:table-cell>
          <table:table-cell table:formula="of:=[.D890]-[.D88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B889]+19" office:value-type="float" office:value="16891" calcext:value-type="float">
            <text:p>16891</text:p>
          </table:table-cell>
          <table:table-cell office:value-type="float" office:value="8640000" calcext:value-type="float">
            <text:p>8640000</text:p>
          </table:table-cell>
          <table:table-cell table:formula="of:=[.B890]/[.C890]" office:value-type="float" office:value="0.00195497685185185" calcext:value-type="float">
            <text:p>0,00195497685185185000</text:p>
          </table:table-cell>
          <table:table-cell table:formula="of:=[.D891]-[.D89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B890]+19" office:value-type="float" office:value="16910" calcext:value-type="float">
            <text:p>16910</text:p>
          </table:table-cell>
          <table:table-cell office:value-type="float" office:value="8640000" calcext:value-type="float">
            <text:p>8640000</text:p>
          </table:table-cell>
          <table:table-cell table:formula="of:=[.B891]/[.C891]" office:value-type="float" office:value="0.00195717592592593" calcext:value-type="float">
            <text:p>0,00195717592592593000</text:p>
          </table:table-cell>
          <table:table-cell table:formula="of:=[.D892]-[.D89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B891]+19" office:value-type="float" office:value="16929" calcext:value-type="float">
            <text:p>16929</text:p>
          </table:table-cell>
          <table:table-cell office:value-type="float" office:value="8640000" calcext:value-type="float">
            <text:p>8640000</text:p>
          </table:table-cell>
          <table:table-cell table:formula="of:=[.B892]/[.C892]" office:value-type="float" office:value="0.001959375" calcext:value-type="float">
            <text:p>0,00195937500000000000</text:p>
          </table:table-cell>
          <table:table-cell table:formula="of:=[.D893]-[.D892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B892]+19" office:value-type="float" office:value="16948" calcext:value-type="float">
            <text:p>16948</text:p>
          </table:table-cell>
          <table:table-cell office:value-type="float" office:value="8640000" calcext:value-type="float">
            <text:p>8640000</text:p>
          </table:table-cell>
          <table:table-cell table:formula="of:=[.B893]/[.C893]" office:value-type="float" office:value="0.00196157407407407" calcext:value-type="float">
            <text:p>0,00196157407407407000</text:p>
          </table:table-cell>
          <table:table-cell table:formula="of:=[.D894]-[.D89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B893]+19" office:value-type="float" office:value="16967" calcext:value-type="float">
            <text:p>16967</text:p>
          </table:table-cell>
          <table:table-cell office:value-type="float" office:value="8640000" calcext:value-type="float">
            <text:p>8640000</text:p>
          </table:table-cell>
          <table:table-cell table:formula="of:=[.B894]/[.C894]" office:value-type="float" office:value="0.00196377314814815" calcext:value-type="float">
            <text:p>0,00196377314814815000</text:p>
          </table:table-cell>
          <table:table-cell table:formula="of:=[.D895]-[.D89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B894]+19" office:value-type="float" office:value="16986" calcext:value-type="float">
            <text:p>16986</text:p>
          </table:table-cell>
          <table:table-cell office:value-type="float" office:value="8640000" calcext:value-type="float">
            <text:p>8640000</text:p>
          </table:table-cell>
          <table:table-cell table:formula="of:=[.B895]/[.C895]" office:value-type="float" office:value="0.00196597222222222" calcext:value-type="float">
            <text:p>0,00196597222222222000</text:p>
          </table:table-cell>
          <table:table-cell table:formula="of:=[.D896]-[.D89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B895]+19" office:value-type="float" office:value="17005" calcext:value-type="float">
            <text:p>17005</text:p>
          </table:table-cell>
          <table:table-cell office:value-type="float" office:value="8640000" calcext:value-type="float">
            <text:p>8640000</text:p>
          </table:table-cell>
          <table:table-cell table:formula="of:=[.B896]/[.C896]" office:value-type="float" office:value="0.0019681712962963" calcext:value-type="float">
            <text:p>0,00196817129629630000</text:p>
          </table:table-cell>
          <table:table-cell table:formula="of:=[.D897]-[.D896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B896]+19" office:value-type="float" office:value="17024" calcext:value-type="float">
            <text:p>17024</text:p>
          </table:table-cell>
          <table:table-cell office:value-type="float" office:value="8640000" calcext:value-type="float">
            <text:p>8640000</text:p>
          </table:table-cell>
          <table:table-cell table:formula="of:=[.B897]/[.C897]" office:value-type="float" office:value="0.00197037037037037" calcext:value-type="float">
            <text:p>0,00197037037037037000</text:p>
          </table:table-cell>
          <table:table-cell table:formula="of:=[.D898]-[.D89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B897]+19" office:value-type="float" office:value="17043" calcext:value-type="float">
            <text:p>17043</text:p>
          </table:table-cell>
          <table:table-cell office:value-type="float" office:value="8640000" calcext:value-type="float">
            <text:p>8640000</text:p>
          </table:table-cell>
          <table:table-cell table:formula="of:=[.B898]/[.C898]" office:value-type="float" office:value="0.00197256944444444" calcext:value-type="float">
            <text:p>0,00197256944444444000</text:p>
          </table:table-cell>
          <table:table-cell table:formula="of:=[.D899]-[.D89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B898]+19" office:value-type="float" office:value="17062" calcext:value-type="float">
            <text:p>17062</text:p>
          </table:table-cell>
          <table:table-cell office:value-type="float" office:value="8640000" calcext:value-type="float">
            <text:p>8640000</text:p>
          </table:table-cell>
          <table:table-cell table:formula="of:=[.B899]/[.C899]" office:value-type="float" office:value="0.00197476851851852" calcext:value-type="float">
            <text:p>0,00197476851851852000</text:p>
          </table:table-cell>
          <table:table-cell table:formula="of:=[.D900]-[.D89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B899]+19" office:value-type="float" office:value="17081" calcext:value-type="float">
            <text:p>17081</text:p>
          </table:table-cell>
          <table:table-cell office:value-type="float" office:value="8640000" calcext:value-type="float">
            <text:p>8640000</text:p>
          </table:table-cell>
          <table:table-cell table:formula="of:=[.B900]/[.C900]" office:value-type="float" office:value="0.00197696759259259" calcext:value-type="float">
            <text:p>0,00197696759259259000</text:p>
          </table:table-cell>
          <table:table-cell table:formula="of:=[.D901]-[.D90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B900]+19" office:value-type="float" office:value="17100" calcext:value-type="float">
            <text:p>17100</text:p>
          </table:table-cell>
          <table:table-cell office:value-type="float" office:value="8640000" calcext:value-type="float">
            <text:p>8640000</text:p>
          </table:table-cell>
          <table:table-cell table:formula="of:=[.B901]/[.C901]" office:value-type="float" office:value="0.00197916666666667" calcext:value-type="float">
            <text:p>0,00197916666666667000</text:p>
          </table:table-cell>
          <table:table-cell table:formula="of:=[.D902]-[.D901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B901]+19" office:value-type="float" office:value="17119" calcext:value-type="float">
            <text:p>17119</text:p>
          </table:table-cell>
          <table:table-cell office:value-type="float" office:value="8640000" calcext:value-type="float">
            <text:p>8640000</text:p>
          </table:table-cell>
          <table:table-cell table:formula="of:=[.B902]/[.C902]" office:value-type="float" office:value="0.00198136574074074" calcext:value-type="float">
            <text:p>0,00198136574074074000</text:p>
          </table:table-cell>
          <table:table-cell table:formula="of:=[.D903]-[.D90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B902]+19" office:value-type="float" office:value="17138" calcext:value-type="float">
            <text:p>17138</text:p>
          </table:table-cell>
          <table:table-cell office:value-type="float" office:value="8640000" calcext:value-type="float">
            <text:p>8640000</text:p>
          </table:table-cell>
          <table:table-cell table:formula="of:=[.B903]/[.C903]" office:value-type="float" office:value="0.00198356481481481" calcext:value-type="float">
            <text:p>0,00198356481481481000</text:p>
          </table:table-cell>
          <table:table-cell table:formula="of:=[.D904]-[.D90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B903]+19" office:value-type="float" office:value="17157" calcext:value-type="float">
            <text:p>17157</text:p>
          </table:table-cell>
          <table:table-cell office:value-type="float" office:value="8640000" calcext:value-type="float">
            <text:p>8640000</text:p>
          </table:table-cell>
          <table:table-cell table:formula="of:=[.B904]/[.C904]" office:value-type="float" office:value="0.00198576388888889" calcext:value-type="float">
            <text:p>0,00198576388888889000</text:p>
          </table:table-cell>
          <table:table-cell table:formula="of:=[.D905]-[.D90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B904]+19" office:value-type="float" office:value="17176" calcext:value-type="float">
            <text:p>17176</text:p>
          </table:table-cell>
          <table:table-cell office:value-type="float" office:value="8640000" calcext:value-type="float">
            <text:p>8640000</text:p>
          </table:table-cell>
          <table:table-cell table:formula="of:=[.B905]/[.C905]" office:value-type="float" office:value="0.00198796296296296" calcext:value-type="float">
            <text:p>0,00198796296296296000</text:p>
          </table:table-cell>
          <table:table-cell table:formula="of:=[.D906]-[.D90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B905]+19" office:value-type="float" office:value="17195" calcext:value-type="float">
            <text:p>17195</text:p>
          </table:table-cell>
          <table:table-cell office:value-type="float" office:value="8640000" calcext:value-type="float">
            <text:p>8640000</text:p>
          </table:table-cell>
          <table:table-cell table:formula="of:=[.B906]/[.C906]" office:value-type="float" office:value="0.00199016203703704" calcext:value-type="float">
            <text:p>0,00199016203703704000</text:p>
          </table:table-cell>
          <table:table-cell table:formula="of:=[.D907]-[.D906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B906]+19" office:value-type="float" office:value="17214" calcext:value-type="float">
            <text:p>17214</text:p>
          </table:table-cell>
          <table:table-cell office:value-type="float" office:value="8640000" calcext:value-type="float">
            <text:p>8640000</text:p>
          </table:table-cell>
          <table:table-cell table:formula="of:=[.B907]/[.C907]" office:value-type="float" office:value="0.00199236111111111" calcext:value-type="float">
            <text:p>0,00199236111111111000</text:p>
          </table:table-cell>
          <table:table-cell table:formula="of:=[.D908]-[.D90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B907]+19" office:value-type="float" office:value="17233" calcext:value-type="float">
            <text:p>17233</text:p>
          </table:table-cell>
          <table:table-cell office:value-type="float" office:value="8640000" calcext:value-type="float">
            <text:p>8640000</text:p>
          </table:table-cell>
          <table:table-cell table:formula="of:=[.B908]/[.C908]" office:value-type="float" office:value="0.00199456018518519" calcext:value-type="float">
            <text:p>0,00199456018518519000</text:p>
          </table:table-cell>
          <table:table-cell table:formula="of:=[.D909]-[.D90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B908]+19" office:value-type="float" office:value="17252" calcext:value-type="float">
            <text:p>17252</text:p>
          </table:table-cell>
          <table:table-cell office:value-type="float" office:value="8640000" calcext:value-type="float">
            <text:p>8640000</text:p>
          </table:table-cell>
          <table:table-cell table:formula="of:=[.B909]/[.C909]" office:value-type="float" office:value="0.00199675925925926" calcext:value-type="float">
            <text:p>0,00199675925925926000</text:p>
          </table:table-cell>
          <table:table-cell table:formula="of:=[.D910]-[.D90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B909]+19" office:value-type="float" office:value="17271" calcext:value-type="float">
            <text:p>17271</text:p>
          </table:table-cell>
          <table:table-cell office:value-type="float" office:value="8640000" calcext:value-type="float">
            <text:p>8640000</text:p>
          </table:table-cell>
          <table:table-cell table:formula="of:=[.B910]/[.C910]" office:value-type="float" office:value="0.00199895833333333" calcext:value-type="float">
            <text:p>0,00199895833333333000</text:p>
          </table:table-cell>
          <table:table-cell table:formula="of:=[.D911]-[.D910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B910]+19" office:value-type="float" office:value="17290" calcext:value-type="float">
            <text:p>17290</text:p>
          </table:table-cell>
          <table:table-cell office:value-type="float" office:value="8640000" calcext:value-type="float">
            <text:p>8640000</text:p>
          </table:table-cell>
          <table:table-cell table:formula="of:=[.B911]/[.C911]" office:value-type="float" office:value="0.00200115740740741" calcext:value-type="float">
            <text:p>0,00200115740740741000</text:p>
          </table:table-cell>
          <table:table-cell table:formula="of:=[.D912]-[.D91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B911]+19" office:value-type="float" office:value="17309" calcext:value-type="float">
            <text:p>17309</text:p>
          </table:table-cell>
          <table:table-cell office:value-type="float" office:value="8640000" calcext:value-type="float">
            <text:p>8640000</text:p>
          </table:table-cell>
          <table:table-cell table:formula="of:=[.B912]/[.C912]" office:value-type="float" office:value="0.00200335648148148" calcext:value-type="float">
            <text:p>0,00200335648148148000</text:p>
          </table:table-cell>
          <table:table-cell table:formula="of:=[.D913]-[.D91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B912]+19" office:value-type="float" office:value="17328" calcext:value-type="float">
            <text:p>17328</text:p>
          </table:table-cell>
          <table:table-cell office:value-type="float" office:value="8640000" calcext:value-type="float">
            <text:p>8640000</text:p>
          </table:table-cell>
          <table:table-cell table:formula="of:=[.B913]/[.C913]" office:value-type="float" office:value="0.00200555555555556" calcext:value-type="float">
            <text:p>0,00200555555555556000</text:p>
          </table:table-cell>
          <table:table-cell table:formula="of:=[.D914]-[.D91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B913]+19" office:value-type="float" office:value="17347" calcext:value-type="float">
            <text:p>17347</text:p>
          </table:table-cell>
          <table:table-cell office:value-type="float" office:value="8640000" calcext:value-type="float">
            <text:p>8640000</text:p>
          </table:table-cell>
          <table:table-cell table:formula="of:=[.B914]/[.C914]" office:value-type="float" office:value="0.00200775462962963" calcext:value-type="float">
            <text:p>0,00200775462962963000</text:p>
          </table:table-cell>
          <table:table-cell table:formula="of:=[.D915]-[.D91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B914]+19" office:value-type="float" office:value="17366" calcext:value-type="float">
            <text:p>17366</text:p>
          </table:table-cell>
          <table:table-cell office:value-type="float" office:value="8640000" calcext:value-type="float">
            <text:p>8640000</text:p>
          </table:table-cell>
          <table:table-cell table:formula="of:=[.B915]/[.C915]" office:value-type="float" office:value="0.0020099537037037" calcext:value-type="float">
            <text:p>0,00200995370370370000</text:p>
          </table:table-cell>
          <table:table-cell table:formula="of:=[.D916]-[.D915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B915]+19" office:value-type="float" office:value="17385" calcext:value-type="float">
            <text:p>17385</text:p>
          </table:table-cell>
          <table:table-cell office:value-type="float" office:value="8640000" calcext:value-type="float">
            <text:p>8640000</text:p>
          </table:table-cell>
          <table:table-cell table:formula="of:=[.B916]/[.C916]" office:value-type="float" office:value="0.00201215277777778" calcext:value-type="float">
            <text:p>0,00201215277777778000</text:p>
          </table:table-cell>
          <table:table-cell table:formula="of:=[.D917]-[.D91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B916]+19" office:value-type="float" office:value="17404" calcext:value-type="float">
            <text:p>17404</text:p>
          </table:table-cell>
          <table:table-cell office:value-type="float" office:value="8640000" calcext:value-type="float">
            <text:p>8640000</text:p>
          </table:table-cell>
          <table:table-cell table:formula="of:=[.B917]/[.C917]" office:value-type="float" office:value="0.00201435185185185" calcext:value-type="float">
            <text:p>0,00201435185185185000</text:p>
          </table:table-cell>
          <table:table-cell table:formula="of:=[.D918]-[.D91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B917]+19" office:value-type="float" office:value="17423" calcext:value-type="float">
            <text:p>17423</text:p>
          </table:table-cell>
          <table:table-cell office:value-type="float" office:value="8640000" calcext:value-type="float">
            <text:p>8640000</text:p>
          </table:table-cell>
          <table:table-cell table:formula="of:=[.B918]/[.C918]" office:value-type="float" office:value="0.00201655092592593" calcext:value-type="float">
            <text:p>0,00201655092592593000</text:p>
          </table:table-cell>
          <table:table-cell table:formula="of:=[.D919]-[.D91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B918]+19" office:value-type="float" office:value="17442" calcext:value-type="float">
            <text:p>17442</text:p>
          </table:table-cell>
          <table:table-cell office:value-type="float" office:value="8640000" calcext:value-type="float">
            <text:p>8640000</text:p>
          </table:table-cell>
          <table:table-cell table:formula="of:=[.B919]/[.C919]" office:value-type="float" office:value="0.00201875" calcext:value-type="float">
            <text:p>0,00201875000000000000</text:p>
          </table:table-cell>
          <table:table-cell table:formula="of:=[.D920]-[.D919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B919]+19" office:value-type="float" office:value="17461" calcext:value-type="float">
            <text:p>17461</text:p>
          </table:table-cell>
          <table:table-cell office:value-type="float" office:value="8640000" calcext:value-type="float">
            <text:p>8640000</text:p>
          </table:table-cell>
          <table:table-cell table:formula="of:=[.B920]/[.C920]" office:value-type="float" office:value="0.00202094907407407" calcext:value-type="float">
            <text:p>0,00202094907407407000</text:p>
          </table:table-cell>
          <table:table-cell table:formula="of:=[.D921]-[.D92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B920]+19" office:value-type="float" office:value="17480" calcext:value-type="float">
            <text:p>17480</text:p>
          </table:table-cell>
          <table:table-cell office:value-type="float" office:value="8640000" calcext:value-type="float">
            <text:p>8640000</text:p>
          </table:table-cell>
          <table:table-cell table:formula="of:=[.B921]/[.C921]" office:value-type="float" office:value="0.00202314814814815" calcext:value-type="float">
            <text:p>0,00202314814814815000</text:p>
          </table:table-cell>
          <table:table-cell table:formula="of:=[.D922]-[.D92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B921]+19" office:value-type="float" office:value="17499" calcext:value-type="float">
            <text:p>17499</text:p>
          </table:table-cell>
          <table:table-cell office:value-type="float" office:value="8640000" calcext:value-type="float">
            <text:p>8640000</text:p>
          </table:table-cell>
          <table:table-cell table:formula="of:=[.B922]/[.C922]" office:value-type="float" office:value="0.00202534722222222" calcext:value-type="float">
            <text:p>0,00202534722222222000</text:p>
          </table:table-cell>
          <table:table-cell table:formula="of:=[.D923]-[.D92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B922]+19" office:value-type="float" office:value="17518" calcext:value-type="float">
            <text:p>17518</text:p>
          </table:table-cell>
          <table:table-cell office:value-type="float" office:value="8640000" calcext:value-type="float">
            <text:p>8640000</text:p>
          </table:table-cell>
          <table:table-cell table:formula="of:=[.B923]/[.C923]" office:value-type="float" office:value="0.0020275462962963" calcext:value-type="float">
            <text:p>0,00202754629629630000</text:p>
          </table:table-cell>
          <table:table-cell table:formula="of:=[.D924]-[.D92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B923]+19" office:value-type="float" office:value="17537" calcext:value-type="float">
            <text:p>17537</text:p>
          </table:table-cell>
          <table:table-cell office:value-type="float" office:value="8640000" calcext:value-type="float">
            <text:p>8640000</text:p>
          </table:table-cell>
          <table:table-cell table:formula="of:=[.B924]/[.C924]" office:value-type="float" office:value="0.00202974537037037" calcext:value-type="float">
            <text:p>0,00202974537037037000</text:p>
          </table:table-cell>
          <table:table-cell table:formula="of:=[.D925]-[.D924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B924]+19" office:value-type="float" office:value="17556" calcext:value-type="float">
            <text:p>17556</text:p>
          </table:table-cell>
          <table:table-cell office:value-type="float" office:value="8640000" calcext:value-type="float">
            <text:p>8640000</text:p>
          </table:table-cell>
          <table:table-cell table:formula="of:=[.B925]/[.C925]" office:value-type="float" office:value="0.00203194444444444" calcext:value-type="float">
            <text:p>0,00203194444444444000</text:p>
          </table:table-cell>
          <table:table-cell table:formula="of:=[.D926]-[.D92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B925]+19" office:value-type="float" office:value="17575" calcext:value-type="float">
            <text:p>17575</text:p>
          </table:table-cell>
          <table:table-cell office:value-type="float" office:value="8640000" calcext:value-type="float">
            <text:p>8640000</text:p>
          </table:table-cell>
          <table:table-cell table:formula="of:=[.B926]/[.C926]" office:value-type="float" office:value="0.00203414351851852" calcext:value-type="float">
            <text:p>0,00203414351851852000</text:p>
          </table:table-cell>
          <table:table-cell table:formula="of:=[.D927]-[.D92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B926]+19" office:value-type="float" office:value="17594" calcext:value-type="float">
            <text:p>17594</text:p>
          </table:table-cell>
          <table:table-cell office:value-type="float" office:value="8640000" calcext:value-type="float">
            <text:p>8640000</text:p>
          </table:table-cell>
          <table:table-cell table:formula="of:=[.B927]/[.C927]" office:value-type="float" office:value="0.00203634259259259" calcext:value-type="float">
            <text:p>0,00203634259259259000</text:p>
          </table:table-cell>
          <table:table-cell table:formula="of:=[.D928]-[.D92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B927]+19" office:value-type="float" office:value="17613" calcext:value-type="float">
            <text:p>17613</text:p>
          </table:table-cell>
          <table:table-cell office:value-type="float" office:value="8640000" calcext:value-type="float">
            <text:p>8640000</text:p>
          </table:table-cell>
          <table:table-cell table:formula="of:=[.B928]/[.C928]" office:value-type="float" office:value="0.00203854166666667" calcext:value-type="float">
            <text:p>0,00203854166666667000</text:p>
          </table:table-cell>
          <table:table-cell table:formula="of:=[.D929]-[.D928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B928]+19" office:value-type="float" office:value="17632" calcext:value-type="float">
            <text:p>17632</text:p>
          </table:table-cell>
          <table:table-cell office:value-type="float" office:value="8640000" calcext:value-type="float">
            <text:p>8640000</text:p>
          </table:table-cell>
          <table:table-cell table:formula="of:=[.B929]/[.C929]" office:value-type="float" office:value="0.00204074074074074" calcext:value-type="float">
            <text:p>0,00204074074074074000</text:p>
          </table:table-cell>
          <table:table-cell table:formula="of:=[.D930]-[.D92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B929]+19" office:value-type="float" office:value="17651" calcext:value-type="float">
            <text:p>17651</text:p>
          </table:table-cell>
          <table:table-cell office:value-type="float" office:value="8640000" calcext:value-type="float">
            <text:p>8640000</text:p>
          </table:table-cell>
          <table:table-cell table:formula="of:=[.B930]/[.C930]" office:value-type="float" office:value="0.00204293981481481" calcext:value-type="float">
            <text:p>0,00204293981481481000</text:p>
          </table:table-cell>
          <table:table-cell table:formula="of:=[.D931]-[.D93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B930]+19" office:value-type="float" office:value="17670" calcext:value-type="float">
            <text:p>17670</text:p>
          </table:table-cell>
          <table:table-cell office:value-type="float" office:value="8640000" calcext:value-type="float">
            <text:p>8640000</text:p>
          </table:table-cell>
          <table:table-cell table:formula="of:=[.B931]/[.C931]" office:value-type="float" office:value="0.00204513888888889" calcext:value-type="float">
            <text:p>0,00204513888888889000</text:p>
          </table:table-cell>
          <table:table-cell table:formula="of:=[.D932]-[.D93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B931]+19" office:value-type="float" office:value="17689" calcext:value-type="float">
            <text:p>17689</text:p>
          </table:table-cell>
          <table:table-cell office:value-type="float" office:value="8640000" calcext:value-type="float">
            <text:p>8640000</text:p>
          </table:table-cell>
          <table:table-cell table:formula="of:=[.B932]/[.C932]" office:value-type="float" office:value="0.00204733796296296" calcext:value-type="float">
            <text:p>0,00204733796296296000</text:p>
          </table:table-cell>
          <table:table-cell table:formula="of:=[.D933]-[.D93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B932]+19" office:value-type="float" office:value="17708" calcext:value-type="float">
            <text:p>17708</text:p>
          </table:table-cell>
          <table:table-cell office:value-type="float" office:value="8640000" calcext:value-type="float">
            <text:p>8640000</text:p>
          </table:table-cell>
          <table:table-cell table:formula="of:=[.B933]/[.C933]" office:value-type="float" office:value="0.00204953703703704" calcext:value-type="float">
            <text:p>0,00204953703703704000</text:p>
          </table:table-cell>
          <table:table-cell table:formula="of:=[.D934]-[.D933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B933]+19" office:value-type="float" office:value="17727" calcext:value-type="float">
            <text:p>17727</text:p>
          </table:table-cell>
          <table:table-cell office:value-type="float" office:value="8640000" calcext:value-type="float">
            <text:p>8640000</text:p>
          </table:table-cell>
          <table:table-cell table:formula="of:=[.B934]/[.C934]" office:value-type="float" office:value="0.00205173611111111" calcext:value-type="float">
            <text:p>0,00205173611111111000</text:p>
          </table:table-cell>
          <table:table-cell table:formula="of:=[.D935]-[.D93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B934]+19" office:value-type="float" office:value="17746" calcext:value-type="float">
            <text:p>17746</text:p>
          </table:table-cell>
          <table:table-cell office:value-type="float" office:value="8640000" calcext:value-type="float">
            <text:p>8640000</text:p>
          </table:table-cell>
          <table:table-cell table:formula="of:=[.B935]/[.C935]" office:value-type="float" office:value="0.00205393518518519" calcext:value-type="float">
            <text:p>0,00205393518518519000</text:p>
          </table:table-cell>
          <table:table-cell table:formula="of:=[.D936]-[.D93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B935]+19" office:value-type="float" office:value="17765" calcext:value-type="float">
            <text:p>17765</text:p>
          </table:table-cell>
          <table:table-cell office:value-type="float" office:value="8640000" calcext:value-type="float">
            <text:p>8640000</text:p>
          </table:table-cell>
          <table:table-cell table:formula="of:=[.B936]/[.C936]" office:value-type="float" office:value="0.00205613425925926" calcext:value-type="float">
            <text:p>0,00205613425925926000</text:p>
          </table:table-cell>
          <table:table-cell table:formula="of:=[.D937]-[.D93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B936]+19" office:value-type="float" office:value="17784" calcext:value-type="float">
            <text:p>17784</text:p>
          </table:table-cell>
          <table:table-cell office:value-type="float" office:value="8640000" calcext:value-type="float">
            <text:p>8640000</text:p>
          </table:table-cell>
          <table:table-cell table:formula="of:=[.B937]/[.C937]" office:value-type="float" office:value="0.00205833333333333" calcext:value-type="float">
            <text:p>0,00205833333333333000</text:p>
          </table:table-cell>
          <table:table-cell table:formula="of:=[.D938]-[.D937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B937]+19" office:value-type="float" office:value="17803" calcext:value-type="float">
            <text:p>17803</text:p>
          </table:table-cell>
          <table:table-cell office:value-type="float" office:value="8640000" calcext:value-type="float">
            <text:p>8640000</text:p>
          </table:table-cell>
          <table:table-cell table:formula="of:=[.B938]/[.C938]" office:value-type="float" office:value="0.00206053240740741" calcext:value-type="float">
            <text:p>0,00206053240740741000</text:p>
          </table:table-cell>
          <table:table-cell table:formula="of:=[.D939]-[.D93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B938]+19" office:value-type="float" office:value="17822" calcext:value-type="float">
            <text:p>17822</text:p>
          </table:table-cell>
          <table:table-cell office:value-type="float" office:value="8640000" calcext:value-type="float">
            <text:p>8640000</text:p>
          </table:table-cell>
          <table:table-cell table:formula="of:=[.B939]/[.C939]" office:value-type="float" office:value="0.00206273148148148" calcext:value-type="float">
            <text:p>0,00206273148148148000</text:p>
          </table:table-cell>
          <table:table-cell table:formula="of:=[.D940]-[.D93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B939]+19" office:value-type="float" office:value="17841" calcext:value-type="float">
            <text:p>17841</text:p>
          </table:table-cell>
          <table:table-cell office:value-type="float" office:value="8640000" calcext:value-type="float">
            <text:p>8640000</text:p>
          </table:table-cell>
          <table:table-cell table:formula="of:=[.B940]/[.C940]" office:value-type="float" office:value="0.00206493055555556" calcext:value-type="float">
            <text:p>0,00206493055555556000</text:p>
          </table:table-cell>
          <table:table-cell table:formula="of:=[.D941]-[.D94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B940]+19" office:value-type="float" office:value="17860" calcext:value-type="float">
            <text:p>17860</text:p>
          </table:table-cell>
          <table:table-cell office:value-type="float" office:value="8640000" calcext:value-type="float">
            <text:p>8640000</text:p>
          </table:table-cell>
          <table:table-cell table:formula="of:=[.B941]/[.C941]" office:value-type="float" office:value="0.00206712962962963" calcext:value-type="float">
            <text:p>0,00206712962962963000</text:p>
          </table:table-cell>
          <table:table-cell table:formula="of:=[.D942]-[.D94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B941]+19" office:value-type="float" office:value="17879" calcext:value-type="float">
            <text:p>17879</text:p>
          </table:table-cell>
          <table:table-cell office:value-type="float" office:value="8640000" calcext:value-type="float">
            <text:p>8640000</text:p>
          </table:table-cell>
          <table:table-cell table:formula="of:=[.B942]/[.C942]" office:value-type="float" office:value="0.0020693287037037" calcext:value-type="float">
            <text:p>0,00206932870370370000</text:p>
          </table:table-cell>
          <table:table-cell table:formula="of:=[.D943]-[.D942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B942]+19" office:value-type="float" office:value="17898" calcext:value-type="float">
            <text:p>17898</text:p>
          </table:table-cell>
          <table:table-cell office:value-type="float" office:value="8640000" calcext:value-type="float">
            <text:p>8640000</text:p>
          </table:table-cell>
          <table:table-cell table:formula="of:=[.B943]/[.C943]" office:value-type="float" office:value="0.00207152777777778" calcext:value-type="float">
            <text:p>0,00207152777777778000</text:p>
          </table:table-cell>
          <table:table-cell table:formula="of:=[.D944]-[.D94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B943]+19" office:value-type="float" office:value="17917" calcext:value-type="float">
            <text:p>17917</text:p>
          </table:table-cell>
          <table:table-cell office:value-type="float" office:value="8640000" calcext:value-type="float">
            <text:p>8640000</text:p>
          </table:table-cell>
          <table:table-cell table:formula="of:=[.B944]/[.C944]" office:value-type="float" office:value="0.00207372685185185" calcext:value-type="float">
            <text:p>0,00207372685185185000</text:p>
          </table:table-cell>
          <table:table-cell table:formula="of:=[.D945]-[.D94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B944]+19" office:value-type="float" office:value="17936" calcext:value-type="float">
            <text:p>17936</text:p>
          </table:table-cell>
          <table:table-cell office:value-type="float" office:value="8640000" calcext:value-type="float">
            <text:p>8640000</text:p>
          </table:table-cell>
          <table:table-cell table:formula="of:=[.B945]/[.C945]" office:value-type="float" office:value="0.00207592592592593" calcext:value-type="float">
            <text:p>0,00207592592592593000</text:p>
          </table:table-cell>
          <table:table-cell table:formula="of:=[.D946]-[.D94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B945]+19" office:value-type="float" office:value="17955" calcext:value-type="float">
            <text:p>17955</text:p>
          </table:table-cell>
          <table:table-cell office:value-type="float" office:value="8640000" calcext:value-type="float">
            <text:p>8640000</text:p>
          </table:table-cell>
          <table:table-cell table:formula="of:=[.B946]/[.C946]" office:value-type="float" office:value="0.002078125" calcext:value-type="float">
            <text:p>0,00207812500000000000</text:p>
          </table:table-cell>
          <table:table-cell table:formula="of:=[.D947]-[.D94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B946]+19" office:value-type="float" office:value="17974" calcext:value-type="float">
            <text:p>17974</text:p>
          </table:table-cell>
          <table:table-cell office:value-type="float" office:value="8640000" calcext:value-type="float">
            <text:p>8640000</text:p>
          </table:table-cell>
          <table:table-cell table:formula="of:=[.B947]/[.C947]" office:value-type="float" office:value="0.00208032407407407" calcext:value-type="float">
            <text:p>0,00208032407407407000</text:p>
          </table:table-cell>
          <table:table-cell table:formula="of:=[.D948]-[.D947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B947]+19" office:value-type="float" office:value="17993" calcext:value-type="float">
            <text:p>17993</text:p>
          </table:table-cell>
          <table:table-cell office:value-type="float" office:value="8640000" calcext:value-type="float">
            <text:p>8640000</text:p>
          </table:table-cell>
          <table:table-cell table:formula="of:=[.B948]/[.C948]" office:value-type="float" office:value="0.00208252314814815" calcext:value-type="float">
            <text:p>0,00208252314814815000</text:p>
          </table:table-cell>
          <table:table-cell table:formula="of:=[.D949]-[.D94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B948]+19" office:value-type="float" office:value="18012" calcext:value-type="float">
            <text:p>18012</text:p>
          </table:table-cell>
          <table:table-cell office:value-type="float" office:value="8640000" calcext:value-type="float">
            <text:p>8640000</text:p>
          </table:table-cell>
          <table:table-cell table:formula="of:=[.B949]/[.C949]" office:value-type="float" office:value="0.00208472222222222" calcext:value-type="float">
            <text:p>0,00208472222222222000</text:p>
          </table:table-cell>
          <table:table-cell table:formula="of:=[.D950]-[.D94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B949]+19" office:value-type="float" office:value="18031" calcext:value-type="float">
            <text:p>18031</text:p>
          </table:table-cell>
          <table:table-cell office:value-type="float" office:value="8640000" calcext:value-type="float">
            <text:p>8640000</text:p>
          </table:table-cell>
          <table:table-cell table:formula="of:=[.B950]/[.C950]" office:value-type="float" office:value="0.0020869212962963" calcext:value-type="float">
            <text:p>0,00208692129629630000</text:p>
          </table:table-cell>
          <table:table-cell table:formula="of:=[.D951]-[.D95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B950]+19" office:value-type="float" office:value="18050" calcext:value-type="float">
            <text:p>18050</text:p>
          </table:table-cell>
          <table:table-cell office:value-type="float" office:value="8640000" calcext:value-type="float">
            <text:p>8640000</text:p>
          </table:table-cell>
          <table:table-cell table:formula="of:=[.B951]/[.C951]" office:value-type="float" office:value="0.00208912037037037" calcext:value-type="float">
            <text:p>0,00208912037037037000</text:p>
          </table:table-cell>
          <table:table-cell table:formula="of:=[.D952]-[.D951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B951]+19" office:value-type="float" office:value="18069" calcext:value-type="float">
            <text:p>18069</text:p>
          </table:table-cell>
          <table:table-cell office:value-type="float" office:value="8640000" calcext:value-type="float">
            <text:p>8640000</text:p>
          </table:table-cell>
          <table:table-cell table:formula="of:=[.B952]/[.C952]" office:value-type="float" office:value="0.00209131944444444" calcext:value-type="float">
            <text:p>0,00209131944444444000</text:p>
          </table:table-cell>
          <table:table-cell table:formula="of:=[.D953]-[.D95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B952]+19" office:value-type="float" office:value="18088" calcext:value-type="float">
            <text:p>18088</text:p>
          </table:table-cell>
          <table:table-cell office:value-type="float" office:value="8640000" calcext:value-type="float">
            <text:p>8640000</text:p>
          </table:table-cell>
          <table:table-cell table:formula="of:=[.B953]/[.C953]" office:value-type="float" office:value="0.00209351851851852" calcext:value-type="float">
            <text:p>0,00209351851851852000</text:p>
          </table:table-cell>
          <table:table-cell table:formula="of:=[.D954]-[.D95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B953]+19" office:value-type="float" office:value="18107" calcext:value-type="float">
            <text:p>18107</text:p>
          </table:table-cell>
          <table:table-cell office:value-type="float" office:value="8640000" calcext:value-type="float">
            <text:p>8640000</text:p>
          </table:table-cell>
          <table:table-cell table:formula="of:=[.B954]/[.C954]" office:value-type="float" office:value="0.00209571759259259" calcext:value-type="float">
            <text:p>0,00209571759259259000</text:p>
          </table:table-cell>
          <table:table-cell table:formula="of:=[.D955]-[.D95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B954]+19" office:value-type="float" office:value="18126" calcext:value-type="float">
            <text:p>18126</text:p>
          </table:table-cell>
          <table:table-cell office:value-type="float" office:value="8640000" calcext:value-type="float">
            <text:p>8640000</text:p>
          </table:table-cell>
          <table:table-cell table:formula="of:=[.B955]/[.C955]" office:value-type="float" office:value="0.00209791666666667" calcext:value-type="float">
            <text:p>0,00209791666666667000</text:p>
          </table:table-cell>
          <table:table-cell table:formula="of:=[.D956]-[.D95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B955]+19" office:value-type="float" office:value="18145" calcext:value-type="float">
            <text:p>18145</text:p>
          </table:table-cell>
          <table:table-cell office:value-type="float" office:value="8640000" calcext:value-type="float">
            <text:p>8640000</text:p>
          </table:table-cell>
          <table:table-cell table:formula="of:=[.B956]/[.C956]" office:value-type="float" office:value="0.00210011574074074" calcext:value-type="float">
            <text:p>0,00210011574074074000</text:p>
          </table:table-cell>
          <table:table-cell table:formula="of:=[.D957]-[.D956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B956]+19" office:value-type="float" office:value="18164" calcext:value-type="float">
            <text:p>18164</text:p>
          </table:table-cell>
          <table:table-cell office:value-type="float" office:value="8640000" calcext:value-type="float">
            <text:p>8640000</text:p>
          </table:table-cell>
          <table:table-cell table:formula="of:=[.B957]/[.C957]" office:value-type="float" office:value="0.00210231481481481" calcext:value-type="float">
            <text:p>0,00210231481481481000</text:p>
          </table:table-cell>
          <table:table-cell table:formula="of:=[.D958]-[.D95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B957]+19" office:value-type="float" office:value="18183" calcext:value-type="float">
            <text:p>18183</text:p>
          </table:table-cell>
          <table:table-cell office:value-type="float" office:value="8640000" calcext:value-type="float">
            <text:p>8640000</text:p>
          </table:table-cell>
          <table:table-cell table:formula="of:=[.B958]/[.C958]" office:value-type="float" office:value="0.00210451388888889" calcext:value-type="float">
            <text:p>0,00210451388888889000</text:p>
          </table:table-cell>
          <table:table-cell table:formula="of:=[.D959]-[.D95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B958]+19" office:value-type="float" office:value="18202" calcext:value-type="float">
            <text:p>18202</text:p>
          </table:table-cell>
          <table:table-cell office:value-type="float" office:value="8640000" calcext:value-type="float">
            <text:p>8640000</text:p>
          </table:table-cell>
          <table:table-cell table:formula="of:=[.B959]/[.C959]" office:value-type="float" office:value="0.00210671296296296" calcext:value-type="float">
            <text:p>0,00210671296296296000</text:p>
          </table:table-cell>
          <table:table-cell table:formula="of:=[.D960]-[.D95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B959]+19" office:value-type="float" office:value="18221" calcext:value-type="float">
            <text:p>18221</text:p>
          </table:table-cell>
          <table:table-cell office:value-type="float" office:value="8640000" calcext:value-type="float">
            <text:p>8640000</text:p>
          </table:table-cell>
          <table:table-cell table:formula="of:=[.B960]/[.C960]" office:value-type="float" office:value="0.00210891203703704" calcext:value-type="float">
            <text:p>0,00210891203703704000</text:p>
          </table:table-cell>
          <table:table-cell table:formula="of:=[.D961]-[.D960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B960]+19" office:value-type="float" office:value="18240" calcext:value-type="float">
            <text:p>18240</text:p>
          </table:table-cell>
          <table:table-cell office:value-type="float" office:value="8640000" calcext:value-type="float">
            <text:p>8640000</text:p>
          </table:table-cell>
          <table:table-cell table:formula="of:=[.B961]/[.C961]" office:value-type="float" office:value="0.00211111111111111" calcext:value-type="float">
            <text:p>0,00211111111111111000</text:p>
          </table:table-cell>
          <table:table-cell table:formula="of:=[.D962]-[.D96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B961]+19" office:value-type="float" office:value="18259" calcext:value-type="float">
            <text:p>18259</text:p>
          </table:table-cell>
          <table:table-cell office:value-type="float" office:value="8640000" calcext:value-type="float">
            <text:p>8640000</text:p>
          </table:table-cell>
          <table:table-cell table:formula="of:=[.B962]/[.C962]" office:value-type="float" office:value="0.00211331018518519" calcext:value-type="float">
            <text:p>0,00211331018518519000</text:p>
          </table:table-cell>
          <table:table-cell table:formula="of:=[.D963]-[.D96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B962]+19" office:value-type="float" office:value="18278" calcext:value-type="float">
            <text:p>18278</text:p>
          </table:table-cell>
          <table:table-cell office:value-type="float" office:value="8640000" calcext:value-type="float">
            <text:p>8640000</text:p>
          </table:table-cell>
          <table:table-cell table:formula="of:=[.B963]/[.C963]" office:value-type="float" office:value="0.00211550925925926" calcext:value-type="float">
            <text:p>0,00211550925925926000</text:p>
          </table:table-cell>
          <table:table-cell table:formula="of:=[.D964]-[.D96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B963]+19" office:value-type="float" office:value="18297" calcext:value-type="float">
            <text:p>18297</text:p>
          </table:table-cell>
          <table:table-cell office:value-type="float" office:value="8640000" calcext:value-type="float">
            <text:p>8640000</text:p>
          </table:table-cell>
          <table:table-cell table:formula="of:=[.B964]/[.C964]" office:value-type="float" office:value="0.00211770833333333" calcext:value-type="float">
            <text:p>0,00211770833333333000</text:p>
          </table:table-cell>
          <table:table-cell table:formula="of:=[.D965]-[.D96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B964]+19" office:value-type="float" office:value="18316" calcext:value-type="float">
            <text:p>18316</text:p>
          </table:table-cell>
          <table:table-cell office:value-type="float" office:value="8640000" calcext:value-type="float">
            <text:p>8640000</text:p>
          </table:table-cell>
          <table:table-cell table:formula="of:=[.B965]/[.C965]" office:value-type="float" office:value="0.00211990740740741" calcext:value-type="float">
            <text:p>0,00211990740740741000</text:p>
          </table:table-cell>
          <table:table-cell table:formula="of:=[.D966]-[.D965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B965]+19" office:value-type="float" office:value="18335" calcext:value-type="float">
            <text:p>18335</text:p>
          </table:table-cell>
          <table:table-cell office:value-type="float" office:value="8640000" calcext:value-type="float">
            <text:p>8640000</text:p>
          </table:table-cell>
          <table:table-cell table:formula="of:=[.B966]/[.C966]" office:value-type="float" office:value="0.00212210648148148" calcext:value-type="float">
            <text:p>0,00212210648148148000</text:p>
          </table:table-cell>
          <table:table-cell table:formula="of:=[.D967]-[.D96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B966]+19" office:value-type="float" office:value="18354" calcext:value-type="float">
            <text:p>18354</text:p>
          </table:table-cell>
          <table:table-cell office:value-type="float" office:value="8640000" calcext:value-type="float">
            <text:p>8640000</text:p>
          </table:table-cell>
          <table:table-cell table:formula="of:=[.B967]/[.C967]" office:value-type="float" office:value="0.00212430555555556" calcext:value-type="float">
            <text:p>0,00212430555555556000</text:p>
          </table:table-cell>
          <table:table-cell table:formula="of:=[.D968]-[.D96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B967]+19" office:value-type="float" office:value="18373" calcext:value-type="float">
            <text:p>18373</text:p>
          </table:table-cell>
          <table:table-cell office:value-type="float" office:value="8640000" calcext:value-type="float">
            <text:p>8640000</text:p>
          </table:table-cell>
          <table:table-cell table:formula="of:=[.B968]/[.C968]" office:value-type="float" office:value="0.00212650462962963" calcext:value-type="float">
            <text:p>0,00212650462962963000</text:p>
          </table:table-cell>
          <table:table-cell table:formula="of:=[.D969]-[.D96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B968]+19" office:value-type="float" office:value="18392" calcext:value-type="float">
            <text:p>18392</text:p>
          </table:table-cell>
          <table:table-cell office:value-type="float" office:value="8640000" calcext:value-type="float">
            <text:p>8640000</text:p>
          </table:table-cell>
          <table:table-cell table:formula="of:=[.B969]/[.C969]" office:value-type="float" office:value="0.0021287037037037" calcext:value-type="float">
            <text:p>0,00212870370370370000</text:p>
          </table:table-cell>
          <table:table-cell table:formula="of:=[.D970]-[.D969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B969]+19" office:value-type="float" office:value="18411" calcext:value-type="float">
            <text:p>18411</text:p>
          </table:table-cell>
          <table:table-cell office:value-type="float" office:value="8640000" calcext:value-type="float">
            <text:p>8640000</text:p>
          </table:table-cell>
          <table:table-cell table:formula="of:=[.B970]/[.C970]" office:value-type="float" office:value="0.00213090277777778" calcext:value-type="float">
            <text:p>0,00213090277777778000</text:p>
          </table:table-cell>
          <table:table-cell table:formula="of:=[.D971]-[.D97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B970]+19" office:value-type="float" office:value="18430" calcext:value-type="float">
            <text:p>18430</text:p>
          </table:table-cell>
          <table:table-cell office:value-type="float" office:value="8640000" calcext:value-type="float">
            <text:p>8640000</text:p>
          </table:table-cell>
          <table:table-cell table:formula="of:=[.B971]/[.C971]" office:value-type="float" office:value="0.00213310185185185" calcext:value-type="float">
            <text:p>0,00213310185185185000</text:p>
          </table:table-cell>
          <table:table-cell table:formula="of:=[.D972]-[.D97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B971]+19" office:value-type="float" office:value="18449" calcext:value-type="float">
            <text:p>18449</text:p>
          </table:table-cell>
          <table:table-cell office:value-type="float" office:value="8640000" calcext:value-type="float">
            <text:p>8640000</text:p>
          </table:table-cell>
          <table:table-cell table:formula="of:=[.B972]/[.C972]" office:value-type="float" office:value="0.00213530092592593" calcext:value-type="float">
            <text:p>0,00213530092592593000</text:p>
          </table:table-cell>
          <table:table-cell table:formula="of:=[.D973]-[.D97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B972]+19" office:value-type="float" office:value="18468" calcext:value-type="float">
            <text:p>18468</text:p>
          </table:table-cell>
          <table:table-cell office:value-type="float" office:value="8640000" calcext:value-type="float">
            <text:p>8640000</text:p>
          </table:table-cell>
          <table:table-cell table:formula="of:=[.B973]/[.C973]" office:value-type="float" office:value="0.0021375" calcext:value-type="float">
            <text:p>0,00213750000000000000</text:p>
          </table:table-cell>
          <table:table-cell table:formula="of:=[.D974]-[.D97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B973]+19" office:value-type="float" office:value="18487" calcext:value-type="float">
            <text:p>18487</text:p>
          </table:table-cell>
          <table:table-cell office:value-type="float" office:value="8640000" calcext:value-type="float">
            <text:p>8640000</text:p>
          </table:table-cell>
          <table:table-cell table:formula="of:=[.B974]/[.C974]" office:value-type="float" office:value="0.00213969907407407" calcext:value-type="float">
            <text:p>0,00213969907407407000</text:p>
          </table:table-cell>
          <table:table-cell table:formula="of:=[.D975]-[.D974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B974]+19" office:value-type="float" office:value="18506" calcext:value-type="float">
            <text:p>18506</text:p>
          </table:table-cell>
          <table:table-cell office:value-type="float" office:value="8640000" calcext:value-type="float">
            <text:p>8640000</text:p>
          </table:table-cell>
          <table:table-cell table:formula="of:=[.B975]/[.C975]" office:value-type="float" office:value="0.00214189814814815" calcext:value-type="float">
            <text:p>0,00214189814814815000</text:p>
          </table:table-cell>
          <table:table-cell table:formula="of:=[.D976]-[.D97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B975]+19" office:value-type="float" office:value="18525" calcext:value-type="float">
            <text:p>18525</text:p>
          </table:table-cell>
          <table:table-cell office:value-type="float" office:value="8640000" calcext:value-type="float">
            <text:p>8640000</text:p>
          </table:table-cell>
          <table:table-cell table:formula="of:=[.B976]/[.C976]" office:value-type="float" office:value="0.00214409722222222" calcext:value-type="float">
            <text:p>0,00214409722222222000</text:p>
          </table:table-cell>
          <table:table-cell table:formula="of:=[.D977]-[.D97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B976]+19" office:value-type="float" office:value="18544" calcext:value-type="float">
            <text:p>18544</text:p>
          </table:table-cell>
          <table:table-cell office:value-type="float" office:value="8640000" calcext:value-type="float">
            <text:p>8640000</text:p>
          </table:table-cell>
          <table:table-cell table:formula="of:=[.B977]/[.C977]" office:value-type="float" office:value="0.0021462962962963" calcext:value-type="float">
            <text:p>0,00214629629629630000</text:p>
          </table:table-cell>
          <table:table-cell table:formula="of:=[.D978]-[.D97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B977]+19" office:value-type="float" office:value="18563" calcext:value-type="float">
            <text:p>18563</text:p>
          </table:table-cell>
          <table:table-cell office:value-type="float" office:value="8640000" calcext:value-type="float">
            <text:p>8640000</text:p>
          </table:table-cell>
          <table:table-cell table:formula="of:=[.B978]/[.C978]" office:value-type="float" office:value="0.00214849537037037" calcext:value-type="float">
            <text:p>0,00214849537037037000</text:p>
          </table:table-cell>
          <table:table-cell table:formula="of:=[.D979]-[.D97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B978]+19" office:value-type="float" office:value="18582" calcext:value-type="float">
            <text:p>18582</text:p>
          </table:table-cell>
          <table:table-cell office:value-type="float" office:value="8640000" calcext:value-type="float">
            <text:p>8640000</text:p>
          </table:table-cell>
          <table:table-cell table:formula="of:=[.B979]/[.C979]" office:value-type="float" office:value="0.00215069444444444" calcext:value-type="float">
            <text:p>0,00215069444444444000</text:p>
          </table:table-cell>
          <table:table-cell table:formula="of:=[.D980]-[.D979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B979]+19" office:value-type="float" office:value="18601" calcext:value-type="float">
            <text:p>18601</text:p>
          </table:table-cell>
          <table:table-cell office:value-type="float" office:value="8640000" calcext:value-type="float">
            <text:p>8640000</text:p>
          </table:table-cell>
          <table:table-cell table:formula="of:=[.B980]/[.C980]" office:value-type="float" office:value="0.00215289351851852" calcext:value-type="float">
            <text:p>0,00215289351851852000</text:p>
          </table:table-cell>
          <table:table-cell table:formula="of:=[.D981]-[.D98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B980]+19" office:value-type="float" office:value="18620" calcext:value-type="float">
            <text:p>18620</text:p>
          </table:table-cell>
          <table:table-cell office:value-type="float" office:value="8640000" calcext:value-type="float">
            <text:p>8640000</text:p>
          </table:table-cell>
          <table:table-cell table:formula="of:=[.B981]/[.C981]" office:value-type="float" office:value="0.00215509259259259" calcext:value-type="float">
            <text:p>0,00215509259259259000</text:p>
          </table:table-cell>
          <table:table-cell table:formula="of:=[.D982]-[.D98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B981]+19" office:value-type="float" office:value="18639" calcext:value-type="float">
            <text:p>18639</text:p>
          </table:table-cell>
          <table:table-cell office:value-type="float" office:value="8640000" calcext:value-type="float">
            <text:p>8640000</text:p>
          </table:table-cell>
          <table:table-cell table:formula="of:=[.B982]/[.C982]" office:value-type="float" office:value="0.00215729166666667" calcext:value-type="float">
            <text:p>0,00215729166666667000</text:p>
          </table:table-cell>
          <table:table-cell table:formula="of:=[.D983]-[.D98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B982]+19" office:value-type="float" office:value="18658" calcext:value-type="float">
            <text:p>18658</text:p>
          </table:table-cell>
          <table:table-cell office:value-type="float" office:value="8640000" calcext:value-type="float">
            <text:p>8640000</text:p>
          </table:table-cell>
          <table:table-cell table:formula="of:=[.B983]/[.C983]" office:value-type="float" office:value="0.00215949074074074" calcext:value-type="float">
            <text:p>0,00215949074074074000</text:p>
          </table:table-cell>
          <table:table-cell table:formula="of:=[.D984]-[.D983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B983]+19" office:value-type="float" office:value="18677" calcext:value-type="float">
            <text:p>18677</text:p>
          </table:table-cell>
          <table:table-cell office:value-type="float" office:value="8640000" calcext:value-type="float">
            <text:p>8640000</text:p>
          </table:table-cell>
          <table:table-cell table:formula="of:=[.B984]/[.C984]" office:value-type="float" office:value="0.00216168981481481" calcext:value-type="float">
            <text:p>0,00216168981481481000</text:p>
          </table:table-cell>
          <table:table-cell table:formula="of:=[.D985]-[.D98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B984]+19" office:value-type="float" office:value="18696" calcext:value-type="float">
            <text:p>18696</text:p>
          </table:table-cell>
          <table:table-cell office:value-type="float" office:value="8640000" calcext:value-type="float">
            <text:p>8640000</text:p>
          </table:table-cell>
          <table:table-cell table:formula="of:=[.B985]/[.C985]" office:value-type="float" office:value="0.00216388888888889" calcext:value-type="float">
            <text:p>0,00216388888888889000</text:p>
          </table:table-cell>
          <table:table-cell table:formula="of:=[.D986]-[.D98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B985]+19" office:value-type="float" office:value="18715" calcext:value-type="float">
            <text:p>18715</text:p>
          </table:table-cell>
          <table:table-cell office:value-type="float" office:value="8640000" calcext:value-type="float">
            <text:p>8640000</text:p>
          </table:table-cell>
          <table:table-cell table:formula="of:=[.B986]/[.C986]" office:value-type="float" office:value="0.00216608796296296" calcext:value-type="float">
            <text:p>0,00216608796296296000</text:p>
          </table:table-cell>
          <table:table-cell table:formula="of:=[.D987]-[.D98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B986]+19" office:value-type="float" office:value="18734" calcext:value-type="float">
            <text:p>18734</text:p>
          </table:table-cell>
          <table:table-cell office:value-type="float" office:value="8640000" calcext:value-type="float">
            <text:p>8640000</text:p>
          </table:table-cell>
          <table:table-cell table:formula="of:=[.B987]/[.C987]" office:value-type="float" office:value="0.00216828703703704" calcext:value-type="float">
            <text:p>0,00216828703703704000</text:p>
          </table:table-cell>
          <table:table-cell table:formula="of:=[.D988]-[.D98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B987]+19" office:value-type="float" office:value="18753" calcext:value-type="float">
            <text:p>18753</text:p>
          </table:table-cell>
          <table:table-cell office:value-type="float" office:value="8640000" calcext:value-type="float">
            <text:p>8640000</text:p>
          </table:table-cell>
          <table:table-cell table:formula="of:=[.B988]/[.C988]" office:value-type="float" office:value="0.00217048611111111" calcext:value-type="float">
            <text:p>0,00217048611111111000</text:p>
          </table:table-cell>
          <table:table-cell table:formula="of:=[.D989]-[.D988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B988]+19" office:value-type="float" office:value="18772" calcext:value-type="float">
            <text:p>18772</text:p>
          </table:table-cell>
          <table:table-cell office:value-type="float" office:value="8640000" calcext:value-type="float">
            <text:p>8640000</text:p>
          </table:table-cell>
          <table:table-cell table:formula="of:=[.B989]/[.C989]" office:value-type="float" office:value="0.00217268518518519" calcext:value-type="float">
            <text:p>0,00217268518518519000</text:p>
          </table:table-cell>
          <table:table-cell table:formula="of:=[.D990]-[.D98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B989]+19" office:value-type="float" office:value="18791" calcext:value-type="float">
            <text:p>18791</text:p>
          </table:table-cell>
          <table:table-cell office:value-type="float" office:value="8640000" calcext:value-type="float">
            <text:p>8640000</text:p>
          </table:table-cell>
          <table:table-cell table:formula="of:=[.B990]/[.C990]" office:value-type="float" office:value="0.00217488425925926" calcext:value-type="float">
            <text:p>0,00217488425925926000</text:p>
          </table:table-cell>
          <table:table-cell table:formula="of:=[.D991]-[.D99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B990]+19" office:value-type="float" office:value="18810" calcext:value-type="float">
            <text:p>18810</text:p>
          </table:table-cell>
          <table:table-cell office:value-type="float" office:value="8640000" calcext:value-type="float">
            <text:p>8640000</text:p>
          </table:table-cell>
          <table:table-cell table:formula="of:=[.B991]/[.C991]" office:value-type="float" office:value="0.00217708333333333" calcext:value-type="float">
            <text:p>0,00217708333333333000</text:p>
          </table:table-cell>
          <table:table-cell table:formula="of:=[.D992]-[.D99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B991]+19" office:value-type="float" office:value="18829" calcext:value-type="float">
            <text:p>18829</text:p>
          </table:table-cell>
          <table:table-cell office:value-type="float" office:value="8640000" calcext:value-type="float">
            <text:p>8640000</text:p>
          </table:table-cell>
          <table:table-cell table:formula="of:=[.B992]/[.C992]" office:value-type="float" office:value="0.00217928240740741" calcext:value-type="float">
            <text:p>0,00217928240740741000</text:p>
          </table:table-cell>
          <table:table-cell table:formula="of:=[.D993]-[.D992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B992]+19" office:value-type="float" office:value="18848" calcext:value-type="float">
            <text:p>18848</text:p>
          </table:table-cell>
          <table:table-cell office:value-type="float" office:value="8640000" calcext:value-type="float">
            <text:p>8640000</text:p>
          </table:table-cell>
          <table:table-cell table:formula="of:=[.B993]/[.C993]" office:value-type="float" office:value="0.00218148148148148" calcext:value-type="float">
            <text:p>0,00218148148148148000</text:p>
          </table:table-cell>
          <table:table-cell table:formula="of:=[.D994]-[.D99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B993]+19" office:value-type="float" office:value="18867" calcext:value-type="float">
            <text:p>18867</text:p>
          </table:table-cell>
          <table:table-cell office:value-type="float" office:value="8640000" calcext:value-type="float">
            <text:p>8640000</text:p>
          </table:table-cell>
          <table:table-cell table:formula="of:=[.B994]/[.C994]" office:value-type="float" office:value="0.00218368055555556" calcext:value-type="float">
            <text:p>0,00218368055555556000</text:p>
          </table:table-cell>
          <table:table-cell table:formula="of:=[.D995]-[.D99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B994]+19" office:value-type="float" office:value="18886" calcext:value-type="float">
            <text:p>18886</text:p>
          </table:table-cell>
          <table:table-cell office:value-type="float" office:value="8640000" calcext:value-type="float">
            <text:p>8640000</text:p>
          </table:table-cell>
          <table:table-cell table:formula="of:=[.B995]/[.C995]" office:value-type="float" office:value="0.00218587962962963" calcext:value-type="float">
            <text:p>0,00218587962962963000</text:p>
          </table:table-cell>
          <table:table-cell table:formula="of:=[.D996]-[.D99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B995]+19" office:value-type="float" office:value="18905" calcext:value-type="float">
            <text:p>18905</text:p>
          </table:table-cell>
          <table:table-cell office:value-type="float" office:value="8640000" calcext:value-type="float">
            <text:p>8640000</text:p>
          </table:table-cell>
          <table:table-cell table:formula="of:=[.B996]/[.C996]" office:value-type="float" office:value="0.0021880787037037" calcext:value-type="float">
            <text:p>0,00218807870370370000</text:p>
          </table:table-cell>
          <table:table-cell table:formula="of:=[.D997]-[.D99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B996]+19" office:value-type="float" office:value="18924" calcext:value-type="float">
            <text:p>18924</text:p>
          </table:table-cell>
          <table:table-cell office:value-type="float" office:value="8640000" calcext:value-type="float">
            <text:p>8640000</text:p>
          </table:table-cell>
          <table:table-cell table:formula="of:=[.B997]/[.C997]" office:value-type="float" office:value="0.00219027777777778" calcext:value-type="float">
            <text:p>0,00219027777777778000</text:p>
          </table:table-cell>
          <table:table-cell table:formula="of:=[.D998]-[.D997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B997]+19" office:value-type="float" office:value="18943" calcext:value-type="float">
            <text:p>18943</text:p>
          </table:table-cell>
          <table:table-cell office:value-type="float" office:value="8640000" calcext:value-type="float">
            <text:p>8640000</text:p>
          </table:table-cell>
          <table:table-cell table:formula="of:=[.B998]/[.C998]" office:value-type="float" office:value="0.00219247685185185" calcext:value-type="float">
            <text:p>0,00219247685185185000</text:p>
          </table:table-cell>
          <table:table-cell table:formula="of:=[.D999]-[.D99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B998]+19" office:value-type="float" office:value="18962" calcext:value-type="float">
            <text:p>18962</text:p>
          </table:table-cell>
          <table:table-cell office:value-type="float" office:value="8640000" calcext:value-type="float">
            <text:p>8640000</text:p>
          </table:table-cell>
          <table:table-cell table:formula="of:=[.B999]/[.C999]" office:value-type="float" office:value="0.00219467592592593" calcext:value-type="float">
            <text:p>0,00219467592592593000</text:p>
          </table:table-cell>
          <table:table-cell table:formula="of:=[.D1000]-[.D99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B999]+19" office:value-type="float" office:value="18981" calcext:value-type="float">
            <text:p>18981</text:p>
          </table:table-cell>
          <table:table-cell office:value-type="float" office:value="8640000" calcext:value-type="float">
            <text:p>8640000</text:p>
          </table:table-cell>
          <table:table-cell table:formula="of:=[.B1000]/[.C1000]" office:value-type="float" office:value="0.002196875" calcext:value-type="float">
            <text:p>0,00219687500000000000</text:p>
          </table:table-cell>
          <table:table-cell table:formula="of:=[.D1001]-[.D100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1000]+19" office:value-type="float" office:value="19000" calcext:value-type="float">
            <text:p>19000</text:p>
          </table:table-cell>
          <table:table-cell office:value-type="float" office:value="8640000" calcext:value-type="float">
            <text:p>8640000</text:p>
          </table:table-cell>
          <table:table-cell table:formula="of:=[.B1001]/[.C1001]" office:value-type="float" office:value="0.00219907407407407" calcext:value-type="float">
            <text:p>0,00219907407407407000</text:p>
          </table:table-cell>
          <table:table-cell table:formula="of:=[.D1002]-[.D1001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[.B1001]+19" office:value-type="float" office:value="19019" calcext:value-type="float">
            <text:p>19019</text:p>
          </table:table-cell>
          <table:table-cell office:value-type="float" office:value="8640000" calcext:value-type="float">
            <text:p>8640000</text:p>
          </table:table-cell>
          <table:table-cell table:formula="of:=[.B1002]/[.C1002]" office:value-type="float" office:value="0.00220127314814815" calcext:value-type="float">
            <text:p>0,00220127314814815000</text:p>
          </table:table-cell>
          <table:table-cell table:formula="of:=[.D1003]-[.D100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[.B1002]+19" office:value-type="float" office:value="19038" calcext:value-type="float">
            <text:p>19038</text:p>
          </table:table-cell>
          <table:table-cell office:value-type="float" office:value="8640000" calcext:value-type="float">
            <text:p>8640000</text:p>
          </table:table-cell>
          <table:table-cell table:formula="of:=[.B1003]/[.C1003]" office:value-type="float" office:value="0.00220347222222222" calcext:value-type="float">
            <text:p>0,00220347222222222000</text:p>
          </table:table-cell>
          <table:table-cell table:formula="of:=[.D1004]-[.D100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[.B1003]+19" office:value-type="float" office:value="19057" calcext:value-type="float">
            <text:p>19057</text:p>
          </table:table-cell>
          <table:table-cell office:value-type="float" office:value="8640000" calcext:value-type="float">
            <text:p>8640000</text:p>
          </table:table-cell>
          <table:table-cell table:formula="of:=[.B1004]/[.C1004]" office:value-type="float" office:value="0.0022056712962963" calcext:value-type="float">
            <text:p>0,00220567129629630000</text:p>
          </table:table-cell>
          <table:table-cell table:formula="of:=[.D1005]-[.D100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[.B1004]+19" office:value-type="float" office:value="19076" calcext:value-type="float">
            <text:p>19076</text:p>
          </table:table-cell>
          <table:table-cell office:value-type="float" office:value="8640000" calcext:value-type="float">
            <text:p>8640000</text:p>
          </table:table-cell>
          <table:table-cell table:formula="of:=[.B1005]/[.C1005]" office:value-type="float" office:value="0.00220787037037037" calcext:value-type="float">
            <text:p>0,00220787037037037000</text:p>
          </table:table-cell>
          <table:table-cell table:formula="of:=[.D1006]-[.D100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[.B1005]+19" office:value-type="float" office:value="19095" calcext:value-type="float">
            <text:p>19095</text:p>
          </table:table-cell>
          <table:table-cell office:value-type="float" office:value="8640000" calcext:value-type="float">
            <text:p>8640000</text:p>
          </table:table-cell>
          <table:table-cell table:formula="of:=[.B1006]/[.C1006]" office:value-type="float" office:value="0.00221006944444444" calcext:value-type="float">
            <text:p>0,00221006944444444000</text:p>
          </table:table-cell>
          <table:table-cell table:formula="of:=[.D1007]-[.D1006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[.B1006]+19" office:value-type="float" office:value="19114" calcext:value-type="float">
            <text:p>19114</text:p>
          </table:table-cell>
          <table:table-cell office:value-type="float" office:value="8640000" calcext:value-type="float">
            <text:p>8640000</text:p>
          </table:table-cell>
          <table:table-cell table:formula="of:=[.B1007]/[.C1007]" office:value-type="float" office:value="0.00221226851851852" calcext:value-type="float">
            <text:p>0,00221226851851852000</text:p>
          </table:table-cell>
          <table:table-cell table:formula="of:=[.D1008]-[.D100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[.B1007]+19" office:value-type="float" office:value="19133" calcext:value-type="float">
            <text:p>19133</text:p>
          </table:table-cell>
          <table:table-cell office:value-type="float" office:value="8640000" calcext:value-type="float">
            <text:p>8640000</text:p>
          </table:table-cell>
          <table:table-cell table:formula="of:=[.B1008]/[.C1008]" office:value-type="float" office:value="0.00221446759259259" calcext:value-type="float">
            <text:p>0,00221446759259259000</text:p>
          </table:table-cell>
          <table:table-cell table:formula="of:=[.D1009]-[.D100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[.B1008]+19" office:value-type="float" office:value="19152" calcext:value-type="float">
            <text:p>19152</text:p>
          </table:table-cell>
          <table:table-cell office:value-type="float" office:value="8640000" calcext:value-type="float">
            <text:p>8640000</text:p>
          </table:table-cell>
          <table:table-cell table:formula="of:=[.B1009]/[.C1009]" office:value-type="float" office:value="0.00221666666666667" calcext:value-type="float">
            <text:p>0,00221666666666667000</text:p>
          </table:table-cell>
          <table:table-cell table:formula="of:=[.D1010]-[.D100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[.B1009]+19" office:value-type="float" office:value="19171" calcext:value-type="float">
            <text:p>19171</text:p>
          </table:table-cell>
          <table:table-cell office:value-type="float" office:value="8640000" calcext:value-type="float">
            <text:p>8640000</text:p>
          </table:table-cell>
          <table:table-cell table:formula="of:=[.B1010]/[.C1010]" office:value-type="float" office:value="0.00221886574074074" calcext:value-type="float">
            <text:p>0,00221886574074074000</text:p>
          </table:table-cell>
          <table:table-cell table:formula="of:=[.D1011]-[.D1010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B1010]+19" office:value-type="float" office:value="19190" calcext:value-type="float">
            <text:p>19190</text:p>
          </table:table-cell>
          <table:table-cell office:value-type="float" office:value="8640000" calcext:value-type="float">
            <text:p>8640000</text:p>
          </table:table-cell>
          <table:table-cell table:formula="of:=[.B1011]/[.C1011]" office:value-type="float" office:value="0.00222106481481481" calcext:value-type="float">
            <text:p>0,00222106481481481000</text:p>
          </table:table-cell>
          <table:table-cell table:formula="of:=[.D1012]-[.D101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[.B1011]+19" office:value-type="float" office:value="19209" calcext:value-type="float">
            <text:p>19209</text:p>
          </table:table-cell>
          <table:table-cell office:value-type="float" office:value="8640000" calcext:value-type="float">
            <text:p>8640000</text:p>
          </table:table-cell>
          <table:table-cell table:formula="of:=[.B1012]/[.C1012]" office:value-type="float" office:value="0.00222326388888889" calcext:value-type="float">
            <text:p>0,00222326388888889000</text:p>
          </table:table-cell>
          <table:table-cell table:formula="of:=[.D1013]-[.D101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[.B1012]+19" office:value-type="float" office:value="19228" calcext:value-type="float">
            <text:p>19228</text:p>
          </table:table-cell>
          <table:table-cell office:value-type="float" office:value="8640000" calcext:value-type="float">
            <text:p>8640000</text:p>
          </table:table-cell>
          <table:table-cell table:formula="of:=[.B1013]/[.C1013]" office:value-type="float" office:value="0.00222546296296296" calcext:value-type="float">
            <text:p>0,00222546296296296000</text:p>
          </table:table-cell>
          <table:table-cell table:formula="of:=[.D1014]-[.D101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[.B1013]+19" office:value-type="float" office:value="19247" calcext:value-type="float">
            <text:p>19247</text:p>
          </table:table-cell>
          <table:table-cell office:value-type="float" office:value="8640000" calcext:value-type="float">
            <text:p>8640000</text:p>
          </table:table-cell>
          <table:table-cell table:formula="of:=[.B1014]/[.C1014]" office:value-type="float" office:value="0.00222766203703704" calcext:value-type="float">
            <text:p>0,00222766203703704000</text:p>
          </table:table-cell>
          <table:table-cell table:formula="of:=[.D1015]-[.D101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[.B1014]+19" office:value-type="float" office:value="19266" calcext:value-type="float">
            <text:p>19266</text:p>
          </table:table-cell>
          <table:table-cell office:value-type="float" office:value="8640000" calcext:value-type="float">
            <text:p>8640000</text:p>
          </table:table-cell>
          <table:table-cell table:formula="of:=[.B1015]/[.C1015]" office:value-type="float" office:value="0.00222986111111111" calcext:value-type="float">
            <text:p>0,00222986111111111000</text:p>
          </table:table-cell>
          <table:table-cell table:formula="of:=[.D1016]-[.D1015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[.B1015]+19" office:value-type="float" office:value="19285" calcext:value-type="float">
            <text:p>19285</text:p>
          </table:table-cell>
          <table:table-cell office:value-type="float" office:value="8640000" calcext:value-type="float">
            <text:p>8640000</text:p>
          </table:table-cell>
          <table:table-cell table:formula="of:=[.B1016]/[.C1016]" office:value-type="float" office:value="0.00223206018518519" calcext:value-type="float">
            <text:p>0,00223206018518519000</text:p>
          </table:table-cell>
          <table:table-cell table:formula="of:=[.D1017]-[.D101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[.B1016]+19" office:value-type="float" office:value="19304" calcext:value-type="float">
            <text:p>19304</text:p>
          </table:table-cell>
          <table:table-cell office:value-type="float" office:value="8640000" calcext:value-type="float">
            <text:p>8640000</text:p>
          </table:table-cell>
          <table:table-cell table:formula="of:=[.B1017]/[.C1017]" office:value-type="float" office:value="0.00223425925925926" calcext:value-type="float">
            <text:p>0,00223425925925926000</text:p>
          </table:table-cell>
          <table:table-cell table:formula="of:=[.D1018]-[.D101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[.B1017]+19" office:value-type="float" office:value="19323" calcext:value-type="float">
            <text:p>19323</text:p>
          </table:table-cell>
          <table:table-cell office:value-type="float" office:value="8640000" calcext:value-type="float">
            <text:p>8640000</text:p>
          </table:table-cell>
          <table:table-cell table:formula="of:=[.B1018]/[.C1018]" office:value-type="float" office:value="0.00223645833333333" calcext:value-type="float">
            <text:p>0,00223645833333333000</text:p>
          </table:table-cell>
          <table:table-cell table:formula="of:=[.D1019]-[.D101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[.B1018]+19" office:value-type="float" office:value="19342" calcext:value-type="float">
            <text:p>19342</text:p>
          </table:table-cell>
          <table:table-cell office:value-type="float" office:value="8640000" calcext:value-type="float">
            <text:p>8640000</text:p>
          </table:table-cell>
          <table:table-cell table:formula="of:=[.B1019]/[.C1019]" office:value-type="float" office:value="0.00223865740740741" calcext:value-type="float">
            <text:p>0,00223865740740741000</text:p>
          </table:table-cell>
          <table:table-cell table:formula="of:=[.D1020]-[.D101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[.B1019]+19" office:value-type="float" office:value="19361" calcext:value-type="float">
            <text:p>19361</text:p>
          </table:table-cell>
          <table:table-cell office:value-type="float" office:value="8640000" calcext:value-type="float">
            <text:p>8640000</text:p>
          </table:table-cell>
          <table:table-cell table:formula="of:=[.B1020]/[.C1020]" office:value-type="float" office:value="0.00224085648148148" calcext:value-type="float">
            <text:p>0,00224085648148148000</text:p>
          </table:table-cell>
          <table:table-cell table:formula="of:=[.D1021]-[.D1020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[.B1020]+19" office:value-type="float" office:value="19380" calcext:value-type="float">
            <text:p>19380</text:p>
          </table:table-cell>
          <table:table-cell office:value-type="float" office:value="8640000" calcext:value-type="float">
            <text:p>8640000</text:p>
          </table:table-cell>
          <table:table-cell table:formula="of:=[.B1021]/[.C1021]" office:value-type="float" office:value="0.00224305555555556" calcext:value-type="float">
            <text:p>0,00224305555555556000</text:p>
          </table:table-cell>
          <table:table-cell table:formula="of:=[.D1022]-[.D102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[.B1021]+19" office:value-type="float" office:value="19399" calcext:value-type="float">
            <text:p>19399</text:p>
          </table:table-cell>
          <table:table-cell office:value-type="float" office:value="8640000" calcext:value-type="float">
            <text:p>8640000</text:p>
          </table:table-cell>
          <table:table-cell table:formula="of:=[.B1022]/[.C1022]" office:value-type="float" office:value="0.00224525462962963" calcext:value-type="float">
            <text:p>0,00224525462962963000</text:p>
          </table:table-cell>
          <table:table-cell table:formula="of:=[.D1023]-[.D102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[.B1022]+19" office:value-type="float" office:value="19418" calcext:value-type="float">
            <text:p>19418</text:p>
          </table:table-cell>
          <table:table-cell office:value-type="float" office:value="8640000" calcext:value-type="float">
            <text:p>8640000</text:p>
          </table:table-cell>
          <table:table-cell table:formula="of:=[.B1023]/[.C1023]" office:value-type="float" office:value="0.0022474537037037" calcext:value-type="float">
            <text:p>0,00224745370370370000</text:p>
          </table:table-cell>
          <table:table-cell table:formula="of:=[.D1024]-[.D102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[.B1023]+19" office:value-type="float" office:value="19437" calcext:value-type="float">
            <text:p>19437</text:p>
          </table:table-cell>
          <table:table-cell office:value-type="float" office:value="8640000" calcext:value-type="float">
            <text:p>8640000</text:p>
          </table:table-cell>
          <table:table-cell table:formula="of:=[.B1024]/[.C1024]" office:value-type="float" office:value="0.00224965277777778" calcext:value-type="float">
            <text:p>0,00224965277777778000</text:p>
          </table:table-cell>
          <table:table-cell table:formula="of:=[.D1025]-[.D1024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B1024]+19" office:value-type="float" office:value="19456" calcext:value-type="float">
            <text:p>19456</text:p>
          </table:table-cell>
          <table:table-cell office:value-type="float" office:value="8640000" calcext:value-type="float">
            <text:p>8640000</text:p>
          </table:table-cell>
          <table:table-cell table:formula="of:=[.B1025]/[.C1025]" office:value-type="float" office:value="0.00225185185185185" calcext:value-type="float">
            <text:p>0,00225185185185185000</text:p>
          </table:table-cell>
          <table:table-cell table:formula="of:=[.D1026]-[.D102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[.B1025]+19" office:value-type="float" office:value="19475" calcext:value-type="float">
            <text:p>19475</text:p>
          </table:table-cell>
          <table:table-cell office:value-type="float" office:value="8640000" calcext:value-type="float">
            <text:p>8640000</text:p>
          </table:table-cell>
          <table:table-cell table:formula="of:=[.B1026]/[.C1026]" office:value-type="float" office:value="0.00225405092592593" calcext:value-type="float">
            <text:p>0,00225405092592593000</text:p>
          </table:table-cell>
          <table:table-cell table:formula="of:=[.D1027]-[.D102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[.B1026]+19" office:value-type="float" office:value="19494" calcext:value-type="float">
            <text:p>19494</text:p>
          </table:table-cell>
          <table:table-cell office:value-type="float" office:value="8640000" calcext:value-type="float">
            <text:p>8640000</text:p>
          </table:table-cell>
          <table:table-cell table:formula="of:=[.B1027]/[.C1027]" office:value-type="float" office:value="0.00225625" calcext:value-type="float">
            <text:p>0,00225625000000000000</text:p>
          </table:table-cell>
          <table:table-cell table:formula="of:=[.D1028]-[.D102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[.B1027]+19" office:value-type="float" office:value="19513" calcext:value-type="float">
            <text:p>19513</text:p>
          </table:table-cell>
          <table:table-cell office:value-type="float" office:value="8640000" calcext:value-type="float">
            <text:p>8640000</text:p>
          </table:table-cell>
          <table:table-cell table:formula="of:=[.B1028]/[.C1028]" office:value-type="float" office:value="0.00225844907407407" calcext:value-type="float">
            <text:p>0,00225844907407407000</text:p>
          </table:table-cell>
          <table:table-cell table:formula="of:=[.D1029]-[.D102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[.B1028]+19" office:value-type="float" office:value="19532" calcext:value-type="float">
            <text:p>19532</text:p>
          </table:table-cell>
          <table:table-cell office:value-type="float" office:value="8640000" calcext:value-type="float">
            <text:p>8640000</text:p>
          </table:table-cell>
          <table:table-cell table:formula="of:=[.B1029]/[.C1029]" office:value-type="float" office:value="0.00226064814814815" calcext:value-type="float">
            <text:p>0,00226064814814815000</text:p>
          </table:table-cell>
          <table:table-cell table:formula="of:=[.D1030]-[.D1029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[.B1029]+19" office:value-type="float" office:value="19551" calcext:value-type="float">
            <text:p>19551</text:p>
          </table:table-cell>
          <table:table-cell office:value-type="float" office:value="8640000" calcext:value-type="float">
            <text:p>8640000</text:p>
          </table:table-cell>
          <table:table-cell table:formula="of:=[.B1030]/[.C1030]" office:value-type="float" office:value="0.00226284722222222" calcext:value-type="float">
            <text:p>0,00226284722222222000</text:p>
          </table:table-cell>
          <table:table-cell table:formula="of:=[.D1031]-[.D103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[.B1030]+19" office:value-type="float" office:value="19570" calcext:value-type="float">
            <text:p>19570</text:p>
          </table:table-cell>
          <table:table-cell office:value-type="float" office:value="8640000" calcext:value-type="float">
            <text:p>8640000</text:p>
          </table:table-cell>
          <table:table-cell table:formula="of:=[.B1031]/[.C1031]" office:value-type="float" office:value="0.0022650462962963" calcext:value-type="float">
            <text:p>0,00226504629629630000</text:p>
          </table:table-cell>
          <table:table-cell table:formula="of:=[.D1032]-[.D103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[.B1031]+19" office:value-type="float" office:value="19589" calcext:value-type="float">
            <text:p>19589</text:p>
          </table:table-cell>
          <table:table-cell office:value-type="float" office:value="8640000" calcext:value-type="float">
            <text:p>8640000</text:p>
          </table:table-cell>
          <table:table-cell table:formula="of:=[.B1032]/[.C1032]" office:value-type="float" office:value="0.00226724537037037" calcext:value-type="float">
            <text:p>0,00226724537037037000</text:p>
          </table:table-cell>
          <table:table-cell table:formula="of:=[.D1033]-[.D103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[.B1032]+19" office:value-type="float" office:value="19608" calcext:value-type="float">
            <text:p>19608</text:p>
          </table:table-cell>
          <table:table-cell office:value-type="float" office:value="8640000" calcext:value-type="float">
            <text:p>8640000</text:p>
          </table:table-cell>
          <table:table-cell table:formula="of:=[.B1033]/[.C1033]" office:value-type="float" office:value="0.00226944444444444" calcext:value-type="float">
            <text:p>0,00226944444444444000</text:p>
          </table:table-cell>
          <table:table-cell table:formula="of:=[.D1034]-[.D1033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[.B1033]+19" office:value-type="float" office:value="19627" calcext:value-type="float">
            <text:p>19627</text:p>
          </table:table-cell>
          <table:table-cell office:value-type="float" office:value="8640000" calcext:value-type="float">
            <text:p>8640000</text:p>
          </table:table-cell>
          <table:table-cell table:formula="of:=[.B1034]/[.C1034]" office:value-type="float" office:value="0.00227164351851852" calcext:value-type="float">
            <text:p>0,00227164351851852000</text:p>
          </table:table-cell>
          <table:table-cell table:formula="of:=[.D1035]-[.D103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[.B1034]+19" office:value-type="float" office:value="19646" calcext:value-type="float">
            <text:p>19646</text:p>
          </table:table-cell>
          <table:table-cell office:value-type="float" office:value="8640000" calcext:value-type="float">
            <text:p>8640000</text:p>
          </table:table-cell>
          <table:table-cell table:formula="of:=[.B1035]/[.C1035]" office:value-type="float" office:value="0.00227384259259259" calcext:value-type="float">
            <text:p>0,00227384259259259000</text:p>
          </table:table-cell>
          <table:table-cell table:formula="of:=[.D1036]-[.D103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[.B1035]+19" office:value-type="float" office:value="19665" calcext:value-type="float">
            <text:p>19665</text:p>
          </table:table-cell>
          <table:table-cell office:value-type="float" office:value="8640000" calcext:value-type="float">
            <text:p>8640000</text:p>
          </table:table-cell>
          <table:table-cell table:formula="of:=[.B1036]/[.C1036]" office:value-type="float" office:value="0.00227604166666667" calcext:value-type="float">
            <text:p>0,00227604166666667000</text:p>
          </table:table-cell>
          <table:table-cell table:formula="of:=[.D1037]-[.D103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[.B1036]+19" office:value-type="float" office:value="19684" calcext:value-type="float">
            <text:p>19684</text:p>
          </table:table-cell>
          <table:table-cell office:value-type="float" office:value="8640000" calcext:value-type="float">
            <text:p>8640000</text:p>
          </table:table-cell>
          <table:table-cell table:formula="of:=[.B1037]/[.C1037]" office:value-type="float" office:value="0.00227824074074074" calcext:value-type="float">
            <text:p>0,00227824074074074000</text:p>
          </table:table-cell>
          <table:table-cell table:formula="of:=[.D1038]-[.D103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[.B1037]+19" office:value-type="float" office:value="19703" calcext:value-type="float">
            <text:p>19703</text:p>
          </table:table-cell>
          <table:table-cell office:value-type="float" office:value="8640000" calcext:value-type="float">
            <text:p>8640000</text:p>
          </table:table-cell>
          <table:table-cell table:formula="of:=[.B1038]/[.C1038]" office:value-type="float" office:value="0.00228043981481482" calcext:value-type="float">
            <text:p>0,00228043981481482000</text:p>
          </table:table-cell>
          <table:table-cell table:formula="of:=[.D1039]-[.D1038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[.B1038]+19" office:value-type="float" office:value="19722" calcext:value-type="float">
            <text:p>19722</text:p>
          </table:table-cell>
          <table:table-cell office:value-type="float" office:value="8640000" calcext:value-type="float">
            <text:p>8640000</text:p>
          </table:table-cell>
          <table:table-cell table:formula="of:=[.B1039]/[.C1039]" office:value-type="float" office:value="0.00228263888888889" calcext:value-type="float">
            <text:p>0,00228263888888889000</text:p>
          </table:table-cell>
          <table:table-cell table:formula="of:=[.D1040]-[.D103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[.B1039]+19" office:value-type="float" office:value="19741" calcext:value-type="float">
            <text:p>19741</text:p>
          </table:table-cell>
          <table:table-cell office:value-type="float" office:value="8640000" calcext:value-type="float">
            <text:p>8640000</text:p>
          </table:table-cell>
          <table:table-cell table:formula="of:=[.B1040]/[.C1040]" office:value-type="float" office:value="0.00228483796296296" calcext:value-type="float">
            <text:p>0,00228483796296296000</text:p>
          </table:table-cell>
          <table:table-cell table:formula="of:=[.D1041]-[.D104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[.B1040]+19" office:value-type="float" office:value="19760" calcext:value-type="float">
            <text:p>19760</text:p>
          </table:table-cell>
          <table:table-cell office:value-type="float" office:value="8640000" calcext:value-type="float">
            <text:p>8640000</text:p>
          </table:table-cell>
          <table:table-cell table:formula="of:=[.B1041]/[.C1041]" office:value-type="float" office:value="0.00228703703703704" calcext:value-type="float">
            <text:p>0,00228703703703704000</text:p>
          </table:table-cell>
          <table:table-cell table:formula="of:=[.D1042]-[.D104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[.B1041]+19" office:value-type="float" office:value="19779" calcext:value-type="float">
            <text:p>19779</text:p>
          </table:table-cell>
          <table:table-cell office:value-type="float" office:value="8640000" calcext:value-type="float">
            <text:p>8640000</text:p>
          </table:table-cell>
          <table:table-cell table:formula="of:=[.B1042]/[.C1042]" office:value-type="float" office:value="0.00228923611111111" calcext:value-type="float">
            <text:p>0,00228923611111111000</text:p>
          </table:table-cell>
          <table:table-cell table:formula="of:=[.D1043]-[.D1042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table:formula="of:=[.B1042]+19" office:value-type="float" office:value="19798" calcext:value-type="float">
            <text:p>19798</text:p>
          </table:table-cell>
          <table:table-cell office:value-type="float" office:value="8640000" calcext:value-type="float">
            <text:p>8640000</text:p>
          </table:table-cell>
          <table:table-cell table:formula="of:=[.B1043]/[.C1043]" office:value-type="float" office:value="0.00229143518518519" calcext:value-type="float">
            <text:p>0,00229143518518519000</text:p>
          </table:table-cell>
          <table:table-cell table:formula="of:=[.D1044]-[.D104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[.B1043]+19" office:value-type="float" office:value="19817" calcext:value-type="float">
            <text:p>19817</text:p>
          </table:table-cell>
          <table:table-cell office:value-type="float" office:value="8640000" calcext:value-type="float">
            <text:p>8640000</text:p>
          </table:table-cell>
          <table:table-cell table:formula="of:=[.B1044]/[.C1044]" office:value-type="float" office:value="0.00229363425925926" calcext:value-type="float">
            <text:p>0,00229363425925926000</text:p>
          </table:table-cell>
          <table:table-cell table:formula="of:=[.D1045]-[.D104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[.B1044]+19" office:value-type="float" office:value="19836" calcext:value-type="float">
            <text:p>19836</text:p>
          </table:table-cell>
          <table:table-cell office:value-type="float" office:value="8640000" calcext:value-type="float">
            <text:p>8640000</text:p>
          </table:table-cell>
          <table:table-cell table:formula="of:=[.B1045]/[.C1045]" office:value-type="float" office:value="0.00229583333333333" calcext:value-type="float">
            <text:p>0,00229583333333333000</text:p>
          </table:table-cell>
          <table:table-cell table:formula="of:=[.D1046]-[.D104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table:formula="of:=[.B1045]+19" office:value-type="float" office:value="19855" calcext:value-type="float">
            <text:p>19855</text:p>
          </table:table-cell>
          <table:table-cell office:value-type="float" office:value="8640000" calcext:value-type="float">
            <text:p>8640000</text:p>
          </table:table-cell>
          <table:table-cell table:formula="of:=[.B1046]/[.C1046]" office:value-type="float" office:value="0.00229803240740741" calcext:value-type="float">
            <text:p>0,00229803240740741000</text:p>
          </table:table-cell>
          <table:table-cell table:formula="of:=[.D1047]-[.D104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[.B1046]+19" office:value-type="float" office:value="19874" calcext:value-type="float">
            <text:p>19874</text:p>
          </table:table-cell>
          <table:table-cell office:value-type="float" office:value="8640000" calcext:value-type="float">
            <text:p>8640000</text:p>
          </table:table-cell>
          <table:table-cell table:formula="of:=[.B1047]/[.C1047]" office:value-type="float" office:value="0.00230023148148148" calcext:value-type="float">
            <text:p>0,00230023148148148000</text:p>
          </table:table-cell>
          <table:table-cell table:formula="of:=[.D1048]-[.D1047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table:formula="of:=[.B1047]+19" office:value-type="float" office:value="19893" calcext:value-type="float">
            <text:p>19893</text:p>
          </table:table-cell>
          <table:table-cell office:value-type="float" office:value="8640000" calcext:value-type="float">
            <text:p>8640000</text:p>
          </table:table-cell>
          <table:table-cell table:formula="of:=[.B1048]/[.C1048]" office:value-type="float" office:value="0.00230243055555556" calcext:value-type="float">
            <text:p>0,00230243055555556000</text:p>
          </table:table-cell>
          <table:table-cell table:formula="of:=[.D1049]-[.D104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[.B1048]+19" office:value-type="float" office:value="19912" calcext:value-type="float">
            <text:p>19912</text:p>
          </table:table-cell>
          <table:table-cell office:value-type="float" office:value="8640000" calcext:value-type="float">
            <text:p>8640000</text:p>
          </table:table-cell>
          <table:table-cell table:formula="of:=[.B1049]/[.C1049]" office:value-type="float" office:value="0.00230462962962963" calcext:value-type="float">
            <text:p>0,00230462962962963000</text:p>
          </table:table-cell>
          <table:table-cell table:formula="of:=[.D1050]-[.D104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[.B1049]+19" office:value-type="float" office:value="19931" calcext:value-type="float">
            <text:p>19931</text:p>
          </table:table-cell>
          <table:table-cell office:value-type="float" office:value="8640000" calcext:value-type="float">
            <text:p>8640000</text:p>
          </table:table-cell>
          <table:table-cell table:formula="of:=[.B1050]/[.C1050]" office:value-type="float" office:value="0.0023068287037037" calcext:value-type="float">
            <text:p>0,00230682870370370000</text:p>
          </table:table-cell>
          <table:table-cell table:formula="of:=[.D1051]-[.D105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.B1050]+19" office:value-type="float" office:value="19950" calcext:value-type="float">
            <text:p>19950</text:p>
          </table:table-cell>
          <table:table-cell office:value-type="float" office:value="8640000" calcext:value-type="float">
            <text:p>8640000</text:p>
          </table:table-cell>
          <table:table-cell table:formula="of:=[.B1051]/[.C1051]" office:value-type="float" office:value="0.00230902777777778" calcext:value-type="float">
            <text:p>0,00230902777777778000</text:p>
          </table:table-cell>
          <table:table-cell table:formula="of:=[.D1052]-[.D1051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[.B1051]+19" office:value-type="float" office:value="19969" calcext:value-type="float">
            <text:p>19969</text:p>
          </table:table-cell>
          <table:table-cell office:value-type="float" office:value="8640000" calcext:value-type="float">
            <text:p>8640000</text:p>
          </table:table-cell>
          <table:table-cell table:formula="of:=[.B1052]/[.C1052]" office:value-type="float" office:value="0.00231122685185185" calcext:value-type="float">
            <text:p>0,00231122685185185000</text:p>
          </table:table-cell>
          <table:table-cell table:formula="of:=[.D1053]-[.D105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[.B1052]+19" office:value-type="float" office:value="19988" calcext:value-type="float">
            <text:p>19988</text:p>
          </table:table-cell>
          <table:table-cell office:value-type="float" office:value="8640000" calcext:value-type="float">
            <text:p>8640000</text:p>
          </table:table-cell>
          <table:table-cell table:formula="of:=[.B1053]/[.C1053]" office:value-type="float" office:value="0.00231342592592593" calcext:value-type="float">
            <text:p>0,00231342592592593000</text:p>
          </table:table-cell>
          <table:table-cell table:formula="of:=[.D1054]-[.D105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[.B1053]+19" office:value-type="float" office:value="20007" calcext:value-type="float">
            <text:p>20007</text:p>
          </table:table-cell>
          <table:table-cell office:value-type="float" office:value="8640000" calcext:value-type="float">
            <text:p>8640000</text:p>
          </table:table-cell>
          <table:table-cell table:formula="of:=[.B1054]/[.C1054]" office:value-type="float" office:value="0.002315625" calcext:value-type="float">
            <text:p>0,00231562500000000000</text:p>
          </table:table-cell>
          <table:table-cell table:formula="of:=[.D1055]-[.D105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[.B1054]+19" office:value-type="float" office:value="20026" calcext:value-type="float">
            <text:p>20026</text:p>
          </table:table-cell>
          <table:table-cell office:value-type="float" office:value="8640000" calcext:value-type="float">
            <text:p>8640000</text:p>
          </table:table-cell>
          <table:table-cell table:formula="of:=[.B1055]/[.C1055]" office:value-type="float" office:value="0.00231782407407407" calcext:value-type="float">
            <text:p>0,00231782407407407000</text:p>
          </table:table-cell>
          <table:table-cell table:formula="of:=[.D1056]-[.D105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[.B1055]+19" office:value-type="float" office:value="20045" calcext:value-type="float">
            <text:p>20045</text:p>
          </table:table-cell>
          <table:table-cell office:value-type="float" office:value="8640000" calcext:value-type="float">
            <text:p>8640000</text:p>
          </table:table-cell>
          <table:table-cell table:formula="of:=[.B1056]/[.C1056]" office:value-type="float" office:value="0.00232002314814815" calcext:value-type="float">
            <text:p>0,00232002314814815000</text:p>
          </table:table-cell>
          <table:table-cell table:formula="of:=[.D1057]-[.D1056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[.B1056]+19" office:value-type="float" office:value="20064" calcext:value-type="float">
            <text:p>20064</text:p>
          </table:table-cell>
          <table:table-cell office:value-type="float" office:value="8640000" calcext:value-type="float">
            <text:p>8640000</text:p>
          </table:table-cell>
          <table:table-cell table:formula="of:=[.B1057]/[.C1057]" office:value-type="float" office:value="0.00232222222222222" calcext:value-type="float">
            <text:p>0,00232222222222222000</text:p>
          </table:table-cell>
          <table:table-cell table:formula="of:=[.D1058]-[.D105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[.B1057]+19" office:value-type="float" office:value="20083" calcext:value-type="float">
            <text:p>20083</text:p>
          </table:table-cell>
          <table:table-cell office:value-type="float" office:value="8640000" calcext:value-type="float">
            <text:p>8640000</text:p>
          </table:table-cell>
          <table:table-cell table:formula="of:=[.B1058]/[.C1058]" office:value-type="float" office:value="0.0023244212962963" calcext:value-type="float">
            <text:p>0,00232442129629630000</text:p>
          </table:table-cell>
          <table:table-cell table:formula="of:=[.D1059]-[.D105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[.B1058]+19" office:value-type="float" office:value="20102" calcext:value-type="float">
            <text:p>20102</text:p>
          </table:table-cell>
          <table:table-cell office:value-type="float" office:value="8640000" calcext:value-type="float">
            <text:p>8640000</text:p>
          </table:table-cell>
          <table:table-cell table:formula="of:=[.B1059]/[.C1059]" office:value-type="float" office:value="0.00232662037037037" calcext:value-type="float">
            <text:p>0,00232662037037037000</text:p>
          </table:table-cell>
          <table:table-cell table:formula="of:=[.D1060]-[.D105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[.B1059]+19" office:value-type="float" office:value="20121" calcext:value-type="float">
            <text:p>20121</text:p>
          </table:table-cell>
          <table:table-cell office:value-type="float" office:value="8640000" calcext:value-type="float">
            <text:p>8640000</text:p>
          </table:table-cell>
          <table:table-cell table:formula="of:=[.B1060]/[.C1060]" office:value-type="float" office:value="0.00232881944444444" calcext:value-type="float">
            <text:p>0,00232881944444444000</text:p>
          </table:table-cell>
          <table:table-cell table:formula="of:=[.D1061]-[.D106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[.B1060]+19" office:value-type="float" office:value="20140" calcext:value-type="float">
            <text:p>20140</text:p>
          </table:table-cell>
          <table:table-cell office:value-type="float" office:value="8640000" calcext:value-type="float">
            <text:p>8640000</text:p>
          </table:table-cell>
          <table:table-cell table:formula="of:=[.B1061]/[.C1061]" office:value-type="float" office:value="0.00233101851851852" calcext:value-type="float">
            <text:p>0,00233101851851852000</text:p>
          </table:table-cell>
          <table:table-cell table:formula="of:=[.D1062]-[.D1061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[.B1061]+19" office:value-type="float" office:value="20159" calcext:value-type="float">
            <text:p>20159</text:p>
          </table:table-cell>
          <table:table-cell office:value-type="float" office:value="8640000" calcext:value-type="float">
            <text:p>8640000</text:p>
          </table:table-cell>
          <table:table-cell table:formula="of:=[.B1062]/[.C1062]" office:value-type="float" office:value="0.00233321759259259" calcext:value-type="float">
            <text:p>0,00233321759259259000</text:p>
          </table:table-cell>
          <table:table-cell table:formula="of:=[.D1063]-[.D106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[.B1062]+19" office:value-type="float" office:value="20178" calcext:value-type="float">
            <text:p>20178</text:p>
          </table:table-cell>
          <table:table-cell office:value-type="float" office:value="8640000" calcext:value-type="float">
            <text:p>8640000</text:p>
          </table:table-cell>
          <table:table-cell table:formula="of:=[.B1063]/[.C1063]" office:value-type="float" office:value="0.00233541666666667" calcext:value-type="float">
            <text:p>0,00233541666666667000</text:p>
          </table:table-cell>
          <table:table-cell table:formula="of:=[.D1064]-[.D106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[.B1063]+19" office:value-type="float" office:value="20197" calcext:value-type="float">
            <text:p>20197</text:p>
          </table:table-cell>
          <table:table-cell office:value-type="float" office:value="8640000" calcext:value-type="float">
            <text:p>8640000</text:p>
          </table:table-cell>
          <table:table-cell table:formula="of:=[.B1064]/[.C1064]" office:value-type="float" office:value="0.00233761574074074" calcext:value-type="float">
            <text:p>0,00233761574074074000</text:p>
          </table:table-cell>
          <table:table-cell table:formula="of:=[.D1065]-[.D106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[.B1064]+19" office:value-type="float" office:value="20216" calcext:value-type="float">
            <text:p>20216</text:p>
          </table:table-cell>
          <table:table-cell office:value-type="float" office:value="8640000" calcext:value-type="float">
            <text:p>8640000</text:p>
          </table:table-cell>
          <table:table-cell table:formula="of:=[.B1065]/[.C1065]" office:value-type="float" office:value="0.00233981481481482" calcext:value-type="float">
            <text:p>0,00233981481481482000</text:p>
          </table:table-cell>
          <table:table-cell table:formula="of:=[.D1066]-[.D1065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[.B1065]+19" office:value-type="float" office:value="20235" calcext:value-type="float">
            <text:p>20235</text:p>
          </table:table-cell>
          <table:table-cell office:value-type="float" office:value="8640000" calcext:value-type="float">
            <text:p>8640000</text:p>
          </table:table-cell>
          <table:table-cell table:formula="of:=[.B1066]/[.C1066]" office:value-type="float" office:value="0.00234201388888889" calcext:value-type="float">
            <text:p>0,00234201388888889000</text:p>
          </table:table-cell>
          <table:table-cell table:formula="of:=[.D1067]-[.D106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[.B1066]+19" office:value-type="float" office:value="20254" calcext:value-type="float">
            <text:p>20254</text:p>
          </table:table-cell>
          <table:table-cell office:value-type="float" office:value="8640000" calcext:value-type="float">
            <text:p>8640000</text:p>
          </table:table-cell>
          <table:table-cell table:formula="of:=[.B1067]/[.C1067]" office:value-type="float" office:value="0.00234421296296296" calcext:value-type="float">
            <text:p>0,00234421296296296000</text:p>
          </table:table-cell>
          <table:table-cell table:formula="of:=[.D1068]-[.D106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[.B1067]+19" office:value-type="float" office:value="20273" calcext:value-type="float">
            <text:p>20273</text:p>
          </table:table-cell>
          <table:table-cell office:value-type="float" office:value="8640000" calcext:value-type="float">
            <text:p>8640000</text:p>
          </table:table-cell>
          <table:table-cell table:formula="of:=[.B1068]/[.C1068]" office:value-type="float" office:value="0.00234641203703704" calcext:value-type="float">
            <text:p>0,00234641203703704000</text:p>
          </table:table-cell>
          <table:table-cell table:formula="of:=[.D1069]-[.D106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[.B1068]+19" office:value-type="float" office:value="20292" calcext:value-type="float">
            <text:p>20292</text:p>
          </table:table-cell>
          <table:table-cell office:value-type="float" office:value="8640000" calcext:value-type="float">
            <text:p>8640000</text:p>
          </table:table-cell>
          <table:table-cell table:formula="of:=[.B1069]/[.C1069]" office:value-type="float" office:value="0.00234861111111111" calcext:value-type="float">
            <text:p>0,00234861111111111000</text:p>
          </table:table-cell>
          <table:table-cell table:formula="of:=[.D1070]-[.D106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[.B1069]+19" office:value-type="float" office:value="20311" calcext:value-type="float">
            <text:p>20311</text:p>
          </table:table-cell>
          <table:table-cell office:value-type="float" office:value="8640000" calcext:value-type="float">
            <text:p>8640000</text:p>
          </table:table-cell>
          <table:table-cell table:formula="of:=[.B1070]/[.C1070]" office:value-type="float" office:value="0.00235081018518519" calcext:value-type="float">
            <text:p>0,00235081018518519000</text:p>
          </table:table-cell>
          <table:table-cell table:formula="of:=[.D1071]-[.D1070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[.B1070]+19" office:value-type="float" office:value="20330" calcext:value-type="float">
            <text:p>20330</text:p>
          </table:table-cell>
          <table:table-cell office:value-type="float" office:value="8640000" calcext:value-type="float">
            <text:p>8640000</text:p>
          </table:table-cell>
          <table:table-cell table:formula="of:=[.B1071]/[.C1071]" office:value-type="float" office:value="0.00235300925925926" calcext:value-type="float">
            <text:p>0,00235300925925926000</text:p>
          </table:table-cell>
          <table:table-cell table:formula="of:=[.D1072]-[.D107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[.B1071]+19" office:value-type="float" office:value="20349" calcext:value-type="float">
            <text:p>20349</text:p>
          </table:table-cell>
          <table:table-cell office:value-type="float" office:value="8640000" calcext:value-type="float">
            <text:p>8640000</text:p>
          </table:table-cell>
          <table:table-cell table:formula="of:=[.B1072]/[.C1072]" office:value-type="float" office:value="0.00235520833333333" calcext:value-type="float">
            <text:p>0,00235520833333333000</text:p>
          </table:table-cell>
          <table:table-cell table:formula="of:=[.D1073]-[.D107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[.B1072]+19" office:value-type="float" office:value="20368" calcext:value-type="float">
            <text:p>20368</text:p>
          </table:table-cell>
          <table:table-cell office:value-type="float" office:value="8640000" calcext:value-type="float">
            <text:p>8640000</text:p>
          </table:table-cell>
          <table:table-cell table:formula="of:=[.B1073]/[.C1073]" office:value-type="float" office:value="0.00235740740740741" calcext:value-type="float">
            <text:p>0,00235740740740741000</text:p>
          </table:table-cell>
          <table:table-cell table:formula="of:=[.D1074]-[.D107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[.B1073]+19" office:value-type="float" office:value="20387" calcext:value-type="float">
            <text:p>20387</text:p>
          </table:table-cell>
          <table:table-cell office:value-type="float" office:value="8640000" calcext:value-type="float">
            <text:p>8640000</text:p>
          </table:table-cell>
          <table:table-cell table:formula="of:=[.B1074]/[.C1074]" office:value-type="float" office:value="0.00235960648148148" calcext:value-type="float">
            <text:p>0,00235960648148148000</text:p>
          </table:table-cell>
          <table:table-cell table:formula="of:=[.D1075]-[.D1074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[.B1074]+19" office:value-type="float" office:value="20406" calcext:value-type="float">
            <text:p>20406</text:p>
          </table:table-cell>
          <table:table-cell office:value-type="float" office:value="8640000" calcext:value-type="float">
            <text:p>8640000</text:p>
          </table:table-cell>
          <table:table-cell table:formula="of:=[.B1075]/[.C1075]" office:value-type="float" office:value="0.00236180555555556" calcext:value-type="float">
            <text:p>0,00236180555555556000</text:p>
          </table:table-cell>
          <table:table-cell table:formula="of:=[.D1076]-[.D107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[.B1075]+19" office:value-type="float" office:value="20425" calcext:value-type="float">
            <text:p>20425</text:p>
          </table:table-cell>
          <table:table-cell office:value-type="float" office:value="8640000" calcext:value-type="float">
            <text:p>8640000</text:p>
          </table:table-cell>
          <table:table-cell table:formula="of:=[.B1076]/[.C1076]" office:value-type="float" office:value="0.00236400462962963" calcext:value-type="float">
            <text:p>0,00236400462962963000</text:p>
          </table:table-cell>
          <table:table-cell table:formula="of:=[.D1077]-[.D107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[.B1076]+19" office:value-type="float" office:value="20444" calcext:value-type="float">
            <text:p>20444</text:p>
          </table:table-cell>
          <table:table-cell office:value-type="float" office:value="8640000" calcext:value-type="float">
            <text:p>8640000</text:p>
          </table:table-cell>
          <table:table-cell table:formula="of:=[.B1077]/[.C1077]" office:value-type="float" office:value="0.0023662037037037" calcext:value-type="float">
            <text:p>0,00236620370370370000</text:p>
          </table:table-cell>
          <table:table-cell table:formula="of:=[.D1078]-[.D107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[.B1077]+19" office:value-type="float" office:value="20463" calcext:value-type="float">
            <text:p>20463</text:p>
          </table:table-cell>
          <table:table-cell office:value-type="float" office:value="8640000" calcext:value-type="float">
            <text:p>8640000</text:p>
          </table:table-cell>
          <table:table-cell table:formula="of:=[.B1078]/[.C1078]" office:value-type="float" office:value="0.00236840277777778" calcext:value-type="float">
            <text:p>0,00236840277777778000</text:p>
          </table:table-cell>
          <table:table-cell table:formula="of:=[.D1079]-[.D107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[.B1078]+19" office:value-type="float" office:value="20482" calcext:value-type="float">
            <text:p>20482</text:p>
          </table:table-cell>
          <table:table-cell office:value-type="float" office:value="8640000" calcext:value-type="float">
            <text:p>8640000</text:p>
          </table:table-cell>
          <table:table-cell table:formula="of:=[.B1079]/[.C1079]" office:value-type="float" office:value="0.00237060185185185" calcext:value-type="float">
            <text:p>0,00237060185185185000</text:p>
          </table:table-cell>
          <table:table-cell table:formula="of:=[.D1080]-[.D1079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[.B1079]+19" office:value-type="float" office:value="20501" calcext:value-type="float">
            <text:p>20501</text:p>
          </table:table-cell>
          <table:table-cell office:value-type="float" office:value="8640000" calcext:value-type="float">
            <text:p>8640000</text:p>
          </table:table-cell>
          <table:table-cell table:formula="of:=[.B1080]/[.C1080]" office:value-type="float" office:value="0.00237280092592593" calcext:value-type="float">
            <text:p>0,00237280092592593000</text:p>
          </table:table-cell>
          <table:table-cell table:formula="of:=[.D1081]-[.D108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[.B1080]+19" office:value-type="float" office:value="20520" calcext:value-type="float">
            <text:p>20520</text:p>
          </table:table-cell>
          <table:table-cell office:value-type="float" office:value="8640000" calcext:value-type="float">
            <text:p>8640000</text:p>
          </table:table-cell>
          <table:table-cell table:formula="of:=[.B1081]/[.C1081]" office:value-type="float" office:value="0.002375" calcext:value-type="float">
            <text:p>0,00237500000000000000</text:p>
          </table:table-cell>
          <table:table-cell table:formula="of:=[.D1082]-[.D108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[.B1081]+19" office:value-type="float" office:value="20539" calcext:value-type="float">
            <text:p>20539</text:p>
          </table:table-cell>
          <table:table-cell office:value-type="float" office:value="8640000" calcext:value-type="float">
            <text:p>8640000</text:p>
          </table:table-cell>
          <table:table-cell table:formula="of:=[.B1082]/[.C1082]" office:value-type="float" office:value="0.00237719907407407" calcext:value-type="float">
            <text:p>0,00237719907407407000</text:p>
          </table:table-cell>
          <table:table-cell table:formula="of:=[.D1083]-[.D108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[.B1082]+19" office:value-type="float" office:value="20558" calcext:value-type="float">
            <text:p>20558</text:p>
          </table:table-cell>
          <table:table-cell office:value-type="float" office:value="8640000" calcext:value-type="float">
            <text:p>8640000</text:p>
          </table:table-cell>
          <table:table-cell table:formula="of:=[.B1083]/[.C1083]" office:value-type="float" office:value="0.00237939814814815" calcext:value-type="float">
            <text:p>0,00237939814814815000</text:p>
          </table:table-cell>
          <table:table-cell table:formula="of:=[.D1084]-[.D1083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[.B1083]+19" office:value-type="float" office:value="20577" calcext:value-type="float">
            <text:p>20577</text:p>
          </table:table-cell>
          <table:table-cell office:value-type="float" office:value="8640000" calcext:value-type="float">
            <text:p>8640000</text:p>
          </table:table-cell>
          <table:table-cell table:formula="of:=[.B1084]/[.C1084]" office:value-type="float" office:value="0.00238159722222222" calcext:value-type="float">
            <text:p>0,00238159722222222000</text:p>
          </table:table-cell>
          <table:table-cell table:formula="of:=[.D1085]-[.D108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[.B1084]+19" office:value-type="float" office:value="20596" calcext:value-type="float">
            <text:p>20596</text:p>
          </table:table-cell>
          <table:table-cell office:value-type="float" office:value="8640000" calcext:value-type="float">
            <text:p>8640000</text:p>
          </table:table-cell>
          <table:table-cell table:formula="of:=[.B1085]/[.C1085]" office:value-type="float" office:value="0.0023837962962963" calcext:value-type="float">
            <text:p>0,00238379629629630000</text:p>
          </table:table-cell>
          <table:table-cell table:formula="of:=[.D1086]-[.D108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[.B1085]+19" office:value-type="float" office:value="20615" calcext:value-type="float">
            <text:p>20615</text:p>
          </table:table-cell>
          <table:table-cell office:value-type="float" office:value="8640000" calcext:value-type="float">
            <text:p>8640000</text:p>
          </table:table-cell>
          <table:table-cell table:formula="of:=[.B1086]/[.C1086]" office:value-type="float" office:value="0.00238599537037037" calcext:value-type="float">
            <text:p>0,00238599537037037000</text:p>
          </table:table-cell>
          <table:table-cell table:formula="of:=[.D1087]-[.D108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[.B1086]+19" office:value-type="float" office:value="20634" calcext:value-type="float">
            <text:p>20634</text:p>
          </table:table-cell>
          <table:table-cell office:value-type="float" office:value="8640000" calcext:value-type="float">
            <text:p>8640000</text:p>
          </table:table-cell>
          <table:table-cell table:formula="of:=[.B1087]/[.C1087]" office:value-type="float" office:value="0.00238819444444444" calcext:value-type="float">
            <text:p>0,00238819444444444000</text:p>
          </table:table-cell>
          <table:table-cell table:formula="of:=[.D1088]-[.D108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[.B1087]+19" office:value-type="float" office:value="20653" calcext:value-type="float">
            <text:p>20653</text:p>
          </table:table-cell>
          <table:table-cell office:value-type="float" office:value="8640000" calcext:value-type="float">
            <text:p>8640000</text:p>
          </table:table-cell>
          <table:table-cell table:formula="of:=[.B1088]/[.C1088]" office:value-type="float" office:value="0.00239039351851852" calcext:value-type="float">
            <text:p>0,00239039351851852000</text:p>
          </table:table-cell>
          <table:table-cell table:formula="of:=[.D1089]-[.D1088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[.B1088]+19" office:value-type="float" office:value="20672" calcext:value-type="float">
            <text:p>20672</text:p>
          </table:table-cell>
          <table:table-cell office:value-type="float" office:value="8640000" calcext:value-type="float">
            <text:p>8640000</text:p>
          </table:table-cell>
          <table:table-cell table:formula="of:=[.B1089]/[.C1089]" office:value-type="float" office:value="0.00239259259259259" calcext:value-type="float">
            <text:p>0,00239259259259259000</text:p>
          </table:table-cell>
          <table:table-cell table:formula="of:=[.D1090]-[.D108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[.B1089]+19" office:value-type="float" office:value="20691" calcext:value-type="float">
            <text:p>20691</text:p>
          </table:table-cell>
          <table:table-cell office:value-type="float" office:value="8640000" calcext:value-type="float">
            <text:p>8640000</text:p>
          </table:table-cell>
          <table:table-cell table:formula="of:=[.B1090]/[.C1090]" office:value-type="float" office:value="0.00239479166666667" calcext:value-type="float">
            <text:p>0,00239479166666667000</text:p>
          </table:table-cell>
          <table:table-cell table:formula="of:=[.D1091]-[.D109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[.B1090]+19" office:value-type="float" office:value="20710" calcext:value-type="float">
            <text:p>20710</text:p>
          </table:table-cell>
          <table:table-cell office:value-type="float" office:value="8640000" calcext:value-type="float">
            <text:p>8640000</text:p>
          </table:table-cell>
          <table:table-cell table:formula="of:=[.B1091]/[.C1091]" office:value-type="float" office:value="0.00239699074074074" calcext:value-type="float">
            <text:p>0,00239699074074074000</text:p>
          </table:table-cell>
          <table:table-cell table:formula="of:=[.D1092]-[.D109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[.B1091]+19" office:value-type="float" office:value="20729" calcext:value-type="float">
            <text:p>20729</text:p>
          </table:table-cell>
          <table:table-cell office:value-type="float" office:value="8640000" calcext:value-type="float">
            <text:p>8640000</text:p>
          </table:table-cell>
          <table:table-cell table:formula="of:=[.B1092]/[.C1092]" office:value-type="float" office:value="0.00239918981481482" calcext:value-type="float">
            <text:p>0,00239918981481482000</text:p>
          </table:table-cell>
          <table:table-cell table:formula="of:=[.D1093]-[.D109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[.B1092]+19" office:value-type="float" office:value="20748" calcext:value-type="float">
            <text:p>20748</text:p>
          </table:table-cell>
          <table:table-cell office:value-type="float" office:value="8640000" calcext:value-type="float">
            <text:p>8640000</text:p>
          </table:table-cell>
          <table:table-cell table:formula="of:=[.B1093]/[.C1093]" office:value-type="float" office:value="0.00240138888888889" calcext:value-type="float">
            <text:p>0,00240138888888889000</text:p>
          </table:table-cell>
          <table:table-cell table:formula="of:=[.D1094]-[.D1093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[.B1093]+19" office:value-type="float" office:value="20767" calcext:value-type="float">
            <text:p>20767</text:p>
          </table:table-cell>
          <table:table-cell office:value-type="float" office:value="8640000" calcext:value-type="float">
            <text:p>8640000</text:p>
          </table:table-cell>
          <table:table-cell table:formula="of:=[.B1094]/[.C1094]" office:value-type="float" office:value="0.00240358796296296" calcext:value-type="float">
            <text:p>0,00240358796296296000</text:p>
          </table:table-cell>
          <table:table-cell table:formula="of:=[.D1095]-[.D109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[.B1094]+19" office:value-type="float" office:value="20786" calcext:value-type="float">
            <text:p>20786</text:p>
          </table:table-cell>
          <table:table-cell office:value-type="float" office:value="8640000" calcext:value-type="float">
            <text:p>8640000</text:p>
          </table:table-cell>
          <table:table-cell table:formula="of:=[.B1095]/[.C1095]" office:value-type="float" office:value="0.00240578703703704" calcext:value-type="float">
            <text:p>0,00240578703703704000</text:p>
          </table:table-cell>
          <table:table-cell table:formula="of:=[.D1096]-[.D109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[.B1095]+19" office:value-type="float" office:value="20805" calcext:value-type="float">
            <text:p>20805</text:p>
          </table:table-cell>
          <table:table-cell office:value-type="float" office:value="8640000" calcext:value-type="float">
            <text:p>8640000</text:p>
          </table:table-cell>
          <table:table-cell table:formula="of:=[.B1096]/[.C1096]" office:value-type="float" office:value="0.00240798611111111" calcext:value-type="float">
            <text:p>0,00240798611111111000</text:p>
          </table:table-cell>
          <table:table-cell table:formula="of:=[.D1097]-[.D109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[.B1096]+19" office:value-type="float" office:value="20824" calcext:value-type="float">
            <text:p>20824</text:p>
          </table:table-cell>
          <table:table-cell office:value-type="float" office:value="8640000" calcext:value-type="float">
            <text:p>8640000</text:p>
          </table:table-cell>
          <table:table-cell table:formula="of:=[.B1097]/[.C1097]" office:value-type="float" office:value="0.00241018518518519" calcext:value-type="float">
            <text:p>0,00241018518518519000</text:p>
          </table:table-cell>
          <table:table-cell table:formula="of:=[.D1098]-[.D1097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[.B1097]+19" office:value-type="float" office:value="20843" calcext:value-type="float">
            <text:p>20843</text:p>
          </table:table-cell>
          <table:table-cell office:value-type="float" office:value="8640000" calcext:value-type="float">
            <text:p>8640000</text:p>
          </table:table-cell>
          <table:table-cell table:formula="of:=[.B1098]/[.C1098]" office:value-type="float" office:value="0.00241238425925926" calcext:value-type="float">
            <text:p>0,00241238425925926000</text:p>
          </table:table-cell>
          <table:table-cell table:formula="of:=[.D1099]-[.D109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[.B1098]+19" office:value-type="float" office:value="20862" calcext:value-type="float">
            <text:p>20862</text:p>
          </table:table-cell>
          <table:table-cell office:value-type="float" office:value="8640000" calcext:value-type="float">
            <text:p>8640000</text:p>
          </table:table-cell>
          <table:table-cell table:formula="of:=[.B1099]/[.C1099]" office:value-type="float" office:value="0.00241458333333333" calcext:value-type="float">
            <text:p>0,00241458333333333000</text:p>
          </table:table-cell>
          <table:table-cell table:formula="of:=[.D1100]-[.D109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[.B1099]+19" office:value-type="float" office:value="20881" calcext:value-type="float">
            <text:p>20881</text:p>
          </table:table-cell>
          <table:table-cell office:value-type="float" office:value="8640000" calcext:value-type="float">
            <text:p>8640000</text:p>
          </table:table-cell>
          <table:table-cell table:formula="of:=[.B1100]/[.C1100]" office:value-type="float" office:value="0.00241678240740741" calcext:value-type="float">
            <text:p>0,00241678240740741000</text:p>
          </table:table-cell>
          <table:table-cell table:formula="of:=[.D1101]-[.D110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B1100]+19" office:value-type="float" office:value="20900" calcext:value-type="float">
            <text:p>20900</text:p>
          </table:table-cell>
          <table:table-cell office:value-type="float" office:value="8640000" calcext:value-type="float">
            <text:p>8640000</text:p>
          </table:table-cell>
          <table:table-cell table:formula="of:=[.B1101]/[.C1101]" office:value-type="float" office:value="0.00241898148148148" calcext:value-type="float">
            <text:p>0,00241898148148148000</text:p>
          </table:table-cell>
          <table:table-cell table:formula="of:=[.D1102]-[.D110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[.B1101]+19" office:value-type="float" office:value="20919" calcext:value-type="float">
            <text:p>20919</text:p>
          </table:table-cell>
          <table:table-cell office:value-type="float" office:value="8640000" calcext:value-type="float">
            <text:p>8640000</text:p>
          </table:table-cell>
          <table:table-cell table:formula="of:=[.B1102]/[.C1102]" office:value-type="float" office:value="0.00242118055555556" calcext:value-type="float">
            <text:p>0,00242118055555556000</text:p>
          </table:table-cell>
          <table:table-cell table:formula="of:=[.D1103]-[.D1102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[.B1102]+19" office:value-type="float" office:value="20938" calcext:value-type="float">
            <text:p>20938</text:p>
          </table:table-cell>
          <table:table-cell office:value-type="float" office:value="8640000" calcext:value-type="float">
            <text:p>8640000</text:p>
          </table:table-cell>
          <table:table-cell table:formula="of:=[.B1103]/[.C1103]" office:value-type="float" office:value="0.00242337962962963" calcext:value-type="float">
            <text:p>0,00242337962962963000</text:p>
          </table:table-cell>
          <table:table-cell table:formula="of:=[.D1104]-[.D110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[.B1103]+19" office:value-type="float" office:value="20957" calcext:value-type="float">
            <text:p>20957</text:p>
          </table:table-cell>
          <table:table-cell office:value-type="float" office:value="8640000" calcext:value-type="float">
            <text:p>8640000</text:p>
          </table:table-cell>
          <table:table-cell table:formula="of:=[.B1104]/[.C1104]" office:value-type="float" office:value="0.0024255787037037" calcext:value-type="float">
            <text:p>0,00242557870370370000</text:p>
          </table:table-cell>
          <table:table-cell table:formula="of:=[.D1105]-[.D110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[.B1104]+19" office:value-type="float" office:value="20976" calcext:value-type="float">
            <text:p>20976</text:p>
          </table:table-cell>
          <table:table-cell office:value-type="float" office:value="8640000" calcext:value-type="float">
            <text:p>8640000</text:p>
          </table:table-cell>
          <table:table-cell table:formula="of:=[.B1105]/[.C1105]" office:value-type="float" office:value="0.00242777777777778" calcext:value-type="float">
            <text:p>0,00242777777777778000</text:p>
          </table:table-cell>
          <table:table-cell table:formula="of:=[.D1106]-[.D110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[.B1105]+19" office:value-type="float" office:value="20995" calcext:value-type="float">
            <text:p>20995</text:p>
          </table:table-cell>
          <table:table-cell office:value-type="float" office:value="8640000" calcext:value-type="float">
            <text:p>8640000</text:p>
          </table:table-cell>
          <table:table-cell table:formula="of:=[.B1106]/[.C1106]" office:value-type="float" office:value="0.00242997685185185" calcext:value-type="float">
            <text:p>0,00242997685185185000</text:p>
          </table:table-cell>
          <table:table-cell table:formula="of:=[.D1107]-[.D1106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[.B1106]+19" office:value-type="float" office:value="21014" calcext:value-type="float">
            <text:p>21014</text:p>
          </table:table-cell>
          <table:table-cell office:value-type="float" office:value="8640000" calcext:value-type="float">
            <text:p>8640000</text:p>
          </table:table-cell>
          <table:table-cell table:formula="of:=[.B1107]/[.C1107]" office:value-type="float" office:value="0.00243217592592593" calcext:value-type="float">
            <text:p>0,00243217592592593000</text:p>
          </table:table-cell>
          <table:table-cell table:formula="of:=[.D1108]-[.D110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[.B1107]+19" office:value-type="float" office:value="21033" calcext:value-type="float">
            <text:p>21033</text:p>
          </table:table-cell>
          <table:table-cell office:value-type="float" office:value="8640000" calcext:value-type="float">
            <text:p>8640000</text:p>
          </table:table-cell>
          <table:table-cell table:formula="of:=[.B1108]/[.C1108]" office:value-type="float" office:value="0.002434375" calcext:value-type="float">
            <text:p>0,00243437500000000000</text:p>
          </table:table-cell>
          <table:table-cell table:formula="of:=[.D1109]-[.D110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[.B1108]+19" office:value-type="float" office:value="21052" calcext:value-type="float">
            <text:p>21052</text:p>
          </table:table-cell>
          <table:table-cell office:value-type="float" office:value="8640000" calcext:value-type="float">
            <text:p>8640000</text:p>
          </table:table-cell>
          <table:table-cell table:formula="of:=[.B1109]/[.C1109]" office:value-type="float" office:value="0.00243657407407407" calcext:value-type="float">
            <text:p>0,00243657407407407000</text:p>
          </table:table-cell>
          <table:table-cell table:formula="of:=[.D1110]-[.D110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[.B1109]+19" office:value-type="float" office:value="21071" calcext:value-type="float">
            <text:p>21071</text:p>
          </table:table-cell>
          <table:table-cell office:value-type="float" office:value="8640000" calcext:value-type="float">
            <text:p>8640000</text:p>
          </table:table-cell>
          <table:table-cell table:formula="of:=[.B1110]/[.C1110]" office:value-type="float" office:value="0.00243877314814815" calcext:value-type="float">
            <text:p>0,00243877314814815000</text:p>
          </table:table-cell>
          <table:table-cell table:formula="of:=[.D1111]-[.D111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[.B1110]+19" office:value-type="float" office:value="21090" calcext:value-type="float">
            <text:p>21090</text:p>
          </table:table-cell>
          <table:table-cell office:value-type="float" office:value="8640000" calcext:value-type="float">
            <text:p>8640000</text:p>
          </table:table-cell>
          <table:table-cell table:formula="of:=[.B1111]/[.C1111]" office:value-type="float" office:value="0.00244097222222222" calcext:value-type="float">
            <text:p>0,00244097222222222000</text:p>
          </table:table-cell>
          <table:table-cell table:formula="of:=[.D1112]-[.D1111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[.B1111]+19" office:value-type="float" office:value="21109" calcext:value-type="float">
            <text:p>21109</text:p>
          </table:table-cell>
          <table:table-cell office:value-type="float" office:value="8640000" calcext:value-type="float">
            <text:p>8640000</text:p>
          </table:table-cell>
          <table:table-cell table:formula="of:=[.B1112]/[.C1112]" office:value-type="float" office:value="0.0024431712962963" calcext:value-type="float">
            <text:p>0,00244317129629630000</text:p>
          </table:table-cell>
          <table:table-cell table:formula="of:=[.D1113]-[.D111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[.B1112]+19" office:value-type="float" office:value="21128" calcext:value-type="float">
            <text:p>21128</text:p>
          </table:table-cell>
          <table:table-cell office:value-type="float" office:value="8640000" calcext:value-type="float">
            <text:p>8640000</text:p>
          </table:table-cell>
          <table:table-cell table:formula="of:=[.B1113]/[.C1113]" office:value-type="float" office:value="0.00244537037037037" calcext:value-type="float">
            <text:p>0,00244537037037037000</text:p>
          </table:table-cell>
          <table:table-cell table:formula="of:=[.D1114]-[.D111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[.B1113]+19" office:value-type="float" office:value="21147" calcext:value-type="float">
            <text:p>21147</text:p>
          </table:table-cell>
          <table:table-cell office:value-type="float" office:value="8640000" calcext:value-type="float">
            <text:p>8640000</text:p>
          </table:table-cell>
          <table:table-cell table:formula="of:=[.B1114]/[.C1114]" office:value-type="float" office:value="0.00244756944444444" calcext:value-type="float">
            <text:p>0,00244756944444444000</text:p>
          </table:table-cell>
          <table:table-cell table:formula="of:=[.D1115]-[.D111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[.B1114]+19" office:value-type="float" office:value="21166" calcext:value-type="float">
            <text:p>21166</text:p>
          </table:table-cell>
          <table:table-cell office:value-type="float" office:value="8640000" calcext:value-type="float">
            <text:p>8640000</text:p>
          </table:table-cell>
          <table:table-cell table:formula="of:=[.B1115]/[.C1115]" office:value-type="float" office:value="0.00244976851851852" calcext:value-type="float">
            <text:p>0,00244976851851852000</text:p>
          </table:table-cell>
          <table:table-cell table:formula="of:=[.D1116]-[.D1115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[.B1115]+19" office:value-type="float" office:value="21185" calcext:value-type="float">
            <text:p>21185</text:p>
          </table:table-cell>
          <table:table-cell office:value-type="float" office:value="8640000" calcext:value-type="float">
            <text:p>8640000</text:p>
          </table:table-cell>
          <table:table-cell table:formula="of:=[.B1116]/[.C1116]" office:value-type="float" office:value="0.00245196759259259" calcext:value-type="float">
            <text:p>0,00245196759259259000</text:p>
          </table:table-cell>
          <table:table-cell table:formula="of:=[.D1117]-[.D111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[.B1116]+19" office:value-type="float" office:value="21204" calcext:value-type="float">
            <text:p>21204</text:p>
          </table:table-cell>
          <table:table-cell office:value-type="float" office:value="8640000" calcext:value-type="float">
            <text:p>8640000</text:p>
          </table:table-cell>
          <table:table-cell table:formula="of:=[.B1117]/[.C1117]" office:value-type="float" office:value="0.00245416666666667" calcext:value-type="float">
            <text:p>0,00245416666666667000</text:p>
          </table:table-cell>
          <table:table-cell table:formula="of:=[.D1118]-[.D111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[.B1117]+19" office:value-type="float" office:value="21223" calcext:value-type="float">
            <text:p>21223</text:p>
          </table:table-cell>
          <table:table-cell office:value-type="float" office:value="8640000" calcext:value-type="float">
            <text:p>8640000</text:p>
          </table:table-cell>
          <table:table-cell table:formula="of:=[.B1118]/[.C1118]" office:value-type="float" office:value="0.00245636574074074" calcext:value-type="float">
            <text:p>0,00245636574074074000</text:p>
          </table:table-cell>
          <table:table-cell table:formula="of:=[.D1119]-[.D111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[.B1118]+19" office:value-type="float" office:value="21242" calcext:value-type="float">
            <text:p>21242</text:p>
          </table:table-cell>
          <table:table-cell office:value-type="float" office:value="8640000" calcext:value-type="float">
            <text:p>8640000</text:p>
          </table:table-cell>
          <table:table-cell table:formula="of:=[.B1119]/[.C1119]" office:value-type="float" office:value="0.00245856481481482" calcext:value-type="float">
            <text:p>0,00245856481481482000</text:p>
          </table:table-cell>
          <table:table-cell table:formula="of:=[.D1120]-[.D111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[.B1119]+19" office:value-type="float" office:value="21261" calcext:value-type="float">
            <text:p>21261</text:p>
          </table:table-cell>
          <table:table-cell office:value-type="float" office:value="8640000" calcext:value-type="float">
            <text:p>8640000</text:p>
          </table:table-cell>
          <table:table-cell table:formula="of:=[.B1120]/[.C1120]" office:value-type="float" office:value="0.00246076388888889" calcext:value-type="float">
            <text:p>0,00246076388888889000</text:p>
          </table:table-cell>
          <table:table-cell table:formula="of:=[.D1121]-[.D1120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[.B1120]+19" office:value-type="float" office:value="21280" calcext:value-type="float">
            <text:p>21280</text:p>
          </table:table-cell>
          <table:table-cell office:value-type="float" office:value="8640000" calcext:value-type="float">
            <text:p>8640000</text:p>
          </table:table-cell>
          <table:table-cell table:formula="of:=[.B1121]/[.C1121]" office:value-type="float" office:value="0.00246296296296296" calcext:value-type="float">
            <text:p>0,00246296296296296000</text:p>
          </table:table-cell>
          <table:table-cell table:formula="of:=[.D1122]-[.D112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[.B1121]+19" office:value-type="float" office:value="21299" calcext:value-type="float">
            <text:p>21299</text:p>
          </table:table-cell>
          <table:table-cell office:value-type="float" office:value="8640000" calcext:value-type="float">
            <text:p>8640000</text:p>
          </table:table-cell>
          <table:table-cell table:formula="of:=[.B1122]/[.C1122]" office:value-type="float" office:value="0.00246516203703704" calcext:value-type="float">
            <text:p>0,00246516203703704000</text:p>
          </table:table-cell>
          <table:table-cell table:formula="of:=[.D1123]-[.D112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[.B1122]+19" office:value-type="float" office:value="21318" calcext:value-type="float">
            <text:p>21318</text:p>
          </table:table-cell>
          <table:table-cell office:value-type="float" office:value="8640000" calcext:value-type="float">
            <text:p>8640000</text:p>
          </table:table-cell>
          <table:table-cell table:formula="of:=[.B1123]/[.C1123]" office:value-type="float" office:value="0.00246736111111111" calcext:value-type="float">
            <text:p>0,00246736111111111000</text:p>
          </table:table-cell>
          <table:table-cell table:formula="of:=[.D1124]-[.D112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[.B1123]+19" office:value-type="float" office:value="21337" calcext:value-type="float">
            <text:p>21337</text:p>
          </table:table-cell>
          <table:table-cell office:value-type="float" office:value="8640000" calcext:value-type="float">
            <text:p>8640000</text:p>
          </table:table-cell>
          <table:table-cell table:formula="of:=[.B1124]/[.C1124]" office:value-type="float" office:value="0.00246956018518519" calcext:value-type="float">
            <text:p>0,00246956018518519000</text:p>
          </table:table-cell>
          <table:table-cell table:formula="of:=[.D1125]-[.D1124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[.B1124]+19" office:value-type="float" office:value="21356" calcext:value-type="float">
            <text:p>21356</text:p>
          </table:table-cell>
          <table:table-cell office:value-type="float" office:value="8640000" calcext:value-type="float">
            <text:p>8640000</text:p>
          </table:table-cell>
          <table:table-cell table:formula="of:=[.B1125]/[.C1125]" office:value-type="float" office:value="0.00247175925925926" calcext:value-type="float">
            <text:p>0,00247175925925926000</text:p>
          </table:table-cell>
          <table:table-cell table:formula="of:=[.D1126]-[.D112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[.B1125]+19" office:value-type="float" office:value="21375" calcext:value-type="float">
            <text:p>21375</text:p>
          </table:table-cell>
          <table:table-cell office:value-type="float" office:value="8640000" calcext:value-type="float">
            <text:p>8640000</text:p>
          </table:table-cell>
          <table:table-cell table:formula="of:=[.B1126]/[.C1126]" office:value-type="float" office:value="0.00247395833333333" calcext:value-type="float">
            <text:p>0,00247395833333333000</text:p>
          </table:table-cell>
          <table:table-cell table:formula="of:=[.D1127]-[.D112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[.B1126]+19" office:value-type="float" office:value="21394" calcext:value-type="float">
            <text:p>21394</text:p>
          </table:table-cell>
          <table:table-cell office:value-type="float" office:value="8640000" calcext:value-type="float">
            <text:p>8640000</text:p>
          </table:table-cell>
          <table:table-cell table:formula="of:=[.B1127]/[.C1127]" office:value-type="float" office:value="0.00247615740740741" calcext:value-type="float">
            <text:p>0,00247615740740741000</text:p>
          </table:table-cell>
          <table:table-cell table:formula="of:=[.D1128]-[.D112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[.B1127]+19" office:value-type="float" office:value="21413" calcext:value-type="float">
            <text:p>21413</text:p>
          </table:table-cell>
          <table:table-cell office:value-type="float" office:value="8640000" calcext:value-type="float">
            <text:p>8640000</text:p>
          </table:table-cell>
          <table:table-cell table:formula="of:=[.B1128]/[.C1128]" office:value-type="float" office:value="0.00247835648148148" calcext:value-type="float">
            <text:p>0,00247835648148148000</text:p>
          </table:table-cell>
          <table:table-cell table:formula="of:=[.D1129]-[.D112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[.B1128]+19" office:value-type="float" office:value="21432" calcext:value-type="float">
            <text:p>21432</text:p>
          </table:table-cell>
          <table:table-cell office:value-type="float" office:value="8640000" calcext:value-type="float">
            <text:p>8640000</text:p>
          </table:table-cell>
          <table:table-cell table:formula="of:=[.B1129]/[.C1129]" office:value-type="float" office:value="0.00248055555555556" calcext:value-type="float">
            <text:p>0,00248055555555556000</text:p>
          </table:table-cell>
          <table:table-cell table:formula="of:=[.D1130]-[.D1129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[.B1129]+19" office:value-type="float" office:value="21451" calcext:value-type="float">
            <text:p>21451</text:p>
          </table:table-cell>
          <table:table-cell office:value-type="float" office:value="8640000" calcext:value-type="float">
            <text:p>8640000</text:p>
          </table:table-cell>
          <table:table-cell table:formula="of:=[.B1130]/[.C1130]" office:value-type="float" office:value="0.00248275462962963" calcext:value-type="float">
            <text:p>0,00248275462962963000</text:p>
          </table:table-cell>
          <table:table-cell table:formula="of:=[.D1131]-[.D113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[.B1130]+19" office:value-type="float" office:value="21470" calcext:value-type="float">
            <text:p>21470</text:p>
          </table:table-cell>
          <table:table-cell office:value-type="float" office:value="8640000" calcext:value-type="float">
            <text:p>8640000</text:p>
          </table:table-cell>
          <table:table-cell table:formula="of:=[.B1131]/[.C1131]" office:value-type="float" office:value="0.0024849537037037" calcext:value-type="float">
            <text:p>0,00248495370370370000</text:p>
          </table:table-cell>
          <table:table-cell table:formula="of:=[.D1132]-[.D113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[.B1131]+19" office:value-type="float" office:value="21489" calcext:value-type="float">
            <text:p>21489</text:p>
          </table:table-cell>
          <table:table-cell office:value-type="float" office:value="8640000" calcext:value-type="float">
            <text:p>8640000</text:p>
          </table:table-cell>
          <table:table-cell table:formula="of:=[.B1132]/[.C1132]" office:value-type="float" office:value="0.00248715277777778" calcext:value-type="float">
            <text:p>0,00248715277777778000</text:p>
          </table:table-cell>
          <table:table-cell table:formula="of:=[.D1133]-[.D113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[.B1132]+19" office:value-type="float" office:value="21508" calcext:value-type="float">
            <text:p>21508</text:p>
          </table:table-cell>
          <table:table-cell office:value-type="float" office:value="8640000" calcext:value-type="float">
            <text:p>8640000</text:p>
          </table:table-cell>
          <table:table-cell table:formula="of:=[.B1133]/[.C1133]" office:value-type="float" office:value="0.00248935185185185" calcext:value-type="float">
            <text:p>0,00248935185185185000</text:p>
          </table:table-cell>
          <table:table-cell table:formula="of:=[.D1134]-[.D113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[.B1133]+19" office:value-type="float" office:value="21527" calcext:value-type="float">
            <text:p>21527</text:p>
          </table:table-cell>
          <table:table-cell office:value-type="float" office:value="8640000" calcext:value-type="float">
            <text:p>8640000</text:p>
          </table:table-cell>
          <table:table-cell table:formula="of:=[.B1134]/[.C1134]" office:value-type="float" office:value="0.00249155092592593" calcext:value-type="float">
            <text:p>0,00249155092592593000</text:p>
          </table:table-cell>
          <table:table-cell table:formula="of:=[.D1135]-[.D1134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[.B1134]+19" office:value-type="float" office:value="21546" calcext:value-type="float">
            <text:p>21546</text:p>
          </table:table-cell>
          <table:table-cell office:value-type="float" office:value="8640000" calcext:value-type="float">
            <text:p>8640000</text:p>
          </table:table-cell>
          <table:table-cell table:formula="of:=[.B1135]/[.C1135]" office:value-type="float" office:value="0.00249375" calcext:value-type="float">
            <text:p>0,00249375000000000000</text:p>
          </table:table-cell>
          <table:table-cell table:formula="of:=[.D1136]-[.D113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[.B1135]+19" office:value-type="float" office:value="21565" calcext:value-type="float">
            <text:p>21565</text:p>
          </table:table-cell>
          <table:table-cell office:value-type="float" office:value="8640000" calcext:value-type="float">
            <text:p>8640000</text:p>
          </table:table-cell>
          <table:table-cell table:formula="of:=[.B1136]/[.C1136]" office:value-type="float" office:value="0.00249594907407407" calcext:value-type="float">
            <text:p>0,00249594907407407000</text:p>
          </table:table-cell>
          <table:table-cell table:formula="of:=[.D1137]-[.D113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table:formula="of:=[.B1136]+19" office:value-type="float" office:value="21584" calcext:value-type="float">
            <text:p>21584</text:p>
          </table:table-cell>
          <table:table-cell office:value-type="float" office:value="8640000" calcext:value-type="float">
            <text:p>8640000</text:p>
          </table:table-cell>
          <table:table-cell table:formula="of:=[.B1137]/[.C1137]" office:value-type="float" office:value="0.00249814814814815" calcext:value-type="float">
            <text:p>0,00249814814814815000</text:p>
          </table:table-cell>
          <table:table-cell table:formula="of:=[.D1138]-[.D113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[.B1137]+19" office:value-type="float" office:value="21603" calcext:value-type="float">
            <text:p>21603</text:p>
          </table:table-cell>
          <table:table-cell office:value-type="float" office:value="8640000" calcext:value-type="float">
            <text:p>8640000</text:p>
          </table:table-cell>
          <table:table-cell table:formula="of:=[.B1138]/[.C1138]" office:value-type="float" office:value="0.00250034722222222" calcext:value-type="float">
            <text:p>0,00250034722222222000</text:p>
          </table:table-cell>
          <table:table-cell table:formula="of:=[.D1139]-[.D1138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table:formula="of:=[.B1138]+19" office:value-type="float" office:value="21622" calcext:value-type="float">
            <text:p>21622</text:p>
          </table:table-cell>
          <table:table-cell office:value-type="float" office:value="8640000" calcext:value-type="float">
            <text:p>8640000</text:p>
          </table:table-cell>
          <table:table-cell table:formula="of:=[.B1139]/[.C1139]" office:value-type="float" office:value="0.0025025462962963" calcext:value-type="float">
            <text:p>0,00250254629629630000</text:p>
          </table:table-cell>
          <table:table-cell table:formula="of:=[.D1140]-[.D113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[.B1139]+19" office:value-type="float" office:value="21641" calcext:value-type="float">
            <text:p>21641</text:p>
          </table:table-cell>
          <table:table-cell office:value-type="float" office:value="8640000" calcext:value-type="float">
            <text:p>8640000</text:p>
          </table:table-cell>
          <table:table-cell table:formula="of:=[.B1140]/[.C1140]" office:value-type="float" office:value="0.00250474537037037" calcext:value-type="float">
            <text:p>0,00250474537037037000</text:p>
          </table:table-cell>
          <table:table-cell table:formula="of:=[.D1141]-[.D114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[.B1140]+19" office:value-type="float" office:value="21660" calcext:value-type="float">
            <text:p>21660</text:p>
          </table:table-cell>
          <table:table-cell office:value-type="float" office:value="8640000" calcext:value-type="float">
            <text:p>8640000</text:p>
          </table:table-cell>
          <table:table-cell table:formula="of:=[.B1141]/[.C1141]" office:value-type="float" office:value="0.00250694444444444" calcext:value-type="float">
            <text:p>0,00250694444444444000</text:p>
          </table:table-cell>
          <table:table-cell table:formula="of:=[.D1142]-[.D114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[.B1141]+19" office:value-type="float" office:value="21679" calcext:value-type="float">
            <text:p>21679</text:p>
          </table:table-cell>
          <table:table-cell office:value-type="float" office:value="8640000" calcext:value-type="float">
            <text:p>8640000</text:p>
          </table:table-cell>
          <table:table-cell table:formula="of:=[.B1142]/[.C1142]" office:value-type="float" office:value="0.00250914351851852" calcext:value-type="float">
            <text:p>0,00250914351851852000</text:p>
          </table:table-cell>
          <table:table-cell table:formula="of:=[.D1143]-[.D114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[.B1142]+19" office:value-type="float" office:value="21698" calcext:value-type="float">
            <text:p>21698</text:p>
          </table:table-cell>
          <table:table-cell office:value-type="float" office:value="8640000" calcext:value-type="float">
            <text:p>8640000</text:p>
          </table:table-cell>
          <table:table-cell table:formula="of:=[.B1143]/[.C1143]" office:value-type="float" office:value="0.00251134259259259" calcext:value-type="float">
            <text:p>0,00251134259259259000</text:p>
          </table:table-cell>
          <table:table-cell table:formula="of:=[.D1144]-[.D1143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[.B1143]+19" office:value-type="float" office:value="21717" calcext:value-type="float">
            <text:p>21717</text:p>
          </table:table-cell>
          <table:table-cell office:value-type="float" office:value="8640000" calcext:value-type="float">
            <text:p>8640000</text:p>
          </table:table-cell>
          <table:table-cell table:formula="of:=[.B1144]/[.C1144]" office:value-type="float" office:value="0.00251354166666667" calcext:value-type="float">
            <text:p>0,00251354166666667000</text:p>
          </table:table-cell>
          <table:table-cell table:formula="of:=[.D1145]-[.D114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[.B1144]+19" office:value-type="float" office:value="21736" calcext:value-type="float">
            <text:p>21736</text:p>
          </table:table-cell>
          <table:table-cell office:value-type="float" office:value="8640000" calcext:value-type="float">
            <text:p>8640000</text:p>
          </table:table-cell>
          <table:table-cell table:formula="of:=[.B1145]/[.C1145]" office:value-type="float" office:value="0.00251574074074074" calcext:value-type="float">
            <text:p>0,00251574074074074000</text:p>
          </table:table-cell>
          <table:table-cell table:formula="of:=[.D1146]-[.D114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[.B1145]+19" office:value-type="float" office:value="21755" calcext:value-type="float">
            <text:p>21755</text:p>
          </table:table-cell>
          <table:table-cell office:value-type="float" office:value="8640000" calcext:value-type="float">
            <text:p>8640000</text:p>
          </table:table-cell>
          <table:table-cell table:formula="of:=[.B1146]/[.C1146]" office:value-type="float" office:value="0.00251793981481482" calcext:value-type="float">
            <text:p>0,00251793981481482000</text:p>
          </table:table-cell>
          <table:table-cell table:formula="of:=[.D1147]-[.D114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[.B1146]+19" office:value-type="float" office:value="21774" calcext:value-type="float">
            <text:p>21774</text:p>
          </table:table-cell>
          <table:table-cell office:value-type="float" office:value="8640000" calcext:value-type="float">
            <text:p>8640000</text:p>
          </table:table-cell>
          <table:table-cell table:formula="of:=[.B1147]/[.C1147]" office:value-type="float" office:value="0.00252013888888889" calcext:value-type="float">
            <text:p>0,00252013888888889000</text:p>
          </table:table-cell>
          <table:table-cell table:formula="of:=[.D1148]-[.D1147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table:formula="of:=[.B1147]+19" office:value-type="float" office:value="21793" calcext:value-type="float">
            <text:p>21793</text:p>
          </table:table-cell>
          <table:table-cell office:value-type="float" office:value="8640000" calcext:value-type="float">
            <text:p>8640000</text:p>
          </table:table-cell>
          <table:table-cell table:formula="of:=[.B1148]/[.C1148]" office:value-type="float" office:value="0.00252233796296296" calcext:value-type="float">
            <text:p>0,00252233796296296000</text:p>
          </table:table-cell>
          <table:table-cell table:formula="of:=[.D1149]-[.D114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[.B1148]+19" office:value-type="float" office:value="21812" calcext:value-type="float">
            <text:p>21812</text:p>
          </table:table-cell>
          <table:table-cell office:value-type="float" office:value="8640000" calcext:value-type="float">
            <text:p>8640000</text:p>
          </table:table-cell>
          <table:table-cell table:formula="of:=[.B1149]/[.C1149]" office:value-type="float" office:value="0.00252453703703704" calcext:value-type="float">
            <text:p>0,00252453703703704000</text:p>
          </table:table-cell>
          <table:table-cell table:formula="of:=[.D1150]-[.D114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table:formula="of:=[.B1149]+19" office:value-type="float" office:value="21831" calcext:value-type="float">
            <text:p>21831</text:p>
          </table:table-cell>
          <table:table-cell office:value-type="float" office:value="8640000" calcext:value-type="float">
            <text:p>8640000</text:p>
          </table:table-cell>
          <table:table-cell table:formula="of:=[.B1150]/[.C1150]" office:value-type="float" office:value="0.00252673611111111" calcext:value-type="float">
            <text:p>0,00252673611111111000</text:p>
          </table:table-cell>
          <table:table-cell table:formula="of:=[.D1151]-[.D115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[.B1150]+19" office:value-type="float" office:value="21850" calcext:value-type="float">
            <text:p>21850</text:p>
          </table:table-cell>
          <table:table-cell office:value-type="float" office:value="8640000" calcext:value-type="float">
            <text:p>8640000</text:p>
          </table:table-cell>
          <table:table-cell table:formula="of:=[.B1151]/[.C1151]" office:value-type="float" office:value="0.00252893518518519" calcext:value-type="float">
            <text:p>0,00252893518518519000</text:p>
          </table:table-cell>
          <table:table-cell table:formula="of:=[.D1152]-[.D115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[.B1151]+19" office:value-type="float" office:value="21869" calcext:value-type="float">
            <text:p>21869</text:p>
          </table:table-cell>
          <table:table-cell office:value-type="float" office:value="8640000" calcext:value-type="float">
            <text:p>8640000</text:p>
          </table:table-cell>
          <table:table-cell table:formula="of:=[.B1152]/[.C1152]" office:value-type="float" office:value="0.00253113425925926" calcext:value-type="float">
            <text:p>0,00253113425925926000</text:p>
          </table:table-cell>
          <table:table-cell table:formula="of:=[.D1153]-[.D1152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table:formula="of:=[.B1152]+19" office:value-type="float" office:value="21888" calcext:value-type="float">
            <text:p>21888</text:p>
          </table:table-cell>
          <table:table-cell office:value-type="float" office:value="8640000" calcext:value-type="float">
            <text:p>8640000</text:p>
          </table:table-cell>
          <table:table-cell table:formula="of:=[.B1153]/[.C1153]" office:value-type="float" office:value="0.00253333333333333" calcext:value-type="float">
            <text:p>0,00253333333333333000</text:p>
          </table:table-cell>
          <table:table-cell table:formula="of:=[.D1154]-[.D115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[.B1153]+19" office:value-type="float" office:value="21907" calcext:value-type="float">
            <text:p>21907</text:p>
          </table:table-cell>
          <table:table-cell office:value-type="float" office:value="8640000" calcext:value-type="float">
            <text:p>8640000</text:p>
          </table:table-cell>
          <table:table-cell table:formula="of:=[.B1154]/[.C1154]" office:value-type="float" office:value="0.00253553240740741" calcext:value-type="float">
            <text:p>0,00253553240740741000</text:p>
          </table:table-cell>
          <table:table-cell table:formula="of:=[.D1155]-[.D115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table:formula="of:=[.B1154]+19" office:value-type="float" office:value="21926" calcext:value-type="float">
            <text:p>21926</text:p>
          </table:table-cell>
          <table:table-cell office:value-type="float" office:value="8640000" calcext:value-type="float">
            <text:p>8640000</text:p>
          </table:table-cell>
          <table:table-cell table:formula="of:=[.B1155]/[.C1155]" office:value-type="float" office:value="0.00253773148148148" calcext:value-type="float">
            <text:p>0,00253773148148148000</text:p>
          </table:table-cell>
          <table:table-cell table:formula="of:=[.D1156]-[.D115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[.B1155]+19" office:value-type="float" office:value="21945" calcext:value-type="float">
            <text:p>21945</text:p>
          </table:table-cell>
          <table:table-cell office:value-type="float" office:value="8640000" calcext:value-type="float">
            <text:p>8640000</text:p>
          </table:table-cell>
          <table:table-cell table:formula="of:=[.B1156]/[.C1156]" office:value-type="float" office:value="0.00253993055555556" calcext:value-type="float">
            <text:p>0,00253993055555556000</text:p>
          </table:table-cell>
          <table:table-cell table:formula="of:=[.D1157]-[.D1156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[.B1156]+19" office:value-type="float" office:value="21964" calcext:value-type="float">
            <text:p>21964</text:p>
          </table:table-cell>
          <table:table-cell office:value-type="float" office:value="8640000" calcext:value-type="float">
            <text:p>8640000</text:p>
          </table:table-cell>
          <table:table-cell table:formula="of:=[.B1157]/[.C1157]" office:value-type="float" office:value="0.00254212962962963" calcext:value-type="float">
            <text:p>0,00254212962962963000</text:p>
          </table:table-cell>
          <table:table-cell table:formula="of:=[.D1158]-[.D115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table:formula="of:=[.B1157]+19" office:value-type="float" office:value="21983" calcext:value-type="float">
            <text:p>21983</text:p>
          </table:table-cell>
          <table:table-cell office:value-type="float" office:value="8640000" calcext:value-type="float">
            <text:p>8640000</text:p>
          </table:table-cell>
          <table:table-cell table:formula="of:=[.B1158]/[.C1158]" office:value-type="float" office:value="0.0025443287037037" calcext:value-type="float">
            <text:p>0,00254432870370370000</text:p>
          </table:table-cell>
          <table:table-cell table:formula="of:=[.D1159]-[.D115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table:formula="of:=[.B1158]+19" office:value-type="float" office:value="22002" calcext:value-type="float">
            <text:p>22002</text:p>
          </table:table-cell>
          <table:table-cell office:value-type="float" office:value="8640000" calcext:value-type="float">
            <text:p>8640000</text:p>
          </table:table-cell>
          <table:table-cell table:formula="of:=[.B1159]/[.C1159]" office:value-type="float" office:value="0.00254652777777778" calcext:value-type="float">
            <text:p>0,00254652777777778000</text:p>
          </table:table-cell>
          <table:table-cell table:formula="of:=[.D1160]-[.D115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[.B1159]+19" office:value-type="float" office:value="22021" calcext:value-type="float">
            <text:p>22021</text:p>
          </table:table-cell>
          <table:table-cell office:value-type="float" office:value="8640000" calcext:value-type="float">
            <text:p>8640000</text:p>
          </table:table-cell>
          <table:table-cell table:formula="of:=[.B1160]/[.C1160]" office:value-type="float" office:value="0.00254872685185185" calcext:value-type="float">
            <text:p>0,00254872685185185000</text:p>
          </table:table-cell>
          <table:table-cell table:formula="of:=[.D1161]-[.D116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table:formula="of:=[.B1160]+19" office:value-type="float" office:value="22040" calcext:value-type="float">
            <text:p>22040</text:p>
          </table:table-cell>
          <table:table-cell office:value-type="float" office:value="8640000" calcext:value-type="float">
            <text:p>8640000</text:p>
          </table:table-cell>
          <table:table-cell table:formula="of:=[.B1161]/[.C1161]" office:value-type="float" office:value="0.00255092592592593" calcext:value-type="float">
            <text:p>0,00255092592592593000</text:p>
          </table:table-cell>
          <table:table-cell table:formula="of:=[.D1162]-[.D1161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table:formula="of:=[.B1161]+19" office:value-type="float" office:value="22059" calcext:value-type="float">
            <text:p>22059</text:p>
          </table:table-cell>
          <table:table-cell office:value-type="float" office:value="8640000" calcext:value-type="float">
            <text:p>8640000</text:p>
          </table:table-cell>
          <table:table-cell table:formula="of:=[.B1162]/[.C1162]" office:value-type="float" office:value="0.002553125" calcext:value-type="float">
            <text:p>0,00255312500000000000</text:p>
          </table:table-cell>
          <table:table-cell table:formula="of:=[.D1163]-[.D116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table:formula="of:=[.B1162]+19" office:value-type="float" office:value="22078" calcext:value-type="float">
            <text:p>22078</text:p>
          </table:table-cell>
          <table:table-cell office:value-type="float" office:value="8640000" calcext:value-type="float">
            <text:p>8640000</text:p>
          </table:table-cell>
          <table:table-cell table:formula="of:=[.B1163]/[.C1163]" office:value-type="float" office:value="0.00255532407407407" calcext:value-type="float">
            <text:p>0,00255532407407407000</text:p>
          </table:table-cell>
          <table:table-cell table:formula="of:=[.D1164]-[.D116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table:formula="of:=[.B1163]+19" office:value-type="float" office:value="22097" calcext:value-type="float">
            <text:p>22097</text:p>
          </table:table-cell>
          <table:table-cell office:value-type="float" office:value="8640000" calcext:value-type="float">
            <text:p>8640000</text:p>
          </table:table-cell>
          <table:table-cell table:formula="of:=[.B1164]/[.C1164]" office:value-type="float" office:value="0.00255752314814815" calcext:value-type="float">
            <text:p>0,00255752314814815000</text:p>
          </table:table-cell>
          <table:table-cell table:formula="of:=[.D1165]-[.D116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[.B1164]+19" office:value-type="float" office:value="22116" calcext:value-type="float">
            <text:p>22116</text:p>
          </table:table-cell>
          <table:table-cell office:value-type="float" office:value="8640000" calcext:value-type="float">
            <text:p>8640000</text:p>
          </table:table-cell>
          <table:table-cell table:formula="of:=[.B1165]/[.C1165]" office:value-type="float" office:value="0.00255972222222222" calcext:value-type="float">
            <text:p>0,00255972222222222000</text:p>
          </table:table-cell>
          <table:table-cell table:formula="of:=[.D1166]-[.D1165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[.B1165]+19" office:value-type="float" office:value="22135" calcext:value-type="float">
            <text:p>22135</text:p>
          </table:table-cell>
          <table:table-cell office:value-type="float" office:value="8640000" calcext:value-type="float">
            <text:p>8640000</text:p>
          </table:table-cell>
          <table:table-cell table:formula="of:=[.B1166]/[.C1166]" office:value-type="float" office:value="0.0025619212962963" calcext:value-type="float">
            <text:p>0,00256192129629630000</text:p>
          </table:table-cell>
          <table:table-cell table:formula="of:=[.D1167]-[.D116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table:formula="of:=[.B1166]+19" office:value-type="float" office:value="22154" calcext:value-type="float">
            <text:p>22154</text:p>
          </table:table-cell>
          <table:table-cell office:value-type="float" office:value="8640000" calcext:value-type="float">
            <text:p>8640000</text:p>
          </table:table-cell>
          <table:table-cell table:formula="of:=[.B1167]/[.C1167]" office:value-type="float" office:value="0.00256412037037037" calcext:value-type="float">
            <text:p>0,00256412037037037000</text:p>
          </table:table-cell>
          <table:table-cell table:formula="of:=[.D1168]-[.D116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table:formula="of:=[.B1167]+19" office:value-type="float" office:value="22173" calcext:value-type="float">
            <text:p>22173</text:p>
          </table:table-cell>
          <table:table-cell office:value-type="float" office:value="8640000" calcext:value-type="float">
            <text:p>8640000</text:p>
          </table:table-cell>
          <table:table-cell table:formula="of:=[.B1168]/[.C1168]" office:value-type="float" office:value="0.00256631944444444" calcext:value-type="float">
            <text:p>0,00256631944444444000</text:p>
          </table:table-cell>
          <table:table-cell table:formula="of:=[.D1169]-[.D116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[.B1168]+19" office:value-type="float" office:value="22192" calcext:value-type="float">
            <text:p>22192</text:p>
          </table:table-cell>
          <table:table-cell office:value-type="float" office:value="8640000" calcext:value-type="float">
            <text:p>8640000</text:p>
          </table:table-cell>
          <table:table-cell table:formula="of:=[.B1169]/[.C1169]" office:value-type="float" office:value="0.00256851851851852" calcext:value-type="float">
            <text:p>0,00256851851851852000</text:p>
          </table:table-cell>
          <table:table-cell table:formula="of:=[.D1170]-[.D116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[.B1169]+19" office:value-type="float" office:value="22211" calcext:value-type="float">
            <text:p>22211</text:p>
          </table:table-cell>
          <table:table-cell office:value-type="float" office:value="8640000" calcext:value-type="float">
            <text:p>8640000</text:p>
          </table:table-cell>
          <table:table-cell table:formula="of:=[.B1170]/[.C1170]" office:value-type="float" office:value="0.00257071759259259" calcext:value-type="float">
            <text:p>0,00257071759259259000</text:p>
          </table:table-cell>
          <table:table-cell table:formula="of:=[.D1171]-[.D1170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table:formula="of:=[.B1170]+19" office:value-type="float" office:value="22230" calcext:value-type="float">
            <text:p>22230</text:p>
          </table:table-cell>
          <table:table-cell office:value-type="float" office:value="8640000" calcext:value-type="float">
            <text:p>8640000</text:p>
          </table:table-cell>
          <table:table-cell table:formula="of:=[.B1171]/[.C1171]" office:value-type="float" office:value="0.00257291666666667" calcext:value-type="float">
            <text:p>0,00257291666666667000</text:p>
          </table:table-cell>
          <table:table-cell table:formula="of:=[.D1172]-[.D117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[.B1171]+19" office:value-type="float" office:value="22249" calcext:value-type="float">
            <text:p>22249</text:p>
          </table:table-cell>
          <table:table-cell office:value-type="float" office:value="8640000" calcext:value-type="float">
            <text:p>8640000</text:p>
          </table:table-cell>
          <table:table-cell table:formula="of:=[.B1172]/[.C1172]" office:value-type="float" office:value="0.00257511574074074" calcext:value-type="float">
            <text:p>0,00257511574074074000</text:p>
          </table:table-cell>
          <table:table-cell table:formula="of:=[.D1173]-[.D117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[.B1172]+19" office:value-type="float" office:value="22268" calcext:value-type="float">
            <text:p>22268</text:p>
          </table:table-cell>
          <table:table-cell office:value-type="float" office:value="8640000" calcext:value-type="float">
            <text:p>8640000</text:p>
          </table:table-cell>
          <table:table-cell table:formula="of:=[.B1173]/[.C1173]" office:value-type="float" office:value="0.00257731481481482" calcext:value-type="float">
            <text:p>0,00257731481481482000</text:p>
          </table:table-cell>
          <table:table-cell table:formula="of:=[.D1174]-[.D117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table:formula="of:=[.B1173]+19" office:value-type="float" office:value="22287" calcext:value-type="float">
            <text:p>22287</text:p>
          </table:table-cell>
          <table:table-cell office:value-type="float" office:value="8640000" calcext:value-type="float">
            <text:p>8640000</text:p>
          </table:table-cell>
          <table:table-cell table:formula="of:=[.B1174]/[.C1174]" office:value-type="float" office:value="0.00257951388888889" calcext:value-type="float">
            <text:p>0,00257951388888889000</text:p>
          </table:table-cell>
          <table:table-cell table:formula="of:=[.D1175]-[.D117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table:formula="of:=[.B1174]+19" office:value-type="float" office:value="22306" calcext:value-type="float">
            <text:p>22306</text:p>
          </table:table-cell>
          <table:table-cell office:value-type="float" office:value="8640000" calcext:value-type="float">
            <text:p>8640000</text:p>
          </table:table-cell>
          <table:table-cell table:formula="of:=[.B1175]/[.C1175]" office:value-type="float" office:value="0.00258171296296296" calcext:value-type="float">
            <text:p>0,00258171296296296000</text:p>
          </table:table-cell>
          <table:table-cell table:formula="of:=[.D1176]-[.D1175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table:formula="of:=[.B1175]+19" office:value-type="float" office:value="22325" calcext:value-type="float">
            <text:p>22325</text:p>
          </table:table-cell>
          <table:table-cell office:value-type="float" office:value="8640000" calcext:value-type="float">
            <text:p>8640000</text:p>
          </table:table-cell>
          <table:table-cell table:formula="of:=[.B1176]/[.C1176]" office:value-type="float" office:value="0.00258391203703704" calcext:value-type="float">
            <text:p>0,00258391203703704000</text:p>
          </table:table-cell>
          <table:table-cell table:formula="of:=[.D1177]-[.D117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[.B1176]+19" office:value-type="float" office:value="22344" calcext:value-type="float">
            <text:p>22344</text:p>
          </table:table-cell>
          <table:table-cell office:value-type="float" office:value="8640000" calcext:value-type="float">
            <text:p>8640000</text:p>
          </table:table-cell>
          <table:table-cell table:formula="of:=[.B1177]/[.C1177]" office:value-type="float" office:value="0.00258611111111111" calcext:value-type="float">
            <text:p>0,00258611111111111000</text:p>
          </table:table-cell>
          <table:table-cell table:formula="of:=[.D1178]-[.D117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table:formula="of:=[.B1177]+19" office:value-type="float" office:value="22363" calcext:value-type="float">
            <text:p>22363</text:p>
          </table:table-cell>
          <table:table-cell office:value-type="float" office:value="8640000" calcext:value-type="float">
            <text:p>8640000</text:p>
          </table:table-cell>
          <table:table-cell table:formula="of:=[.B1178]/[.C1178]" office:value-type="float" office:value="0.00258831018518519" calcext:value-type="float">
            <text:p>0,00258831018518519000</text:p>
          </table:table-cell>
          <table:table-cell table:formula="of:=[.D1179]-[.D117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table:formula="of:=[.B1178]+19" office:value-type="float" office:value="22382" calcext:value-type="float">
            <text:p>22382</text:p>
          </table:table-cell>
          <table:table-cell office:value-type="float" office:value="8640000" calcext:value-type="float">
            <text:p>8640000</text:p>
          </table:table-cell>
          <table:table-cell table:formula="of:=[.B1179]/[.C1179]" office:value-type="float" office:value="0.00259050925925926" calcext:value-type="float">
            <text:p>0,00259050925925926000</text:p>
          </table:table-cell>
          <table:table-cell table:formula="of:=[.D1180]-[.D1179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[.B1179]+19" office:value-type="float" office:value="22401" calcext:value-type="float">
            <text:p>22401</text:p>
          </table:table-cell>
          <table:table-cell office:value-type="float" office:value="8640000" calcext:value-type="float">
            <text:p>8640000</text:p>
          </table:table-cell>
          <table:table-cell table:formula="of:=[.B1180]/[.C1180]" office:value-type="float" office:value="0.00259270833333333" calcext:value-type="float">
            <text:p>0,00259270833333333000</text:p>
          </table:table-cell>
          <table:table-cell table:formula="of:=[.D1181]-[.D118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formula="of:=[.B1180]+19" office:value-type="float" office:value="22420" calcext:value-type="float">
            <text:p>22420</text:p>
          </table:table-cell>
          <table:table-cell office:value-type="float" office:value="8640000" calcext:value-type="float">
            <text:p>8640000</text:p>
          </table:table-cell>
          <table:table-cell table:formula="of:=[.B1181]/[.C1181]" office:value-type="float" office:value="0.00259490740740741" calcext:value-type="float">
            <text:p>0,00259490740740741000</text:p>
          </table:table-cell>
          <table:table-cell table:formula="of:=[.D1182]-[.D118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table:formula="of:=[.B1181]+19" office:value-type="float" office:value="22439" calcext:value-type="float">
            <text:p>22439</text:p>
          </table:table-cell>
          <table:table-cell office:value-type="float" office:value="8640000" calcext:value-type="float">
            <text:p>8640000</text:p>
          </table:table-cell>
          <table:table-cell table:formula="of:=[.B1182]/[.C1182]" office:value-type="float" office:value="0.00259710648148148" calcext:value-type="float">
            <text:p>0,00259710648148148000</text:p>
          </table:table-cell>
          <table:table-cell table:formula="of:=[.D1183]-[.D118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table:formula="of:=[.B1182]+19" office:value-type="float" office:value="22458" calcext:value-type="float">
            <text:p>22458</text:p>
          </table:table-cell>
          <table:table-cell office:value-type="float" office:value="8640000" calcext:value-type="float">
            <text:p>8640000</text:p>
          </table:table-cell>
          <table:table-cell table:formula="of:=[.B1183]/[.C1183]" office:value-type="float" office:value="0.00259930555555556" calcext:value-type="float">
            <text:p>0,00259930555555556000</text:p>
          </table:table-cell>
          <table:table-cell table:formula="of:=[.D1184]-[.D118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[.B1183]+19" office:value-type="float" office:value="22477" calcext:value-type="float">
            <text:p>22477</text:p>
          </table:table-cell>
          <table:table-cell office:value-type="float" office:value="8640000" calcext:value-type="float">
            <text:p>8640000</text:p>
          </table:table-cell>
          <table:table-cell table:formula="of:=[.B1184]/[.C1184]" office:value-type="float" office:value="0.00260150462962963" calcext:value-type="float">
            <text:p>0,00260150462962963000</text:p>
          </table:table-cell>
          <table:table-cell table:formula="of:=[.D1185]-[.D1184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table:formula="of:=[.B1184]+19" office:value-type="float" office:value="22496" calcext:value-type="float">
            <text:p>22496</text:p>
          </table:table-cell>
          <table:table-cell office:value-type="float" office:value="8640000" calcext:value-type="float">
            <text:p>8640000</text:p>
          </table:table-cell>
          <table:table-cell table:formula="of:=[.B1185]/[.C1185]" office:value-type="float" office:value="0.0026037037037037" calcext:value-type="float">
            <text:p>0,00260370370370370000</text:p>
          </table:table-cell>
          <table:table-cell table:formula="of:=[.D1186]-[.D118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[.B1185]+19" office:value-type="float" office:value="22515" calcext:value-type="float">
            <text:p>22515</text:p>
          </table:table-cell>
          <table:table-cell office:value-type="float" office:value="8640000" calcext:value-type="float">
            <text:p>8640000</text:p>
          </table:table-cell>
          <table:table-cell table:formula="of:=[.B1186]/[.C1186]" office:value-type="float" office:value="0.00260590277777778" calcext:value-type="float">
            <text:p>0,00260590277777778000</text:p>
          </table:table-cell>
          <table:table-cell table:formula="of:=[.D1187]-[.D118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table:formula="of:=[.B1186]+19" office:value-type="float" office:value="22534" calcext:value-type="float">
            <text:p>22534</text:p>
          </table:table-cell>
          <table:table-cell office:value-type="float" office:value="8640000" calcext:value-type="float">
            <text:p>8640000</text:p>
          </table:table-cell>
          <table:table-cell table:formula="of:=[.B1187]/[.C1187]" office:value-type="float" office:value="0.00260810185185185" calcext:value-type="float">
            <text:p>0,00260810185185185000</text:p>
          </table:table-cell>
          <table:table-cell table:formula="of:=[.D1188]-[.D118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table:formula="of:=[.B1187]+19" office:value-type="float" office:value="22553" calcext:value-type="float">
            <text:p>22553</text:p>
          </table:table-cell>
          <table:table-cell office:value-type="float" office:value="8640000" calcext:value-type="float">
            <text:p>8640000</text:p>
          </table:table-cell>
          <table:table-cell table:formula="of:=[.B1188]/[.C1188]" office:value-type="float" office:value="0.00261030092592593" calcext:value-type="float">
            <text:p>0,00261030092592593000</text:p>
          </table:table-cell>
          <table:table-cell table:formula="of:=[.D1189]-[.D1188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[.B1188]+19" office:value-type="float" office:value="22572" calcext:value-type="float">
            <text:p>22572</text:p>
          </table:table-cell>
          <table:table-cell office:value-type="float" office:value="8640000" calcext:value-type="float">
            <text:p>8640000</text:p>
          </table:table-cell>
          <table:table-cell table:formula="of:=[.B1189]/[.C1189]" office:value-type="float" office:value="0.0026125" calcext:value-type="float">
            <text:p>0,00261250000000000000</text:p>
          </table:table-cell>
          <table:table-cell table:formula="of:=[.D1190]-[.D118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table:formula="of:=[.B1189]+19" office:value-type="float" office:value="22591" calcext:value-type="float">
            <text:p>22591</text:p>
          </table:table-cell>
          <table:table-cell office:value-type="float" office:value="8640000" calcext:value-type="float">
            <text:p>8640000</text:p>
          </table:table-cell>
          <table:table-cell table:formula="of:=[.B1190]/[.C1190]" office:value-type="float" office:value="0.00261469907407407" calcext:value-type="float">
            <text:p>0,00261469907407407000</text:p>
          </table:table-cell>
          <table:table-cell table:formula="of:=[.D1191]-[.D119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[.B1190]+19" office:value-type="float" office:value="22610" calcext:value-type="float">
            <text:p>22610</text:p>
          </table:table-cell>
          <table:table-cell office:value-type="float" office:value="8640000" calcext:value-type="float">
            <text:p>8640000</text:p>
          </table:table-cell>
          <table:table-cell table:formula="of:=[.B1191]/[.C1191]" office:value-type="float" office:value="0.00261689814814815" calcext:value-type="float">
            <text:p>0,00261689814814815000</text:p>
          </table:table-cell>
          <table:table-cell table:formula="of:=[.D1192]-[.D119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[.B1191]+19" office:value-type="float" office:value="22629" calcext:value-type="float">
            <text:p>22629</text:p>
          </table:table-cell>
          <table:table-cell office:value-type="float" office:value="8640000" calcext:value-type="float">
            <text:p>8640000</text:p>
          </table:table-cell>
          <table:table-cell table:formula="of:=[.B1192]/[.C1192]" office:value-type="float" office:value="0.00261909722222222" calcext:value-type="float">
            <text:p>0,00261909722222222000</text:p>
          </table:table-cell>
          <table:table-cell table:formula="of:=[.D1193]-[.D119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[.B1192]+19" office:value-type="float" office:value="22648" calcext:value-type="float">
            <text:p>22648</text:p>
          </table:table-cell>
          <table:table-cell office:value-type="float" office:value="8640000" calcext:value-type="float">
            <text:p>8640000</text:p>
          </table:table-cell>
          <table:table-cell table:formula="of:=[.B1193]/[.C1193]" office:value-type="float" office:value="0.0026212962962963" calcext:value-type="float">
            <text:p>0,00262129629629630000</text:p>
          </table:table-cell>
          <table:table-cell table:formula="of:=[.D1194]-[.D1193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[.B1193]+19" office:value-type="float" office:value="22667" calcext:value-type="float">
            <text:p>22667</text:p>
          </table:table-cell>
          <table:table-cell office:value-type="float" office:value="8640000" calcext:value-type="float">
            <text:p>8640000</text:p>
          </table:table-cell>
          <table:table-cell table:formula="of:=[.B1194]/[.C1194]" office:value-type="float" office:value="0.00262349537037037" calcext:value-type="float">
            <text:p>0,00262349537037037000</text:p>
          </table:table-cell>
          <table:table-cell table:formula="of:=[.D1195]-[.D119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table:formula="of:=[.B1194]+19" office:value-type="float" office:value="22686" calcext:value-type="float">
            <text:p>22686</text:p>
          </table:table-cell>
          <table:table-cell office:value-type="float" office:value="8640000" calcext:value-type="float">
            <text:p>8640000</text:p>
          </table:table-cell>
          <table:table-cell table:formula="of:=[.B1195]/[.C1195]" office:value-type="float" office:value="0.00262569444444444" calcext:value-type="float">
            <text:p>0,00262569444444444000</text:p>
          </table:table-cell>
          <table:table-cell table:formula="of:=[.D1196]-[.D119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table:formula="of:=[.B1195]+19" office:value-type="float" office:value="22705" calcext:value-type="float">
            <text:p>22705</text:p>
          </table:table-cell>
          <table:table-cell office:value-type="float" office:value="8640000" calcext:value-type="float">
            <text:p>8640000</text:p>
          </table:table-cell>
          <table:table-cell table:formula="of:=[.B1196]/[.C1196]" office:value-type="float" office:value="0.00262789351851852" calcext:value-type="float">
            <text:p>0,00262789351851852000</text:p>
          </table:table-cell>
          <table:table-cell table:formula="of:=[.D1197]-[.D119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[.B1196]+19" office:value-type="float" office:value="22724" calcext:value-type="float">
            <text:p>22724</text:p>
          </table:table-cell>
          <table:table-cell office:value-type="float" office:value="8640000" calcext:value-type="float">
            <text:p>8640000</text:p>
          </table:table-cell>
          <table:table-cell table:formula="of:=[.B1197]/[.C1197]" office:value-type="float" office:value="0.00263009259259259" calcext:value-type="float">
            <text:p>0,00263009259259259000</text:p>
          </table:table-cell>
          <table:table-cell table:formula="of:=[.D1198]-[.D1197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[.B1197]+19" office:value-type="float" office:value="22743" calcext:value-type="float">
            <text:p>22743</text:p>
          </table:table-cell>
          <table:table-cell office:value-type="float" office:value="8640000" calcext:value-type="float">
            <text:p>8640000</text:p>
          </table:table-cell>
          <table:table-cell table:formula="of:=[.B1198]/[.C1198]" office:value-type="float" office:value="0.00263229166666667" calcext:value-type="float">
            <text:p>0,00263229166666667000</text:p>
          </table:table-cell>
          <table:table-cell table:formula="of:=[.D1199]-[.D119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table:formula="of:=[.B1198]+19" office:value-type="float" office:value="22762" calcext:value-type="float">
            <text:p>22762</text:p>
          </table:table-cell>
          <table:table-cell office:value-type="float" office:value="8640000" calcext:value-type="float">
            <text:p>8640000</text:p>
          </table:table-cell>
          <table:table-cell table:formula="of:=[.B1199]/[.C1199]" office:value-type="float" office:value="0.00263449074074074" calcext:value-type="float">
            <text:p>0,00263449074074074000</text:p>
          </table:table-cell>
          <table:table-cell table:formula="of:=[.D1200]-[.D119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table:formula="of:=[.B1199]+19" office:value-type="float" office:value="22781" calcext:value-type="float">
            <text:p>22781</text:p>
          </table:table-cell>
          <table:table-cell office:value-type="float" office:value="8640000" calcext:value-type="float">
            <text:p>8640000</text:p>
          </table:table-cell>
          <table:table-cell table:formula="of:=[.B1200]/[.C1200]" office:value-type="float" office:value="0.00263668981481482" calcext:value-type="float">
            <text:p>0,00263668981481482000</text:p>
          </table:table-cell>
          <table:table-cell table:formula="of:=[.D1201]-[.D120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.B1200]+19" office:value-type="float" office:value="22800" calcext:value-type="float">
            <text:p>22800</text:p>
          </table:table-cell>
          <table:table-cell office:value-type="float" office:value="8640000" calcext:value-type="float">
            <text:p>8640000</text:p>
          </table:table-cell>
          <table:table-cell table:formula="of:=[.B1201]/[.C1201]" office:value-type="float" office:value="0.00263888888888889" calcext:value-type="float">
            <text:p>0,00263888888888889000</text:p>
          </table:table-cell>
          <table:table-cell table:formula="of:=[.D1202]-[.D120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[.B1201]+19" office:value-type="float" office:value="22819" calcext:value-type="float">
            <text:p>22819</text:p>
          </table:table-cell>
          <table:table-cell office:value-type="float" office:value="8640000" calcext:value-type="float">
            <text:p>8640000</text:p>
          </table:table-cell>
          <table:table-cell table:formula="of:=[.B1202]/[.C1202]" office:value-type="float" office:value="0.00264108796296296" calcext:value-type="float">
            <text:p>0,00264108796296296000</text:p>
          </table:table-cell>
          <table:table-cell table:formula="of:=[.D1203]-[.D1202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[.B1202]+19" office:value-type="float" office:value="22838" calcext:value-type="float">
            <text:p>22838</text:p>
          </table:table-cell>
          <table:table-cell office:value-type="float" office:value="8640000" calcext:value-type="float">
            <text:p>8640000</text:p>
          </table:table-cell>
          <table:table-cell table:formula="of:=[.B1203]/[.C1203]" office:value-type="float" office:value="0.00264328703703704" calcext:value-type="float">
            <text:p>0,00264328703703704000</text:p>
          </table:table-cell>
          <table:table-cell table:formula="of:=[.D1204]-[.D120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table:formula="of:=[.B1203]+19" office:value-type="float" office:value="22857" calcext:value-type="float">
            <text:p>22857</text:p>
          </table:table-cell>
          <table:table-cell office:value-type="float" office:value="8640000" calcext:value-type="float">
            <text:p>8640000</text:p>
          </table:table-cell>
          <table:table-cell table:formula="of:=[.B1204]/[.C1204]" office:value-type="float" office:value="0.00264548611111111" calcext:value-type="float">
            <text:p>0,00264548611111111000</text:p>
          </table:table-cell>
          <table:table-cell table:formula="of:=[.D1205]-[.D120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table:formula="of:=[.B1204]+19" office:value-type="float" office:value="22876" calcext:value-type="float">
            <text:p>22876</text:p>
          </table:table-cell>
          <table:table-cell office:value-type="float" office:value="8640000" calcext:value-type="float">
            <text:p>8640000</text:p>
          </table:table-cell>
          <table:table-cell table:formula="of:=[.B1205]/[.C1205]" office:value-type="float" office:value="0.00264768518518519" calcext:value-type="float">
            <text:p>0,00264768518518519000</text:p>
          </table:table-cell>
          <table:table-cell table:formula="of:=[.D1206]-[.D120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table:formula="of:=[.B1205]+19" office:value-type="float" office:value="22895" calcext:value-type="float">
            <text:p>22895</text:p>
          </table:table-cell>
          <table:table-cell office:value-type="float" office:value="8640000" calcext:value-type="float">
            <text:p>8640000</text:p>
          </table:table-cell>
          <table:table-cell table:formula="of:=[.B1206]/[.C1206]" office:value-type="float" office:value="0.00264988425925926" calcext:value-type="float">
            <text:p>0,00264988425925926000</text:p>
          </table:table-cell>
          <table:table-cell table:formula="of:=[.D1207]-[.D120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[.B1206]+19" office:value-type="float" office:value="22914" calcext:value-type="float">
            <text:p>22914</text:p>
          </table:table-cell>
          <table:table-cell office:value-type="float" office:value="8640000" calcext:value-type="float">
            <text:p>8640000</text:p>
          </table:table-cell>
          <table:table-cell table:formula="of:=[.B1207]/[.C1207]" office:value-type="float" office:value="0.00265208333333333" calcext:value-type="float">
            <text:p>0,00265208333333333000</text:p>
          </table:table-cell>
          <table:table-cell table:formula="of:=[.D1208]-[.D1207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table:formula="of:=[.B1207]+19" office:value-type="float" office:value="22933" calcext:value-type="float">
            <text:p>22933</text:p>
          </table:table-cell>
          <table:table-cell office:value-type="float" office:value="8640000" calcext:value-type="float">
            <text:p>8640000</text:p>
          </table:table-cell>
          <table:table-cell table:formula="of:=[.B1208]/[.C1208]" office:value-type="float" office:value="0.00265428240740741" calcext:value-type="float">
            <text:p>0,00265428240740741000</text:p>
          </table:table-cell>
          <table:table-cell table:formula="of:=[.D1209]-[.D120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[.B1208]+19" office:value-type="float" office:value="22952" calcext:value-type="float">
            <text:p>22952</text:p>
          </table:table-cell>
          <table:table-cell office:value-type="float" office:value="8640000" calcext:value-type="float">
            <text:p>8640000</text:p>
          </table:table-cell>
          <table:table-cell table:formula="of:=[.B1209]/[.C1209]" office:value-type="float" office:value="0.00265648148148148" calcext:value-type="float">
            <text:p>0,00265648148148148000</text:p>
          </table:table-cell>
          <table:table-cell table:formula="of:=[.D1210]-[.D120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table:formula="of:=[.B1209]+19" office:value-type="float" office:value="22971" calcext:value-type="float">
            <text:p>22971</text:p>
          </table:table-cell>
          <table:table-cell office:value-type="float" office:value="8640000" calcext:value-type="float">
            <text:p>8640000</text:p>
          </table:table-cell>
          <table:table-cell table:formula="of:=[.B1210]/[.C1210]" office:value-type="float" office:value="0.00265868055555556" calcext:value-type="float">
            <text:p>0,00265868055555556000</text:p>
          </table:table-cell>
          <table:table-cell table:formula="of:=[.D1211]-[.D121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[.B1210]+19" office:value-type="float" office:value="22990" calcext:value-type="float">
            <text:p>22990</text:p>
          </table:table-cell>
          <table:table-cell office:value-type="float" office:value="8640000" calcext:value-type="float">
            <text:p>8640000</text:p>
          </table:table-cell>
          <table:table-cell table:formula="of:=[.B1211]/[.C1211]" office:value-type="float" office:value="0.00266087962962963" calcext:value-type="float">
            <text:p>0,00266087962962963000</text:p>
          </table:table-cell>
          <table:table-cell table:formula="of:=[.D1212]-[.D1211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table:formula="of:=[.B1211]+19" office:value-type="float" office:value="23009" calcext:value-type="float">
            <text:p>23009</text:p>
          </table:table-cell>
          <table:table-cell office:value-type="float" office:value="8640000" calcext:value-type="float">
            <text:p>8640000</text:p>
          </table:table-cell>
          <table:table-cell table:formula="of:=[.B1212]/[.C1212]" office:value-type="float" office:value="0.0026630787037037" calcext:value-type="float">
            <text:p>0,00266307870370370000</text:p>
          </table:table-cell>
          <table:table-cell table:formula="of:=[.D1213]-[.D121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[.B1212]+19" office:value-type="float" office:value="23028" calcext:value-type="float">
            <text:p>23028</text:p>
          </table:table-cell>
          <table:table-cell office:value-type="float" office:value="8640000" calcext:value-type="float">
            <text:p>8640000</text:p>
          </table:table-cell>
          <table:table-cell table:formula="of:=[.B1213]/[.C1213]" office:value-type="float" office:value="0.00266527777777778" calcext:value-type="float">
            <text:p>0,00266527777777778000</text:p>
          </table:table-cell>
          <table:table-cell table:formula="of:=[.D1214]-[.D121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table:formula="of:=[.B1213]+19" office:value-type="float" office:value="23047" calcext:value-type="float">
            <text:p>23047</text:p>
          </table:table-cell>
          <table:table-cell office:value-type="float" office:value="8640000" calcext:value-type="float">
            <text:p>8640000</text:p>
          </table:table-cell>
          <table:table-cell table:formula="of:=[.B1214]/[.C1214]" office:value-type="float" office:value="0.00266747685185185" calcext:value-type="float">
            <text:p>0,00266747685185185000</text:p>
          </table:table-cell>
          <table:table-cell table:formula="of:=[.D1215]-[.D121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table:formula="of:=[.B1214]+19" office:value-type="float" office:value="23066" calcext:value-type="float">
            <text:p>23066</text:p>
          </table:table-cell>
          <table:table-cell office:value-type="float" office:value="8640000" calcext:value-type="float">
            <text:p>8640000</text:p>
          </table:table-cell>
          <table:table-cell table:formula="of:=[.B1215]/[.C1215]" office:value-type="float" office:value="0.00266967592592593" calcext:value-type="float">
            <text:p>0,00266967592592593000</text:p>
          </table:table-cell>
          <table:table-cell table:formula="of:=[.D1216]-[.D121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table:formula="of:=[.B1215]+19" office:value-type="float" office:value="23085" calcext:value-type="float">
            <text:p>23085</text:p>
          </table:table-cell>
          <table:table-cell office:value-type="float" office:value="8640000" calcext:value-type="float">
            <text:p>8640000</text:p>
          </table:table-cell>
          <table:table-cell table:formula="of:=[.B1216]/[.C1216]" office:value-type="float" office:value="0.002671875" calcext:value-type="float">
            <text:p>0,00267187500000000000</text:p>
          </table:table-cell>
          <table:table-cell table:formula="of:=[.D1217]-[.D1216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table:formula="of:=[.B1216]+19" office:value-type="float" office:value="23104" calcext:value-type="float">
            <text:p>23104</text:p>
          </table:table-cell>
          <table:table-cell office:value-type="float" office:value="8640000" calcext:value-type="float">
            <text:p>8640000</text:p>
          </table:table-cell>
          <table:table-cell table:formula="of:=[.B1217]/[.C1217]" office:value-type="float" office:value="0.00267407407407407" calcext:value-type="float">
            <text:p>0,00267407407407407000</text:p>
          </table:table-cell>
          <table:table-cell table:formula="of:=[.D1218]-[.D121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table:formula="of:=[.B1217]+19" office:value-type="float" office:value="23123" calcext:value-type="float">
            <text:p>23123</text:p>
          </table:table-cell>
          <table:table-cell office:value-type="float" office:value="8640000" calcext:value-type="float">
            <text:p>8640000</text:p>
          </table:table-cell>
          <table:table-cell table:formula="of:=[.B1218]/[.C1218]" office:value-type="float" office:value="0.00267627314814815" calcext:value-type="float">
            <text:p>0,00267627314814815000</text:p>
          </table:table-cell>
          <table:table-cell table:formula="of:=[.D1219]-[.D121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[.B1218]+19" office:value-type="float" office:value="23142" calcext:value-type="float">
            <text:p>23142</text:p>
          </table:table-cell>
          <table:table-cell office:value-type="float" office:value="8640000" calcext:value-type="float">
            <text:p>8640000</text:p>
          </table:table-cell>
          <table:table-cell table:formula="of:=[.B1219]/[.C1219]" office:value-type="float" office:value="0.00267847222222222" calcext:value-type="float">
            <text:p>0,00267847222222222000</text:p>
          </table:table-cell>
          <table:table-cell table:formula="of:=[.D1220]-[.D121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table:formula="of:=[.B1219]+19" office:value-type="float" office:value="23161" calcext:value-type="float">
            <text:p>23161</text:p>
          </table:table-cell>
          <table:table-cell office:value-type="float" office:value="8640000" calcext:value-type="float">
            <text:p>8640000</text:p>
          </table:table-cell>
          <table:table-cell table:formula="of:=[.B1220]/[.C1220]" office:value-type="float" office:value="0.0026806712962963" calcext:value-type="float">
            <text:p>0,00268067129629630000</text:p>
          </table:table-cell>
          <table:table-cell table:formula="of:=[.D1221]-[.D1220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[.B1220]+19" office:value-type="float" office:value="23180" calcext:value-type="float">
            <text:p>23180</text:p>
          </table:table-cell>
          <table:table-cell office:value-type="float" office:value="8640000" calcext:value-type="float">
            <text:p>8640000</text:p>
          </table:table-cell>
          <table:table-cell table:formula="of:=[.B1221]/[.C1221]" office:value-type="float" office:value="0.00268287037037037" calcext:value-type="float">
            <text:p>0,00268287037037037000</text:p>
          </table:table-cell>
          <table:table-cell table:formula="of:=[.D1222]-[.D122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[.B1221]+19" office:value-type="float" office:value="23199" calcext:value-type="float">
            <text:p>23199</text:p>
          </table:table-cell>
          <table:table-cell office:value-type="float" office:value="8640000" calcext:value-type="float">
            <text:p>8640000</text:p>
          </table:table-cell>
          <table:table-cell table:formula="of:=[.B1222]/[.C1222]" office:value-type="float" office:value="0.00268506944444444" calcext:value-type="float">
            <text:p>0,00268506944444444000</text:p>
          </table:table-cell>
          <table:table-cell table:formula="of:=[.D1223]-[.D122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table:formula="of:=[.B1222]+19" office:value-type="float" office:value="23218" calcext:value-type="float">
            <text:p>23218</text:p>
          </table:table-cell>
          <table:table-cell office:value-type="float" office:value="8640000" calcext:value-type="float">
            <text:p>8640000</text:p>
          </table:table-cell>
          <table:table-cell table:formula="of:=[.B1223]/[.C1223]" office:value-type="float" office:value="0.00268726851851852" calcext:value-type="float">
            <text:p>0,00268726851851852000</text:p>
          </table:table-cell>
          <table:table-cell table:formula="of:=[.D1224]-[.D122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table:formula="of:=[.B1223]+19" office:value-type="float" office:value="23237" calcext:value-type="float">
            <text:p>23237</text:p>
          </table:table-cell>
          <table:table-cell office:value-type="float" office:value="8640000" calcext:value-type="float">
            <text:p>8640000</text:p>
          </table:table-cell>
          <table:table-cell table:formula="of:=[.B1224]/[.C1224]" office:value-type="float" office:value="0.00268946759259259" calcext:value-type="float">
            <text:p>0,00268946759259259000</text:p>
          </table:table-cell>
          <table:table-cell table:formula="of:=[.D1225]-[.D122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[.B1224]+19" office:value-type="float" office:value="23256" calcext:value-type="float">
            <text:p>23256</text:p>
          </table:table-cell>
          <table:table-cell office:value-type="float" office:value="8640000" calcext:value-type="float">
            <text:p>8640000</text:p>
          </table:table-cell>
          <table:table-cell table:formula="of:=[.B1225]/[.C1225]" office:value-type="float" office:value="0.00269166666666667" calcext:value-type="float">
            <text:p>0,00269166666666667000</text:p>
          </table:table-cell>
          <table:table-cell table:formula="of:=[.D1226]-[.D1225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table:formula="of:=[.B1225]+19" office:value-type="float" office:value="23275" calcext:value-type="float">
            <text:p>23275</text:p>
          </table:table-cell>
          <table:table-cell office:value-type="float" office:value="8640000" calcext:value-type="float">
            <text:p>8640000</text:p>
          </table:table-cell>
          <table:table-cell table:formula="of:=[.B1226]/[.C1226]" office:value-type="float" office:value="0.00269386574074074" calcext:value-type="float">
            <text:p>0,00269386574074074000</text:p>
          </table:table-cell>
          <table:table-cell table:formula="of:=[.D1227]-[.D122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table:formula="of:=[.B1226]+19" office:value-type="float" office:value="23294" calcext:value-type="float">
            <text:p>23294</text:p>
          </table:table-cell>
          <table:table-cell office:value-type="float" office:value="8640000" calcext:value-type="float">
            <text:p>8640000</text:p>
          </table:table-cell>
          <table:table-cell table:formula="of:=[.B1227]/[.C1227]" office:value-type="float" office:value="0.00269606481481481" calcext:value-type="float">
            <text:p>0,00269606481481481000</text:p>
          </table:table-cell>
          <table:table-cell table:formula="of:=[.D1228]-[.D122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table:formula="of:=[.B1227]+19" office:value-type="float" office:value="23313" calcext:value-type="float">
            <text:p>23313</text:p>
          </table:table-cell>
          <table:table-cell office:value-type="float" office:value="8640000" calcext:value-type="float">
            <text:p>8640000</text:p>
          </table:table-cell>
          <table:table-cell table:formula="of:=[.B1228]/[.C1228]" office:value-type="float" office:value="0.00269826388888889" calcext:value-type="float">
            <text:p>0,00269826388888889000</text:p>
          </table:table-cell>
          <table:table-cell table:formula="of:=[.D1229]-[.D122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table:formula="of:=[.B1228]+19" office:value-type="float" office:value="23332" calcext:value-type="float">
            <text:p>23332</text:p>
          </table:table-cell>
          <table:table-cell office:value-type="float" office:value="8640000" calcext:value-type="float">
            <text:p>8640000</text:p>
          </table:table-cell>
          <table:table-cell table:formula="of:=[.B1229]/[.C1229]" office:value-type="float" office:value="0.00270046296296296" calcext:value-type="float">
            <text:p>0,00270046296296296000</text:p>
          </table:table-cell>
          <table:table-cell table:formula="of:=[.D1230]-[.D1229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[.B1229]+19" office:value-type="float" office:value="23351" calcext:value-type="float">
            <text:p>23351</text:p>
          </table:table-cell>
          <table:table-cell office:value-type="float" office:value="8640000" calcext:value-type="float">
            <text:p>8640000</text:p>
          </table:table-cell>
          <table:table-cell table:formula="of:=[.B1230]/[.C1230]" office:value-type="float" office:value="0.00270266203703704" calcext:value-type="float">
            <text:p>0,00270266203703704000</text:p>
          </table:table-cell>
          <table:table-cell table:formula="of:=[.D1231]-[.D123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table:formula="of:=[.B1230]+19" office:value-type="float" office:value="23370" calcext:value-type="float">
            <text:p>23370</text:p>
          </table:table-cell>
          <table:table-cell office:value-type="float" office:value="8640000" calcext:value-type="float">
            <text:p>8640000</text:p>
          </table:table-cell>
          <table:table-cell table:formula="of:=[.B1231]/[.C1231]" office:value-type="float" office:value="0.00270486111111111" calcext:value-type="float">
            <text:p>0,00270486111111111000</text:p>
          </table:table-cell>
          <table:table-cell table:formula="of:=[.D1232]-[.D123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table:formula="of:=[.B1231]+19" office:value-type="float" office:value="23389" calcext:value-type="float">
            <text:p>23389</text:p>
          </table:table-cell>
          <table:table-cell office:value-type="float" office:value="8640000" calcext:value-type="float">
            <text:p>8640000</text:p>
          </table:table-cell>
          <table:table-cell table:formula="of:=[.B1232]/[.C1232]" office:value-type="float" office:value="0.00270706018518519" calcext:value-type="float">
            <text:p>0,00270706018518519000</text:p>
          </table:table-cell>
          <table:table-cell table:formula="of:=[.D1233]-[.D123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table:formula="of:=[.B1232]+19" office:value-type="float" office:value="23408" calcext:value-type="float">
            <text:p>23408</text:p>
          </table:table-cell>
          <table:table-cell office:value-type="float" office:value="8640000" calcext:value-type="float">
            <text:p>8640000</text:p>
          </table:table-cell>
          <table:table-cell table:formula="of:=[.B1233]/[.C1233]" office:value-type="float" office:value="0.00270925925925926" calcext:value-type="float">
            <text:p>0,00270925925925926000</text:p>
          </table:table-cell>
          <table:table-cell table:formula="of:=[.D1234]-[.D123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table:formula="of:=[.B1233]+19" office:value-type="float" office:value="23427" calcext:value-type="float">
            <text:p>23427</text:p>
          </table:table-cell>
          <table:table-cell office:value-type="float" office:value="8640000" calcext:value-type="float">
            <text:p>8640000</text:p>
          </table:table-cell>
          <table:table-cell table:formula="of:=[.B1234]/[.C1234]" office:value-type="float" office:value="0.00271145833333333" calcext:value-type="float">
            <text:p>0,00271145833333333000</text:p>
          </table:table-cell>
          <table:table-cell table:formula="of:=[.D1235]-[.D1234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[.B1234]+19" office:value-type="float" office:value="23446" calcext:value-type="float">
            <text:p>23446</text:p>
          </table:table-cell>
          <table:table-cell office:value-type="float" office:value="8640000" calcext:value-type="float">
            <text:p>8640000</text:p>
          </table:table-cell>
          <table:table-cell table:formula="of:=[.B1235]/[.C1235]" office:value-type="float" office:value="0.00271365740740741" calcext:value-type="float">
            <text:p>0,00271365740740741000</text:p>
          </table:table-cell>
          <table:table-cell table:formula="of:=[.D1236]-[.D123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table:formula="of:=[.B1235]+19" office:value-type="float" office:value="23465" calcext:value-type="float">
            <text:p>23465</text:p>
          </table:table-cell>
          <table:table-cell office:value-type="float" office:value="8640000" calcext:value-type="float">
            <text:p>8640000</text:p>
          </table:table-cell>
          <table:table-cell table:formula="of:=[.B1236]/[.C1236]" office:value-type="float" office:value="0.00271585648148148" calcext:value-type="float">
            <text:p>0,00271585648148148000</text:p>
          </table:table-cell>
          <table:table-cell table:formula="of:=[.D1237]-[.D123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[.B1236]+19" office:value-type="float" office:value="23484" calcext:value-type="float">
            <text:p>23484</text:p>
          </table:table-cell>
          <table:table-cell office:value-type="float" office:value="8640000" calcext:value-type="float">
            <text:p>8640000</text:p>
          </table:table-cell>
          <table:table-cell table:formula="of:=[.B1237]/[.C1237]" office:value-type="float" office:value="0.00271805555555556" calcext:value-type="float">
            <text:p>0,00271805555555556000</text:p>
          </table:table-cell>
          <table:table-cell table:formula="of:=[.D1238]-[.D123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table:formula="of:=[.B1237]+19" office:value-type="float" office:value="23503" calcext:value-type="float">
            <text:p>23503</text:p>
          </table:table-cell>
          <table:table-cell office:value-type="float" office:value="8640000" calcext:value-type="float">
            <text:p>8640000</text:p>
          </table:table-cell>
          <table:table-cell table:formula="of:=[.B1238]/[.C1238]" office:value-type="float" office:value="0.00272025462962963" calcext:value-type="float">
            <text:p>0,00272025462962963000</text:p>
          </table:table-cell>
          <table:table-cell table:formula="of:=[.D1239]-[.D1238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table:formula="of:=[.B1238]+19" office:value-type="float" office:value="23522" calcext:value-type="float">
            <text:p>23522</text:p>
          </table:table-cell>
          <table:table-cell office:value-type="float" office:value="8640000" calcext:value-type="float">
            <text:p>8640000</text:p>
          </table:table-cell>
          <table:table-cell table:formula="of:=[.B1239]/[.C1239]" office:value-type="float" office:value="0.0027224537037037" calcext:value-type="float">
            <text:p>0,00272245370370370000</text:p>
          </table:table-cell>
          <table:table-cell table:formula="of:=[.D1240]-[.D123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[.B1239]+19" office:value-type="float" office:value="23541" calcext:value-type="float">
            <text:p>23541</text:p>
          </table:table-cell>
          <table:table-cell office:value-type="float" office:value="8640000" calcext:value-type="float">
            <text:p>8640000</text:p>
          </table:table-cell>
          <table:table-cell table:formula="of:=[.B1240]/[.C1240]" office:value-type="float" office:value="0.00272465277777778" calcext:value-type="float">
            <text:p>0,00272465277777778000</text:p>
          </table:table-cell>
          <table:table-cell table:formula="of:=[.D1241]-[.D124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[.B1240]+19" office:value-type="float" office:value="23560" calcext:value-type="float">
            <text:p>23560</text:p>
          </table:table-cell>
          <table:table-cell office:value-type="float" office:value="8640000" calcext:value-type="float">
            <text:p>8640000</text:p>
          </table:table-cell>
          <table:table-cell table:formula="of:=[.B1241]/[.C1241]" office:value-type="float" office:value="0.00272685185185185" calcext:value-type="float">
            <text:p>0,00272685185185185000</text:p>
          </table:table-cell>
          <table:table-cell table:formula="of:=[.D1242]-[.D124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table:formula="of:=[.B1241]+19" office:value-type="float" office:value="23579" calcext:value-type="float">
            <text:p>23579</text:p>
          </table:table-cell>
          <table:table-cell office:value-type="float" office:value="8640000" calcext:value-type="float">
            <text:p>8640000</text:p>
          </table:table-cell>
          <table:table-cell table:formula="of:=[.B1242]/[.C1242]" office:value-type="float" office:value="0.00272905092592593" calcext:value-type="float">
            <text:p>0,00272905092592593000</text:p>
          </table:table-cell>
          <table:table-cell table:formula="of:=[.D1243]-[.D124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[.B1242]+19" office:value-type="float" office:value="23598" calcext:value-type="float">
            <text:p>23598</text:p>
          </table:table-cell>
          <table:table-cell office:value-type="float" office:value="8640000" calcext:value-type="float">
            <text:p>8640000</text:p>
          </table:table-cell>
          <table:table-cell table:formula="of:=[.B1243]/[.C1243]" office:value-type="float" office:value="0.00273125" calcext:value-type="float">
            <text:p>0,00273125000000000000</text:p>
          </table:table-cell>
          <table:table-cell table:formula="of:=[.D1244]-[.D1243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table:formula="of:=[.B1243]+19" office:value-type="float" office:value="23617" calcext:value-type="float">
            <text:p>23617</text:p>
          </table:table-cell>
          <table:table-cell office:value-type="float" office:value="8640000" calcext:value-type="float">
            <text:p>8640000</text:p>
          </table:table-cell>
          <table:table-cell table:formula="of:=[.B1244]/[.C1244]" office:value-type="float" office:value="0.00273344907407407" calcext:value-type="float">
            <text:p>0,00273344907407407000</text:p>
          </table:table-cell>
          <table:table-cell table:formula="of:=[.D1245]-[.D124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[.B1244]+19" office:value-type="float" office:value="23636" calcext:value-type="float">
            <text:p>23636</text:p>
          </table:table-cell>
          <table:table-cell office:value-type="float" office:value="8640000" calcext:value-type="float">
            <text:p>8640000</text:p>
          </table:table-cell>
          <table:table-cell table:formula="of:=[.B1245]/[.C1245]" office:value-type="float" office:value="0.00273564814814815" calcext:value-type="float">
            <text:p>0,00273564814814815000</text:p>
          </table:table-cell>
          <table:table-cell table:formula="of:=[.D1246]-[.D124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table:formula="of:=[.B1245]+19" office:value-type="float" office:value="23655" calcext:value-type="float">
            <text:p>23655</text:p>
          </table:table-cell>
          <table:table-cell office:value-type="float" office:value="8640000" calcext:value-type="float">
            <text:p>8640000</text:p>
          </table:table-cell>
          <table:table-cell table:formula="of:=[.B1246]/[.C1246]" office:value-type="float" office:value="0.00273784722222222" calcext:value-type="float">
            <text:p>0,00273784722222222000</text:p>
          </table:table-cell>
          <table:table-cell table:formula="of:=[.D1247]-[.D124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[.B1246]+19" office:value-type="float" office:value="23674" calcext:value-type="float">
            <text:p>23674</text:p>
          </table:table-cell>
          <table:table-cell office:value-type="float" office:value="8640000" calcext:value-type="float">
            <text:p>8640000</text:p>
          </table:table-cell>
          <table:table-cell table:formula="of:=[.B1247]/[.C1247]" office:value-type="float" office:value="0.0027400462962963" calcext:value-type="float">
            <text:p>0,00274004629629630000</text:p>
          </table:table-cell>
          <table:table-cell table:formula="of:=[.D1248]-[.D1247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[.B1247]+19" office:value-type="float" office:value="23693" calcext:value-type="float">
            <text:p>23693</text:p>
          </table:table-cell>
          <table:table-cell office:value-type="float" office:value="8640000" calcext:value-type="float">
            <text:p>8640000</text:p>
          </table:table-cell>
          <table:table-cell table:formula="of:=[.B1248]/[.C1248]" office:value-type="float" office:value="0.00274224537037037" calcext:value-type="float">
            <text:p>0,00274224537037037000</text:p>
          </table:table-cell>
          <table:table-cell table:formula="of:=[.D1249]-[.D1248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[.B1248]+19" office:value-type="float" office:value="23712" calcext:value-type="float">
            <text:p>23712</text:p>
          </table:table-cell>
          <table:table-cell office:value-type="float" office:value="8640000" calcext:value-type="float">
            <text:p>8640000</text:p>
          </table:table-cell>
          <table:table-cell table:formula="of:=[.B1249]/[.C1249]" office:value-type="float" office:value="0.00274444444444444" calcext:value-type="float">
            <text:p>0,00274444444444444000</text:p>
          </table:table-cell>
          <table:table-cell table:formula="of:=[.D1250]-[.D124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table:formula="of:=[.B1249]+19" office:value-type="float" office:value="23731" calcext:value-type="float">
            <text:p>23731</text:p>
          </table:table-cell>
          <table:table-cell office:value-type="float" office:value="8640000" calcext:value-type="float">
            <text:p>8640000</text:p>
          </table:table-cell>
          <table:table-cell table:formula="of:=[.B1250]/[.C1250]" office:value-type="float" office:value="0.00274664351851852" calcext:value-type="float">
            <text:p>0,00274664351851852000</text:p>
          </table:table-cell>
          <table:table-cell table:formula="of:=[.D1251]-[.D125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[.B1250]+19" office:value-type="float" office:value="23750" calcext:value-type="float">
            <text:p>23750</text:p>
          </table:table-cell>
          <table:table-cell office:value-type="float" office:value="8640000" calcext:value-type="float">
            <text:p>8640000</text:p>
          </table:table-cell>
          <table:table-cell table:formula="of:=[.B1251]/[.C1251]" office:value-type="float" office:value="0.00274884259259259" calcext:value-type="float">
            <text:p>0,00274884259259259000</text:p>
          </table:table-cell>
          <table:table-cell table:formula="of:=[.D1252]-[.D1251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table:formula="of:=[.B1251]+19" office:value-type="float" office:value="23769" calcext:value-type="float">
            <text:p>23769</text:p>
          </table:table-cell>
          <table:table-cell office:value-type="float" office:value="8640000" calcext:value-type="float">
            <text:p>8640000</text:p>
          </table:table-cell>
          <table:table-cell table:formula="of:=[.B1252]/[.C1252]" office:value-type="float" office:value="0.00275104166666667" calcext:value-type="float">
            <text:p>0,00275104166666667000</text:p>
          </table:table-cell>
          <table:table-cell table:formula="of:=[.D1253]-[.D1252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table:formula="of:=[.B1252]+19" office:value-type="float" office:value="23788" calcext:value-type="float">
            <text:p>23788</text:p>
          </table:table-cell>
          <table:table-cell office:value-type="float" office:value="8640000" calcext:value-type="float">
            <text:p>8640000</text:p>
          </table:table-cell>
          <table:table-cell table:formula="of:=[.B1253]/[.C1253]" office:value-type="float" office:value="0.00275324074074074" calcext:value-type="float">
            <text:p>0,00275324074074074000</text:p>
          </table:table-cell>
          <table:table-cell table:formula="of:=[.D1254]-[.D125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table:formula="of:=[.B1253]+19" office:value-type="float" office:value="23807" calcext:value-type="float">
            <text:p>23807</text:p>
          </table:table-cell>
          <table:table-cell office:value-type="float" office:value="8640000" calcext:value-type="float">
            <text:p>8640000</text:p>
          </table:table-cell>
          <table:table-cell table:formula="of:=[.B1254]/[.C1254]" office:value-type="float" office:value="0.00275543981481481" calcext:value-type="float">
            <text:p>0,00275543981481481000</text:p>
          </table:table-cell>
          <table:table-cell table:formula="of:=[.D1255]-[.D1254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table:formula="of:=[.B1254]+19" office:value-type="float" office:value="23826" calcext:value-type="float">
            <text:p>23826</text:p>
          </table:table-cell>
          <table:table-cell office:value-type="float" office:value="8640000" calcext:value-type="float">
            <text:p>8640000</text:p>
          </table:table-cell>
          <table:table-cell table:formula="of:=[.B1255]/[.C1255]" office:value-type="float" office:value="0.00275763888888889" calcext:value-type="float">
            <text:p>0,00275763888888889000</text:p>
          </table:table-cell>
          <table:table-cell table:formula="of:=[.D1256]-[.D1255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table:formula="of:=[.B1255]+19" office:value-type="float" office:value="23845" calcext:value-type="float">
            <text:p>23845</text:p>
          </table:table-cell>
          <table:table-cell office:value-type="float" office:value="8640000" calcext:value-type="float">
            <text:p>8640000</text:p>
          </table:table-cell>
          <table:table-cell table:formula="of:=[.B1256]/[.C1256]" office:value-type="float" office:value="0.00275983796296296" calcext:value-type="float">
            <text:p>0,00275983796296296000</text:p>
          </table:table-cell>
          <table:table-cell table:formula="of:=[.D1257]-[.D1256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[.B1256]+19" office:value-type="float" office:value="23864" calcext:value-type="float">
            <text:p>23864</text:p>
          </table:table-cell>
          <table:table-cell office:value-type="float" office:value="8640000" calcext:value-type="float">
            <text:p>8640000</text:p>
          </table:table-cell>
          <table:table-cell table:formula="of:=[.B1257]/[.C1257]" office:value-type="float" office:value="0.00276203703703704" calcext:value-type="float">
            <text:p>0,00276203703703704000</text:p>
          </table:table-cell>
          <table:table-cell table:formula="of:=[.D1258]-[.D1257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table:formula="of:=[.B1257]+19" office:value-type="float" office:value="23883" calcext:value-type="float">
            <text:p>23883</text:p>
          </table:table-cell>
          <table:table-cell office:value-type="float" office:value="8640000" calcext:value-type="float">
            <text:p>8640000</text:p>
          </table:table-cell>
          <table:table-cell table:formula="of:=[.B1258]/[.C1258]" office:value-type="float" office:value="0.00276423611111111" calcext:value-type="float">
            <text:p>0,00276423611111111000</text:p>
          </table:table-cell>
          <table:table-cell table:formula="of:=[.D1259]-[.D1258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table:formula="of:=[.B1258]+19" office:value-type="float" office:value="23902" calcext:value-type="float">
            <text:p>23902</text:p>
          </table:table-cell>
          <table:table-cell office:value-type="float" office:value="8640000" calcext:value-type="float">
            <text:p>8640000</text:p>
          </table:table-cell>
          <table:table-cell table:formula="of:=[.B1259]/[.C1259]" office:value-type="float" office:value="0.00276643518518519" calcext:value-type="float">
            <text:p>0,00276643518518519000</text:p>
          </table:table-cell>
          <table:table-cell table:formula="of:=[.D1260]-[.D1259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table:formula="of:=[.B1259]+19" office:value-type="float" office:value="23921" calcext:value-type="float">
            <text:p>23921</text:p>
          </table:table-cell>
          <table:table-cell office:value-type="float" office:value="8640000" calcext:value-type="float">
            <text:p>8640000</text:p>
          </table:table-cell>
          <table:table-cell table:formula="of:=[.B1260]/[.C1260]" office:value-type="float" office:value="0.00276863425925926" calcext:value-type="float">
            <text:p>0,00276863425925926000</text:p>
          </table:table-cell>
          <table:table-cell table:formula="of:=[.D1261]-[.D1260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[.B1260]+19" office:value-type="float" office:value="23940" calcext:value-type="float">
            <text:p>23940</text:p>
          </table:table-cell>
          <table:table-cell office:value-type="float" office:value="8640000" calcext:value-type="float">
            <text:p>8640000</text:p>
          </table:table-cell>
          <table:table-cell table:formula="of:=[.B1261]/[.C1261]" office:value-type="float" office:value="0.00277083333333333" calcext:value-type="float">
            <text:p>0,00277083333333333000</text:p>
          </table:table-cell>
          <table:table-cell table:formula="of:=[.D1262]-[.D1261]" office:value-type="float" office:value="0.00000219907407407374" calcext:value-type="float">
            <text:p>0,00000219907407407374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[.B1261]+19" office:value-type="float" office:value="23959" calcext:value-type="float">
            <text:p>23959</text:p>
          </table:table-cell>
          <table:table-cell office:value-type="float" office:value="8640000" calcext:value-type="float">
            <text:p>8640000</text:p>
          </table:table-cell>
          <table:table-cell table:formula="of:=[.B1262]/[.C1262]" office:value-type="float" office:value="0.00277303240740741" calcext:value-type="float">
            <text:p>0,00277303240740741000</text:p>
          </table:table-cell>
          <table:table-cell table:formula="of:=[.D1263]-[.D1262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table:formula="of:=[.B1262]+19" office:value-type="float" office:value="23978" calcext:value-type="float">
            <text:p>23978</text:p>
          </table:table-cell>
          <table:table-cell office:value-type="float" office:value="8640000" calcext:value-type="float">
            <text:p>8640000</text:p>
          </table:table-cell>
          <table:table-cell table:formula="of:=[.B1263]/[.C1263]" office:value-type="float" office:value="0.00277523148148148" calcext:value-type="float">
            <text:p>0,00277523148148148000</text:p>
          </table:table-cell>
          <table:table-cell table:formula="of:=[.D1264]-[.D1263]" office:value-type="float" office:value="0.00000219907407407417" calcext:value-type="float">
            <text:p>0,00000219907407407417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[.B1263]+19" office:value-type="float" office:value="23997" calcext:value-type="float">
            <text:p>23997</text:p>
          </table:table-cell>
          <table:table-cell office:value-type="float" office:value="8640000" calcext:value-type="float">
            <text:p>8640000</text:p>
          </table:table-cell>
          <table:table-cell table:formula="of:=[.B1264]/[.C1264]" office:value-type="float" office:value="0.00277743055555556" calcext:value-type="float">
            <text:p>0,00277743055555556000</text:p>
          </table:table-cell>
          <table:table-cell table:formula="of:=#REF!-[.D1264]" office:value-type="string" office:string-value="" calcext:value-type="error">
            <text:p>#REF!</text:p>
          </table:table-cell>
        </table:table-row>
        <table:table-row table:style-name="ro1" table:number-rows-repeated="104731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5:37:44.290469420</meta:creation-date>
    <dc:date>2026-05-17T15:37:50.971805484</dc:date>
    <meta:editing-duration>PT8S</meta:editing-duration>
    <meta:editing-cycles>1</meta:editing-cycles>
    <meta:document-statistic meta:table-count="1" meta:cell-count="6320" meta:object-count="0"/>
    <meta:generator>LibreOffice/24.2.7.2$Linux_X86_64 LibreOffice_project/420$Build-2</meta:generator>
  </office:meta>
</office:document-meta>
</file>