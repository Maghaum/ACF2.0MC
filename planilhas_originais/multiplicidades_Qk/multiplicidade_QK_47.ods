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8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4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column table:style-name="co2" table:number-columns-repeated="16379" table:default-cell-style-name="ce2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47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543981481481482" calcext:value-type="float">
            <text:p>0,00000543981481481482</text:p>
          </table:table-cell>
          <table:table-cell table:formula="of:=[.D3]-[.D2]" office:value-type="float" office:value="0.00000543981481481482" calcext:value-type="float">
            <text:p>0,00000543981481481482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47" office:value-type="float" office:value="94" calcext:value-type="float">
            <text:p>94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108796296296296" calcext:value-type="float">
            <text:p>0,00001087962962962960</text:p>
          </table:table-cell>
          <table:table-cell table:formula="of:=[.D4]-[.D3]" office:value-type="float" office:value="0.00000543981481481481" calcext:value-type="float">
            <text:p>0,00000543981481481481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47" office:value-type="float" office:value="141" calcext:value-type="float">
            <text:p>141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163194444444444" calcext:value-type="float">
            <text:p>0,00001631944444444450</text:p>
          </table:table-cell>
          <table:table-cell table:formula="of:=[.D5]-[.D4]" office:value-type="float" office:value="0.00000543981481481482" calcext:value-type="float">
            <text:p>0,00000543981481481482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47" office:value-type="float" office:value="188" calcext:value-type="float">
            <text:p>188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217592592592593" calcext:value-type="float">
            <text:p>0,00002175925925925930</text:p>
          </table:table-cell>
          <table:table-cell table:formula="of:=[.D6]-[.D5]" office:value-type="float" office:value="0.00000543981481481482" calcext:value-type="float">
            <text:p>0,00000543981481481482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47" office:value-type="float" office:value="235" calcext:value-type="float">
            <text:p>235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271990740740741" calcext:value-type="float">
            <text:p>0,00002719907407407410</text:p>
          </table:table-cell>
          <table:table-cell table:formula="of:=[.D7]-[.D6]" office:value-type="float" office:value="0.00000543981481481481" calcext:value-type="float">
            <text:p>0,00000543981481481481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47" office:value-type="float" office:value="282" calcext:value-type="float">
            <text:p>282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326388888888889" calcext:value-type="float">
            <text:p>0,00003263888888888890</text:p>
          </table:table-cell>
          <table:table-cell table:formula="of:=[.D8]-[.D7]" office:value-type="float" office:value="0.00000543981481481482" calcext:value-type="float">
            <text:p>0,00000543981481481482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47" office:value-type="float" office:value="329" calcext:value-type="float">
            <text:p>329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380787037037037" calcext:value-type="float">
            <text:p>0,00003807870370370370</text:p>
          </table:table-cell>
          <table:table-cell table:formula="of:=[.D9]-[.D8]" office:value-type="float" office:value="0.00000543981481481482" calcext:value-type="float">
            <text:p>0,00000543981481481482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47" office:value-type="float" office:value="376" calcext:value-type="float">
            <text:p>376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435185185185185" calcext:value-type="float">
            <text:p>0,00004351851851851850</text:p>
          </table:table-cell>
          <table:table-cell table:formula="of:=[.D10]-[.D9]" office:value-type="float" office:value="0.00000543981481481482" calcext:value-type="float">
            <text:p>0,00000543981481481482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47" office:value-type="float" office:value="423" calcext:value-type="float">
            <text:p>423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489583333333333" calcext:value-type="float">
            <text:p>0,00004895833333333330</text:p>
          </table:table-cell>
          <table:table-cell table:formula="of:=[.D11]-[.D10]" office:value-type="float" office:value="0.00000543981481481482" calcext:value-type="float">
            <text:p>0,00000543981481481482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47" office:value-type="float" office:value="470" calcext:value-type="float">
            <text:p>47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543981481481482" calcext:value-type="float">
            <text:p>0,00005439814814814820</text:p>
          </table:table-cell>
          <table:table-cell table:formula="of:=[.D12]-[.D11]" office:value-type="float" office:value="0.00000543981481481481" calcext:value-type="float">
            <text:p>0,00000543981481481481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47" office:value-type="float" office:value="517" calcext:value-type="float">
            <text:p>517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59837962962963" calcext:value-type="float">
            <text:p>0,00005983796296296300</text:p>
          </table:table-cell>
          <table:table-cell table:formula="of:=[.D13]-[.D12]" office:value-type="float" office:value="0.00000543981481481482" calcext:value-type="float">
            <text:p>0,00000543981481481482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47" office:value-type="float" office:value="564" calcext:value-type="float">
            <text:p>564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652777777777778" calcext:value-type="float">
            <text:p>0,00006527777777777780</text:p>
          </table:table-cell>
          <table:table-cell table:formula="of:=[.D14]-[.D13]" office:value-type="float" office:value="0.00000543981481481482" calcext:value-type="float">
            <text:p>0,00000543981481481482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47" office:value-type="float" office:value="611" calcext:value-type="float">
            <text:p>611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707175925925926" calcext:value-type="float">
            <text:p>0,00007071759259259260</text:p>
          </table:table-cell>
          <table:table-cell table:formula="of:=[.D15]-[.D14]" office:value-type="float" office:value="0.00000543981481481481" calcext:value-type="float">
            <text:p>0,00000543981481481481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47" office:value-type="float" office:value="658" calcext:value-type="float">
            <text:p>658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0761574074074074" calcext:value-type="float">
            <text:p>0,00007615740740740740</text:p>
          </table:table-cell>
          <table:table-cell table:formula="of:=[.D16]-[.D15]" office:value-type="float" office:value="0.00000543981481481481" calcext:value-type="float">
            <text:p>0,00000543981481481481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47" office:value-type="float" office:value="705" calcext:value-type="float">
            <text:p>705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0815972222222222" calcext:value-type="float">
            <text:p>0,00008159722222222220</text:p>
          </table:table-cell>
          <table:table-cell table:formula="of:=[.D17]-[.D16]" office:value-type="float" office:value="0.00000543981481481482" calcext:value-type="float">
            <text:p>0,00000543981481481482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47" office:value-type="float" office:value="752" calcext:value-type="float">
            <text:p>752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087037037037037" calcext:value-type="float">
            <text:p>0,00008703703703703700</text:p>
          </table:table-cell>
          <table:table-cell table:formula="of:=[.D18]-[.D17]" office:value-type="float" office:value="0.00000543981481481481" calcext:value-type="float">
            <text:p>0,00000543981481481481</text:p>
          </table:table-cell>
          <table:table-cell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47" office:value-type="float" office:value="799" calcext:value-type="float">
            <text:p>799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0924768518518519" calcext:value-type="float">
            <text:p>0,00009247685185185180</text:p>
          </table:table-cell>
          <table:table-cell table:formula="of:=[.D19]-[.D18]" office:value-type="float" office:value="0.00000543981481481482" calcext:value-type="float">
            <text:p>0,00000543981481481482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47" office:value-type="float" office:value="846" calcext:value-type="float">
            <text:p>846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0979166666666667" calcext:value-type="float">
            <text:p>0,00009791666666666670</text:p>
          </table:table-cell>
          <table:table-cell table:formula="of:=[.D20]-[.D19]" office:value-type="float" office:value="0.00000543981481481481" calcext:value-type="float">
            <text:p>0,00000543981481481481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47" office:value-type="float" office:value="893" calcext:value-type="float">
            <text:p>893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103356481481481" calcext:value-type="float">
            <text:p>0,00010335648148148100</text:p>
          </table:table-cell>
          <table:table-cell table:formula="of:=[.D21]-[.D20]" office:value-type="float" office:value="0.00000543981481481482" calcext:value-type="float">
            <text:p>0,00000543981481481482</text:p>
          </table:table-cell>
          <table:table-cell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47" office:value-type="float" office:value="940" calcext:value-type="float">
            <text:p>94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108796296296296" calcext:value-type="float">
            <text:p>0,00010879629629629600</text:p>
          </table:table-cell>
          <table:table-cell table:formula="of:=[.D22]-[.D21]" office:value-type="float" office:value="0.00000543981481481481" calcext:value-type="float">
            <text:p>0,00000543981481481481</text:p>
          </table:table-cell>
          <table:table-cell table:number-columns-repeated="1637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47" office:value-type="float" office:value="987" calcext:value-type="float">
            <text:p>987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114236111111111" calcext:value-type="float">
            <text:p>0,00011423611111111100</text:p>
          </table:table-cell>
          <table:table-cell table:formula="of:=[.D23]-[.D22]" office:value-type="float" office:value="0.00000543981481481481" calcext:value-type="float">
            <text:p>0,00000543981481481481</text:p>
          </table:table-cell>
          <table:table-cell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47" office:value-type="float" office:value="1034" calcext:value-type="float">
            <text:p>1034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119675925925926" calcext:value-type="float">
            <text:p>0,00011967592592592600</text:p>
          </table:table-cell>
          <table:table-cell table:formula="of:=[.D24]-[.D23]" office:value-type="float" office:value="0.00000543981481481482" calcext:value-type="float">
            <text:p>0,00000543981481481482</text:p>
          </table:table-cell>
          <table:table-cell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47" office:value-type="float" office:value="1081" calcext:value-type="float">
            <text:p>1081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125115740740741" calcext:value-type="float">
            <text:p>0,00012511574074074100</text:p>
          </table:table-cell>
          <table:table-cell table:formula="of:=[.D25]-[.D24]" office:value-type="float" office:value="0.00000543981481481481" calcext:value-type="float">
            <text:p>0,00000543981481481481</text:p>
          </table:table-cell>
          <table:table-cell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47" office:value-type="float" office:value="1128" calcext:value-type="float">
            <text:p>1128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130555555555556" calcext:value-type="float">
            <text:p>0,00013055555555555600</text:p>
          </table:table-cell>
          <table:table-cell table:formula="of:=[.D26]-[.D25]" office:value-type="float" office:value="0.00000543981481481481" calcext:value-type="float">
            <text:p>0,00000543981481481481</text:p>
          </table:table-cell>
          <table:table-cell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47" office:value-type="float" office:value="1175" calcext:value-type="float">
            <text:p>1175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13599537037037" calcext:value-type="float">
            <text:p>0,00013599537037037000</text:p>
          </table:table-cell>
          <table:table-cell table:formula="of:=[.D27]-[.D26]" office:value-type="float" office:value="0.00000543981481481484" calcext:value-type="float">
            <text:p>0,00000543981481481484</text:p>
          </table:table-cell>
          <table:table-cell table:number-columns-repeated="1637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47" office:value-type="float" office:value="1222" calcext:value-type="float">
            <text:p>1222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141435185185185" calcext:value-type="float">
            <text:p>0,00014143518518518500</text:p>
          </table:table-cell>
          <table:table-cell table:formula="of:=[.D28]-[.D27]" office:value-type="float" office:value="0.00000543981481481481" calcext:value-type="float">
            <text:p>0,00000543981481481481</text:p>
          </table:table-cell>
          <table:table-cell table:number-columns-repeated="1637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47" office:value-type="float" office:value="1269" calcext:value-type="float">
            <text:p>1269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146875" calcext:value-type="float">
            <text:p>0,00014687500000000000</text:p>
          </table:table-cell>
          <table:table-cell table:formula="of:=[.D29]-[.D28]" office:value-type="float" office:value="0.00000543981481481481" calcext:value-type="float">
            <text:p>0,00000543981481481481</text:p>
          </table:table-cell>
          <table:table-cell table:number-columns-repeated="1637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47" office:value-type="float" office:value="1316" calcext:value-type="float">
            <text:p>1316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152314814814815" calcext:value-type="float">
            <text:p>0,00015231481481481500</text:p>
          </table:table-cell>
          <table:table-cell table:formula="of:=[.D30]-[.D29]" office:value-type="float" office:value="0.00000543981481481481" calcext:value-type="float">
            <text:p>0,00000543981481481481</text:p>
          </table:table-cell>
          <table:table-cell table:number-columns-repeated="1637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47" office:value-type="float" office:value="1363" calcext:value-type="float">
            <text:p>1363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15775462962963" calcext:value-type="float">
            <text:p>0,00015775462962963000</text:p>
          </table:table-cell>
          <table:table-cell table:formula="of:=[.D31]-[.D30]" office:value-type="float" office:value="0.00000543981481481481" calcext:value-type="float">
            <text:p>0,00000543981481481481</text:p>
          </table:table-cell>
          <table:table-cell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47" office:value-type="float" office:value="1410" calcext:value-type="float">
            <text:p>141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163194444444444" calcext:value-type="float">
            <text:p>0,00016319444444444400</text:p>
          </table:table-cell>
          <table:table-cell table:formula="of:=[.D32]-[.D31]" office:value-type="float" office:value="0.00000543981481481484" calcext:value-type="float">
            <text:p>0,00000543981481481484</text:p>
          </table:table-cell>
          <table:table-cell table:number-columns-repeated="1637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47" office:value-type="float" office:value="1457" calcext:value-type="float">
            <text:p>1457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168634259259259" calcext:value-type="float">
            <text:p>0,00016863425925925900</text:p>
          </table:table-cell>
          <table:table-cell table:formula="of:=[.D33]-[.D32]" office:value-type="float" office:value="0.00000543981481481481" calcext:value-type="float">
            <text:p>0,00000543981481481481</text:p>
          </table:table-cell>
          <table:table-cell table:number-columns-repeated="1637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47" office:value-type="float" office:value="1504" calcext:value-type="float">
            <text:p>1504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174074074074074" calcext:value-type="float">
            <text:p>0,00017407407407407400</text:p>
          </table:table-cell>
          <table:table-cell table:formula="of:=[.D34]-[.D33]" office:value-type="float" office:value="0.00000543981481481481" calcext:value-type="float">
            <text:p>0,00000543981481481481</text:p>
          </table:table-cell>
          <table:table-cell table:number-columns-repeated="1637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47" office:value-type="float" office:value="1551" calcext:value-type="float">
            <text:p>1551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179513888888889" calcext:value-type="float">
            <text:p>0,00017951388888888900</text:p>
          </table:table-cell>
          <table:table-cell table:formula="of:=[.D35]-[.D34]" office:value-type="float" office:value="0.00000543981481481481" calcext:value-type="float">
            <text:p>0,00000543981481481481</text:p>
          </table:table-cell>
          <table:table-cell table:number-columns-repeated="1637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47" office:value-type="float" office:value="1598" calcext:value-type="float">
            <text:p>1598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184953703703704" calcext:value-type="float">
            <text:p>0,00018495370370370400</text:p>
          </table:table-cell>
          <table:table-cell table:formula="of:=[.D36]-[.D35]" office:value-type="float" office:value="0.00000543981481481484" calcext:value-type="float">
            <text:p>0,00000543981481481484</text:p>
          </table:table-cell>
          <table:table-cell table:number-columns-repeated="1637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47" office:value-type="float" office:value="1645" calcext:value-type="float">
            <text:p>1645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190393518518519" calcext:value-type="float">
            <text:p>0,00019039351851851900</text:p>
          </table:table-cell>
          <table:table-cell table:formula="of:=[.D37]-[.D36]" office:value-type="float" office:value="0.00000543981481481481" calcext:value-type="float">
            <text:p>0,00000543981481481481</text:p>
          </table:table-cell>
          <table:table-cell table:number-columns-repeated="1637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47" office:value-type="float" office:value="1692" calcext:value-type="float">
            <text:p>1692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195833333333333" calcext:value-type="float">
            <text:p>0,00019583333333333300</text:p>
          </table:table-cell>
          <table:table-cell table:formula="of:=[.D38]-[.D37]" office:value-type="float" office:value="0.00000543981481481481" calcext:value-type="float">
            <text:p>0,00000543981481481481</text:p>
          </table:table-cell>
          <table:table-cell table:number-columns-repeated="1637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47" office:value-type="float" office:value="1739" calcext:value-type="float">
            <text:p>1739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201273148148148" calcext:value-type="float">
            <text:p>0,00020127314814814800</text:p>
          </table:table-cell>
          <table:table-cell table:formula="of:=[.D39]-[.D38]" office:value-type="float" office:value="0.00000543981481481481" calcext:value-type="float">
            <text:p>0,00000543981481481481</text:p>
          </table:table-cell>
          <table:table-cell table:number-columns-repeated="1637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47" office:value-type="float" office:value="1786" calcext:value-type="float">
            <text:p>1786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206712962962963" calcext:value-type="float">
            <text:p>0,00020671296296296300</text:p>
          </table:table-cell>
          <table:table-cell table:formula="of:=[.D40]-[.D39]" office:value-type="float" office:value="0.00000543981481481481" calcext:value-type="float">
            <text:p>0,00000543981481481481</text:p>
          </table:table-cell>
          <table:table-cell table:number-columns-repeated="1637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47" office:value-type="float" office:value="1833" calcext:value-type="float">
            <text:p>1833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212152777777778" calcext:value-type="float">
            <text:p>0,00021215277777777800</text:p>
          </table:table-cell>
          <table:table-cell table:formula="of:=[.D41]-[.D40]" office:value-type="float" office:value="0.00000543981481481484" calcext:value-type="float">
            <text:p>0,00000543981481481484</text:p>
          </table:table-cell>
          <table:table-cell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47" office:value-type="float" office:value="1880" calcext:value-type="float">
            <text:p>188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217592592592593" calcext:value-type="float">
            <text:p>0,00021759259259259300</text:p>
          </table:table-cell>
          <table:table-cell table:formula="of:=[.D42]-[.D41]" office:value-type="float" office:value="0.00000543981481481481" calcext:value-type="float">
            <text:p>0,00000543981481481481</text:p>
          </table:table-cell>
          <table:table-cell table:number-columns-repeated="1637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47" office:value-type="float" office:value="1927" calcext:value-type="float">
            <text:p>1927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223032407407407" calcext:value-type="float">
            <text:p>0,00022303240740740700</text:p>
          </table:table-cell>
          <table:table-cell table:formula="of:=[.D43]-[.D42]" office:value-type="float" office:value="0.00000543981481481481" calcext:value-type="float">
            <text:p>0,00000543981481481481</text:p>
          </table:table-cell>
          <table:table-cell table:number-columns-repeated="1637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47" office:value-type="float" office:value="1974" calcext:value-type="float">
            <text:p>1974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228472222222222" calcext:value-type="float">
            <text:p>0,00022847222222222200</text:p>
          </table:table-cell>
          <table:table-cell table:formula="of:=[.D44]-[.D43]" office:value-type="float" office:value="0.00000543981481481481" calcext:value-type="float">
            <text:p>0,00000543981481481481</text:p>
          </table:table-cell>
          <table:table-cell table:number-columns-repeated="1637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47" office:value-type="float" office:value="2021" calcext:value-type="float">
            <text:p>2021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233912037037037" calcext:value-type="float">
            <text:p>0,00023391203703703700</text:p>
          </table:table-cell>
          <table:table-cell table:formula="of:=[.D45]-[.D44]" office:value-type="float" office:value="0.00000543981481481481" calcext:value-type="float">
            <text:p>0,00000543981481481481</text:p>
          </table:table-cell>
          <table:table-cell table:number-columns-repeated="1637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47" office:value-type="float" office:value="2068" calcext:value-type="float">
            <text:p>2068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239351851851852" calcext:value-type="float">
            <text:p>0,00023935185185185200</text:p>
          </table:table-cell>
          <table:table-cell table:formula="of:=[.D46]-[.D45]" office:value-type="float" office:value="0.00000543981481481481" calcext:value-type="float">
            <text:p>0,00000543981481481481</text:p>
          </table:table-cell>
          <table:table-cell table:number-columns-repeated="1637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47" office:value-type="float" office:value="2115" calcext:value-type="float">
            <text:p>2115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244791666666667" calcext:value-type="float">
            <text:p>0,00024479166666666700</text:p>
          </table:table-cell>
          <table:table-cell table:formula="of:=[.D47]-[.D46]" office:value-type="float" office:value="0.00000543981481481484" calcext:value-type="float">
            <text:p>0,00000543981481481484</text:p>
          </table:table-cell>
          <table:table-cell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47" office:value-type="float" office:value="2162" calcext:value-type="float">
            <text:p>2162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250231481481482" calcext:value-type="float">
            <text:p>0,00025023148148148200</text:p>
          </table:table-cell>
          <table:table-cell table:formula="of:=[.D48]-[.D47]" office:value-type="float" office:value="0.00000543981481481484" calcext:value-type="float">
            <text:p>0,00000543981481481484</text:p>
          </table:table-cell>
          <table:table-cell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47" office:value-type="float" office:value="2209" calcext:value-type="float">
            <text:p>2209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255671296296296" calcext:value-type="float">
            <text:p>0,00025567129629629600</text:p>
          </table:table-cell>
          <table:table-cell table:formula="of:=[.D49]-[.D48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47" office:value-type="float" office:value="2256" calcext:value-type="float">
            <text:p>2256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261111111111111" calcext:value-type="float">
            <text:p>0,00026111111111111100</text:p>
          </table:table-cell>
          <table:table-cell table:formula="of:=[.D50]-[.D49]" office:value-type="float" office:value="0.00000543981481481484" calcext:value-type="float">
            <text:p>0,00000543981481481484</text:p>
          </table:table-cell>
          <table:table-cell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47" office:value-type="float" office:value="2303" calcext:value-type="float">
            <text:p>2303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266550925925926" calcext:value-type="float">
            <text:p>0,00026655092592592600</text:p>
          </table:table-cell>
          <table:table-cell table:formula="of:=[.D51]-[.D50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47" office:value-type="float" office:value="2350" calcext:value-type="float">
            <text:p>235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271990740740741" calcext:value-type="float">
            <text:p>0,00027199074074074100</text:p>
          </table:table-cell>
          <table:table-cell table:formula="of:=[.D52]-[.D51]" office:value-type="float" office:value="0.00000543981481481484" calcext:value-type="float">
            <text:p>0,00000543981481481484</text:p>
          </table:table-cell>
          <table:table-cell table:number-columns-repeated="1637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47" office:value-type="float" office:value="2397" calcext:value-type="float">
            <text:p>2397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277430555555556" calcext:value-type="float">
            <text:p>0,00027743055555555600</text:p>
          </table:table-cell>
          <table:table-cell table:formula="of:=[.D53]-[.D52]" office:value-type="float" office:value="0.00000543981481481484" calcext:value-type="float">
            <text:p>0,00000543981481481484</text:p>
          </table:table-cell>
          <table:table-cell table:number-columns-repeated="1637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47" office:value-type="float" office:value="2444" calcext:value-type="float">
            <text:p>2444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28287037037037" calcext:value-type="float">
            <text:p>0,00028287037037037000</text:p>
          </table:table-cell>
          <table:table-cell table:formula="of:=[.D54]-[.D53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47" office:value-type="float" office:value="2491" calcext:value-type="float">
            <text:p>2491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288310185185185" calcext:value-type="float">
            <text:p>0,00028831018518518500</text:p>
          </table:table-cell>
          <table:table-cell table:formula="of:=[.D55]-[.D54]" office:value-type="float" office:value="0.00000543981481481484" calcext:value-type="float">
            <text:p>0,00000543981481481484</text:p>
          </table:table-cell>
          <table:table-cell table:number-columns-repeated="1637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47" office:value-type="float" office:value="2538" calcext:value-type="float">
            <text:p>2538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29375" calcext:value-type="float">
            <text:p>0,00029375000000000000</text:p>
          </table:table-cell>
          <table:table-cell table:formula="of:=[.D56]-[.D55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47" office:value-type="float" office:value="2585" calcext:value-type="float">
            <text:p>2585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299189814814815" calcext:value-type="float">
            <text:p>0,00029918981481481500</text:p>
          </table:table-cell>
          <table:table-cell table:formula="of:=[.D57]-[.D56]" office:value-type="float" office:value="0.00000543981481481484" calcext:value-type="float">
            <text:p>0,00000543981481481484</text:p>
          </table:table-cell>
          <table:table-cell table:number-columns-repeated="1637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47" office:value-type="float" office:value="2632" calcext:value-type="float">
            <text:p>2632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30462962962963" calcext:value-type="float">
            <text:p>0,00030462962962963000</text:p>
          </table:table-cell>
          <table:table-cell table:formula="of:=[.D58]-[.D57]" office:value-type="float" office:value="0.00000543981481481484" calcext:value-type="float">
            <text:p>0,00000543981481481484</text:p>
          </table:table-cell>
          <table:table-cell table:number-columns-repeated="1637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47" office:value-type="float" office:value="2679" calcext:value-type="float">
            <text:p>2679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310069444444444" calcext:value-type="float">
            <text:p>0,00031006944444444400</text:p>
          </table:table-cell>
          <table:table-cell table:formula="of:=[.D59]-[.D58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47" office:value-type="float" office:value="2726" calcext:value-type="float">
            <text:p>2726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315509259259259" calcext:value-type="float">
            <text:p>0,00031550925925925900</text:p>
          </table:table-cell>
          <table:table-cell table:formula="of:=[.D60]-[.D59]" office:value-type="float" office:value="0.00000543981481481484" calcext:value-type="float">
            <text:p>0,00000543981481481484</text:p>
          </table:table-cell>
          <table:table-cell table:number-columns-repeated="1637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47" office:value-type="float" office:value="2773" calcext:value-type="float">
            <text:p>2773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320949074074074" calcext:value-type="float">
            <text:p>0,00032094907407407400</text:p>
          </table:table-cell>
          <table:table-cell table:formula="of:=[.D61]-[.D60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47" office:value-type="float" office:value="2820" calcext:value-type="float">
            <text:p>282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326388888888889" calcext:value-type="float">
            <text:p>0,00032638888888888900</text:p>
          </table:table-cell>
          <table:table-cell table:formula="of:=[.D62]-[.D61]" office:value-type="float" office:value="0.00000543981481481484" calcext:value-type="float">
            <text:p>0,00000543981481481484</text:p>
          </table:table-cell>
          <table:table-cell table:number-columns-repeated="1637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47" office:value-type="float" office:value="2867" calcext:value-type="float">
            <text:p>2867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331828703703704" calcext:value-type="float">
            <text:p>0,00033182870370370400</text:p>
          </table:table-cell>
          <table:table-cell table:formula="of:=[.D63]-[.D62]" office:value-type="float" office:value="0.00000543981481481484" calcext:value-type="float">
            <text:p>0,00000543981481481484</text:p>
          </table:table-cell>
          <table:table-cell table:number-columns-repeated="1637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47" office:value-type="float" office:value="2914" calcext:value-type="float">
            <text:p>2914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337268518518519" calcext:value-type="float">
            <text:p>0,00033726851851851900</text:p>
          </table:table-cell>
          <table:table-cell table:formula="of:=[.D64]-[.D63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47" office:value-type="float" office:value="2961" calcext:value-type="float">
            <text:p>2961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342708333333333" calcext:value-type="float">
            <text:p>0,00034270833333333300</text:p>
          </table:table-cell>
          <table:table-cell table:formula="of:=[.D65]-[.D64]" office:value-type="float" office:value="0.00000543981481481484" calcext:value-type="float">
            <text:p>0,00000543981481481484</text:p>
          </table:table-cell>
          <table:table-cell table:number-columns-repeated="1637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47" office:value-type="float" office:value="3008" calcext:value-type="float">
            <text:p>3008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348148148148148" calcext:value-type="float">
            <text:p>0,00034814814814814800</text:p>
          </table:table-cell>
          <table:table-cell table:formula="of:=[.D66]-[.D65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47" office:value-type="float" office:value="3055" calcext:value-type="float">
            <text:p>3055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353587962962963" calcext:value-type="float">
            <text:p>0,00035358796296296300</text:p>
          </table:table-cell>
          <table:table-cell table:formula="of:=[.D67]-[.D66]" office:value-type="float" office:value="0.00000543981481481484" calcext:value-type="float">
            <text:p>0,00000543981481481484</text:p>
          </table:table-cell>
          <table:table-cell table:number-columns-repeated="1637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47" office:value-type="float" office:value="3102" calcext:value-type="float">
            <text:p>3102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359027777777778" calcext:value-type="float">
            <text:p>0,00035902777777777800</text:p>
          </table:table-cell>
          <table:table-cell table:formula="of:=[.D68]-[.D67]" office:value-type="float" office:value="0.00000543981481481484" calcext:value-type="float">
            <text:p>0,00000543981481481484</text:p>
          </table:table-cell>
          <table:table-cell table:number-columns-repeated="1637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47" office:value-type="float" office:value="3149" calcext:value-type="float">
            <text:p>3149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364467592592593" calcext:value-type="float">
            <text:p>0,00036446759259259300</text:p>
          </table:table-cell>
          <table:table-cell table:formula="of:=[.D69]-[.D68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47" office:value-type="float" office:value="3196" calcext:value-type="float">
            <text:p>3196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369907407407407" calcext:value-type="float">
            <text:p>0,00036990740740740700</text:p>
          </table:table-cell>
          <table:table-cell table:formula="of:=[.D70]-[.D69]" office:value-type="float" office:value="0.00000543981481481484" calcext:value-type="float">
            <text:p>0,00000543981481481484</text:p>
          </table:table-cell>
          <table:table-cell table:number-columns-repeated="1637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47" office:value-type="float" office:value="3243" calcext:value-type="float">
            <text:p>3243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375347222222222" calcext:value-type="float">
            <text:p>0,00037534722222222200</text:p>
          </table:table-cell>
          <table:table-cell table:formula="of:=[.D71]-[.D70]" office:value-type="float" office:value="0.00000543981481481484" calcext:value-type="float">
            <text:p>0,00000543981481481484</text:p>
          </table:table-cell>
          <table:table-cell table:number-columns-repeated="1637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47" office:value-type="float" office:value="3290" calcext:value-type="float">
            <text:p>329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380787037037037" calcext:value-type="float">
            <text:p>0,00038078703703703700</text:p>
          </table:table-cell>
          <table:table-cell table:formula="of:=[.D72]-[.D71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47" office:value-type="float" office:value="3337" calcext:value-type="float">
            <text:p>3337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386226851851852" calcext:value-type="float">
            <text:p>0,00038622685185185200</text:p>
          </table:table-cell>
          <table:table-cell table:formula="of:=[.D73]-[.D72]" office:value-type="float" office:value="0.00000543981481481484" calcext:value-type="float">
            <text:p>0,00000543981481481484</text:p>
          </table:table-cell>
          <table:table-cell table:number-columns-repeated="1637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47" office:value-type="float" office:value="3384" calcext:value-type="float">
            <text:p>3384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391666666666667" calcext:value-type="float">
            <text:p>0,00039166666666666700</text:p>
          </table:table-cell>
          <table:table-cell table:formula="of:=[.D74]-[.D73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47" office:value-type="float" office:value="3431" calcext:value-type="float">
            <text:p>3431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397106481481481" calcext:value-type="float">
            <text:p>0,00039710648148148100</text:p>
          </table:table-cell>
          <table:table-cell table:formula="of:=[.D75]-[.D74]" office:value-type="float" office:value="0.00000543981481481484" calcext:value-type="float">
            <text:p>0,00000543981481481484</text:p>
          </table:table-cell>
          <table:table-cell table:number-columns-repeated="1637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47" office:value-type="float" office:value="3478" calcext:value-type="float">
            <text:p>3478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402546296296296" calcext:value-type="float">
            <text:p>0,00040254629629629600</text:p>
          </table:table-cell>
          <table:table-cell table:formula="of:=[.D76]-[.D75]" office:value-type="float" office:value="0.00000543981481481484" calcext:value-type="float">
            <text:p>0,00000543981481481484</text:p>
          </table:table-cell>
          <table:table-cell table:number-columns-repeated="1637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47" office:value-type="float" office:value="3525" calcext:value-type="float">
            <text:p>3525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407986111111111" calcext:value-type="float">
            <text:p>0,00040798611111111100</text:p>
          </table:table-cell>
          <table:table-cell table:formula="of:=[.D77]-[.D76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47" office:value-type="float" office:value="3572" calcext:value-type="float">
            <text:p>3572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413425925925926" calcext:value-type="float">
            <text:p>0,00041342592592592600</text:p>
          </table:table-cell>
          <table:table-cell table:formula="of:=[.D78]-[.D77]" office:value-type="float" office:value="0.00000543981481481484" calcext:value-type="float">
            <text:p>0,00000543981481481484</text:p>
          </table:table-cell>
          <table:table-cell table:number-columns-repeated="1637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47" office:value-type="float" office:value="3619" calcext:value-type="float">
            <text:p>3619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418865740740741" calcext:value-type="float">
            <text:p>0,00041886574074074100</text:p>
          </table:table-cell>
          <table:table-cell table:formula="of:=[.D79]-[.D78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47" office:value-type="float" office:value="3666" calcext:value-type="float">
            <text:p>3666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424305555555556" calcext:value-type="float">
            <text:p>0,00042430555555555600</text:p>
          </table:table-cell>
          <table:table-cell table:formula="of:=[.D80]-[.D79]" office:value-type="float" office:value="0.00000543981481481484" calcext:value-type="float">
            <text:p>0,00000543981481481484</text:p>
          </table:table-cell>
          <table:table-cell table:number-columns-repeated="1637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47" office:value-type="float" office:value="3713" calcext:value-type="float">
            <text:p>3713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42974537037037" calcext:value-type="float">
            <text:p>0,00042974537037037000</text:p>
          </table:table-cell>
          <table:table-cell table:formula="of:=[.D81]-[.D80]" office:value-type="float" office:value="0.00000543981481481484" calcext:value-type="float">
            <text:p>0,00000543981481481484</text:p>
          </table:table-cell>
          <table:table-cell table:number-columns-repeated="1637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47" office:value-type="float" office:value="3760" calcext:value-type="float">
            <text:p>376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435185185185185" calcext:value-type="float">
            <text:p>0,00043518518518518500</text:p>
          </table:table-cell>
          <table:table-cell table:formula="of:=[.D82]-[.D81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47" office:value-type="float" office:value="3807" calcext:value-type="float">
            <text:p>3807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440625" calcext:value-type="float">
            <text:p>0,00044062500000000000</text:p>
          </table:table-cell>
          <table:table-cell table:formula="of:=[.D83]-[.D82]" office:value-type="float" office:value="0.00000543981481481484" calcext:value-type="float">
            <text:p>0,00000543981481481484</text:p>
          </table:table-cell>
          <table:table-cell table:number-columns-repeated="1637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47" office:value-type="float" office:value="3854" calcext:value-type="float">
            <text:p>3854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446064814814815" calcext:value-type="float">
            <text:p>0,00044606481481481500</text:p>
          </table:table-cell>
          <table:table-cell table:formula="of:=[.D84]-[.D83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47" office:value-type="float" office:value="3901" calcext:value-type="float">
            <text:p>3901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45150462962963" calcext:value-type="float">
            <text:p>0,00045150462962963000</text:p>
          </table:table-cell>
          <table:table-cell table:formula="of:=[.D85]-[.D84]" office:value-type="float" office:value="0.00000543981481481484" calcext:value-type="float">
            <text:p>0,00000543981481481484</text:p>
          </table:table-cell>
          <table:table-cell table:number-columns-repeated="1637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47" office:value-type="float" office:value="3948" calcext:value-type="float">
            <text:p>3948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456944444444444" calcext:value-type="float">
            <text:p>0,00045694444444444500</text:p>
          </table:table-cell>
          <table:table-cell table:formula="of:=[.D86]-[.D85]" office:value-type="float" office:value="0.00000543981481481484" calcext:value-type="float">
            <text:p>0,00000543981481481484</text:p>
          </table:table-cell>
          <table:table-cell table:number-columns-repeated="1637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47" office:value-type="float" office:value="3995" calcext:value-type="float">
            <text:p>3995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462384259259259" calcext:value-type="float">
            <text:p>0,00046238425925925900</text:p>
          </table:table-cell>
          <table:table-cell table:formula="of:=[.D87]-[.D86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47" office:value-type="float" office:value="4042" calcext:value-type="float">
            <text:p>4042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467824074074074" calcext:value-type="float">
            <text:p>0,00046782407407407400</text:p>
          </table:table-cell>
          <table:table-cell table:formula="of:=[.D88]-[.D87]" office:value-type="float" office:value="0.00000543981481481484" calcext:value-type="float">
            <text:p>0,00000543981481481484</text:p>
          </table:table-cell>
          <table:table-cell table:number-columns-repeated="1637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47" office:value-type="float" office:value="4089" calcext:value-type="float">
            <text:p>4089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473263888888889" calcext:value-type="float">
            <text:p>0,00047326388888888900</text:p>
          </table:table-cell>
          <table:table-cell table:formula="of:=[.D89]-[.D88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47" office:value-type="float" office:value="4136" calcext:value-type="float">
            <text:p>4136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478703703703704" calcext:value-type="float">
            <text:p>0,00047870370370370400</text:p>
          </table:table-cell>
          <table:table-cell table:formula="of:=[.D90]-[.D89]" office:value-type="float" office:value="0.00000543981481481484" calcext:value-type="float">
            <text:p>0,00000543981481481484</text:p>
          </table:table-cell>
          <table:table-cell table:number-columns-repeated="1637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47" office:value-type="float" office:value="4183" calcext:value-type="float">
            <text:p>4183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484143518518519" calcext:value-type="float">
            <text:p>0,00048414351851851800</text:p>
          </table:table-cell>
          <table:table-cell table:formula="of:=[.D91]-[.D90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47" office:value-type="float" office:value="4230" calcext:value-type="float">
            <text:p>423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489583333333333" calcext:value-type="float">
            <text:p>0,00048958333333333300</text:p>
          </table:table-cell>
          <table:table-cell table:formula="of:=[.D92]-[.D91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47" office:value-type="float" office:value="4277" calcext:value-type="float">
            <text:p>4277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495023148148148" calcext:value-type="float">
            <text:p>0,00049502314814814800</text:p>
          </table:table-cell>
          <table:table-cell table:formula="of:=[.D93]-[.D92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47" office:value-type="float" office:value="4324" calcext:value-type="float">
            <text:p>4324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500462962962963" calcext:value-type="float">
            <text:p>0,00050046296296296300</text:p>
          </table:table-cell>
          <table:table-cell table:formula="of:=[.D94]-[.D93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47" office:value-type="float" office:value="4371" calcext:value-type="float">
            <text:p>4371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505902777777778" calcext:value-type="float">
            <text:p>0,00050590277777777800</text:p>
          </table:table-cell>
          <table:table-cell table:formula="of:=[.D95]-[.D94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47" office:value-type="float" office:value="4418" calcext:value-type="float">
            <text:p>4418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511342592592593" calcext:value-type="float">
            <text:p>0,00051134259259259300</text:p>
          </table:table-cell>
          <table:table-cell table:formula="of:=[.D96]-[.D95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47" office:value-type="float" office:value="4465" calcext:value-type="float">
            <text:p>4465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516782407407407" calcext:value-type="float">
            <text:p>0,00051678240740740700</text:p>
          </table:table-cell>
          <table:table-cell table:formula="of:=[.D97]-[.D96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47" office:value-type="float" office:value="4512" calcext:value-type="float">
            <text:p>4512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522222222222222" calcext:value-type="float">
            <text:p>0,00052222222222222200</text:p>
          </table:table-cell>
          <table:table-cell table:formula="of:=[.D98]-[.D97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47" office:value-type="float" office:value="4559" calcext:value-type="float">
            <text:p>4559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527662037037037" calcext:value-type="float">
            <text:p>0,00052766203703703700</text:p>
          </table:table-cell>
          <table:table-cell table:formula="of:=[.D99]-[.D98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47" office:value-type="float" office:value="4606" calcext:value-type="float">
            <text:p>4606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533101851851852" calcext:value-type="float">
            <text:p>0,00053310185185185200</text:p>
          </table:table-cell>
          <table:table-cell table:formula="of:=[.D100]-[.D99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47" office:value-type="float" office:value="4653" calcext:value-type="float">
            <text:p>4653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538541666666667" calcext:value-type="float">
            <text:p>0,00053854166666666700</text:p>
          </table:table-cell>
          <table:table-cell table:formula="of:=[.D101]-[.D100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47" office:value-type="float" office:value="4700" calcext:value-type="float">
            <text:p>47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543981481481481" calcext:value-type="float">
            <text:p>0,00054398148148148100</text:p>
          </table:table-cell>
          <table:table-cell table:formula="of:=[.D102]-[.D101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47" office:value-type="float" office:value="4747" calcext:value-type="float">
            <text:p>4747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549421296296296" calcext:value-type="float">
            <text:p>0,00054942129629629600</text:p>
          </table:table-cell>
          <table:table-cell table:formula="of:=[.D103]-[.D102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47" office:value-type="float" office:value="4794" calcext:value-type="float">
            <text:p>4794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554861111111111" calcext:value-type="float">
            <text:p>0,00055486111111111100</text:p>
          </table:table-cell>
          <table:table-cell table:formula="of:=[.D104]-[.D103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47" office:value-type="float" office:value="4841" calcext:value-type="float">
            <text:p>4841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560300925925926" calcext:value-type="float">
            <text:p>0,00056030092592592600</text:p>
          </table:table-cell>
          <table:table-cell table:formula="of:=[.D105]-[.D104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47" office:value-type="float" office:value="4888" calcext:value-type="float">
            <text:p>4888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565740740740741" calcext:value-type="float">
            <text:p>0,00056574074074074100</text:p>
          </table:table-cell>
          <table:table-cell table:formula="of:=[.D106]-[.D105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47" office:value-type="float" office:value="4935" calcext:value-type="float">
            <text:p>4935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571180555555556" calcext:value-type="float">
            <text:p>0,00057118055555555600</text:p>
          </table:table-cell>
          <table:table-cell table:formula="of:=[.D107]-[.D106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47" office:value-type="float" office:value="4982" calcext:value-type="float">
            <text:p>4982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57662037037037" calcext:value-type="float">
            <text:p>0,00057662037037037000</text:p>
          </table:table-cell>
          <table:table-cell table:formula="of:=[.D108]-[.D107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47" office:value-type="float" office:value="5029" calcext:value-type="float">
            <text:p>5029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582060185185185" calcext:value-type="float">
            <text:p>0,00058206018518518500</text:p>
          </table:table-cell>
          <table:table-cell table:formula="of:=[.D109]-[.D108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47" office:value-type="float" office:value="5076" calcext:value-type="float">
            <text:p>5076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5875" calcext:value-type="float">
            <text:p>0,00058750000000000000</text:p>
          </table:table-cell>
          <table:table-cell table:formula="of:=[.D110]-[.D109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47" office:value-type="float" office:value="5123" calcext:value-type="float">
            <text:p>5123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592939814814815" calcext:value-type="float">
            <text:p>0,00059293981481481500</text:p>
          </table:table-cell>
          <table:table-cell table:formula="of:=[.D111]-[.D110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47" office:value-type="float" office:value="5170" calcext:value-type="float">
            <text:p>517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59837962962963" calcext:value-type="float">
            <text:p>0,00059837962962963000</text:p>
          </table:table-cell>
          <table:table-cell table:formula="of:=[.D112]-[.D111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47" office:value-type="float" office:value="5217" calcext:value-type="float">
            <text:p>5217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603819444444445" calcext:value-type="float">
            <text:p>0,00060381944444444500</text:p>
          </table:table-cell>
          <table:table-cell table:formula="of:=[.D113]-[.D112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47" office:value-type="float" office:value="5264" calcext:value-type="float">
            <text:p>5264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609259259259259" calcext:value-type="float">
            <text:p>0,00060925925925925900</text:p>
          </table:table-cell>
          <table:table-cell table:formula="of:=[.D114]-[.D113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47" office:value-type="float" office:value="5311" calcext:value-type="float">
            <text:p>5311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614699074074074" calcext:value-type="float">
            <text:p>0,00061469907407407400</text:p>
          </table:table-cell>
          <table:table-cell table:formula="of:=[.D115]-[.D114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47" office:value-type="float" office:value="5358" calcext:value-type="float">
            <text:p>5358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620138888888889" calcext:value-type="float">
            <text:p>0,00062013888888888900</text:p>
          </table:table-cell>
          <table:table-cell table:formula="of:=[.D116]-[.D115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47" office:value-type="float" office:value="5405" calcext:value-type="float">
            <text:p>5405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625578703703704" calcext:value-type="float">
            <text:p>0,00062557870370370400</text:p>
          </table:table-cell>
          <table:table-cell table:formula="of:=[.D117]-[.D116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47" office:value-type="float" office:value="5452" calcext:value-type="float">
            <text:p>5452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631018518518519" calcext:value-type="float">
            <text:p>0,00063101851851851900</text:p>
          </table:table-cell>
          <table:table-cell table:formula="of:=[.D118]-[.D117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47" office:value-type="float" office:value="5499" calcext:value-type="float">
            <text:p>5499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636458333333333" calcext:value-type="float">
            <text:p>0,00063645833333333300</text:p>
          </table:table-cell>
          <table:table-cell table:formula="of:=[.D119]-[.D118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47" office:value-type="float" office:value="5546" calcext:value-type="float">
            <text:p>5546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641898148148148" calcext:value-type="float">
            <text:p>0,00064189814814814800</text:p>
          </table:table-cell>
          <table:table-cell table:formula="of:=[.D120]-[.D119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47" office:value-type="float" office:value="5593" calcext:value-type="float">
            <text:p>5593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647337962962963" calcext:value-type="float">
            <text:p>0,00064733796296296300</text:p>
          </table:table-cell>
          <table:table-cell table:formula="of:=[.D121]-[.D120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47" office:value-type="float" office:value="5640" calcext:value-type="float">
            <text:p>564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652777777777778" calcext:value-type="float">
            <text:p>0,00065277777777777800</text:p>
          </table:table-cell>
          <table:table-cell table:formula="of:=[.D122]-[.D121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47" office:value-type="float" office:value="5687" calcext:value-type="float">
            <text:p>5687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658217592592593" calcext:value-type="float">
            <text:p>0,00065821759259259300</text:p>
          </table:table-cell>
          <table:table-cell table:formula="of:=[.D123]-[.D122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47" office:value-type="float" office:value="5734" calcext:value-type="float">
            <text:p>5734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663657407407407" calcext:value-type="float">
            <text:p>0,00066365740740740700</text:p>
          </table:table-cell>
          <table:table-cell table:formula="of:=[.D124]-[.D123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47" office:value-type="float" office:value="5781" calcext:value-type="float">
            <text:p>5781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669097222222222" calcext:value-type="float">
            <text:p>0,00066909722222222200</text:p>
          </table:table-cell>
          <table:table-cell table:formula="of:=[.D125]-[.D124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47" office:value-type="float" office:value="5828" calcext:value-type="float">
            <text:p>5828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674537037037037" calcext:value-type="float">
            <text:p>0,00067453703703703700</text:p>
          </table:table-cell>
          <table:table-cell table:formula="of:=[.D126]-[.D125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47" office:value-type="float" office:value="5875" calcext:value-type="float">
            <text:p>5875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679976851851852" calcext:value-type="float">
            <text:p>0,00067997685185185200</text:p>
          </table:table-cell>
          <table:table-cell table:formula="of:=[.D127]-[.D126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47" office:value-type="float" office:value="5922" calcext:value-type="float">
            <text:p>5922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685416666666667" calcext:value-type="float">
            <text:p>0,00068541666666666700</text:p>
          </table:table-cell>
          <table:table-cell table:formula="of:=[.D128]-[.D127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47" office:value-type="float" office:value="5969" calcext:value-type="float">
            <text:p>5969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690856481481482" calcext:value-type="float">
            <text:p>0,00069085648148148200</text:p>
          </table:table-cell>
          <table:table-cell table:formula="of:=[.D129]-[.D128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47" office:value-type="float" office:value="6016" calcext:value-type="float">
            <text:p>6016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696296296296296" calcext:value-type="float">
            <text:p>0,00069629629629629600</text:p>
          </table:table-cell>
          <table:table-cell table:formula="of:=[.D130]-[.D129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47" office:value-type="float" office:value="6063" calcext:value-type="float">
            <text:p>6063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701736111111111" calcext:value-type="float">
            <text:p>0,00070173611111111100</text:p>
          </table:table-cell>
          <table:table-cell table:formula="of:=[.D131]-[.D130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47" office:value-type="float" office:value="6110" calcext:value-type="float">
            <text:p>611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707175925925926" calcext:value-type="float">
            <text:p>0,00070717592592592600</text:p>
          </table:table-cell>
          <table:table-cell table:formula="of:=[.D132]-[.D131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47" office:value-type="float" office:value="6157" calcext:value-type="float">
            <text:p>6157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712615740740741" calcext:value-type="float">
            <text:p>0,00071261574074074100</text:p>
          </table:table-cell>
          <table:table-cell table:formula="of:=[.D133]-[.D132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47" office:value-type="float" office:value="6204" calcext:value-type="float">
            <text:p>6204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718055555555556" calcext:value-type="float">
            <text:p>0,00071805555555555600</text:p>
          </table:table-cell>
          <table:table-cell table:formula="of:=[.D134]-[.D133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47" office:value-type="float" office:value="6251" calcext:value-type="float">
            <text:p>6251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72349537037037" calcext:value-type="float">
            <text:p>0,00072349537037037000</text:p>
          </table:table-cell>
          <table:table-cell table:formula="of:=[.D135]-[.D134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47" office:value-type="float" office:value="6298" calcext:value-type="float">
            <text:p>6298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728935185185185" calcext:value-type="float">
            <text:p>0,00072893518518518500</text:p>
          </table:table-cell>
          <table:table-cell table:formula="of:=[.D136]-[.D135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47" office:value-type="float" office:value="6345" calcext:value-type="float">
            <text:p>6345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0734375" calcext:value-type="float">
            <text:p>0,00073437500000000000</text:p>
          </table:table-cell>
          <table:table-cell table:formula="of:=[.D137]-[.D136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47" office:value-type="float" office:value="6392" calcext:value-type="float">
            <text:p>6392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0739814814814815" calcext:value-type="float">
            <text:p>0,00073981481481481500</text:p>
          </table:table-cell>
          <table:table-cell table:formula="of:=[.D138]-[.D137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47" office:value-type="float" office:value="6439" calcext:value-type="float">
            <text:p>6439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074525462962963" calcext:value-type="float">
            <text:p>0,00074525462962963000</text:p>
          </table:table-cell>
          <table:table-cell table:formula="of:=[.D139]-[.D138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47" office:value-type="float" office:value="6486" calcext:value-type="float">
            <text:p>6486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0750694444444445" calcext:value-type="float">
            <text:p>0,00075069444444444500</text:p>
          </table:table-cell>
          <table:table-cell table:formula="of:=[.D140]-[.D139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47" office:value-type="float" office:value="6533" calcext:value-type="float">
            <text:p>6533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0756134259259259" calcext:value-type="float">
            <text:p>0,00075613425925925900</text:p>
          </table:table-cell>
          <table:table-cell table:formula="of:=[.D141]-[.D140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47" office:value-type="float" office:value="6580" calcext:value-type="float">
            <text:p>658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0761574074074074" calcext:value-type="float">
            <text:p>0,00076157407407407400</text:p>
          </table:table-cell>
          <table:table-cell table:formula="of:=[.D142]-[.D141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47" office:value-type="float" office:value="6627" calcext:value-type="float">
            <text:p>6627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0767013888888889" calcext:value-type="float">
            <text:p>0,00076701388888888900</text:p>
          </table:table-cell>
          <table:table-cell table:formula="of:=[.D143]-[.D142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47" office:value-type="float" office:value="6674" calcext:value-type="float">
            <text:p>6674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0772453703703704" calcext:value-type="float">
            <text:p>0,00077245370370370400</text:p>
          </table:table-cell>
          <table:table-cell table:formula="of:=[.D144]-[.D143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47" office:value-type="float" office:value="6721" calcext:value-type="float">
            <text:p>6721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0777893518518519" calcext:value-type="float">
            <text:p>0,00077789351851851800</text:p>
          </table:table-cell>
          <table:table-cell table:formula="of:=[.D145]-[.D144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47" office:value-type="float" office:value="6768" calcext:value-type="float">
            <text:p>6768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0783333333333333" calcext:value-type="float">
            <text:p>0,00078333333333333400</text:p>
          </table:table-cell>
          <table:table-cell table:formula="of:=[.D146]-[.D145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47" office:value-type="float" office:value="6815" calcext:value-type="float">
            <text:p>6815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0788773148148148" calcext:value-type="float">
            <text:p>0,00078877314814814800</text:p>
          </table:table-cell>
          <table:table-cell table:formula="of:=[.D147]-[.D146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47" office:value-type="float" office:value="6862" calcext:value-type="float">
            <text:p>6862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0794212962962963" calcext:value-type="float">
            <text:p>0,00079421296296296300</text:p>
          </table:table-cell>
          <table:table-cell table:formula="of:=[.D148]-[.D147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47" office:value-type="float" office:value="6909" calcext:value-type="float">
            <text:p>6909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0799652777777778" calcext:value-type="float">
            <text:p>0,00079965277777777800</text:p>
          </table:table-cell>
          <table:table-cell table:formula="of:=[.D149]-[.D148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47" office:value-type="float" office:value="6956" calcext:value-type="float">
            <text:p>6956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0805092592592593" calcext:value-type="float">
            <text:p>0,00080509259259259300</text:p>
          </table:table-cell>
          <table:table-cell table:formula="of:=[.D150]-[.D149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47" office:value-type="float" office:value="7003" calcext:value-type="float">
            <text:p>7003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0810532407407407" calcext:value-type="float">
            <text:p>0,00081053240740740700</text:p>
          </table:table-cell>
          <table:table-cell table:formula="of:=[.D151]-[.D150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47" office:value-type="float" office:value="7050" calcext:value-type="float">
            <text:p>705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0815972222222222" calcext:value-type="float">
            <text:p>0,00081597222222222200</text:p>
          </table:table-cell>
          <table:table-cell table:formula="of:=[.D152]-[.D151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47" office:value-type="float" office:value="7097" calcext:value-type="float">
            <text:p>7097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0821412037037037" calcext:value-type="float">
            <text:p>0,00082141203703703700</text:p>
          </table:table-cell>
          <table:table-cell table:formula="of:=[.D153]-[.D152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47" office:value-type="float" office:value="7144" calcext:value-type="float">
            <text:p>7144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0826851851851852" calcext:value-type="float">
            <text:p>0,00082685185185185200</text:p>
          </table:table-cell>
          <table:table-cell table:formula="of:=[.D154]-[.D153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47" office:value-type="float" office:value="7191" calcext:value-type="float">
            <text:p>7191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0832291666666667" calcext:value-type="float">
            <text:p>0,00083229166666666700</text:p>
          </table:table-cell>
          <table:table-cell table:formula="of:=[.D155]-[.D154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47" office:value-type="float" office:value="7238" calcext:value-type="float">
            <text:p>7238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0837731481481482" calcext:value-type="float">
            <text:p>0,00083773148148148100</text:p>
          </table:table-cell>
          <table:table-cell table:formula="of:=[.D156]-[.D155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47" office:value-type="float" office:value="7285" calcext:value-type="float">
            <text:p>7285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0843171296296296" calcext:value-type="float">
            <text:p>0,00084317129629629600</text:p>
          </table:table-cell>
          <table:table-cell table:formula="of:=[.D157]-[.D156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47" office:value-type="float" office:value="7332" calcext:value-type="float">
            <text:p>7332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0848611111111111" calcext:value-type="float">
            <text:p>0,00084861111111111100</text:p>
          </table:table-cell>
          <table:table-cell table:formula="of:=[.D158]-[.D157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47" office:value-type="float" office:value="7379" calcext:value-type="float">
            <text:p>7379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0854050925925926" calcext:value-type="float">
            <text:p>0,00085405092592592600</text:p>
          </table:table-cell>
          <table:table-cell table:formula="of:=[.D159]-[.D158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47" office:value-type="float" office:value="7426" calcext:value-type="float">
            <text:p>7426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0859490740740741" calcext:value-type="float">
            <text:p>0,00085949074074074100</text:p>
          </table:table-cell>
          <table:table-cell table:formula="of:=[.D160]-[.D159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47" office:value-type="float" office:value="7473" calcext:value-type="float">
            <text:p>7473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0864930555555556" calcext:value-type="float">
            <text:p>0,00086493055555555600</text:p>
          </table:table-cell>
          <table:table-cell table:formula="of:=[.D161]-[.D160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47" office:value-type="float" office:value="7520" calcext:value-type="float">
            <text:p>752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087037037037037" calcext:value-type="float">
            <text:p>0,00087037037037037000</text:p>
          </table:table-cell>
          <table:table-cell table:formula="of:=[.D162]-[.D161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47" office:value-type="float" office:value="7567" calcext:value-type="float">
            <text:p>7567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0875810185185185" calcext:value-type="float">
            <text:p>0,00087581018518518500</text:p>
          </table:table-cell>
          <table:table-cell table:formula="of:=[.D163]-[.D162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47" office:value-type="float" office:value="7614" calcext:value-type="float">
            <text:p>7614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088125" calcext:value-type="float">
            <text:p>0,00088125000000000000</text:p>
          </table:table-cell>
          <table:table-cell table:formula="of:=[.D164]-[.D163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47" office:value-type="float" office:value="7661" calcext:value-type="float">
            <text:p>7661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0886689814814815" calcext:value-type="float">
            <text:p>0,00088668981481481500</text:p>
          </table:table-cell>
          <table:table-cell table:formula="of:=[.D165]-[.D164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47" office:value-type="float" office:value="7708" calcext:value-type="float">
            <text:p>7708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089212962962963" calcext:value-type="float">
            <text:p>0,00089212962962963000</text:p>
          </table:table-cell>
          <table:table-cell table:formula="of:=[.D166]-[.D165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47" office:value-type="float" office:value="7755" calcext:value-type="float">
            <text:p>7755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0897569444444444" calcext:value-type="float">
            <text:p>0,00089756944444444400</text:p>
          </table:table-cell>
          <table:table-cell table:formula="of:=[.D167]-[.D166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47" office:value-type="float" office:value="7802" calcext:value-type="float">
            <text:p>7802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0903009259259259" calcext:value-type="float">
            <text:p>0,00090300925925925900</text:p>
          </table:table-cell>
          <table:table-cell table:formula="of:=[.D168]-[.D167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47" office:value-type="float" office:value="7849" calcext:value-type="float">
            <text:p>7849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0908449074074074" calcext:value-type="float">
            <text:p>0,00090844907407407400</text:p>
          </table:table-cell>
          <table:table-cell table:formula="of:=[.D169]-[.D168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47" office:value-type="float" office:value="7896" calcext:value-type="float">
            <text:p>7896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0913888888888889" calcext:value-type="float">
            <text:p>0,00091388888888888900</text:p>
          </table:table-cell>
          <table:table-cell table:formula="of:=[.D170]-[.D169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47" office:value-type="float" office:value="7943" calcext:value-type="float">
            <text:p>7943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0919328703703704" calcext:value-type="float">
            <text:p>0,00091932870370370400</text:p>
          </table:table-cell>
          <table:table-cell table:formula="of:=[.D171]-[.D170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47" office:value-type="float" office:value="7990" calcext:value-type="float">
            <text:p>799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0924768518518519" calcext:value-type="float">
            <text:p>0,00092476851851851900</text:p>
          </table:table-cell>
          <table:table-cell table:formula="of:=[.D172]-[.D171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47" office:value-type="float" office:value="8037" calcext:value-type="float">
            <text:p>8037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0930208333333333" calcext:value-type="float">
            <text:p>0,00093020833333333300</text:p>
          </table:table-cell>
          <table:table-cell table:formula="of:=[.D173]-[.D172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47" office:value-type="float" office:value="8084" calcext:value-type="float">
            <text:p>8084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0935648148148148" calcext:value-type="float">
            <text:p>0,00093564814814814800</text:p>
          </table:table-cell>
          <table:table-cell table:formula="of:=[.D174]-[.D173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47" office:value-type="float" office:value="8131" calcext:value-type="float">
            <text:p>8131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0941087962962963" calcext:value-type="float">
            <text:p>0,00094108796296296300</text:p>
          </table:table-cell>
          <table:table-cell table:formula="of:=[.D175]-[.D174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47" office:value-type="float" office:value="8178" calcext:value-type="float">
            <text:p>8178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0946527777777778" calcext:value-type="float">
            <text:p>0,00094652777777777800</text:p>
          </table:table-cell>
          <table:table-cell table:formula="of:=[.D176]-[.D175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47" office:value-type="float" office:value="8225" calcext:value-type="float">
            <text:p>8225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0951967592592593" calcext:value-type="float">
            <text:p>0,00095196759259259300</text:p>
          </table:table-cell>
          <table:table-cell table:formula="of:=[.D177]-[.D176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47" office:value-type="float" office:value="8272" calcext:value-type="float">
            <text:p>8272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0957407407407407" calcext:value-type="float">
            <text:p>0,00095740740740740700</text:p>
          </table:table-cell>
          <table:table-cell table:formula="of:=[.D178]-[.D177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47" office:value-type="float" office:value="8319" calcext:value-type="float">
            <text:p>8319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0962847222222222" calcext:value-type="float">
            <text:p>0,00096284722222222200</text:p>
          </table:table-cell>
          <table:table-cell table:formula="of:=[.D179]-[.D178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47" office:value-type="float" office:value="8366" calcext:value-type="float">
            <text:p>8366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0968287037037037" calcext:value-type="float">
            <text:p>0,00096828703703703700</text:p>
          </table:table-cell>
          <table:table-cell table:formula="of:=[.D180]-[.D179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47" office:value-type="float" office:value="8413" calcext:value-type="float">
            <text:p>8413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0973726851851852" calcext:value-type="float">
            <text:p>0,00097372685185185200</text:p>
          </table:table-cell>
          <table:table-cell table:formula="of:=[.D181]-[.D180]" office:value-type="float" office:value="0.00000543981481481478" calcext:value-type="float">
            <text:p>0,00000543981481481478</text:p>
          </table:table-cell>
          <table:table-cell table:number-columns-repeated="16379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47" office:value-type="float" office:value="8460" calcext:value-type="float">
            <text:p>846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0979166666666667" calcext:value-type="float">
            <text:p>0,00097916666666666700</text:p>
          </table:table-cell>
          <table:table-cell table:formula="of:=[.D182]-[.D181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47" office:value-type="float" office:value="8507" calcext:value-type="float">
            <text:p>8507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0984606481481482" calcext:value-type="float">
            <text:p>0,00098460648148148200</text:p>
          </table:table-cell>
          <table:table-cell table:formula="of:=[.D183]-[.D182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47" office:value-type="float" office:value="8554" calcext:value-type="float">
            <text:p>8554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0990046296296296" calcext:value-type="float">
            <text:p>0,00099004629629629600</text:p>
          </table:table-cell>
          <table:table-cell table:formula="of:=[.D184]-[.D183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47" office:value-type="float" office:value="8601" calcext:value-type="float">
            <text:p>8601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0995486111111111" calcext:value-type="float">
            <text:p>0,00099548611111111100</text:p>
          </table:table-cell>
          <table:table-cell table:formula="of:=[.D185]-[.D184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47" office:value-type="float" office:value="8648" calcext:value-type="float">
            <text:p>8648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100092592592593" calcext:value-type="float">
            <text:p>0,00100092592592593000</text:p>
          </table:table-cell>
          <table:table-cell table:formula="of:=[.D186]-[.D185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47" office:value-type="float" office:value="8695" calcext:value-type="float">
            <text:p>8695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100636574074074" calcext:value-type="float">
            <text:p>0,00100636574074074000</text:p>
          </table:table-cell>
          <table:table-cell table:formula="of:=[.D187]-[.D186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47" office:value-type="float" office:value="8742" calcext:value-type="float">
            <text:p>8742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101180555555556" calcext:value-type="float">
            <text:p>0,00101180555555556000</text:p>
          </table:table-cell>
          <table:table-cell table:formula="of:=[.D188]-[.D187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47" office:value-type="float" office:value="8789" calcext:value-type="float">
            <text:p>8789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101724537037037" calcext:value-type="float">
            <text:p>0,00101724537037037000</text:p>
          </table:table-cell>
          <table:table-cell table:formula="of:=[.D189]-[.D188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47" office:value-type="float" office:value="8836" calcext:value-type="float">
            <text:p>8836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102268518518519" calcext:value-type="float">
            <text:p>0,00102268518518519000</text:p>
          </table:table-cell>
          <table:table-cell table:formula="of:=[.D190]-[.D189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47" office:value-type="float" office:value="8883" calcext:value-type="float">
            <text:p>8883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1028125" calcext:value-type="float">
            <text:p>0,00102812500000000000</text:p>
          </table:table-cell>
          <table:table-cell table:formula="of:=[.D191]-[.D190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47" office:value-type="float" office:value="8930" calcext:value-type="float">
            <text:p>893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103356481481481" calcext:value-type="float">
            <text:p>0,00103356481481481000</text:p>
          </table:table-cell>
          <table:table-cell table:formula="of:=[.D192]-[.D191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47" office:value-type="float" office:value="8977" calcext:value-type="float">
            <text:p>8977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103900462962963" calcext:value-type="float">
            <text:p>0,00103900462962963000</text:p>
          </table:table-cell>
          <table:table-cell table:formula="of:=[.D193]-[.D192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47" office:value-type="float" office:value="9024" calcext:value-type="float">
            <text:p>9024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104444444444444" calcext:value-type="float">
            <text:p>0,00104444444444444000</text:p>
          </table:table-cell>
          <table:table-cell table:formula="of:=[.D194]-[.D193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47" office:value-type="float" office:value="9071" calcext:value-type="float">
            <text:p>9071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104988425925926" calcext:value-type="float">
            <text:p>0,00104988425925926000</text:p>
          </table:table-cell>
          <table:table-cell table:formula="of:=[.D195]-[.D194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47" office:value-type="float" office:value="9118" calcext:value-type="float">
            <text:p>9118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105532407407407" calcext:value-type="float">
            <text:p>0,00105532407407407000</text:p>
          </table:table-cell>
          <table:table-cell table:formula="of:=[.D196]-[.D195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47" office:value-type="float" office:value="9165" calcext:value-type="float">
            <text:p>9165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106076388888889" calcext:value-type="float">
            <text:p>0,00106076388888889000</text:p>
          </table:table-cell>
          <table:table-cell table:formula="of:=[.D197]-[.D196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47" office:value-type="float" office:value="9212" calcext:value-type="float">
            <text:p>9212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10662037037037" calcext:value-type="float">
            <text:p>0,00106620370370370000</text:p>
          </table:table-cell>
          <table:table-cell table:formula="of:=[.D198]-[.D197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47" office:value-type="float" office:value="9259" calcext:value-type="float">
            <text:p>9259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107164351851852" calcext:value-type="float">
            <text:p>0,00107164351851852000</text:p>
          </table:table-cell>
          <table:table-cell table:formula="of:=[.D199]-[.D198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47" office:value-type="float" office:value="9306" calcext:value-type="float">
            <text:p>9306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107708333333333" calcext:value-type="float">
            <text:p>0,00107708333333333000</text:p>
          </table:table-cell>
          <table:table-cell table:formula="of:=[.D200]-[.D199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47" office:value-type="float" office:value="9353" calcext:value-type="float">
            <text:p>9353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108252314814815" calcext:value-type="float">
            <text:p>0,00108252314814815000</text:p>
          </table:table-cell>
          <table:table-cell table:formula="of:=[.D201]-[.D200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47" office:value-type="float" office:value="9400" calcext:value-type="float">
            <text:p>94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108796296296296" calcext:value-type="float">
            <text:p>0,00108796296296296000</text:p>
          </table:table-cell>
          <table:table-cell table:formula="of:=[.D202]-[.D201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47" office:value-type="float" office:value="9447" calcext:value-type="float">
            <text:p>9447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109340277777778" calcext:value-type="float">
            <text:p>0,00109340277777778000</text:p>
          </table:table-cell>
          <table:table-cell table:formula="of:=[.D203]-[.D202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47" office:value-type="float" office:value="9494" calcext:value-type="float">
            <text:p>9494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109884259259259" calcext:value-type="float">
            <text:p>0,00109884259259259000</text:p>
          </table:table-cell>
          <table:table-cell table:formula="of:=[.D204]-[.D203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47" office:value-type="float" office:value="9541" calcext:value-type="float">
            <text:p>9541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110428240740741" calcext:value-type="float">
            <text:p>0,00110428240740741000</text:p>
          </table:table-cell>
          <table:table-cell table:formula="of:=[.D205]-[.D204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47" office:value-type="float" office:value="9588" calcext:value-type="float">
            <text:p>9588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110972222222222" calcext:value-type="float">
            <text:p>0,00110972222222222000</text:p>
          </table:table-cell>
          <table:table-cell table:formula="of:=[.D206]-[.D205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47" office:value-type="float" office:value="9635" calcext:value-type="float">
            <text:p>9635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111516203703704" calcext:value-type="float">
            <text:p>0,00111516203703704000</text:p>
          </table:table-cell>
          <table:table-cell table:formula="of:=[.D207]-[.D206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47" office:value-type="float" office:value="9682" calcext:value-type="float">
            <text:p>9682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112060185185185" calcext:value-type="float">
            <text:p>0,00112060185185185000</text:p>
          </table:table-cell>
          <table:table-cell table:formula="of:=[.D208]-[.D207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47" office:value-type="float" office:value="9729" calcext:value-type="float">
            <text:p>9729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112604166666667" calcext:value-type="float">
            <text:p>0,00112604166666667000</text:p>
          </table:table-cell>
          <table:table-cell table:formula="of:=[.D209]-[.D208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47" office:value-type="float" office:value="9776" calcext:value-type="float">
            <text:p>9776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113148148148148" calcext:value-type="float">
            <text:p>0,00113148148148148000</text:p>
          </table:table-cell>
          <table:table-cell table:formula="of:=[.D210]-[.D209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47" office:value-type="float" office:value="9823" calcext:value-type="float">
            <text:p>9823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11369212962963" calcext:value-type="float">
            <text:p>0,00113692129629630000</text:p>
          </table:table-cell>
          <table:table-cell table:formula="of:=[.D211]-[.D210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47" office:value-type="float" office:value="9870" calcext:value-type="float">
            <text:p>987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114236111111111" calcext:value-type="float">
            <text:p>0,00114236111111111000</text:p>
          </table:table-cell>
          <table:table-cell table:formula="of:=[.D212]-[.D211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47" office:value-type="float" office:value="9917" calcext:value-type="float">
            <text:p>9917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114780092592593" calcext:value-type="float">
            <text:p>0,00114780092592593000</text:p>
          </table:table-cell>
          <table:table-cell table:formula="of:=[.D213]-[.D212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47" office:value-type="float" office:value="9964" calcext:value-type="float">
            <text:p>9964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115324074074074" calcext:value-type="float">
            <text:p>0,00115324074074074000</text:p>
          </table:table-cell>
          <table:table-cell table:formula="of:=[.D214]-[.D213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47" office:value-type="float" office:value="10011" calcext:value-type="float">
            <text:p>10011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115868055555556" calcext:value-type="float">
            <text:p>0,00115868055555556000</text:p>
          </table:table-cell>
          <table:table-cell table:formula="of:=[.D215]-[.D214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47" office:value-type="float" office:value="10058" calcext:value-type="float">
            <text:p>10058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116412037037037" calcext:value-type="float">
            <text:p>0,00116412037037037000</text:p>
          </table:table-cell>
          <table:table-cell table:formula="of:=[.D216]-[.D215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47" office:value-type="float" office:value="10105" calcext:value-type="float">
            <text:p>10105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116956018518519" calcext:value-type="float">
            <text:p>0,00116956018518519000</text:p>
          </table:table-cell>
          <table:table-cell table:formula="of:=[.D217]-[.D216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47" office:value-type="float" office:value="10152" calcext:value-type="float">
            <text:p>10152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1175" calcext:value-type="float">
            <text:p>0,00117500000000000000</text:p>
          </table:table-cell>
          <table:table-cell table:formula="of:=[.D218]-[.D217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47" office:value-type="float" office:value="10199" calcext:value-type="float">
            <text:p>10199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118043981481481" calcext:value-type="float">
            <text:p>0,00118043981481481000</text:p>
          </table:table-cell>
          <table:table-cell table:formula="of:=[.D219]-[.D218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47" office:value-type="float" office:value="10246" calcext:value-type="float">
            <text:p>10246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118587962962963" calcext:value-type="float">
            <text:p>0,00118587962962963000</text:p>
          </table:table-cell>
          <table:table-cell table:formula="of:=[.D220]-[.D219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47" office:value-type="float" office:value="10293" calcext:value-type="float">
            <text:p>10293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119131944444444" calcext:value-type="float">
            <text:p>0,00119131944444444000</text:p>
          </table:table-cell>
          <table:table-cell table:formula="of:=[.D221]-[.D220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47" office:value-type="float" office:value="10340" calcext:value-type="float">
            <text:p>1034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119675925925926" calcext:value-type="float">
            <text:p>0,00119675925925926000</text:p>
          </table:table-cell>
          <table:table-cell table:formula="of:=[.D222]-[.D221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47" office:value-type="float" office:value="10387" calcext:value-type="float">
            <text:p>10387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120219907407407" calcext:value-type="float">
            <text:p>0,00120219907407407000</text:p>
          </table:table-cell>
          <table:table-cell table:formula="of:=[.D223]-[.D222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47" office:value-type="float" office:value="10434" calcext:value-type="float">
            <text:p>10434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120763888888889" calcext:value-type="float">
            <text:p>0,00120763888888889000</text:p>
          </table:table-cell>
          <table:table-cell table:formula="of:=[.D224]-[.D223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47" office:value-type="float" office:value="10481" calcext:value-type="float">
            <text:p>10481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12130787037037" calcext:value-type="float">
            <text:p>0,00121307870370370000</text:p>
          </table:table-cell>
          <table:table-cell table:formula="of:=[.D225]-[.D224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47" office:value-type="float" office:value="10528" calcext:value-type="float">
            <text:p>10528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121851851851852" calcext:value-type="float">
            <text:p>0,00121851851851852000</text:p>
          </table:table-cell>
          <table:table-cell table:formula="of:=[.D226]-[.D225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47" office:value-type="float" office:value="10575" calcext:value-type="float">
            <text:p>10575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122395833333333" calcext:value-type="float">
            <text:p>0,00122395833333333000</text:p>
          </table:table-cell>
          <table:table-cell table:formula="of:=[.D227]-[.D226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47" office:value-type="float" office:value="10622" calcext:value-type="float">
            <text:p>10622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122939814814815" calcext:value-type="float">
            <text:p>0,00122939814814815000</text:p>
          </table:table-cell>
          <table:table-cell table:formula="of:=[.D228]-[.D227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47" office:value-type="float" office:value="10669" calcext:value-type="float">
            <text:p>10669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123483796296296" calcext:value-type="float">
            <text:p>0,00123483796296296000</text:p>
          </table:table-cell>
          <table:table-cell table:formula="of:=[.D229]-[.D228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47" office:value-type="float" office:value="10716" calcext:value-type="float">
            <text:p>10716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124027777777778" calcext:value-type="float">
            <text:p>0,00124027777777778000</text:p>
          </table:table-cell>
          <table:table-cell table:formula="of:=[.D230]-[.D229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47" office:value-type="float" office:value="10763" calcext:value-type="float">
            <text:p>10763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124571759259259" calcext:value-type="float">
            <text:p>0,00124571759259259000</text:p>
          </table:table-cell>
          <table:table-cell table:formula="of:=[.D231]-[.D230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47" office:value-type="float" office:value="10810" calcext:value-type="float">
            <text:p>1081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125115740740741" calcext:value-type="float">
            <text:p>0,00125115740740741000</text:p>
          </table:table-cell>
          <table:table-cell table:formula="of:=[.D232]-[.D231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47" office:value-type="float" office:value="10857" calcext:value-type="float">
            <text:p>10857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125659722222222" calcext:value-type="float">
            <text:p>0,00125659722222222000</text:p>
          </table:table-cell>
          <table:table-cell table:formula="of:=[.D233]-[.D232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47" office:value-type="float" office:value="10904" calcext:value-type="float">
            <text:p>10904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126203703703704" calcext:value-type="float">
            <text:p>0,00126203703703704000</text:p>
          </table:table-cell>
          <table:table-cell table:formula="of:=[.D234]-[.D233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47" office:value-type="float" office:value="10951" calcext:value-type="float">
            <text:p>10951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126747685185185" calcext:value-type="float">
            <text:p>0,00126747685185185000</text:p>
          </table:table-cell>
          <table:table-cell table:formula="of:=[.D235]-[.D234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47" office:value-type="float" office:value="10998" calcext:value-type="float">
            <text:p>10998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127291666666667" calcext:value-type="float">
            <text:p>0,00127291666666667000</text:p>
          </table:table-cell>
          <table:table-cell table:formula="of:=[.D236]-[.D235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47" office:value-type="float" office:value="11045" calcext:value-type="float">
            <text:p>11045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127835648148148" calcext:value-type="float">
            <text:p>0,00127835648148148000</text:p>
          </table:table-cell>
          <table:table-cell table:formula="of:=[.D237]-[.D236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47" office:value-type="float" office:value="11092" calcext:value-type="float">
            <text:p>11092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12837962962963" calcext:value-type="float">
            <text:p>0,00128379629629630000</text:p>
          </table:table-cell>
          <table:table-cell table:formula="of:=[.D238]-[.D237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47" office:value-type="float" office:value="11139" calcext:value-type="float">
            <text:p>11139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128923611111111" calcext:value-type="float">
            <text:p>0,00128923611111111000</text:p>
          </table:table-cell>
          <table:table-cell table:formula="of:=[.D239]-[.D238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47" office:value-type="float" office:value="11186" calcext:value-type="float">
            <text:p>11186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129467592592593" calcext:value-type="float">
            <text:p>0,00129467592592593000</text:p>
          </table:table-cell>
          <table:table-cell table:formula="of:=[.D240]-[.D239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47" office:value-type="float" office:value="11233" calcext:value-type="float">
            <text:p>11233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130011574074074" calcext:value-type="float">
            <text:p>0,00130011574074074000</text:p>
          </table:table-cell>
          <table:table-cell table:formula="of:=[.D241]-[.D240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47" office:value-type="float" office:value="11280" calcext:value-type="float">
            <text:p>1128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130555555555556" calcext:value-type="float">
            <text:p>0,00130555555555556000</text:p>
          </table:table-cell>
          <table:table-cell table:formula="of:=[.D242]-[.D241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47" office:value-type="float" office:value="11327" calcext:value-type="float">
            <text:p>11327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131099537037037" calcext:value-type="float">
            <text:p>0,00131099537037037000</text:p>
          </table:table-cell>
          <table:table-cell table:formula="of:=[.D243]-[.D242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47" office:value-type="float" office:value="11374" calcext:value-type="float">
            <text:p>11374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131643518518519" calcext:value-type="float">
            <text:p>0,00131643518518519000</text:p>
          </table:table-cell>
          <table:table-cell table:formula="of:=[.D244]-[.D243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47" office:value-type="float" office:value="11421" calcext:value-type="float">
            <text:p>11421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1321875" calcext:value-type="float">
            <text:p>0,00132187500000000000</text:p>
          </table:table-cell>
          <table:table-cell table:formula="of:=[.D245]-[.D244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47" office:value-type="float" office:value="11468" calcext:value-type="float">
            <text:p>11468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132731481481481" calcext:value-type="float">
            <text:p>0,00132731481481481000</text:p>
          </table:table-cell>
          <table:table-cell table:formula="of:=[.D246]-[.D245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47" office:value-type="float" office:value="11515" calcext:value-type="float">
            <text:p>11515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133275462962963" calcext:value-type="float">
            <text:p>0,00133275462962963000</text:p>
          </table:table-cell>
          <table:table-cell table:formula="of:=[.D247]-[.D246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47" office:value-type="float" office:value="11562" calcext:value-type="float">
            <text:p>11562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133819444444444" calcext:value-type="float">
            <text:p>0,00133819444444444000</text:p>
          </table:table-cell>
          <table:table-cell table:formula="of:=[.D248]-[.D247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47" office:value-type="float" office:value="11609" calcext:value-type="float">
            <text:p>11609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134363425925926" calcext:value-type="float">
            <text:p>0,00134363425925926000</text:p>
          </table:table-cell>
          <table:table-cell table:formula="of:=[.D249]-[.D248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47" office:value-type="float" office:value="11656" calcext:value-type="float">
            <text:p>11656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134907407407407" calcext:value-type="float">
            <text:p>0,00134907407407407000</text:p>
          </table:table-cell>
          <table:table-cell table:formula="of:=[.D250]-[.D249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47" office:value-type="float" office:value="11703" calcext:value-type="float">
            <text:p>11703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135451388888889" calcext:value-type="float">
            <text:p>0,00135451388888889000</text:p>
          </table:table-cell>
          <table:table-cell table:formula="of:=[.D251]-[.D250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47" office:value-type="float" office:value="11750" calcext:value-type="float">
            <text:p>1175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13599537037037" calcext:value-type="float">
            <text:p>0,00135995370370370000</text:p>
          </table:table-cell>
          <table:table-cell table:formula="of:=[.D252]-[.D251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47" office:value-type="float" office:value="11797" calcext:value-type="float">
            <text:p>11797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136539351851852" calcext:value-type="float">
            <text:p>0,00136539351851852000</text:p>
          </table:table-cell>
          <table:table-cell table:formula="of:=[.D253]-[.D252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47" office:value-type="float" office:value="11844" calcext:value-type="float">
            <text:p>11844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137083333333333" calcext:value-type="float">
            <text:p>0,00137083333333333000</text:p>
          </table:table-cell>
          <table:table-cell table:formula="of:=[.D254]-[.D253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47" office:value-type="float" office:value="11891" calcext:value-type="float">
            <text:p>11891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137627314814815" calcext:value-type="float">
            <text:p>0,00137627314814815000</text:p>
          </table:table-cell>
          <table:table-cell table:formula="of:=[.D255]-[.D254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47" office:value-type="float" office:value="11938" calcext:value-type="float">
            <text:p>11938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138171296296296" calcext:value-type="float">
            <text:p>0,00138171296296296000</text:p>
          </table:table-cell>
          <table:table-cell table:formula="of:=[.D256]-[.D255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47" office:value-type="float" office:value="11985" calcext:value-type="float">
            <text:p>11985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138715277777778" calcext:value-type="float">
            <text:p>0,00138715277777778000</text:p>
          </table:table-cell>
          <table:table-cell table:formula="of:=[.D257]-[.D256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47" office:value-type="float" office:value="12032" calcext:value-type="float">
            <text:p>12032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139259259259259" calcext:value-type="float">
            <text:p>0,00139259259259259000</text:p>
          </table:table-cell>
          <table:table-cell table:formula="of:=[.D258]-[.D257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47" office:value-type="float" office:value="12079" calcext:value-type="float">
            <text:p>12079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139803240740741" calcext:value-type="float">
            <text:p>0,00139803240740741000</text:p>
          </table:table-cell>
          <table:table-cell table:formula="of:=[.D259]-[.D258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47" office:value-type="float" office:value="12126" calcext:value-type="float">
            <text:p>12126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140347222222222" calcext:value-type="float">
            <text:p>0,00140347222222222000</text:p>
          </table:table-cell>
          <table:table-cell table:formula="of:=[.D260]-[.D259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47" office:value-type="float" office:value="12173" calcext:value-type="float">
            <text:p>12173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140891203703704" calcext:value-type="float">
            <text:p>0,00140891203703704000</text:p>
          </table:table-cell>
          <table:table-cell table:formula="of:=[.D261]-[.D260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47" office:value-type="float" office:value="12220" calcext:value-type="float">
            <text:p>1222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141435185185185" calcext:value-type="float">
            <text:p>0,00141435185185185000</text:p>
          </table:table-cell>
          <table:table-cell table:formula="of:=[.D262]-[.D261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47" office:value-type="float" office:value="12267" calcext:value-type="float">
            <text:p>12267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141979166666667" calcext:value-type="float">
            <text:p>0,00141979166666667000</text:p>
          </table:table-cell>
          <table:table-cell table:formula="of:=[.D263]-[.D262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47" office:value-type="float" office:value="12314" calcext:value-type="float">
            <text:p>12314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142523148148148" calcext:value-type="float">
            <text:p>0,00142523148148148000</text:p>
          </table:table-cell>
          <table:table-cell table:formula="of:=[.D264]-[.D263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47" office:value-type="float" office:value="12361" calcext:value-type="float">
            <text:p>12361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14306712962963" calcext:value-type="float">
            <text:p>0,00143067129629630000</text:p>
          </table:table-cell>
          <table:table-cell table:formula="of:=[.D265]-[.D264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47" office:value-type="float" office:value="12408" calcext:value-type="float">
            <text:p>12408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143611111111111" calcext:value-type="float">
            <text:p>0,00143611111111111000</text:p>
          </table:table-cell>
          <table:table-cell table:formula="of:=[.D266]-[.D265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47" office:value-type="float" office:value="12455" calcext:value-type="float">
            <text:p>12455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144155092592593" calcext:value-type="float">
            <text:p>0,00144155092592593000</text:p>
          </table:table-cell>
          <table:table-cell table:formula="of:=[.D267]-[.D266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47" office:value-type="float" office:value="12502" calcext:value-type="float">
            <text:p>12502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144699074074074" calcext:value-type="float">
            <text:p>0,00144699074074074000</text:p>
          </table:table-cell>
          <table:table-cell table:formula="of:=[.D268]-[.D267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47" office:value-type="float" office:value="12549" calcext:value-type="float">
            <text:p>12549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145243055555556" calcext:value-type="float">
            <text:p>0,00145243055555556000</text:p>
          </table:table-cell>
          <table:table-cell table:formula="of:=[.D269]-[.D268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47" office:value-type="float" office:value="12596" calcext:value-type="float">
            <text:p>12596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145787037037037" calcext:value-type="float">
            <text:p>0,00145787037037037000</text:p>
          </table:table-cell>
          <table:table-cell table:formula="of:=[.D270]-[.D269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47" office:value-type="float" office:value="12643" calcext:value-type="float">
            <text:p>12643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146331018518519" calcext:value-type="float">
            <text:p>0,00146331018518519000</text:p>
          </table:table-cell>
          <table:table-cell table:formula="of:=[.D271]-[.D270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47" office:value-type="float" office:value="12690" calcext:value-type="float">
            <text:p>1269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146875" calcext:value-type="float">
            <text:p>0,00146875000000000000</text:p>
          </table:table-cell>
          <table:table-cell table:formula="of:=[.D272]-[.D271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47" office:value-type="float" office:value="12737" calcext:value-type="float">
            <text:p>12737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147418981481482" calcext:value-type="float">
            <text:p>0,00147418981481482000</text:p>
          </table:table-cell>
          <table:table-cell table:formula="of:=[.D273]-[.D272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47" office:value-type="float" office:value="12784" calcext:value-type="float">
            <text:p>12784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147962962962963" calcext:value-type="float">
            <text:p>0,00147962962962963000</text:p>
          </table:table-cell>
          <table:table-cell table:formula="of:=[.D274]-[.D273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47" office:value-type="float" office:value="12831" calcext:value-type="float">
            <text:p>12831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148506944444444" calcext:value-type="float">
            <text:p>0,00148506944444444000</text:p>
          </table:table-cell>
          <table:table-cell table:formula="of:=[.D275]-[.D274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47" office:value-type="float" office:value="12878" calcext:value-type="float">
            <text:p>12878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149050925925926" calcext:value-type="float">
            <text:p>0,00149050925925926000</text:p>
          </table:table-cell>
          <table:table-cell table:formula="of:=[.D276]-[.D275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47" office:value-type="float" office:value="12925" calcext:value-type="float">
            <text:p>12925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149594907407407" calcext:value-type="float">
            <text:p>0,00149594907407407000</text:p>
          </table:table-cell>
          <table:table-cell table:formula="of:=[.D277]-[.D276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47" office:value-type="float" office:value="12972" calcext:value-type="float">
            <text:p>12972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150138888888889" calcext:value-type="float">
            <text:p>0,00150138888888889000</text:p>
          </table:table-cell>
          <table:table-cell table:formula="of:=[.D278]-[.D277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47" office:value-type="float" office:value="13019" calcext:value-type="float">
            <text:p>13019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15068287037037" calcext:value-type="float">
            <text:p>0,00150682870370370000</text:p>
          </table:table-cell>
          <table:table-cell table:formula="of:=[.D279]-[.D278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47" office:value-type="float" office:value="13066" calcext:value-type="float">
            <text:p>13066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151226851851852" calcext:value-type="float">
            <text:p>0,00151226851851852000</text:p>
          </table:table-cell>
          <table:table-cell table:formula="of:=[.D280]-[.D279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47" office:value-type="float" office:value="13113" calcext:value-type="float">
            <text:p>13113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151770833333333" calcext:value-type="float">
            <text:p>0,00151770833333333000</text:p>
          </table:table-cell>
          <table:table-cell table:formula="of:=[.D281]-[.D280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47" office:value-type="float" office:value="13160" calcext:value-type="float">
            <text:p>1316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152314814814815" calcext:value-type="float">
            <text:p>0,00152314814814815000</text:p>
          </table:table-cell>
          <table:table-cell table:formula="of:=[.D282]-[.D281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47" office:value-type="float" office:value="13207" calcext:value-type="float">
            <text:p>13207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152858796296296" calcext:value-type="float">
            <text:p>0,00152858796296296000</text:p>
          </table:table-cell>
          <table:table-cell table:formula="of:=[.D283]-[.D282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47" office:value-type="float" office:value="13254" calcext:value-type="float">
            <text:p>13254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153402777777778" calcext:value-type="float">
            <text:p>0,00153402777777778000</text:p>
          </table:table-cell>
          <table:table-cell table:formula="of:=[.D284]-[.D283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47" office:value-type="float" office:value="13301" calcext:value-type="float">
            <text:p>13301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153946759259259" calcext:value-type="float">
            <text:p>0,00153946759259259000</text:p>
          </table:table-cell>
          <table:table-cell table:formula="of:=[.D285]-[.D284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47" office:value-type="float" office:value="13348" calcext:value-type="float">
            <text:p>13348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154490740740741" calcext:value-type="float">
            <text:p>0,00154490740740741000</text:p>
          </table:table-cell>
          <table:table-cell table:formula="of:=[.D286]-[.D285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47" office:value-type="float" office:value="13395" calcext:value-type="float">
            <text:p>13395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155034722222222" calcext:value-type="float">
            <text:p>0,00155034722222222000</text:p>
          </table:table-cell>
          <table:table-cell table:formula="of:=[.D287]-[.D286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47" office:value-type="float" office:value="13442" calcext:value-type="float">
            <text:p>13442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155578703703704" calcext:value-type="float">
            <text:p>0,00155578703703704000</text:p>
          </table:table-cell>
          <table:table-cell table:formula="of:=[.D288]-[.D287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47" office:value-type="float" office:value="13489" calcext:value-type="float">
            <text:p>13489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156122685185185" calcext:value-type="float">
            <text:p>0,00156122685185185000</text:p>
          </table:table-cell>
          <table:table-cell table:formula="of:=[.D289]-[.D288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47" office:value-type="float" office:value="13536" calcext:value-type="float">
            <text:p>13536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156666666666667" calcext:value-type="float">
            <text:p>0,00156666666666667000</text:p>
          </table:table-cell>
          <table:table-cell table:formula="of:=[.D290]-[.D289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47" office:value-type="float" office:value="13583" calcext:value-type="float">
            <text:p>13583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157210648148148" calcext:value-type="float">
            <text:p>0,00157210648148148000</text:p>
          </table:table-cell>
          <table:table-cell table:formula="of:=[.D291]-[.D290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47" office:value-type="float" office:value="13630" calcext:value-type="float">
            <text:p>1363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15775462962963" calcext:value-type="float">
            <text:p>0,00157754629629630000</text:p>
          </table:table-cell>
          <table:table-cell table:formula="of:=[.D292]-[.D291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47" office:value-type="float" office:value="13677" calcext:value-type="float">
            <text:p>13677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158298611111111" calcext:value-type="float">
            <text:p>0,00158298611111111000</text:p>
          </table:table-cell>
          <table:table-cell table:formula="of:=[.D293]-[.D292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47" office:value-type="float" office:value="13724" calcext:value-type="float">
            <text:p>13724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158842592592593" calcext:value-type="float">
            <text:p>0,00158842592592593000</text:p>
          </table:table-cell>
          <table:table-cell table:formula="of:=[.D294]-[.D293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47" office:value-type="float" office:value="13771" calcext:value-type="float">
            <text:p>13771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159386574074074" calcext:value-type="float">
            <text:p>0,00159386574074074000</text:p>
          </table:table-cell>
          <table:table-cell table:formula="of:=[.D295]-[.D294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47" office:value-type="float" office:value="13818" calcext:value-type="float">
            <text:p>13818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159930555555556" calcext:value-type="float">
            <text:p>0,00159930555555556000</text:p>
          </table:table-cell>
          <table:table-cell table:formula="of:=[.D296]-[.D295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47" office:value-type="float" office:value="13865" calcext:value-type="float">
            <text:p>13865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160474537037037" calcext:value-type="float">
            <text:p>0,00160474537037037000</text:p>
          </table:table-cell>
          <table:table-cell table:formula="of:=[.D297]-[.D296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47" office:value-type="float" office:value="13912" calcext:value-type="float">
            <text:p>13912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161018518518519" calcext:value-type="float">
            <text:p>0,00161018518518519000</text:p>
          </table:table-cell>
          <table:table-cell table:formula="of:=[.D298]-[.D297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47" office:value-type="float" office:value="13959" calcext:value-type="float">
            <text:p>13959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1615625" calcext:value-type="float">
            <text:p>0,00161562500000000000</text:p>
          </table:table-cell>
          <table:table-cell table:formula="of:=[.D299]-[.D298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47" office:value-type="float" office:value="14006" calcext:value-type="float">
            <text:p>14006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162106481481481" calcext:value-type="float">
            <text:p>0,00162106481481481000</text:p>
          </table:table-cell>
          <table:table-cell table:formula="of:=[.D300]-[.D299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47" office:value-type="float" office:value="14053" calcext:value-type="float">
            <text:p>14053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162650462962963" calcext:value-type="float">
            <text:p>0,00162650462962963000</text:p>
          </table:table-cell>
          <table:table-cell table:formula="of:=[.D301]-[.D300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47" office:value-type="float" office:value="14100" calcext:value-type="float">
            <text:p>141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163194444444444" calcext:value-type="float">
            <text:p>0,00163194444444444000</text:p>
          </table:table-cell>
          <table:table-cell table:formula="of:=[.D302]-[.D301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47" office:value-type="float" office:value="14147" calcext:value-type="float">
            <text:p>14147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163738425925926" calcext:value-type="float">
            <text:p>0,00163738425925926000</text:p>
          </table:table-cell>
          <table:table-cell table:formula="of:=[.D303]-[.D302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47" office:value-type="float" office:value="14194" calcext:value-type="float">
            <text:p>14194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164282407407407" calcext:value-type="float">
            <text:p>0,00164282407407407000</text:p>
          </table:table-cell>
          <table:table-cell table:formula="of:=[.D304]-[.D303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47" office:value-type="float" office:value="14241" calcext:value-type="float">
            <text:p>14241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164826388888889" calcext:value-type="float">
            <text:p>0,00164826388888889000</text:p>
          </table:table-cell>
          <table:table-cell table:formula="of:=[.D305]-[.D304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47" office:value-type="float" office:value="14288" calcext:value-type="float">
            <text:p>14288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16537037037037" calcext:value-type="float">
            <text:p>0,00165370370370370000</text:p>
          </table:table-cell>
          <table:table-cell table:formula="of:=[.D306]-[.D305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47" office:value-type="float" office:value="14335" calcext:value-type="float">
            <text:p>14335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165914351851852" calcext:value-type="float">
            <text:p>0,00165914351851852000</text:p>
          </table:table-cell>
          <table:table-cell table:formula="of:=[.D307]-[.D306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47" office:value-type="float" office:value="14382" calcext:value-type="float">
            <text:p>14382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166458333333333" calcext:value-type="float">
            <text:p>0,00166458333333333000</text:p>
          </table:table-cell>
          <table:table-cell table:formula="of:=[.D308]-[.D307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47" office:value-type="float" office:value="14429" calcext:value-type="float">
            <text:p>14429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167002314814815" calcext:value-type="float">
            <text:p>0,00167002314814815000</text:p>
          </table:table-cell>
          <table:table-cell table:formula="of:=[.D309]-[.D308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47" office:value-type="float" office:value="14476" calcext:value-type="float">
            <text:p>14476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167546296296296" calcext:value-type="float">
            <text:p>0,00167546296296296000</text:p>
          </table:table-cell>
          <table:table-cell table:formula="of:=[.D310]-[.D309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47" office:value-type="float" office:value="14523" calcext:value-type="float">
            <text:p>14523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168090277777778" calcext:value-type="float">
            <text:p>0,00168090277777778000</text:p>
          </table:table-cell>
          <table:table-cell table:formula="of:=[.D311]-[.D310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47" office:value-type="float" office:value="14570" calcext:value-type="float">
            <text:p>1457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168634259259259" calcext:value-type="float">
            <text:p>0,00168634259259259000</text:p>
          </table:table-cell>
          <table:table-cell table:formula="of:=[.D312]-[.D311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47" office:value-type="float" office:value="14617" calcext:value-type="float">
            <text:p>14617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169178240740741" calcext:value-type="float">
            <text:p>0,00169178240740741000</text:p>
          </table:table-cell>
          <table:table-cell table:formula="of:=[.D313]-[.D312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47" office:value-type="float" office:value="14664" calcext:value-type="float">
            <text:p>14664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169722222222222" calcext:value-type="float">
            <text:p>0,00169722222222222000</text:p>
          </table:table-cell>
          <table:table-cell table:formula="of:=[.D314]-[.D313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47" office:value-type="float" office:value="14711" calcext:value-type="float">
            <text:p>14711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170266203703704" calcext:value-type="float">
            <text:p>0,00170266203703704000</text:p>
          </table:table-cell>
          <table:table-cell table:formula="of:=[.D315]-[.D314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47" office:value-type="float" office:value="14758" calcext:value-type="float">
            <text:p>14758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170810185185185" calcext:value-type="float">
            <text:p>0,00170810185185185000</text:p>
          </table:table-cell>
          <table:table-cell table:formula="of:=[.D316]-[.D315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47" office:value-type="float" office:value="14805" calcext:value-type="float">
            <text:p>14805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171354166666667" calcext:value-type="float">
            <text:p>0,00171354166666667000</text:p>
          </table:table-cell>
          <table:table-cell table:formula="of:=[.D317]-[.D316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47" office:value-type="float" office:value="14852" calcext:value-type="float">
            <text:p>14852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171898148148148" calcext:value-type="float">
            <text:p>0,00171898148148148000</text:p>
          </table:table-cell>
          <table:table-cell table:formula="of:=[.D318]-[.D317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47" office:value-type="float" office:value="14899" calcext:value-type="float">
            <text:p>14899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17244212962963" calcext:value-type="float">
            <text:p>0,00172442129629630000</text:p>
          </table:table-cell>
          <table:table-cell table:formula="of:=[.D319]-[.D318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47" office:value-type="float" office:value="14946" calcext:value-type="float">
            <text:p>14946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172986111111111" calcext:value-type="float">
            <text:p>0,00172986111111111000</text:p>
          </table:table-cell>
          <table:table-cell table:formula="of:=[.D320]-[.D319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47" office:value-type="float" office:value="14993" calcext:value-type="float">
            <text:p>14993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173530092592593" calcext:value-type="float">
            <text:p>0,00173530092592593000</text:p>
          </table:table-cell>
          <table:table-cell table:formula="of:=[.D321]-[.D320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47" office:value-type="float" office:value="15040" calcext:value-type="float">
            <text:p>1504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174074074074074" calcext:value-type="float">
            <text:p>0,00174074074074074000</text:p>
          </table:table-cell>
          <table:table-cell table:formula="of:=[.D322]-[.D321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47" office:value-type="float" office:value="15087" calcext:value-type="float">
            <text:p>15087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174618055555556" calcext:value-type="float">
            <text:p>0,00174618055555556000</text:p>
          </table:table-cell>
          <table:table-cell table:formula="of:=[.D323]-[.D322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47" office:value-type="float" office:value="15134" calcext:value-type="float">
            <text:p>15134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175162037037037" calcext:value-type="float">
            <text:p>0,00175162037037037000</text:p>
          </table:table-cell>
          <table:table-cell table:formula="of:=[.D324]-[.D323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47" office:value-type="float" office:value="15181" calcext:value-type="float">
            <text:p>15181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175706018518519" calcext:value-type="float">
            <text:p>0,00175706018518519000</text:p>
          </table:table-cell>
          <table:table-cell table:formula="of:=[.D325]-[.D324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47" office:value-type="float" office:value="15228" calcext:value-type="float">
            <text:p>15228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17625" calcext:value-type="float">
            <text:p>0,00176250000000000000</text:p>
          </table:table-cell>
          <table:table-cell table:formula="of:=[.D326]-[.D325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47" office:value-type="float" office:value="15275" calcext:value-type="float">
            <text:p>15275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176793981481481" calcext:value-type="float">
            <text:p>0,00176793981481481000</text:p>
          </table:table-cell>
          <table:table-cell table:formula="of:=[.D327]-[.D326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47" office:value-type="float" office:value="15322" calcext:value-type="float">
            <text:p>15322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177337962962963" calcext:value-type="float">
            <text:p>0,00177337962962963000</text:p>
          </table:table-cell>
          <table:table-cell table:formula="of:=[.D328]-[.D327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47" office:value-type="float" office:value="15369" calcext:value-type="float">
            <text:p>15369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177881944444444" calcext:value-type="float">
            <text:p>0,00177881944444444000</text:p>
          </table:table-cell>
          <table:table-cell table:formula="of:=[.D329]-[.D328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47" office:value-type="float" office:value="15416" calcext:value-type="float">
            <text:p>15416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178425925925926" calcext:value-type="float">
            <text:p>0,00178425925925926000</text:p>
          </table:table-cell>
          <table:table-cell table:formula="of:=[.D330]-[.D329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47" office:value-type="float" office:value="15463" calcext:value-type="float">
            <text:p>15463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178969907407407" calcext:value-type="float">
            <text:p>0,00178969907407407000</text:p>
          </table:table-cell>
          <table:table-cell table:formula="of:=[.D331]-[.D330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47" office:value-type="float" office:value="15510" calcext:value-type="float">
            <text:p>1551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179513888888889" calcext:value-type="float">
            <text:p>0,00179513888888889000</text:p>
          </table:table-cell>
          <table:table-cell table:formula="of:=[.D332]-[.D331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47" office:value-type="float" office:value="15557" calcext:value-type="float">
            <text:p>15557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18005787037037" calcext:value-type="float">
            <text:p>0,00180057870370370000</text:p>
          </table:table-cell>
          <table:table-cell table:formula="of:=[.D333]-[.D332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47" office:value-type="float" office:value="15604" calcext:value-type="float">
            <text:p>15604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180601851851852" calcext:value-type="float">
            <text:p>0,00180601851851852000</text:p>
          </table:table-cell>
          <table:table-cell table:formula="of:=[.D334]-[.D333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47" office:value-type="float" office:value="15651" calcext:value-type="float">
            <text:p>15651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181145833333333" calcext:value-type="float">
            <text:p>0,00181145833333333000</text:p>
          </table:table-cell>
          <table:table-cell table:formula="of:=[.D335]-[.D334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47" office:value-type="float" office:value="15698" calcext:value-type="float">
            <text:p>15698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181689814814815" calcext:value-type="float">
            <text:p>0,00181689814814815000</text:p>
          </table:table-cell>
          <table:table-cell table:formula="of:=[.D336]-[.D335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47" office:value-type="float" office:value="15745" calcext:value-type="float">
            <text:p>15745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182233796296296" calcext:value-type="float">
            <text:p>0,00182233796296296000</text:p>
          </table:table-cell>
          <table:table-cell table:formula="of:=[.D337]-[.D336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47" office:value-type="float" office:value="15792" calcext:value-type="float">
            <text:p>15792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182777777777778" calcext:value-type="float">
            <text:p>0,00182777777777778000</text:p>
          </table:table-cell>
          <table:table-cell table:formula="of:=[.D338]-[.D337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47" office:value-type="float" office:value="15839" calcext:value-type="float">
            <text:p>15839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183321759259259" calcext:value-type="float">
            <text:p>0,00183321759259259000</text:p>
          </table:table-cell>
          <table:table-cell table:formula="of:=[.D339]-[.D338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47" office:value-type="float" office:value="15886" calcext:value-type="float">
            <text:p>15886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183865740740741" calcext:value-type="float">
            <text:p>0,00183865740740741000</text:p>
          </table:table-cell>
          <table:table-cell table:formula="of:=[.D340]-[.D339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47" office:value-type="float" office:value="15933" calcext:value-type="float">
            <text:p>15933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184409722222222" calcext:value-type="float">
            <text:p>0,00184409722222222000</text:p>
          </table:table-cell>
          <table:table-cell table:formula="of:=[.D341]-[.D340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47" office:value-type="float" office:value="15980" calcext:value-type="float">
            <text:p>1598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184953703703704" calcext:value-type="float">
            <text:p>0,00184953703703704000</text:p>
          </table:table-cell>
          <table:table-cell table:formula="of:=[.D342]-[.D341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47" office:value-type="float" office:value="16027" calcext:value-type="float">
            <text:p>16027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185497685185185" calcext:value-type="float">
            <text:p>0,00185497685185185000</text:p>
          </table:table-cell>
          <table:table-cell table:formula="of:=[.D343]-[.D342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47" office:value-type="float" office:value="16074" calcext:value-type="float">
            <text:p>16074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186041666666667" calcext:value-type="float">
            <text:p>0,00186041666666667000</text:p>
          </table:table-cell>
          <table:table-cell table:formula="of:=[.D344]-[.D343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47" office:value-type="float" office:value="16121" calcext:value-type="float">
            <text:p>16121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186585648148148" calcext:value-type="float">
            <text:p>0,00186585648148148000</text:p>
          </table:table-cell>
          <table:table-cell table:formula="of:=[.D345]-[.D344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47" office:value-type="float" office:value="16168" calcext:value-type="float">
            <text:p>16168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18712962962963" calcext:value-type="float">
            <text:p>0,00187129629629630000</text:p>
          </table:table-cell>
          <table:table-cell table:formula="of:=[.D346]-[.D345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47" office:value-type="float" office:value="16215" calcext:value-type="float">
            <text:p>16215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187673611111111" calcext:value-type="float">
            <text:p>0,00187673611111111000</text:p>
          </table:table-cell>
          <table:table-cell table:formula="of:=[.D347]-[.D346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47" office:value-type="float" office:value="16262" calcext:value-type="float">
            <text:p>16262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188217592592593" calcext:value-type="float">
            <text:p>0,00188217592592593000</text:p>
          </table:table-cell>
          <table:table-cell table:formula="of:=[.D348]-[.D347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47" office:value-type="float" office:value="16309" calcext:value-type="float">
            <text:p>16309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188761574074074" calcext:value-type="float">
            <text:p>0,00188761574074074000</text:p>
          </table:table-cell>
          <table:table-cell table:formula="of:=[.D349]-[.D348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47" office:value-type="float" office:value="16356" calcext:value-type="float">
            <text:p>16356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189305555555556" calcext:value-type="float">
            <text:p>0,00189305555555556000</text:p>
          </table:table-cell>
          <table:table-cell table:formula="of:=[.D350]-[.D349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47" office:value-type="float" office:value="16403" calcext:value-type="float">
            <text:p>16403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189849537037037" calcext:value-type="float">
            <text:p>0,00189849537037037000</text:p>
          </table:table-cell>
          <table:table-cell table:formula="of:=[.D351]-[.D350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47" office:value-type="float" office:value="16450" calcext:value-type="float">
            <text:p>1645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190393518518519" calcext:value-type="float">
            <text:p>0,00190393518518519000</text:p>
          </table:table-cell>
          <table:table-cell table:formula="of:=[.D352]-[.D351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47" office:value-type="float" office:value="16497" calcext:value-type="float">
            <text:p>16497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1909375" calcext:value-type="float">
            <text:p>0,00190937500000000000</text:p>
          </table:table-cell>
          <table:table-cell table:formula="of:=[.D353]-[.D352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47" office:value-type="float" office:value="16544" calcext:value-type="float">
            <text:p>16544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191481481481481" calcext:value-type="float">
            <text:p>0,00191481481481481000</text:p>
          </table:table-cell>
          <table:table-cell table:formula="of:=[.D354]-[.D353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47" office:value-type="float" office:value="16591" calcext:value-type="float">
            <text:p>16591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192025462962963" calcext:value-type="float">
            <text:p>0,00192025462962963000</text:p>
          </table:table-cell>
          <table:table-cell table:formula="of:=[.D355]-[.D354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47" office:value-type="float" office:value="16638" calcext:value-type="float">
            <text:p>16638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192569444444444" calcext:value-type="float">
            <text:p>0,00192569444444444000</text:p>
          </table:table-cell>
          <table:table-cell table:formula="of:=[.D356]-[.D355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47" office:value-type="float" office:value="16685" calcext:value-type="float">
            <text:p>16685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193113425925926" calcext:value-type="float">
            <text:p>0,00193113425925926000</text:p>
          </table:table-cell>
          <table:table-cell table:formula="of:=[.D357]-[.D356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47" office:value-type="float" office:value="16732" calcext:value-type="float">
            <text:p>16732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193657407407407" calcext:value-type="float">
            <text:p>0,00193657407407407000</text:p>
          </table:table-cell>
          <table:table-cell table:formula="of:=[.D358]-[.D357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47" office:value-type="float" office:value="16779" calcext:value-type="float">
            <text:p>16779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194201388888889" calcext:value-type="float">
            <text:p>0,00194201388888889000</text:p>
          </table:table-cell>
          <table:table-cell table:formula="of:=[.D359]-[.D358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47" office:value-type="float" office:value="16826" calcext:value-type="float">
            <text:p>16826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19474537037037" calcext:value-type="float">
            <text:p>0,00194745370370370000</text:p>
          </table:table-cell>
          <table:table-cell table:formula="of:=[.D360]-[.D359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47" office:value-type="float" office:value="16873" calcext:value-type="float">
            <text:p>16873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195289351851852" calcext:value-type="float">
            <text:p>0,00195289351851852000</text:p>
          </table:table-cell>
          <table:table-cell table:formula="of:=[.D361]-[.D360]" office:value-type="float" office:value="0.00000543981481481467" calcext:value-type="float">
            <text:p>0,00000543981481481467</text:p>
          </table:table-cell>
          <table:table-cell table:number-columns-repeated="16379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47" office:value-type="float" office:value="16920" calcext:value-type="float">
            <text:p>1692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195833333333333" calcext:value-type="float">
            <text:p>0,00195833333333333000</text:p>
          </table:table-cell>
          <table:table-cell table:formula="of:=[.D362]-[.D361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47" office:value-type="float" office:value="16967" calcext:value-type="float">
            <text:p>16967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196377314814815" calcext:value-type="float">
            <text:p>0,00196377314814815000</text:p>
          </table:table-cell>
          <table:table-cell table:formula="of:=[.D363]-[.D362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47" office:value-type="float" office:value="17014" calcext:value-type="float">
            <text:p>17014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196921296296296" calcext:value-type="float">
            <text:p>0,00196921296296296000</text:p>
          </table:table-cell>
          <table:table-cell table:formula="of:=[.D364]-[.D363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47" office:value-type="float" office:value="17061" calcext:value-type="float">
            <text:p>17061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197465277777778" calcext:value-type="float">
            <text:p>0,00197465277777778000</text:p>
          </table:table-cell>
          <table:table-cell table:formula="of:=[.D365]-[.D364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47" office:value-type="float" office:value="17108" calcext:value-type="float">
            <text:p>17108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198009259259259" calcext:value-type="float">
            <text:p>0,00198009259259259000</text:p>
          </table:table-cell>
          <table:table-cell table:formula="of:=[.D366]-[.D365]" office:value-type="float" office:value="0.00000543981481481446" calcext:value-type="float">
            <text:p>0,00000543981481481446</text:p>
          </table:table-cell>
          <table:table-cell table:number-columns-repeated="16379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47" office:value-type="float" office:value="17155" calcext:value-type="float">
            <text:p>17155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198553240740741" calcext:value-type="float">
            <text:p>0,00198553240740741000</text:p>
          </table:table-cell>
          <table:table-cell table:formula="of:=[.D367]-[.D366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47" office:value-type="float" office:value="17202" calcext:value-type="float">
            <text:p>17202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199097222222222" calcext:value-type="float">
            <text:p>0,00199097222222222000</text:p>
          </table:table-cell>
          <table:table-cell table:formula="of:=[.D368]-[.D367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47" office:value-type="float" office:value="17249" calcext:value-type="float">
            <text:p>17249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199641203703704" calcext:value-type="float">
            <text:p>0,00199641203703704000</text:p>
          </table:table-cell>
          <table:table-cell table:formula="of:=[.D369]-[.D368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47" office:value-type="float" office:value="17296" calcext:value-type="float">
            <text:p>17296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200185185185185" calcext:value-type="float">
            <text:p>0,00200185185185185000</text:p>
          </table:table-cell>
          <table:table-cell table:formula="of:=[.D370]-[.D369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47" office:value-type="float" office:value="17343" calcext:value-type="float">
            <text:p>17343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200729166666667" calcext:value-type="float">
            <text:p>0,00200729166666667000</text:p>
          </table:table-cell>
          <table:table-cell table:formula="of:=[.D371]-[.D370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47" office:value-type="float" office:value="17390" calcext:value-type="float">
            <text:p>1739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201273148148148" calcext:value-type="float">
            <text:p>0,00201273148148148000</text:p>
          </table:table-cell>
          <table:table-cell table:formula="of:=[.D372]-[.D371]" office:value-type="float" office:value="0.00000543981481481446" calcext:value-type="float">
            <text:p>0,00000543981481481446</text:p>
          </table:table-cell>
          <table:table-cell table:number-columns-repeated="16379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47" office:value-type="float" office:value="17437" calcext:value-type="float">
            <text:p>17437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20181712962963" calcext:value-type="float">
            <text:p>0,00201817129629630000</text:p>
          </table:table-cell>
          <table:table-cell table:formula="of:=[.D373]-[.D372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47" office:value-type="float" office:value="17484" calcext:value-type="float">
            <text:p>17484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202361111111111" calcext:value-type="float">
            <text:p>0,00202361111111111000</text:p>
          </table:table-cell>
          <table:table-cell table:formula="of:=[.D374]-[.D373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47" office:value-type="float" office:value="17531" calcext:value-type="float">
            <text:p>17531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202905092592593" calcext:value-type="float">
            <text:p>0,00202905092592593000</text:p>
          </table:table-cell>
          <table:table-cell table:formula="of:=[.D375]-[.D374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47" office:value-type="float" office:value="17578" calcext:value-type="float">
            <text:p>17578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203449074074074" calcext:value-type="float">
            <text:p>0,00203449074074074000</text:p>
          </table:table-cell>
          <table:table-cell table:formula="of:=[.D376]-[.D375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47" office:value-type="float" office:value="17625" calcext:value-type="float">
            <text:p>17625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203993055555556" calcext:value-type="float">
            <text:p>0,00203993055555556000</text:p>
          </table:table-cell>
          <table:table-cell table:formula="of:=[.D377]-[.D376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47" office:value-type="float" office:value="17672" calcext:value-type="float">
            <text:p>17672</text:p>
          </table:table-cell>
          <table:table-cell office:value-type="float" office:value="8640000" calcext:value-type="float">
            <text:p>8640000</text:p>
          </table:table-cell>
          <table:table-cell table:formula="of:=[.B377]/[.C377]" office:value-type="float" office:value="0.00204537037037037" calcext:value-type="float">
            <text:p>0,00204537037037037000</text:p>
          </table:table-cell>
          <table:table-cell table:formula="of:=[.D378]-[.D377]" office:value-type="float" office:value="0.00000543981481481446" calcext:value-type="float">
            <text:p>0,00000543981481481446</text:p>
          </table:table-cell>
          <table:table-cell table:number-columns-repeated="16379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47" office:value-type="float" office:value="17719" calcext:value-type="float">
            <text:p>17719</text:p>
          </table:table-cell>
          <table:table-cell office:value-type="float" office:value="8640000" calcext:value-type="float">
            <text:p>8640000</text:p>
          </table:table-cell>
          <table:table-cell table:formula="of:=[.B378]/[.C378]" office:value-type="float" office:value="0.00205081018518519" calcext:value-type="float">
            <text:p>0,00205081018518519000</text:p>
          </table:table-cell>
          <table:table-cell table:formula="of:=[.D379]-[.D378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47" office:value-type="float" office:value="17766" calcext:value-type="float">
            <text:p>17766</text:p>
          </table:table-cell>
          <table:table-cell office:value-type="float" office:value="8640000" calcext:value-type="float">
            <text:p>8640000</text:p>
          </table:table-cell>
          <table:table-cell table:formula="of:=[.B379]/[.C379]" office:value-type="float" office:value="0.00205625" calcext:value-type="float">
            <text:p>0,00205625000000000000</text:p>
          </table:table-cell>
          <table:table-cell table:formula="of:=[.D380]-[.D379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47" office:value-type="float" office:value="17813" calcext:value-type="float">
            <text:p>17813</text:p>
          </table:table-cell>
          <table:table-cell office:value-type="float" office:value="8640000" calcext:value-type="float">
            <text:p>8640000</text:p>
          </table:table-cell>
          <table:table-cell table:formula="of:=[.B380]/[.C380]" office:value-type="float" office:value="0.00206168981481482" calcext:value-type="float">
            <text:p>0,00206168981481482000</text:p>
          </table:table-cell>
          <table:table-cell table:formula="of:=[.D381]-[.D380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47" office:value-type="float" office:value="17860" calcext:value-type="float">
            <text:p>17860</text:p>
          </table:table-cell>
          <table:table-cell office:value-type="float" office:value="8640000" calcext:value-type="float">
            <text:p>8640000</text:p>
          </table:table-cell>
          <table:table-cell table:formula="of:=[.B381]/[.C381]" office:value-type="float" office:value="0.00206712962962963" calcext:value-type="float">
            <text:p>0,00206712962962963000</text:p>
          </table:table-cell>
          <table:table-cell table:formula="of:=[.D382]-[.D381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+47" office:value-type="float" office:value="17907" calcext:value-type="float">
            <text:p>17907</text:p>
          </table:table-cell>
          <table:table-cell office:value-type="float" office:value="8640000" calcext:value-type="float">
            <text:p>8640000</text:p>
          </table:table-cell>
          <table:table-cell table:formula="of:=[.B382]/[.C382]" office:value-type="float" office:value="0.00207256944444444" calcext:value-type="float">
            <text:p>0,00207256944444444000</text:p>
          </table:table-cell>
          <table:table-cell table:formula="of:=[.D383]-[.D382]" office:value-type="float" office:value="0.00000543981481481446" calcext:value-type="float">
            <text:p>0,00000543981481481446</text:p>
          </table:table-cell>
          <table:table-cell table:number-columns-repeated="16379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+47" office:value-type="float" office:value="17954" calcext:value-type="float">
            <text:p>17954</text:p>
          </table:table-cell>
          <table:table-cell office:value-type="float" office:value="8640000" calcext:value-type="float">
            <text:p>8640000</text:p>
          </table:table-cell>
          <table:table-cell table:formula="of:=[.B383]/[.C383]" office:value-type="float" office:value="0.00207800925925926" calcext:value-type="float">
            <text:p>0,00207800925925926000</text:p>
          </table:table-cell>
          <table:table-cell table:formula="of:=[.D384]-[.D383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+47" office:value-type="float" office:value="18001" calcext:value-type="float">
            <text:p>18001</text:p>
          </table:table-cell>
          <table:table-cell office:value-type="float" office:value="8640000" calcext:value-type="float">
            <text:p>8640000</text:p>
          </table:table-cell>
          <table:table-cell table:formula="of:=[.B384]/[.C384]" office:value-type="float" office:value="0.00208344907407407" calcext:value-type="float">
            <text:p>0,00208344907407407000</text:p>
          </table:table-cell>
          <table:table-cell table:formula="of:=[.D385]-[.D384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+47" office:value-type="float" office:value="18048" calcext:value-type="float">
            <text:p>18048</text:p>
          </table:table-cell>
          <table:table-cell office:value-type="float" office:value="8640000" calcext:value-type="float">
            <text:p>8640000</text:p>
          </table:table-cell>
          <table:table-cell table:formula="of:=[.B385]/[.C385]" office:value-type="float" office:value="0.00208888888888889" calcext:value-type="float">
            <text:p>0,00208888888888889000</text:p>
          </table:table-cell>
          <table:table-cell table:formula="of:=[.D386]-[.D385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+47" office:value-type="float" office:value="18095" calcext:value-type="float">
            <text:p>18095</text:p>
          </table:table-cell>
          <table:table-cell office:value-type="float" office:value="8640000" calcext:value-type="float">
            <text:p>8640000</text:p>
          </table:table-cell>
          <table:table-cell table:formula="of:=[.B386]/[.C386]" office:value-type="float" office:value="0.0020943287037037" calcext:value-type="float">
            <text:p>0,00209432870370370000</text:p>
          </table:table-cell>
          <table:table-cell table:formula="of:=[.D387]-[.D386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+47" office:value-type="float" office:value="18142" calcext:value-type="float">
            <text:p>18142</text:p>
          </table:table-cell>
          <table:table-cell office:value-type="float" office:value="8640000" calcext:value-type="float">
            <text:p>8640000</text:p>
          </table:table-cell>
          <table:table-cell table:formula="of:=[.B387]/[.C387]" office:value-type="float" office:value="0.00209976851851852" calcext:value-type="float">
            <text:p>0,00209976851851852000</text:p>
          </table:table-cell>
          <table:table-cell table:formula="of:=[.D388]-[.D387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+47" office:value-type="float" office:value="18189" calcext:value-type="float">
            <text:p>18189</text:p>
          </table:table-cell>
          <table:table-cell office:value-type="float" office:value="8640000" calcext:value-type="float">
            <text:p>8640000</text:p>
          </table:table-cell>
          <table:table-cell table:formula="of:=[.B388]/[.C388]" office:value-type="float" office:value="0.00210520833333333" calcext:value-type="float">
            <text:p>0,00210520833333333000</text:p>
          </table:table-cell>
          <table:table-cell table:formula="of:=[.D389]-[.D388]" office:value-type="float" office:value="0.00000543981481481446" calcext:value-type="float">
            <text:p>0,00000543981481481446</text:p>
          </table:table-cell>
          <table:table-cell table:number-columns-repeated="16379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+47" office:value-type="float" office:value="18236" calcext:value-type="float">
            <text:p>18236</text:p>
          </table:table-cell>
          <table:table-cell office:value-type="float" office:value="8640000" calcext:value-type="float">
            <text:p>8640000</text:p>
          </table:table-cell>
          <table:table-cell table:formula="of:=[.B389]/[.C389]" office:value-type="float" office:value="0.00211064814814815" calcext:value-type="float">
            <text:p>0,00211064814814815000</text:p>
          </table:table-cell>
          <table:table-cell table:formula="of:=[.D390]-[.D389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+47" office:value-type="float" office:value="18283" calcext:value-type="float">
            <text:p>18283</text:p>
          </table:table-cell>
          <table:table-cell office:value-type="float" office:value="8640000" calcext:value-type="float">
            <text:p>8640000</text:p>
          </table:table-cell>
          <table:table-cell table:formula="of:=[.B390]/[.C390]" office:value-type="float" office:value="0.00211608796296296" calcext:value-type="float">
            <text:p>0,00211608796296296000</text:p>
          </table:table-cell>
          <table:table-cell table:formula="of:=[.D391]-[.D390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+47" office:value-type="float" office:value="18330" calcext:value-type="float">
            <text:p>18330</text:p>
          </table:table-cell>
          <table:table-cell office:value-type="float" office:value="8640000" calcext:value-type="float">
            <text:p>8640000</text:p>
          </table:table-cell>
          <table:table-cell table:formula="of:=[.B391]/[.C391]" office:value-type="float" office:value="0.00212152777777778" calcext:value-type="float">
            <text:p>0,00212152777777778000</text:p>
          </table:table-cell>
          <table:table-cell table:formula="of:=[.D392]-[.D391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+47" office:value-type="float" office:value="18377" calcext:value-type="float">
            <text:p>18377</text:p>
          </table:table-cell>
          <table:table-cell office:value-type="float" office:value="8640000" calcext:value-type="float">
            <text:p>8640000</text:p>
          </table:table-cell>
          <table:table-cell table:formula="of:=[.B392]/[.C392]" office:value-type="float" office:value="0.00212696759259259" calcext:value-type="float">
            <text:p>0,00212696759259259000</text:p>
          </table:table-cell>
          <table:table-cell table:formula="of:=[.D393]-[.D392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+47" office:value-type="float" office:value="18424" calcext:value-type="float">
            <text:p>18424</text:p>
          </table:table-cell>
          <table:table-cell office:value-type="float" office:value="8640000" calcext:value-type="float">
            <text:p>8640000</text:p>
          </table:table-cell>
          <table:table-cell table:formula="of:=[.B393]/[.C393]" office:value-type="float" office:value="0.00213240740740741" calcext:value-type="float">
            <text:p>0,00213240740740741000</text:p>
          </table:table-cell>
          <table:table-cell table:formula="of:=[.D394]-[.D393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+47" office:value-type="float" office:value="18471" calcext:value-type="float">
            <text:p>18471</text:p>
          </table:table-cell>
          <table:table-cell office:value-type="float" office:value="8640000" calcext:value-type="float">
            <text:p>8640000</text:p>
          </table:table-cell>
          <table:table-cell table:formula="of:=[.B394]/[.C394]" office:value-type="float" office:value="0.00213784722222222" calcext:value-type="float">
            <text:p>0,00213784722222222000</text:p>
          </table:table-cell>
          <table:table-cell table:formula="of:=[.D395]-[.D394]" office:value-type="float" office:value="0.00000543981481481446" calcext:value-type="float">
            <text:p>0,00000543981481481446</text:p>
          </table:table-cell>
          <table:table-cell table:number-columns-repeated="16379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+47" office:value-type="float" office:value="18518" calcext:value-type="float">
            <text:p>18518</text:p>
          </table:table-cell>
          <table:table-cell office:value-type="float" office:value="8640000" calcext:value-type="float">
            <text:p>8640000</text:p>
          </table:table-cell>
          <table:table-cell table:formula="of:=[.B395]/[.C395]" office:value-type="float" office:value="0.00214328703703704" calcext:value-type="float">
            <text:p>0,00214328703703704000</text:p>
          </table:table-cell>
          <table:table-cell table:formula="of:=[.D396]-[.D395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+47" office:value-type="float" office:value="18565" calcext:value-type="float">
            <text:p>18565</text:p>
          </table:table-cell>
          <table:table-cell office:value-type="float" office:value="8640000" calcext:value-type="float">
            <text:p>8640000</text:p>
          </table:table-cell>
          <table:table-cell table:formula="of:=[.B396]/[.C396]" office:value-type="float" office:value="0.00214872685185185" calcext:value-type="float">
            <text:p>0,00214872685185185000</text:p>
          </table:table-cell>
          <table:table-cell table:formula="of:=[.D397]-[.D396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+47" office:value-type="float" office:value="18612" calcext:value-type="float">
            <text:p>18612</text:p>
          </table:table-cell>
          <table:table-cell office:value-type="float" office:value="8640000" calcext:value-type="float">
            <text:p>8640000</text:p>
          </table:table-cell>
          <table:table-cell table:formula="of:=[.B397]/[.C397]" office:value-type="float" office:value="0.00215416666666667" calcext:value-type="float">
            <text:p>0,00215416666666667000</text:p>
          </table:table-cell>
          <table:table-cell table:formula="of:=[.D398]-[.D397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+47" office:value-type="float" office:value="18659" calcext:value-type="float">
            <text:p>18659</text:p>
          </table:table-cell>
          <table:table-cell office:value-type="float" office:value="8640000" calcext:value-type="float">
            <text:p>8640000</text:p>
          </table:table-cell>
          <table:table-cell table:formula="of:=[.B398]/[.C398]" office:value-type="float" office:value="0.00215960648148148" calcext:value-type="float">
            <text:p>0,00215960648148148000</text:p>
          </table:table-cell>
          <table:table-cell table:formula="of:=[.D399]-[.D398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+47" office:value-type="float" office:value="18706" calcext:value-type="float">
            <text:p>18706</text:p>
          </table:table-cell>
          <table:table-cell office:value-type="float" office:value="8640000" calcext:value-type="float">
            <text:p>8640000</text:p>
          </table:table-cell>
          <table:table-cell table:formula="of:=[.B399]/[.C399]" office:value-type="float" office:value="0.0021650462962963" calcext:value-type="float">
            <text:p>0,00216504629629630000</text:p>
          </table:table-cell>
          <table:table-cell table:formula="of:=[.D400]-[.D399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+47" office:value-type="float" office:value="18753" calcext:value-type="float">
            <text:p>18753</text:p>
          </table:table-cell>
          <table:table-cell office:value-type="float" office:value="8640000" calcext:value-type="float">
            <text:p>8640000</text:p>
          </table:table-cell>
          <table:table-cell table:formula="of:=[.B400]/[.C400]" office:value-type="float" office:value="0.00217048611111111" calcext:value-type="float">
            <text:p>0,00217048611111111000</text:p>
          </table:table-cell>
          <table:table-cell table:formula="of:=[.D401]-[.D400]" office:value-type="float" office:value="0.00000543981481481446" calcext:value-type="float">
            <text:p>0,00000543981481481446</text:p>
          </table:table-cell>
          <table:table-cell table:number-columns-repeated="16379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+47" office:value-type="float" office:value="18800" calcext:value-type="float">
            <text:p>18800</text:p>
          </table:table-cell>
          <table:table-cell office:value-type="float" office:value="8640000" calcext:value-type="float">
            <text:p>8640000</text:p>
          </table:table-cell>
          <table:table-cell table:formula="of:=[.B401]/[.C401]" office:value-type="float" office:value="0.00217592592592593" calcext:value-type="float">
            <text:p>0,00217592592592593000</text:p>
          </table:table-cell>
          <table:table-cell table:formula="of:=[.D402]-[.D401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1]+47" office:value-type="float" office:value="18847" calcext:value-type="float">
            <text:p>18847</text:p>
          </table:table-cell>
          <table:table-cell office:value-type="float" office:value="8640000" calcext:value-type="float">
            <text:p>8640000</text:p>
          </table:table-cell>
          <table:table-cell table:formula="of:=[.B402]/[.C402]" office:value-type="float" office:value="0.00218136574074074" calcext:value-type="float">
            <text:p>0,00218136574074074000</text:p>
          </table:table-cell>
          <table:table-cell table:formula="of:=[.D403]-[.D402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2]+47" office:value-type="float" office:value="18894" calcext:value-type="float">
            <text:p>18894</text:p>
          </table:table-cell>
          <table:table-cell office:value-type="float" office:value="8640000" calcext:value-type="float">
            <text:p>8640000</text:p>
          </table:table-cell>
          <table:table-cell table:formula="of:=[.B403]/[.C403]" office:value-type="float" office:value="0.00218680555555556" calcext:value-type="float">
            <text:p>0,00218680555555556000</text:p>
          </table:table-cell>
          <table:table-cell table:formula="of:=[.D404]-[.D403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3]+47" office:value-type="float" office:value="18941" calcext:value-type="float">
            <text:p>18941</text:p>
          </table:table-cell>
          <table:table-cell office:value-type="float" office:value="8640000" calcext:value-type="float">
            <text:p>8640000</text:p>
          </table:table-cell>
          <table:table-cell table:formula="of:=[.B404]/[.C404]" office:value-type="float" office:value="0.00219224537037037" calcext:value-type="float">
            <text:p>0,00219224537037037000</text:p>
          </table:table-cell>
          <table:table-cell table:formula="of:=[.D405]-[.D404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4]+47" office:value-type="float" office:value="18988" calcext:value-type="float">
            <text:p>18988</text:p>
          </table:table-cell>
          <table:table-cell office:value-type="float" office:value="8640000" calcext:value-type="float">
            <text:p>8640000</text:p>
          </table:table-cell>
          <table:table-cell table:formula="of:=[.B405]/[.C405]" office:value-type="float" office:value="0.00219768518518519" calcext:value-type="float">
            <text:p>0,00219768518518519000</text:p>
          </table:table-cell>
          <table:table-cell table:formula="of:=[.D406]-[.D405]" office:value-type="float" office:value="0.00000543981481481446" calcext:value-type="float">
            <text:p>0,00000543981481481446</text:p>
          </table:table-cell>
          <table:table-cell table:number-columns-repeated="16379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5]+47" office:value-type="float" office:value="19035" calcext:value-type="float">
            <text:p>19035</text:p>
          </table:table-cell>
          <table:table-cell office:value-type="float" office:value="8640000" calcext:value-type="float">
            <text:p>8640000</text:p>
          </table:table-cell>
          <table:table-cell table:formula="of:=[.B406]/[.C406]" office:value-type="float" office:value="0.002203125" calcext:value-type="float">
            <text:p>0,00220312500000000000</text:p>
          </table:table-cell>
          <table:table-cell table:formula="of:=[.D407]-[.D406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6]+47" office:value-type="float" office:value="19082" calcext:value-type="float">
            <text:p>19082</text:p>
          </table:table-cell>
          <table:table-cell office:value-type="float" office:value="8640000" calcext:value-type="float">
            <text:p>8640000</text:p>
          </table:table-cell>
          <table:table-cell table:formula="of:=[.B407]/[.C407]" office:value-type="float" office:value="0.00220856481481481" calcext:value-type="float">
            <text:p>0,00220856481481481000</text:p>
          </table:table-cell>
          <table:table-cell table:formula="of:=[.D408]-[.D407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7]+47" office:value-type="float" office:value="19129" calcext:value-type="float">
            <text:p>19129</text:p>
          </table:table-cell>
          <table:table-cell office:value-type="float" office:value="8640000" calcext:value-type="float">
            <text:p>8640000</text:p>
          </table:table-cell>
          <table:table-cell table:formula="of:=[.B408]/[.C408]" office:value-type="float" office:value="0.00221400462962963" calcext:value-type="float">
            <text:p>0,00221400462962963000</text:p>
          </table:table-cell>
          <table:table-cell table:formula="of:=[.D409]-[.D408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8]+47" office:value-type="float" office:value="19176" calcext:value-type="float">
            <text:p>19176</text:p>
          </table:table-cell>
          <table:table-cell office:value-type="float" office:value="8640000" calcext:value-type="float">
            <text:p>8640000</text:p>
          </table:table-cell>
          <table:table-cell table:formula="of:=[.B409]/[.C409]" office:value-type="float" office:value="0.00221944444444444" calcext:value-type="float">
            <text:p>0,00221944444444444000</text:p>
          </table:table-cell>
          <table:table-cell table:formula="of:=[.D410]-[.D409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09]+47" office:value-type="float" office:value="19223" calcext:value-type="float">
            <text:p>19223</text:p>
          </table:table-cell>
          <table:table-cell office:value-type="float" office:value="8640000" calcext:value-type="float">
            <text:p>8640000</text:p>
          </table:table-cell>
          <table:table-cell table:formula="of:=[.B410]/[.C410]" office:value-type="float" office:value="0.00222488425925926" calcext:value-type="float">
            <text:p>0,00222488425925926000</text:p>
          </table:table-cell>
          <table:table-cell table:formula="of:=[.D411]-[.D410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0]+47" office:value-type="float" office:value="19270" calcext:value-type="float">
            <text:p>19270</text:p>
          </table:table-cell>
          <table:table-cell office:value-type="float" office:value="8640000" calcext:value-type="float">
            <text:p>8640000</text:p>
          </table:table-cell>
          <table:table-cell table:formula="of:=[.B411]/[.C411]" office:value-type="float" office:value="0.00223032407407407" calcext:value-type="float">
            <text:p>0,00223032407407407000</text:p>
          </table:table-cell>
          <table:table-cell table:formula="of:=[.D412]-[.D411]" office:value-type="float" office:value="0.00000543981481481446" calcext:value-type="float">
            <text:p>0,00000543981481481446</text:p>
          </table:table-cell>
          <table:table-cell table:number-columns-repeated="16379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1]+47" office:value-type="float" office:value="19317" calcext:value-type="float">
            <text:p>19317</text:p>
          </table:table-cell>
          <table:table-cell office:value-type="float" office:value="8640000" calcext:value-type="float">
            <text:p>8640000</text:p>
          </table:table-cell>
          <table:table-cell table:formula="of:=[.B412]/[.C412]" office:value-type="float" office:value="0.00223576388888889" calcext:value-type="float">
            <text:p>0,00223576388888889000</text:p>
          </table:table-cell>
          <table:table-cell table:formula="of:=[.D413]-[.D412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2]+47" office:value-type="float" office:value="19364" calcext:value-type="float">
            <text:p>19364</text:p>
          </table:table-cell>
          <table:table-cell office:value-type="float" office:value="8640000" calcext:value-type="float">
            <text:p>8640000</text:p>
          </table:table-cell>
          <table:table-cell table:formula="of:=[.B413]/[.C413]" office:value-type="float" office:value="0.0022412037037037" calcext:value-type="float">
            <text:p>0,00224120370370370000</text:p>
          </table:table-cell>
          <table:table-cell table:formula="of:=[.D414]-[.D413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3]+47" office:value-type="float" office:value="19411" calcext:value-type="float">
            <text:p>19411</text:p>
          </table:table-cell>
          <table:table-cell office:value-type="float" office:value="8640000" calcext:value-type="float">
            <text:p>8640000</text:p>
          </table:table-cell>
          <table:table-cell table:formula="of:=[.B414]/[.C414]" office:value-type="float" office:value="0.00224664351851852" calcext:value-type="float">
            <text:p>0,00224664351851852000</text:p>
          </table:table-cell>
          <table:table-cell table:formula="of:=[.D415]-[.D414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4]+47" office:value-type="float" office:value="19458" calcext:value-type="float">
            <text:p>19458</text:p>
          </table:table-cell>
          <table:table-cell office:value-type="float" office:value="8640000" calcext:value-type="float">
            <text:p>8640000</text:p>
          </table:table-cell>
          <table:table-cell table:formula="of:=[.B415]/[.C415]" office:value-type="float" office:value="0.00225208333333333" calcext:value-type="float">
            <text:p>0,00225208333333333000</text:p>
          </table:table-cell>
          <table:table-cell table:formula="of:=[.D416]-[.D415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5]+47" office:value-type="float" office:value="19505" calcext:value-type="float">
            <text:p>19505</text:p>
          </table:table-cell>
          <table:table-cell office:value-type="float" office:value="8640000" calcext:value-type="float">
            <text:p>8640000</text:p>
          </table:table-cell>
          <table:table-cell table:formula="of:=[.B416]/[.C416]" office:value-type="float" office:value="0.00225752314814815" calcext:value-type="float">
            <text:p>0,00225752314814815000</text:p>
          </table:table-cell>
          <table:table-cell table:formula="of:=[.D417]-[.D416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6]+47" office:value-type="float" office:value="19552" calcext:value-type="float">
            <text:p>19552</text:p>
          </table:table-cell>
          <table:table-cell office:value-type="float" office:value="8640000" calcext:value-type="float">
            <text:p>8640000</text:p>
          </table:table-cell>
          <table:table-cell table:formula="of:=[.B417]/[.C417]" office:value-type="float" office:value="0.00226296296296296" calcext:value-type="float">
            <text:p>0,00226296296296296000</text:p>
          </table:table-cell>
          <table:table-cell table:formula="of:=[.D418]-[.D417]" office:value-type="float" office:value="0.00000543981481481446" calcext:value-type="float">
            <text:p>0,00000543981481481446</text:p>
          </table:table-cell>
          <table:table-cell table:number-columns-repeated="16379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7]+47" office:value-type="float" office:value="19599" calcext:value-type="float">
            <text:p>19599</text:p>
          </table:table-cell>
          <table:table-cell office:value-type="float" office:value="8640000" calcext:value-type="float">
            <text:p>8640000</text:p>
          </table:table-cell>
          <table:table-cell table:formula="of:=[.B418]/[.C418]" office:value-type="float" office:value="0.00226840277777778" calcext:value-type="float">
            <text:p>0,00226840277777778000</text:p>
          </table:table-cell>
          <table:table-cell table:formula="of:=[.D419]-[.D418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8]+47" office:value-type="float" office:value="19646" calcext:value-type="float">
            <text:p>19646</text:p>
          </table:table-cell>
          <table:table-cell office:value-type="float" office:value="8640000" calcext:value-type="float">
            <text:p>8640000</text:p>
          </table:table-cell>
          <table:table-cell table:formula="of:=[.B419]/[.C419]" office:value-type="float" office:value="0.00227384259259259" calcext:value-type="float">
            <text:p>0,00227384259259259000</text:p>
          </table:table-cell>
          <table:table-cell table:formula="of:=[.D420]-[.D419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19]+47" office:value-type="float" office:value="19693" calcext:value-type="float">
            <text:p>19693</text:p>
          </table:table-cell>
          <table:table-cell office:value-type="float" office:value="8640000" calcext:value-type="float">
            <text:p>8640000</text:p>
          </table:table-cell>
          <table:table-cell table:formula="of:=[.B420]/[.C420]" office:value-type="float" office:value="0.00227928240740741" calcext:value-type="float">
            <text:p>0,00227928240740741000</text:p>
          </table:table-cell>
          <table:table-cell table:formula="of:=[.D421]-[.D420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0]+47" office:value-type="float" office:value="19740" calcext:value-type="float">
            <text:p>19740</text:p>
          </table:table-cell>
          <table:table-cell office:value-type="float" office:value="8640000" calcext:value-type="float">
            <text:p>8640000</text:p>
          </table:table-cell>
          <table:table-cell table:formula="of:=[.B421]/[.C421]" office:value-type="float" office:value="0.00228472222222222" calcext:value-type="float">
            <text:p>0,00228472222222222000</text:p>
          </table:table-cell>
          <table:table-cell table:formula="of:=[.D422]-[.D421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1]+47" office:value-type="float" office:value="19787" calcext:value-type="float">
            <text:p>19787</text:p>
          </table:table-cell>
          <table:table-cell office:value-type="float" office:value="8640000" calcext:value-type="float">
            <text:p>8640000</text:p>
          </table:table-cell>
          <table:table-cell table:formula="of:=[.B422]/[.C422]" office:value-type="float" office:value="0.00229016203703704" calcext:value-type="float">
            <text:p>0,00229016203703704000</text:p>
          </table:table-cell>
          <table:table-cell table:formula="of:=[.D423]-[.D422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2]+47" office:value-type="float" office:value="19834" calcext:value-type="float">
            <text:p>19834</text:p>
          </table:table-cell>
          <table:table-cell office:value-type="float" office:value="8640000" calcext:value-type="float">
            <text:p>8640000</text:p>
          </table:table-cell>
          <table:table-cell table:formula="of:=[.B423]/[.C423]" office:value-type="float" office:value="0.00229560185185185" calcext:value-type="float">
            <text:p>0,00229560185185185000</text:p>
          </table:table-cell>
          <table:table-cell table:formula="of:=[.D424]-[.D423]" office:value-type="float" office:value="0.00000543981481481446" calcext:value-type="float">
            <text:p>0,00000543981481481446</text:p>
          </table:table-cell>
          <table:table-cell table:number-columns-repeated="16379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3]+47" office:value-type="float" office:value="19881" calcext:value-type="float">
            <text:p>19881</text:p>
          </table:table-cell>
          <table:table-cell office:value-type="float" office:value="8640000" calcext:value-type="float">
            <text:p>8640000</text:p>
          </table:table-cell>
          <table:table-cell table:formula="of:=[.B424]/[.C424]" office:value-type="float" office:value="0.00230104166666667" calcext:value-type="float">
            <text:p>0,00230104166666667000</text:p>
          </table:table-cell>
          <table:table-cell table:formula="of:=[.D425]-[.D424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4]+47" office:value-type="float" office:value="19928" calcext:value-type="float">
            <text:p>19928</text:p>
          </table:table-cell>
          <table:table-cell office:value-type="float" office:value="8640000" calcext:value-type="float">
            <text:p>8640000</text:p>
          </table:table-cell>
          <table:table-cell table:formula="of:=[.B425]/[.C425]" office:value-type="float" office:value="0.00230648148148148" calcext:value-type="float">
            <text:p>0,00230648148148148000</text:p>
          </table:table-cell>
          <table:table-cell table:formula="of:=[.D426]-[.D425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5]+47" office:value-type="float" office:value="19975" calcext:value-type="float">
            <text:p>19975</text:p>
          </table:table-cell>
          <table:table-cell office:value-type="float" office:value="8640000" calcext:value-type="float">
            <text:p>8640000</text:p>
          </table:table-cell>
          <table:table-cell table:formula="of:=[.B426]/[.C426]" office:value-type="float" office:value="0.0023119212962963" calcext:value-type="float">
            <text:p>0,00231192129629630000</text:p>
          </table:table-cell>
          <table:table-cell table:formula="of:=[.D427]-[.D426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6]+47" office:value-type="float" office:value="20022" calcext:value-type="float">
            <text:p>20022</text:p>
          </table:table-cell>
          <table:table-cell office:value-type="float" office:value="8640000" calcext:value-type="float">
            <text:p>8640000</text:p>
          </table:table-cell>
          <table:table-cell table:formula="of:=[.B427]/[.C427]" office:value-type="float" office:value="0.00231736111111111" calcext:value-type="float">
            <text:p>0,00231736111111111000</text:p>
          </table:table-cell>
          <table:table-cell table:formula="of:=[.D428]-[.D427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27]+47" office:value-type="float" office:value="20069" calcext:value-type="float">
            <text:p>20069</text:p>
          </table:table-cell>
          <table:table-cell office:value-type="float" office:value="8640000" calcext:value-type="float">
            <text:p>8640000</text:p>
          </table:table-cell>
          <table:table-cell table:formula="of:=[.B428]/[.C428]" office:value-type="float" office:value="0.00232280092592593" calcext:value-type="float">
            <text:p>0,00232280092592593000</text:p>
          </table:table-cell>
          <table:table-cell table:formula="of:=[.D429]-[.D428]" office:value-type="float" office:value="0.00000543981481481446" calcext:value-type="float">
            <text:p>0,00000543981481481446</text:p>
          </table:table-cell>
          <table:table-cell table:number-columns-repeated="16379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28]+47" office:value-type="float" office:value="20116" calcext:value-type="float">
            <text:p>20116</text:p>
          </table:table-cell>
          <table:table-cell office:value-type="float" office:value="8640000" calcext:value-type="float">
            <text:p>8640000</text:p>
          </table:table-cell>
          <table:table-cell table:formula="of:=[.B429]/[.C429]" office:value-type="float" office:value="0.00232824074074074" calcext:value-type="float">
            <text:p>0,00232824074074074000</text:p>
          </table:table-cell>
          <table:table-cell table:formula="of:=[.D430]-[.D429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429]+47" office:value-type="float" office:value="20163" calcext:value-type="float">
            <text:p>20163</text:p>
          </table:table-cell>
          <table:table-cell office:value-type="float" office:value="8640000" calcext:value-type="float">
            <text:p>8640000</text:p>
          </table:table-cell>
          <table:table-cell table:formula="of:=[.B430]/[.C430]" office:value-type="float" office:value="0.00233368055555556" calcext:value-type="float">
            <text:p>0,00233368055555556000</text:p>
          </table:table-cell>
          <table:table-cell table:formula="of:=[.D431]-[.D430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430]+47" office:value-type="float" office:value="20210" calcext:value-type="float">
            <text:p>20210</text:p>
          </table:table-cell>
          <table:table-cell office:value-type="float" office:value="8640000" calcext:value-type="float">
            <text:p>8640000</text:p>
          </table:table-cell>
          <table:table-cell table:formula="of:=[.B431]/[.C431]" office:value-type="float" office:value="0.00233912037037037" calcext:value-type="float">
            <text:p>0,00233912037037037000</text:p>
          </table:table-cell>
          <table:table-cell table:formula="of:=[.D432]-[.D431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431]+47" office:value-type="float" office:value="20257" calcext:value-type="float">
            <text:p>20257</text:p>
          </table:table-cell>
          <table:table-cell office:value-type="float" office:value="8640000" calcext:value-type="float">
            <text:p>8640000</text:p>
          </table:table-cell>
          <table:table-cell table:formula="of:=[.B432]/[.C432]" office:value-type="float" office:value="0.00234456018518519" calcext:value-type="float">
            <text:p>0,00234456018518519000</text:p>
          </table:table-cell>
          <table:table-cell table:formula="of:=[.D433]-[.D432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432]+47" office:value-type="float" office:value="20304" calcext:value-type="float">
            <text:p>20304</text:p>
          </table:table-cell>
          <table:table-cell office:value-type="float" office:value="8640000" calcext:value-type="float">
            <text:p>8640000</text:p>
          </table:table-cell>
          <table:table-cell table:formula="of:=[.B433]/[.C433]" office:value-type="float" office:value="0.00235" calcext:value-type="float">
            <text:p>0,00235000000000000000</text:p>
          </table:table-cell>
          <table:table-cell table:formula="of:=[.D434]-[.D433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433]+47" office:value-type="float" office:value="20351" calcext:value-type="float">
            <text:p>20351</text:p>
          </table:table-cell>
          <table:table-cell office:value-type="float" office:value="8640000" calcext:value-type="float">
            <text:p>8640000</text:p>
          </table:table-cell>
          <table:table-cell table:formula="of:=[.B434]/[.C434]" office:value-type="float" office:value="0.00235543981481482" calcext:value-type="float">
            <text:p>0,00235543981481482000</text:p>
          </table:table-cell>
          <table:table-cell table:formula="of:=[.D435]-[.D434]" office:value-type="float" office:value="0.00000543981481481446" calcext:value-type="float">
            <text:p>0,00000543981481481446</text:p>
          </table:table-cell>
          <table:table-cell table:number-columns-repeated="16379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434]+47" office:value-type="float" office:value="20398" calcext:value-type="float">
            <text:p>20398</text:p>
          </table:table-cell>
          <table:table-cell office:value-type="float" office:value="8640000" calcext:value-type="float">
            <text:p>8640000</text:p>
          </table:table-cell>
          <table:table-cell table:formula="of:=[.B435]/[.C435]" office:value-type="float" office:value="0.00236087962962963" calcext:value-type="float">
            <text:p>0,00236087962962963000</text:p>
          </table:table-cell>
          <table:table-cell table:formula="of:=[.D436]-[.D435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435]+47" office:value-type="float" office:value="20445" calcext:value-type="float">
            <text:p>20445</text:p>
          </table:table-cell>
          <table:table-cell office:value-type="float" office:value="8640000" calcext:value-type="float">
            <text:p>8640000</text:p>
          </table:table-cell>
          <table:table-cell table:formula="of:=[.B436]/[.C436]" office:value-type="float" office:value="0.00236631944444444" calcext:value-type="float">
            <text:p>0,00236631944444444000</text:p>
          </table:table-cell>
          <table:table-cell table:formula="of:=[.D437]-[.D436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436]+47" office:value-type="float" office:value="20492" calcext:value-type="float">
            <text:p>20492</text:p>
          </table:table-cell>
          <table:table-cell office:value-type="float" office:value="8640000" calcext:value-type="float">
            <text:p>8640000</text:p>
          </table:table-cell>
          <table:table-cell table:formula="of:=[.B437]/[.C437]" office:value-type="float" office:value="0.00237175925925926" calcext:value-type="float">
            <text:p>0,00237175925925926000</text:p>
          </table:table-cell>
          <table:table-cell table:formula="of:=[.D438]-[.D437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437]+47" office:value-type="float" office:value="20539" calcext:value-type="float">
            <text:p>20539</text:p>
          </table:table-cell>
          <table:table-cell office:value-type="float" office:value="8640000" calcext:value-type="float">
            <text:p>8640000</text:p>
          </table:table-cell>
          <table:table-cell table:formula="of:=[.B438]/[.C438]" office:value-type="float" office:value="0.00237719907407407" calcext:value-type="float">
            <text:p>0,00237719907407407000</text:p>
          </table:table-cell>
          <table:table-cell table:formula="of:=[.D439]-[.D438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438]+47" office:value-type="float" office:value="20586" calcext:value-type="float">
            <text:p>20586</text:p>
          </table:table-cell>
          <table:table-cell office:value-type="float" office:value="8640000" calcext:value-type="float">
            <text:p>8640000</text:p>
          </table:table-cell>
          <table:table-cell table:formula="of:=[.B439]/[.C439]" office:value-type="float" office:value="0.00238263888888889" calcext:value-type="float">
            <text:p>0,00238263888888889000</text:p>
          </table:table-cell>
          <table:table-cell table:formula="of:=[.D440]-[.D439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439]+47" office:value-type="float" office:value="20633" calcext:value-type="float">
            <text:p>20633</text:p>
          </table:table-cell>
          <table:table-cell office:value-type="float" office:value="8640000" calcext:value-type="float">
            <text:p>8640000</text:p>
          </table:table-cell>
          <table:table-cell table:formula="of:=[.B440]/[.C440]" office:value-type="float" office:value="0.0023880787037037" calcext:value-type="float">
            <text:p>0,00238807870370370000</text:p>
          </table:table-cell>
          <table:table-cell table:formula="of:=[.D441]-[.D440]" office:value-type="float" office:value="0.00000543981481481446" calcext:value-type="float">
            <text:p>0,00000543981481481446</text:p>
          </table:table-cell>
          <table:table-cell table:number-columns-repeated="16379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40]+47" office:value-type="float" office:value="20680" calcext:value-type="float">
            <text:p>20680</text:p>
          </table:table-cell>
          <table:table-cell office:value-type="float" office:value="8640000" calcext:value-type="float">
            <text:p>8640000</text:p>
          </table:table-cell>
          <table:table-cell table:formula="of:=[.B441]/[.C441]" office:value-type="float" office:value="0.00239351851851852" calcext:value-type="float">
            <text:p>0,00239351851851852000</text:p>
          </table:table-cell>
          <table:table-cell table:formula="of:=[.D442]-[.D441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441]+47" office:value-type="float" office:value="20727" calcext:value-type="float">
            <text:p>20727</text:p>
          </table:table-cell>
          <table:table-cell office:value-type="float" office:value="8640000" calcext:value-type="float">
            <text:p>8640000</text:p>
          </table:table-cell>
          <table:table-cell table:formula="of:=[.B442]/[.C442]" office:value-type="float" office:value="0.00239895833333333" calcext:value-type="float">
            <text:p>0,00239895833333333000</text:p>
          </table:table-cell>
          <table:table-cell table:formula="of:=[.D443]-[.D442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442]+47" office:value-type="float" office:value="20774" calcext:value-type="float">
            <text:p>20774</text:p>
          </table:table-cell>
          <table:table-cell office:value-type="float" office:value="8640000" calcext:value-type="float">
            <text:p>8640000</text:p>
          </table:table-cell>
          <table:table-cell table:formula="of:=[.B443]/[.C443]" office:value-type="float" office:value="0.00240439814814815" calcext:value-type="float">
            <text:p>0,00240439814814815000</text:p>
          </table:table-cell>
          <table:table-cell table:formula="of:=[.D444]-[.D443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443]+47" office:value-type="float" office:value="20821" calcext:value-type="float">
            <text:p>20821</text:p>
          </table:table-cell>
          <table:table-cell office:value-type="float" office:value="8640000" calcext:value-type="float">
            <text:p>8640000</text:p>
          </table:table-cell>
          <table:table-cell table:formula="of:=[.B444]/[.C444]" office:value-type="float" office:value="0.00240983796296296" calcext:value-type="float">
            <text:p>0,00240983796296296000</text:p>
          </table:table-cell>
          <table:table-cell table:formula="of:=[.D445]-[.D444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444]+47" office:value-type="float" office:value="20868" calcext:value-type="float">
            <text:p>20868</text:p>
          </table:table-cell>
          <table:table-cell office:value-type="float" office:value="8640000" calcext:value-type="float">
            <text:p>8640000</text:p>
          </table:table-cell>
          <table:table-cell table:formula="of:=[.B445]/[.C445]" office:value-type="float" office:value="0.00241527777777778" calcext:value-type="float">
            <text:p>0,00241527777777778000</text:p>
          </table:table-cell>
          <table:table-cell table:formula="of:=[.D446]-[.D445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445]+47" office:value-type="float" office:value="20915" calcext:value-type="float">
            <text:p>20915</text:p>
          </table:table-cell>
          <table:table-cell office:value-type="float" office:value="8640000" calcext:value-type="float">
            <text:p>8640000</text:p>
          </table:table-cell>
          <table:table-cell table:formula="of:=[.B446]/[.C446]" office:value-type="float" office:value="0.00242071759259259" calcext:value-type="float">
            <text:p>0,00242071759259259000</text:p>
          </table:table-cell>
          <table:table-cell table:formula="of:=[.D447]-[.D446]" office:value-type="float" office:value="0.00000543981481481446" calcext:value-type="float">
            <text:p>0,00000543981481481446</text:p>
          </table:table-cell>
          <table:table-cell table:number-columns-repeated="16379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446]+47" office:value-type="float" office:value="20962" calcext:value-type="float">
            <text:p>20962</text:p>
          </table:table-cell>
          <table:table-cell office:value-type="float" office:value="8640000" calcext:value-type="float">
            <text:p>8640000</text:p>
          </table:table-cell>
          <table:table-cell table:formula="of:=[.B447]/[.C447]" office:value-type="float" office:value="0.00242615740740741" calcext:value-type="float">
            <text:p>0,00242615740740741000</text:p>
          </table:table-cell>
          <table:table-cell table:formula="of:=[.D448]-[.D447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447]+47" office:value-type="float" office:value="21009" calcext:value-type="float">
            <text:p>21009</text:p>
          </table:table-cell>
          <table:table-cell office:value-type="float" office:value="8640000" calcext:value-type="float">
            <text:p>8640000</text:p>
          </table:table-cell>
          <table:table-cell table:formula="of:=[.B448]/[.C448]" office:value-type="float" office:value="0.00243159722222222" calcext:value-type="float">
            <text:p>0,00243159722222222000</text:p>
          </table:table-cell>
          <table:table-cell table:formula="of:=[.D449]-[.D448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448]+47" office:value-type="float" office:value="21056" calcext:value-type="float">
            <text:p>21056</text:p>
          </table:table-cell>
          <table:table-cell office:value-type="float" office:value="8640000" calcext:value-type="float">
            <text:p>8640000</text:p>
          </table:table-cell>
          <table:table-cell table:formula="of:=[.B449]/[.C449]" office:value-type="float" office:value="0.00243703703703704" calcext:value-type="float">
            <text:p>0,00243703703703704000</text:p>
          </table:table-cell>
          <table:table-cell table:formula="of:=[.D450]-[.D449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449]+47" office:value-type="float" office:value="21103" calcext:value-type="float">
            <text:p>21103</text:p>
          </table:table-cell>
          <table:table-cell office:value-type="float" office:value="8640000" calcext:value-type="float">
            <text:p>8640000</text:p>
          </table:table-cell>
          <table:table-cell table:formula="of:=[.B450]/[.C450]" office:value-type="float" office:value="0.00244247685185185" calcext:value-type="float">
            <text:p>0,00244247685185185000</text:p>
          </table:table-cell>
          <table:table-cell table:formula="of:=[.D451]-[.D450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450]+47" office:value-type="float" office:value="21150" calcext:value-type="float">
            <text:p>21150</text:p>
          </table:table-cell>
          <table:table-cell office:value-type="float" office:value="8640000" calcext:value-type="float">
            <text:p>8640000</text:p>
          </table:table-cell>
          <table:table-cell table:formula="of:=[.B451]/[.C451]" office:value-type="float" office:value="0.00244791666666667" calcext:value-type="float">
            <text:p>0,00244791666666667000</text:p>
          </table:table-cell>
          <table:table-cell table:formula="of:=[.D452]-[.D451]" office:value-type="float" office:value="0.00000543981481481446" calcext:value-type="float">
            <text:p>0,00000543981481481446</text:p>
          </table:table-cell>
          <table:table-cell table:number-columns-repeated="16379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451]+47" office:value-type="float" office:value="21197" calcext:value-type="float">
            <text:p>21197</text:p>
          </table:table-cell>
          <table:table-cell office:value-type="float" office:value="8640000" calcext:value-type="float">
            <text:p>8640000</text:p>
          </table:table-cell>
          <table:table-cell table:formula="of:=[.B452]/[.C452]" office:value-type="float" office:value="0.00245335648148148" calcext:value-type="float">
            <text:p>0,00245335648148148000</text:p>
          </table:table-cell>
          <table:table-cell table:formula="of:=[.D453]-[.D452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452]+47" office:value-type="float" office:value="21244" calcext:value-type="float">
            <text:p>21244</text:p>
          </table:table-cell>
          <table:table-cell office:value-type="float" office:value="8640000" calcext:value-type="float">
            <text:p>8640000</text:p>
          </table:table-cell>
          <table:table-cell table:formula="of:=[.B453]/[.C453]" office:value-type="float" office:value="0.0024587962962963" calcext:value-type="float">
            <text:p>0,00245879629629630000</text:p>
          </table:table-cell>
          <table:table-cell table:formula="of:=[.D454]-[.D453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B453]+47" office:value-type="float" office:value="21291" calcext:value-type="float">
            <text:p>21291</text:p>
          </table:table-cell>
          <table:table-cell office:value-type="float" office:value="8640000" calcext:value-type="float">
            <text:p>8640000</text:p>
          </table:table-cell>
          <table:table-cell table:formula="of:=[.B454]/[.C454]" office:value-type="float" office:value="0.00246423611111111" calcext:value-type="float">
            <text:p>0,00246423611111111000</text:p>
          </table:table-cell>
          <table:table-cell table:formula="of:=[.D455]-[.D454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B454]+47" office:value-type="float" office:value="21338" calcext:value-type="float">
            <text:p>21338</text:p>
          </table:table-cell>
          <table:table-cell office:value-type="float" office:value="8640000" calcext:value-type="float">
            <text:p>8640000</text:p>
          </table:table-cell>
          <table:table-cell table:formula="of:=[.B455]/[.C455]" office:value-type="float" office:value="0.00246967592592593" calcext:value-type="float">
            <text:p>0,00246967592592593000</text:p>
          </table:table-cell>
          <table:table-cell table:formula="of:=[.D456]-[.D455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B455]+47" office:value-type="float" office:value="21385" calcext:value-type="float">
            <text:p>21385</text:p>
          </table:table-cell>
          <table:table-cell office:value-type="float" office:value="8640000" calcext:value-type="float">
            <text:p>8640000</text:p>
          </table:table-cell>
          <table:table-cell table:formula="of:=[.B456]/[.C456]" office:value-type="float" office:value="0.00247511574074074" calcext:value-type="float">
            <text:p>0,00247511574074074000</text:p>
          </table:table-cell>
          <table:table-cell table:formula="of:=[.D457]-[.D456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B456]+47" office:value-type="float" office:value="21432" calcext:value-type="float">
            <text:p>21432</text:p>
          </table:table-cell>
          <table:table-cell office:value-type="float" office:value="8640000" calcext:value-type="float">
            <text:p>8640000</text:p>
          </table:table-cell>
          <table:table-cell table:formula="of:=[.B457]/[.C457]" office:value-type="float" office:value="0.00248055555555556" calcext:value-type="float">
            <text:p>0,00248055555555556000</text:p>
          </table:table-cell>
          <table:table-cell table:formula="of:=[.D458]-[.D457]" office:value-type="float" office:value="0.00000543981481481446" calcext:value-type="float">
            <text:p>0,00000543981481481446</text:p>
          </table:table-cell>
          <table:table-cell table:number-columns-repeated="16379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B457]+47" office:value-type="float" office:value="21479" calcext:value-type="float">
            <text:p>21479</text:p>
          </table:table-cell>
          <table:table-cell office:value-type="float" office:value="8640000" calcext:value-type="float">
            <text:p>8640000</text:p>
          </table:table-cell>
          <table:table-cell table:formula="of:=[.B458]/[.C458]" office:value-type="float" office:value="0.00248599537037037" calcext:value-type="float">
            <text:p>0,00248599537037037000</text:p>
          </table:table-cell>
          <table:table-cell table:formula="of:=[.D459]-[.D458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B458]+47" office:value-type="float" office:value="21526" calcext:value-type="float">
            <text:p>21526</text:p>
          </table:table-cell>
          <table:table-cell office:value-type="float" office:value="8640000" calcext:value-type="float">
            <text:p>8640000</text:p>
          </table:table-cell>
          <table:table-cell table:formula="of:=[.B459]/[.C459]" office:value-type="float" office:value="0.00249143518518519" calcext:value-type="float">
            <text:p>0,00249143518518519000</text:p>
          </table:table-cell>
          <table:table-cell table:formula="of:=[.D460]-[.D459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B459]+47" office:value-type="float" office:value="21573" calcext:value-type="float">
            <text:p>21573</text:p>
          </table:table-cell>
          <table:table-cell office:value-type="float" office:value="8640000" calcext:value-type="float">
            <text:p>8640000</text:p>
          </table:table-cell>
          <table:table-cell table:formula="of:=[.B460]/[.C460]" office:value-type="float" office:value="0.002496875" calcext:value-type="float">
            <text:p>0,00249687500000000000</text:p>
          </table:table-cell>
          <table:table-cell table:formula="of:=[.D461]-[.D460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B460]+47" office:value-type="float" office:value="21620" calcext:value-type="float">
            <text:p>21620</text:p>
          </table:table-cell>
          <table:table-cell office:value-type="float" office:value="8640000" calcext:value-type="float">
            <text:p>8640000</text:p>
          </table:table-cell>
          <table:table-cell table:formula="of:=[.B461]/[.C461]" office:value-type="float" office:value="0.00250231481481482" calcext:value-type="float">
            <text:p>0,00250231481481482000</text:p>
          </table:table-cell>
          <table:table-cell table:formula="of:=[.D462]-[.D461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461]+47" office:value-type="float" office:value="21667" calcext:value-type="float">
            <text:p>21667</text:p>
          </table:table-cell>
          <table:table-cell office:value-type="float" office:value="8640000" calcext:value-type="float">
            <text:p>8640000</text:p>
          </table:table-cell>
          <table:table-cell table:formula="of:=[.B462]/[.C462]" office:value-type="float" office:value="0.00250775462962963" calcext:value-type="float">
            <text:p>0,00250775462962963000</text:p>
          </table:table-cell>
          <table:table-cell table:formula="of:=[.D463]-[.D462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B462]+47" office:value-type="float" office:value="21714" calcext:value-type="float">
            <text:p>21714</text:p>
          </table:table-cell>
          <table:table-cell office:value-type="float" office:value="8640000" calcext:value-type="float">
            <text:p>8640000</text:p>
          </table:table-cell>
          <table:table-cell table:formula="of:=[.B463]/[.C463]" office:value-type="float" office:value="0.00251319444444444" calcext:value-type="float">
            <text:p>0,00251319444444444000</text:p>
          </table:table-cell>
          <table:table-cell table:formula="of:=[.D464]-[.D463]" office:value-type="float" office:value="0.00000543981481481446" calcext:value-type="float">
            <text:p>0,00000543981481481446</text:p>
          </table:table-cell>
          <table:table-cell table:number-columns-repeated="16379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B463]+47" office:value-type="float" office:value="21761" calcext:value-type="float">
            <text:p>21761</text:p>
          </table:table-cell>
          <table:table-cell office:value-type="float" office:value="8640000" calcext:value-type="float">
            <text:p>8640000</text:p>
          </table:table-cell>
          <table:table-cell table:formula="of:=[.B464]/[.C464]" office:value-type="float" office:value="0.00251863425925926" calcext:value-type="float">
            <text:p>0,00251863425925926000</text:p>
          </table:table-cell>
          <table:table-cell table:formula="of:=[.D465]-[.D464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B464]+47" office:value-type="float" office:value="21808" calcext:value-type="float">
            <text:p>21808</text:p>
          </table:table-cell>
          <table:table-cell office:value-type="float" office:value="8640000" calcext:value-type="float">
            <text:p>8640000</text:p>
          </table:table-cell>
          <table:table-cell table:formula="of:=[.B465]/[.C465]" office:value-type="float" office:value="0.00252407407407407" calcext:value-type="float">
            <text:p>0,00252407407407407000</text:p>
          </table:table-cell>
          <table:table-cell table:formula="of:=[.D466]-[.D465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B465]+47" office:value-type="float" office:value="21855" calcext:value-type="float">
            <text:p>21855</text:p>
          </table:table-cell>
          <table:table-cell office:value-type="float" office:value="8640000" calcext:value-type="float">
            <text:p>8640000</text:p>
          </table:table-cell>
          <table:table-cell table:formula="of:=[.B466]/[.C466]" office:value-type="float" office:value="0.00252951388888889" calcext:value-type="float">
            <text:p>0,00252951388888889000</text:p>
          </table:table-cell>
          <table:table-cell table:formula="of:=[.D467]-[.D466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B466]+47" office:value-type="float" office:value="21902" calcext:value-type="float">
            <text:p>21902</text:p>
          </table:table-cell>
          <table:table-cell office:value-type="float" office:value="8640000" calcext:value-type="float">
            <text:p>8640000</text:p>
          </table:table-cell>
          <table:table-cell table:formula="of:=[.B467]/[.C467]" office:value-type="float" office:value="0.0025349537037037" calcext:value-type="float">
            <text:p>0,00253495370370370000</text:p>
          </table:table-cell>
          <table:table-cell table:formula="of:=[.D468]-[.D467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B467]+47" office:value-type="float" office:value="21949" calcext:value-type="float">
            <text:p>21949</text:p>
          </table:table-cell>
          <table:table-cell office:value-type="float" office:value="8640000" calcext:value-type="float">
            <text:p>8640000</text:p>
          </table:table-cell>
          <table:table-cell table:formula="of:=[.B468]/[.C468]" office:value-type="float" office:value="0.00254039351851852" calcext:value-type="float">
            <text:p>0,00254039351851852000</text:p>
          </table:table-cell>
          <table:table-cell table:formula="of:=[.D469]-[.D468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B468]+47" office:value-type="float" office:value="21996" calcext:value-type="float">
            <text:p>21996</text:p>
          </table:table-cell>
          <table:table-cell office:value-type="float" office:value="8640000" calcext:value-type="float">
            <text:p>8640000</text:p>
          </table:table-cell>
          <table:table-cell table:formula="of:=[.B469]/[.C469]" office:value-type="float" office:value="0.00254583333333333" calcext:value-type="float">
            <text:p>0,00254583333333333000</text:p>
          </table:table-cell>
          <table:table-cell table:formula="of:=[.D470]-[.D469]" office:value-type="float" office:value="0.00000543981481481446" calcext:value-type="float">
            <text:p>0,00000543981481481446</text:p>
          </table:table-cell>
          <table:table-cell table:number-columns-repeated="16379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B469]+47" office:value-type="float" office:value="22043" calcext:value-type="float">
            <text:p>22043</text:p>
          </table:table-cell>
          <table:table-cell office:value-type="float" office:value="8640000" calcext:value-type="float">
            <text:p>8640000</text:p>
          </table:table-cell>
          <table:table-cell table:formula="of:=[.B470]/[.C470]" office:value-type="float" office:value="0.00255127314814815" calcext:value-type="float">
            <text:p>0,00255127314814815000</text:p>
          </table:table-cell>
          <table:table-cell table:formula="of:=[.D471]-[.D470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B470]+47" office:value-type="float" office:value="22090" calcext:value-type="float">
            <text:p>22090</text:p>
          </table:table-cell>
          <table:table-cell office:value-type="float" office:value="8640000" calcext:value-type="float">
            <text:p>8640000</text:p>
          </table:table-cell>
          <table:table-cell table:formula="of:=[.B471]/[.C471]" office:value-type="float" office:value="0.00255671296296296" calcext:value-type="float">
            <text:p>0,00255671296296296000</text:p>
          </table:table-cell>
          <table:table-cell table:formula="of:=[.D472]-[.D471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B471]+47" office:value-type="float" office:value="22137" calcext:value-type="float">
            <text:p>22137</text:p>
          </table:table-cell>
          <table:table-cell office:value-type="float" office:value="8640000" calcext:value-type="float">
            <text:p>8640000</text:p>
          </table:table-cell>
          <table:table-cell table:formula="of:=[.B472]/[.C472]" office:value-type="float" office:value="0.00256215277777778" calcext:value-type="float">
            <text:p>0,00256215277777778000</text:p>
          </table:table-cell>
          <table:table-cell table:formula="of:=[.D473]-[.D472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B472]+47" office:value-type="float" office:value="22184" calcext:value-type="float">
            <text:p>22184</text:p>
          </table:table-cell>
          <table:table-cell office:value-type="float" office:value="8640000" calcext:value-type="float">
            <text:p>8640000</text:p>
          </table:table-cell>
          <table:table-cell table:formula="of:=[.B473]/[.C473]" office:value-type="float" office:value="0.00256759259259259" calcext:value-type="float">
            <text:p>0,00256759259259259000</text:p>
          </table:table-cell>
          <table:table-cell table:formula="of:=[.D474]-[.D473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B473]+47" office:value-type="float" office:value="22231" calcext:value-type="float">
            <text:p>22231</text:p>
          </table:table-cell>
          <table:table-cell office:value-type="float" office:value="8640000" calcext:value-type="float">
            <text:p>8640000</text:p>
          </table:table-cell>
          <table:table-cell table:formula="of:=[.B474]/[.C474]" office:value-type="float" office:value="0.00257303240740741" calcext:value-type="float">
            <text:p>0,00257303240740741000</text:p>
          </table:table-cell>
          <table:table-cell table:formula="of:=[.D475]-[.D474]" office:value-type="float" office:value="0.00000543981481481446" calcext:value-type="float">
            <text:p>0,00000543981481481446</text:p>
          </table:table-cell>
          <table:table-cell table:number-columns-repeated="16379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B474]+47" office:value-type="float" office:value="22278" calcext:value-type="float">
            <text:p>22278</text:p>
          </table:table-cell>
          <table:table-cell office:value-type="float" office:value="8640000" calcext:value-type="float">
            <text:p>8640000</text:p>
          </table:table-cell>
          <table:table-cell table:formula="of:=[.B475]/[.C475]" office:value-type="float" office:value="0.00257847222222222" calcext:value-type="float">
            <text:p>0,00257847222222222000</text:p>
          </table:table-cell>
          <table:table-cell table:formula="of:=[.D476]-[.D475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B475]+47" office:value-type="float" office:value="22325" calcext:value-type="float">
            <text:p>22325</text:p>
          </table:table-cell>
          <table:table-cell office:value-type="float" office:value="8640000" calcext:value-type="float">
            <text:p>8640000</text:p>
          </table:table-cell>
          <table:table-cell table:formula="of:=[.B476]/[.C476]" office:value-type="float" office:value="0.00258391203703704" calcext:value-type="float">
            <text:p>0,00258391203703704000</text:p>
          </table:table-cell>
          <table:table-cell table:formula="of:=[.D477]-[.D476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B476]+47" office:value-type="float" office:value="22372" calcext:value-type="float">
            <text:p>22372</text:p>
          </table:table-cell>
          <table:table-cell office:value-type="float" office:value="8640000" calcext:value-type="float">
            <text:p>8640000</text:p>
          </table:table-cell>
          <table:table-cell table:formula="of:=[.B477]/[.C477]" office:value-type="float" office:value="0.00258935185185185" calcext:value-type="float">
            <text:p>0,00258935185185185000</text:p>
          </table:table-cell>
          <table:table-cell table:formula="of:=[.D478]-[.D477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B477]+47" office:value-type="float" office:value="22419" calcext:value-type="float">
            <text:p>22419</text:p>
          </table:table-cell>
          <table:table-cell office:value-type="float" office:value="8640000" calcext:value-type="float">
            <text:p>8640000</text:p>
          </table:table-cell>
          <table:table-cell table:formula="of:=[.B478]/[.C478]" office:value-type="float" office:value="0.00259479166666667" calcext:value-type="float">
            <text:p>0,00259479166666667000</text:p>
          </table:table-cell>
          <table:table-cell table:formula="of:=[.D479]-[.D478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B478]+47" office:value-type="float" office:value="22466" calcext:value-type="float">
            <text:p>22466</text:p>
          </table:table-cell>
          <table:table-cell office:value-type="float" office:value="8640000" calcext:value-type="float">
            <text:p>8640000</text:p>
          </table:table-cell>
          <table:table-cell table:formula="of:=[.B479]/[.C479]" office:value-type="float" office:value="0.00260023148148148" calcext:value-type="float">
            <text:p>0,00260023148148148000</text:p>
          </table:table-cell>
          <table:table-cell table:formula="of:=[.D480]-[.D479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B479]+47" office:value-type="float" office:value="22513" calcext:value-type="float">
            <text:p>22513</text:p>
          </table:table-cell>
          <table:table-cell office:value-type="float" office:value="8640000" calcext:value-type="float">
            <text:p>8640000</text:p>
          </table:table-cell>
          <table:table-cell table:formula="of:=[.B480]/[.C480]" office:value-type="float" office:value="0.0026056712962963" calcext:value-type="float">
            <text:p>0,00260567129629630000</text:p>
          </table:table-cell>
          <table:table-cell table:formula="of:=[.D481]-[.D480]" office:value-type="float" office:value="0.00000543981481481446" calcext:value-type="float">
            <text:p>0,00000543981481481446</text:p>
          </table:table-cell>
          <table:table-cell table:number-columns-repeated="16379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B480]+47" office:value-type="float" office:value="22560" calcext:value-type="float">
            <text:p>22560</text:p>
          </table:table-cell>
          <table:table-cell office:value-type="float" office:value="8640000" calcext:value-type="float">
            <text:p>8640000</text:p>
          </table:table-cell>
          <table:table-cell table:formula="of:=[.B481]/[.C481]" office:value-type="float" office:value="0.00261111111111111" calcext:value-type="float">
            <text:p>0,00261111111111111000</text:p>
          </table:table-cell>
          <table:table-cell table:formula="of:=[.D482]-[.D481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B481]+47" office:value-type="float" office:value="22607" calcext:value-type="float">
            <text:p>22607</text:p>
          </table:table-cell>
          <table:table-cell office:value-type="float" office:value="8640000" calcext:value-type="float">
            <text:p>8640000</text:p>
          </table:table-cell>
          <table:table-cell table:formula="of:=[.B482]/[.C482]" office:value-type="float" office:value="0.00261655092592593" calcext:value-type="float">
            <text:p>0,00261655092592593000</text:p>
          </table:table-cell>
          <table:table-cell table:formula="of:=[.D483]-[.D482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B482]+47" office:value-type="float" office:value="22654" calcext:value-type="float">
            <text:p>22654</text:p>
          </table:table-cell>
          <table:table-cell office:value-type="float" office:value="8640000" calcext:value-type="float">
            <text:p>8640000</text:p>
          </table:table-cell>
          <table:table-cell table:formula="of:=[.B483]/[.C483]" office:value-type="float" office:value="0.00262199074074074" calcext:value-type="float">
            <text:p>0,00262199074074074000</text:p>
          </table:table-cell>
          <table:table-cell table:formula="of:=[.D484]-[.D483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B483]+47" office:value-type="float" office:value="22701" calcext:value-type="float">
            <text:p>22701</text:p>
          </table:table-cell>
          <table:table-cell office:value-type="float" office:value="8640000" calcext:value-type="float">
            <text:p>8640000</text:p>
          </table:table-cell>
          <table:table-cell table:formula="of:=[.B484]/[.C484]" office:value-type="float" office:value="0.00262743055555556" calcext:value-type="float">
            <text:p>0,00262743055555556000</text:p>
          </table:table-cell>
          <table:table-cell table:formula="of:=[.D485]-[.D484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B484]+47" office:value-type="float" office:value="22748" calcext:value-type="float">
            <text:p>22748</text:p>
          </table:table-cell>
          <table:table-cell office:value-type="float" office:value="8640000" calcext:value-type="float">
            <text:p>8640000</text:p>
          </table:table-cell>
          <table:table-cell table:formula="of:=[.B485]/[.C485]" office:value-type="float" office:value="0.00263287037037037" calcext:value-type="float">
            <text:p>0,00263287037037037000</text:p>
          </table:table-cell>
          <table:table-cell table:formula="of:=[.D486]-[.D485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B485]+47" office:value-type="float" office:value="22795" calcext:value-type="float">
            <text:p>22795</text:p>
          </table:table-cell>
          <table:table-cell office:value-type="float" office:value="8640000" calcext:value-type="float">
            <text:p>8640000</text:p>
          </table:table-cell>
          <table:table-cell table:formula="of:=[.B486]/[.C486]" office:value-type="float" office:value="0.00263831018518519" calcext:value-type="float">
            <text:p>0,00263831018518519000</text:p>
          </table:table-cell>
          <table:table-cell table:formula="of:=[.D487]-[.D486]" office:value-type="float" office:value="0.00000543981481481446" calcext:value-type="float">
            <text:p>0,00000543981481481446</text:p>
          </table:table-cell>
          <table:table-cell table:number-columns-repeated="16379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B486]+47" office:value-type="float" office:value="22842" calcext:value-type="float">
            <text:p>22842</text:p>
          </table:table-cell>
          <table:table-cell office:value-type="float" office:value="8640000" calcext:value-type="float">
            <text:p>8640000</text:p>
          </table:table-cell>
          <table:table-cell table:formula="of:=[.B487]/[.C487]" office:value-type="float" office:value="0.00264375" calcext:value-type="float">
            <text:p>0,00264375000000000000</text:p>
          </table:table-cell>
          <table:table-cell table:formula="of:=[.D488]-[.D487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B487]+47" office:value-type="float" office:value="22889" calcext:value-type="float">
            <text:p>22889</text:p>
          </table:table-cell>
          <table:table-cell office:value-type="float" office:value="8640000" calcext:value-type="float">
            <text:p>8640000</text:p>
          </table:table-cell>
          <table:table-cell table:formula="of:=[.B488]/[.C488]" office:value-type="float" office:value="0.00264918981481481" calcext:value-type="float">
            <text:p>0,00264918981481481000</text:p>
          </table:table-cell>
          <table:table-cell table:formula="of:=[.D489]-[.D488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B488]+47" office:value-type="float" office:value="22936" calcext:value-type="float">
            <text:p>22936</text:p>
          </table:table-cell>
          <table:table-cell office:value-type="float" office:value="8640000" calcext:value-type="float">
            <text:p>8640000</text:p>
          </table:table-cell>
          <table:table-cell table:formula="of:=[.B489]/[.C489]" office:value-type="float" office:value="0.00265462962962963" calcext:value-type="float">
            <text:p>0,00265462962962963000</text:p>
          </table:table-cell>
          <table:table-cell table:formula="of:=[.D490]-[.D489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B489]+47" office:value-type="float" office:value="22983" calcext:value-type="float">
            <text:p>22983</text:p>
          </table:table-cell>
          <table:table-cell office:value-type="float" office:value="8640000" calcext:value-type="float">
            <text:p>8640000</text:p>
          </table:table-cell>
          <table:table-cell table:formula="of:=[.B490]/[.C490]" office:value-type="float" office:value="0.00266006944444444" calcext:value-type="float">
            <text:p>0,00266006944444444000</text:p>
          </table:table-cell>
          <table:table-cell table:formula="of:=[.D491]-[.D490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B490]+47" office:value-type="float" office:value="23030" calcext:value-type="float">
            <text:p>23030</text:p>
          </table:table-cell>
          <table:table-cell office:value-type="float" office:value="8640000" calcext:value-type="float">
            <text:p>8640000</text:p>
          </table:table-cell>
          <table:table-cell table:formula="of:=[.B491]/[.C491]" office:value-type="float" office:value="0.00266550925925926" calcext:value-type="float">
            <text:p>0,00266550925925926000</text:p>
          </table:table-cell>
          <table:table-cell table:formula="of:=[.D492]-[.D491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B491]+47" office:value-type="float" office:value="23077" calcext:value-type="float">
            <text:p>23077</text:p>
          </table:table-cell>
          <table:table-cell office:value-type="float" office:value="8640000" calcext:value-type="float">
            <text:p>8640000</text:p>
          </table:table-cell>
          <table:table-cell table:formula="of:=[.B492]/[.C492]" office:value-type="float" office:value="0.00267094907407407" calcext:value-type="float">
            <text:p>0,00267094907407407000</text:p>
          </table:table-cell>
          <table:table-cell table:formula="of:=[.D493]-[.D492]" office:value-type="float" office:value="0.00000543981481481446" calcext:value-type="float">
            <text:p>0,00000543981481481446</text:p>
          </table:table-cell>
          <table:table-cell table:number-columns-repeated="16379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B492]+47" office:value-type="float" office:value="23124" calcext:value-type="float">
            <text:p>23124</text:p>
          </table:table-cell>
          <table:table-cell office:value-type="float" office:value="8640000" calcext:value-type="float">
            <text:p>8640000</text:p>
          </table:table-cell>
          <table:table-cell table:formula="of:=[.B493]/[.C493]" office:value-type="float" office:value="0.00267638888888889" calcext:value-type="float">
            <text:p>0,00267638888888889000</text:p>
          </table:table-cell>
          <table:table-cell table:formula="of:=[.D494]-[.D493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B493]+47" office:value-type="float" office:value="23171" calcext:value-type="float">
            <text:p>23171</text:p>
          </table:table-cell>
          <table:table-cell office:value-type="float" office:value="8640000" calcext:value-type="float">
            <text:p>8640000</text:p>
          </table:table-cell>
          <table:table-cell table:formula="of:=[.B494]/[.C494]" office:value-type="float" office:value="0.0026818287037037" calcext:value-type="float">
            <text:p>0,00268182870370370000</text:p>
          </table:table-cell>
          <table:table-cell table:formula="of:=[.D495]-[.D494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B494]+47" office:value-type="float" office:value="23218" calcext:value-type="float">
            <text:p>23218</text:p>
          </table:table-cell>
          <table:table-cell office:value-type="float" office:value="8640000" calcext:value-type="float">
            <text:p>8640000</text:p>
          </table:table-cell>
          <table:table-cell table:formula="of:=[.B495]/[.C495]" office:value-type="float" office:value="0.00268726851851852" calcext:value-type="float">
            <text:p>0,00268726851851852000</text:p>
          </table:table-cell>
          <table:table-cell table:formula="of:=[.D496]-[.D495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B495]+47" office:value-type="float" office:value="23265" calcext:value-type="float">
            <text:p>23265</text:p>
          </table:table-cell>
          <table:table-cell office:value-type="float" office:value="8640000" calcext:value-type="float">
            <text:p>8640000</text:p>
          </table:table-cell>
          <table:table-cell table:formula="of:=[.B496]/[.C496]" office:value-type="float" office:value="0.00269270833333333" calcext:value-type="float">
            <text:p>0,00269270833333333000</text:p>
          </table:table-cell>
          <table:table-cell table:formula="of:=[.D497]-[.D496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B496]+47" office:value-type="float" office:value="23312" calcext:value-type="float">
            <text:p>23312</text:p>
          </table:table-cell>
          <table:table-cell office:value-type="float" office:value="8640000" calcext:value-type="float">
            <text:p>8640000</text:p>
          </table:table-cell>
          <table:table-cell table:formula="of:=[.B497]/[.C497]" office:value-type="float" office:value="0.00269814814814815" calcext:value-type="float">
            <text:p>0,00269814814814815000</text:p>
          </table:table-cell>
          <table:table-cell table:formula="of:=[.D498]-[.D497]" office:value-type="float" office:value="0.00000543981481481446" calcext:value-type="float">
            <text:p>0,00000543981481481446</text:p>
          </table:table-cell>
          <table:table-cell table:number-columns-repeated="16379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B497]+47" office:value-type="float" office:value="23359" calcext:value-type="float">
            <text:p>23359</text:p>
          </table:table-cell>
          <table:table-cell office:value-type="float" office:value="8640000" calcext:value-type="float">
            <text:p>8640000</text:p>
          </table:table-cell>
          <table:table-cell table:formula="of:=[.B498]/[.C498]" office:value-type="float" office:value="0.00270358796296296" calcext:value-type="float">
            <text:p>0,00270358796296296000</text:p>
          </table:table-cell>
          <table:table-cell table:formula="of:=[.D499]-[.D498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B498]+47" office:value-type="float" office:value="23406" calcext:value-type="float">
            <text:p>23406</text:p>
          </table:table-cell>
          <table:table-cell office:value-type="float" office:value="8640000" calcext:value-type="float">
            <text:p>8640000</text:p>
          </table:table-cell>
          <table:table-cell table:formula="of:=[.B499]/[.C499]" office:value-type="float" office:value="0.00270902777777778" calcext:value-type="float">
            <text:p>0,00270902777777778000</text:p>
          </table:table-cell>
          <table:table-cell table:formula="of:=[.D500]-[.D499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B499]+47" office:value-type="float" office:value="23453" calcext:value-type="float">
            <text:p>23453</text:p>
          </table:table-cell>
          <table:table-cell office:value-type="float" office:value="8640000" calcext:value-type="float">
            <text:p>8640000</text:p>
          </table:table-cell>
          <table:table-cell table:formula="of:=[.B500]/[.C500]" office:value-type="float" office:value="0.00271446759259259" calcext:value-type="float">
            <text:p>0,00271446759259259000</text:p>
          </table:table-cell>
          <table:table-cell table:formula="of:=[.D501]-[.D500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500]+47" office:value-type="float" office:value="23500" calcext:value-type="float">
            <text:p>23500</text:p>
          </table:table-cell>
          <table:table-cell office:value-type="float" office:value="8640000" calcext:value-type="float">
            <text:p>8640000</text:p>
          </table:table-cell>
          <table:table-cell table:formula="of:=[.B501]/[.C501]" office:value-type="float" office:value="0.00271990740740741" calcext:value-type="float">
            <text:p>0,00271990740740741000</text:p>
          </table:table-cell>
          <table:table-cell table:formula="of:=[.D502]-[.D501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B501]+47" office:value-type="float" office:value="23547" calcext:value-type="float">
            <text:p>23547</text:p>
          </table:table-cell>
          <table:table-cell office:value-type="float" office:value="8640000" calcext:value-type="float">
            <text:p>8640000</text:p>
          </table:table-cell>
          <table:table-cell table:formula="of:=[.B502]/[.C502]" office:value-type="float" office:value="0.00272534722222222" calcext:value-type="float">
            <text:p>0,00272534722222222000</text:p>
          </table:table-cell>
          <table:table-cell table:formula="of:=[.D503]-[.D502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B502]+47" office:value-type="float" office:value="23594" calcext:value-type="float">
            <text:p>23594</text:p>
          </table:table-cell>
          <table:table-cell office:value-type="float" office:value="8640000" calcext:value-type="float">
            <text:p>8640000</text:p>
          </table:table-cell>
          <table:table-cell table:formula="of:=[.B503]/[.C503]" office:value-type="float" office:value="0.00273078703703704" calcext:value-type="float">
            <text:p>0,00273078703703704000</text:p>
          </table:table-cell>
          <table:table-cell table:formula="of:=[.D504]-[.D503]" office:value-type="float" office:value="0.00000543981481481446" calcext:value-type="float">
            <text:p>0,00000543981481481446</text:p>
          </table:table-cell>
          <table:table-cell table:number-columns-repeated="16379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B503]+47" office:value-type="float" office:value="23641" calcext:value-type="float">
            <text:p>23641</text:p>
          </table:table-cell>
          <table:table-cell office:value-type="float" office:value="8640000" calcext:value-type="float">
            <text:p>8640000</text:p>
          </table:table-cell>
          <table:table-cell table:formula="of:=[.B504]/[.C504]" office:value-type="float" office:value="0.00273622685185185" calcext:value-type="float">
            <text:p>0,00273622685185185000</text:p>
          </table:table-cell>
          <table:table-cell table:formula="of:=[.D505]-[.D504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B504]+47" office:value-type="float" office:value="23688" calcext:value-type="float">
            <text:p>23688</text:p>
          </table:table-cell>
          <table:table-cell office:value-type="float" office:value="8640000" calcext:value-type="float">
            <text:p>8640000</text:p>
          </table:table-cell>
          <table:table-cell table:formula="of:=[.B505]/[.C505]" office:value-type="float" office:value="0.00274166666666667" calcext:value-type="float">
            <text:p>0,00274166666666667000</text:p>
          </table:table-cell>
          <table:table-cell table:formula="of:=[.D506]-[.D505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B505]+47" office:value-type="float" office:value="23735" calcext:value-type="float">
            <text:p>23735</text:p>
          </table:table-cell>
          <table:table-cell office:value-type="float" office:value="8640000" calcext:value-type="float">
            <text:p>8640000</text:p>
          </table:table-cell>
          <table:table-cell table:formula="of:=[.B506]/[.C506]" office:value-type="float" office:value="0.00274710648148148" calcext:value-type="float">
            <text:p>0,00274710648148148000</text:p>
          </table:table-cell>
          <table:table-cell table:formula="of:=[.D507]-[.D506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B506]+47" office:value-type="float" office:value="23782" calcext:value-type="float">
            <text:p>23782</text:p>
          </table:table-cell>
          <table:table-cell office:value-type="float" office:value="8640000" calcext:value-type="float">
            <text:p>8640000</text:p>
          </table:table-cell>
          <table:table-cell table:formula="of:=[.B507]/[.C507]" office:value-type="float" office:value="0.0027525462962963" calcext:value-type="float">
            <text:p>0,00275254629629630000</text:p>
          </table:table-cell>
          <table:table-cell table:formula="of:=[.D508]-[.D507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B507]+47" office:value-type="float" office:value="23829" calcext:value-type="float">
            <text:p>23829</text:p>
          </table:table-cell>
          <table:table-cell office:value-type="float" office:value="8640000" calcext:value-type="float">
            <text:p>8640000</text:p>
          </table:table-cell>
          <table:table-cell table:formula="of:=[.B508]/[.C508]" office:value-type="float" office:value="0.00275798611111111" calcext:value-type="float">
            <text:p>0,00275798611111111000</text:p>
          </table:table-cell>
          <table:table-cell table:formula="of:=[.D509]-[.D508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B508]+47" office:value-type="float" office:value="23876" calcext:value-type="float">
            <text:p>23876</text:p>
          </table:table-cell>
          <table:table-cell office:value-type="float" office:value="8640000" calcext:value-type="float">
            <text:p>8640000</text:p>
          </table:table-cell>
          <table:table-cell table:formula="of:=[.B509]/[.C509]" office:value-type="float" office:value="0.00276342592592593" calcext:value-type="float">
            <text:p>0,00276342592592593000</text:p>
          </table:table-cell>
          <table:table-cell table:formula="of:=[.D510]-[.D509]" office:value-type="float" office:value="0.00000543981481481446" calcext:value-type="float">
            <text:p>0,00000543981481481446</text:p>
          </table:table-cell>
          <table:table-cell table:number-columns-repeated="16379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B509]+47" office:value-type="float" office:value="23923" calcext:value-type="float">
            <text:p>23923</text:p>
          </table:table-cell>
          <table:table-cell office:value-type="float" office:value="8640000" calcext:value-type="float">
            <text:p>8640000</text:p>
          </table:table-cell>
          <table:table-cell table:formula="of:=[.B510]/[.C510]" office:value-type="float" office:value="0.00276886574074074" calcext:value-type="float">
            <text:p>0,00276886574074074000</text:p>
          </table:table-cell>
          <table:table-cell table:formula="of:=[.D511]-[.D510]" office:value-type="float" office:value="0.00000543981481481489" calcext:value-type="float">
            <text:p>0,00000543981481481489</text:p>
          </table:table-cell>
          <table:table-cell table:number-columns-repeated="16379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B510]+47" office:value-type="float" office:value="23970" calcext:value-type="float">
            <text:p>23970</text:p>
          </table:table-cell>
          <table:table-cell office:value-type="float" office:value="8640000" calcext:value-type="float">
            <text:p>8640000</text:p>
          </table:table-cell>
          <table:table-cell table:formula="of:=[.B511]/[.C511]" office:value-type="float" office:value="0.00277430555555556" calcext:value-type="float">
            <text:p>0,00277430555555556000</text:p>
          </table:table-cell>
          <table:table-cell table:formula="of:=#REF!-[.D511]" office:value-type="string" office:string-value="" calcext:value-type="error">
            <text:p>#REF!</text:p>
          </table:table-cell>
          <table:table-cell table:number-columns-repeated="16379"/>
        </table:table-row>
        <table:table-row table:style-name="ro1" table:number-rows-repeated="10480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7:43:03.181171402</meta:creation-date>
    <dc:date>2026-05-17T17:43:12.247056674</dc:date>
    <meta:editing-duration>PT10S</meta:editing-duration>
    <meta:editing-cycles>1</meta:editing-cycles>
    <meta:document-statistic meta:table-count="1" meta:cell-count="2555" meta:object-count="0"/>
    <meta:generator>LibreOffice/24.2.7.2$Linux_X86_64 LibreOffice_project/420$Build-2</meta:generator>
  </office:meta>
</office:document-meta>
</file>