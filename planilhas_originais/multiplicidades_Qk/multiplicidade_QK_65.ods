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8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6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column table:style-name="co2" table:number-columns-repeated="16379" table:default-cell-style-name="ce2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65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752314814814815" calcext:value-type="float">
            <text:p>0,00000752314814814815</text:p>
          </table:table-cell>
          <table:table-cell table:formula="of:=[.D3]-[.D2]" office:value-type="float" office:value="0.00000752314814814815" calcext:value-type="float">
            <text:p>0,00000752314814814815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65" office:value-type="float" office:value="130" calcext:value-type="float">
            <text:p>130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150462962962963" calcext:value-type="float">
            <text:p>0,00001504629629629630</text:p>
          </table:table-cell>
          <table:table-cell table:formula="of:=[.D4]-[.D3]" office:value-type="float" office:value="0.00000752314814814815" calcext:value-type="float">
            <text:p>0,00000752314814814815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65" office:value-type="float" office:value="195" calcext:value-type="float">
            <text:p>195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225694444444444" calcext:value-type="float">
            <text:p>0,00002256944444444450</text:p>
          </table:table-cell>
          <table:table-cell table:formula="of:=[.D5]-[.D4]" office:value-type="float" office:value="0.00000752314814814815" calcext:value-type="float">
            <text:p>0,00000752314814814815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65" office:value-type="float" office:value="260" calcext:value-type="float">
            <text:p>260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300925925925926" calcext:value-type="float">
            <text:p>0,00003009259259259260</text:p>
          </table:table-cell>
          <table:table-cell table:formula="of:=[.D6]-[.D5]" office:value-type="float" office:value="0.00000752314814814815" calcext:value-type="float">
            <text:p>0,00000752314814814815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65" office:value-type="float" office:value="325" calcext:value-type="float">
            <text:p>325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376157407407407" calcext:value-type="float">
            <text:p>0,00003761574074074080</text:p>
          </table:table-cell>
          <table:table-cell table:formula="of:=[.D7]-[.D6]" office:value-type="float" office:value="0.00000752314814814814" calcext:value-type="float">
            <text:p>0,00000752314814814814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65" office:value-type="float" office:value="390" calcext:value-type="float">
            <text:p>390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451388888888889" calcext:value-type="float">
            <text:p>0,00004513888888888890</text:p>
          </table:table-cell>
          <table:table-cell table:formula="of:=[.D8]-[.D7]" office:value-type="float" office:value="0.00000752314814814815" calcext:value-type="float">
            <text:p>0,00000752314814814815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65" office:value-type="float" office:value="455" calcext:value-type="float">
            <text:p>455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52662037037037" calcext:value-type="float">
            <text:p>0,00005266203703703700</text:p>
          </table:table-cell>
          <table:table-cell table:formula="of:=[.D9]-[.D8]" office:value-type="float" office:value="0.00000752314814814815" calcext:value-type="float">
            <text:p>0,00000752314814814815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65" office:value-type="float" office:value="520" calcext:value-type="float">
            <text:p>520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601851851851852" calcext:value-type="float">
            <text:p>0,00006018518518518520</text:p>
          </table:table-cell>
          <table:table-cell table:formula="of:=[.D10]-[.D9]" office:value-type="float" office:value="0.00000752314814814814" calcext:value-type="float">
            <text:p>0,00000752314814814814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65" office:value-type="float" office:value="585" calcext:value-type="float">
            <text:p>585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677083333333333" calcext:value-type="float">
            <text:p>0,00006770833333333330</text:p>
          </table:table-cell>
          <table:table-cell table:formula="of:=[.D11]-[.D10]" office:value-type="float" office:value="0.00000752314814814816" calcext:value-type="float">
            <text:p>0,00000752314814814816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65" office:value-type="float" office:value="650" calcext:value-type="float">
            <text:p>65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752314814814815" calcext:value-type="float">
            <text:p>0,00007523148148148150</text:p>
          </table:table-cell>
          <table:table-cell table:formula="of:=[.D12]-[.D11]" office:value-type="float" office:value="0.00000752314814814814" calcext:value-type="float">
            <text:p>0,00000752314814814814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65" office:value-type="float" office:value="715" calcext:value-type="float">
            <text:p>715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827546296296296" calcext:value-type="float">
            <text:p>0,00008275462962962960</text:p>
          </table:table-cell>
          <table:table-cell table:formula="of:=[.D13]-[.D12]" office:value-type="float" office:value="0.00000752314814814814" calcext:value-type="float">
            <text:p>0,00000752314814814814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65" office:value-type="float" office:value="780" calcext:value-type="float">
            <text:p>780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902777777777778" calcext:value-type="float">
            <text:p>0,00009027777777777780</text:p>
          </table:table-cell>
          <table:table-cell table:formula="of:=[.D14]-[.D13]" office:value-type="float" office:value="0.00000752314814814816" calcext:value-type="float">
            <text:p>0,00000752314814814816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65" office:value-type="float" office:value="845" calcext:value-type="float">
            <text:p>845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978009259259259" calcext:value-type="float">
            <text:p>0,00009780092592592590</text:p>
          </table:table-cell>
          <table:table-cell table:formula="of:=[.D15]-[.D14]" office:value-type="float" office:value="0.00000752314814814814" calcext:value-type="float">
            <text:p>0,00000752314814814814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65" office:value-type="float" office:value="910" calcext:value-type="float">
            <text:p>910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105324074074074" calcext:value-type="float">
            <text:p>0,00010532407407407400</text:p>
          </table:table-cell>
          <table:table-cell table:formula="of:=[.D16]-[.D15]" office:value-type="float" office:value="0.00000752314814814814" calcext:value-type="float">
            <text:p>0,00000752314814814814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65" office:value-type="float" office:value="975" calcext:value-type="float">
            <text:p>975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112847222222222" calcext:value-type="float">
            <text:p>0,00011284722222222200</text:p>
          </table:table-cell>
          <table:table-cell table:formula="of:=[.D17]-[.D16]" office:value-type="float" office:value="0.00000752314814814816" calcext:value-type="float">
            <text:p>0,00000752314814814816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65" office:value-type="float" office:value="1040" calcext:value-type="float">
            <text:p>1040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12037037037037" calcext:value-type="float">
            <text:p>0,00012037037037037000</text:p>
          </table:table-cell>
          <table:table-cell table:formula="of:=[.D18]-[.D17]" office:value-type="float" office:value="0.00000752314814814816" calcext:value-type="float">
            <text:p>0,00000752314814814816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65" office:value-type="float" office:value="1105" calcext:value-type="float">
            <text:p>1105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127893518518519" calcext:value-type="float">
            <text:p>0,00012789351851851900</text:p>
          </table:table-cell>
          <table:table-cell table:formula="of:=[.D19]-[.D18]" office:value-type="float" office:value="0.00000752314814814813" calcext:value-type="float">
            <text:p>0,00000752314814814813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65" office:value-type="float" office:value="1170" calcext:value-type="float">
            <text:p>1170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135416666666667" calcext:value-type="float">
            <text:p>0,00013541666666666700</text:p>
          </table:table-cell>
          <table:table-cell table:formula="of:=[.D20]-[.D19]" office:value-type="float" office:value="0.00000752314814814816" calcext:value-type="float">
            <text:p>0,00000752314814814816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65" office:value-type="float" office:value="1235" calcext:value-type="float">
            <text:p>1235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142939814814815" calcext:value-type="float">
            <text:p>0,00014293981481481500</text:p>
          </table:table-cell>
          <table:table-cell table:formula="of:=[.D21]-[.D20]" office:value-type="float" office:value="0.00000752314814814816" calcext:value-type="float">
            <text:p>0,00000752314814814816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65" office:value-type="float" office:value="1300" calcext:value-type="float">
            <text:p>130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150462962962963" calcext:value-type="float">
            <text:p>0,00015046296296296300</text:p>
          </table:table-cell>
          <table:table-cell table:formula="of:=[.D22]-[.D21]" office:value-type="float" office:value="0.00000752314814814813" calcext:value-type="float">
            <text:p>0,00000752314814814813</text:p>
          </table:table-cell>
          <table:table-cell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65" office:value-type="float" office:value="1365" calcext:value-type="float">
            <text:p>1365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157986111111111" calcext:value-type="float">
            <text:p>0,00015798611111111100</text:p>
          </table:table-cell>
          <table:table-cell table:formula="of:=[.D23]-[.D22]" office:value-type="float" office:value="0.00000752314814814816" calcext:value-type="float">
            <text:p>0,00000752314814814816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65" office:value-type="float" office:value="1430" calcext:value-type="float">
            <text:p>1430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165509259259259" calcext:value-type="float">
            <text:p>0,00016550925925925900</text:p>
          </table:table-cell>
          <table:table-cell table:formula="of:=[.D24]-[.D23]" office:value-type="float" office:value="0.00000752314814814816" calcext:value-type="float">
            <text:p>0,00000752314814814816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65" office:value-type="float" office:value="1495" calcext:value-type="float">
            <text:p>1495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173032407407407" calcext:value-type="float">
            <text:p>0,00017303240740740700</text:p>
          </table:table-cell>
          <table:table-cell table:formula="of:=[.D25]-[.D24]" office:value-type="float" office:value="0.00000752314814814813" calcext:value-type="float">
            <text:p>0,00000752314814814813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65" office:value-type="float" office:value="1560" calcext:value-type="float">
            <text:p>1560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180555555555556" calcext:value-type="float">
            <text:p>0,00018055555555555600</text:p>
          </table:table-cell>
          <table:table-cell table:formula="of:=[.D26]-[.D25]" office:value-type="float" office:value="0.00000752314814814816" calcext:value-type="float">
            <text:p>0,00000752314814814816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65" office:value-type="float" office:value="1625" calcext:value-type="float">
            <text:p>1625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188078703703704" calcext:value-type="float">
            <text:p>0,00018807870370370400</text:p>
          </table:table-cell>
          <table:table-cell table:formula="of:=[.D27]-[.D26]" office:value-type="float" office:value="0.00000752314814814816" calcext:value-type="float">
            <text:p>0,00000752314814814816</text:p>
          </table:table-cell>
          <table:table-cell table:number-columns-repeated="1637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65" office:value-type="float" office:value="1690" calcext:value-type="float">
            <text:p>1690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195601851851852" calcext:value-type="float">
            <text:p>0,00019560185185185200</text:p>
          </table:table-cell>
          <table:table-cell table:formula="of:=[.D28]-[.D27]" office:value-type="float" office:value="0.00000752314814814813" calcext:value-type="float">
            <text:p>0,00000752314814814813</text:p>
          </table:table-cell>
          <table:table-cell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65" office:value-type="float" office:value="1755" calcext:value-type="float">
            <text:p>1755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203125" calcext:value-type="float">
            <text:p>0,00020312500000000000</text:p>
          </table:table-cell>
          <table:table-cell table:formula="of:=[.D29]-[.D28]" office:value-type="float" office:value="0.00000752314814814816" calcext:value-type="float">
            <text:p>0,00000752314814814816</text:p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65" office:value-type="float" office:value="1820" calcext:value-type="float">
            <text:p>1820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210648148148148" calcext:value-type="float">
            <text:p>0,00021064814814814800</text:p>
          </table:table-cell>
          <table:table-cell table:formula="of:=[.D30]-[.D29]" office:value-type="float" office:value="0.00000752314814814816" calcext:value-type="float">
            <text:p>0,00000752314814814816</text:p>
          </table:table-cell>
          <table:table-cell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65" office:value-type="float" office:value="1885" calcext:value-type="float">
            <text:p>1885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218171296296296" calcext:value-type="float">
            <text:p>0,00021817129629629600</text:p>
          </table:table-cell>
          <table:table-cell table:formula="of:=[.D31]-[.D30]" office:value-type="float" office:value="0.00000752314814814813" calcext:value-type="float">
            <text:p>0,00000752314814814813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65" office:value-type="float" office:value="1950" calcext:value-type="float">
            <text:p>195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225694444444444" calcext:value-type="float">
            <text:p>0,00022569444444444400</text:p>
          </table:table-cell>
          <table:table-cell table:formula="of:=[.D32]-[.D31]" office:value-type="float" office:value="0.00000752314814814816" calcext:value-type="float">
            <text:p>0,00000752314814814816</text:p>
          </table:table-cell>
          <table:table-cell table:number-columns-repeated="1637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65" office:value-type="float" office:value="2015" calcext:value-type="float">
            <text:p>2015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233217592592593" calcext:value-type="float">
            <text:p>0,00023321759259259300</text:p>
          </table:table-cell>
          <table:table-cell table:formula="of:=[.D33]-[.D32]" office:value-type="float" office:value="0.00000752314814814816" calcext:value-type="float">
            <text:p>0,00000752314814814816</text:p>
          </table:table-cell>
          <table:table-cell table:number-columns-repeated="1637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65" office:value-type="float" office:value="2080" calcext:value-type="float">
            <text:p>2080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240740740740741" calcext:value-type="float">
            <text:p>0,00024074074074074100</text:p>
          </table:table-cell>
          <table:table-cell table:formula="of:=[.D34]-[.D33]" office:value-type="float" office:value="0.00000752314814814816" calcext:value-type="float">
            <text:p>0,00000752314814814816</text:p>
          </table:table-cell>
          <table:table-cell table:number-columns-repeated="1637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65" office:value-type="float" office:value="2145" calcext:value-type="float">
            <text:p>2145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248263888888889" calcext:value-type="float">
            <text:p>0,00024826388888888900</text:p>
          </table:table-cell>
          <table:table-cell table:formula="of:=[.D35]-[.D34]" office:value-type="float" office:value="0.00000752314814814816" calcext:value-type="float">
            <text:p>0,00000752314814814816</text:p>
          </table:table-cell>
          <table:table-cell table:number-columns-repeated="1637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65" office:value-type="float" office:value="2210" calcext:value-type="float">
            <text:p>2210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255787037037037" calcext:value-type="float">
            <text:p>0,00025578703703703700</text:p>
          </table:table-cell>
          <table:table-cell table:formula="of:=[.D36]-[.D35]" office:value-type="float" office:value="0.0000075231481481481" calcext:value-type="float">
            <text:p>0,00000752314814814810</text:p>
          </table:table-cell>
          <table:table-cell table:number-columns-repeated="1637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65" office:value-type="float" office:value="2275" calcext:value-type="float">
            <text:p>2275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263310185185185" calcext:value-type="float">
            <text:p>0,00026331018518518500</text:p>
          </table:table-cell>
          <table:table-cell table:formula="of:=[.D37]-[.D36]" office:value-type="float" office:value="0.00000752314814814816" calcext:value-type="float">
            <text:p>0,00000752314814814816</text:p>
          </table:table-cell>
          <table:table-cell table:number-columns-repeated="1637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65" office:value-type="float" office:value="2340" calcext:value-type="float">
            <text:p>2340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270833333333333" calcext:value-type="float">
            <text:p>0,00027083333333333300</text:p>
          </table:table-cell>
          <table:table-cell table:formula="of:=[.D38]-[.D37]" office:value-type="float" office:value="0.00000752314814814816" calcext:value-type="float">
            <text:p>0,00000752314814814816</text:p>
          </table:table-cell>
          <table:table-cell table:number-columns-repeated="1637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65" office:value-type="float" office:value="2405" calcext:value-type="float">
            <text:p>2405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278356481481482" calcext:value-type="float">
            <text:p>0,00027835648148148200</text:p>
          </table:table-cell>
          <table:table-cell table:formula="of:=[.D39]-[.D38]" office:value-type="float" office:value="0.00000752314814814816" calcext:value-type="float">
            <text:p>0,00000752314814814816</text:p>
          </table:table-cell>
          <table:table-cell table:number-columns-repeated="1637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65" office:value-type="float" office:value="2470" calcext:value-type="float">
            <text:p>2470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28587962962963" calcext:value-type="float">
            <text:p>0,00028587962962963000</text:p>
          </table:table-cell>
          <table:table-cell table:formula="of:=[.D40]-[.D39]" office:value-type="float" office:value="0.00000752314814814816" calcext:value-type="float">
            <text:p>0,00000752314814814816</text:p>
          </table:table-cell>
          <table:table-cell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65" office:value-type="float" office:value="2535" calcext:value-type="float">
            <text:p>2535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293402777777778" calcext:value-type="float">
            <text:p>0,00029340277777777800</text:p>
          </table:table-cell>
          <table:table-cell table:formula="of:=[.D41]-[.D40]" office:value-type="float" office:value="0.00000752314814814816" calcext:value-type="float">
            <text:p>0,00000752314814814816</text:p>
          </table:table-cell>
          <table:table-cell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65" office:value-type="float" office:value="2600" calcext:value-type="float">
            <text:p>260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300925925925926" calcext:value-type="float">
            <text:p>0,00030092592592592600</text:p>
          </table:table-cell>
          <table:table-cell table:formula="of:=[.D42]-[.D41]" office:value-type="float" office:value="0.0000075231481481481" calcext:value-type="float">
            <text:p>0,00000752314814814810</text:p>
          </table:table-cell>
          <table:table-cell table:number-columns-repeated="1637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65" office:value-type="float" office:value="2665" calcext:value-type="float">
            <text:p>2665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308449074074074" calcext:value-type="float">
            <text:p>0,00030844907407407400</text:p>
          </table:table-cell>
          <table:table-cell table:formula="of:=[.D43]-[.D42]" office:value-type="float" office:value="0.00000752314814814816" calcext:value-type="float">
            <text:p>0,00000752314814814816</text:p>
          </table:table-cell>
          <table:table-cell table:number-columns-repeated="1637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65" office:value-type="float" office:value="2730" calcext:value-type="float">
            <text:p>2730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315972222222222" calcext:value-type="float">
            <text:p>0,00031597222222222200</text:p>
          </table:table-cell>
          <table:table-cell table:formula="of:=[.D44]-[.D43]" office:value-type="float" office:value="0.00000752314814814816" calcext:value-type="float">
            <text:p>0,00000752314814814816</text:p>
          </table:table-cell>
          <table:table-cell table:number-columns-repeated="1637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65" office:value-type="float" office:value="2795" calcext:value-type="float">
            <text:p>2795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32349537037037" calcext:value-type="float">
            <text:p>0,00032349537037037000</text:p>
          </table:table-cell>
          <table:table-cell table:formula="of:=[.D45]-[.D44]" office:value-type="float" office:value="0.00000752314814814816" calcext:value-type="float">
            <text:p>0,00000752314814814816</text:p>
          </table:table-cell>
          <table:table-cell table:number-columns-repeated="1637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65" office:value-type="float" office:value="2860" calcext:value-type="float">
            <text:p>2860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331018518518519" calcext:value-type="float">
            <text:p>0,00033101851851851900</text:p>
          </table:table-cell>
          <table:table-cell table:formula="of:=[.D46]-[.D45]" office:value-type="float" office:value="0.00000752314814814816" calcext:value-type="float">
            <text:p>0,00000752314814814816</text:p>
          </table:table-cell>
          <table:table-cell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65" office:value-type="float" office:value="2925" calcext:value-type="float">
            <text:p>2925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338541666666667" calcext:value-type="float">
            <text:p>0,00033854166666666700</text:p>
          </table:table-cell>
          <table:table-cell table:formula="of:=[.D47]-[.D46]" office:value-type="float" office:value="0.00000752314814814816" calcext:value-type="float">
            <text:p>0,00000752314814814816</text:p>
          </table:table-cell>
          <table:table-cell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65" office:value-type="float" office:value="2990" calcext:value-type="float">
            <text:p>2990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346064814814815" calcext:value-type="float">
            <text:p>0,00034606481481481500</text:p>
          </table:table-cell>
          <table:table-cell table:formula="of:=[.D48]-[.D47]" office:value-type="float" office:value="0.0000075231481481481" calcext:value-type="float">
            <text:p>0,00000752314814814810</text:p>
          </table:table-cell>
          <table:table-cell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65" office:value-type="float" office:value="3055" calcext:value-type="float">
            <text:p>3055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353587962962963" calcext:value-type="float">
            <text:p>0,00035358796296296300</text:p>
          </table:table-cell>
          <table:table-cell table:formula="of:=[.D49]-[.D48]" office:value-type="float" office:value="0.00000752314814814816" calcext:value-type="float">
            <text:p>0,00000752314814814816</text:p>
          </table:table-cell>
          <table:table-cell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65" office:value-type="float" office:value="3120" calcext:value-type="float">
            <text:p>3120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361111111111111" calcext:value-type="float">
            <text:p>0,00036111111111111100</text:p>
          </table:table-cell>
          <table:table-cell table:formula="of:=[.D50]-[.D49]" office:value-type="float" office:value="0.00000752314814814816" calcext:value-type="float">
            <text:p>0,00000752314814814816</text:p>
          </table:table-cell>
          <table:table-cell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65" office:value-type="float" office:value="3185" calcext:value-type="float">
            <text:p>3185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368634259259259" calcext:value-type="float">
            <text:p>0,00036863425925925900</text:p>
          </table:table-cell>
          <table:table-cell table:formula="of:=[.D51]-[.D50]" office:value-type="float" office:value="0.00000752314814814816" calcext:value-type="float">
            <text:p>0,00000752314814814816</text:p>
          </table:table-cell>
          <table:table-cell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65" office:value-type="float" office:value="3250" calcext:value-type="float">
            <text:p>325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376157407407407" calcext:value-type="float">
            <text:p>0,00037615740740740700</text:p>
          </table:table-cell>
          <table:table-cell table:formula="of:=[.D52]-[.D51]" office:value-type="float" office:value="0.00000752314814814816" calcext:value-type="float">
            <text:p>0,00000752314814814816</text:p>
          </table:table-cell>
          <table:table-cell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65" office:value-type="float" office:value="3315" calcext:value-type="float">
            <text:p>3315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383680555555556" calcext:value-type="float">
            <text:p>0,00038368055555555600</text:p>
          </table:table-cell>
          <table:table-cell table:formula="of:=[.D53]-[.D52]" office:value-type="float" office:value="0.00000752314814814816" calcext:value-type="float">
            <text:p>0,00000752314814814816</text:p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65" office:value-type="float" office:value="3380" calcext:value-type="float">
            <text:p>3380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391203703703704" calcext:value-type="float">
            <text:p>0,00039120370370370400</text:p>
          </table:table-cell>
          <table:table-cell table:formula="of:=[.D54]-[.D53]" office:value-type="float" office:value="0.00000752314814814816" calcext:value-type="float">
            <text:p>0,00000752314814814816</text:p>
          </table:table-cell>
          <table:table-cell table:number-columns-repeated="1637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65" office:value-type="float" office:value="3445" calcext:value-type="float">
            <text:p>3445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398726851851852" calcext:value-type="float">
            <text:p>0,00039872685185185200</text:p>
          </table:table-cell>
          <table:table-cell table:formula="of:=[.D55]-[.D54]" office:value-type="float" office:value="0.0000075231481481481" calcext:value-type="float">
            <text:p>0,00000752314814814810</text:p>
          </table:table-cell>
          <table:table-cell table:number-columns-repeated="1637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65" office:value-type="float" office:value="3510" calcext:value-type="float">
            <text:p>3510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40625" calcext:value-type="float">
            <text:p>0,00040625000000000000</text:p>
          </table:table-cell>
          <table:table-cell table:formula="of:=[.D56]-[.D55]" office:value-type="float" office:value="0.00000752314814814816" calcext:value-type="float">
            <text:p>0,00000752314814814816</text:p>
          </table:table-cell>
          <table:table-cell table:number-columns-repeated="1637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65" office:value-type="float" office:value="3575" calcext:value-type="float">
            <text:p>3575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413773148148148" calcext:value-type="float">
            <text:p>0,00041377314814814800</text:p>
          </table:table-cell>
          <table:table-cell table:formula="of:=[.D57]-[.D56]" office:value-type="float" office:value="0.00000752314814814816" calcext:value-type="float">
            <text:p>0,00000752314814814816</text:p>
          </table:table-cell>
          <table:table-cell table:number-columns-repeated="1637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65" office:value-type="float" office:value="3640" calcext:value-type="float">
            <text:p>3640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421296296296296" calcext:value-type="float">
            <text:p>0,00042129629629629600</text:p>
          </table:table-cell>
          <table:table-cell table:formula="of:=[.D58]-[.D57]" office:value-type="float" office:value="0.00000752314814814816" calcext:value-type="float">
            <text:p>0,00000752314814814816</text:p>
          </table:table-cell>
          <table:table-cell table:number-columns-repeated="1637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65" office:value-type="float" office:value="3705" calcext:value-type="float">
            <text:p>3705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428819444444444" calcext:value-type="float">
            <text:p>0,00042881944444444500</text:p>
          </table:table-cell>
          <table:table-cell table:formula="of:=[.D59]-[.D58]" office:value-type="float" office:value="0.00000752314814814816" calcext:value-type="float">
            <text:p>0,00000752314814814816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65" office:value-type="float" office:value="3770" calcext:value-type="float">
            <text:p>3770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436342592592593" calcext:value-type="float">
            <text:p>0,00043634259259259300</text:p>
          </table:table-cell>
          <table:table-cell table:formula="of:=[.D60]-[.D59]" office:value-type="float" office:value="0.00000752314814814816" calcext:value-type="float">
            <text:p>0,00000752314814814816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65" office:value-type="float" office:value="3835" calcext:value-type="float">
            <text:p>3835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443865740740741" calcext:value-type="float">
            <text:p>0,00044386574074074100</text:p>
          </table:table-cell>
          <table:table-cell table:formula="of:=[.D61]-[.D60]" office:value-type="float" office:value="0.0000075231481481481" calcext:value-type="float">
            <text:p>0,00000752314814814810</text:p>
          </table:table-cell>
          <table:table-cell table:number-columns-repeated="1637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65" office:value-type="float" office:value="3900" calcext:value-type="float">
            <text:p>390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451388888888889" calcext:value-type="float">
            <text:p>0,00045138888888888900</text:p>
          </table:table-cell>
          <table:table-cell table:formula="of:=[.D62]-[.D61]" office:value-type="float" office:value="0.00000752314814814816" calcext:value-type="float">
            <text:p>0,00000752314814814816</text:p>
          </table:table-cell>
          <table:table-cell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65" office:value-type="float" office:value="3965" calcext:value-type="float">
            <text:p>3965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458912037037037" calcext:value-type="float">
            <text:p>0,00045891203703703700</text:p>
          </table:table-cell>
          <table:table-cell table:formula="of:=[.D63]-[.D62]" office:value-type="float" office:value="0.00000752314814814816" calcext:value-type="float">
            <text:p>0,00000752314814814816</text:p>
          </table:table-cell>
          <table:table-cell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65" office:value-type="float" office:value="4030" calcext:value-type="float">
            <text:p>4030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466435185185185" calcext:value-type="float">
            <text:p>0,00046643518518518500</text:p>
          </table:table-cell>
          <table:table-cell table:formula="of:=[.D64]-[.D63]" office:value-type="float" office:value="0.00000752314814814816" calcext:value-type="float">
            <text:p>0,00000752314814814816</text:p>
          </table:table-cell>
          <table:table-cell table:number-columns-repeated="1637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65" office:value-type="float" office:value="4095" calcext:value-type="float">
            <text:p>4095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473958333333333" calcext:value-type="float">
            <text:p>0,00047395833333333300</text:p>
          </table:table-cell>
          <table:table-cell table:formula="of:=[.D65]-[.D64]" office:value-type="float" office:value="0.00000752314814814816" calcext:value-type="float">
            <text:p>0,00000752314814814816</text:p>
          </table:table-cell>
          <table:table-cell table:number-columns-repeated="1637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65" office:value-type="float" office:value="4160" calcext:value-type="float">
            <text:p>4160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481481481481482" calcext:value-type="float">
            <text:p>0,00048148148148148200</text:p>
          </table:table-cell>
          <table:table-cell table:formula="of:=[.D66]-[.D65]" office:value-type="float" office:value="0.0000075231481481481" calcext:value-type="float">
            <text:p>0,00000752314814814810</text:p>
          </table:table-cell>
          <table:table-cell table:number-columns-repeated="1637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65" office:value-type="float" office:value="4225" calcext:value-type="float">
            <text:p>4225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48900462962963" calcext:value-type="float">
            <text:p>0,00048900462962963000</text:p>
          </table:table-cell>
          <table:table-cell table:formula="of:=[.D67]-[.D66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65" office:value-type="float" office:value="4290" calcext:value-type="float">
            <text:p>4290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496527777777778" calcext:value-type="float">
            <text:p>0,00049652777777777800</text:p>
          </table:table-cell>
          <table:table-cell table:formula="of:=[.D68]-[.D67]" office:value-type="float" office:value="0.0000075231481481481" calcext:value-type="float">
            <text:p>0,00000752314814814810</text:p>
          </table:table-cell>
          <table:table-cell table:number-columns-repeated="1637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65" office:value-type="float" office:value="4355" calcext:value-type="float">
            <text:p>4355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504050925925926" calcext:value-type="float">
            <text:p>0,00050405092592592600</text:p>
          </table:table-cell>
          <table:table-cell table:formula="of:=[.D69]-[.D68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65" office:value-type="float" office:value="4420" calcext:value-type="float">
            <text:p>4420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511574074074074" calcext:value-type="float">
            <text:p>0,00051157407407407400</text:p>
          </table:table-cell>
          <table:table-cell table:formula="of:=[.D70]-[.D69]" office:value-type="float" office:value="0.0000075231481481481" calcext:value-type="float">
            <text:p>0,00000752314814814810</text:p>
          </table:table-cell>
          <table:table-cell table:number-columns-repeated="1637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65" office:value-type="float" office:value="4485" calcext:value-type="float">
            <text:p>4485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519097222222222" calcext:value-type="float">
            <text:p>0,00051909722222222200</text:p>
          </table:table-cell>
          <table:table-cell table:formula="of:=[.D71]-[.D70]" office:value-type="float" office:value="0.0000075231481481481" calcext:value-type="float">
            <text:p>0,00000752314814814810</text:p>
          </table:table-cell>
          <table:table-cell table:number-columns-repeated="1637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65" office:value-type="float" office:value="4550" calcext:value-type="float">
            <text:p>455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52662037037037" calcext:value-type="float">
            <text:p>0,00052662037037037000</text:p>
          </table:table-cell>
          <table:table-cell table:formula="of:=[.D72]-[.D71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65" office:value-type="float" office:value="4615" calcext:value-type="float">
            <text:p>4615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534143518518519" calcext:value-type="float">
            <text:p>0,00053414351851851900</text:p>
          </table:table-cell>
          <table:table-cell table:formula="of:=[.D73]-[.D72]" office:value-type="float" office:value="0.0000075231481481481" calcext:value-type="float">
            <text:p>0,00000752314814814810</text:p>
          </table:table-cell>
          <table:table-cell table:number-columns-repeated="1637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65" office:value-type="float" office:value="4680" calcext:value-type="float">
            <text:p>4680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541666666666667" calcext:value-type="float">
            <text:p>0,00054166666666666700</text:p>
          </table:table-cell>
          <table:table-cell table:formula="of:=[.D74]-[.D73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65" office:value-type="float" office:value="4745" calcext:value-type="float">
            <text:p>4745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549189814814815" calcext:value-type="float">
            <text:p>0,00054918981481481500</text:p>
          </table:table-cell>
          <table:table-cell table:formula="of:=[.D75]-[.D74]" office:value-type="float" office:value="0.0000075231481481481" calcext:value-type="float">
            <text:p>0,00000752314814814810</text:p>
          </table:table-cell>
          <table:table-cell table:number-columns-repeated="1637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65" office:value-type="float" office:value="4810" calcext:value-type="float">
            <text:p>4810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556712962962963" calcext:value-type="float">
            <text:p>0,00055671296296296300</text:p>
          </table:table-cell>
          <table:table-cell table:formula="of:=[.D76]-[.D75]" office:value-type="float" office:value="0.0000075231481481481" calcext:value-type="float">
            <text:p>0,00000752314814814810</text:p>
          </table:table-cell>
          <table:table-cell table:number-columns-repeated="1637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65" office:value-type="float" office:value="4875" calcext:value-type="float">
            <text:p>4875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564236111111111" calcext:value-type="float">
            <text:p>0,00056423611111111100</text:p>
          </table:table-cell>
          <table:table-cell table:formula="of:=[.D77]-[.D76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65" office:value-type="float" office:value="4940" calcext:value-type="float">
            <text:p>4940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571759259259259" calcext:value-type="float">
            <text:p>0,00057175925925925900</text:p>
          </table:table-cell>
          <table:table-cell table:formula="of:=[.D78]-[.D77]" office:value-type="float" office:value="0.0000075231481481481" calcext:value-type="float">
            <text:p>0,00000752314814814810</text:p>
          </table:table-cell>
          <table:table-cell table:number-columns-repeated="1637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65" office:value-type="float" office:value="5005" calcext:value-type="float">
            <text:p>5005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579282407407407" calcext:value-type="float">
            <text:p>0,00057928240740740700</text:p>
          </table:table-cell>
          <table:table-cell table:formula="of:=[.D79]-[.D78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65" office:value-type="float" office:value="5070" calcext:value-type="float">
            <text:p>5070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586805555555556" calcext:value-type="float">
            <text:p>0,00058680555555555600</text:p>
          </table:table-cell>
          <table:table-cell table:formula="of:=[.D80]-[.D79]" office:value-type="float" office:value="0.0000075231481481481" calcext:value-type="float">
            <text:p>0,00000752314814814810</text:p>
          </table:table-cell>
          <table:table-cell table:number-columns-repeated="1637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65" office:value-type="float" office:value="5135" calcext:value-type="float">
            <text:p>5135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594328703703704" calcext:value-type="float">
            <text:p>0,00059432870370370400</text:p>
          </table:table-cell>
          <table:table-cell table:formula="of:=[.D81]-[.D80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65" office:value-type="float" office:value="5200" calcext:value-type="float">
            <text:p>520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601851851851852" calcext:value-type="float">
            <text:p>0,00060185185185185200</text:p>
          </table:table-cell>
          <table:table-cell table:formula="of:=[.D82]-[.D81]" office:value-type="float" office:value="0.0000075231481481481" calcext:value-type="float">
            <text:p>0,00000752314814814810</text:p>
          </table:table-cell>
          <table:table-cell table:number-columns-repeated="1637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65" office:value-type="float" office:value="5265" calcext:value-type="float">
            <text:p>5265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609375" calcext:value-type="float">
            <text:p>0,00060937500000000000</text:p>
          </table:table-cell>
          <table:table-cell table:formula="of:=[.D83]-[.D82]" office:value-type="float" office:value="0.0000075231481481481" calcext:value-type="float">
            <text:p>0,00000752314814814810</text:p>
          </table:table-cell>
          <table:table-cell table:number-columns-repeated="1637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65" office:value-type="float" office:value="5330" calcext:value-type="float">
            <text:p>5330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616898148148148" calcext:value-type="float">
            <text:p>0,00061689814814814800</text:p>
          </table:table-cell>
          <table:table-cell table:formula="of:=[.D84]-[.D83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65" office:value-type="float" office:value="5395" calcext:value-type="float">
            <text:p>5395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624421296296296" calcext:value-type="float">
            <text:p>0,00062442129629629600</text:p>
          </table:table-cell>
          <table:table-cell table:formula="of:=[.D85]-[.D84]" office:value-type="float" office:value="0.0000075231481481481" calcext:value-type="float">
            <text:p>0,00000752314814814810</text:p>
          </table:table-cell>
          <table:table-cell table:number-columns-repeated="1637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65" office:value-type="float" office:value="5460" calcext:value-type="float">
            <text:p>5460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631944444444444" calcext:value-type="float">
            <text:p>0,00063194444444444400</text:p>
          </table:table-cell>
          <table:table-cell table:formula="of:=[.D86]-[.D85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65" office:value-type="float" office:value="5525" calcext:value-type="float">
            <text:p>5525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639467592592593" calcext:value-type="float">
            <text:p>0,00063946759259259300</text:p>
          </table:table-cell>
          <table:table-cell table:formula="of:=[.D87]-[.D86]" office:value-type="float" office:value="0.0000075231481481481" calcext:value-type="float">
            <text:p>0,00000752314814814810</text:p>
          </table:table-cell>
          <table:table-cell table:number-columns-repeated="1637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65" office:value-type="float" office:value="5590" calcext:value-type="float">
            <text:p>5590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646990740740741" calcext:value-type="float">
            <text:p>0,00064699074074074100</text:p>
          </table:table-cell>
          <table:table-cell table:formula="of:=[.D88]-[.D87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65" office:value-type="float" office:value="5655" calcext:value-type="float">
            <text:p>5655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654513888888889" calcext:value-type="float">
            <text:p>0,00065451388888888900</text:p>
          </table:table-cell>
          <table:table-cell table:formula="of:=[.D89]-[.D88]" office:value-type="float" office:value="0.0000075231481481481" calcext:value-type="float">
            <text:p>0,00000752314814814810</text:p>
          </table:table-cell>
          <table:table-cell table:number-columns-repeated="1637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65" office:value-type="float" office:value="5720" calcext:value-type="float">
            <text:p>5720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662037037037037" calcext:value-type="float">
            <text:p>0,00066203703703703700</text:p>
          </table:table-cell>
          <table:table-cell table:formula="of:=[.D90]-[.D89]" office:value-type="float" office:value="0.0000075231481481481" calcext:value-type="float">
            <text:p>0,00000752314814814810</text:p>
          </table:table-cell>
          <table:table-cell table:number-columns-repeated="1637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65" office:value-type="float" office:value="5785" calcext:value-type="float">
            <text:p>5785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669560185185185" calcext:value-type="float">
            <text:p>0,00066956018518518500</text:p>
          </table:table-cell>
          <table:table-cell table:formula="of:=[.D91]-[.D90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65" office:value-type="float" office:value="5850" calcext:value-type="float">
            <text:p>585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677083333333333" calcext:value-type="float">
            <text:p>0,00067708333333333300</text:p>
          </table:table-cell>
          <table:table-cell table:formula="of:=[.D92]-[.D91]" office:value-type="float" office:value="0.0000075231481481481" calcext:value-type="float">
            <text:p>0,00000752314814814810</text:p>
          </table:table-cell>
          <table:table-cell table:number-columns-repeated="1637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65" office:value-type="float" office:value="5915" calcext:value-type="float">
            <text:p>5915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684606481481482" calcext:value-type="float">
            <text:p>0,00068460648148148200</text:p>
          </table:table-cell>
          <table:table-cell table:formula="of:=[.D93]-[.D92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65" office:value-type="float" office:value="5980" calcext:value-type="float">
            <text:p>5980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69212962962963" calcext:value-type="float">
            <text:p>0,00069212962962963000</text:p>
          </table:table-cell>
          <table:table-cell table:formula="of:=[.D94]-[.D93]" office:value-type="float" office:value="0.0000075231481481481" calcext:value-type="float">
            <text:p>0,00000752314814814810</text:p>
          </table:table-cell>
          <table:table-cell table:number-columns-repeated="1637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65" office:value-type="float" office:value="6045" calcext:value-type="float">
            <text:p>6045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699652777777778" calcext:value-type="float">
            <text:p>0,00069965277777777800</text:p>
          </table:table-cell>
          <table:table-cell table:formula="of:=[.D95]-[.D94]" office:value-type="float" office:value="0.0000075231481481481" calcext:value-type="float">
            <text:p>0,00000752314814814810</text:p>
          </table:table-cell>
          <table:table-cell table:number-columns-repeated="1637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65" office:value-type="float" office:value="6110" calcext:value-type="float">
            <text:p>6110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707175925925926" calcext:value-type="float">
            <text:p>0,00070717592592592600</text:p>
          </table:table-cell>
          <table:table-cell table:formula="of:=[.D96]-[.D95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65" office:value-type="float" office:value="6175" calcext:value-type="float">
            <text:p>6175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714699074074074" calcext:value-type="float">
            <text:p>0,00071469907407407400</text:p>
          </table:table-cell>
          <table:table-cell table:formula="of:=[.D97]-[.D96]" office:value-type="float" office:value="0.0000075231481481481" calcext:value-type="float">
            <text:p>0,00000752314814814810</text:p>
          </table:table-cell>
          <table:table-cell table:number-columns-repeated="1637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65" office:value-type="float" office:value="6240" calcext:value-type="float">
            <text:p>6240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722222222222222" calcext:value-type="float">
            <text:p>0,00072222222222222200</text:p>
          </table:table-cell>
          <table:table-cell table:formula="of:=[.D98]-[.D97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65" office:value-type="float" office:value="6305" calcext:value-type="float">
            <text:p>6305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72974537037037" calcext:value-type="float">
            <text:p>0,00072974537037037000</text:p>
          </table:table-cell>
          <table:table-cell table:formula="of:=[.D99]-[.D98]" office:value-type="float" office:value="0.0000075231481481481" calcext:value-type="float">
            <text:p>0,00000752314814814810</text:p>
          </table:table-cell>
          <table:table-cell table:number-columns-repeated="1637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65" office:value-type="float" office:value="6370" calcext:value-type="float">
            <text:p>6370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737268518518519" calcext:value-type="float">
            <text:p>0,00073726851851851900</text:p>
          </table:table-cell>
          <table:table-cell table:formula="of:=[.D100]-[.D99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65" office:value-type="float" office:value="6435" calcext:value-type="float">
            <text:p>6435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744791666666667" calcext:value-type="float">
            <text:p>0,00074479166666666700</text:p>
          </table:table-cell>
          <table:table-cell table:formula="of:=[.D101]-[.D100]" office:value-type="float" office:value="0.0000075231481481481" calcext:value-type="float">
            <text:p>0,00000752314814814810</text:p>
          </table:table-cell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65" office:value-type="float" office:value="6500" calcext:value-type="float">
            <text:p>65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752314814814815" calcext:value-type="float">
            <text:p>0,00075231481481481500</text:p>
          </table:table-cell>
          <table:table-cell table:formula="of:=[.D102]-[.D101]" office:value-type="float" office:value="0.0000075231481481481" calcext:value-type="float">
            <text:p>0,00000752314814814810</text:p>
          </table:table-cell>
          <table:table-cell table:number-columns-repeated="1637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65" office:value-type="float" office:value="6565" calcext:value-type="float">
            <text:p>6565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759837962962963" calcext:value-type="float">
            <text:p>0,00075983796296296300</text:p>
          </table:table-cell>
          <table:table-cell table:formula="of:=[.D103]-[.D102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65" office:value-type="float" office:value="6630" calcext:value-type="float">
            <text:p>6630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767361111111111" calcext:value-type="float">
            <text:p>0,00076736111111111100</text:p>
          </table:table-cell>
          <table:table-cell table:formula="of:=[.D104]-[.D103]" office:value-type="float" office:value="0.0000075231481481481" calcext:value-type="float">
            <text:p>0,00000752314814814810</text:p>
          </table:table-cell>
          <table:table-cell table:number-columns-repeated="1637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65" office:value-type="float" office:value="6695" calcext:value-type="float">
            <text:p>6695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774884259259259" calcext:value-type="float">
            <text:p>0,00077488425925925900</text:p>
          </table:table-cell>
          <table:table-cell table:formula="of:=[.D105]-[.D104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65" office:value-type="float" office:value="6760" calcext:value-type="float">
            <text:p>6760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782407407407407" calcext:value-type="float">
            <text:p>0,00078240740740740800</text:p>
          </table:table-cell>
          <table:table-cell table:formula="of:=[.D106]-[.D105]" office:value-type="float" office:value="0.0000075231481481481" calcext:value-type="float">
            <text:p>0,00000752314814814810</text:p>
          </table:table-cell>
          <table:table-cell table:number-columns-repeated="1637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65" office:value-type="float" office:value="6825" calcext:value-type="float">
            <text:p>6825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789930555555556" calcext:value-type="float">
            <text:p>0,00078993055555555600</text:p>
          </table:table-cell>
          <table:table-cell table:formula="of:=[.D107]-[.D106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65" office:value-type="float" office:value="6890" calcext:value-type="float">
            <text:p>6890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797453703703704" calcext:value-type="float">
            <text:p>0,00079745370370370400</text:p>
          </table:table-cell>
          <table:table-cell table:formula="of:=[.D108]-[.D107]" office:value-type="float" office:value="0.0000075231481481481" calcext:value-type="float">
            <text:p>0,00000752314814814810</text:p>
          </table:table-cell>
          <table:table-cell table:number-columns-repeated="1637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65" office:value-type="float" office:value="6955" calcext:value-type="float">
            <text:p>6955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804976851851852" calcext:value-type="float">
            <text:p>0,00080497685185185200</text:p>
          </table:table-cell>
          <table:table-cell table:formula="of:=[.D109]-[.D108]" office:value-type="float" office:value="0.0000075231481481481" calcext:value-type="float">
            <text:p>0,00000752314814814810</text:p>
          </table:table-cell>
          <table:table-cell table:number-columns-repeated="1637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65" office:value-type="float" office:value="7020" calcext:value-type="float">
            <text:p>7020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8125" calcext:value-type="float">
            <text:p>0,00081250000000000000</text:p>
          </table:table-cell>
          <table:table-cell table:formula="of:=[.D110]-[.D109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65" office:value-type="float" office:value="7085" calcext:value-type="float">
            <text:p>7085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820023148148148" calcext:value-type="float">
            <text:p>0,00082002314814814800</text:p>
          </table:table-cell>
          <table:table-cell table:formula="of:=[.D111]-[.D110]" office:value-type="float" office:value="0.0000075231481481481" calcext:value-type="float">
            <text:p>0,00000752314814814810</text:p>
          </table:table-cell>
          <table:table-cell table:number-columns-repeated="1637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65" office:value-type="float" office:value="7150" calcext:value-type="float">
            <text:p>715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827546296296296" calcext:value-type="float">
            <text:p>0,00082754629629629600</text:p>
          </table:table-cell>
          <table:table-cell table:formula="of:=[.D112]-[.D111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65" office:value-type="float" office:value="7215" calcext:value-type="float">
            <text:p>7215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835069444444445" calcext:value-type="float">
            <text:p>0,00083506944444444500</text:p>
          </table:table-cell>
          <table:table-cell table:formula="of:=[.D113]-[.D112]" office:value-type="float" office:value="0.0000075231481481481" calcext:value-type="float">
            <text:p>0,00000752314814814810</text:p>
          </table:table-cell>
          <table:table-cell table:number-columns-repeated="1637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65" office:value-type="float" office:value="7280" calcext:value-type="float">
            <text:p>7280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842592592592593" calcext:value-type="float">
            <text:p>0,00084259259259259300</text:p>
          </table:table-cell>
          <table:table-cell table:formula="of:=[.D114]-[.D113]" office:value-type="float" office:value="0.0000075231481481481" calcext:value-type="float">
            <text:p>0,00000752314814814810</text:p>
          </table:table-cell>
          <table:table-cell table:number-columns-repeated="1637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65" office:value-type="float" office:value="7345" calcext:value-type="float">
            <text:p>7345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850115740740741" calcext:value-type="float">
            <text:p>0,00085011574074074100</text:p>
          </table:table-cell>
          <table:table-cell table:formula="of:=[.D115]-[.D114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65" office:value-type="float" office:value="7410" calcext:value-type="float">
            <text:p>7410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857638888888889" calcext:value-type="float">
            <text:p>0,00085763888888888900</text:p>
          </table:table-cell>
          <table:table-cell table:formula="of:=[.D116]-[.D115]" office:value-type="float" office:value="0.0000075231481481481" calcext:value-type="float">
            <text:p>0,00000752314814814810</text:p>
          </table:table-cell>
          <table:table-cell table:number-columns-repeated="1637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65" office:value-type="float" office:value="7475" calcext:value-type="float">
            <text:p>7475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865162037037037" calcext:value-type="float">
            <text:p>0,00086516203703703700</text:p>
          </table:table-cell>
          <table:table-cell table:formula="of:=[.D117]-[.D116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65" office:value-type="float" office:value="7540" calcext:value-type="float">
            <text:p>7540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872685185185185" calcext:value-type="float">
            <text:p>0,00087268518518518500</text:p>
          </table:table-cell>
          <table:table-cell table:formula="of:=[.D118]-[.D117]" office:value-type="float" office:value="0.0000075231481481481" calcext:value-type="float">
            <text:p>0,00000752314814814810</text:p>
          </table:table-cell>
          <table:table-cell table:number-columns-repeated="1637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65" office:value-type="float" office:value="7605" calcext:value-type="float">
            <text:p>7605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880208333333333" calcext:value-type="float">
            <text:p>0,00088020833333333300</text:p>
          </table:table-cell>
          <table:table-cell table:formula="of:=[.D119]-[.D118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65" office:value-type="float" office:value="7670" calcext:value-type="float">
            <text:p>7670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887731481481482" calcext:value-type="float">
            <text:p>0,00088773148148148200</text:p>
          </table:table-cell>
          <table:table-cell table:formula="of:=[.D120]-[.D119]" office:value-type="float" office:value="0.0000075231481481481" calcext:value-type="float">
            <text:p>0,00000752314814814810</text:p>
          </table:table-cell>
          <table:table-cell table:number-columns-repeated="1637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65" office:value-type="float" office:value="7735" calcext:value-type="float">
            <text:p>7735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89525462962963" calcext:value-type="float">
            <text:p>0,00089525462962963000</text:p>
          </table:table-cell>
          <table:table-cell table:formula="of:=[.D121]-[.D120]" office:value-type="float" office:value="0.0000075231481481481" calcext:value-type="float">
            <text:p>0,00000752314814814810</text:p>
          </table:table-cell>
          <table:table-cell table:number-columns-repeated="1637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65" office:value-type="float" office:value="7800" calcext:value-type="float">
            <text:p>780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902777777777778" calcext:value-type="float">
            <text:p>0,00090277777777777800</text:p>
          </table:table-cell>
          <table:table-cell table:formula="of:=[.D122]-[.D121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65" office:value-type="float" office:value="7865" calcext:value-type="float">
            <text:p>7865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910300925925926" calcext:value-type="float">
            <text:p>0,00091030092592592600</text:p>
          </table:table-cell>
          <table:table-cell table:formula="of:=[.D123]-[.D122]" office:value-type="float" office:value="0.0000075231481481481" calcext:value-type="float">
            <text:p>0,00000752314814814810</text:p>
          </table:table-cell>
          <table:table-cell table:number-columns-repeated="1637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65" office:value-type="float" office:value="7930" calcext:value-type="float">
            <text:p>7930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917824074074074" calcext:value-type="float">
            <text:p>0,00091782407407407400</text:p>
          </table:table-cell>
          <table:table-cell table:formula="of:=[.D124]-[.D123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65" office:value-type="float" office:value="7995" calcext:value-type="float">
            <text:p>7995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925347222222222" calcext:value-type="float">
            <text:p>0,00092534722222222200</text:p>
          </table:table-cell>
          <table:table-cell table:formula="of:=[.D125]-[.D124]" office:value-type="float" office:value="0.0000075231481481481" calcext:value-type="float">
            <text:p>0,00000752314814814810</text:p>
          </table:table-cell>
          <table:table-cell table:number-columns-repeated="1637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65" office:value-type="float" office:value="8060" calcext:value-type="float">
            <text:p>8060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93287037037037" calcext:value-type="float">
            <text:p>0,00093287037037037000</text:p>
          </table:table-cell>
          <table:table-cell table:formula="of:=[.D126]-[.D125]" office:value-type="float" office:value="0.0000075231481481481" calcext:value-type="float">
            <text:p>0,00000752314814814810</text:p>
          </table:table-cell>
          <table:table-cell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65" office:value-type="float" office:value="8125" calcext:value-type="float">
            <text:p>8125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940393518518519" calcext:value-type="float">
            <text:p>0,00094039351851851800</text:p>
          </table:table-cell>
          <table:table-cell table:formula="of:=[.D127]-[.D126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65" office:value-type="float" office:value="8190" calcext:value-type="float">
            <text:p>8190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947916666666667" calcext:value-type="float">
            <text:p>0,00094791666666666700</text:p>
          </table:table-cell>
          <table:table-cell table:formula="of:=[.D128]-[.D127]" office:value-type="float" office:value="0.0000075231481481481" calcext:value-type="float">
            <text:p>0,00000752314814814810</text:p>
          </table:table-cell>
          <table:table-cell table:number-columns-repeated="1637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65" office:value-type="float" office:value="8255" calcext:value-type="float">
            <text:p>8255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955439814814815" calcext:value-type="float">
            <text:p>0,00095543981481481500</text:p>
          </table:table-cell>
          <table:table-cell table:formula="of:=[.D129]-[.D128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65" office:value-type="float" office:value="8320" calcext:value-type="float">
            <text:p>8320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962962962962963" calcext:value-type="float">
            <text:p>0,00096296296296296300</text:p>
          </table:table-cell>
          <table:table-cell table:formula="of:=[.D130]-[.D129]" office:value-type="float" office:value="0.0000075231481481481" calcext:value-type="float">
            <text:p>0,00000752314814814810</text:p>
          </table:table-cell>
          <table:table-cell table:number-columns-repeated="16379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65" office:value-type="float" office:value="8385" calcext:value-type="float">
            <text:p>8385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970486111111111" calcext:value-type="float">
            <text:p>0,00097048611111111100</text:p>
          </table:table-cell>
          <table:table-cell table:formula="of:=[.D131]-[.D130]" office:value-type="float" office:value="0.0000075231481481481" calcext:value-type="float">
            <text:p>0,00000752314814814810</text:p>
          </table:table-cell>
          <table:table-cell table:number-columns-repeated="16379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65" office:value-type="float" office:value="8450" calcext:value-type="float">
            <text:p>845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978009259259259" calcext:value-type="float">
            <text:p>0,00097800925925925900</text:p>
          </table:table-cell>
          <table:table-cell table:formula="of:=[.D132]-[.D131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65" office:value-type="float" office:value="8515" calcext:value-type="float">
            <text:p>8515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985532407407407" calcext:value-type="float">
            <text:p>0,00098553240740740700</text:p>
          </table:table-cell>
          <table:table-cell table:formula="of:=[.D133]-[.D132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65" office:value-type="float" office:value="8580" calcext:value-type="float">
            <text:p>8580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993055555555556" calcext:value-type="float">
            <text:p>0,00099305555555555600</text:p>
          </table:table-cell>
          <table:table-cell table:formula="of:=[.D134]-[.D133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65" office:value-type="float" office:value="8645" calcext:value-type="float">
            <text:p>8645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10005787037037" calcext:value-type="float">
            <text:p>0,00100057870370370000</text:p>
          </table:table-cell>
          <table:table-cell table:formula="of:=[.D135]-[.D134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65" office:value-type="float" office:value="8710" calcext:value-type="float">
            <text:p>8710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100810185185185" calcext:value-type="float">
            <text:p>0,00100810185185185000</text:p>
          </table:table-cell>
          <table:table-cell table:formula="of:=[.D136]-[.D135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65" office:value-type="float" office:value="8775" calcext:value-type="float">
            <text:p>8775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1015625" calcext:value-type="float">
            <text:p>0,00101562500000000000</text:p>
          </table:table-cell>
          <table:table-cell table:formula="of:=[.D137]-[.D136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65" office:value-type="float" office:value="8840" calcext:value-type="float">
            <text:p>8840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102314814814815" calcext:value-type="float">
            <text:p>0,00102314814814815000</text:p>
          </table:table-cell>
          <table:table-cell table:formula="of:=[.D138]-[.D137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65" office:value-type="float" office:value="8905" calcext:value-type="float">
            <text:p>8905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10306712962963" calcext:value-type="float">
            <text:p>0,00103067129629630000</text:p>
          </table:table-cell>
          <table:table-cell table:formula="of:=[.D139]-[.D138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65" office:value-type="float" office:value="8970" calcext:value-type="float">
            <text:p>8970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103819444444444" calcext:value-type="float">
            <text:p>0,00103819444444444000</text:p>
          </table:table-cell>
          <table:table-cell table:formula="of:=[.D140]-[.D139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65" office:value-type="float" office:value="9035" calcext:value-type="float">
            <text:p>9035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104571759259259" calcext:value-type="float">
            <text:p>0,00104571759259259000</text:p>
          </table:table-cell>
          <table:table-cell table:formula="of:=[.D141]-[.D140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65" office:value-type="float" office:value="9100" calcext:value-type="float">
            <text:p>910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105324074074074" calcext:value-type="float">
            <text:p>0,00105324074074074000</text:p>
          </table:table-cell>
          <table:table-cell table:formula="of:=[.D142]-[.D141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65" office:value-type="float" office:value="9165" calcext:value-type="float">
            <text:p>9165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106076388888889" calcext:value-type="float">
            <text:p>0,00106076388888889000</text:p>
          </table:table-cell>
          <table:table-cell table:formula="of:=[.D143]-[.D142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65" office:value-type="float" office:value="9230" calcext:value-type="float">
            <text:p>9230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106828703703704" calcext:value-type="float">
            <text:p>0,00106828703703704000</text:p>
          </table:table-cell>
          <table:table-cell table:formula="of:=[.D144]-[.D143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65" office:value-type="float" office:value="9295" calcext:value-type="float">
            <text:p>9295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107581018518519" calcext:value-type="float">
            <text:p>0,00107581018518519000</text:p>
          </table:table-cell>
          <table:table-cell table:formula="of:=[.D145]-[.D144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65" office:value-type="float" office:value="9360" calcext:value-type="float">
            <text:p>9360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108333333333333" calcext:value-type="float">
            <text:p>0,00108333333333333000</text:p>
          </table:table-cell>
          <table:table-cell table:formula="of:=[.D146]-[.D145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65" office:value-type="float" office:value="9425" calcext:value-type="float">
            <text:p>9425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109085648148148" calcext:value-type="float">
            <text:p>0,00109085648148148000</text:p>
          </table:table-cell>
          <table:table-cell table:formula="of:=[.D147]-[.D146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65" office:value-type="float" office:value="9490" calcext:value-type="float">
            <text:p>9490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109837962962963" calcext:value-type="float">
            <text:p>0,00109837962962963000</text:p>
          </table:table-cell>
          <table:table-cell table:formula="of:=[.D148]-[.D147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65" office:value-type="float" office:value="9555" calcext:value-type="float">
            <text:p>9555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110590277777778" calcext:value-type="float">
            <text:p>0,00110590277777778000</text:p>
          </table:table-cell>
          <table:table-cell table:formula="of:=[.D149]-[.D148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65" office:value-type="float" office:value="9620" calcext:value-type="float">
            <text:p>9620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111342592592593" calcext:value-type="float">
            <text:p>0,00111342592592593000</text:p>
          </table:table-cell>
          <table:table-cell table:formula="of:=[.D150]-[.D149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65" office:value-type="float" office:value="9685" calcext:value-type="float">
            <text:p>9685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112094907407407" calcext:value-type="float">
            <text:p>0,00112094907407407000</text:p>
          </table:table-cell>
          <table:table-cell table:formula="of:=[.D151]-[.D150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65" office:value-type="float" office:value="9750" calcext:value-type="float">
            <text:p>975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112847222222222" calcext:value-type="float">
            <text:p>0,00112847222222222000</text:p>
          </table:table-cell>
          <table:table-cell table:formula="of:=[.D152]-[.D151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65" office:value-type="float" office:value="9815" calcext:value-type="float">
            <text:p>9815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113599537037037" calcext:value-type="float">
            <text:p>0,00113599537037037000</text:p>
          </table:table-cell>
          <table:table-cell table:formula="of:=[.D153]-[.D152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65" office:value-type="float" office:value="9880" calcext:value-type="float">
            <text:p>9880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114351851851852" calcext:value-type="float">
            <text:p>0,00114351851851852000</text:p>
          </table:table-cell>
          <table:table-cell table:formula="of:=[.D154]-[.D153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65" office:value-type="float" office:value="9945" calcext:value-type="float">
            <text:p>9945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115104166666667" calcext:value-type="float">
            <text:p>0,00115104166666667000</text:p>
          </table:table-cell>
          <table:table-cell table:formula="of:=[.D155]-[.D154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65" office:value-type="float" office:value="10010" calcext:value-type="float">
            <text:p>10010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115856481481481" calcext:value-type="float">
            <text:p>0,00115856481481481000</text:p>
          </table:table-cell>
          <table:table-cell table:formula="of:=[.D156]-[.D155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65" office:value-type="float" office:value="10075" calcext:value-type="float">
            <text:p>10075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116608796296296" calcext:value-type="float">
            <text:p>0,00116608796296296000</text:p>
          </table:table-cell>
          <table:table-cell table:formula="of:=[.D157]-[.D156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65" office:value-type="float" office:value="10140" calcext:value-type="float">
            <text:p>10140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117361111111111" calcext:value-type="float">
            <text:p>0,00117361111111111000</text:p>
          </table:table-cell>
          <table:table-cell table:formula="of:=[.D158]-[.D157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65" office:value-type="float" office:value="10205" calcext:value-type="float">
            <text:p>10205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118113425925926" calcext:value-type="float">
            <text:p>0,00118113425925926000</text:p>
          </table:table-cell>
          <table:table-cell table:formula="of:=[.D159]-[.D158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65" office:value-type="float" office:value="10270" calcext:value-type="float">
            <text:p>10270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118865740740741" calcext:value-type="float">
            <text:p>0,00118865740740741000</text:p>
          </table:table-cell>
          <table:table-cell table:formula="of:=[.D160]-[.D159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65" office:value-type="float" office:value="10335" calcext:value-type="float">
            <text:p>10335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119618055555556" calcext:value-type="float">
            <text:p>0,00119618055555556000</text:p>
          </table:table-cell>
          <table:table-cell table:formula="of:=[.D161]-[.D160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65" office:value-type="float" office:value="10400" calcext:value-type="float">
            <text:p>1040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12037037037037" calcext:value-type="float">
            <text:p>0,00120370370370370000</text:p>
          </table:table-cell>
          <table:table-cell table:formula="of:=[.D162]-[.D161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65" office:value-type="float" office:value="10465" calcext:value-type="float">
            <text:p>10465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121122685185185" calcext:value-type="float">
            <text:p>0,00121122685185185000</text:p>
          </table:table-cell>
          <table:table-cell table:formula="of:=[.D163]-[.D162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65" office:value-type="float" office:value="10530" calcext:value-type="float">
            <text:p>10530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121875" calcext:value-type="float">
            <text:p>0,00121875000000000000</text:p>
          </table:table-cell>
          <table:table-cell table:formula="of:=[.D164]-[.D163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65" office:value-type="float" office:value="10595" calcext:value-type="float">
            <text:p>10595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122627314814815" calcext:value-type="float">
            <text:p>0,00122627314814815000</text:p>
          </table:table-cell>
          <table:table-cell table:formula="of:=[.D165]-[.D164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65" office:value-type="float" office:value="10660" calcext:value-type="float">
            <text:p>10660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12337962962963" calcext:value-type="float">
            <text:p>0,00123379629629630000</text:p>
          </table:table-cell>
          <table:table-cell table:formula="of:=[.D166]-[.D165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65" office:value-type="float" office:value="10725" calcext:value-type="float">
            <text:p>10725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124131944444444" calcext:value-type="float">
            <text:p>0,00124131944444444000</text:p>
          </table:table-cell>
          <table:table-cell table:formula="of:=[.D167]-[.D166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65" office:value-type="float" office:value="10790" calcext:value-type="float">
            <text:p>10790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124884259259259" calcext:value-type="float">
            <text:p>0,00124884259259259000</text:p>
          </table:table-cell>
          <table:table-cell table:formula="of:=[.D168]-[.D167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65" office:value-type="float" office:value="10855" calcext:value-type="float">
            <text:p>10855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125636574074074" calcext:value-type="float">
            <text:p>0,00125636574074074000</text:p>
          </table:table-cell>
          <table:table-cell table:formula="of:=[.D169]-[.D168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65" office:value-type="float" office:value="10920" calcext:value-type="float">
            <text:p>10920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126388888888889" calcext:value-type="float">
            <text:p>0,00126388888888889000</text:p>
          </table:table-cell>
          <table:table-cell table:formula="of:=[.D170]-[.D169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65" office:value-type="float" office:value="10985" calcext:value-type="float">
            <text:p>10985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127141203703704" calcext:value-type="float">
            <text:p>0,00127141203703704000</text:p>
          </table:table-cell>
          <table:table-cell table:formula="of:=[.D171]-[.D170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65" office:value-type="float" office:value="11050" calcext:value-type="float">
            <text:p>1105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127893518518519" calcext:value-type="float">
            <text:p>0,00127893518518519000</text:p>
          </table:table-cell>
          <table:table-cell table:formula="of:=[.D172]-[.D171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65" office:value-type="float" office:value="11115" calcext:value-type="float">
            <text:p>11115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128645833333333" calcext:value-type="float">
            <text:p>0,00128645833333333000</text:p>
          </table:table-cell>
          <table:table-cell table:formula="of:=[.D173]-[.D172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65" office:value-type="float" office:value="11180" calcext:value-type="float">
            <text:p>11180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129398148148148" calcext:value-type="float">
            <text:p>0,00129398148148148000</text:p>
          </table:table-cell>
          <table:table-cell table:formula="of:=[.D174]-[.D173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65" office:value-type="float" office:value="11245" calcext:value-type="float">
            <text:p>11245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130150462962963" calcext:value-type="float">
            <text:p>0,00130150462962963000</text:p>
          </table:table-cell>
          <table:table-cell table:formula="of:=[.D175]-[.D174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65" office:value-type="float" office:value="11310" calcext:value-type="float">
            <text:p>11310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130902777777778" calcext:value-type="float">
            <text:p>0,00130902777777778000</text:p>
          </table:table-cell>
          <table:table-cell table:formula="of:=[.D176]-[.D175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65" office:value-type="float" office:value="11375" calcext:value-type="float">
            <text:p>11375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131655092592593" calcext:value-type="float">
            <text:p>0,00131655092592593000</text:p>
          </table:table-cell>
          <table:table-cell table:formula="of:=[.D177]-[.D176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65" office:value-type="float" office:value="11440" calcext:value-type="float">
            <text:p>11440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132407407407407" calcext:value-type="float">
            <text:p>0,00132407407407407000</text:p>
          </table:table-cell>
          <table:table-cell table:formula="of:=[.D178]-[.D177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65" office:value-type="float" office:value="11505" calcext:value-type="float">
            <text:p>11505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133159722222222" calcext:value-type="float">
            <text:p>0,00133159722222222000</text:p>
          </table:table-cell>
          <table:table-cell table:formula="of:=[.D179]-[.D178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65" office:value-type="float" office:value="11570" calcext:value-type="float">
            <text:p>11570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133912037037037" calcext:value-type="float">
            <text:p>0,00133912037037037000</text:p>
          </table:table-cell>
          <table:table-cell table:formula="of:=[.D180]-[.D179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65" office:value-type="float" office:value="11635" calcext:value-type="float">
            <text:p>11635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134664351851852" calcext:value-type="float">
            <text:p>0,00134664351851852000</text:p>
          </table:table-cell>
          <table:table-cell table:formula="of:=[.D181]-[.D180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65" office:value-type="float" office:value="11700" calcext:value-type="float">
            <text:p>1170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135416666666667" calcext:value-type="float">
            <text:p>0,00135416666666667000</text:p>
          </table:table-cell>
          <table:table-cell table:formula="of:=[.D182]-[.D181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65" office:value-type="float" office:value="11765" calcext:value-type="float">
            <text:p>11765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136168981481481" calcext:value-type="float">
            <text:p>0,00136168981481481000</text:p>
          </table:table-cell>
          <table:table-cell table:formula="of:=[.D183]-[.D182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65" office:value-type="float" office:value="11830" calcext:value-type="float">
            <text:p>11830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136921296296296" calcext:value-type="float">
            <text:p>0,00136921296296296000</text:p>
          </table:table-cell>
          <table:table-cell table:formula="of:=[.D184]-[.D183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65" office:value-type="float" office:value="11895" calcext:value-type="float">
            <text:p>11895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137673611111111" calcext:value-type="float">
            <text:p>0,00137673611111111000</text:p>
          </table:table-cell>
          <table:table-cell table:formula="of:=[.D185]-[.D184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65" office:value-type="float" office:value="11960" calcext:value-type="float">
            <text:p>11960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138425925925926" calcext:value-type="float">
            <text:p>0,00138425925925926000</text:p>
          </table:table-cell>
          <table:table-cell table:formula="of:=[.D186]-[.D185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65" office:value-type="float" office:value="12025" calcext:value-type="float">
            <text:p>12025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139178240740741" calcext:value-type="float">
            <text:p>0,00139178240740741000</text:p>
          </table:table-cell>
          <table:table-cell table:formula="of:=[.D187]-[.D186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65" office:value-type="float" office:value="12090" calcext:value-type="float">
            <text:p>12090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139930555555556" calcext:value-type="float">
            <text:p>0,00139930555555556000</text:p>
          </table:table-cell>
          <table:table-cell table:formula="of:=[.D188]-[.D187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65" office:value-type="float" office:value="12155" calcext:value-type="float">
            <text:p>12155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14068287037037" calcext:value-type="float">
            <text:p>0,00140682870370370000</text:p>
          </table:table-cell>
          <table:table-cell table:formula="of:=[.D189]-[.D188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65" office:value-type="float" office:value="12220" calcext:value-type="float">
            <text:p>12220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141435185185185" calcext:value-type="float">
            <text:p>0,00141435185185185000</text:p>
          </table:table-cell>
          <table:table-cell table:formula="of:=[.D190]-[.D189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65" office:value-type="float" office:value="12285" calcext:value-type="float">
            <text:p>12285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1421875" calcext:value-type="float">
            <text:p>0,00142187500000000000</text:p>
          </table:table-cell>
          <table:table-cell table:formula="of:=[.D191]-[.D190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65" office:value-type="float" office:value="12350" calcext:value-type="float">
            <text:p>1235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142939814814815" calcext:value-type="float">
            <text:p>0,00142939814814815000</text:p>
          </table:table-cell>
          <table:table-cell table:formula="of:=[.D192]-[.D191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65" office:value-type="float" office:value="12415" calcext:value-type="float">
            <text:p>12415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14369212962963" calcext:value-type="float">
            <text:p>0,00143692129629630000</text:p>
          </table:table-cell>
          <table:table-cell table:formula="of:=[.D193]-[.D192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65" office:value-type="float" office:value="12480" calcext:value-type="float">
            <text:p>12480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144444444444444" calcext:value-type="float">
            <text:p>0,00144444444444444000</text:p>
          </table:table-cell>
          <table:table-cell table:formula="of:=[.D194]-[.D193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65" office:value-type="float" office:value="12545" calcext:value-type="float">
            <text:p>12545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145196759259259" calcext:value-type="float">
            <text:p>0,00145196759259259000</text:p>
          </table:table-cell>
          <table:table-cell table:formula="of:=[.D195]-[.D194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65" office:value-type="float" office:value="12610" calcext:value-type="float">
            <text:p>12610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145949074074074" calcext:value-type="float">
            <text:p>0,00145949074074074000</text:p>
          </table:table-cell>
          <table:table-cell table:formula="of:=[.D196]-[.D195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65" office:value-type="float" office:value="12675" calcext:value-type="float">
            <text:p>12675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146701388888889" calcext:value-type="float">
            <text:p>0,00146701388888889000</text:p>
          </table:table-cell>
          <table:table-cell table:formula="of:=[.D197]-[.D196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65" office:value-type="float" office:value="12740" calcext:value-type="float">
            <text:p>12740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147453703703704" calcext:value-type="float">
            <text:p>0,00147453703703704000</text:p>
          </table:table-cell>
          <table:table-cell table:formula="of:=[.D198]-[.D197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65" office:value-type="float" office:value="12805" calcext:value-type="float">
            <text:p>12805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148206018518519" calcext:value-type="float">
            <text:p>0,00148206018518519000</text:p>
          </table:table-cell>
          <table:table-cell table:formula="of:=[.D199]-[.D198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65" office:value-type="float" office:value="12870" calcext:value-type="float">
            <text:p>12870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148958333333333" calcext:value-type="float">
            <text:p>0,00148958333333333000</text:p>
          </table:table-cell>
          <table:table-cell table:formula="of:=[.D200]-[.D199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65" office:value-type="float" office:value="12935" calcext:value-type="float">
            <text:p>12935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149710648148148" calcext:value-type="float">
            <text:p>0,00149710648148148000</text:p>
          </table:table-cell>
          <table:table-cell table:formula="of:=[.D201]-[.D200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65" office:value-type="float" office:value="13000" calcext:value-type="float">
            <text:p>130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150462962962963" calcext:value-type="float">
            <text:p>0,00150462962962963000</text:p>
          </table:table-cell>
          <table:table-cell table:formula="of:=[.D202]-[.D201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65" office:value-type="float" office:value="13065" calcext:value-type="float">
            <text:p>13065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151215277777778" calcext:value-type="float">
            <text:p>0,00151215277777778000</text:p>
          </table:table-cell>
          <table:table-cell table:formula="of:=[.D203]-[.D202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65" office:value-type="float" office:value="13130" calcext:value-type="float">
            <text:p>13130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151967592592593" calcext:value-type="float">
            <text:p>0,00151967592592593000</text:p>
          </table:table-cell>
          <table:table-cell table:formula="of:=[.D204]-[.D203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65" office:value-type="float" office:value="13195" calcext:value-type="float">
            <text:p>13195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152719907407407" calcext:value-type="float">
            <text:p>0,00152719907407407000</text:p>
          </table:table-cell>
          <table:table-cell table:formula="of:=[.D205]-[.D204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65" office:value-type="float" office:value="13260" calcext:value-type="float">
            <text:p>13260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153472222222222" calcext:value-type="float">
            <text:p>0,00153472222222222000</text:p>
          </table:table-cell>
          <table:table-cell table:formula="of:=[.D206]-[.D205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65" office:value-type="float" office:value="13325" calcext:value-type="float">
            <text:p>13325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154224537037037" calcext:value-type="float">
            <text:p>0,00154224537037037000</text:p>
          </table:table-cell>
          <table:table-cell table:formula="of:=[.D207]-[.D206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65" office:value-type="float" office:value="13390" calcext:value-type="float">
            <text:p>13390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154976851851852" calcext:value-type="float">
            <text:p>0,00154976851851852000</text:p>
          </table:table-cell>
          <table:table-cell table:formula="of:=[.D208]-[.D207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65" office:value-type="float" office:value="13455" calcext:value-type="float">
            <text:p>13455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155729166666667" calcext:value-type="float">
            <text:p>0,00155729166666667000</text:p>
          </table:table-cell>
          <table:table-cell table:formula="of:=[.D209]-[.D208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65" office:value-type="float" office:value="13520" calcext:value-type="float">
            <text:p>13520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156481481481481" calcext:value-type="float">
            <text:p>0,00156481481481482000</text:p>
          </table:table-cell>
          <table:table-cell table:formula="of:=[.D210]-[.D209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65" office:value-type="float" office:value="13585" calcext:value-type="float">
            <text:p>13585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157233796296296" calcext:value-type="float">
            <text:p>0,00157233796296296000</text:p>
          </table:table-cell>
          <table:table-cell table:formula="of:=[.D211]-[.D210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65" office:value-type="float" office:value="13650" calcext:value-type="float">
            <text:p>1365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157986111111111" calcext:value-type="float">
            <text:p>0,00157986111111111000</text:p>
          </table:table-cell>
          <table:table-cell table:formula="of:=[.D212]-[.D211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65" office:value-type="float" office:value="13715" calcext:value-type="float">
            <text:p>13715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158738425925926" calcext:value-type="float">
            <text:p>0,00158738425925926000</text:p>
          </table:table-cell>
          <table:table-cell table:formula="of:=[.D213]-[.D212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65" office:value-type="float" office:value="13780" calcext:value-type="float">
            <text:p>13780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159490740740741" calcext:value-type="float">
            <text:p>0,00159490740740741000</text:p>
          </table:table-cell>
          <table:table-cell table:formula="of:=[.D214]-[.D213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65" office:value-type="float" office:value="13845" calcext:value-type="float">
            <text:p>13845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160243055555556" calcext:value-type="float">
            <text:p>0,00160243055555556000</text:p>
          </table:table-cell>
          <table:table-cell table:formula="of:=[.D215]-[.D214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65" office:value-type="float" office:value="13910" calcext:value-type="float">
            <text:p>13910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16099537037037" calcext:value-type="float">
            <text:p>0,00160995370370370000</text:p>
          </table:table-cell>
          <table:table-cell table:formula="of:=[.D216]-[.D215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65" office:value-type="float" office:value="13975" calcext:value-type="float">
            <text:p>13975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161747685185185" calcext:value-type="float">
            <text:p>0,00161747685185185000</text:p>
          </table:table-cell>
          <table:table-cell table:formula="of:=[.D217]-[.D216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65" office:value-type="float" office:value="14040" calcext:value-type="float">
            <text:p>14040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1625" calcext:value-type="float">
            <text:p>0,00162500000000000000</text:p>
          </table:table-cell>
          <table:table-cell table:formula="of:=[.D218]-[.D217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65" office:value-type="float" office:value="14105" calcext:value-type="float">
            <text:p>14105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163252314814815" calcext:value-type="float">
            <text:p>0,00163252314814815000</text:p>
          </table:table-cell>
          <table:table-cell table:formula="of:=[.D219]-[.D218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65" office:value-type="float" office:value="14170" calcext:value-type="float">
            <text:p>14170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16400462962963" calcext:value-type="float">
            <text:p>0,00164004629629630000</text:p>
          </table:table-cell>
          <table:table-cell table:formula="of:=[.D220]-[.D219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65" office:value-type="float" office:value="14235" calcext:value-type="float">
            <text:p>14235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164756944444444" calcext:value-type="float">
            <text:p>0,00164756944444444000</text:p>
          </table:table-cell>
          <table:table-cell table:formula="of:=[.D221]-[.D220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65" office:value-type="float" office:value="14300" calcext:value-type="float">
            <text:p>1430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165509259259259" calcext:value-type="float">
            <text:p>0,00165509259259259000</text:p>
          </table:table-cell>
          <table:table-cell table:formula="of:=[.D222]-[.D221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65" office:value-type="float" office:value="14365" calcext:value-type="float">
            <text:p>14365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166261574074074" calcext:value-type="float">
            <text:p>0,00166261574074074000</text:p>
          </table:table-cell>
          <table:table-cell table:formula="of:=[.D223]-[.D222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65" office:value-type="float" office:value="14430" calcext:value-type="float">
            <text:p>14430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167013888888889" calcext:value-type="float">
            <text:p>0,00167013888888889000</text:p>
          </table:table-cell>
          <table:table-cell table:formula="of:=[.D224]-[.D223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65" office:value-type="float" office:value="14495" calcext:value-type="float">
            <text:p>14495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167766203703704" calcext:value-type="float">
            <text:p>0,00167766203703704000</text:p>
          </table:table-cell>
          <table:table-cell table:formula="of:=[.D225]-[.D224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65" office:value-type="float" office:value="14560" calcext:value-type="float">
            <text:p>14560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168518518518519" calcext:value-type="float">
            <text:p>0,00168518518518519000</text:p>
          </table:table-cell>
          <table:table-cell table:formula="of:=[.D226]-[.D225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65" office:value-type="float" office:value="14625" calcext:value-type="float">
            <text:p>14625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169270833333333" calcext:value-type="float">
            <text:p>0,00169270833333333000</text:p>
          </table:table-cell>
          <table:table-cell table:formula="of:=[.D227]-[.D226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65" office:value-type="float" office:value="14690" calcext:value-type="float">
            <text:p>14690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170023148148148" calcext:value-type="float">
            <text:p>0,00170023148148148000</text:p>
          </table:table-cell>
          <table:table-cell table:formula="of:=[.D228]-[.D227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65" office:value-type="float" office:value="14755" calcext:value-type="float">
            <text:p>14755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170775462962963" calcext:value-type="float">
            <text:p>0,00170775462962963000</text:p>
          </table:table-cell>
          <table:table-cell table:formula="of:=[.D229]-[.D228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65" office:value-type="float" office:value="14820" calcext:value-type="float">
            <text:p>14820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171527777777778" calcext:value-type="float">
            <text:p>0,00171527777777778000</text:p>
          </table:table-cell>
          <table:table-cell table:formula="of:=[.D230]-[.D229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65" office:value-type="float" office:value="14885" calcext:value-type="float">
            <text:p>14885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172280092592593" calcext:value-type="float">
            <text:p>0,00172280092592593000</text:p>
          </table:table-cell>
          <table:table-cell table:formula="of:=[.D231]-[.D230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65" office:value-type="float" office:value="14950" calcext:value-type="float">
            <text:p>1495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173032407407407" calcext:value-type="float">
            <text:p>0,00173032407407407000</text:p>
          </table:table-cell>
          <table:table-cell table:formula="of:=[.D232]-[.D231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65" office:value-type="float" office:value="15015" calcext:value-type="float">
            <text:p>15015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173784722222222" calcext:value-type="float">
            <text:p>0,00173784722222222000</text:p>
          </table:table-cell>
          <table:table-cell table:formula="of:=[.D233]-[.D232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65" office:value-type="float" office:value="15080" calcext:value-type="float">
            <text:p>15080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174537037037037" calcext:value-type="float">
            <text:p>0,00174537037037037000</text:p>
          </table:table-cell>
          <table:table-cell table:formula="of:=[.D234]-[.D233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65" office:value-type="float" office:value="15145" calcext:value-type="float">
            <text:p>15145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175289351851852" calcext:value-type="float">
            <text:p>0,00175289351851852000</text:p>
          </table:table-cell>
          <table:table-cell table:formula="of:=[.D235]-[.D234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65" office:value-type="float" office:value="15210" calcext:value-type="float">
            <text:p>15210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176041666666667" calcext:value-type="float">
            <text:p>0,00176041666666667000</text:p>
          </table:table-cell>
          <table:table-cell table:formula="of:=[.D236]-[.D235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65" office:value-type="float" office:value="15275" calcext:value-type="float">
            <text:p>15275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176793981481481" calcext:value-type="float">
            <text:p>0,00176793981481481000</text:p>
          </table:table-cell>
          <table:table-cell table:formula="of:=[.D237]-[.D236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65" office:value-type="float" office:value="15340" calcext:value-type="float">
            <text:p>15340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177546296296296" calcext:value-type="float">
            <text:p>0,00177546296296296000</text:p>
          </table:table-cell>
          <table:table-cell table:formula="of:=[.D238]-[.D237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65" office:value-type="float" office:value="15405" calcext:value-type="float">
            <text:p>15405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178298611111111" calcext:value-type="float">
            <text:p>0,00178298611111111000</text:p>
          </table:table-cell>
          <table:table-cell table:formula="of:=[.D239]-[.D238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65" office:value-type="float" office:value="15470" calcext:value-type="float">
            <text:p>15470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179050925925926" calcext:value-type="float">
            <text:p>0,00179050925925926000</text:p>
          </table:table-cell>
          <table:table-cell table:formula="of:=[.D240]-[.D239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65" office:value-type="float" office:value="15535" calcext:value-type="float">
            <text:p>15535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179803240740741" calcext:value-type="float">
            <text:p>0,00179803240740741000</text:p>
          </table:table-cell>
          <table:table-cell table:formula="of:=[.D241]-[.D240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65" office:value-type="float" office:value="15600" calcext:value-type="float">
            <text:p>1560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180555555555556" calcext:value-type="float">
            <text:p>0,00180555555555556000</text:p>
          </table:table-cell>
          <table:table-cell table:formula="of:=[.D242]-[.D241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65" office:value-type="float" office:value="15665" calcext:value-type="float">
            <text:p>15665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18130787037037" calcext:value-type="float">
            <text:p>0,00181307870370370000</text:p>
          </table:table-cell>
          <table:table-cell table:formula="of:=[.D243]-[.D242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65" office:value-type="float" office:value="15730" calcext:value-type="float">
            <text:p>15730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182060185185185" calcext:value-type="float">
            <text:p>0,00182060185185185000</text:p>
          </table:table-cell>
          <table:table-cell table:formula="of:=[.D244]-[.D243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65" office:value-type="float" office:value="15795" calcext:value-type="float">
            <text:p>15795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1828125" calcext:value-type="float">
            <text:p>0,00182812500000000000</text:p>
          </table:table-cell>
          <table:table-cell table:formula="of:=[.D245]-[.D244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65" office:value-type="float" office:value="15860" calcext:value-type="float">
            <text:p>15860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183564814814815" calcext:value-type="float">
            <text:p>0,00183564814814815000</text:p>
          </table:table-cell>
          <table:table-cell table:formula="of:=[.D246]-[.D245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65" office:value-type="float" office:value="15925" calcext:value-type="float">
            <text:p>15925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18431712962963" calcext:value-type="float">
            <text:p>0,00184317129629630000</text:p>
          </table:table-cell>
          <table:table-cell table:formula="of:=[.D247]-[.D246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65" office:value-type="float" office:value="15990" calcext:value-type="float">
            <text:p>15990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185069444444444" calcext:value-type="float">
            <text:p>0,00185069444444444000</text:p>
          </table:table-cell>
          <table:table-cell table:formula="of:=[.D248]-[.D247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65" office:value-type="float" office:value="16055" calcext:value-type="float">
            <text:p>16055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185821759259259" calcext:value-type="float">
            <text:p>0,00185821759259259000</text:p>
          </table:table-cell>
          <table:table-cell table:formula="of:=[.D249]-[.D248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65" office:value-type="float" office:value="16120" calcext:value-type="float">
            <text:p>16120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186574074074074" calcext:value-type="float">
            <text:p>0,00186574074074074000</text:p>
          </table:table-cell>
          <table:table-cell table:formula="of:=[.D250]-[.D249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65" office:value-type="float" office:value="16185" calcext:value-type="float">
            <text:p>16185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187326388888889" calcext:value-type="float">
            <text:p>0,00187326388888889000</text:p>
          </table:table-cell>
          <table:table-cell table:formula="of:=[.D251]-[.D250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65" office:value-type="float" office:value="16250" calcext:value-type="float">
            <text:p>1625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188078703703704" calcext:value-type="float">
            <text:p>0,00188078703703704000</text:p>
          </table:table-cell>
          <table:table-cell table:formula="of:=[.D252]-[.D251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65" office:value-type="float" office:value="16315" calcext:value-type="float">
            <text:p>16315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188831018518519" calcext:value-type="float">
            <text:p>0,00188831018518519000</text:p>
          </table:table-cell>
          <table:table-cell table:formula="of:=[.D253]-[.D252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65" office:value-type="float" office:value="16380" calcext:value-type="float">
            <text:p>16380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189583333333333" calcext:value-type="float">
            <text:p>0,00189583333333333000</text:p>
          </table:table-cell>
          <table:table-cell table:formula="of:=[.D254]-[.D253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65" office:value-type="float" office:value="16445" calcext:value-type="float">
            <text:p>16445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190335648148148" calcext:value-type="float">
            <text:p>0,00190335648148148000</text:p>
          </table:table-cell>
          <table:table-cell table:formula="of:=[.D255]-[.D254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65" office:value-type="float" office:value="16510" calcext:value-type="float">
            <text:p>16510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191087962962963" calcext:value-type="float">
            <text:p>0,00191087962962963000</text:p>
          </table:table-cell>
          <table:table-cell table:formula="of:=[.D256]-[.D255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65" office:value-type="float" office:value="16575" calcext:value-type="float">
            <text:p>16575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191840277777778" calcext:value-type="float">
            <text:p>0,00191840277777778000</text:p>
          </table:table-cell>
          <table:table-cell table:formula="of:=[.D257]-[.D256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65" office:value-type="float" office:value="16640" calcext:value-type="float">
            <text:p>16640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192592592592593" calcext:value-type="float">
            <text:p>0,00192592592592593000</text:p>
          </table:table-cell>
          <table:table-cell table:formula="of:=[.D258]-[.D257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65" office:value-type="float" office:value="16705" calcext:value-type="float">
            <text:p>16705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193344907407407" calcext:value-type="float">
            <text:p>0,00193344907407407000</text:p>
          </table:table-cell>
          <table:table-cell table:formula="of:=[.D259]-[.D258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65" office:value-type="float" office:value="16770" calcext:value-type="float">
            <text:p>16770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194097222222222" calcext:value-type="float">
            <text:p>0,00194097222222222000</text:p>
          </table:table-cell>
          <table:table-cell table:formula="of:=[.D260]-[.D259]" office:value-type="float" office:value="0.00000752314814814821" calcext:value-type="float">
            <text:p>0,00000752314814814821</text:p>
          </table:table-cell>
          <table:table-cell table:number-columns-repeated="16379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65" office:value-type="float" office:value="16835" calcext:value-type="float">
            <text:p>16835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194849537037037" calcext:value-type="float">
            <text:p>0,00194849537037037000</text:p>
          </table:table-cell>
          <table:table-cell table:formula="of:=[.D261]-[.D260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65" office:value-type="float" office:value="16900" calcext:value-type="float">
            <text:p>1690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195601851851852" calcext:value-type="float">
            <text:p>0,00195601851851852000</text:p>
          </table:table-cell>
          <table:table-cell table:formula="of:=[.D262]-[.D261]" office:value-type="float" office:value="0.00000752314814814843" calcext:value-type="float">
            <text:p>0,00000752314814814843</text:p>
          </table:table-cell>
          <table:table-cell table:number-columns-repeated="16379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65" office:value-type="float" office:value="16965" calcext:value-type="float">
            <text:p>16965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196354166666667" calcext:value-type="float">
            <text:p>0,00196354166666667000</text:p>
          </table:table-cell>
          <table:table-cell table:formula="of:=[.D263]-[.D262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65" office:value-type="float" office:value="17030" calcext:value-type="float">
            <text:p>17030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197106481481482" calcext:value-type="float">
            <text:p>0,00197106481481482000</text:p>
          </table:table-cell>
          <table:table-cell table:formula="of:=[.D264]-[.D263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65" office:value-type="float" office:value="17095" calcext:value-type="float">
            <text:p>17095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197858796296296" calcext:value-type="float">
            <text:p>0,00197858796296296000</text:p>
          </table:table-cell>
          <table:table-cell table:formula="of:=[.D265]-[.D264]" office:value-type="float" office:value="0.00000752314814814843" calcext:value-type="float">
            <text:p>0,00000752314814814843</text:p>
          </table:table-cell>
          <table:table-cell table:number-columns-repeated="16379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65" office:value-type="float" office:value="17160" calcext:value-type="float">
            <text:p>17160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198611111111111" calcext:value-type="float">
            <text:p>0,00198611111111111000</text:p>
          </table:table-cell>
          <table:table-cell table:formula="of:=[.D266]-[.D265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65" office:value-type="float" office:value="17225" calcext:value-type="float">
            <text:p>17225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199363425925926" calcext:value-type="float">
            <text:p>0,00199363425925926000</text:p>
          </table:table-cell>
          <table:table-cell table:formula="of:=[.D267]-[.D266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65" office:value-type="float" office:value="17290" calcext:value-type="float">
            <text:p>17290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200115740740741" calcext:value-type="float">
            <text:p>0,00200115740740741000</text:p>
          </table:table-cell>
          <table:table-cell table:formula="of:=[.D268]-[.D267]" office:value-type="float" office:value="0.00000752314814814843" calcext:value-type="float">
            <text:p>0,00000752314814814843</text:p>
          </table:table-cell>
          <table:table-cell table:number-columns-repeated="16379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65" office:value-type="float" office:value="17355" calcext:value-type="float">
            <text:p>17355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200868055555556" calcext:value-type="float">
            <text:p>0,00200868055555556000</text:p>
          </table:table-cell>
          <table:table-cell table:formula="of:=[.D269]-[.D268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65" office:value-type="float" office:value="17420" calcext:value-type="float">
            <text:p>17420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20162037037037" calcext:value-type="float">
            <text:p>0,00201620370370370000</text:p>
          </table:table-cell>
          <table:table-cell table:formula="of:=[.D270]-[.D269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65" office:value-type="float" office:value="17485" calcext:value-type="float">
            <text:p>17485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202372685185185" calcext:value-type="float">
            <text:p>0,00202372685185185000</text:p>
          </table:table-cell>
          <table:table-cell table:formula="of:=[.D271]-[.D270]" office:value-type="float" office:value="0.00000752314814814843" calcext:value-type="float">
            <text:p>0,00000752314814814843</text:p>
          </table:table-cell>
          <table:table-cell table:number-columns-repeated="1637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65" office:value-type="float" office:value="17550" calcext:value-type="float">
            <text:p>1755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203125" calcext:value-type="float">
            <text:p>0,00203125000000000000</text:p>
          </table:table-cell>
          <table:table-cell table:formula="of:=[.D272]-[.D271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65" office:value-type="float" office:value="17615" calcext:value-type="float">
            <text:p>17615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203877314814815" calcext:value-type="float">
            <text:p>0,00203877314814815000</text:p>
          </table:table-cell>
          <table:table-cell table:formula="of:=[.D273]-[.D272]" office:value-type="float" office:value="0.00000752314814814843" calcext:value-type="float">
            <text:p>0,00000752314814814843</text:p>
          </table:table-cell>
          <table:table-cell table:number-columns-repeated="16379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65" office:value-type="float" office:value="17680" calcext:value-type="float">
            <text:p>17680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20462962962963" calcext:value-type="float">
            <text:p>0,00204629629629630000</text:p>
          </table:table-cell>
          <table:table-cell table:formula="of:=[.D274]-[.D273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65" office:value-type="float" office:value="17745" calcext:value-type="float">
            <text:p>17745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205381944444444" calcext:value-type="float">
            <text:p>0,00205381944444444000</text:p>
          </table:table-cell>
          <table:table-cell table:formula="of:=[.D275]-[.D274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65" office:value-type="float" office:value="17810" calcext:value-type="float">
            <text:p>17810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206134259259259" calcext:value-type="float">
            <text:p>0,00206134259259259000</text:p>
          </table:table-cell>
          <table:table-cell table:formula="of:=[.D276]-[.D275]" office:value-type="float" office:value="0.00000752314814814843" calcext:value-type="float">
            <text:p>0,00000752314814814843</text:p>
          </table:table-cell>
          <table:table-cell table:number-columns-repeated="16379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65" office:value-type="float" office:value="17875" calcext:value-type="float">
            <text:p>17875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206886574074074" calcext:value-type="float">
            <text:p>0,00206886574074074000</text:p>
          </table:table-cell>
          <table:table-cell table:formula="of:=[.D277]-[.D276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65" office:value-type="float" office:value="17940" calcext:value-type="float">
            <text:p>17940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207638888888889" calcext:value-type="float">
            <text:p>0,00207638888888889000</text:p>
          </table:table-cell>
          <table:table-cell table:formula="of:=[.D278]-[.D277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65" office:value-type="float" office:value="18005" calcext:value-type="float">
            <text:p>18005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208391203703704" calcext:value-type="float">
            <text:p>0,00208391203703704000</text:p>
          </table:table-cell>
          <table:table-cell table:formula="of:=[.D279]-[.D278]" office:value-type="float" office:value="0.00000752314814814843" calcext:value-type="float">
            <text:p>0,00000752314814814843</text:p>
          </table:table-cell>
          <table:table-cell table:number-columns-repeated="16379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65" office:value-type="float" office:value="18070" calcext:value-type="float">
            <text:p>18070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209143518518519" calcext:value-type="float">
            <text:p>0,00209143518518519000</text:p>
          </table:table-cell>
          <table:table-cell table:formula="of:=[.D280]-[.D279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65" office:value-type="float" office:value="18135" calcext:value-type="float">
            <text:p>18135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209895833333333" calcext:value-type="float">
            <text:p>0,00209895833333333000</text:p>
          </table:table-cell>
          <table:table-cell table:formula="of:=[.D281]-[.D280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65" office:value-type="float" office:value="18200" calcext:value-type="float">
            <text:p>1820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210648148148148" calcext:value-type="float">
            <text:p>0,00210648148148148000</text:p>
          </table:table-cell>
          <table:table-cell table:formula="of:=[.D282]-[.D281]" office:value-type="float" office:value="0.00000752314814814843" calcext:value-type="float">
            <text:p>0,00000752314814814843</text:p>
          </table:table-cell>
          <table:table-cell table:number-columns-repeated="16379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65" office:value-type="float" office:value="18265" calcext:value-type="float">
            <text:p>18265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211400462962963" calcext:value-type="float">
            <text:p>0,00211400462962963000</text:p>
          </table:table-cell>
          <table:table-cell table:formula="of:=[.D283]-[.D282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65" office:value-type="float" office:value="18330" calcext:value-type="float">
            <text:p>18330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212152777777778" calcext:value-type="float">
            <text:p>0,00212152777777778000</text:p>
          </table:table-cell>
          <table:table-cell table:formula="of:=[.D284]-[.D283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65" office:value-type="float" office:value="18395" calcext:value-type="float">
            <text:p>18395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212905092592593" calcext:value-type="float">
            <text:p>0,00212905092592593000</text:p>
          </table:table-cell>
          <table:table-cell table:formula="of:=[.D285]-[.D284]" office:value-type="float" office:value="0.00000752314814814843" calcext:value-type="float">
            <text:p>0,00000752314814814843</text:p>
          </table:table-cell>
          <table:table-cell table:number-columns-repeated="16379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65" office:value-type="float" office:value="18460" calcext:value-type="float">
            <text:p>18460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213657407407407" calcext:value-type="float">
            <text:p>0,00213657407407407000</text:p>
          </table:table-cell>
          <table:table-cell table:formula="of:=[.D286]-[.D285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65" office:value-type="float" office:value="18525" calcext:value-type="float">
            <text:p>18525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214409722222222" calcext:value-type="float">
            <text:p>0,00214409722222222000</text:p>
          </table:table-cell>
          <table:table-cell table:formula="of:=[.D287]-[.D286]" office:value-type="float" office:value="0.00000752314814814843" calcext:value-type="float">
            <text:p>0,00000752314814814843</text:p>
          </table:table-cell>
          <table:table-cell table:number-columns-repeated="16379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65" office:value-type="float" office:value="18590" calcext:value-type="float">
            <text:p>18590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215162037037037" calcext:value-type="float">
            <text:p>0,00215162037037037000</text:p>
          </table:table-cell>
          <table:table-cell table:formula="of:=[.D288]-[.D287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65" office:value-type="float" office:value="18655" calcext:value-type="float">
            <text:p>18655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215914351851852" calcext:value-type="float">
            <text:p>0,00215914351851852000</text:p>
          </table:table-cell>
          <table:table-cell table:formula="of:=[.D289]-[.D288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65" office:value-type="float" office:value="18720" calcext:value-type="float">
            <text:p>18720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216666666666667" calcext:value-type="float">
            <text:p>0,00216666666666667000</text:p>
          </table:table-cell>
          <table:table-cell table:formula="of:=[.D290]-[.D289]" office:value-type="float" office:value="0.00000752314814814843" calcext:value-type="float">
            <text:p>0,00000752314814814843</text:p>
          </table:table-cell>
          <table:table-cell table:number-columns-repeated="16379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65" office:value-type="float" office:value="18785" calcext:value-type="float">
            <text:p>18785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217418981481482" calcext:value-type="float">
            <text:p>0,00217418981481482000</text:p>
          </table:table-cell>
          <table:table-cell table:formula="of:=[.D291]-[.D290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65" office:value-type="float" office:value="18850" calcext:value-type="float">
            <text:p>1885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218171296296296" calcext:value-type="float">
            <text:p>0,00218171296296296000</text:p>
          </table:table-cell>
          <table:table-cell table:formula="of:=[.D292]-[.D291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65" office:value-type="float" office:value="18915" calcext:value-type="float">
            <text:p>18915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218923611111111" calcext:value-type="float">
            <text:p>0,00218923611111111000</text:p>
          </table:table-cell>
          <table:table-cell table:formula="of:=[.D293]-[.D292]" office:value-type="float" office:value="0.00000752314814814843" calcext:value-type="float">
            <text:p>0,00000752314814814843</text:p>
          </table:table-cell>
          <table:table-cell table:number-columns-repeated="16379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65" office:value-type="float" office:value="18980" calcext:value-type="float">
            <text:p>18980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219675925925926" calcext:value-type="float">
            <text:p>0,00219675925925926000</text:p>
          </table:table-cell>
          <table:table-cell table:formula="of:=[.D294]-[.D293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65" office:value-type="float" office:value="19045" calcext:value-type="float">
            <text:p>19045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220428240740741" calcext:value-type="float">
            <text:p>0,00220428240740741000</text:p>
          </table:table-cell>
          <table:table-cell table:formula="of:=[.D295]-[.D294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65" office:value-type="float" office:value="19110" calcext:value-type="float">
            <text:p>19110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221180555555556" calcext:value-type="float">
            <text:p>0,00221180555555556000</text:p>
          </table:table-cell>
          <table:table-cell table:formula="of:=[.D296]-[.D295]" office:value-type="float" office:value="0.00000752314814814843" calcext:value-type="float">
            <text:p>0,00000752314814814843</text:p>
          </table:table-cell>
          <table:table-cell table:number-columns-repeated="16379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65" office:value-type="float" office:value="19175" calcext:value-type="float">
            <text:p>19175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22193287037037" calcext:value-type="float">
            <text:p>0,00221932870370370000</text:p>
          </table:table-cell>
          <table:table-cell table:formula="of:=[.D297]-[.D296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65" office:value-type="float" office:value="19240" calcext:value-type="float">
            <text:p>19240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222685185185185" calcext:value-type="float">
            <text:p>0,00222685185185185000</text:p>
          </table:table-cell>
          <table:table-cell table:formula="of:=[.D298]-[.D297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65" office:value-type="float" office:value="19305" calcext:value-type="float">
            <text:p>19305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2234375" calcext:value-type="float">
            <text:p>0,00223437500000000000</text:p>
          </table:table-cell>
          <table:table-cell table:formula="of:=[.D299]-[.D298]" office:value-type="float" office:value="0.00000752314814814843" calcext:value-type="float">
            <text:p>0,00000752314814814843</text:p>
          </table:table-cell>
          <table:table-cell table:number-columns-repeated="16379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65" office:value-type="float" office:value="19370" calcext:value-type="float">
            <text:p>19370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224189814814815" calcext:value-type="float">
            <text:p>0,00224189814814815000</text:p>
          </table:table-cell>
          <table:table-cell table:formula="of:=[.D300]-[.D299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65" office:value-type="float" office:value="19435" calcext:value-type="float">
            <text:p>19435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22494212962963" calcext:value-type="float">
            <text:p>0,00224942129629630000</text:p>
          </table:table-cell>
          <table:table-cell table:formula="of:=[.D301]-[.D300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65" office:value-type="float" office:value="19500" calcext:value-type="float">
            <text:p>195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225694444444444" calcext:value-type="float">
            <text:p>0,00225694444444444000</text:p>
          </table:table-cell>
          <table:table-cell table:formula="of:=[.D302]-[.D301]" office:value-type="float" office:value="0.00000752314814814843" calcext:value-type="float">
            <text:p>0,00000752314814814843</text:p>
          </table:table-cell>
          <table:table-cell table:number-columns-repeated="16379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65" office:value-type="float" office:value="19565" calcext:value-type="float">
            <text:p>19565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226446759259259" calcext:value-type="float">
            <text:p>0,00226446759259259000</text:p>
          </table:table-cell>
          <table:table-cell table:formula="of:=[.D303]-[.D302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65" office:value-type="float" office:value="19630" calcext:value-type="float">
            <text:p>19630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227199074074074" calcext:value-type="float">
            <text:p>0,00227199074074074000</text:p>
          </table:table-cell>
          <table:table-cell table:formula="of:=[.D304]-[.D303]" office:value-type="float" office:value="0.00000752314814814843" calcext:value-type="float">
            <text:p>0,00000752314814814843</text:p>
          </table:table-cell>
          <table:table-cell table:number-columns-repeated="16379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65" office:value-type="float" office:value="19695" calcext:value-type="float">
            <text:p>19695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227951388888889" calcext:value-type="float">
            <text:p>0,00227951388888889000</text:p>
          </table:table-cell>
          <table:table-cell table:formula="of:=[.D305]-[.D304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65" office:value-type="float" office:value="19760" calcext:value-type="float">
            <text:p>19760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228703703703704" calcext:value-type="float">
            <text:p>0,00228703703703704000</text:p>
          </table:table-cell>
          <table:table-cell table:formula="of:=[.D306]-[.D305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65" office:value-type="float" office:value="19825" calcext:value-type="float">
            <text:p>19825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229456018518519" calcext:value-type="float">
            <text:p>0,00229456018518519000</text:p>
          </table:table-cell>
          <table:table-cell table:formula="of:=[.D307]-[.D306]" office:value-type="float" office:value="0.00000752314814814843" calcext:value-type="float">
            <text:p>0,00000752314814814843</text:p>
          </table:table-cell>
          <table:table-cell table:number-columns-repeated="16379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65" office:value-type="float" office:value="19890" calcext:value-type="float">
            <text:p>19890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230208333333333" calcext:value-type="float">
            <text:p>0,00230208333333333000</text:p>
          </table:table-cell>
          <table:table-cell table:formula="of:=[.D308]-[.D307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65" office:value-type="float" office:value="19955" calcext:value-type="float">
            <text:p>19955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230960648148148" calcext:value-type="float">
            <text:p>0,00230960648148148000</text:p>
          </table:table-cell>
          <table:table-cell table:formula="of:=[.D309]-[.D308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65" office:value-type="float" office:value="20020" calcext:value-type="float">
            <text:p>20020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231712962962963" calcext:value-type="float">
            <text:p>0,00231712962962963000</text:p>
          </table:table-cell>
          <table:table-cell table:formula="of:=[.D310]-[.D309]" office:value-type="float" office:value="0.00000752314814814843" calcext:value-type="float">
            <text:p>0,00000752314814814843</text:p>
          </table:table-cell>
          <table:table-cell table:number-columns-repeated="16379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65" office:value-type="float" office:value="20085" calcext:value-type="float">
            <text:p>20085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232465277777778" calcext:value-type="float">
            <text:p>0,00232465277777778000</text:p>
          </table:table-cell>
          <table:table-cell table:formula="of:=[.D311]-[.D310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65" office:value-type="float" office:value="20150" calcext:value-type="float">
            <text:p>2015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233217592592593" calcext:value-type="float">
            <text:p>0,00233217592592593000</text:p>
          </table:table-cell>
          <table:table-cell table:formula="of:=[.D312]-[.D311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65" office:value-type="float" office:value="20215" calcext:value-type="float">
            <text:p>20215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233969907407407" calcext:value-type="float">
            <text:p>0,00233969907407407000</text:p>
          </table:table-cell>
          <table:table-cell table:formula="of:=[.D313]-[.D312]" office:value-type="float" office:value="0.00000752314814814843" calcext:value-type="float">
            <text:p>0,00000752314814814843</text:p>
          </table:table-cell>
          <table:table-cell table:number-columns-repeated="16379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65" office:value-type="float" office:value="20280" calcext:value-type="float">
            <text:p>20280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234722222222222" calcext:value-type="float">
            <text:p>0,00234722222222222000</text:p>
          </table:table-cell>
          <table:table-cell table:formula="of:=[.D314]-[.D313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65" office:value-type="float" office:value="20345" calcext:value-type="float">
            <text:p>20345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235474537037037" calcext:value-type="float">
            <text:p>0,00235474537037037000</text:p>
          </table:table-cell>
          <table:table-cell table:formula="of:=[.D315]-[.D314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65" office:value-type="float" office:value="20410" calcext:value-type="float">
            <text:p>20410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236226851851852" calcext:value-type="float">
            <text:p>0,00236226851851852000</text:p>
          </table:table-cell>
          <table:table-cell table:formula="of:=[.D316]-[.D315]" office:value-type="float" office:value="0.00000752314814814843" calcext:value-type="float">
            <text:p>0,00000752314814814843</text:p>
          </table:table-cell>
          <table:table-cell table:number-columns-repeated="16379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65" office:value-type="float" office:value="20475" calcext:value-type="float">
            <text:p>20475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236979166666667" calcext:value-type="float">
            <text:p>0,00236979166666667000</text:p>
          </table:table-cell>
          <table:table-cell table:formula="of:=[.D317]-[.D316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65" office:value-type="float" office:value="20540" calcext:value-type="float">
            <text:p>20540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237731481481481" calcext:value-type="float">
            <text:p>0,00237731481481481000</text:p>
          </table:table-cell>
          <table:table-cell table:formula="of:=[.D318]-[.D317]" office:value-type="float" office:value="0.00000752314814814843" calcext:value-type="float">
            <text:p>0,00000752314814814843</text:p>
          </table:table-cell>
          <table:table-cell table:number-columns-repeated="16379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65" office:value-type="float" office:value="20605" calcext:value-type="float">
            <text:p>20605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238483796296296" calcext:value-type="float">
            <text:p>0,00238483796296296000</text:p>
          </table:table-cell>
          <table:table-cell table:formula="of:=[.D319]-[.D318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65" office:value-type="float" office:value="20670" calcext:value-type="float">
            <text:p>20670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239236111111111" calcext:value-type="float">
            <text:p>0,00239236111111111000</text:p>
          </table:table-cell>
          <table:table-cell table:formula="of:=[.D320]-[.D319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65" office:value-type="float" office:value="20735" calcext:value-type="float">
            <text:p>20735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239988425925926" calcext:value-type="float">
            <text:p>0,00239988425925926000</text:p>
          </table:table-cell>
          <table:table-cell table:formula="of:=[.D321]-[.D320]" office:value-type="float" office:value="0.00000752314814814843" calcext:value-type="float">
            <text:p>0,00000752314814814843</text:p>
          </table:table-cell>
          <table:table-cell table:number-columns-repeated="16379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65" office:value-type="float" office:value="20800" calcext:value-type="float">
            <text:p>2080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240740740740741" calcext:value-type="float">
            <text:p>0,00240740740740741000</text:p>
          </table:table-cell>
          <table:table-cell table:formula="of:=[.D322]-[.D321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65" office:value-type="float" office:value="20865" calcext:value-type="float">
            <text:p>20865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241493055555556" calcext:value-type="float">
            <text:p>0,00241493055555556000</text:p>
          </table:table-cell>
          <table:table-cell table:formula="of:=[.D323]-[.D322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65" office:value-type="float" office:value="20930" calcext:value-type="float">
            <text:p>20930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24224537037037" calcext:value-type="float">
            <text:p>0,00242245370370370000</text:p>
          </table:table-cell>
          <table:table-cell table:formula="of:=[.D324]-[.D323]" office:value-type="float" office:value="0.00000752314814814843" calcext:value-type="float">
            <text:p>0,00000752314814814843</text:p>
          </table:table-cell>
          <table:table-cell table:number-columns-repeated="16379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65" office:value-type="float" office:value="20995" calcext:value-type="float">
            <text:p>20995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242997685185185" calcext:value-type="float">
            <text:p>0,00242997685185185000</text:p>
          </table:table-cell>
          <table:table-cell table:formula="of:=[.D325]-[.D324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65" office:value-type="float" office:value="21060" calcext:value-type="float">
            <text:p>21060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24375" calcext:value-type="float">
            <text:p>0,00243750000000000000</text:p>
          </table:table-cell>
          <table:table-cell table:formula="of:=[.D326]-[.D325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65" office:value-type="float" office:value="21125" calcext:value-type="float">
            <text:p>21125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244502314814815" calcext:value-type="float">
            <text:p>0,00244502314814815000</text:p>
          </table:table-cell>
          <table:table-cell table:formula="of:=[.D327]-[.D326]" office:value-type="float" office:value="0.00000752314814814843" calcext:value-type="float">
            <text:p>0,00000752314814814843</text:p>
          </table:table-cell>
          <table:table-cell table:number-columns-repeated="16379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65" office:value-type="float" office:value="21190" calcext:value-type="float">
            <text:p>21190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24525462962963" calcext:value-type="float">
            <text:p>0,00245254629629630000</text:p>
          </table:table-cell>
          <table:table-cell table:formula="of:=[.D328]-[.D327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65" office:value-type="float" office:value="21255" calcext:value-type="float">
            <text:p>21255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246006944444444" calcext:value-type="float">
            <text:p>0,00246006944444444000</text:p>
          </table:table-cell>
          <table:table-cell table:formula="of:=[.D329]-[.D328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65" office:value-type="float" office:value="21320" calcext:value-type="float">
            <text:p>21320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246759259259259" calcext:value-type="float">
            <text:p>0,00246759259259259000</text:p>
          </table:table-cell>
          <table:table-cell table:formula="of:=[.D330]-[.D329]" office:value-type="float" office:value="0.00000752314814814843" calcext:value-type="float">
            <text:p>0,00000752314814814843</text:p>
          </table:table-cell>
          <table:table-cell table:number-columns-repeated="16379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65" office:value-type="float" office:value="21385" calcext:value-type="float">
            <text:p>21385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247511574074074" calcext:value-type="float">
            <text:p>0,00247511574074074000</text:p>
          </table:table-cell>
          <table:table-cell table:formula="of:=[.D331]-[.D330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65" office:value-type="float" office:value="21450" calcext:value-type="float">
            <text:p>2145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248263888888889" calcext:value-type="float">
            <text:p>0,00248263888888889000</text:p>
          </table:table-cell>
          <table:table-cell table:formula="of:=[.D332]-[.D331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65" office:value-type="float" office:value="21515" calcext:value-type="float">
            <text:p>21515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249016203703704" calcext:value-type="float">
            <text:p>0,00249016203703704000</text:p>
          </table:table-cell>
          <table:table-cell table:formula="of:=[.D333]-[.D332]" office:value-type="float" office:value="0.00000752314814814843" calcext:value-type="float">
            <text:p>0,00000752314814814843</text:p>
          </table:table-cell>
          <table:table-cell table:number-columns-repeated="16379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65" office:value-type="float" office:value="21580" calcext:value-type="float">
            <text:p>21580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249768518518519" calcext:value-type="float">
            <text:p>0,00249768518518519000</text:p>
          </table:table-cell>
          <table:table-cell table:formula="of:=[.D334]-[.D333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65" office:value-type="float" office:value="21645" calcext:value-type="float">
            <text:p>21645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250520833333333" calcext:value-type="float">
            <text:p>0,00250520833333333000</text:p>
          </table:table-cell>
          <table:table-cell table:formula="of:=[.D335]-[.D334]" office:value-type="float" office:value="0.00000752314814814843" calcext:value-type="float">
            <text:p>0,00000752314814814843</text:p>
          </table:table-cell>
          <table:table-cell table:number-columns-repeated="16379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65" office:value-type="float" office:value="21710" calcext:value-type="float">
            <text:p>21710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251273148148148" calcext:value-type="float">
            <text:p>0,00251273148148148000</text:p>
          </table:table-cell>
          <table:table-cell table:formula="of:=[.D336]-[.D335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65" office:value-type="float" office:value="21775" calcext:value-type="float">
            <text:p>21775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252025462962963" calcext:value-type="float">
            <text:p>0,00252025462962963000</text:p>
          </table:table-cell>
          <table:table-cell table:formula="of:=[.D337]-[.D336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65" office:value-type="float" office:value="21840" calcext:value-type="float">
            <text:p>21840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252777777777778" calcext:value-type="float">
            <text:p>0,00252777777777778000</text:p>
          </table:table-cell>
          <table:table-cell table:formula="of:=[.D338]-[.D337]" office:value-type="float" office:value="0.00000752314814814843" calcext:value-type="float">
            <text:p>0,00000752314814814843</text:p>
          </table:table-cell>
          <table:table-cell table:number-columns-repeated="16379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65" office:value-type="float" office:value="21905" calcext:value-type="float">
            <text:p>21905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253530092592593" calcext:value-type="float">
            <text:p>0,00253530092592593000</text:p>
          </table:table-cell>
          <table:table-cell table:formula="of:=[.D339]-[.D338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65" office:value-type="float" office:value="21970" calcext:value-type="float">
            <text:p>21970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254282407407407" calcext:value-type="float">
            <text:p>0,00254282407407407000</text:p>
          </table:table-cell>
          <table:table-cell table:formula="of:=[.D340]-[.D339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65" office:value-type="float" office:value="22035" calcext:value-type="float">
            <text:p>22035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255034722222222" calcext:value-type="float">
            <text:p>0,00255034722222222000</text:p>
          </table:table-cell>
          <table:table-cell table:formula="of:=[.D341]-[.D340]" office:value-type="float" office:value="0.00000752314814814843" calcext:value-type="float">
            <text:p>0,00000752314814814843</text:p>
          </table:table-cell>
          <table:table-cell table:number-columns-repeated="16379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65" office:value-type="float" office:value="22100" calcext:value-type="float">
            <text:p>2210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255787037037037" calcext:value-type="float">
            <text:p>0,00255787037037037000</text:p>
          </table:table-cell>
          <table:table-cell table:formula="of:=[.D342]-[.D341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65" office:value-type="float" office:value="22165" calcext:value-type="float">
            <text:p>22165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256539351851852" calcext:value-type="float">
            <text:p>0,00256539351851852000</text:p>
          </table:table-cell>
          <table:table-cell table:formula="of:=[.D343]-[.D342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65" office:value-type="float" office:value="22230" calcext:value-type="float">
            <text:p>22230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257291666666667" calcext:value-type="float">
            <text:p>0,00257291666666667000</text:p>
          </table:table-cell>
          <table:table-cell table:formula="of:=[.D344]-[.D343]" office:value-type="float" office:value="0.00000752314814814843" calcext:value-type="float">
            <text:p>0,00000752314814814843</text:p>
          </table:table-cell>
          <table:table-cell table:number-columns-repeated="16379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65" office:value-type="float" office:value="22295" calcext:value-type="float">
            <text:p>22295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258043981481482" calcext:value-type="float">
            <text:p>0,00258043981481482000</text:p>
          </table:table-cell>
          <table:table-cell table:formula="of:=[.D345]-[.D344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65" office:value-type="float" office:value="22360" calcext:value-type="float">
            <text:p>22360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258796296296296" calcext:value-type="float">
            <text:p>0,00258796296296296000</text:p>
          </table:table-cell>
          <table:table-cell table:formula="of:=[.D346]-[.D345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65" office:value-type="float" office:value="22425" calcext:value-type="float">
            <text:p>22425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259548611111111" calcext:value-type="float">
            <text:p>0,00259548611111111000</text:p>
          </table:table-cell>
          <table:table-cell table:formula="of:=[.D347]-[.D346]" office:value-type="float" office:value="0.00000752314814814843" calcext:value-type="float">
            <text:p>0,00000752314814814843</text:p>
          </table:table-cell>
          <table:table-cell table:number-columns-repeated="16379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65" office:value-type="float" office:value="22490" calcext:value-type="float">
            <text:p>22490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260300925925926" calcext:value-type="float">
            <text:p>0,00260300925925926000</text:p>
          </table:table-cell>
          <table:table-cell table:formula="of:=[.D348]-[.D347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65" office:value-type="float" office:value="22555" calcext:value-type="float">
            <text:p>22555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261053240740741" calcext:value-type="float">
            <text:p>0,00261053240740741000</text:p>
          </table:table-cell>
          <table:table-cell table:formula="of:=[.D349]-[.D348]" office:value-type="float" office:value="0.00000752314814814843" calcext:value-type="float">
            <text:p>0,00000752314814814843</text:p>
          </table:table-cell>
          <table:table-cell table:number-columns-repeated="16379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65" office:value-type="float" office:value="22620" calcext:value-type="float">
            <text:p>22620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261805555555556" calcext:value-type="float">
            <text:p>0,00261805555555556000</text:p>
          </table:table-cell>
          <table:table-cell table:formula="of:=[.D350]-[.D349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65" office:value-type="float" office:value="22685" calcext:value-type="float">
            <text:p>22685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26255787037037" calcext:value-type="float">
            <text:p>0,00262557870370370000</text:p>
          </table:table-cell>
          <table:table-cell table:formula="of:=[.D351]-[.D350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65" office:value-type="float" office:value="22750" calcext:value-type="float">
            <text:p>2275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263310185185185" calcext:value-type="float">
            <text:p>0,00263310185185185000</text:p>
          </table:table-cell>
          <table:table-cell table:formula="of:=[.D352]-[.D351]" office:value-type="float" office:value="0.00000752314814814843" calcext:value-type="float">
            <text:p>0,00000752314814814843</text:p>
          </table:table-cell>
          <table:table-cell table:number-columns-repeated="16379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65" office:value-type="float" office:value="22815" calcext:value-type="float">
            <text:p>22815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2640625" calcext:value-type="float">
            <text:p>0,00264062500000000000</text:p>
          </table:table-cell>
          <table:table-cell table:formula="of:=[.D353]-[.D352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65" office:value-type="float" office:value="22880" calcext:value-type="float">
            <text:p>22880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264814814814815" calcext:value-type="float">
            <text:p>0,00264814814814815000</text:p>
          </table:table-cell>
          <table:table-cell table:formula="of:=[.D354]-[.D353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65" office:value-type="float" office:value="22945" calcext:value-type="float">
            <text:p>22945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26556712962963" calcext:value-type="float">
            <text:p>0,00265567129629630000</text:p>
          </table:table-cell>
          <table:table-cell table:formula="of:=[.D355]-[.D354]" office:value-type="float" office:value="0.00000752314814814843" calcext:value-type="float">
            <text:p>0,00000752314814814843</text:p>
          </table:table-cell>
          <table:table-cell table:number-columns-repeated="16379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65" office:value-type="float" office:value="23010" calcext:value-type="float">
            <text:p>23010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266319444444444" calcext:value-type="float">
            <text:p>0,00266319444444444000</text:p>
          </table:table-cell>
          <table:table-cell table:formula="of:=[.D356]-[.D355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65" office:value-type="float" office:value="23075" calcext:value-type="float">
            <text:p>23075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267071759259259" calcext:value-type="float">
            <text:p>0,00267071759259259000</text:p>
          </table:table-cell>
          <table:table-cell table:formula="of:=[.D357]-[.D356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65" office:value-type="float" office:value="23140" calcext:value-type="float">
            <text:p>23140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267824074074074" calcext:value-type="float">
            <text:p>0,00267824074074074000</text:p>
          </table:table-cell>
          <table:table-cell table:formula="of:=[.D358]-[.D357]" office:value-type="float" office:value="0.00000752314814814843" calcext:value-type="float">
            <text:p>0,00000752314814814843</text:p>
          </table:table-cell>
          <table:table-cell table:number-columns-repeated="16379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65" office:value-type="float" office:value="23205" calcext:value-type="float">
            <text:p>23205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268576388888889" calcext:value-type="float">
            <text:p>0,00268576388888889000</text:p>
          </table:table-cell>
          <table:table-cell table:formula="of:=[.D359]-[.D358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65" office:value-type="float" office:value="23270" calcext:value-type="float">
            <text:p>23270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269328703703704" calcext:value-type="float">
            <text:p>0,00269328703703704000</text:p>
          </table:table-cell>
          <table:table-cell table:formula="of:=[.D360]-[.D359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65" office:value-type="float" office:value="23335" calcext:value-type="float">
            <text:p>23335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270081018518519" calcext:value-type="float">
            <text:p>0,00270081018518519000</text:p>
          </table:table-cell>
          <table:table-cell table:formula="of:=[.D361]-[.D360]" office:value-type="float" office:value="0.00000752314814814843" calcext:value-type="float">
            <text:p>0,00000752314814814843</text:p>
          </table:table-cell>
          <table:table-cell table:number-columns-repeated="16379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65" office:value-type="float" office:value="23400" calcext:value-type="float">
            <text:p>2340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270833333333333" calcext:value-type="float">
            <text:p>0,00270833333333333000</text:p>
          </table:table-cell>
          <table:table-cell table:formula="of:=[.D362]-[.D361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65" office:value-type="float" office:value="23465" calcext:value-type="float">
            <text:p>23465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271585648148148" calcext:value-type="float">
            <text:p>0,00271585648148148000</text:p>
          </table:table-cell>
          <table:table-cell table:formula="of:=[.D363]-[.D362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65" office:value-type="float" office:value="23530" calcext:value-type="float">
            <text:p>23530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272337962962963" calcext:value-type="float">
            <text:p>0,00272337962962963000</text:p>
          </table:table-cell>
          <table:table-cell table:formula="of:=[.D364]-[.D363]" office:value-type="float" office:value="0.00000752314814814843" calcext:value-type="float">
            <text:p>0,00000752314814814843</text:p>
          </table:table-cell>
          <table:table-cell table:number-columns-repeated="16379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65" office:value-type="float" office:value="23595" calcext:value-type="float">
            <text:p>23595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273090277777778" calcext:value-type="float">
            <text:p>0,00273090277777778000</text:p>
          </table:table-cell>
          <table:table-cell table:formula="of:=[.D365]-[.D364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65" office:value-type="float" office:value="23660" calcext:value-type="float">
            <text:p>23660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273842592592593" calcext:value-type="float">
            <text:p>0,00273842592592593000</text:p>
          </table:table-cell>
          <table:table-cell table:formula="of:=[.D366]-[.D365]" office:value-type="float" office:value="0.00000752314814814843" calcext:value-type="float">
            <text:p>0,00000752314814814843</text:p>
          </table:table-cell>
          <table:table-cell table:number-columns-repeated="16379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65" office:value-type="float" office:value="23725" calcext:value-type="float">
            <text:p>23725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274594907407407" calcext:value-type="float">
            <text:p>0,00274594907407407000</text:p>
          </table:table-cell>
          <table:table-cell table:formula="of:=[.D367]-[.D366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65" office:value-type="float" office:value="23790" calcext:value-type="float">
            <text:p>23790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275347222222222" calcext:value-type="float">
            <text:p>0,00275347222222222000</text:p>
          </table:table-cell>
          <table:table-cell table:formula="of:=[.D368]-[.D367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65" office:value-type="float" office:value="23855" calcext:value-type="float">
            <text:p>23855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276099537037037" calcext:value-type="float">
            <text:p>0,00276099537037037000</text:p>
          </table:table-cell>
          <table:table-cell table:formula="of:=[.D369]-[.D368]" office:value-type="float" office:value="0.00000752314814814843" calcext:value-type="float">
            <text:p>0,00000752314814814843</text:p>
          </table:table-cell>
          <table:table-cell table:number-columns-repeated="16379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65" office:value-type="float" office:value="23920" calcext:value-type="float">
            <text:p>23920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276851851851852" calcext:value-type="float">
            <text:p>0,00276851851851852000</text:p>
          </table:table-cell>
          <table:table-cell table:formula="of:=[.D370]-[.D369]" office:value-type="float" office:value="0.00000752314814814799" calcext:value-type="float">
            <text:p>0,00000752314814814799</text:p>
          </table:table-cell>
          <table:table-cell table:number-columns-repeated="16379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65" office:value-type="float" office:value="23985" calcext:value-type="float">
            <text:p>23985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277604166666667" calcext:value-type="float">
            <text:p>0,00277604166666667000</text:p>
          </table:table-cell>
          <table:table-cell table:formula="of:=#REF!-[.D370]" office:value-type="string" office:string-value="" calcext:value-type="error">
            <text:p>#REF!</text:p>
          </table:table-cell>
          <table:table-cell table:number-columns-repeated="16379"/>
        </table:table-row>
        <table:table-row table:style-name="ro1" table:number-rows-repeated="104820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8:26:06.516994773</meta:creation-date>
    <dc:date>2026-05-17T18:26:13.642086206</dc:date>
    <meta:editing-duration>PT8S</meta:editing-duration>
    <meta:editing-cycles>1</meta:editing-cycles>
    <meta:document-statistic meta:table-count="1" meta:cell-count="1850" meta:object-count="0"/>
    <meta:generator>LibreOffice/24.2.7.2$Linux_X86_64 LibreOffice_project/420$Build-2</meta:generator>
  </office:meta>
</office:document-meta>
</file>