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51388888888889" calcext:value-type="float">
            <text:p>0,00000451388888888889</text:p>
          </table:table-cell>
          <table:table-cell table:formula="of:=[.D3]-[.D2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9" office:value-type="float" office:value="78" calcext:value-type="float">
            <text:p>7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902777777777778" calcext:value-type="float">
            <text:p>0,00000902777777777778</text:p>
          </table:table-cell>
          <table:table-cell table:formula="of:=[.D4]-[.D3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9" office:value-type="float" office:value="117" calcext:value-type="float">
            <text:p>11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35416666666667" calcext:value-type="float">
            <text:p>0,00001354166666666670</text:p>
          </table:table-cell>
          <table:table-cell table:formula="of:=[.D5]-[.D4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9" office:value-type="float" office:value="156" calcext:value-type="float">
            <text:p>15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80555555555556" calcext:value-type="float">
            <text:p>0,00001805555555555560</text:p>
          </table:table-cell>
          <table:table-cell table:formula="of:=[.D6]-[.D5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9" office:value-type="float" office:value="195" calcext:value-type="float">
            <text:p>19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25694444444444" calcext:value-type="float">
            <text:p>0,00002256944444444450</text:p>
          </table:table-cell>
          <table:table-cell table:formula="of:=[.D7]-[.D6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9" office:value-type="float" office:value="234" calcext:value-type="float">
            <text:p>23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70833333333333" calcext:value-type="float">
            <text:p>0,00002708333333333330</text:p>
          </table:table-cell>
          <table:table-cell table:formula="of:=[.D8]-[.D7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9" office:value-type="float" office:value="273" calcext:value-type="float">
            <text:p>27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15972222222222" calcext:value-type="float">
            <text:p>0,00003159722222222220</text:p>
          </table:table-cell>
          <table:table-cell table:formula="of:=[.D9]-[.D8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9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61111111111111" calcext:value-type="float">
            <text:p>0,00003611111111111110</text:p>
          </table:table-cell>
          <table:table-cell table:formula="of:=[.D10]-[.D9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9" office:value-type="float" office:value="351" calcext:value-type="float">
            <text:p>35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0625" calcext:value-type="float">
            <text:p>0,00004062500000000000</text:p>
          </table:table-cell>
          <table:table-cell table:formula="of:=[.D11]-[.D10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9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51388888888889" calcext:value-type="float">
            <text:p>0,00004513888888888890</text:p>
          </table:table-cell>
          <table:table-cell table:formula="of:=[.D12]-[.D11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9" office:value-type="float" office:value="429" calcext:value-type="float">
            <text:p>42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96527777777778" calcext:value-type="float">
            <text:p>0,00004965277777777780</text:p>
          </table:table-cell>
          <table:table-cell table:formula="of:=[.D13]-[.D12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9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41666666666667" calcext:value-type="float">
            <text:p>0,00005416666666666670</text:p>
          </table:table-cell>
          <table:table-cell table:formula="of:=[.D14]-[.D13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9" office:value-type="float" office:value="507" calcext:value-type="float">
            <text:p>50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586805555555556" calcext:value-type="float">
            <text:p>0,00005868055555555560</text:p>
          </table:table-cell>
          <table:table-cell table:formula="of:=[.D15]-[.D14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9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631944444444444" calcext:value-type="float">
            <text:p>0,00006319444444444440</text:p>
          </table:table-cell>
          <table:table-cell table:formula="of:=[.D16]-[.D15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9" office:value-type="float" office:value="585" calcext:value-type="float">
            <text:p>58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677083333333333" calcext:value-type="float">
            <text:p>0,00006770833333333330</text:p>
          </table:table-cell>
          <table:table-cell table:formula="of:=[.D17]-[.D16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9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722222222222222" calcext:value-type="float">
            <text:p>0,00007222222222222220</text:p>
          </table:table-cell>
          <table:table-cell table:formula="of:=[.D18]-[.D17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9" office:value-type="float" office:value="663" calcext:value-type="float">
            <text:p>66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767361111111111" calcext:value-type="float">
            <text:p>0,00007673611111111110</text:p>
          </table:table-cell>
          <table:table-cell table:formula="of:=[.D19]-[.D18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9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8125" calcext:value-type="float">
            <text:p>0,00008125000000000000</text:p>
          </table:table-cell>
          <table:table-cell table:formula="of:=[.D20]-[.D19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9" office:value-type="float" office:value="741" calcext:value-type="float">
            <text:p>74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857638888888889" calcext:value-type="float">
            <text:p>0,00008576388888888890</text:p>
          </table:table-cell>
          <table:table-cell table:formula="of:=[.D21]-[.D20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9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902777777777778" calcext:value-type="float">
            <text:p>0,00009027777777777780</text:p>
          </table:table-cell>
          <table:table-cell table:formula="of:=[.D22]-[.D21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9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947916666666667" calcext:value-type="float">
            <text:p>0,00009479166666666670</text:p>
          </table:table-cell>
          <table:table-cell table:formula="of:=[.D23]-[.D22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9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993055555555556" calcext:value-type="float">
            <text:p>0,00009930555555555560</text:p>
          </table:table-cell>
          <table:table-cell table:formula="of:=[.D24]-[.D23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9" office:value-type="float" office:value="897" calcext:value-type="float">
            <text:p>89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03819444444444" calcext:value-type="float">
            <text:p>0,00010381944444444400</text:p>
          </table:table-cell>
          <table:table-cell table:formula="of:=[.D25]-[.D24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9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08333333333333" calcext:value-type="float">
            <text:p>0,00010833333333333300</text:p>
          </table:table-cell>
          <table:table-cell table:formula="of:=[.D26]-[.D25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9" office:value-type="float" office:value="975" calcext:value-type="float">
            <text:p>9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12847222222222" calcext:value-type="float">
            <text:p>0,00011284722222222200</text:p>
          </table:table-cell>
          <table:table-cell table:formula="of:=[.D27]-[.D26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9" office:value-type="float" office:value="1014" calcext:value-type="float">
            <text:p>101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17361111111111" calcext:value-type="float">
            <text:p>0,00011736111111111100</text:p>
          </table:table-cell>
          <table:table-cell table:formula="of:=[.D28]-[.D27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9" office:value-type="float" office:value="1053" calcext:value-type="float">
            <text:p>105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21875" calcext:value-type="float">
            <text:p>0,00012187500000000000</text:p>
          </table:table-cell>
          <table:table-cell table:formula="of:=[.D29]-[.D28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9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26388888888889" calcext:value-type="float">
            <text:p>0,00012638888888888900</text:p>
          </table:table-cell>
          <table:table-cell table:formula="of:=[.D30]-[.D29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9" office:value-type="float" office:value="1131" calcext:value-type="float">
            <text:p>113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30902777777778" calcext:value-type="float">
            <text:p>0,00013090277777777800</text:p>
          </table:table-cell>
          <table:table-cell table:formula="of:=[.D31]-[.D30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9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35416666666667" calcext:value-type="float">
            <text:p>0,00013541666666666700</text:p>
          </table:table-cell>
          <table:table-cell table:formula="of:=[.D32]-[.D31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9" office:value-type="float" office:value="1209" calcext:value-type="float">
            <text:p>120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39930555555556" calcext:value-type="float">
            <text:p>0,00013993055555555600</text:p>
          </table:table-cell>
          <table:table-cell table:formula="of:=[.D33]-[.D32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9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44444444444444" calcext:value-type="float">
            <text:p>0,00014444444444444400</text:p>
          </table:table-cell>
          <table:table-cell table:formula="of:=[.D34]-[.D33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9" office:value-type="float" office:value="1287" calcext:value-type="float">
            <text:p>128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48958333333333" calcext:value-type="float">
            <text:p>0,00014895833333333300</text:p>
          </table:table-cell>
          <table:table-cell table:formula="of:=[.D35]-[.D34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9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53472222222222" calcext:value-type="float">
            <text:p>0,00015347222222222200</text:p>
          </table:table-cell>
          <table:table-cell table:formula="of:=[.D36]-[.D35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9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57986111111111" calcext:value-type="float">
            <text:p>0,00015798611111111100</text:p>
          </table:table-cell>
          <table:table-cell table:formula="of:=[.D37]-[.D36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9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625" calcext:value-type="float">
            <text:p>0,00016250000000000000</text:p>
          </table:table-cell>
          <table:table-cell table:formula="of:=[.D38]-[.D37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9" office:value-type="float" office:value="1443" calcext:value-type="float">
            <text:p>144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67013888888889" calcext:value-type="float">
            <text:p>0,00016701388888888900</text:p>
          </table:table-cell>
          <table:table-cell table:formula="of:=[.D39]-[.D38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9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71527777777778" calcext:value-type="float">
            <text:p>0,00017152777777777800</text:p>
          </table:table-cell>
          <table:table-cell table:formula="of:=[.D40]-[.D39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9" office:value-type="float" office:value="1521" calcext:value-type="float">
            <text:p>152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76041666666667" calcext:value-type="float">
            <text:p>0,00017604166666666700</text:p>
          </table:table-cell>
          <table:table-cell table:formula="of:=[.D41]-[.D40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9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80555555555556" calcext:value-type="float">
            <text:p>0,00018055555555555600</text:p>
          </table:table-cell>
          <table:table-cell table:formula="of:=[.D42]-[.D41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9" office:value-type="float" office:value="1599" calcext:value-type="float">
            <text:p>159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85069444444444" calcext:value-type="float">
            <text:p>0,00018506944444444400</text:p>
          </table:table-cell>
          <table:table-cell table:formula="of:=[.D43]-[.D42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9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89583333333333" calcext:value-type="float">
            <text:p>0,00018958333333333300</text:p>
          </table:table-cell>
          <table:table-cell table:formula="of:=[.D44]-[.D43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9" office:value-type="float" office:value="1677" calcext:value-type="float">
            <text:p>167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94097222222222" calcext:value-type="float">
            <text:p>0,00019409722222222200</text:p>
          </table:table-cell>
          <table:table-cell table:formula="of:=[.D45]-[.D44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9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98611111111111" calcext:value-type="float">
            <text:p>0,00019861111111111100</text:p>
          </table:table-cell>
          <table:table-cell table:formula="of:=[.D46]-[.D45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9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03125" calcext:value-type="float">
            <text:p>0,00020312500000000000</text:p>
          </table:table-cell>
          <table:table-cell table:formula="of:=[.D47]-[.D46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9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07638888888889" calcext:value-type="float">
            <text:p>0,00020763888888888900</text:p>
          </table:table-cell>
          <table:table-cell table:formula="of:=[.D48]-[.D47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9" office:value-type="float" office:value="1833" calcext:value-type="float">
            <text:p>183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12152777777778" calcext:value-type="float">
            <text:p>0,00021215277777777800</text:p>
          </table:table-cell>
          <table:table-cell table:formula="of:=[.D49]-[.D48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9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16666666666667" calcext:value-type="float">
            <text:p>0,00021666666666666700</text:p>
          </table:table-cell>
          <table:table-cell table:formula="of:=[.D50]-[.D49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9" office:value-type="float" office:value="1911" calcext:value-type="float">
            <text:p>191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21180555555556" calcext:value-type="float">
            <text:p>0,00022118055555555600</text:p>
          </table:table-cell>
          <table:table-cell table:formula="of:=[.D51]-[.D50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9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25694444444444" calcext:value-type="float">
            <text:p>0,00022569444444444400</text:p>
          </table:table-cell>
          <table:table-cell table:formula="of:=[.D52]-[.D51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9" office:value-type="float" office:value="1989" calcext:value-type="float">
            <text:p>198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30208333333333" calcext:value-type="float">
            <text:p>0,00023020833333333300</text:p>
          </table:table-cell>
          <table:table-cell table:formula="of:=[.D53]-[.D52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9" office:value-type="float" office:value="2028" calcext:value-type="float">
            <text:p>202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34722222222222" calcext:value-type="float">
            <text:p>0,00023472222222222200</text:p>
          </table:table-cell>
          <table:table-cell table:formula="of:=[.D54]-[.D53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9" office:value-type="float" office:value="2067" calcext:value-type="float">
            <text:p>206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39236111111111" calcext:value-type="float">
            <text:p>0,00023923611111111100</text:p>
          </table:table-cell>
          <table:table-cell table:formula="of:=[.D55]-[.D54]" office:value-type="float" office:value="0.00000451388888888889" calcext:value-type="float">
            <text:p>0,000004513888888888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9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4375" calcext:value-type="float">
            <text:p>0,00024375000000000000</text:p>
          </table:table-cell>
          <table:table-cell table:formula="of:=[.D56]-[.D55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9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48263888888889" calcext:value-type="float">
            <text:p>0,00024826388888888900</text:p>
          </table:table-cell>
          <table:table-cell table:formula="of:=[.D57]-[.D5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9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52777777777778" calcext:value-type="float">
            <text:p>0,00025277777777777800</text:p>
          </table:table-cell>
          <table:table-cell table:formula="of:=[.D58]-[.D57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9" office:value-type="float" office:value="2223" calcext:value-type="float">
            <text:p>222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57291666666667" calcext:value-type="float">
            <text:p>0,00025729166666666700</text:p>
          </table:table-cell>
          <table:table-cell table:formula="of:=[.D59]-[.D5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9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61805555555556" calcext:value-type="float">
            <text:p>0,00026180555555555600</text:p>
          </table:table-cell>
          <table:table-cell table:formula="of:=[.D60]-[.D59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9" office:value-type="float" office:value="2301" calcext:value-type="float">
            <text:p>230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66319444444444" calcext:value-type="float">
            <text:p>0,00026631944444444400</text:p>
          </table:table-cell>
          <table:table-cell table:formula="of:=[.D61]-[.D6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9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70833333333333" calcext:value-type="float">
            <text:p>0,00027083333333333300</text:p>
          </table:table-cell>
          <table:table-cell table:formula="of:=[.D62]-[.D61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9" office:value-type="float" office:value="2379" calcext:value-type="float">
            <text:p>237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75347222222222" calcext:value-type="float">
            <text:p>0,00027534722222222200</text:p>
          </table:table-cell>
          <table:table-cell table:formula="of:=[.D63]-[.D6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9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79861111111111" calcext:value-type="float">
            <text:p>0,00027986111111111100</text:p>
          </table:table-cell>
          <table:table-cell table:formula="of:=[.D64]-[.D63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9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84375" calcext:value-type="float">
            <text:p>0,00028437500000000000</text:p>
          </table:table-cell>
          <table:table-cell table:formula="of:=[.D65]-[.D6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9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88888888888889" calcext:value-type="float">
            <text:p>0,00028888888888888900</text:p>
          </table:table-cell>
          <table:table-cell table:formula="of:=[.D66]-[.D65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9" office:value-type="float" office:value="2535" calcext:value-type="float">
            <text:p>253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93402777777778" calcext:value-type="float">
            <text:p>0,00029340277777777800</text:p>
          </table:table-cell>
          <table:table-cell table:formula="of:=[.D67]-[.D6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9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97916666666667" calcext:value-type="float">
            <text:p>0,00029791666666666700</text:p>
          </table:table-cell>
          <table:table-cell table:formula="of:=[.D68]-[.D67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9" office:value-type="float" office:value="2613" calcext:value-type="float">
            <text:p>261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02430555555556" calcext:value-type="float">
            <text:p>0,00030243055555555600</text:p>
          </table:table-cell>
          <table:table-cell table:formula="of:=[.D69]-[.D6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9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06944444444444" calcext:value-type="float">
            <text:p>0,00030694444444444400</text:p>
          </table:table-cell>
          <table:table-cell table:formula="of:=[.D70]-[.D69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9" office:value-type="float" office:value="2691" calcext:value-type="float">
            <text:p>269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11458333333333" calcext:value-type="float">
            <text:p>0,00031145833333333300</text:p>
          </table:table-cell>
          <table:table-cell table:formula="of:=[.D71]-[.D7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9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15972222222222" calcext:value-type="float">
            <text:p>0,00031597222222222200</text:p>
          </table:table-cell>
          <table:table-cell table:formula="of:=[.D72]-[.D71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9" office:value-type="float" office:value="2769" calcext:value-type="float">
            <text:p>276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20486111111111" calcext:value-type="float">
            <text:p>0,00032048611111111100</text:p>
          </table:table-cell>
          <table:table-cell table:formula="of:=[.D73]-[.D7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9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25" calcext:value-type="float">
            <text:p>0,00032500000000000000</text:p>
          </table:table-cell>
          <table:table-cell table:formula="of:=[.D74]-[.D73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9" office:value-type="float" office:value="2847" calcext:value-type="float">
            <text:p>284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29513888888889" calcext:value-type="float">
            <text:p>0,00032951388888888900</text:p>
          </table:table-cell>
          <table:table-cell table:formula="of:=[.D75]-[.D7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9" office:value-type="float" office:value="2886" calcext:value-type="float">
            <text:p>288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34027777777778" calcext:value-type="float">
            <text:p>0,00033402777777777800</text:p>
          </table:table-cell>
          <table:table-cell table:formula="of:=[.D76]-[.D75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9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38541666666667" calcext:value-type="float">
            <text:p>0,00033854166666666700</text:p>
          </table:table-cell>
          <table:table-cell table:formula="of:=[.D77]-[.D7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9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43055555555556" calcext:value-type="float">
            <text:p>0,00034305555555555600</text:p>
          </table:table-cell>
          <table:table-cell table:formula="of:=[.D78]-[.D77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9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47569444444444" calcext:value-type="float">
            <text:p>0,00034756944444444400</text:p>
          </table:table-cell>
          <table:table-cell table:formula="of:=[.D79]-[.D7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9" office:value-type="float" office:value="3042" calcext:value-type="float">
            <text:p>304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52083333333333" calcext:value-type="float">
            <text:p>0,00035208333333333300</text:p>
          </table:table-cell>
          <table:table-cell table:formula="of:=[.D80]-[.D79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9" office:value-type="float" office:value="3081" calcext:value-type="float">
            <text:p>308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56597222222222" calcext:value-type="float">
            <text:p>0,00035659722222222200</text:p>
          </table:table-cell>
          <table:table-cell table:formula="of:=[.D81]-[.D8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9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61111111111111" calcext:value-type="float">
            <text:p>0,00036111111111111100</text:p>
          </table:table-cell>
          <table:table-cell table:formula="of:=[.D82]-[.D81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9" office:value-type="float" office:value="3159" calcext:value-type="float">
            <text:p>315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65625" calcext:value-type="float">
            <text:p>0,00036562500000000000</text:p>
          </table:table-cell>
          <table:table-cell table:formula="of:=[.D83]-[.D8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9" office:value-type="float" office:value="3198" calcext:value-type="float">
            <text:p>319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70138888888889" calcext:value-type="float">
            <text:p>0,00037013888888888900</text:p>
          </table:table-cell>
          <table:table-cell table:formula="of:=[.D84]-[.D83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9" office:value-type="float" office:value="3237" calcext:value-type="float">
            <text:p>323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74652777777778" calcext:value-type="float">
            <text:p>0,00037465277777777800</text:p>
          </table:table-cell>
          <table:table-cell table:formula="of:=[.D85]-[.D8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9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79166666666667" calcext:value-type="float">
            <text:p>0,00037916666666666700</text:p>
          </table:table-cell>
          <table:table-cell table:formula="of:=[.D86]-[.D85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9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83680555555556" calcext:value-type="float">
            <text:p>0,00038368055555555600</text:p>
          </table:table-cell>
          <table:table-cell table:formula="of:=[.D87]-[.D8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9" office:value-type="float" office:value="3354" calcext:value-type="float">
            <text:p>335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88194444444444" calcext:value-type="float">
            <text:p>0,00038819444444444400</text:p>
          </table:table-cell>
          <table:table-cell table:formula="of:=[.D88]-[.D87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9" office:value-type="float" office:value="3393" calcext:value-type="float">
            <text:p>339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92708333333333" calcext:value-type="float">
            <text:p>0,00039270833333333300</text:p>
          </table:table-cell>
          <table:table-cell table:formula="of:=[.D89]-[.D8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9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97222222222222" calcext:value-type="float">
            <text:p>0,00039722222222222200</text:p>
          </table:table-cell>
          <table:table-cell table:formula="of:=[.D90]-[.D89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9" office:value-type="float" office:value="3471" calcext:value-type="float">
            <text:p>347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01736111111111" calcext:value-type="float">
            <text:p>0,00040173611111111100</text:p>
          </table:table-cell>
          <table:table-cell table:formula="of:=[.D91]-[.D9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9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0625" calcext:value-type="float">
            <text:p>0,00040625000000000000</text:p>
          </table:table-cell>
          <table:table-cell table:formula="of:=[.D92]-[.D91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9" office:value-type="float" office:value="3549" calcext:value-type="float">
            <text:p>354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10763888888889" calcext:value-type="float">
            <text:p>0,00041076388888888900</text:p>
          </table:table-cell>
          <table:table-cell table:formula="of:=[.D93]-[.D9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9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15277777777778" calcext:value-type="float">
            <text:p>0,00041527777777777800</text:p>
          </table:table-cell>
          <table:table-cell table:formula="of:=[.D94]-[.D93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9" office:value-type="float" office:value="3627" calcext:value-type="float">
            <text:p>362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19791666666667" calcext:value-type="float">
            <text:p>0,00041979166666666700</text:p>
          </table:table-cell>
          <table:table-cell table:formula="of:=[.D95]-[.D9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9" office:value-type="float" office:value="3666" calcext:value-type="float">
            <text:p>366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24305555555556" calcext:value-type="float">
            <text:p>0,00042430555555555600</text:p>
          </table:table-cell>
          <table:table-cell table:formula="of:=[.D96]-[.D95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9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28819444444444" calcext:value-type="float">
            <text:p>0,00042881944444444500</text:p>
          </table:table-cell>
          <table:table-cell table:formula="of:=[.D97]-[.D9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9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33333333333333" calcext:value-type="float">
            <text:p>0,00043333333333333300</text:p>
          </table:table-cell>
          <table:table-cell table:formula="of:=[.D98]-[.D97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9" office:value-type="float" office:value="3783" calcext:value-type="float">
            <text:p>378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37847222222222" calcext:value-type="float">
            <text:p>0,00043784722222222200</text:p>
          </table:table-cell>
          <table:table-cell table:formula="of:=[.D99]-[.D9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9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42361111111111" calcext:value-type="float">
            <text:p>0,00044236111111111100</text:p>
          </table:table-cell>
          <table:table-cell table:formula="of:=[.D100]-[.D99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9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46875" calcext:value-type="float">
            <text:p>0,00044687500000000000</text:p>
          </table:table-cell>
          <table:table-cell table:formula="of:=[.D101]-[.D10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9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51388888888889" calcext:value-type="float">
            <text:p>0,00045138888888888900</text:p>
          </table:table-cell>
          <table:table-cell table:formula="of:=[.D102]-[.D101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9" office:value-type="float" office:value="3939" calcext:value-type="float">
            <text:p>393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55902777777778" calcext:value-type="float">
            <text:p>0,00045590277777777800</text:p>
          </table:table-cell>
          <table:table-cell table:formula="of:=[.D103]-[.D10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9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60416666666667" calcext:value-type="float">
            <text:p>0,00046041666666666700</text:p>
          </table:table-cell>
          <table:table-cell table:formula="of:=[.D104]-[.D103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9" office:value-type="float" office:value="4017" calcext:value-type="float">
            <text:p>401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64930555555556" calcext:value-type="float">
            <text:p>0,00046493055555555600</text:p>
          </table:table-cell>
          <table:table-cell table:formula="of:=[.D105]-[.D10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9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69444444444444" calcext:value-type="float">
            <text:p>0,00046944444444444400</text:p>
          </table:table-cell>
          <table:table-cell table:formula="of:=[.D106]-[.D105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9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73958333333333" calcext:value-type="float">
            <text:p>0,00047395833333333300</text:p>
          </table:table-cell>
          <table:table-cell table:formula="of:=[.D107]-[.D10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9" office:value-type="float" office:value="4134" calcext:value-type="float">
            <text:p>413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78472222222222" calcext:value-type="float">
            <text:p>0,00047847222222222200</text:p>
          </table:table-cell>
          <table:table-cell table:formula="of:=[.D108]-[.D107]" office:value-type="float" office:value="0.00000451388888888892" calcext:value-type="float">
            <text:p>0,000004513888888888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9" office:value-type="float" office:value="4173" calcext:value-type="float">
            <text:p>417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82986111111111" calcext:value-type="float">
            <text:p>0,00048298611111111100</text:p>
          </table:table-cell>
          <table:table-cell table:formula="of:=[.D109]-[.D10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9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875" calcext:value-type="float">
            <text:p>0,00048750000000000000</text:p>
          </table:table-cell>
          <table:table-cell table:formula="of:=[.D110]-[.D10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9" office:value-type="float" office:value="4251" calcext:value-type="float">
            <text:p>425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92013888888889" calcext:value-type="float">
            <text:p>0,00049201388888888900</text:p>
          </table:table-cell>
          <table:table-cell table:formula="of:=[.D111]-[.D11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9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96527777777778" calcext:value-type="float">
            <text:p>0,00049652777777777800</text:p>
          </table:table-cell>
          <table:table-cell table:formula="of:=[.D112]-[.D11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9" office:value-type="float" office:value="4329" calcext:value-type="float">
            <text:p>432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01041666666667" calcext:value-type="float">
            <text:p>0,00050104166666666700</text:p>
          </table:table-cell>
          <table:table-cell table:formula="of:=[.D113]-[.D11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9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05555555555556" calcext:value-type="float">
            <text:p>0,00050555555555555600</text:p>
          </table:table-cell>
          <table:table-cell table:formula="of:=[.D114]-[.D113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9" office:value-type="float" office:value="4407" calcext:value-type="float">
            <text:p>440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10069444444444" calcext:value-type="float">
            <text:p>0,00051006944444444400</text:p>
          </table:table-cell>
          <table:table-cell table:formula="of:=[.D115]-[.D11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9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14583333333333" calcext:value-type="float">
            <text:p>0,00051458333333333300</text:p>
          </table:table-cell>
          <table:table-cell table:formula="of:=[.D116]-[.D11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9" office:value-type="float" office:value="4485" calcext:value-type="float">
            <text:p>448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19097222222222" calcext:value-type="float">
            <text:p>0,00051909722222222200</text:p>
          </table:table-cell>
          <table:table-cell table:formula="of:=[.D117]-[.D11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9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23611111111111" calcext:value-type="float">
            <text:p>0,00052361111111111100</text:p>
          </table:table-cell>
          <table:table-cell table:formula="of:=[.D118]-[.D117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9" office:value-type="float" office:value="4563" calcext:value-type="float">
            <text:p>456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28125" calcext:value-type="float">
            <text:p>0,00052812500000000000</text:p>
          </table:table-cell>
          <table:table-cell table:formula="of:=[.D119]-[.D11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9" office:value-type="float" office:value="4602" calcext:value-type="float">
            <text:p>460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32638888888889" calcext:value-type="float">
            <text:p>0,00053263888888888900</text:p>
          </table:table-cell>
          <table:table-cell table:formula="of:=[.D120]-[.D11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9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37152777777778" calcext:value-type="float">
            <text:p>0,00053715277777777800</text:p>
          </table:table-cell>
          <table:table-cell table:formula="of:=[.D121]-[.D12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9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41666666666667" calcext:value-type="float">
            <text:p>0,00054166666666666700</text:p>
          </table:table-cell>
          <table:table-cell table:formula="of:=[.D122]-[.D12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9" office:value-type="float" office:value="4719" calcext:value-type="float">
            <text:p>471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46180555555556" calcext:value-type="float">
            <text:p>0,00054618055555555600</text:p>
          </table:table-cell>
          <table:table-cell table:formula="of:=[.D123]-[.D12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9" office:value-type="float" office:value="4758" calcext:value-type="float">
            <text:p>475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50694444444445" calcext:value-type="float">
            <text:p>0,00055069444444444500</text:p>
          </table:table-cell>
          <table:table-cell table:formula="of:=[.D124]-[.D123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9" office:value-type="float" office:value="4797" calcext:value-type="float">
            <text:p>479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55208333333333" calcext:value-type="float">
            <text:p>0,00055520833333333300</text:p>
          </table:table-cell>
          <table:table-cell table:formula="of:=[.D125]-[.D12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9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59722222222222" calcext:value-type="float">
            <text:p>0,00055972222222222200</text:p>
          </table:table-cell>
          <table:table-cell table:formula="of:=[.D126]-[.D12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9" office:value-type="float" office:value="4875" calcext:value-type="float">
            <text:p>4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64236111111111" calcext:value-type="float">
            <text:p>0,00056423611111111100</text:p>
          </table:table-cell>
          <table:table-cell table:formula="of:=[.D127]-[.D12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9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6875" calcext:value-type="float">
            <text:p>0,00056875000000000000</text:p>
          </table:table-cell>
          <table:table-cell table:formula="of:=[.D128]-[.D127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9" office:value-type="float" office:value="4953" calcext:value-type="float">
            <text:p>495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573263888888889" calcext:value-type="float">
            <text:p>0,00057326388888888900</text:p>
          </table:table-cell>
          <table:table-cell table:formula="of:=[.D129]-[.D12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9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77777777777778" calcext:value-type="float">
            <text:p>0,00057777777777777800</text:p>
          </table:table-cell>
          <table:table-cell table:formula="of:=[.D130]-[.D12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9" office:value-type="float" office:value="5031" calcext:value-type="float">
            <text:p>503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82291666666667" calcext:value-type="float">
            <text:p>0,00058229166666666700</text:p>
          </table:table-cell>
          <table:table-cell table:formula="of:=[.D131]-[.D13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9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586805555555556" calcext:value-type="float">
            <text:p>0,00058680555555555600</text:p>
          </table:table-cell>
          <table:table-cell table:formula="of:=[.D132]-[.D13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9" office:value-type="float" office:value="5109" calcext:value-type="float">
            <text:p>510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91319444444444" calcext:value-type="float">
            <text:p>0,00059131944444444400</text:p>
          </table:table-cell>
          <table:table-cell table:formula="of:=[.D133]-[.D13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9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95833333333333" calcext:value-type="float">
            <text:p>0,00059583333333333300</text:p>
          </table:table-cell>
          <table:table-cell table:formula="of:=[.D134]-[.D13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9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00347222222222" calcext:value-type="float">
            <text:p>0,00060034722222222200</text:p>
          </table:table-cell>
          <table:table-cell table:formula="of:=[.D135]-[.D13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9" office:value-type="float" office:value="5226" calcext:value-type="float">
            <text:p>522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04861111111111" calcext:value-type="float">
            <text:p>0,00060486111111111100</text:p>
          </table:table-cell>
          <table:table-cell table:formula="of:=[.D136]-[.D13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9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609375" calcext:value-type="float">
            <text:p>0,00060937500000000000</text:p>
          </table:table-cell>
          <table:table-cell table:formula="of:=[.D137]-[.D13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9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613888888888889" calcext:value-type="float">
            <text:p>0,00061388888888888900</text:p>
          </table:table-cell>
          <table:table-cell table:formula="of:=[.D138]-[.D13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9" office:value-type="float" office:value="5343" calcext:value-type="float">
            <text:p>534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18402777777778" calcext:value-type="float">
            <text:p>0,00061840277777777800</text:p>
          </table:table-cell>
          <table:table-cell table:formula="of:=[.D139]-[.D13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9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622916666666667" calcext:value-type="float">
            <text:p>0,00062291666666666700</text:p>
          </table:table-cell>
          <table:table-cell table:formula="of:=[.D140]-[.D13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9" office:value-type="float" office:value="5421" calcext:value-type="float">
            <text:p>542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627430555555556" calcext:value-type="float">
            <text:p>0,00062743055555555600</text:p>
          </table:table-cell>
          <table:table-cell table:formula="of:=[.D141]-[.D14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9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631944444444444" calcext:value-type="float">
            <text:p>0,00063194444444444400</text:p>
          </table:table-cell>
          <table:table-cell table:formula="of:=[.D142]-[.D14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9" office:value-type="float" office:value="5499" calcext:value-type="float">
            <text:p>549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636458333333333" calcext:value-type="float">
            <text:p>0,00063645833333333300</text:p>
          </table:table-cell>
          <table:table-cell table:formula="of:=[.D143]-[.D14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9" office:value-type="float" office:value="5538" calcext:value-type="float">
            <text:p>553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640972222222222" calcext:value-type="float">
            <text:p>0,00064097222222222200</text:p>
          </table:table-cell>
          <table:table-cell table:formula="of:=[.D144]-[.D143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9" office:value-type="float" office:value="5577" calcext:value-type="float">
            <text:p>557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645486111111111" calcext:value-type="float">
            <text:p>0,00064548611111111100</text:p>
          </table:table-cell>
          <table:table-cell table:formula="of:=[.D145]-[.D14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9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65" calcext:value-type="float">
            <text:p>0,00065000000000000000</text:p>
          </table:table-cell>
          <table:table-cell table:formula="of:=[.D146]-[.D14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9" office:value-type="float" office:value="5655" calcext:value-type="float">
            <text:p>565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654513888888889" calcext:value-type="float">
            <text:p>0,00065451388888888900</text:p>
          </table:table-cell>
          <table:table-cell table:formula="of:=[.D147]-[.D14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9" office:value-type="float" office:value="5694" calcext:value-type="float">
            <text:p>569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659027777777778" calcext:value-type="float">
            <text:p>0,00065902777777777800</text:p>
          </table:table-cell>
          <table:table-cell table:formula="of:=[.D148]-[.D147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9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663541666666667" calcext:value-type="float">
            <text:p>0,00066354166666666700</text:p>
          </table:table-cell>
          <table:table-cell table:formula="of:=[.D149]-[.D14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9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668055555555556" calcext:value-type="float">
            <text:p>0,00066805555555555600</text:p>
          </table:table-cell>
          <table:table-cell table:formula="of:=[.D150]-[.D14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9" office:value-type="float" office:value="5811" calcext:value-type="float">
            <text:p>581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672569444444445" calcext:value-type="float">
            <text:p>0,00067256944444444500</text:p>
          </table:table-cell>
          <table:table-cell table:formula="of:=[.D151]-[.D15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9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677083333333333" calcext:value-type="float">
            <text:p>0,00067708333333333300</text:p>
          </table:table-cell>
          <table:table-cell table:formula="of:=[.D152]-[.D15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9" office:value-type="float" office:value="5889" calcext:value-type="float">
            <text:p>588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681597222222222" calcext:value-type="float">
            <text:p>0,00068159722222222200</text:p>
          </table:table-cell>
          <table:table-cell table:formula="of:=[.D153]-[.D15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9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686111111111111" calcext:value-type="float">
            <text:p>0,00068611111111111100</text:p>
          </table:table-cell>
          <table:table-cell table:formula="of:=[.D154]-[.D15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9" office:value-type="float" office:value="5967" calcext:value-type="float">
            <text:p>596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690625" calcext:value-type="float">
            <text:p>0,00069062500000000000</text:p>
          </table:table-cell>
          <table:table-cell table:formula="of:=[.D155]-[.D15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9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695138888888889" calcext:value-type="float">
            <text:p>0,00069513888888888900</text:p>
          </table:table-cell>
          <table:table-cell table:formula="of:=[.D156]-[.D15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9" office:value-type="float" office:value="6045" calcext:value-type="float">
            <text:p>604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699652777777778" calcext:value-type="float">
            <text:p>0,00069965277777777800</text:p>
          </table:table-cell>
          <table:table-cell table:formula="of:=[.D157]-[.D15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9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704166666666667" calcext:value-type="float">
            <text:p>0,00070416666666666700</text:p>
          </table:table-cell>
          <table:table-cell table:formula="of:=[.D158]-[.D15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9" office:value-type="float" office:value="6123" calcext:value-type="float">
            <text:p>612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708680555555556" calcext:value-type="float">
            <text:p>0,00070868055555555600</text:p>
          </table:table-cell>
          <table:table-cell table:formula="of:=[.D159]-[.D15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9" office:value-type="float" office:value="6162" calcext:value-type="float">
            <text:p>616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713194444444445" calcext:value-type="float">
            <text:p>0,00071319444444444500</text:p>
          </table:table-cell>
          <table:table-cell table:formula="of:=[.D160]-[.D15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9" office:value-type="float" office:value="6201" calcext:value-type="float">
            <text:p>620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717708333333333" calcext:value-type="float">
            <text:p>0,00071770833333333300</text:p>
          </table:table-cell>
          <table:table-cell table:formula="of:=[.D161]-[.D16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9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722222222222222" calcext:value-type="float">
            <text:p>0,00072222222222222200</text:p>
          </table:table-cell>
          <table:table-cell table:formula="of:=[.D162]-[.D16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9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726736111111111" calcext:value-type="float">
            <text:p>0,00072673611111111100</text:p>
          </table:table-cell>
          <table:table-cell table:formula="of:=[.D163]-[.D16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9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73125" calcext:value-type="float">
            <text:p>0,00073125000000000000</text:p>
          </table:table-cell>
          <table:table-cell table:formula="of:=[.D164]-[.D163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9" office:value-type="float" office:value="6357" calcext:value-type="float">
            <text:p>635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735763888888889" calcext:value-type="float">
            <text:p>0,00073576388888888900</text:p>
          </table:table-cell>
          <table:table-cell table:formula="of:=[.D165]-[.D16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9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740277777777778" calcext:value-type="float">
            <text:p>0,00074027777777777800</text:p>
          </table:table-cell>
          <table:table-cell table:formula="of:=[.D166]-[.D16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9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744791666666667" calcext:value-type="float">
            <text:p>0,00074479166666666700</text:p>
          </table:table-cell>
          <table:table-cell table:formula="of:=[.D167]-[.D16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9" office:value-type="float" office:value="6474" calcext:value-type="float">
            <text:p>647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749305555555556" calcext:value-type="float">
            <text:p>0,00074930555555555600</text:p>
          </table:table-cell>
          <table:table-cell table:formula="of:=[.D168]-[.D167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9" office:value-type="float" office:value="6513" calcext:value-type="float">
            <text:p>651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753819444444444" calcext:value-type="float">
            <text:p>0,00075381944444444400</text:p>
          </table:table-cell>
          <table:table-cell table:formula="of:=[.D169]-[.D16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9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758333333333333" calcext:value-type="float">
            <text:p>0,00075833333333333300</text:p>
          </table:table-cell>
          <table:table-cell table:formula="of:=[.D170]-[.D16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9" office:value-type="float" office:value="6591" calcext:value-type="float">
            <text:p>659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762847222222222" calcext:value-type="float">
            <text:p>0,00076284722222222200</text:p>
          </table:table-cell>
          <table:table-cell table:formula="of:=[.D171]-[.D17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9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767361111111111" calcext:value-type="float">
            <text:p>0,00076736111111111100</text:p>
          </table:table-cell>
          <table:table-cell table:formula="of:=[.D172]-[.D17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9" office:value-type="float" office:value="6669" calcext:value-type="float">
            <text:p>666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771875" calcext:value-type="float">
            <text:p>0,00077187500000000000</text:p>
          </table:table-cell>
          <table:table-cell table:formula="of:=[.D173]-[.D17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9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776388888888889" calcext:value-type="float">
            <text:p>0,00077638888888888900</text:p>
          </table:table-cell>
          <table:table-cell table:formula="of:=[.D174]-[.D17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9" office:value-type="float" office:value="6747" calcext:value-type="float">
            <text:p>674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780902777777778" calcext:value-type="float">
            <text:p>0,00078090277777777800</text:p>
          </table:table-cell>
          <table:table-cell table:formula="of:=[.D175]-[.D17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9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785416666666667" calcext:value-type="float">
            <text:p>0,00078541666666666700</text:p>
          </table:table-cell>
          <table:table-cell table:formula="of:=[.D176]-[.D17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9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789930555555556" calcext:value-type="float">
            <text:p>0,00078993055555555600</text:p>
          </table:table-cell>
          <table:table-cell table:formula="of:=[.D177]-[.D17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9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794444444444444" calcext:value-type="float">
            <text:p>0,00079444444444444500</text:p>
          </table:table-cell>
          <table:table-cell table:formula="of:=[.D178]-[.D17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9" office:value-type="float" office:value="6903" calcext:value-type="float">
            <text:p>690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798958333333333" calcext:value-type="float">
            <text:p>0,00079895833333333400</text:p>
          </table:table-cell>
          <table:table-cell table:formula="of:=[.D179]-[.D17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9" office:value-type="float" office:value="6942" calcext:value-type="float">
            <text:p>694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803472222222222" calcext:value-type="float">
            <text:p>0,00080347222222222200</text:p>
          </table:table-cell>
          <table:table-cell table:formula="of:=[.D180]-[.D17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9" office:value-type="float" office:value="6981" calcext:value-type="float">
            <text:p>698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807986111111111" calcext:value-type="float">
            <text:p>0,00080798611111111100</text:p>
          </table:table-cell>
          <table:table-cell table:formula="of:=[.D181]-[.D18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9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8125" calcext:value-type="float">
            <text:p>0,00081250000000000000</text:p>
          </table:table-cell>
          <table:table-cell table:formula="of:=[.D182]-[.D18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9" office:value-type="float" office:value="7059" calcext:value-type="float">
            <text:p>705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817013888888889" calcext:value-type="float">
            <text:p>0,00081701388888888900</text:p>
          </table:table-cell>
          <table:table-cell table:formula="of:=[.D183]-[.D18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9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821527777777778" calcext:value-type="float">
            <text:p>0,00082152777777777800</text:p>
          </table:table-cell>
          <table:table-cell table:formula="of:=[.D184]-[.D183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9" office:value-type="float" office:value="7137" calcext:value-type="float">
            <text:p>713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826041666666667" calcext:value-type="float">
            <text:p>0,00082604166666666700</text:p>
          </table:table-cell>
          <table:table-cell table:formula="of:=[.D185]-[.D18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9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830555555555556" calcext:value-type="float">
            <text:p>0,00083055555555555600</text:p>
          </table:table-cell>
          <table:table-cell table:formula="of:=[.D186]-[.D18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9" office:value-type="float" office:value="7215" calcext:value-type="float">
            <text:p>721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835069444444445" calcext:value-type="float">
            <text:p>0,00083506944444444500</text:p>
          </table:table-cell>
          <table:table-cell table:formula="of:=[.D187]-[.D18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9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839583333333333" calcext:value-type="float">
            <text:p>0,00083958333333333300</text:p>
          </table:table-cell>
          <table:table-cell table:formula="of:=[.D188]-[.D187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9" office:value-type="float" office:value="7293" calcext:value-type="float">
            <text:p>729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844097222222222" calcext:value-type="float">
            <text:p>0,00084409722222222200</text:p>
          </table:table-cell>
          <table:table-cell table:formula="of:=[.D189]-[.D18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9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848611111111111" calcext:value-type="float">
            <text:p>0,00084861111111111100</text:p>
          </table:table-cell>
          <table:table-cell table:formula="of:=[.D190]-[.D18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9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853125" calcext:value-type="float">
            <text:p>0,00085312500000000000</text:p>
          </table:table-cell>
          <table:table-cell table:formula="of:=[.D191]-[.D19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9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857638888888889" calcext:value-type="float">
            <text:p>0,00085763888888888900</text:p>
          </table:table-cell>
          <table:table-cell table:formula="of:=[.D192]-[.D19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9" office:value-type="float" office:value="7449" calcext:value-type="float">
            <text:p>744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862152777777778" calcext:value-type="float">
            <text:p>0,00086215277777777800</text:p>
          </table:table-cell>
          <table:table-cell table:formula="of:=[.D193]-[.D19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9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866666666666667" calcext:value-type="float">
            <text:p>0,00086666666666666700</text:p>
          </table:table-cell>
          <table:table-cell table:formula="of:=[.D194]-[.D19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9" office:value-type="float" office:value="7527" calcext:value-type="float">
            <text:p>752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871180555555556" calcext:value-type="float">
            <text:p>0,00087118055555555600</text:p>
          </table:table-cell>
          <table:table-cell table:formula="of:=[.D195]-[.D19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9" office:value-type="float" office:value="7566" calcext:value-type="float">
            <text:p>756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875694444444445" calcext:value-type="float">
            <text:p>0,00087569444444444500</text:p>
          </table:table-cell>
          <table:table-cell table:formula="of:=[.D196]-[.D19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9" office:value-type="float" office:value="7605" calcext:value-type="float">
            <text:p>760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880208333333333" calcext:value-type="float">
            <text:p>0,00088020833333333300</text:p>
          </table:table-cell>
          <table:table-cell table:formula="of:=[.D197]-[.D19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9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884722222222222" calcext:value-type="float">
            <text:p>0,00088472222222222200</text:p>
          </table:table-cell>
          <table:table-cell table:formula="of:=[.D198]-[.D19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9" office:value-type="float" office:value="7683" calcext:value-type="float">
            <text:p>768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889236111111111" calcext:value-type="float">
            <text:p>0,00088923611111111100</text:p>
          </table:table-cell>
          <table:table-cell table:formula="of:=[.D199]-[.D19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9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89375" calcext:value-type="float">
            <text:p>0,00089375000000000000</text:p>
          </table:table-cell>
          <table:table-cell table:formula="of:=[.D200]-[.D199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9" office:value-type="float" office:value="7761" calcext:value-type="float">
            <text:p>776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898263888888889" calcext:value-type="float">
            <text:p>0,00089826388888888900</text:p>
          </table:table-cell>
          <table:table-cell table:formula="of:=[.D201]-[.D20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9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902777777777778" calcext:value-type="float">
            <text:p>0,00090277777777777800</text:p>
          </table:table-cell>
          <table:table-cell table:formula="of:=[.D202]-[.D20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9" office:value-type="float" office:value="7839" calcext:value-type="float">
            <text:p>783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907291666666667" calcext:value-type="float">
            <text:p>0,00090729166666666700</text:p>
          </table:table-cell>
          <table:table-cell table:formula="of:=[.D203]-[.D20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9" office:value-type="float" office:value="7878" calcext:value-type="float">
            <text:p>787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911805555555556" calcext:value-type="float">
            <text:p>0,00091180555555555600</text:p>
          </table:table-cell>
          <table:table-cell table:formula="of:=[.D204]-[.D203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9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916319444444444" calcext:value-type="float">
            <text:p>0,00091631944444444400</text:p>
          </table:table-cell>
          <table:table-cell table:formula="of:=[.D205]-[.D20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9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920833333333333" calcext:value-type="float">
            <text:p>0,00092083333333333300</text:p>
          </table:table-cell>
          <table:table-cell table:formula="of:=[.D206]-[.D20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9" office:value-type="float" office:value="7995" calcext:value-type="float">
            <text:p>799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925347222222222" calcext:value-type="float">
            <text:p>0,00092534722222222200</text:p>
          </table:table-cell>
          <table:table-cell table:formula="of:=[.D207]-[.D20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9" office:value-type="float" office:value="8034" calcext:value-type="float">
            <text:p>803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929861111111111" calcext:value-type="float">
            <text:p>0,00092986111111111100</text:p>
          </table:table-cell>
          <table:table-cell table:formula="of:=[.D208]-[.D207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9" office:value-type="float" office:value="8073" calcext:value-type="float">
            <text:p>807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934375" calcext:value-type="float">
            <text:p>0,00093437500000000000</text:p>
          </table:table-cell>
          <table:table-cell table:formula="of:=[.D209]-[.D208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9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938888888888889" calcext:value-type="float">
            <text:p>0,00093888888888888900</text:p>
          </table:table-cell>
          <table:table-cell table:formula="of:=[.D210]-[.D20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9" office:value-type="float" office:value="8151" calcext:value-type="float">
            <text:p>815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943402777777778" calcext:value-type="float">
            <text:p>0,00094340277777777800</text:p>
          </table:table-cell>
          <table:table-cell table:formula="of:=[.D211]-[.D210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9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947916666666667" calcext:value-type="float">
            <text:p>0,00094791666666666700</text:p>
          </table:table-cell>
          <table:table-cell table:formula="of:=[.D212]-[.D211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9" office:value-type="float" office:value="8229" calcext:value-type="float">
            <text:p>822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952430555555556" calcext:value-type="float">
            <text:p>0,00095243055555555600</text:p>
          </table:table-cell>
          <table:table-cell table:formula="of:=[.D213]-[.D212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9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956944444444444" calcext:value-type="float">
            <text:p>0,00095694444444444500</text:p>
          </table:table-cell>
          <table:table-cell table:formula="of:=[.D214]-[.D21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9" office:value-type="float" office:value="8307" calcext:value-type="float">
            <text:p>830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961458333333333" calcext:value-type="float">
            <text:p>0,00096145833333333400</text:p>
          </table:table-cell>
          <table:table-cell table:formula="of:=[.D215]-[.D214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9" office:value-type="float" office:value="8346" calcext:value-type="float">
            <text:p>834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965972222222222" calcext:value-type="float">
            <text:p>0,00096597222222222200</text:p>
          </table:table-cell>
          <table:table-cell table:formula="of:=[.D216]-[.D215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9" office:value-type="float" office:value="8385" calcext:value-type="float">
            <text:p>838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970486111111111" calcext:value-type="float">
            <text:p>0,00097048611111111100</text:p>
          </table:table-cell>
          <table:table-cell table:formula="of:=[.D217]-[.D216]" office:value-type="float" office:value="0.00000451388888888886" calcext:value-type="float">
            <text:p>0,000004513888888888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9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975" calcext:value-type="float">
            <text:p>0,00097500000000000000</text:p>
          </table:table-cell>
          <table:table-cell table:formula="of:=[.D218]-[.D21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9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979513888888889" calcext:value-type="float">
            <text:p>0,00097951388888888900</text:p>
          </table:table-cell>
          <table:table-cell table:formula="of:=[.D219]-[.D21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9" office:value-type="float" office:value="8502" calcext:value-type="float">
            <text:p>850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984027777777778" calcext:value-type="float">
            <text:p>0,00098402777777777800</text:p>
          </table:table-cell>
          <table:table-cell table:formula="of:=[.D220]-[.D21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9" office:value-type="float" office:value="8541" calcext:value-type="float">
            <text:p>854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988541666666667" calcext:value-type="float">
            <text:p>0,00098854166666666700</text:p>
          </table:table-cell>
          <table:table-cell table:formula="of:=[.D221]-[.D22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9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993055555555556" calcext:value-type="float">
            <text:p>0,00099305555555555600</text:p>
          </table:table-cell>
          <table:table-cell table:formula="of:=[.D222]-[.D22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9" office:value-type="float" office:value="8619" calcext:value-type="float">
            <text:p>861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997569444444444" calcext:value-type="float">
            <text:p>0,00099756944444444400</text:p>
          </table:table-cell>
          <table:table-cell table:formula="of:=[.D223]-[.D22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9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00208333333333" calcext:value-type="float">
            <text:p>0,00100208333333333000</text:p>
          </table:table-cell>
          <table:table-cell table:formula="of:=[.D224]-[.D22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9" office:value-type="float" office:value="8697" calcext:value-type="float">
            <text:p>869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00659722222222" calcext:value-type="float">
            <text:p>0,00100659722222222000</text:p>
          </table:table-cell>
          <table:table-cell table:formula="of:=[.D225]-[.D22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9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01111111111111" calcext:value-type="float">
            <text:p>0,00101111111111111000</text:p>
          </table:table-cell>
          <table:table-cell table:formula="of:=[.D226]-[.D22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9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015625" calcext:value-type="float">
            <text:p>0,00101562500000000000</text:p>
          </table:table-cell>
          <table:table-cell table:formula="of:=[.D227]-[.D22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9" office:value-type="float" office:value="8814" calcext:value-type="float">
            <text:p>881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02013888888889" calcext:value-type="float">
            <text:p>0,00102013888888889000</text:p>
          </table:table-cell>
          <table:table-cell table:formula="of:=[.D228]-[.D22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9" office:value-type="float" office:value="8853" calcext:value-type="float">
            <text:p>885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02465277777778" calcext:value-type="float">
            <text:p>0,00102465277777778000</text:p>
          </table:table-cell>
          <table:table-cell table:formula="of:=[.D229]-[.D22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9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02916666666667" calcext:value-type="float">
            <text:p>0,00102916666666667000</text:p>
          </table:table-cell>
          <table:table-cell table:formula="of:=[.D230]-[.D22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9" office:value-type="float" office:value="8931" calcext:value-type="float">
            <text:p>893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03368055555556" calcext:value-type="float">
            <text:p>0,00103368055555556000</text:p>
          </table:table-cell>
          <table:table-cell table:formula="of:=[.D231]-[.D23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9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03819444444444" calcext:value-type="float">
            <text:p>0,00103819444444444000</text:p>
          </table:table-cell>
          <table:table-cell table:formula="of:=[.D232]-[.D23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9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04270833333333" calcext:value-type="float">
            <text:p>0,00104270833333333000</text:p>
          </table:table-cell>
          <table:table-cell table:formula="of:=[.D233]-[.D23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9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04722222222222" calcext:value-type="float">
            <text:p>0,00104722222222222000</text:p>
          </table:table-cell>
          <table:table-cell table:formula="of:=[.D234]-[.D23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9" office:value-type="float" office:value="9087" calcext:value-type="float">
            <text:p>908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05173611111111" calcext:value-type="float">
            <text:p>0,00105173611111111000</text:p>
          </table:table-cell>
          <table:table-cell table:formula="of:=[.D235]-[.D23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9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05625" calcext:value-type="float">
            <text:p>0,00105625000000000000</text:p>
          </table:table-cell>
          <table:table-cell table:formula="of:=[.D236]-[.D23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9" office:value-type="float" office:value="9165" calcext:value-type="float">
            <text:p>916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06076388888889" calcext:value-type="float">
            <text:p>0,00106076388888889000</text:p>
          </table:table-cell>
          <table:table-cell table:formula="of:=[.D237]-[.D23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9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06527777777778" calcext:value-type="float">
            <text:p>0,00106527777777778000</text:p>
          </table:table-cell>
          <table:table-cell table:formula="of:=[.D238]-[.D23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9" office:value-type="float" office:value="9243" calcext:value-type="float">
            <text:p>924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06979166666667" calcext:value-type="float">
            <text:p>0,00106979166666667000</text:p>
          </table:table-cell>
          <table:table-cell table:formula="of:=[.D239]-[.D23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9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07430555555556" calcext:value-type="float">
            <text:p>0,00107430555555556000</text:p>
          </table:table-cell>
          <table:table-cell table:formula="of:=[.D240]-[.D23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9" office:value-type="float" office:value="9321" calcext:value-type="float">
            <text:p>932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07881944444444" calcext:value-type="float">
            <text:p>0,00107881944444444000</text:p>
          </table:table-cell>
          <table:table-cell table:formula="of:=[.D241]-[.D24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9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08333333333333" calcext:value-type="float">
            <text:p>0,00108333333333333000</text:p>
          </table:table-cell>
          <table:table-cell table:formula="of:=[.D242]-[.D24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9" office:value-type="float" office:value="9399" calcext:value-type="float">
            <text:p>939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08784722222222" calcext:value-type="float">
            <text:p>0,00108784722222222000</text:p>
          </table:table-cell>
          <table:table-cell table:formula="of:=[.D243]-[.D24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9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09236111111111" calcext:value-type="float">
            <text:p>0,00109236111111111000</text:p>
          </table:table-cell>
          <table:table-cell table:formula="of:=[.D244]-[.D24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9" office:value-type="float" office:value="9477" calcext:value-type="float">
            <text:p>947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096875" calcext:value-type="float">
            <text:p>0,00109687500000000000</text:p>
          </table:table-cell>
          <table:table-cell table:formula="of:=[.D245]-[.D24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9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10138888888889" calcext:value-type="float">
            <text:p>0,00110138888888889000</text:p>
          </table:table-cell>
          <table:table-cell table:formula="of:=[.D246]-[.D24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9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10590277777778" calcext:value-type="float">
            <text:p>0,00110590277777778000</text:p>
          </table:table-cell>
          <table:table-cell table:formula="of:=[.D247]-[.D24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9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11041666666667" calcext:value-type="float">
            <text:p>0,00111041666666667000</text:p>
          </table:table-cell>
          <table:table-cell table:formula="of:=[.D248]-[.D24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9" office:value-type="float" office:value="9633" calcext:value-type="float">
            <text:p>963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11493055555556" calcext:value-type="float">
            <text:p>0,00111493055555556000</text:p>
          </table:table-cell>
          <table:table-cell table:formula="of:=[.D249]-[.D24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9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11944444444444" calcext:value-type="float">
            <text:p>0,00111944444444444000</text:p>
          </table:table-cell>
          <table:table-cell table:formula="of:=[.D250]-[.D24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9" office:value-type="float" office:value="9711" calcext:value-type="float">
            <text:p>971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12395833333333" calcext:value-type="float">
            <text:p>0,00112395833333333000</text:p>
          </table:table-cell>
          <table:table-cell table:formula="of:=[.D251]-[.D25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9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12847222222222" calcext:value-type="float">
            <text:p>0,00112847222222222000</text:p>
          </table:table-cell>
          <table:table-cell table:formula="of:=[.D252]-[.D25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9" office:value-type="float" office:value="9789" calcext:value-type="float">
            <text:p>978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13298611111111" calcext:value-type="float">
            <text:p>0,00113298611111111000</text:p>
          </table:table-cell>
          <table:table-cell table:formula="of:=[.D253]-[.D25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9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1375" calcext:value-type="float">
            <text:p>0,00113750000000000000</text:p>
          </table:table-cell>
          <table:table-cell table:formula="of:=[.D254]-[.D25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9" office:value-type="float" office:value="9867" calcext:value-type="float">
            <text:p>986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14201388888889" calcext:value-type="float">
            <text:p>0,00114201388888889000</text:p>
          </table:table-cell>
          <table:table-cell table:formula="of:=[.D255]-[.D25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9" office:value-type="float" office:value="9906" calcext:value-type="float">
            <text:p>990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14652777777778" calcext:value-type="float">
            <text:p>0,00114652777777778000</text:p>
          </table:table-cell>
          <table:table-cell table:formula="of:=[.D256]-[.D25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9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15104166666667" calcext:value-type="float">
            <text:p>0,00115104166666667000</text:p>
          </table:table-cell>
          <table:table-cell table:formula="of:=[.D257]-[.D25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9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15555555555556" calcext:value-type="float">
            <text:p>0,00115555555555556000</text:p>
          </table:table-cell>
          <table:table-cell table:formula="of:=[.D258]-[.D25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9" office:value-type="float" office:value="10023" calcext:value-type="float">
            <text:p>1002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16006944444444" calcext:value-type="float">
            <text:p>0,00116006944444444000</text:p>
          </table:table-cell>
          <table:table-cell table:formula="of:=[.D259]-[.D25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9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16458333333333" calcext:value-type="float">
            <text:p>0,00116458333333333000</text:p>
          </table:table-cell>
          <table:table-cell table:formula="of:=[.D260]-[.D25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9" office:value-type="float" office:value="10101" calcext:value-type="float">
            <text:p>1010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16909722222222" calcext:value-type="float">
            <text:p>0,00116909722222222000</text:p>
          </table:table-cell>
          <table:table-cell table:formula="of:=[.D261]-[.D26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9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17361111111111" calcext:value-type="float">
            <text:p>0,00117361111111111000</text:p>
          </table:table-cell>
          <table:table-cell table:formula="of:=[.D262]-[.D26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9" office:value-type="float" office:value="10179" calcext:value-type="float">
            <text:p>1017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178125" calcext:value-type="float">
            <text:p>0,00117812500000000000</text:p>
          </table:table-cell>
          <table:table-cell table:formula="of:=[.D263]-[.D26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9" office:value-type="float" office:value="10218" calcext:value-type="float">
            <text:p>1021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18263888888889" calcext:value-type="float">
            <text:p>0,00118263888888889000</text:p>
          </table:table-cell>
          <table:table-cell table:formula="of:=[.D264]-[.D26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9" office:value-type="float" office:value="10257" calcext:value-type="float">
            <text:p>1025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18715277777778" calcext:value-type="float">
            <text:p>0,00118715277777778000</text:p>
          </table:table-cell>
          <table:table-cell table:formula="of:=[.D265]-[.D26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9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19166666666667" calcext:value-type="float">
            <text:p>0,00119166666666667000</text:p>
          </table:table-cell>
          <table:table-cell table:formula="of:=[.D266]-[.D26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9" office:value-type="float" office:value="10335" calcext:value-type="float">
            <text:p>1033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19618055555556" calcext:value-type="float">
            <text:p>0,00119618055555556000</text:p>
          </table:table-cell>
          <table:table-cell table:formula="of:=[.D267]-[.D26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9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20069444444444" calcext:value-type="float">
            <text:p>0,00120069444444444000</text:p>
          </table:table-cell>
          <table:table-cell table:formula="of:=[.D268]-[.D26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9" office:value-type="float" office:value="10413" calcext:value-type="float">
            <text:p>1041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20520833333333" calcext:value-type="float">
            <text:p>0,00120520833333333000</text:p>
          </table:table-cell>
          <table:table-cell table:formula="of:=[.D269]-[.D26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9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20972222222222" calcext:value-type="float">
            <text:p>0,00120972222222222000</text:p>
          </table:table-cell>
          <table:table-cell table:formula="of:=[.D270]-[.D26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9" office:value-type="float" office:value="10491" calcext:value-type="float">
            <text:p>1049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21423611111111" calcext:value-type="float">
            <text:p>0,00121423611111111000</text:p>
          </table:table-cell>
          <table:table-cell table:formula="of:=[.D271]-[.D27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9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21875" calcext:value-type="float">
            <text:p>0,00121875000000000000</text:p>
          </table:table-cell>
          <table:table-cell table:formula="of:=[.D272]-[.D27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9" office:value-type="float" office:value="10569" calcext:value-type="float">
            <text:p>1056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22326388888889" calcext:value-type="float">
            <text:p>0,00122326388888889000</text:p>
          </table:table-cell>
          <table:table-cell table:formula="of:=[.D273]-[.D27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9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22777777777778" calcext:value-type="float">
            <text:p>0,00122777777777778000</text:p>
          </table:table-cell>
          <table:table-cell table:formula="of:=[.D274]-[.D27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9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23229166666667" calcext:value-type="float">
            <text:p>0,00123229166666667000</text:p>
          </table:table-cell>
          <table:table-cell table:formula="of:=[.D275]-[.D27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9" office:value-type="float" office:value="10686" calcext:value-type="float">
            <text:p>1068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23680555555556" calcext:value-type="float">
            <text:p>0,00123680555555556000</text:p>
          </table:table-cell>
          <table:table-cell table:formula="of:=[.D276]-[.D27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9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24131944444444" calcext:value-type="float">
            <text:p>0,00124131944444444000</text:p>
          </table:table-cell>
          <table:table-cell table:formula="of:=[.D277]-[.D27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9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24583333333333" calcext:value-type="float">
            <text:p>0,00124583333333333000</text:p>
          </table:table-cell>
          <table:table-cell table:formula="of:=[.D278]-[.D27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9" office:value-type="float" office:value="10803" calcext:value-type="float">
            <text:p>1080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25034722222222" calcext:value-type="float">
            <text:p>0,00125034722222222000</text:p>
          </table:table-cell>
          <table:table-cell table:formula="of:=[.D279]-[.D27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9" office:value-type="float" office:value="10842" calcext:value-type="float">
            <text:p>1084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25486111111111" calcext:value-type="float">
            <text:p>0,00125486111111111000</text:p>
          </table:table-cell>
          <table:table-cell table:formula="of:=[.D280]-[.D27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9" office:value-type="float" office:value="10881" calcext:value-type="float">
            <text:p>1088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259375" calcext:value-type="float">
            <text:p>0,00125937500000000000</text:p>
          </table:table-cell>
          <table:table-cell table:formula="of:=[.D281]-[.D28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9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26388888888889" calcext:value-type="float">
            <text:p>0,00126388888888889000</text:p>
          </table:table-cell>
          <table:table-cell table:formula="of:=[.D282]-[.D28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9" office:value-type="float" office:value="10959" calcext:value-type="float">
            <text:p>1095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26840277777778" calcext:value-type="float">
            <text:p>0,00126840277777778000</text:p>
          </table:table-cell>
          <table:table-cell table:formula="of:=[.D283]-[.D28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9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27291666666667" calcext:value-type="float">
            <text:p>0,00127291666666667000</text:p>
          </table:table-cell>
          <table:table-cell table:formula="of:=[.D284]-[.D28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9" office:value-type="float" office:value="11037" calcext:value-type="float">
            <text:p>1103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27743055555556" calcext:value-type="float">
            <text:p>0,00127743055555556000</text:p>
          </table:table-cell>
          <table:table-cell table:formula="of:=[.D285]-[.D28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9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28194444444444" calcext:value-type="float">
            <text:p>0,00128194444444444000</text:p>
          </table:table-cell>
          <table:table-cell table:formula="of:=[.D286]-[.D28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9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28645833333333" calcext:value-type="float">
            <text:p>0,00128645833333333000</text:p>
          </table:table-cell>
          <table:table-cell table:formula="of:=[.D287]-[.D28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9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29097222222222" calcext:value-type="float">
            <text:p>0,00129097222222222000</text:p>
          </table:table-cell>
          <table:table-cell table:formula="of:=[.D288]-[.D28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9" office:value-type="float" office:value="11193" calcext:value-type="float">
            <text:p>1119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29548611111111" calcext:value-type="float">
            <text:p>0,00129548611111111000</text:p>
          </table:table-cell>
          <table:table-cell table:formula="of:=[.D289]-[.D28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9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3" calcext:value-type="float">
            <text:p>0,00130000000000000000</text:p>
          </table:table-cell>
          <table:table-cell table:formula="of:=[.D290]-[.D28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9" office:value-type="float" office:value="11271" calcext:value-type="float">
            <text:p>1127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30451388888889" calcext:value-type="float">
            <text:p>0,00130451388888889000</text:p>
          </table:table-cell>
          <table:table-cell table:formula="of:=[.D291]-[.D29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9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30902777777778" calcext:value-type="float">
            <text:p>0,00130902777777778000</text:p>
          </table:table-cell>
          <table:table-cell table:formula="of:=[.D292]-[.D29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9" office:value-type="float" office:value="11349" calcext:value-type="float">
            <text:p>1134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31354166666667" calcext:value-type="float">
            <text:p>0,00131354166666667000</text:p>
          </table:table-cell>
          <table:table-cell table:formula="of:=[.D293]-[.D29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9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31805555555556" calcext:value-type="float">
            <text:p>0,00131805555555556000</text:p>
          </table:table-cell>
          <table:table-cell table:formula="of:=[.D294]-[.D29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9" office:value-type="float" office:value="11427" calcext:value-type="float">
            <text:p>1142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32256944444444" calcext:value-type="float">
            <text:p>0,00132256944444444000</text:p>
          </table:table-cell>
          <table:table-cell table:formula="of:=[.D295]-[.D29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9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32708333333333" calcext:value-type="float">
            <text:p>0,00132708333333333000</text:p>
          </table:table-cell>
          <table:table-cell table:formula="of:=[.D296]-[.D29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9" office:value-type="float" office:value="11505" calcext:value-type="float">
            <text:p>1150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33159722222222" calcext:value-type="float">
            <text:p>0,00133159722222222000</text:p>
          </table:table-cell>
          <table:table-cell table:formula="of:=[.D297]-[.D29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9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33611111111111" calcext:value-type="float">
            <text:p>0,00133611111111111000</text:p>
          </table:table-cell>
          <table:table-cell table:formula="of:=[.D298]-[.D29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9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340625" calcext:value-type="float">
            <text:p>0,00134062500000000000</text:p>
          </table:table-cell>
          <table:table-cell table:formula="of:=[.D299]-[.D29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9" office:value-type="float" office:value="11622" calcext:value-type="float">
            <text:p>1162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34513888888889" calcext:value-type="float">
            <text:p>0,00134513888888889000</text:p>
          </table:table-cell>
          <table:table-cell table:formula="of:=[.D300]-[.D29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9" office:value-type="float" office:value="11661" calcext:value-type="float">
            <text:p>1166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34965277777778" calcext:value-type="float">
            <text:p>0,00134965277777778000</text:p>
          </table:table-cell>
          <table:table-cell table:formula="of:=[.D301]-[.D30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9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35416666666667" calcext:value-type="float">
            <text:p>0,00135416666666667000</text:p>
          </table:table-cell>
          <table:table-cell table:formula="of:=[.D302]-[.D30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9" office:value-type="float" office:value="11739" calcext:value-type="float">
            <text:p>1173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35868055555556" calcext:value-type="float">
            <text:p>0,00135868055555556000</text:p>
          </table:table-cell>
          <table:table-cell table:formula="of:=[.D303]-[.D30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9" office:value-type="float" office:value="11778" calcext:value-type="float">
            <text:p>1177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36319444444444" calcext:value-type="float">
            <text:p>0,00136319444444444000</text:p>
          </table:table-cell>
          <table:table-cell table:formula="of:=[.D304]-[.D30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9" office:value-type="float" office:value="11817" calcext:value-type="float">
            <text:p>1181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36770833333333" calcext:value-type="float">
            <text:p>0,00136770833333333000</text:p>
          </table:table-cell>
          <table:table-cell table:formula="of:=[.D305]-[.D30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9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37222222222222" calcext:value-type="float">
            <text:p>0,00137222222222222000</text:p>
          </table:table-cell>
          <table:table-cell table:formula="of:=[.D306]-[.D30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9" office:value-type="float" office:value="11895" calcext:value-type="float">
            <text:p>1189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37673611111111" calcext:value-type="float">
            <text:p>0,00137673611111111000</text:p>
          </table:table-cell>
          <table:table-cell table:formula="of:=[.D307]-[.D30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9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38125" calcext:value-type="float">
            <text:p>0,00138125000000000000</text:p>
          </table:table-cell>
          <table:table-cell table:formula="of:=[.D308]-[.D30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9" office:value-type="float" office:value="11973" calcext:value-type="float">
            <text:p>1197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38576388888889" calcext:value-type="float">
            <text:p>0,00138576388888889000</text:p>
          </table:table-cell>
          <table:table-cell table:formula="of:=[.D309]-[.D30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9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39027777777778" calcext:value-type="float">
            <text:p>0,00139027777777778000</text:p>
          </table:table-cell>
          <table:table-cell table:formula="of:=[.D310]-[.D30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9" office:value-type="float" office:value="12051" calcext:value-type="float">
            <text:p>1205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39479166666667" calcext:value-type="float">
            <text:p>0,00139479166666667000</text:p>
          </table:table-cell>
          <table:table-cell table:formula="of:=[.D311]-[.D31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9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39930555555556" calcext:value-type="float">
            <text:p>0,00139930555555556000</text:p>
          </table:table-cell>
          <table:table-cell table:formula="of:=[.D312]-[.D31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9" office:value-type="float" office:value="12129" calcext:value-type="float">
            <text:p>1212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40381944444444" calcext:value-type="float">
            <text:p>0,00140381944444444000</text:p>
          </table:table-cell>
          <table:table-cell table:formula="of:=[.D313]-[.D31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9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40833333333333" calcext:value-type="float">
            <text:p>0,00140833333333333000</text:p>
          </table:table-cell>
          <table:table-cell table:formula="of:=[.D314]-[.D31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9" office:value-type="float" office:value="12207" calcext:value-type="float">
            <text:p>1220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41284722222222" calcext:value-type="float">
            <text:p>0,00141284722222222000</text:p>
          </table:table-cell>
          <table:table-cell table:formula="of:=[.D315]-[.D31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9" office:value-type="float" office:value="12246" calcext:value-type="float">
            <text:p>1224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41736111111111" calcext:value-type="float">
            <text:p>0,00141736111111111000</text:p>
          </table:table-cell>
          <table:table-cell table:formula="of:=[.D316]-[.D31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9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421875" calcext:value-type="float">
            <text:p>0,00142187500000000000</text:p>
          </table:table-cell>
          <table:table-cell table:formula="of:=[.D317]-[.D31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9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42638888888889" calcext:value-type="float">
            <text:p>0,00142638888888889000</text:p>
          </table:table-cell>
          <table:table-cell table:formula="of:=[.D318]-[.D31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9" office:value-type="float" office:value="12363" calcext:value-type="float">
            <text:p>1236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43090277777778" calcext:value-type="float">
            <text:p>0,00143090277777778000</text:p>
          </table:table-cell>
          <table:table-cell table:formula="of:=[.D319]-[.D31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9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43541666666667" calcext:value-type="float">
            <text:p>0,00143541666666667000</text:p>
          </table:table-cell>
          <table:table-cell table:formula="of:=[.D320]-[.D31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9" office:value-type="float" office:value="12441" calcext:value-type="float">
            <text:p>1244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43993055555556" calcext:value-type="float">
            <text:p>0,00143993055555556000</text:p>
          </table:table-cell>
          <table:table-cell table:formula="of:=[.D321]-[.D32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9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44444444444444" calcext:value-type="float">
            <text:p>0,00144444444444444000</text:p>
          </table:table-cell>
          <table:table-cell table:formula="of:=[.D322]-[.D32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9" office:value-type="float" office:value="12519" calcext:value-type="float">
            <text:p>1251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44895833333333" calcext:value-type="float">
            <text:p>0,00144895833333333000</text:p>
          </table:table-cell>
          <table:table-cell table:formula="of:=[.D323]-[.D32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9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45347222222222" calcext:value-type="float">
            <text:p>0,00145347222222222000</text:p>
          </table:table-cell>
          <table:table-cell table:formula="of:=[.D324]-[.D32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9" office:value-type="float" office:value="12597" calcext:value-type="float">
            <text:p>1259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45798611111111" calcext:value-type="float">
            <text:p>0,00145798611111111000</text:p>
          </table:table-cell>
          <table:table-cell table:formula="of:=[.D325]-[.D32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9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4625" calcext:value-type="float">
            <text:p>0,00146250000000000000</text:p>
          </table:table-cell>
          <table:table-cell table:formula="of:=[.D326]-[.D32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9" office:value-type="float" office:value="12675" calcext:value-type="float">
            <text:p>126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46701388888889" calcext:value-type="float">
            <text:p>0,00146701388888889000</text:p>
          </table:table-cell>
          <table:table-cell table:formula="of:=[.D327]-[.D32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9" office:value-type="float" office:value="12714" calcext:value-type="float">
            <text:p>1271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47152777777778" calcext:value-type="float">
            <text:p>0,00147152777777778000</text:p>
          </table:table-cell>
          <table:table-cell table:formula="of:=[.D328]-[.D32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9" office:value-type="float" office:value="12753" calcext:value-type="float">
            <text:p>1275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47604166666667" calcext:value-type="float">
            <text:p>0,00147604166666667000</text:p>
          </table:table-cell>
          <table:table-cell table:formula="of:=[.D329]-[.D32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9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48055555555556" calcext:value-type="float">
            <text:p>0,00148055555555556000</text:p>
          </table:table-cell>
          <table:table-cell table:formula="of:=[.D330]-[.D32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9" office:value-type="float" office:value="12831" calcext:value-type="float">
            <text:p>1283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48506944444444" calcext:value-type="float">
            <text:p>0,00148506944444444000</text:p>
          </table:table-cell>
          <table:table-cell table:formula="of:=[.D331]-[.D33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9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48958333333333" calcext:value-type="float">
            <text:p>0,00148958333333333000</text:p>
          </table:table-cell>
          <table:table-cell table:formula="of:=[.D332]-[.D33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9" office:value-type="float" office:value="12909" calcext:value-type="float">
            <text:p>1290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49409722222222" calcext:value-type="float">
            <text:p>0,00149409722222222000</text:p>
          </table:table-cell>
          <table:table-cell table:formula="of:=[.D333]-[.D33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9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49861111111111" calcext:value-type="float">
            <text:p>0,00149861111111111000</text:p>
          </table:table-cell>
          <table:table-cell table:formula="of:=[.D334]-[.D33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9" office:value-type="float" office:value="12987" calcext:value-type="float">
            <text:p>1298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503125" calcext:value-type="float">
            <text:p>0,00150312500000000000</text:p>
          </table:table-cell>
          <table:table-cell table:formula="of:=[.D335]-[.D33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9" office:value-type="float" office:value="13026" calcext:value-type="float">
            <text:p>1302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50763888888889" calcext:value-type="float">
            <text:p>0,00150763888888889000</text:p>
          </table:table-cell>
          <table:table-cell table:formula="of:=[.D336]-[.D33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9" office:value-type="float" office:value="13065" calcext:value-type="float">
            <text:p>1306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51215277777778" calcext:value-type="float">
            <text:p>0,00151215277777778000</text:p>
          </table:table-cell>
          <table:table-cell table:formula="of:=[.D337]-[.D33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9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51666666666667" calcext:value-type="float">
            <text:p>0,00151666666666667000</text:p>
          </table:table-cell>
          <table:table-cell table:formula="of:=[.D338]-[.D33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9" office:value-type="float" office:value="13143" calcext:value-type="float">
            <text:p>1314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52118055555556" calcext:value-type="float">
            <text:p>0,00152118055555556000</text:p>
          </table:table-cell>
          <table:table-cell table:formula="of:=[.D339]-[.D33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9" office:value-type="float" office:value="13182" calcext:value-type="float">
            <text:p>1318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52569444444444" calcext:value-type="float">
            <text:p>0,00152569444444444000</text:p>
          </table:table-cell>
          <table:table-cell table:formula="of:=[.D340]-[.D33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9" office:value-type="float" office:value="13221" calcext:value-type="float">
            <text:p>1322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53020833333333" calcext:value-type="float">
            <text:p>0,00153020833333333000</text:p>
          </table:table-cell>
          <table:table-cell table:formula="of:=[.D341]-[.D34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9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53472222222222" calcext:value-type="float">
            <text:p>0,00153472222222222000</text:p>
          </table:table-cell>
          <table:table-cell table:formula="of:=[.D342]-[.D34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9" office:value-type="float" office:value="13299" calcext:value-type="float">
            <text:p>1329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53923611111111" calcext:value-type="float">
            <text:p>0,00153923611111111000</text:p>
          </table:table-cell>
          <table:table-cell table:formula="of:=[.D343]-[.D34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9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54375" calcext:value-type="float">
            <text:p>0,00154375000000000000</text:p>
          </table:table-cell>
          <table:table-cell table:formula="of:=[.D344]-[.D34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9" office:value-type="float" office:value="13377" calcext:value-type="float">
            <text:p>1337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54826388888889" calcext:value-type="float">
            <text:p>0,00154826388888889000</text:p>
          </table:table-cell>
          <table:table-cell table:formula="of:=[.D345]-[.D34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9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55277777777778" calcext:value-type="float">
            <text:p>0,00155277777777778000</text:p>
          </table:table-cell>
          <table:table-cell table:formula="of:=[.D346]-[.D34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9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55729166666667" calcext:value-type="float">
            <text:p>0,00155729166666667000</text:p>
          </table:table-cell>
          <table:table-cell table:formula="of:=[.D347]-[.D34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9" office:value-type="float" office:value="13494" calcext:value-type="float">
            <text:p>1349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56180555555556" calcext:value-type="float">
            <text:p>0,00156180555555556000</text:p>
          </table:table-cell>
          <table:table-cell table:formula="of:=[.D348]-[.D34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9" office:value-type="float" office:value="13533" calcext:value-type="float">
            <text:p>1353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56631944444444" calcext:value-type="float">
            <text:p>0,00156631944444444000</text:p>
          </table:table-cell>
          <table:table-cell table:formula="of:=[.D349]-[.D34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9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57083333333333" calcext:value-type="float">
            <text:p>0,00157083333333333000</text:p>
          </table:table-cell>
          <table:table-cell table:formula="of:=[.D350]-[.D34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9" office:value-type="float" office:value="13611" calcext:value-type="float">
            <text:p>13611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57534722222222" calcext:value-type="float">
            <text:p>0,00157534722222222000</text:p>
          </table:table-cell>
          <table:table-cell table:formula="of:=[.D351]-[.D35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9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57986111111111" calcext:value-type="float">
            <text:p>0,00157986111111111000</text:p>
          </table:table-cell>
          <table:table-cell table:formula="of:=[.D352]-[.D35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9" office:value-type="float" office:value="13689" calcext:value-type="float">
            <text:p>13689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584375" calcext:value-type="float">
            <text:p>0,00158437500000000000</text:p>
          </table:table-cell>
          <table:table-cell table:formula="of:=[.D353]-[.D35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9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58888888888889" calcext:value-type="float">
            <text:p>0,00158888888888889000</text:p>
          </table:table-cell>
          <table:table-cell table:formula="of:=[.D354]-[.D35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9" office:value-type="float" office:value="13767" calcext:value-type="float">
            <text:p>13767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59340277777778" calcext:value-type="float">
            <text:p>0,00159340277777778000</text:p>
          </table:table-cell>
          <table:table-cell table:formula="of:=[.D355]-[.D35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9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59791666666667" calcext:value-type="float">
            <text:p>0,00159791666666667000</text:p>
          </table:table-cell>
          <table:table-cell table:formula="of:=[.D356]-[.D35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9" office:value-type="float" office:value="13845" calcext:value-type="float">
            <text:p>1384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60243055555556" calcext:value-type="float">
            <text:p>0,00160243055555556000</text:p>
          </table:table-cell>
          <table:table-cell table:formula="of:=[.D357]-[.D35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9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60694444444444" calcext:value-type="float">
            <text:p>0,00160694444444444000</text:p>
          </table:table-cell>
          <table:table-cell table:formula="of:=[.D358]-[.D35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9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61145833333333" calcext:value-type="float">
            <text:p>0,00161145833333333000</text:p>
          </table:table-cell>
          <table:table-cell table:formula="of:=[.D359]-[.D35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9" office:value-type="float" office:value="13962" calcext:value-type="float">
            <text:p>1396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61597222222222" calcext:value-type="float">
            <text:p>0,00161597222222222000</text:p>
          </table:table-cell>
          <table:table-cell table:formula="of:=[.D360]-[.D35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9" office:value-type="float" office:value="14001" calcext:value-type="float">
            <text:p>14001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62048611111111" calcext:value-type="float">
            <text:p>0,00162048611111111000</text:p>
          </table:table-cell>
          <table:table-cell table:formula="of:=[.D361]-[.D36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9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625" calcext:value-type="float">
            <text:p>0,00162500000000000000</text:p>
          </table:table-cell>
          <table:table-cell table:formula="of:=[.D362]-[.D36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9" office:value-type="float" office:value="14079" calcext:value-type="float">
            <text:p>14079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62951388888889" calcext:value-type="float">
            <text:p>0,00162951388888889000</text:p>
          </table:table-cell>
          <table:table-cell table:formula="of:=[.D363]-[.D36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9" office:value-type="float" office:value="14118" calcext:value-type="float">
            <text:p>1411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63402777777778" calcext:value-type="float">
            <text:p>0,00163402777777778000</text:p>
          </table:table-cell>
          <table:table-cell table:formula="of:=[.D364]-[.D36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9" office:value-type="float" office:value="14157" calcext:value-type="float">
            <text:p>14157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63854166666667" calcext:value-type="float">
            <text:p>0,00163854166666667000</text:p>
          </table:table-cell>
          <table:table-cell table:formula="of:=[.D365]-[.D36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9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64305555555556" calcext:value-type="float">
            <text:p>0,00164305555555556000</text:p>
          </table:table-cell>
          <table:table-cell table:formula="of:=[.D366]-[.D36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9" office:value-type="float" office:value="14235" calcext:value-type="float">
            <text:p>1423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64756944444444" calcext:value-type="float">
            <text:p>0,00164756944444444000</text:p>
          </table:table-cell>
          <table:table-cell table:formula="of:=[.D367]-[.D36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9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65208333333333" calcext:value-type="float">
            <text:p>0,00165208333333333000</text:p>
          </table:table-cell>
          <table:table-cell table:formula="of:=[.D368]-[.D36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9" office:value-type="float" office:value="14313" calcext:value-type="float">
            <text:p>14313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65659722222222" calcext:value-type="float">
            <text:p>0,00165659722222222000</text:p>
          </table:table-cell>
          <table:table-cell table:formula="of:=[.D369]-[.D36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9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66111111111111" calcext:value-type="float">
            <text:p>0,00166111111111111000</text:p>
          </table:table-cell>
          <table:table-cell table:formula="of:=[.D370]-[.D36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9" office:value-type="float" office:value="14391" calcext:value-type="float">
            <text:p>14391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665625" calcext:value-type="float">
            <text:p>0,00166562500000000000</text:p>
          </table:table-cell>
          <table:table-cell table:formula="of:=[.D371]-[.D37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9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67013888888889" calcext:value-type="float">
            <text:p>0,00167013888888889000</text:p>
          </table:table-cell>
          <table:table-cell table:formula="of:=[.D372]-[.D37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9" office:value-type="float" office:value="14469" calcext:value-type="float">
            <text:p>14469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67465277777778" calcext:value-type="float">
            <text:p>0,00167465277777778000</text:p>
          </table:table-cell>
          <table:table-cell table:formula="of:=[.D373]-[.D37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9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67916666666667" calcext:value-type="float">
            <text:p>0,00167916666666667000</text:p>
          </table:table-cell>
          <table:table-cell table:formula="of:=[.D374]-[.D37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9" office:value-type="float" office:value="14547" calcext:value-type="float">
            <text:p>14547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68368055555556" calcext:value-type="float">
            <text:p>0,00168368055555556000</text:p>
          </table:table-cell>
          <table:table-cell table:formula="of:=[.D375]-[.D37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9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68819444444444" calcext:value-type="float">
            <text:p>0,00168819444444444000</text:p>
          </table:table-cell>
          <table:table-cell table:formula="of:=[.D376]-[.D37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9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69270833333333" calcext:value-type="float">
            <text:p>0,00169270833333333000</text:p>
          </table:table-cell>
          <table:table-cell table:formula="of:=[.D377]-[.D37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9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69722222222222" calcext:value-type="float">
            <text:p>0,00169722222222222000</text:p>
          </table:table-cell>
          <table:table-cell table:formula="of:=[.D378]-[.D37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9" office:value-type="float" office:value="14703" calcext:value-type="float">
            <text:p>14703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70173611111111" calcext:value-type="float">
            <text:p>0,00170173611111111000</text:p>
          </table:table-cell>
          <table:table-cell table:formula="of:=[.D379]-[.D37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9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70625" calcext:value-type="float">
            <text:p>0,00170625000000000000</text:p>
          </table:table-cell>
          <table:table-cell table:formula="of:=[.D380]-[.D37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9" office:value-type="float" office:value="14781" calcext:value-type="float">
            <text:p>14781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71076388888889" calcext:value-type="float">
            <text:p>0,00171076388888889000</text:p>
          </table:table-cell>
          <table:table-cell table:formula="of:=[.D381]-[.D38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9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71527777777778" calcext:value-type="float">
            <text:p>0,00171527777777778000</text:p>
          </table:table-cell>
          <table:table-cell table:formula="of:=[.D382]-[.D38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9" office:value-type="float" office:value="14859" calcext:value-type="float">
            <text:p>14859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71979166666667" calcext:value-type="float">
            <text:p>0,00171979166666667000</text:p>
          </table:table-cell>
          <table:table-cell table:formula="of:=[.D383]-[.D38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9" office:value-type="float" office:value="14898" calcext:value-type="float">
            <text:p>1489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72430555555556" calcext:value-type="float">
            <text:p>0,00172430555555556000</text:p>
          </table:table-cell>
          <table:table-cell table:formula="of:=[.D384]-[.D38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9" office:value-type="float" office:value="14937" calcext:value-type="float">
            <text:p>14937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72881944444444" calcext:value-type="float">
            <text:p>0,00172881944444444000</text:p>
          </table:table-cell>
          <table:table-cell table:formula="of:=[.D385]-[.D38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9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73333333333333" calcext:value-type="float">
            <text:p>0,00173333333333333000</text:p>
          </table:table-cell>
          <table:table-cell table:formula="of:=[.D386]-[.D38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9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73784722222222" calcext:value-type="float">
            <text:p>0,00173784722222222000</text:p>
          </table:table-cell>
          <table:table-cell table:formula="of:=[.D387]-[.D38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9" office:value-type="float" office:value="15054" calcext:value-type="float">
            <text:p>1505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74236111111111" calcext:value-type="float">
            <text:p>0,00174236111111111000</text:p>
          </table:table-cell>
          <table:table-cell table:formula="of:=[.D388]-[.D38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9" office:value-type="float" office:value="15093" calcext:value-type="float">
            <text:p>15093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746875" calcext:value-type="float">
            <text:p>0,00174687500000000000</text:p>
          </table:table-cell>
          <table:table-cell table:formula="of:=[.D389]-[.D38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9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75138888888889" calcext:value-type="float">
            <text:p>0,00175138888888889000</text:p>
          </table:table-cell>
          <table:table-cell table:formula="of:=[.D390]-[.D38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9" office:value-type="float" office:value="15171" calcext:value-type="float">
            <text:p>15171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75590277777778" calcext:value-type="float">
            <text:p>0,00175590277777778000</text:p>
          </table:table-cell>
          <table:table-cell table:formula="of:=[.D391]-[.D39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9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76041666666667" calcext:value-type="float">
            <text:p>0,00176041666666667000</text:p>
          </table:table-cell>
          <table:table-cell table:formula="of:=[.D392]-[.D39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9" office:value-type="float" office:value="15249" calcext:value-type="float">
            <text:p>15249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76493055555556" calcext:value-type="float">
            <text:p>0,00176493055555556000</text:p>
          </table:table-cell>
          <table:table-cell table:formula="of:=[.D393]-[.D39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9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76944444444444" calcext:value-type="float">
            <text:p>0,00176944444444444000</text:p>
          </table:table-cell>
          <table:table-cell table:formula="of:=[.D394]-[.D39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9" office:value-type="float" office:value="15327" calcext:value-type="float">
            <text:p>15327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77395833333333" calcext:value-type="float">
            <text:p>0,00177395833333333000</text:p>
          </table:table-cell>
          <table:table-cell table:formula="of:=[.D395]-[.D39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9" office:value-type="float" office:value="15366" calcext:value-type="float">
            <text:p>1536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77847222222222" calcext:value-type="float">
            <text:p>0,00177847222222222000</text:p>
          </table:table-cell>
          <table:table-cell table:formula="of:=[.D396]-[.D395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9" office:value-type="float" office:value="15405" calcext:value-type="float">
            <text:p>1540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78298611111111" calcext:value-type="float">
            <text:p>0,00178298611111111000</text:p>
          </table:table-cell>
          <table:table-cell table:formula="of:=[.D397]-[.D39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9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7875" calcext:value-type="float">
            <text:p>0,00178750000000000000</text:p>
          </table:table-cell>
          <table:table-cell table:formula="of:=[.D398]-[.D39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9" office:value-type="float" office:value="15483" calcext:value-type="float">
            <text:p>15483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79201388888889" calcext:value-type="float">
            <text:p>0,00179201388888889000</text:p>
          </table:table-cell>
          <table:table-cell table:formula="of:=[.D399]-[.D39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9" office:value-type="float" office:value="15522" calcext:value-type="float">
            <text:p>1552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79652777777778" calcext:value-type="float">
            <text:p>0,00179652777777778000</text:p>
          </table:table-cell>
          <table:table-cell table:formula="of:=[.D400]-[.D39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9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80104166666667" calcext:value-type="float">
            <text:p>0,00180104166666667000</text:p>
          </table:table-cell>
          <table:table-cell table:formula="of:=[.D401]-[.D40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9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80555555555556" calcext:value-type="float">
            <text:p>0,00180555555555556000</text:p>
          </table:table-cell>
          <table:table-cell table:formula="of:=[.D402]-[.D40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9" office:value-type="float" office:value="15639" calcext:value-type="float">
            <text:p>15639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81006944444444" calcext:value-type="float">
            <text:p>0,00181006944444444000</text:p>
          </table:table-cell>
          <table:table-cell table:formula="of:=[.D403]-[.D40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9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81458333333333" calcext:value-type="float">
            <text:p>0,00181458333333333000</text:p>
          </table:table-cell>
          <table:table-cell table:formula="of:=[.D404]-[.D403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9" office:value-type="float" office:value="15717" calcext:value-type="float">
            <text:p>15717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81909722222222" calcext:value-type="float">
            <text:p>0,00181909722222222000</text:p>
          </table:table-cell>
          <table:table-cell table:formula="of:=[.D405]-[.D40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9" office:value-type="float" office:value="15756" calcext:value-type="float">
            <text:p>1575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82361111111111" calcext:value-type="float">
            <text:p>0,00182361111111111000</text:p>
          </table:table-cell>
          <table:table-cell table:formula="of:=[.D406]-[.D40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9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828125" calcext:value-type="float">
            <text:p>0,00182812500000000000</text:p>
          </table:table-cell>
          <table:table-cell table:formula="of:=[.D407]-[.D40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9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83263888888889" calcext:value-type="float">
            <text:p>0,00183263888888889000</text:p>
          </table:table-cell>
          <table:table-cell table:formula="of:=[.D408]-[.D40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9" office:value-type="float" office:value="15873" calcext:value-type="float">
            <text:p>15873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83715277777778" calcext:value-type="float">
            <text:p>0,00183715277777778000</text:p>
          </table:table-cell>
          <table:table-cell table:formula="of:=[.D409]-[.D408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9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84166666666667" calcext:value-type="float">
            <text:p>0,00184166666666667000</text:p>
          </table:table-cell>
          <table:table-cell table:formula="of:=[.D410]-[.D40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9" office:value-type="float" office:value="15951" calcext:value-type="float">
            <text:p>15951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84618055555556" calcext:value-type="float">
            <text:p>0,00184618055555556000</text:p>
          </table:table-cell>
          <table:table-cell table:formula="of:=[.D411]-[.D41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9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85069444444444" calcext:value-type="float">
            <text:p>0,00185069444444444000</text:p>
          </table:table-cell>
          <table:table-cell table:formula="of:=[.D412]-[.D411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9" office:value-type="float" office:value="16029" calcext:value-type="float">
            <text:p>16029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85520833333333" calcext:value-type="float">
            <text:p>0,00185520833333333000</text:p>
          </table:table-cell>
          <table:table-cell table:formula="of:=[.D413]-[.D41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9" office:value-type="float" office:value="16068" calcext:value-type="float">
            <text:p>1606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85972222222222" calcext:value-type="float">
            <text:p>0,00185972222222222000</text:p>
          </table:table-cell>
          <table:table-cell table:formula="of:=[.D414]-[.D41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9" office:value-type="float" office:value="16107" calcext:value-type="float">
            <text:p>16107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86423611111111" calcext:value-type="float">
            <text:p>0,00186423611111111000</text:p>
          </table:table-cell>
          <table:table-cell table:formula="of:=[.D415]-[.D41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9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86875" calcext:value-type="float">
            <text:p>0,00186875000000000000</text:p>
          </table:table-cell>
          <table:table-cell table:formula="of:=[.D416]-[.D41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9" office:value-type="float" office:value="16185" calcext:value-type="float">
            <text:p>1618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87326388888889" calcext:value-type="float">
            <text:p>0,00187326388888889000</text:p>
          </table:table-cell>
          <table:table-cell table:formula="of:=[.D417]-[.D416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9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87777777777778" calcext:value-type="float">
            <text:p>0,00187777777777778000</text:p>
          </table:table-cell>
          <table:table-cell table:formula="of:=[.D418]-[.D41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9" office:value-type="float" office:value="16263" calcext:value-type="float">
            <text:p>16263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88229166666667" calcext:value-type="float">
            <text:p>0,00188229166666667000</text:p>
          </table:table-cell>
          <table:table-cell table:formula="of:=[.D419]-[.D41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9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88680555555556" calcext:value-type="float">
            <text:p>0,00188680555555556000</text:p>
          </table:table-cell>
          <table:table-cell table:formula="of:=[.D420]-[.D419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9" office:value-type="float" office:value="16341" calcext:value-type="float">
            <text:p>16341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89131944444444" calcext:value-type="float">
            <text:p>0,00189131944444444000</text:p>
          </table:table-cell>
          <table:table-cell table:formula="of:=[.D421]-[.D42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9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89583333333333" calcext:value-type="float">
            <text:p>0,00189583333333333000</text:p>
          </table:table-cell>
          <table:table-cell table:formula="of:=[.D422]-[.D42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9" office:value-type="float" office:value="16419" calcext:value-type="float">
            <text:p>16419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90034722222222" calcext:value-type="float">
            <text:p>0,00190034722222222000</text:p>
          </table:table-cell>
          <table:table-cell table:formula="of:=[.D423]-[.D42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9" office:value-type="float" office:value="16458" calcext:value-type="float">
            <text:p>1645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90486111111111" calcext:value-type="float">
            <text:p>0,00190486111111111000</text:p>
          </table:table-cell>
          <table:table-cell table:formula="of:=[.D424]-[.D42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9" office:value-type="float" office:value="16497" calcext:value-type="float">
            <text:p>16497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909375" calcext:value-type="float">
            <text:p>0,00190937500000000000</text:p>
          </table:table-cell>
          <table:table-cell table:formula="of:=[.D425]-[.D424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9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91388888888889" calcext:value-type="float">
            <text:p>0,00191388888888889000</text:p>
          </table:table-cell>
          <table:table-cell table:formula="of:=[.D426]-[.D42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9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91840277777778" calcext:value-type="float">
            <text:p>0,00191840277777778000</text:p>
          </table:table-cell>
          <table:table-cell table:formula="of:=[.D427]-[.D42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9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92291666666667" calcext:value-type="float">
            <text:p>0,00192291666666667000</text:p>
          </table:table-cell>
          <table:table-cell table:formula="of:=[.D428]-[.D427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9" office:value-type="float" office:value="16653" calcext:value-type="float">
            <text:p>16653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92743055555556" calcext:value-type="float">
            <text:p>0,00192743055555556000</text:p>
          </table:table-cell>
          <table:table-cell table:formula="of:=[.D429]-[.D42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9" office:value-type="float" office:value="16692" calcext:value-type="float">
            <text:p>1669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93194444444444" calcext:value-type="float">
            <text:p>0,00193194444444444000</text:p>
          </table:table-cell>
          <table:table-cell table:formula="of:=[.D430]-[.D42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9" office:value-type="float" office:value="16731" calcext:value-type="float">
            <text:p>16731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93645833333333" calcext:value-type="float">
            <text:p>0,00193645833333333000</text:p>
          </table:table-cell>
          <table:table-cell table:formula="of:=[.D431]-[.D430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9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94097222222222" calcext:value-type="float">
            <text:p>0,00194097222222222000</text:p>
          </table:table-cell>
          <table:table-cell table:formula="of:=[.D432]-[.D43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9" office:value-type="float" office:value="16809" calcext:value-type="float">
            <text:p>16809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94548611111111" calcext:value-type="float">
            <text:p>0,00194548611111111000</text:p>
          </table:table-cell>
          <table:table-cell table:formula="of:=[.D433]-[.D432]" office:value-type="float" office:value="0.00000451388888888875" calcext:value-type="float">
            <text:p>0,000004513888888888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9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95" calcext:value-type="float">
            <text:p>0,00195000000000000000</text:p>
          </table:table-cell>
          <table:table-cell table:formula="of:=[.D434]-[.D43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9" office:value-type="float" office:value="16887" calcext:value-type="float">
            <text:p>16887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95451388888889" calcext:value-type="float">
            <text:p>0,00195451388888889000</text:p>
          </table:table-cell>
          <table:table-cell table:formula="of:=[.D435]-[.D43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9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95902777777778" calcext:value-type="float">
            <text:p>0,00195902777777778000</text:p>
          </table:table-cell>
          <table:table-cell table:formula="of:=[.D436]-[.D43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9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96354166666667" calcext:value-type="float">
            <text:p>0,00196354166666667000</text:p>
          </table:table-cell>
          <table:table-cell table:formula="of:=[.D437]-[.D436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9" office:value-type="float" office:value="17004" calcext:value-type="float">
            <text:p>1700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96805555555556" calcext:value-type="float">
            <text:p>0,00196805555555556000</text:p>
          </table:table-cell>
          <table:table-cell table:formula="of:=[.D438]-[.D43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9" office:value-type="float" office:value="17043" calcext:value-type="float">
            <text:p>17043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97256944444444" calcext:value-type="float">
            <text:p>0,00197256944444444000</text:p>
          </table:table-cell>
          <table:table-cell table:formula="of:=[.D439]-[.D43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9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97708333333333" calcext:value-type="float">
            <text:p>0,00197708333333333000</text:p>
          </table:table-cell>
          <table:table-cell table:formula="of:=[.D440]-[.D43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9" office:value-type="float" office:value="17121" calcext:value-type="float">
            <text:p>17121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98159722222222" calcext:value-type="float">
            <text:p>0,00198159722222222000</text:p>
          </table:table-cell>
          <table:table-cell table:formula="of:=[.D441]-[.D44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9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98611111111111" calcext:value-type="float">
            <text:p>0,00198611111111111000</text:p>
          </table:table-cell>
          <table:table-cell table:formula="of:=[.D442]-[.D44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9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990625" calcext:value-type="float">
            <text:p>0,00199062500000000000</text:p>
          </table:table-cell>
          <table:table-cell table:formula="of:=[.D443]-[.D442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9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99513888888889" calcext:value-type="float">
            <text:p>0,00199513888888889000</text:p>
          </table:table-cell>
          <table:table-cell table:formula="of:=[.D444]-[.D44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9" office:value-type="float" office:value="17277" calcext:value-type="float">
            <text:p>17277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99965277777778" calcext:value-type="float">
            <text:p>0,00199965277777778000</text:p>
          </table:table-cell>
          <table:table-cell table:formula="of:=[.D445]-[.D44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9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00416666666667" calcext:value-type="float">
            <text:p>0,00200416666666667000</text:p>
          </table:table-cell>
          <table:table-cell table:formula="of:=[.D446]-[.D44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9" office:value-type="float" office:value="17355" calcext:value-type="float">
            <text:p>1735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00868055555556" calcext:value-type="float">
            <text:p>0,00200868055555556000</text:p>
          </table:table-cell>
          <table:table-cell table:formula="of:=[.D447]-[.D44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9" office:value-type="float" office:value="17394" calcext:value-type="float">
            <text:p>1739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01319444444444" calcext:value-type="float">
            <text:p>0,00201319444444444000</text:p>
          </table:table-cell>
          <table:table-cell table:formula="of:=[.D448]-[.D447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9" office:value-type="float" office:value="17433" calcext:value-type="float">
            <text:p>17433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01770833333333" calcext:value-type="float">
            <text:p>0,00201770833333333000</text:p>
          </table:table-cell>
          <table:table-cell table:formula="of:=[.D449]-[.D44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9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02222222222222" calcext:value-type="float">
            <text:p>0,00202222222222222000</text:p>
          </table:table-cell>
          <table:table-cell table:formula="of:=[.D450]-[.D44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9" office:value-type="float" office:value="17511" calcext:value-type="float">
            <text:p>17511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02673611111111" calcext:value-type="float">
            <text:p>0,00202673611111111000</text:p>
          </table:table-cell>
          <table:table-cell table:formula="of:=[.D451]-[.D45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9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03125" calcext:value-type="float">
            <text:p>0,00203125000000000000</text:p>
          </table:table-cell>
          <table:table-cell table:formula="of:=[.D452]-[.D45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9" office:value-type="float" office:value="17589" calcext:value-type="float">
            <text:p>17589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03576388888889" calcext:value-type="float">
            <text:p>0,00203576388888889000</text:p>
          </table:table-cell>
          <table:table-cell table:formula="of:=[.D453]-[.D452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9" office:value-type="float" office:value="17628" calcext:value-type="float">
            <text:p>1762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04027777777778" calcext:value-type="float">
            <text:p>0,00204027777777778000</text:p>
          </table:table-cell>
          <table:table-cell table:formula="of:=[.D454]-[.D45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9" office:value-type="float" office:value="17667" calcext:value-type="float">
            <text:p>17667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04479166666667" calcext:value-type="float">
            <text:p>0,00204479166666667000</text:p>
          </table:table-cell>
          <table:table-cell table:formula="of:=[.D455]-[.D45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9" office:value-type="float" office:value="17706" calcext:value-type="float">
            <text:p>1770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04930555555556" calcext:value-type="float">
            <text:p>0,00204930555555556000</text:p>
          </table:table-cell>
          <table:table-cell table:formula="of:=[.D456]-[.D45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9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05381944444444" calcext:value-type="float">
            <text:p>0,00205381944444444000</text:p>
          </table:table-cell>
          <table:table-cell table:formula="of:=[.D457]-[.D45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9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05833333333333" calcext:value-type="float">
            <text:p>0,00205833333333333000</text:p>
          </table:table-cell>
          <table:table-cell table:formula="of:=[.D458]-[.D45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9" office:value-type="float" office:value="17823" calcext:value-type="float">
            <text:p>17823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06284722222222" calcext:value-type="float">
            <text:p>0,00206284722222222000</text:p>
          </table:table-cell>
          <table:table-cell table:formula="of:=[.D459]-[.D458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9" office:value-type="float" office:value="17862" calcext:value-type="float">
            <text:p>1786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06736111111111" calcext:value-type="float">
            <text:p>0,00206736111111111000</text:p>
          </table:table-cell>
          <table:table-cell table:formula="of:=[.D460]-[.D45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9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071875" calcext:value-type="float">
            <text:p>0,00207187500000000000</text:p>
          </table:table-cell>
          <table:table-cell table:formula="of:=[.D461]-[.D46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9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07638888888889" calcext:value-type="float">
            <text:p>0,00207638888888889000</text:p>
          </table:table-cell>
          <table:table-cell table:formula="of:=[.D462]-[.D46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9" office:value-type="float" office:value="17979" calcext:value-type="float">
            <text:p>17979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08090277777778" calcext:value-type="float">
            <text:p>0,00208090277777778000</text:p>
          </table:table-cell>
          <table:table-cell table:formula="of:=[.D463]-[.D46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9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08541666666667" calcext:value-type="float">
            <text:p>0,00208541666666667000</text:p>
          </table:table-cell>
          <table:table-cell table:formula="of:=[.D464]-[.D463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9" office:value-type="float" office:value="18057" calcext:value-type="float">
            <text:p>18057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08993055555556" calcext:value-type="float">
            <text:p>0,00208993055555556000</text:p>
          </table:table-cell>
          <table:table-cell table:formula="of:=[.D465]-[.D46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9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09444444444444" calcext:value-type="float">
            <text:p>0,00209444444444444000</text:p>
          </table:table-cell>
          <table:table-cell table:formula="of:=[.D466]-[.D46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9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09895833333333" calcext:value-type="float">
            <text:p>0,00209895833333333000</text:p>
          </table:table-cell>
          <table:table-cell table:formula="of:=[.D467]-[.D46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9" office:value-type="float" office:value="18174" calcext:value-type="float">
            <text:p>1817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10347222222222" calcext:value-type="float">
            <text:p>0,00210347222222222000</text:p>
          </table:table-cell>
          <table:table-cell table:formula="of:=[.D468]-[.D46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9" office:value-type="float" office:value="18213" calcext:value-type="float">
            <text:p>18213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10798611111111" calcext:value-type="float">
            <text:p>0,00210798611111111000</text:p>
          </table:table-cell>
          <table:table-cell table:formula="of:=[.D469]-[.D468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9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1125" calcext:value-type="float">
            <text:p>0,00211250000000000000</text:p>
          </table:table-cell>
          <table:table-cell table:formula="of:=[.D470]-[.D46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9" office:value-type="float" office:value="18291" calcext:value-type="float">
            <text:p>18291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11701388888889" calcext:value-type="float">
            <text:p>0,00211701388888889000</text:p>
          </table:table-cell>
          <table:table-cell table:formula="of:=[.D471]-[.D47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9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12152777777778" calcext:value-type="float">
            <text:p>0,00212152777777778000</text:p>
          </table:table-cell>
          <table:table-cell table:formula="of:=[.D472]-[.D47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9" office:value-type="float" office:value="18369" calcext:value-type="float">
            <text:p>18369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12604166666667" calcext:value-type="float">
            <text:p>0,00212604166666667000</text:p>
          </table:table-cell>
          <table:table-cell table:formula="of:=[.D473]-[.D47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9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13055555555556" calcext:value-type="float">
            <text:p>0,00213055555555556000</text:p>
          </table:table-cell>
          <table:table-cell table:formula="of:=[.D474]-[.D47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9" office:value-type="float" office:value="18447" calcext:value-type="float">
            <text:p>18447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13506944444444" calcext:value-type="float">
            <text:p>0,00213506944444444000</text:p>
          </table:table-cell>
          <table:table-cell table:formula="of:=[.D475]-[.D474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9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13958333333333" calcext:value-type="float">
            <text:p>0,00213958333333333000</text:p>
          </table:table-cell>
          <table:table-cell table:formula="of:=[.D476]-[.D47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9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14409722222222" calcext:value-type="float">
            <text:p>0,00214409722222222000</text:p>
          </table:table-cell>
          <table:table-cell table:formula="of:=[.D477]-[.D47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9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14861111111111" calcext:value-type="float">
            <text:p>0,00214861111111111000</text:p>
          </table:table-cell>
          <table:table-cell table:formula="of:=[.D478]-[.D47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9" office:value-type="float" office:value="18603" calcext:value-type="float">
            <text:p>18603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153125" calcext:value-type="float">
            <text:p>0,00215312500000000000</text:p>
          </table:table-cell>
          <table:table-cell table:formula="of:=[.D479]-[.D47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9" office:value-type="float" office:value="18642" calcext:value-type="float">
            <text:p>1864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15763888888889" calcext:value-type="float">
            <text:p>0,00215763888888889000</text:p>
          </table:table-cell>
          <table:table-cell table:formula="of:=[.D480]-[.D479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9" office:value-type="float" office:value="18681" calcext:value-type="float">
            <text:p>18681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16215277777778" calcext:value-type="float">
            <text:p>0,00216215277777778000</text:p>
          </table:table-cell>
          <table:table-cell table:formula="of:=[.D481]-[.D48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9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16666666666667" calcext:value-type="float">
            <text:p>0,00216666666666667000</text:p>
          </table:table-cell>
          <table:table-cell table:formula="of:=[.D482]-[.D48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9" office:value-type="float" office:value="18759" calcext:value-type="float">
            <text:p>18759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17118055555556" calcext:value-type="float">
            <text:p>0,00217118055555556000</text:p>
          </table:table-cell>
          <table:table-cell table:formula="of:=[.D483]-[.D48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9" office:value-type="float" office:value="18798" calcext:value-type="float">
            <text:p>1879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17569444444444" calcext:value-type="float">
            <text:p>0,00217569444444444000</text:p>
          </table:table-cell>
          <table:table-cell table:formula="of:=[.D484]-[.D48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9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18020833333333" calcext:value-type="float">
            <text:p>0,00218020833333333000</text:p>
          </table:table-cell>
          <table:table-cell table:formula="of:=[.D485]-[.D484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9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18472222222222" calcext:value-type="float">
            <text:p>0,00218472222222222000</text:p>
          </table:table-cell>
          <table:table-cell table:formula="of:=[.D486]-[.D48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9" office:value-type="float" office:value="18915" calcext:value-type="float">
            <text:p>1891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18923611111111" calcext:value-type="float">
            <text:p>0,00218923611111111000</text:p>
          </table:table-cell>
          <table:table-cell table:formula="of:=[.D487]-[.D48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9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19375" calcext:value-type="float">
            <text:p>0,00219375000000000000</text:p>
          </table:table-cell>
          <table:table-cell table:formula="of:=[.D488]-[.D48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9" office:value-type="float" office:value="18993" calcext:value-type="float">
            <text:p>18993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19826388888889" calcext:value-type="float">
            <text:p>0,00219826388888889000</text:p>
          </table:table-cell>
          <table:table-cell table:formula="of:=[.D489]-[.D48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9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20277777777778" calcext:value-type="float">
            <text:p>0,00220277777777778000</text:p>
          </table:table-cell>
          <table:table-cell table:formula="of:=[.D490]-[.D48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9" office:value-type="float" office:value="19071" calcext:value-type="float">
            <text:p>19071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20729166666667" calcext:value-type="float">
            <text:p>0,00220729166666667000</text:p>
          </table:table-cell>
          <table:table-cell table:formula="of:=[.D491]-[.D490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9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21180555555556" calcext:value-type="float">
            <text:p>0,00221180555555556000</text:p>
          </table:table-cell>
          <table:table-cell table:formula="of:=[.D492]-[.D49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9" office:value-type="float" office:value="19149" calcext:value-type="float">
            <text:p>19149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21631944444444" calcext:value-type="float">
            <text:p>0,00221631944444444000</text:p>
          </table:table-cell>
          <table:table-cell table:formula="of:=[.D493]-[.D49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9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22083333333333" calcext:value-type="float">
            <text:p>0,00222083333333333000</text:p>
          </table:table-cell>
          <table:table-cell table:formula="of:=[.D494]-[.D49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9" office:value-type="float" office:value="19227" calcext:value-type="float">
            <text:p>19227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22534722222222" calcext:value-type="float">
            <text:p>0,00222534722222222000</text:p>
          </table:table-cell>
          <table:table-cell table:formula="of:=[.D495]-[.D49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9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22986111111111" calcext:value-type="float">
            <text:p>0,00222986111111111000</text:p>
          </table:table-cell>
          <table:table-cell table:formula="of:=[.D496]-[.D495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9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234375" calcext:value-type="float">
            <text:p>0,00223437500000000000</text:p>
          </table:table-cell>
          <table:table-cell table:formula="of:=[.D497]-[.D49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9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23888888888889" calcext:value-type="float">
            <text:p>0,00223888888888889000</text:p>
          </table:table-cell>
          <table:table-cell table:formula="of:=[.D498]-[.D49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9" office:value-type="float" office:value="19383" calcext:value-type="float">
            <text:p>19383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24340277777778" calcext:value-type="float">
            <text:p>0,00224340277777778000</text:p>
          </table:table-cell>
          <table:table-cell table:formula="of:=[.D499]-[.D49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9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24791666666667" calcext:value-type="float">
            <text:p>0,00224791666666667000</text:p>
          </table:table-cell>
          <table:table-cell table:formula="of:=[.D500]-[.D49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9" office:value-type="float" office:value="19461" calcext:value-type="float">
            <text:p>19461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25243055555556" calcext:value-type="float">
            <text:p>0,00225243055555556000</text:p>
          </table:table-cell>
          <table:table-cell table:formula="of:=[.D501]-[.D500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9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25694444444444" calcext:value-type="float">
            <text:p>0,00225694444444444000</text:p>
          </table:table-cell>
          <table:table-cell table:formula="of:=[.D502]-[.D50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9" office:value-type="float" office:value="19539" calcext:value-type="float">
            <text:p>19539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26145833333333" calcext:value-type="float">
            <text:p>0,00226145833333333000</text:p>
          </table:table-cell>
          <table:table-cell table:formula="of:=[.D503]-[.D50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9" office:value-type="float" office:value="19578" calcext:value-type="float">
            <text:p>1957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26597222222222" calcext:value-type="float">
            <text:p>0,00226597222222222000</text:p>
          </table:table-cell>
          <table:table-cell table:formula="of:=[.D504]-[.D50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9" office:value-type="float" office:value="19617" calcext:value-type="float">
            <text:p>19617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27048611111111" calcext:value-type="float">
            <text:p>0,00227048611111111000</text:p>
          </table:table-cell>
          <table:table-cell table:formula="of:=[.D505]-[.D50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9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275" calcext:value-type="float">
            <text:p>0,00227500000000000000</text:p>
          </table:table-cell>
          <table:table-cell table:formula="of:=[.D506]-[.D50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9" office:value-type="float" office:value="19695" calcext:value-type="float">
            <text:p>1969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27951388888889" calcext:value-type="float">
            <text:p>0,00227951388888889000</text:p>
          </table:table-cell>
          <table:table-cell table:formula="of:=[.D507]-[.D506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9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28402777777778" calcext:value-type="float">
            <text:p>0,00228402777777778000</text:p>
          </table:table-cell>
          <table:table-cell table:formula="of:=[.D508]-[.D50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9" office:value-type="float" office:value="19773" calcext:value-type="float">
            <text:p>19773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28854166666667" calcext:value-type="float">
            <text:p>0,00228854166666667000</text:p>
          </table:table-cell>
          <table:table-cell table:formula="of:=[.D509]-[.D50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9" office:value-type="float" office:value="19812" calcext:value-type="float">
            <text:p>1981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29305555555556" calcext:value-type="float">
            <text:p>0,00229305555555556000</text:p>
          </table:table-cell>
          <table:table-cell table:formula="of:=[.D510]-[.D50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9" office:value-type="float" office:value="19851" calcext:value-type="float">
            <text:p>19851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29756944444444" calcext:value-type="float">
            <text:p>0,00229756944444444000</text:p>
          </table:table-cell>
          <table:table-cell table:formula="of:=[.D511]-[.D51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9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30208333333333" calcext:value-type="float">
            <text:p>0,00230208333333333000</text:p>
          </table:table-cell>
          <table:table-cell table:formula="of:=[.D512]-[.D511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9" office:value-type="float" office:value="19929" calcext:value-type="float">
            <text:p>19929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30659722222222" calcext:value-type="float">
            <text:p>0,00230659722222222000</text:p>
          </table:table-cell>
          <table:table-cell table:formula="of:=[.D513]-[.D51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9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31111111111111" calcext:value-type="float">
            <text:p>0,00231111111111111000</text:p>
          </table:table-cell>
          <table:table-cell table:formula="of:=[.D514]-[.D51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9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315625" calcext:value-type="float">
            <text:p>0,00231562500000000000</text:p>
          </table:table-cell>
          <table:table-cell table:formula="of:=[.D515]-[.D51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9" office:value-type="float" office:value="20046" calcext:value-type="float">
            <text:p>2004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32013888888889" calcext:value-type="float">
            <text:p>0,00232013888888889000</text:p>
          </table:table-cell>
          <table:table-cell table:formula="of:=[.D516]-[.D51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9" office:value-type="float" office:value="20085" calcext:value-type="float">
            <text:p>2008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32465277777778" calcext:value-type="float">
            <text:p>0,00232465277777778000</text:p>
          </table:table-cell>
          <table:table-cell table:formula="of:=[.D517]-[.D516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9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32916666666667" calcext:value-type="float">
            <text:p>0,00232916666666667000</text:p>
          </table:table-cell>
          <table:table-cell table:formula="of:=[.D518]-[.D51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9" office:value-type="float" office:value="20163" calcext:value-type="float">
            <text:p>20163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33368055555556" calcext:value-type="float">
            <text:p>0,00233368055555556000</text:p>
          </table:table-cell>
          <table:table-cell table:formula="of:=[.D519]-[.D51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9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33819444444444" calcext:value-type="float">
            <text:p>0,00233819444444444000</text:p>
          </table:table-cell>
          <table:table-cell table:formula="of:=[.D520]-[.D51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9" office:value-type="float" office:value="20241" calcext:value-type="float">
            <text:p>20241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34270833333333" calcext:value-type="float">
            <text:p>0,00234270833333333000</text:p>
          </table:table-cell>
          <table:table-cell table:formula="of:=[.D521]-[.D52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9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34722222222222" calcext:value-type="float">
            <text:p>0,00234722222222222000</text:p>
          </table:table-cell>
          <table:table-cell table:formula="of:=[.D522]-[.D52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9" office:value-type="float" office:value="20319" calcext:value-type="float">
            <text:p>20319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35173611111111" calcext:value-type="float">
            <text:p>0,00235173611111111000</text:p>
          </table:table-cell>
          <table:table-cell table:formula="of:=[.D523]-[.D522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9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35625" calcext:value-type="float">
            <text:p>0,00235625000000000000</text:p>
          </table:table-cell>
          <table:table-cell table:formula="of:=[.D524]-[.D52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9" office:value-type="float" office:value="20397" calcext:value-type="float">
            <text:p>20397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36076388888889" calcext:value-type="float">
            <text:p>0,00236076388888889000</text:p>
          </table:table-cell>
          <table:table-cell table:formula="of:=[.D525]-[.D52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9" office:value-type="float" office:value="20436" calcext:value-type="float">
            <text:p>2043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36527777777778" calcext:value-type="float">
            <text:p>0,00236527777777778000</text:p>
          </table:table-cell>
          <table:table-cell table:formula="of:=[.D526]-[.D52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9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36979166666667" calcext:value-type="float">
            <text:p>0,00236979166666667000</text:p>
          </table:table-cell>
          <table:table-cell table:formula="of:=[.D527]-[.D52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9" office:value-type="float" office:value="20514" calcext:value-type="float">
            <text:p>2051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37430555555556" calcext:value-type="float">
            <text:p>0,00237430555555556000</text:p>
          </table:table-cell>
          <table:table-cell table:formula="of:=[.D528]-[.D527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9" office:value-type="float" office:value="20553" calcext:value-type="float">
            <text:p>20553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37881944444444" calcext:value-type="float">
            <text:p>0,00237881944444444000</text:p>
          </table:table-cell>
          <table:table-cell table:formula="of:=[.D529]-[.D52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9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38333333333333" calcext:value-type="float">
            <text:p>0,00238333333333333000</text:p>
          </table:table-cell>
          <table:table-cell table:formula="of:=[.D530]-[.D52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9" office:value-type="float" office:value="20631" calcext:value-type="float">
            <text:p>20631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38784722222222" calcext:value-type="float">
            <text:p>0,00238784722222222000</text:p>
          </table:table-cell>
          <table:table-cell table:formula="of:=[.D531]-[.D53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9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39236111111111" calcext:value-type="float">
            <text:p>0,00239236111111111000</text:p>
          </table:table-cell>
          <table:table-cell table:formula="of:=[.D532]-[.D53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9" office:value-type="float" office:value="20709" calcext:value-type="float">
            <text:p>20709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396875" calcext:value-type="float">
            <text:p>0,00239687500000000000</text:p>
          </table:table-cell>
          <table:table-cell table:formula="of:=[.D533]-[.D53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9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40138888888889" calcext:value-type="float">
            <text:p>0,00240138888888889000</text:p>
          </table:table-cell>
          <table:table-cell table:formula="of:=[.D534]-[.D533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9" office:value-type="float" office:value="20787" calcext:value-type="float">
            <text:p>20787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40590277777778" calcext:value-type="float">
            <text:p>0,00240590277777778000</text:p>
          </table:table-cell>
          <table:table-cell table:formula="of:=[.D535]-[.D53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9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41041666666667" calcext:value-type="float">
            <text:p>0,00241041666666667000</text:p>
          </table:table-cell>
          <table:table-cell table:formula="of:=[.D536]-[.D53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9" office:value-type="float" office:value="20865" calcext:value-type="float">
            <text:p>2086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41493055555556" calcext:value-type="float">
            <text:p>0,00241493055555556000</text:p>
          </table:table-cell>
          <table:table-cell table:formula="of:=[.D537]-[.D53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9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41944444444444" calcext:value-type="float">
            <text:p>0,00241944444444444000</text:p>
          </table:table-cell>
          <table:table-cell table:formula="of:=[.D538]-[.D53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9" office:value-type="float" office:value="20943" calcext:value-type="float">
            <text:p>20943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42395833333333" calcext:value-type="float">
            <text:p>0,00242395833333333000</text:p>
          </table:table-cell>
          <table:table-cell table:formula="of:=[.D539]-[.D538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9" office:value-type="float" office:value="20982" calcext:value-type="float">
            <text:p>2098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42847222222222" calcext:value-type="float">
            <text:p>0,00242847222222222000</text:p>
          </table:table-cell>
          <table:table-cell table:formula="of:=[.D540]-[.D53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9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43298611111111" calcext:value-type="float">
            <text:p>0,00243298611111111000</text:p>
          </table:table-cell>
          <table:table-cell table:formula="of:=[.D541]-[.D54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9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4375" calcext:value-type="float">
            <text:p>0,00243750000000000000</text:p>
          </table:table-cell>
          <table:table-cell table:formula="of:=[.D542]-[.D54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9" office:value-type="float" office:value="21099" calcext:value-type="float">
            <text:p>21099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44201388888889" calcext:value-type="float">
            <text:p>0,00244201388888889000</text:p>
          </table:table-cell>
          <table:table-cell table:formula="of:=[.D543]-[.D54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9" office:value-type="float" office:value="21138" calcext:value-type="float">
            <text:p>2113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44652777777778" calcext:value-type="float">
            <text:p>0,00244652777777778000</text:p>
          </table:table-cell>
          <table:table-cell table:formula="of:=[.D544]-[.D543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9" office:value-type="float" office:value="21177" calcext:value-type="float">
            <text:p>21177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45104166666667" calcext:value-type="float">
            <text:p>0,00245104166666667000</text:p>
          </table:table-cell>
          <table:table-cell table:formula="of:=[.D545]-[.D54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9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45555555555556" calcext:value-type="float">
            <text:p>0,00245555555555556000</text:p>
          </table:table-cell>
          <table:table-cell table:formula="of:=[.D546]-[.D54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9" office:value-type="float" office:value="21255" calcext:value-type="float">
            <text:p>2125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46006944444444" calcext:value-type="float">
            <text:p>0,00246006944444444000</text:p>
          </table:table-cell>
          <table:table-cell table:formula="of:=[.D547]-[.D54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9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46458333333333" calcext:value-type="float">
            <text:p>0,00246458333333333000</text:p>
          </table:table-cell>
          <table:table-cell table:formula="of:=[.D548]-[.D54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9" office:value-type="float" office:value="21333" calcext:value-type="float">
            <text:p>21333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46909722222222" calcext:value-type="float">
            <text:p>0,00246909722222222000</text:p>
          </table:table-cell>
          <table:table-cell table:formula="of:=[.D549]-[.D54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9" office:value-type="float" office:value="21372" calcext:value-type="float">
            <text:p>2137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47361111111111" calcext:value-type="float">
            <text:p>0,00247361111111111000</text:p>
          </table:table-cell>
          <table:table-cell table:formula="of:=[.D550]-[.D549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9" office:value-type="float" office:value="21411" calcext:value-type="float">
            <text:p>21411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478125" calcext:value-type="float">
            <text:p>0,00247812500000000000</text:p>
          </table:table-cell>
          <table:table-cell table:formula="of:=[.D551]-[.D55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9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48263888888889" calcext:value-type="float">
            <text:p>0,00248263888888889000</text:p>
          </table:table-cell>
          <table:table-cell table:formula="of:=[.D552]-[.D55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9" office:value-type="float" office:value="21489" calcext:value-type="float">
            <text:p>21489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48715277777778" calcext:value-type="float">
            <text:p>0,00248715277777778000</text:p>
          </table:table-cell>
          <table:table-cell table:formula="of:=[.D553]-[.D55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9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49166666666667" calcext:value-type="float">
            <text:p>0,00249166666666667000</text:p>
          </table:table-cell>
          <table:table-cell table:formula="of:=[.D554]-[.D55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9" office:value-type="float" office:value="21567" calcext:value-type="float">
            <text:p>21567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49618055555556" calcext:value-type="float">
            <text:p>0,00249618055555556000</text:p>
          </table:table-cell>
          <table:table-cell table:formula="of:=[.D555]-[.D554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9" office:value-type="float" office:value="21606" calcext:value-type="float">
            <text:p>2160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50069444444444" calcext:value-type="float">
            <text:p>0,00250069444444444000</text:p>
          </table:table-cell>
          <table:table-cell table:formula="of:=[.D556]-[.D55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9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50520833333333" calcext:value-type="float">
            <text:p>0,00250520833333333000</text:p>
          </table:table-cell>
          <table:table-cell table:formula="of:=[.D557]-[.D55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9" office:value-type="float" office:value="21684" calcext:value-type="float">
            <text:p>2168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50972222222222" calcext:value-type="float">
            <text:p>0,00250972222222222000</text:p>
          </table:table-cell>
          <table:table-cell table:formula="of:=[.D558]-[.D55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9" office:value-type="float" office:value="21723" calcext:value-type="float">
            <text:p>21723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51423611111111" calcext:value-type="float">
            <text:p>0,00251423611111111000</text:p>
          </table:table-cell>
          <table:table-cell table:formula="of:=[.D559]-[.D55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9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51875" calcext:value-type="float">
            <text:p>0,00251875000000000000</text:p>
          </table:table-cell>
          <table:table-cell table:formula="of:=[.D560]-[.D559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9" office:value-type="float" office:value="21801" calcext:value-type="float">
            <text:p>21801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52326388888889" calcext:value-type="float">
            <text:p>0,00252326388888889000</text:p>
          </table:table-cell>
          <table:table-cell table:formula="of:=[.D561]-[.D56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9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52777777777778" calcext:value-type="float">
            <text:p>0,00252777777777778000</text:p>
          </table:table-cell>
          <table:table-cell table:formula="of:=[.D562]-[.D56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9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53229166666667" calcext:value-type="float">
            <text:p>0,00253229166666667000</text:p>
          </table:table-cell>
          <table:table-cell table:formula="of:=[.D563]-[.D56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9" office:value-type="float" office:value="21918" calcext:value-type="float">
            <text:p>2191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53680555555556" calcext:value-type="float">
            <text:p>0,00253680555555556000</text:p>
          </table:table-cell>
          <table:table-cell table:formula="of:=[.D564]-[.D56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9" office:value-type="float" office:value="21957" calcext:value-type="float">
            <text:p>21957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54131944444444" calcext:value-type="float">
            <text:p>0,00254131944444444000</text:p>
          </table:table-cell>
          <table:table-cell table:formula="of:=[.D565]-[.D56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9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54583333333333" calcext:value-type="float">
            <text:p>0,00254583333333333000</text:p>
          </table:table-cell>
          <table:table-cell table:formula="of:=[.D566]-[.D565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9" office:value-type="float" office:value="22035" calcext:value-type="float">
            <text:p>2203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55034722222222" calcext:value-type="float">
            <text:p>0,00255034722222222000</text:p>
          </table:table-cell>
          <table:table-cell table:formula="of:=[.D567]-[.D56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9" office:value-type="float" office:value="22074" calcext:value-type="float">
            <text:p>2207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55486111111111" calcext:value-type="float">
            <text:p>0,00255486111111111000</text:p>
          </table:table-cell>
          <table:table-cell table:formula="of:=[.D568]-[.D56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9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559375" calcext:value-type="float">
            <text:p>0,00255937500000000000</text:p>
          </table:table-cell>
          <table:table-cell table:formula="of:=[.D569]-[.D56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9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56388888888889" calcext:value-type="float">
            <text:p>0,00256388888888889000</text:p>
          </table:table-cell>
          <table:table-cell table:formula="of:=[.D570]-[.D56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9" office:value-type="float" office:value="22191" calcext:value-type="float">
            <text:p>22191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56840277777778" calcext:value-type="float">
            <text:p>0,00256840277777778000</text:p>
          </table:table-cell>
          <table:table-cell table:formula="of:=[.D571]-[.D570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9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57291666666667" calcext:value-type="float">
            <text:p>0,00257291666666667000</text:p>
          </table:table-cell>
          <table:table-cell table:formula="of:=[.D572]-[.D57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9" office:value-type="float" office:value="22269" calcext:value-type="float">
            <text:p>22269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57743055555556" calcext:value-type="float">
            <text:p>0,00257743055555556000</text:p>
          </table:table-cell>
          <table:table-cell table:formula="of:=[.D573]-[.D57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9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58194444444444" calcext:value-type="float">
            <text:p>0,00258194444444444000</text:p>
          </table:table-cell>
          <table:table-cell table:formula="of:=[.D574]-[.D57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9" office:value-type="float" office:value="22347" calcext:value-type="float">
            <text:p>22347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58645833333333" calcext:value-type="float">
            <text:p>0,00258645833333333000</text:p>
          </table:table-cell>
          <table:table-cell table:formula="of:=[.D575]-[.D57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9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59097222222222" calcext:value-type="float">
            <text:p>0,00259097222222222000</text:p>
          </table:table-cell>
          <table:table-cell table:formula="of:=[.D576]-[.D575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9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59548611111111" calcext:value-type="float">
            <text:p>0,00259548611111111000</text:p>
          </table:table-cell>
          <table:table-cell table:formula="of:=[.D577]-[.D57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9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6" calcext:value-type="float">
            <text:p>0,00260000000000000000</text:p>
          </table:table-cell>
          <table:table-cell table:formula="of:=[.D578]-[.D57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9" office:value-type="float" office:value="22503" calcext:value-type="float">
            <text:p>22503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60451388888889" calcext:value-type="float">
            <text:p>0,00260451388888889000</text:p>
          </table:table-cell>
          <table:table-cell table:formula="of:=[.D579]-[.D57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9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60902777777778" calcext:value-type="float">
            <text:p>0,00260902777777778000</text:p>
          </table:table-cell>
          <table:table-cell table:formula="of:=[.D580]-[.D57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9" office:value-type="float" office:value="22581" calcext:value-type="float">
            <text:p>22581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61354166666667" calcext:value-type="float">
            <text:p>0,00261354166666667000</text:p>
          </table:table-cell>
          <table:table-cell table:formula="of:=[.D581]-[.D58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9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61805555555556" calcext:value-type="float">
            <text:p>0,00261805555555556000</text:p>
          </table:table-cell>
          <table:table-cell table:formula="of:=[.D582]-[.D581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9" office:value-type="float" office:value="22659" calcext:value-type="float">
            <text:p>22659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62256944444444" calcext:value-type="float">
            <text:p>0,00262256944444444000</text:p>
          </table:table-cell>
          <table:table-cell table:formula="of:=[.D583]-[.D58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9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62708333333333" calcext:value-type="float">
            <text:p>0,00262708333333333000</text:p>
          </table:table-cell>
          <table:table-cell table:formula="of:=[.D584]-[.D58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9" office:value-type="float" office:value="22737" calcext:value-type="float">
            <text:p>22737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63159722222222" calcext:value-type="float">
            <text:p>0,00263159722222222000</text:p>
          </table:table-cell>
          <table:table-cell table:formula="of:=[.D585]-[.D58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9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63611111111111" calcext:value-type="float">
            <text:p>0,00263611111111111000</text:p>
          </table:table-cell>
          <table:table-cell table:formula="of:=[.D586]-[.D58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9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640625" calcext:value-type="float">
            <text:p>0,00264062500000000000</text:p>
          </table:table-cell>
          <table:table-cell table:formula="of:=[.D587]-[.D586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9" office:value-type="float" office:value="22854" calcext:value-type="float">
            <text:p>2285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64513888888889" calcext:value-type="float">
            <text:p>0,00264513888888889000</text:p>
          </table:table-cell>
          <table:table-cell table:formula="of:=[.D588]-[.D587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9" office:value-type="float" office:value="22893" calcext:value-type="float">
            <text:p>22893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64965277777778" calcext:value-type="float">
            <text:p>0,00264965277777778000</text:p>
          </table:table-cell>
          <table:table-cell table:formula="of:=[.D589]-[.D58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9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65416666666667" calcext:value-type="float">
            <text:p>0,00265416666666667000</text:p>
          </table:table-cell>
          <table:table-cell table:formula="of:=[.D590]-[.D58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9" office:value-type="float" office:value="22971" calcext:value-type="float">
            <text:p>22971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65868055555556" calcext:value-type="float">
            <text:p>0,00265868055555556000</text:p>
          </table:table-cell>
          <table:table-cell table:formula="of:=[.D591]-[.D59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9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66319444444444" calcext:value-type="float">
            <text:p>0,00266319444444444000</text:p>
          </table:table-cell>
          <table:table-cell table:formula="of:=[.D592]-[.D591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9" office:value-type="float" office:value="23049" calcext:value-type="float">
            <text:p>23049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66770833333333" calcext:value-type="float">
            <text:p>0,00266770833333333000</text:p>
          </table:table-cell>
          <table:table-cell table:formula="of:=[.D593]-[.D59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9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67222222222222" calcext:value-type="float">
            <text:p>0,00267222222222222000</text:p>
          </table:table-cell>
          <table:table-cell table:formula="of:=[.D594]-[.D59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9" office:value-type="float" office:value="23127" calcext:value-type="float">
            <text:p>23127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67673611111111" calcext:value-type="float">
            <text:p>0,00267673611111111000</text:p>
          </table:table-cell>
          <table:table-cell table:formula="of:=[.D595]-[.D59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9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68125" calcext:value-type="float">
            <text:p>0,00268125000000000000</text:p>
          </table:table-cell>
          <table:table-cell table:formula="of:=[.D596]-[.D59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9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68576388888889" calcext:value-type="float">
            <text:p>0,00268576388888889000</text:p>
          </table:table-cell>
          <table:table-cell table:formula="of:=[.D597]-[.D59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9" office:value-type="float" office:value="23244" calcext:value-type="float">
            <text:p>2324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69027777777778" calcext:value-type="float">
            <text:p>0,00269027777777778000</text:p>
          </table:table-cell>
          <table:table-cell table:formula="of:=[.D598]-[.D597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9" office:value-type="float" office:value="23283" calcext:value-type="float">
            <text:p>23283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69479166666667" calcext:value-type="float">
            <text:p>0,00269479166666667000</text:p>
          </table:table-cell>
          <table:table-cell table:formula="of:=[.D599]-[.D59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9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69930555555556" calcext:value-type="float">
            <text:p>0,00269930555555556000</text:p>
          </table:table-cell>
          <table:table-cell table:formula="of:=[.D600]-[.D59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9" office:value-type="float" office:value="23361" calcext:value-type="float">
            <text:p>23361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70381944444444" calcext:value-type="float">
            <text:p>0,00270381944444444000</text:p>
          </table:table-cell>
          <table:table-cell table:formula="of:=[.D601]-[.D60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9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70833333333333" calcext:value-type="float">
            <text:p>0,00270833333333333000</text:p>
          </table:table-cell>
          <table:table-cell table:formula="of:=[.D602]-[.D60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9" office:value-type="float" office:value="23439" calcext:value-type="float">
            <text:p>23439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71284722222222" calcext:value-type="float">
            <text:p>0,00271284722222222000</text:p>
          </table:table-cell>
          <table:table-cell table:formula="of:=[.D603]-[.D602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9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71736111111111" calcext:value-type="float">
            <text:p>0,00271736111111111000</text:p>
          </table:table-cell>
          <table:table-cell table:formula="of:=[.D604]-[.D603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9" office:value-type="float" office:value="23517" calcext:value-type="float">
            <text:p>23517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721875" calcext:value-type="float">
            <text:p>0,00272187500000000000</text:p>
          </table:table-cell>
          <table:table-cell table:formula="of:=[.D605]-[.D60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9" office:value-type="float" office:value="23556" calcext:value-type="float">
            <text:p>2355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72638888888889" calcext:value-type="float">
            <text:p>0,00272638888888889000</text:p>
          </table:table-cell>
          <table:table-cell table:formula="of:=[.D606]-[.D60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9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73090277777778" calcext:value-type="float">
            <text:p>0,00273090277777778000</text:p>
          </table:table-cell>
          <table:table-cell table:formula="of:=[.D607]-[.D606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9" office:value-type="float" office:value="23634" calcext:value-type="float">
            <text:p>2363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73541666666667" calcext:value-type="float">
            <text:p>0,00273541666666667000</text:p>
          </table:table-cell>
          <table:table-cell table:formula="of:=[.D608]-[.D607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9" office:value-type="float" office:value="23673" calcext:value-type="float">
            <text:p>23673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73993055555556" calcext:value-type="float">
            <text:p>0,00273993055555556000</text:p>
          </table:table-cell>
          <table:table-cell table:formula="of:=[.D609]-[.D608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9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74444444444444" calcext:value-type="float">
            <text:p>0,00274444444444444000</text:p>
          </table:table-cell>
          <table:table-cell table:formula="of:=[.D610]-[.D609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9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74895833333333" calcext:value-type="float">
            <text:p>0,00274895833333333000</text:p>
          </table:table-cell>
          <table:table-cell table:formula="of:=[.D611]-[.D610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9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75347222222222" calcext:value-type="float">
            <text:p>0,00275347222222222000</text:p>
          </table:table-cell>
          <table:table-cell table:formula="of:=[.D612]-[.D611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9" office:value-type="float" office:value="23829" calcext:value-type="float">
            <text:p>23829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75798611111111" calcext:value-type="float">
            <text:p>0,00275798611111111000</text:p>
          </table:table-cell>
          <table:table-cell table:formula="of:=[.D613]-[.D612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9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7625" calcext:value-type="float">
            <text:p>0,00276250000000000000</text:p>
          </table:table-cell>
          <table:table-cell table:formula="of:=[.D614]-[.D613]" office:value-type="float" office:value="0.00000451388888888854" calcext:value-type="float">
            <text:p>0,0000045138888888885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9" office:value-type="float" office:value="23907" calcext:value-type="float">
            <text:p>23907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76701388888889" calcext:value-type="float">
            <text:p>0,00276701388888889000</text:p>
          </table:table-cell>
          <table:table-cell table:formula="of:=[.D615]-[.D614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9" office:value-type="float" office:value="23946" calcext:value-type="float">
            <text:p>2394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77152777777778" calcext:value-type="float">
            <text:p>0,00277152777777778000</text:p>
          </table:table-cell>
          <table:table-cell table:formula="of:=[.D616]-[.D615]" office:value-type="float" office:value="0.00000451388888888897" calcext:value-type="float">
            <text:p>0,0000045138888888889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9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77604166666667" calcext:value-type="float">
            <text:p>0,00277604166666667000</text:p>
          </table:table-cell>
          <table:table-cell table:formula="of:=#REF!-[.D616]" office:value-type="string" office:string-value="" calcext:value-type="error">
            <text:p>#REF!</text:p>
          </table:table-cell>
        </table:table-row>
        <table:table-row table:style-name="ro1" table:number-rows-repeated="10479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4:14.073539474</meta:creation-date>
    <dc:date>2026-05-17T17:34:22.340448429</dc:date>
    <meta:editing-duration>PT9S</meta:editing-duration>
    <meta:editing-cycles>1</meta:editing-cycles>
    <meta:document-statistic meta:table-count="1" meta:cell-count="3080" meta:object-count="0"/>
    <meta:generator>LibreOffice/24.2.7.2$Linux_X86_64 LibreOffice_project/420$Build-2</meta:generator>
  </office:meta>
</office:document-meta>
</file>