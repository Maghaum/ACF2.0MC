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4cm"/>
    </style:style>
    <style:style style:name="co3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62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1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62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717592592592593" calcext:value-type="float">
            <text:p>0,00000717592592592593</text:p>
          </table:table-cell>
          <table:table-cell table:formula="of:=[.D3]-[.D2]" office:value-type="float" office:value="0.00000717592592592593" calcext:value-type="float">
            <text:p>0,00000717592592592593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62" office:value-type="float" office:value="124" calcext:value-type="float">
            <text:p>124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43518518518519" calcext:value-type="float">
            <text:p>0,00001435185185185190</text:p>
          </table:table-cell>
          <table:table-cell table:formula="of:=[.D4]-[.D3]" office:value-type="float" office:value="0.00000717592592592593" calcext:value-type="float">
            <text:p>0,00000717592592592593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62" office:value-type="float" office:value="186" calcext:value-type="float">
            <text:p>186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15277777777778" calcext:value-type="float">
            <text:p>0,00002152777777777780</text:p>
          </table:table-cell>
          <table:table-cell table:formula="of:=[.D5]-[.D4]" office:value-type="float" office:value="0.00000717592592592593" calcext:value-type="float">
            <text:p>0,00000717592592592593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62" office:value-type="float" office:value="248" calcext:value-type="float">
            <text:p>248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287037037037037" calcext:value-type="float">
            <text:p>0,00002870370370370370</text:p>
          </table:table-cell>
          <table:table-cell table:formula="of:=[.D6]-[.D5]" office:value-type="float" office:value="0.00000717592592592593" calcext:value-type="float">
            <text:p>0,00000717592592592593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62" office:value-type="float" office:value="310" calcext:value-type="float">
            <text:p>31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358796296296296" calcext:value-type="float">
            <text:p>0,00003587962962962960</text:p>
          </table:table-cell>
          <table:table-cell table:formula="of:=[.D7]-[.D6]" office:value-type="float" office:value="0.00000717592592592592" calcext:value-type="float">
            <text:p>0,00000717592592592592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62" office:value-type="float" office:value="372" calcext:value-type="float">
            <text:p>372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430555555555556" calcext:value-type="float">
            <text:p>0,00004305555555555560</text:p>
          </table:table-cell>
          <table:table-cell table:formula="of:=[.D8]-[.D7]" office:value-type="float" office:value="0.00000717592592592593" calcext:value-type="float">
            <text:p>0,00000717592592592593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62" office:value-type="float" office:value="434" calcext:value-type="float">
            <text:p>434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502314814814815" calcext:value-type="float">
            <text:p>0,00005023148148148150</text:p>
          </table:table-cell>
          <table:table-cell table:formula="of:=[.D9]-[.D8]" office:value-type="float" office:value="0.00000717592592592592" calcext:value-type="float">
            <text:p>0,00000717592592592592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62" office:value-type="float" office:value="496" calcext:value-type="float">
            <text:p>496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574074074074074" calcext:value-type="float">
            <text:p>0,00005740740740740740</text:p>
          </table:table-cell>
          <table:table-cell table:formula="of:=[.D10]-[.D9]" office:value-type="float" office:value="0.00000717592592592593" calcext:value-type="float">
            <text:p>0,00000717592592592593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62" office:value-type="float" office:value="558" calcext:value-type="float">
            <text:p>558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645833333333333" calcext:value-type="float">
            <text:p>0,00006458333333333330</text:p>
          </table:table-cell>
          <table:table-cell table:formula="of:=[.D11]-[.D10]" office:value-type="float" office:value="0.00000717592592592592" calcext:value-type="float">
            <text:p>0,00000717592592592592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62" office:value-type="float" office:value="620" calcext:value-type="float">
            <text:p>62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717592592592593" calcext:value-type="float">
            <text:p>0,00007175925925925930</text:p>
          </table:table-cell>
          <table:table-cell table:formula="of:=[.D12]-[.D11]" office:value-type="float" office:value="0.00000717592592592592" calcext:value-type="float">
            <text:p>0,00000717592592592592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62" office:value-type="float" office:value="682" calcext:value-type="float">
            <text:p>682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789351851851852" calcext:value-type="float">
            <text:p>0,00007893518518518520</text:p>
          </table:table-cell>
          <table:table-cell table:formula="of:=[.D13]-[.D12]" office:value-type="float" office:value="0.00000717592592592592" calcext:value-type="float">
            <text:p>0,00000717592592592592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62" office:value-type="float" office:value="744" calcext:value-type="float">
            <text:p>744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861111111111111" calcext:value-type="float">
            <text:p>0,00008611111111111110</text:p>
          </table:table-cell>
          <table:table-cell table:formula="of:=[.D14]-[.D13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62" office:value-type="float" office:value="806" calcext:value-type="float">
            <text:p>806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93287037037037" calcext:value-type="float">
            <text:p>0,00009328703703703700</text:p>
          </table:table-cell>
          <table:table-cell table:formula="of:=[.D15]-[.D14]" office:value-type="float" office:value="0.00000717592592592592" calcext:value-type="float">
            <text:p>0,00000717592592592592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62" office:value-type="float" office:value="868" calcext:value-type="float">
            <text:p>868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00462962962963" calcext:value-type="float">
            <text:p>0,00010046296296296300</text:p>
          </table:table-cell>
          <table:table-cell table:formula="of:=[.D16]-[.D15]" office:value-type="float" office:value="0.00000717592592592592" calcext:value-type="float">
            <text:p>0,00000717592592592592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62" office:value-type="float" office:value="930" calcext:value-type="float">
            <text:p>93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07638888888889" calcext:value-type="float">
            <text:p>0,00010763888888888900</text:p>
          </table:table-cell>
          <table:table-cell table:formula="of:=[.D17]-[.D16]" office:value-type="float" office:value="0.00000717592592592592" calcext:value-type="float">
            <text:p>0,00000717592592592592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62" office:value-type="float" office:value="992" calcext:value-type="float">
            <text:p>992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14814814814815" calcext:value-type="float">
            <text:p>0,00011481481481481500</text:p>
          </table:table-cell>
          <table:table-cell table:formula="of:=[.D18]-[.D17]" office:value-type="float" office:value="0.00000717592592592592" calcext:value-type="float">
            <text:p>0,00000717592592592592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62" office:value-type="float" office:value="1054" calcext:value-type="float">
            <text:p>1054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21990740740741" calcext:value-type="float">
            <text:p>0,00012199074074074100</text:p>
          </table:table-cell>
          <table:table-cell table:formula="of:=[.D19]-[.D18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62" office:value-type="float" office:value="1116" calcext:value-type="float">
            <text:p>1116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29166666666667" calcext:value-type="float">
            <text:p>0,00012916666666666700</text:p>
          </table:table-cell>
          <table:table-cell table:formula="of:=[.D20]-[.D19]" office:value-type="float" office:value="0.00000717592592592591" calcext:value-type="float">
            <text:p>0,00000717592592592591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62" office:value-type="float" office:value="1178" calcext:value-type="float">
            <text:p>1178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36342592592593" calcext:value-type="float">
            <text:p>0,00013634259259259300</text:p>
          </table:table-cell>
          <table:table-cell table:formula="of:=[.D21]-[.D20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62" office:value-type="float" office:value="1240" calcext:value-type="float">
            <text:p>124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43518518518519" calcext:value-type="float">
            <text:p>0,00014351851851851900</text:p>
          </table:table-cell>
          <table:table-cell table:formula="of:=[.D22]-[.D21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62" office:value-type="float" office:value="1302" calcext:value-type="float">
            <text:p>1302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50694444444444" calcext:value-type="float">
            <text:p>0,00015069444444444400</text:p>
          </table:table-cell>
          <table:table-cell table:formula="of:=[.D23]-[.D22]" office:value-type="float" office:value="0.00000717592592592591" calcext:value-type="float">
            <text:p>0,00000717592592592591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62" office:value-type="float" office:value="1364" calcext:value-type="float">
            <text:p>1364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5787037037037" calcext:value-type="float">
            <text:p>0,00015787037037037000</text:p>
          </table:table-cell>
          <table:table-cell table:formula="of:=[.D24]-[.D23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62" office:value-type="float" office:value="1426" calcext:value-type="float">
            <text:p>1426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65046296296296" calcext:value-type="float">
            <text:p>0,00016504629629629600</text:p>
          </table:table-cell>
          <table:table-cell table:formula="of:=[.D25]-[.D24]" office:value-type="float" office:value="0.00000717592592592591" calcext:value-type="float">
            <text:p>0,00000717592592592591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62" office:value-type="float" office:value="1488" calcext:value-type="float">
            <text:p>1488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72222222222222" calcext:value-type="float">
            <text:p>0,00017222222222222200</text:p>
          </table:table-cell>
          <table:table-cell table:formula="of:=[.D26]-[.D25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62" office:value-type="float" office:value="1550" calcext:value-type="float">
            <text:p>15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79398148148148" calcext:value-type="float">
            <text:p>0,00017939814814814800</text:p>
          </table:table-cell>
          <table:table-cell table:formula="of:=[.D27]-[.D26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62" office:value-type="float" office:value="1612" calcext:value-type="float">
            <text:p>1612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86574074074074" calcext:value-type="float">
            <text:p>0,00018657407407407400</text:p>
          </table:table-cell>
          <table:table-cell table:formula="of:=[.D28]-[.D27]" office:value-type="float" office:value="0.00000717592592592591" calcext:value-type="float">
            <text:p>0,00000717592592592591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62" office:value-type="float" office:value="1674" calcext:value-type="float">
            <text:p>1674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9375" calcext:value-type="float">
            <text:p>0,00019375000000000000</text:p>
          </table:table-cell>
          <table:table-cell table:formula="of:=[.D29]-[.D28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62" office:value-type="float" office:value="1736" calcext:value-type="float">
            <text:p>1736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00925925925926" calcext:value-type="float">
            <text:p>0,00020092592592592600</text:p>
          </table:table-cell>
          <table:table-cell table:formula="of:=[.D30]-[.D29]" office:value-type="float" office:value="0.00000717592592592591" calcext:value-type="float">
            <text:p>0,00000717592592592591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62" office:value-type="float" office:value="1798" calcext:value-type="float">
            <text:p>1798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08101851851852" calcext:value-type="float">
            <text:p>0,00020810185185185200</text:p>
          </table:table-cell>
          <table:table-cell table:formula="of:=[.D31]-[.D30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62" office:value-type="float" office:value="1860" calcext:value-type="float">
            <text:p>186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15277777777778" calcext:value-type="float">
            <text:p>0,00021527777777777800</text:p>
          </table:table-cell>
          <table:table-cell table:formula="of:=[.D32]-[.D31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62" office:value-type="float" office:value="1922" calcext:value-type="float">
            <text:p>1922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22453703703704" calcext:value-type="float">
            <text:p>0,00022245370370370400</text:p>
          </table:table-cell>
          <table:table-cell table:formula="of:=[.D33]-[.D32]" office:value-type="float" office:value="0.00000717592592592591" calcext:value-type="float">
            <text:p>0,00000717592592592591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62" office:value-type="float" office:value="1984" calcext:value-type="float">
            <text:p>1984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2962962962963" calcext:value-type="float">
            <text:p>0,00022962962962963000</text:p>
          </table:table-cell>
          <table:table-cell table:formula="of:=[.D34]-[.D33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62" office:value-type="float" office:value="2046" calcext:value-type="float">
            <text:p>2046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36805555555556" calcext:value-type="float">
            <text:p>0,00023680555555555600</text:p>
          </table:table-cell>
          <table:table-cell table:formula="of:=[.D35]-[.D34]" office:value-type="float" office:value="0.00000717592592592591" calcext:value-type="float">
            <text:p>0,00000717592592592591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62" office:value-type="float" office:value="2108" calcext:value-type="float">
            <text:p>2108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43981481481481" calcext:value-type="float">
            <text:p>0,00024398148148148100</text:p>
          </table:table-cell>
          <table:table-cell table:formula="of:=[.D36]-[.D35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62" office:value-type="float" office:value="2170" calcext:value-type="float">
            <text:p>217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51157407407407" calcext:value-type="float">
            <text:p>0,00025115740740740700</text:p>
          </table:table-cell>
          <table:table-cell table:formula="of:=[.D37]-[.D36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62" office:value-type="float" office:value="2232" calcext:value-type="float">
            <text:p>2232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58333333333333" calcext:value-type="float">
            <text:p>0,00025833333333333300</text:p>
          </table:table-cell>
          <table:table-cell table:formula="of:=[.D38]-[.D37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62" office:value-type="float" office:value="2294" calcext:value-type="float">
            <text:p>2294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65509259259259" calcext:value-type="float">
            <text:p>0,00026550925925925900</text:p>
          </table:table-cell>
          <table:table-cell table:formula="of:=[.D39]-[.D38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62" office:value-type="float" office:value="2356" calcext:value-type="float">
            <text:p>2356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72685185185185" calcext:value-type="float">
            <text:p>0,00027268518518518500</text:p>
          </table:table-cell>
          <table:table-cell table:formula="of:=[.D40]-[.D39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62" office:value-type="float" office:value="2418" calcext:value-type="float">
            <text:p>2418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79861111111111" calcext:value-type="float">
            <text:p>0,00027986111111111100</text:p>
          </table:table-cell>
          <table:table-cell table:formula="of:=[.D41]-[.D40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62" office:value-type="float" office:value="2480" calcext:value-type="float">
            <text:p>248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287037037037037" calcext:value-type="float">
            <text:p>0,00028703703703703700</text:p>
          </table:table-cell>
          <table:table-cell table:formula="of:=[.D42]-[.D41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62" office:value-type="float" office:value="2542" calcext:value-type="float">
            <text:p>2542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294212962962963" calcext:value-type="float">
            <text:p>0,00029421296296296300</text:p>
          </table:table-cell>
          <table:table-cell table:formula="of:=[.D43]-[.D42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62" office:value-type="float" office:value="2604" calcext:value-type="float">
            <text:p>2604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301388888888889" calcext:value-type="float">
            <text:p>0,00030138888888888900</text:p>
          </table:table-cell>
          <table:table-cell table:formula="of:=[.D44]-[.D43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62" office:value-type="float" office:value="2666" calcext:value-type="float">
            <text:p>2666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308564814814815" calcext:value-type="float">
            <text:p>0,00030856481481481500</text:p>
          </table:table-cell>
          <table:table-cell table:formula="of:=[.D45]-[.D44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62" office:value-type="float" office:value="2728" calcext:value-type="float">
            <text:p>2728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315740740740741" calcext:value-type="float">
            <text:p>0,00031574074074074100</text:p>
          </table:table-cell>
          <table:table-cell table:formula="of:=[.D46]-[.D45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62" office:value-type="float" office:value="2790" calcext:value-type="float">
            <text:p>279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322916666666667" calcext:value-type="float">
            <text:p>0,00032291666666666700</text:p>
          </table:table-cell>
          <table:table-cell table:formula="of:=[.D47]-[.D46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62" office:value-type="float" office:value="2852" calcext:value-type="float">
            <text:p>2852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330092592592593" calcext:value-type="float">
            <text:p>0,00033009259259259300</text:p>
          </table:table-cell>
          <table:table-cell table:formula="of:=[.D48]-[.D47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62" office:value-type="float" office:value="2914" calcext:value-type="float">
            <text:p>2914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337268518518519" calcext:value-type="float">
            <text:p>0,00033726851851851900</text:p>
          </table:table-cell>
          <table:table-cell table:formula="of:=[.D49]-[.D48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62" office:value-type="float" office:value="2976" calcext:value-type="float">
            <text:p>2976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344444444444444" calcext:value-type="float">
            <text:p>0,00034444444444444400</text:p>
          </table:table-cell>
          <table:table-cell table:formula="of:=[.D50]-[.D49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62" office:value-type="float" office:value="3038" calcext:value-type="float">
            <text:p>3038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35162037037037" calcext:value-type="float">
            <text:p>0,00035162037037037000</text:p>
          </table:table-cell>
          <table:table-cell table:formula="of:=[.D51]-[.D50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62" office:value-type="float" office:value="3100" calcext:value-type="float">
            <text:p>31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358796296296296" calcext:value-type="float">
            <text:p>0,00035879629629629600</text:p>
          </table:table-cell>
          <table:table-cell table:formula="of:=[.D52]-[.D51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62" office:value-type="float" office:value="3162" calcext:value-type="float">
            <text:p>3162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365972222222222" calcext:value-type="float">
            <text:p>0,00036597222222222200</text:p>
          </table:table-cell>
          <table:table-cell table:formula="of:=[.D53]-[.D52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62" office:value-type="float" office:value="3224" calcext:value-type="float">
            <text:p>3224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373148148148148" calcext:value-type="float">
            <text:p>0,00037314814814814800</text:p>
          </table:table-cell>
          <table:table-cell table:formula="of:=[.D54]-[.D53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62" office:value-type="float" office:value="3286" calcext:value-type="float">
            <text:p>3286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380324074074074" calcext:value-type="float">
            <text:p>0,00038032407407407400</text:p>
          </table:table-cell>
          <table:table-cell table:formula="of:=[.D55]-[.D54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62" office:value-type="float" office:value="3348" calcext:value-type="float">
            <text:p>3348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3875" calcext:value-type="float">
            <text:p>0,00038750000000000000</text:p>
          </table:table-cell>
          <table:table-cell table:formula="of:=[.D56]-[.D55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62" office:value-type="float" office:value="3410" calcext:value-type="float">
            <text:p>341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394675925925926" calcext:value-type="float">
            <text:p>0,00039467592592592600</text:p>
          </table:table-cell>
          <table:table-cell table:formula="of:=[.D57]-[.D56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62" office:value-type="float" office:value="3472" calcext:value-type="float">
            <text:p>3472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401851851851852" calcext:value-type="float">
            <text:p>0,00040185185185185200</text:p>
          </table:table-cell>
          <table:table-cell table:formula="of:=[.D58]-[.D57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62" office:value-type="float" office:value="3534" calcext:value-type="float">
            <text:p>3534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409027777777778" calcext:value-type="float">
            <text:p>0,00040902777777777800</text:p>
          </table:table-cell>
          <table:table-cell table:formula="of:=[.D59]-[.D58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62" office:value-type="float" office:value="3596" calcext:value-type="float">
            <text:p>3596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416203703703704" calcext:value-type="float">
            <text:p>0,00041620370370370400</text:p>
          </table:table-cell>
          <table:table-cell table:formula="of:=[.D60]-[.D59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62" office:value-type="float" office:value="3658" calcext:value-type="float">
            <text:p>3658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42337962962963" calcext:value-type="float">
            <text:p>0,00042337962962963000</text:p>
          </table:table-cell>
          <table:table-cell table:formula="of:=[.D61]-[.D60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62" office:value-type="float" office:value="3720" calcext:value-type="float">
            <text:p>372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430555555555556" calcext:value-type="float">
            <text:p>0,00043055555555555600</text:p>
          </table:table-cell>
          <table:table-cell table:formula="of:=[.D62]-[.D61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62" office:value-type="float" office:value="3782" calcext:value-type="float">
            <text:p>3782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437731481481482" calcext:value-type="float">
            <text:p>0,00043773148148148200</text:p>
          </table:table-cell>
          <table:table-cell table:formula="of:=[.D63]-[.D62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62" office:value-type="float" office:value="3844" calcext:value-type="float">
            <text:p>3844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444907407407407" calcext:value-type="float">
            <text:p>0,00044490740740740700</text:p>
          </table:table-cell>
          <table:table-cell table:formula="of:=[.D64]-[.D63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62" office:value-type="float" office:value="3906" calcext:value-type="float">
            <text:p>3906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452083333333333" calcext:value-type="float">
            <text:p>0,00045208333333333300</text:p>
          </table:table-cell>
          <table:table-cell table:formula="of:=[.D65]-[.D64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62" office:value-type="float" office:value="3968" calcext:value-type="float">
            <text:p>3968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459259259259259" calcext:value-type="float">
            <text:p>0,00045925925925925900</text:p>
          </table:table-cell>
          <table:table-cell table:formula="of:=[.D66]-[.D65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62" office:value-type="float" office:value="4030" calcext:value-type="float">
            <text:p>403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466435185185185" calcext:value-type="float">
            <text:p>0,00046643518518518500</text:p>
          </table:table-cell>
          <table:table-cell table:formula="of:=[.D67]-[.D66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62" office:value-type="float" office:value="4092" calcext:value-type="float">
            <text:p>4092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473611111111111" calcext:value-type="float">
            <text:p>0,00047361111111111100</text:p>
          </table:table-cell>
          <table:table-cell table:formula="of:=[.D68]-[.D67]" office:value-type="float" office:value="0.00000717592592592594" calcext:value-type="float">
            <text:p>0,00000717592592592594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62" office:value-type="float" office:value="4154" calcext:value-type="float">
            <text:p>4154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480787037037037" calcext:value-type="float">
            <text:p>0,00048078703703703700</text:p>
          </table:table-cell>
          <table:table-cell table:formula="of:=[.D69]-[.D68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62" office:value-type="float" office:value="4216" calcext:value-type="float">
            <text:p>4216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487962962962963" calcext:value-type="float">
            <text:p>0,00048796296296296300</text:p>
          </table:table-cell>
          <table:table-cell table:formula="of:=[.D70]-[.D69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62" office:value-type="float" office:value="4278" calcext:value-type="float">
            <text:p>4278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495138888888889" calcext:value-type="float">
            <text:p>0,00049513888888888900</text:p>
          </table:table-cell>
          <table:table-cell table:formula="of:=[.D71]-[.D70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62" office:value-type="float" office:value="4340" calcext:value-type="float">
            <text:p>434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502314814814815" calcext:value-type="float">
            <text:p>0,00050231481481481500</text:p>
          </table:table-cell>
          <table:table-cell table:formula="of:=[.D72]-[.D71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62" office:value-type="float" office:value="4402" calcext:value-type="float">
            <text:p>4402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509490740740741" calcext:value-type="float">
            <text:p>0,00050949074074074100</text:p>
          </table:table-cell>
          <table:table-cell table:formula="of:=[.D73]-[.D72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62" office:value-type="float" office:value="4464" calcext:value-type="float">
            <text:p>4464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516666666666667" calcext:value-type="float">
            <text:p>0,00051666666666666700</text:p>
          </table:table-cell>
          <table:table-cell table:formula="of:=[.D74]-[.D73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62" office:value-type="float" office:value="4526" calcext:value-type="float">
            <text:p>4526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523842592592593" calcext:value-type="float">
            <text:p>0,00052384259259259300</text:p>
          </table:table-cell>
          <table:table-cell table:formula="of:=[.D75]-[.D74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62" office:value-type="float" office:value="4588" calcext:value-type="float">
            <text:p>4588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531018518518519" calcext:value-type="float">
            <text:p>0,00053101851851851900</text:p>
          </table:table-cell>
          <table:table-cell table:formula="of:=[.D76]-[.D75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62" office:value-type="float" office:value="4650" calcext:value-type="float">
            <text:p>46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538194444444444" calcext:value-type="float">
            <text:p>0,00053819444444444400</text:p>
          </table:table-cell>
          <table:table-cell table:formula="of:=[.D77]-[.D76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62" office:value-type="float" office:value="4712" calcext:value-type="float">
            <text:p>4712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54537037037037" calcext:value-type="float">
            <text:p>0,00054537037037037000</text:p>
          </table:table-cell>
          <table:table-cell table:formula="of:=[.D78]-[.D77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62" office:value-type="float" office:value="4774" calcext:value-type="float">
            <text:p>4774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552546296296296" calcext:value-type="float">
            <text:p>0,00055254629629629600</text:p>
          </table:table-cell>
          <table:table-cell table:formula="of:=[.D79]-[.D78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62" office:value-type="float" office:value="4836" calcext:value-type="float">
            <text:p>4836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559722222222222" calcext:value-type="float">
            <text:p>0,00055972222222222200</text:p>
          </table:table-cell>
          <table:table-cell table:formula="of:=[.D80]-[.D79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62" office:value-type="float" office:value="4898" calcext:value-type="float">
            <text:p>4898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566898148148148" calcext:value-type="float">
            <text:p>0,00056689814814814800</text:p>
          </table:table-cell>
          <table:table-cell table:formula="of:=[.D81]-[.D80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62" office:value-type="float" office:value="4960" calcext:value-type="float">
            <text:p>496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574074074074074" calcext:value-type="float">
            <text:p>0,00057407407407407400</text:p>
          </table:table-cell>
          <table:table-cell table:formula="of:=[.D82]-[.D81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62" office:value-type="float" office:value="5022" calcext:value-type="float">
            <text:p>5022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58125" calcext:value-type="float">
            <text:p>0,00058125000000000000</text:p>
          </table:table-cell>
          <table:table-cell table:formula="of:=[.D83]-[.D82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62" office:value-type="float" office:value="5084" calcext:value-type="float">
            <text:p>5084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588425925925926" calcext:value-type="float">
            <text:p>0,00058842592592592600</text:p>
          </table:table-cell>
          <table:table-cell table:formula="of:=[.D84]-[.D83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62" office:value-type="float" office:value="5146" calcext:value-type="float">
            <text:p>5146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595601851851852" calcext:value-type="float">
            <text:p>0,00059560185185185200</text:p>
          </table:table-cell>
          <table:table-cell table:formula="of:=[.D85]-[.D84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62" office:value-type="float" office:value="5208" calcext:value-type="float">
            <text:p>5208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602777777777778" calcext:value-type="float">
            <text:p>0,00060277777777777800</text:p>
          </table:table-cell>
          <table:table-cell table:formula="of:=[.D86]-[.D85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62" office:value-type="float" office:value="5270" calcext:value-type="float">
            <text:p>527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609953703703704" calcext:value-type="float">
            <text:p>0,00060995370370370400</text:p>
          </table:table-cell>
          <table:table-cell table:formula="of:=[.D87]-[.D86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62" office:value-type="float" office:value="5332" calcext:value-type="float">
            <text:p>5332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61712962962963" calcext:value-type="float">
            <text:p>0,00061712962962963000</text:p>
          </table:table-cell>
          <table:table-cell table:formula="of:=[.D88]-[.D87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62" office:value-type="float" office:value="5394" calcext:value-type="float">
            <text:p>5394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624305555555556" calcext:value-type="float">
            <text:p>0,00062430555555555600</text:p>
          </table:table-cell>
          <table:table-cell table:formula="of:=[.D89]-[.D88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62" office:value-type="float" office:value="5456" calcext:value-type="float">
            <text:p>5456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631481481481482" calcext:value-type="float">
            <text:p>0,00063148148148148200</text:p>
          </table:table-cell>
          <table:table-cell table:formula="of:=[.D90]-[.D89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62" office:value-type="float" office:value="5518" calcext:value-type="float">
            <text:p>5518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638657407407407" calcext:value-type="float">
            <text:p>0,00063865740740740700</text:p>
          </table:table-cell>
          <table:table-cell table:formula="of:=[.D91]-[.D90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62" office:value-type="float" office:value="5580" calcext:value-type="float">
            <text:p>558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645833333333333" calcext:value-type="float">
            <text:p>0,00064583333333333300</text:p>
          </table:table-cell>
          <table:table-cell table:formula="of:=[.D92]-[.D91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62" office:value-type="float" office:value="5642" calcext:value-type="float">
            <text:p>5642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653009259259259" calcext:value-type="float">
            <text:p>0,00065300925925925900</text:p>
          </table:table-cell>
          <table:table-cell table:formula="of:=[.D93]-[.D92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62" office:value-type="float" office:value="5704" calcext:value-type="float">
            <text:p>5704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660185185185185" calcext:value-type="float">
            <text:p>0,00066018518518518500</text:p>
          </table:table-cell>
          <table:table-cell table:formula="of:=[.D94]-[.D93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62" office:value-type="float" office:value="5766" calcext:value-type="float">
            <text:p>5766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667361111111111" calcext:value-type="float">
            <text:p>0,00066736111111111100</text:p>
          </table:table-cell>
          <table:table-cell table:formula="of:=[.D95]-[.D94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62" office:value-type="float" office:value="5828" calcext:value-type="float">
            <text:p>5828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674537037037037" calcext:value-type="float">
            <text:p>0,00067453703703703700</text:p>
          </table:table-cell>
          <table:table-cell table:formula="of:=[.D96]-[.D95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62" office:value-type="float" office:value="5890" calcext:value-type="float">
            <text:p>589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681712962962963" calcext:value-type="float">
            <text:p>0,00068171296296296300</text:p>
          </table:table-cell>
          <table:table-cell table:formula="of:=[.D97]-[.D96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62" office:value-type="float" office:value="5952" calcext:value-type="float">
            <text:p>5952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688888888888889" calcext:value-type="float">
            <text:p>0,00068888888888888900</text:p>
          </table:table-cell>
          <table:table-cell table:formula="of:=[.D98]-[.D97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62" office:value-type="float" office:value="6014" calcext:value-type="float">
            <text:p>6014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696064814814815" calcext:value-type="float">
            <text:p>0,00069606481481481500</text:p>
          </table:table-cell>
          <table:table-cell table:formula="of:=[.D99]-[.D98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62" office:value-type="float" office:value="6076" calcext:value-type="float">
            <text:p>6076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703240740740741" calcext:value-type="float">
            <text:p>0,00070324074074074100</text:p>
          </table:table-cell>
          <table:table-cell table:formula="of:=[.D100]-[.D99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62" office:value-type="float" office:value="6138" calcext:value-type="float">
            <text:p>6138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710416666666667" calcext:value-type="float">
            <text:p>0,00071041666666666700</text:p>
          </table:table-cell>
          <table:table-cell table:formula="of:=[.D101]-[.D100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62" office:value-type="float" office:value="6200" calcext:value-type="float">
            <text:p>62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717592592592593" calcext:value-type="float">
            <text:p>0,00071759259259259300</text:p>
          </table:table-cell>
          <table:table-cell table:formula="of:=[.D102]-[.D101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62" office:value-type="float" office:value="6262" calcext:value-type="float">
            <text:p>6262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724768518518519" calcext:value-type="float">
            <text:p>0,00072476851851851800</text:p>
          </table:table-cell>
          <table:table-cell table:formula="of:=[.D103]-[.D102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62" office:value-type="float" office:value="6324" calcext:value-type="float">
            <text:p>6324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731944444444445" calcext:value-type="float">
            <text:p>0,00073194444444444500</text:p>
          </table:table-cell>
          <table:table-cell table:formula="of:=[.D104]-[.D103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62" office:value-type="float" office:value="6386" calcext:value-type="float">
            <text:p>6386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73912037037037" calcext:value-type="float">
            <text:p>0,00073912037037037100</text:p>
          </table:table-cell>
          <table:table-cell table:formula="of:=[.D105]-[.D104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62" office:value-type="float" office:value="6448" calcext:value-type="float">
            <text:p>6448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746296296296296" calcext:value-type="float">
            <text:p>0,00074629629629629600</text:p>
          </table:table-cell>
          <table:table-cell table:formula="of:=[.D106]-[.D105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62" office:value-type="float" office:value="6510" calcext:value-type="float">
            <text:p>651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753472222222222" calcext:value-type="float">
            <text:p>0,00075347222222222200</text:p>
          </table:table-cell>
          <table:table-cell table:formula="of:=[.D107]-[.D106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62" office:value-type="float" office:value="6572" calcext:value-type="float">
            <text:p>6572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760648148148148" calcext:value-type="float">
            <text:p>0,00076064814814814800</text:p>
          </table:table-cell>
          <table:table-cell table:formula="of:=[.D108]-[.D107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62" office:value-type="float" office:value="6634" calcext:value-type="float">
            <text:p>6634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767824074074074" calcext:value-type="float">
            <text:p>0,00076782407407407400</text:p>
          </table:table-cell>
          <table:table-cell table:formula="of:=[.D109]-[.D108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62" office:value-type="float" office:value="6696" calcext:value-type="float">
            <text:p>6696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775" calcext:value-type="float">
            <text:p>0,00077500000000000000</text:p>
          </table:table-cell>
          <table:table-cell table:formula="of:=[.D110]-[.D109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62" office:value-type="float" office:value="6758" calcext:value-type="float">
            <text:p>6758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782175925925926" calcext:value-type="float">
            <text:p>0,00078217592592592600</text:p>
          </table:table-cell>
          <table:table-cell table:formula="of:=[.D111]-[.D110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62" office:value-type="float" office:value="6820" calcext:value-type="float">
            <text:p>682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789351851851852" calcext:value-type="float">
            <text:p>0,00078935185185185200</text:p>
          </table:table-cell>
          <table:table-cell table:formula="of:=[.D112]-[.D111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62" office:value-type="float" office:value="6882" calcext:value-type="float">
            <text:p>6882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796527777777778" calcext:value-type="float">
            <text:p>0,00079652777777777800</text:p>
          </table:table-cell>
          <table:table-cell table:formula="of:=[.D113]-[.D112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62" office:value-type="float" office:value="6944" calcext:value-type="float">
            <text:p>6944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803703703703704" calcext:value-type="float">
            <text:p>0,00080370370370370400</text:p>
          </table:table-cell>
          <table:table-cell table:formula="of:=[.D114]-[.D113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62" office:value-type="float" office:value="7006" calcext:value-type="float">
            <text:p>7006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81087962962963" calcext:value-type="float">
            <text:p>0,00081087962962963000</text:p>
          </table:table-cell>
          <table:table-cell table:formula="of:=[.D115]-[.D114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62" office:value-type="float" office:value="7068" calcext:value-type="float">
            <text:p>7068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818055555555556" calcext:value-type="float">
            <text:p>0,00081805555555555600</text:p>
          </table:table-cell>
          <table:table-cell table:formula="of:=[.D116]-[.D115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62" office:value-type="float" office:value="7130" calcext:value-type="float">
            <text:p>713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825231481481482" calcext:value-type="float">
            <text:p>0,00082523148148148200</text:p>
          </table:table-cell>
          <table:table-cell table:formula="of:=[.D117]-[.D116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62" office:value-type="float" office:value="7192" calcext:value-type="float">
            <text:p>7192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832407407407407" calcext:value-type="float">
            <text:p>0,00083240740740740700</text:p>
          </table:table-cell>
          <table:table-cell table:formula="of:=[.D118]-[.D117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62" office:value-type="float" office:value="7254" calcext:value-type="float">
            <text:p>7254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839583333333333" calcext:value-type="float">
            <text:p>0,00083958333333333300</text:p>
          </table:table-cell>
          <table:table-cell table:formula="of:=[.D119]-[.D118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62" office:value-type="float" office:value="7316" calcext:value-type="float">
            <text:p>7316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846759259259259" calcext:value-type="float">
            <text:p>0,00084675925925925900</text:p>
          </table:table-cell>
          <table:table-cell table:formula="of:=[.D120]-[.D119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62" office:value-type="float" office:value="7378" calcext:value-type="float">
            <text:p>7378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853935185185185" calcext:value-type="float">
            <text:p>0,00085393518518518500</text:p>
          </table:table-cell>
          <table:table-cell table:formula="of:=[.D121]-[.D120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62" office:value-type="float" office:value="7440" calcext:value-type="float">
            <text:p>744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861111111111111" calcext:value-type="float">
            <text:p>0,00086111111111111100</text:p>
          </table:table-cell>
          <table:table-cell table:formula="of:=[.D122]-[.D121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62" office:value-type="float" office:value="7502" calcext:value-type="float">
            <text:p>7502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868287037037037" calcext:value-type="float">
            <text:p>0,00086828703703703700</text:p>
          </table:table-cell>
          <table:table-cell table:formula="of:=[.D123]-[.D122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62" office:value-type="float" office:value="7564" calcext:value-type="float">
            <text:p>7564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875462962962963" calcext:value-type="float">
            <text:p>0,00087546296296296300</text:p>
          </table:table-cell>
          <table:table-cell table:formula="of:=[.D124]-[.D123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62" office:value-type="float" office:value="7626" calcext:value-type="float">
            <text:p>7626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882638888888889" calcext:value-type="float">
            <text:p>0,00088263888888888900</text:p>
          </table:table-cell>
          <table:table-cell table:formula="of:=[.D125]-[.D124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62" office:value-type="float" office:value="7688" calcext:value-type="float">
            <text:p>7688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889814814814815" calcext:value-type="float">
            <text:p>0,00088981481481481500</text:p>
          </table:table-cell>
          <table:table-cell table:formula="of:=[.D126]-[.D125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62" office:value-type="float" office:value="7750" calcext:value-type="float">
            <text:p>77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896990740740741" calcext:value-type="float">
            <text:p>0,00089699074074074100</text:p>
          </table:table-cell>
          <table:table-cell table:formula="of:=[.D127]-[.D126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62" office:value-type="float" office:value="7812" calcext:value-type="float">
            <text:p>7812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904166666666667" calcext:value-type="float">
            <text:p>0,00090416666666666700</text:p>
          </table:table-cell>
          <table:table-cell table:formula="of:=[.D128]-[.D127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62" office:value-type="float" office:value="7874" calcext:value-type="float">
            <text:p>7874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911342592592593" calcext:value-type="float">
            <text:p>0,00091134259259259300</text:p>
          </table:table-cell>
          <table:table-cell table:formula="of:=[.D129]-[.D128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62" office:value-type="float" office:value="7936" calcext:value-type="float">
            <text:p>7936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918518518518519" calcext:value-type="float">
            <text:p>0,00091851851851851900</text:p>
          </table:table-cell>
          <table:table-cell table:formula="of:=[.D130]-[.D129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62" office:value-type="float" office:value="7998" calcext:value-type="float">
            <text:p>7998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925694444444445" calcext:value-type="float">
            <text:p>0,00092569444444444500</text:p>
          </table:table-cell>
          <table:table-cell table:formula="of:=[.D131]-[.D130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62" office:value-type="float" office:value="8060" calcext:value-type="float">
            <text:p>806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93287037037037" calcext:value-type="float">
            <text:p>0,00093287037037037000</text:p>
          </table:table-cell>
          <table:table-cell table:formula="of:=[.D132]-[.D131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62" office:value-type="float" office:value="8122" calcext:value-type="float">
            <text:p>8122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940046296296296" calcext:value-type="float">
            <text:p>0,00094004629629629600</text:p>
          </table:table-cell>
          <table:table-cell table:formula="of:=[.D133]-[.D132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62" office:value-type="float" office:value="8184" calcext:value-type="float">
            <text:p>8184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947222222222222" calcext:value-type="float">
            <text:p>0,00094722222222222200</text:p>
          </table:table-cell>
          <table:table-cell table:formula="of:=[.D134]-[.D133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62" office:value-type="float" office:value="8246" calcext:value-type="float">
            <text:p>8246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954398148148148" calcext:value-type="float">
            <text:p>0,00095439814814814800</text:p>
          </table:table-cell>
          <table:table-cell table:formula="of:=[.D135]-[.D134]" office:value-type="float" office:value="0.00000717592592592599" calcext:value-type="float">
            <text:p>0,00000717592592592599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62" office:value-type="float" office:value="8308" calcext:value-type="float">
            <text:p>8308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961574074074074" calcext:value-type="float">
            <text:p>0,00096157407407407400</text:p>
          </table:table-cell>
          <table:table-cell table:formula="of:=[.D136]-[.D135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62" office:value-type="float" office:value="8370" calcext:value-type="float">
            <text:p>837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96875" calcext:value-type="float">
            <text:p>0,00096875000000000000</text:p>
          </table:table-cell>
          <table:table-cell table:formula="of:=[.D137]-[.D136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62" office:value-type="float" office:value="8432" calcext:value-type="float">
            <text:p>8432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975925925925926" calcext:value-type="float">
            <text:p>0,00097592592592592600</text:p>
          </table:table-cell>
          <table:table-cell table:formula="of:=[.D138]-[.D137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62" office:value-type="float" office:value="8494" calcext:value-type="float">
            <text:p>8494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983101851851852" calcext:value-type="float">
            <text:p>0,00098310185185185200</text:p>
          </table:table-cell>
          <table:table-cell table:formula="of:=[.D139]-[.D13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62" office:value-type="float" office:value="8556" calcext:value-type="float">
            <text:p>8556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990277777777778" calcext:value-type="float">
            <text:p>0,00099027777777777800</text:p>
          </table:table-cell>
          <table:table-cell table:formula="of:=[.D140]-[.D139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62" office:value-type="float" office:value="8618" calcext:value-type="float">
            <text:p>8618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997453703703704" calcext:value-type="float">
            <text:p>0,00099745370370370400</text:p>
          </table:table-cell>
          <table:table-cell table:formula="of:=[.D141]-[.D140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62" office:value-type="float" office:value="8680" calcext:value-type="float">
            <text:p>868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00462962962963" calcext:value-type="float">
            <text:p>0,00100462962962963000</text:p>
          </table:table-cell>
          <table:table-cell table:formula="of:=[.D142]-[.D141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62" office:value-type="float" office:value="8742" calcext:value-type="float">
            <text:p>8742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01180555555556" calcext:value-type="float">
            <text:p>0,00101180555555556000</text:p>
          </table:table-cell>
          <table:table-cell table:formula="of:=[.D143]-[.D142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62" office:value-type="float" office:value="8804" calcext:value-type="float">
            <text:p>8804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01898148148148" calcext:value-type="float">
            <text:p>0,00101898148148148000</text:p>
          </table:table-cell>
          <table:table-cell table:formula="of:=[.D144]-[.D14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62" office:value-type="float" office:value="8866" calcext:value-type="float">
            <text:p>8866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02615740740741" calcext:value-type="float">
            <text:p>0,00102615740740741000</text:p>
          </table:table-cell>
          <table:table-cell table:formula="of:=[.D145]-[.D144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62" office:value-type="float" office:value="8928" calcext:value-type="float">
            <text:p>8928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03333333333333" calcext:value-type="float">
            <text:p>0,00103333333333333000</text:p>
          </table:table-cell>
          <table:table-cell table:formula="of:=[.D146]-[.D145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62" office:value-type="float" office:value="8990" calcext:value-type="float">
            <text:p>899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04050925925926" calcext:value-type="float">
            <text:p>0,00104050925925926000</text:p>
          </table:table-cell>
          <table:table-cell table:formula="of:=[.D147]-[.D146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62" office:value-type="float" office:value="9052" calcext:value-type="float">
            <text:p>9052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04768518518519" calcext:value-type="float">
            <text:p>0,00104768518518519000</text:p>
          </table:table-cell>
          <table:table-cell table:formula="of:=[.D148]-[.D147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62" office:value-type="float" office:value="9114" calcext:value-type="float">
            <text:p>9114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05486111111111" calcext:value-type="float">
            <text:p>0,00105486111111111000</text:p>
          </table:table-cell>
          <table:table-cell table:formula="of:=[.D149]-[.D14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62" office:value-type="float" office:value="9176" calcext:value-type="float">
            <text:p>9176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06203703703704" calcext:value-type="float">
            <text:p>0,00106203703703704000</text:p>
          </table:table-cell>
          <table:table-cell table:formula="of:=[.D150]-[.D149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62" office:value-type="float" office:value="9238" calcext:value-type="float">
            <text:p>9238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06921296296296" calcext:value-type="float">
            <text:p>0,00106921296296296000</text:p>
          </table:table-cell>
          <table:table-cell table:formula="of:=[.D151]-[.D150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62" office:value-type="float" office:value="9300" calcext:value-type="float">
            <text:p>93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07638888888889" calcext:value-type="float">
            <text:p>0,00107638888888889000</text:p>
          </table:table-cell>
          <table:table-cell table:formula="of:=[.D152]-[.D151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62" office:value-type="float" office:value="9362" calcext:value-type="float">
            <text:p>9362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08356481481481" calcext:value-type="float">
            <text:p>0,00108356481481481000</text:p>
          </table:table-cell>
          <table:table-cell table:formula="of:=[.D153]-[.D152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62" office:value-type="float" office:value="9424" calcext:value-type="float">
            <text:p>9424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09074074074074" calcext:value-type="float">
            <text:p>0,00109074074074074000</text:p>
          </table:table-cell>
          <table:table-cell table:formula="of:=[.D154]-[.D15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62" office:value-type="float" office:value="9486" calcext:value-type="float">
            <text:p>9486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09791666666667" calcext:value-type="float">
            <text:p>0,00109791666666667000</text:p>
          </table:table-cell>
          <table:table-cell table:formula="of:=[.D155]-[.D154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62" office:value-type="float" office:value="9548" calcext:value-type="float">
            <text:p>9548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10509259259259" calcext:value-type="float">
            <text:p>0,00110509259259259000</text:p>
          </table:table-cell>
          <table:table-cell table:formula="of:=[.D156]-[.D155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62" office:value-type="float" office:value="9610" calcext:value-type="float">
            <text:p>961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11226851851852" calcext:value-type="float">
            <text:p>0,00111226851851852000</text:p>
          </table:table-cell>
          <table:table-cell table:formula="of:=[.D157]-[.D156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62" office:value-type="float" office:value="9672" calcext:value-type="float">
            <text:p>9672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11944444444444" calcext:value-type="float">
            <text:p>0,00111944444444444000</text:p>
          </table:table-cell>
          <table:table-cell table:formula="of:=[.D158]-[.D157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62" office:value-type="float" office:value="9734" calcext:value-type="float">
            <text:p>9734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12662037037037" calcext:value-type="float">
            <text:p>0,00112662037037037000</text:p>
          </table:table-cell>
          <table:table-cell table:formula="of:=[.D159]-[.D15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62" office:value-type="float" office:value="9796" calcext:value-type="float">
            <text:p>9796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1337962962963" calcext:value-type="float">
            <text:p>0,00113379629629630000</text:p>
          </table:table-cell>
          <table:table-cell table:formula="of:=[.D160]-[.D159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62" office:value-type="float" office:value="9858" calcext:value-type="float">
            <text:p>9858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14097222222222" calcext:value-type="float">
            <text:p>0,00114097222222222000</text:p>
          </table:table-cell>
          <table:table-cell table:formula="of:=[.D161]-[.D160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62" office:value-type="float" office:value="9920" calcext:value-type="float">
            <text:p>992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14814814814815" calcext:value-type="float">
            <text:p>0,00114814814814815000</text:p>
          </table:table-cell>
          <table:table-cell table:formula="of:=[.D162]-[.D161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62" office:value-type="float" office:value="9982" calcext:value-type="float">
            <text:p>9982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15532407407407" calcext:value-type="float">
            <text:p>0,00115532407407407000</text:p>
          </table:table-cell>
          <table:table-cell table:formula="of:=[.D163]-[.D162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62" office:value-type="float" office:value="10044" calcext:value-type="float">
            <text:p>10044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1625" calcext:value-type="float">
            <text:p>0,00116250000000000000</text:p>
          </table:table-cell>
          <table:table-cell table:formula="of:=[.D164]-[.D16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62" office:value-type="float" office:value="10106" calcext:value-type="float">
            <text:p>10106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16967592592593" calcext:value-type="float">
            <text:p>0,00116967592592593000</text:p>
          </table:table-cell>
          <table:table-cell table:formula="of:=[.D165]-[.D164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62" office:value-type="float" office:value="10168" calcext:value-type="float">
            <text:p>10168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17685185185185" calcext:value-type="float">
            <text:p>0,00117685185185185000</text:p>
          </table:table-cell>
          <table:table-cell table:formula="of:=[.D166]-[.D165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62" office:value-type="float" office:value="10230" calcext:value-type="float">
            <text:p>1023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18402777777778" calcext:value-type="float">
            <text:p>0,00118402777777778000</text:p>
          </table:table-cell>
          <table:table-cell table:formula="of:=[.D167]-[.D166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62" office:value-type="float" office:value="10292" calcext:value-type="float">
            <text:p>10292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1912037037037" calcext:value-type="float">
            <text:p>0,00119120370370370000</text:p>
          </table:table-cell>
          <table:table-cell table:formula="of:=[.D168]-[.D167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62" office:value-type="float" office:value="10354" calcext:value-type="float">
            <text:p>10354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19837962962963" calcext:value-type="float">
            <text:p>0,00119837962962963000</text:p>
          </table:table-cell>
          <table:table-cell table:formula="of:=[.D169]-[.D16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62" office:value-type="float" office:value="10416" calcext:value-type="float">
            <text:p>10416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20555555555556" calcext:value-type="float">
            <text:p>0,00120555555555556000</text:p>
          </table:table-cell>
          <table:table-cell table:formula="of:=[.D170]-[.D169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62" office:value-type="float" office:value="10478" calcext:value-type="float">
            <text:p>10478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21273148148148" calcext:value-type="float">
            <text:p>0,00121273148148148000</text:p>
          </table:table-cell>
          <table:table-cell table:formula="of:=[.D171]-[.D170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62" office:value-type="float" office:value="10540" calcext:value-type="float">
            <text:p>1054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21990740740741" calcext:value-type="float">
            <text:p>0,00121990740740741000</text:p>
          </table:table-cell>
          <table:table-cell table:formula="of:=[.D172]-[.D171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62" office:value-type="float" office:value="10602" calcext:value-type="float">
            <text:p>10602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22708333333333" calcext:value-type="float">
            <text:p>0,00122708333333333000</text:p>
          </table:table-cell>
          <table:table-cell table:formula="of:=[.D173]-[.D172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62" office:value-type="float" office:value="10664" calcext:value-type="float">
            <text:p>10664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23425925925926" calcext:value-type="float">
            <text:p>0,00123425925925926000</text:p>
          </table:table-cell>
          <table:table-cell table:formula="of:=[.D174]-[.D17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62" office:value-type="float" office:value="10726" calcext:value-type="float">
            <text:p>10726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24143518518519" calcext:value-type="float">
            <text:p>0,00124143518518519000</text:p>
          </table:table-cell>
          <table:table-cell table:formula="of:=[.D175]-[.D174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62" office:value-type="float" office:value="10788" calcext:value-type="float">
            <text:p>10788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24861111111111" calcext:value-type="float">
            <text:p>0,00124861111111111000</text:p>
          </table:table-cell>
          <table:table-cell table:formula="of:=[.D176]-[.D175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62" office:value-type="float" office:value="10850" calcext:value-type="float">
            <text:p>108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25578703703704" calcext:value-type="float">
            <text:p>0,00125578703703704000</text:p>
          </table:table-cell>
          <table:table-cell table:formula="of:=[.D177]-[.D176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62" office:value-type="float" office:value="10912" calcext:value-type="float">
            <text:p>10912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26296296296296" calcext:value-type="float">
            <text:p>0,00126296296296296000</text:p>
          </table:table-cell>
          <table:table-cell table:formula="of:=[.D178]-[.D177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62" office:value-type="float" office:value="10974" calcext:value-type="float">
            <text:p>10974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27013888888889" calcext:value-type="float">
            <text:p>0,00127013888888889000</text:p>
          </table:table-cell>
          <table:table-cell table:formula="of:=[.D179]-[.D17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62" office:value-type="float" office:value="11036" calcext:value-type="float">
            <text:p>11036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27731481481482" calcext:value-type="float">
            <text:p>0,00127731481481482000</text:p>
          </table:table-cell>
          <table:table-cell table:formula="of:=[.D180]-[.D179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62" office:value-type="float" office:value="11098" calcext:value-type="float">
            <text:p>11098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28449074074074" calcext:value-type="float">
            <text:p>0,00128449074074074000</text:p>
          </table:table-cell>
          <table:table-cell table:formula="of:=[.D181]-[.D180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62" office:value-type="float" office:value="11160" calcext:value-type="float">
            <text:p>1116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29166666666667" calcext:value-type="float">
            <text:p>0,00129166666666667000</text:p>
          </table:table-cell>
          <table:table-cell table:formula="of:=[.D182]-[.D181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62" office:value-type="float" office:value="11222" calcext:value-type="float">
            <text:p>11222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29884259259259" calcext:value-type="float">
            <text:p>0,00129884259259259000</text:p>
          </table:table-cell>
          <table:table-cell table:formula="of:=[.D183]-[.D182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62" office:value-type="float" office:value="11284" calcext:value-type="float">
            <text:p>11284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30601851851852" calcext:value-type="float">
            <text:p>0,00130601851851852000</text:p>
          </table:table-cell>
          <table:table-cell table:formula="of:=[.D184]-[.D18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62" office:value-type="float" office:value="11346" calcext:value-type="float">
            <text:p>11346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31319444444444" calcext:value-type="float">
            <text:p>0,00131319444444444000</text:p>
          </table:table-cell>
          <table:table-cell table:formula="of:=[.D185]-[.D184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62" office:value-type="float" office:value="11408" calcext:value-type="float">
            <text:p>11408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32037037037037" calcext:value-type="float">
            <text:p>0,00132037037037037000</text:p>
          </table:table-cell>
          <table:table-cell table:formula="of:=[.D186]-[.D185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62" office:value-type="float" office:value="11470" calcext:value-type="float">
            <text:p>1147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3275462962963" calcext:value-type="float">
            <text:p>0,00132754629629630000</text:p>
          </table:table-cell>
          <table:table-cell table:formula="of:=[.D187]-[.D186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62" office:value-type="float" office:value="11532" calcext:value-type="float">
            <text:p>11532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33472222222222" calcext:value-type="float">
            <text:p>0,00133472222222222000</text:p>
          </table:table-cell>
          <table:table-cell table:formula="of:=[.D188]-[.D187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62" office:value-type="float" office:value="11594" calcext:value-type="float">
            <text:p>11594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34189814814815" calcext:value-type="float">
            <text:p>0,00134189814814815000</text:p>
          </table:table-cell>
          <table:table-cell table:formula="of:=[.D189]-[.D18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62" office:value-type="float" office:value="11656" calcext:value-type="float">
            <text:p>11656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34907407407407" calcext:value-type="float">
            <text:p>0,00134907407407407000</text:p>
          </table:table-cell>
          <table:table-cell table:formula="of:=[.D190]-[.D189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62" office:value-type="float" office:value="11718" calcext:value-type="float">
            <text:p>11718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35625" calcext:value-type="float">
            <text:p>0,00135625000000000000</text:p>
          </table:table-cell>
          <table:table-cell table:formula="of:=[.D191]-[.D190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62" office:value-type="float" office:value="11780" calcext:value-type="float">
            <text:p>1178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36342592592593" calcext:value-type="float">
            <text:p>0,00136342592592593000</text:p>
          </table:table-cell>
          <table:table-cell table:formula="of:=[.D192]-[.D191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62" office:value-type="float" office:value="11842" calcext:value-type="float">
            <text:p>11842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37060185185185" calcext:value-type="float">
            <text:p>0,00137060185185185000</text:p>
          </table:table-cell>
          <table:table-cell table:formula="of:=[.D193]-[.D192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62" office:value-type="float" office:value="11904" calcext:value-type="float">
            <text:p>11904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37777777777778" calcext:value-type="float">
            <text:p>0,00137777777777778000</text:p>
          </table:table-cell>
          <table:table-cell table:formula="of:=[.D194]-[.D19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62" office:value-type="float" office:value="11966" calcext:value-type="float">
            <text:p>11966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3849537037037" calcext:value-type="float">
            <text:p>0,00138495370370370000</text:p>
          </table:table-cell>
          <table:table-cell table:formula="of:=[.D195]-[.D194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62" office:value-type="float" office:value="12028" calcext:value-type="float">
            <text:p>12028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39212962962963" calcext:value-type="float">
            <text:p>0,00139212962962963000</text:p>
          </table:table-cell>
          <table:table-cell table:formula="of:=[.D196]-[.D195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62" office:value-type="float" office:value="12090" calcext:value-type="float">
            <text:p>1209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39930555555556" calcext:value-type="float">
            <text:p>0,00139930555555556000</text:p>
          </table:table-cell>
          <table:table-cell table:formula="of:=[.D197]-[.D196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62" office:value-type="float" office:value="12152" calcext:value-type="float">
            <text:p>12152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40648148148148" calcext:value-type="float">
            <text:p>0,00140648148148148000</text:p>
          </table:table-cell>
          <table:table-cell table:formula="of:=[.D198]-[.D197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62" office:value-type="float" office:value="12214" calcext:value-type="float">
            <text:p>12214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41365740740741" calcext:value-type="float">
            <text:p>0,00141365740740741000</text:p>
          </table:table-cell>
          <table:table-cell table:formula="of:=[.D199]-[.D19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62" office:value-type="float" office:value="12276" calcext:value-type="float">
            <text:p>12276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42083333333333" calcext:value-type="float">
            <text:p>0,00142083333333333000</text:p>
          </table:table-cell>
          <table:table-cell table:formula="of:=[.D200]-[.D199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62" office:value-type="float" office:value="12338" calcext:value-type="float">
            <text:p>12338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42800925925926" calcext:value-type="float">
            <text:p>0,00142800925925926000</text:p>
          </table:table-cell>
          <table:table-cell table:formula="of:=[.D201]-[.D200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62" office:value-type="float" office:value="12400" calcext:value-type="float">
            <text:p>124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43518518518519" calcext:value-type="float">
            <text:p>0,00143518518518519000</text:p>
          </table:table-cell>
          <table:table-cell table:formula="of:=[.D202]-[.D201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62" office:value-type="float" office:value="12462" calcext:value-type="float">
            <text:p>12462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44236111111111" calcext:value-type="float">
            <text:p>0,00144236111111111000</text:p>
          </table:table-cell>
          <table:table-cell table:formula="of:=[.D203]-[.D202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62" office:value-type="float" office:value="12524" calcext:value-type="float">
            <text:p>12524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44953703703704" calcext:value-type="float">
            <text:p>0,00144953703703704000</text:p>
          </table:table-cell>
          <table:table-cell table:formula="of:=[.D204]-[.D20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62" office:value-type="float" office:value="12586" calcext:value-type="float">
            <text:p>12586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45671296296296" calcext:value-type="float">
            <text:p>0,00145671296296296000</text:p>
          </table:table-cell>
          <table:table-cell table:formula="of:=[.D205]-[.D204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62" office:value-type="float" office:value="12648" calcext:value-type="float">
            <text:p>12648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46388888888889" calcext:value-type="float">
            <text:p>0,00146388888888889000</text:p>
          </table:table-cell>
          <table:table-cell table:formula="of:=[.D206]-[.D205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62" office:value-type="float" office:value="12710" calcext:value-type="float">
            <text:p>1271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47106481481481" calcext:value-type="float">
            <text:p>0,00147106481481481000</text:p>
          </table:table-cell>
          <table:table-cell table:formula="of:=[.D207]-[.D206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62" office:value-type="float" office:value="12772" calcext:value-type="float">
            <text:p>12772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47824074074074" calcext:value-type="float">
            <text:p>0,00147824074074074000</text:p>
          </table:table-cell>
          <table:table-cell table:formula="of:=[.D208]-[.D207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62" office:value-type="float" office:value="12834" calcext:value-type="float">
            <text:p>12834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48541666666667" calcext:value-type="float">
            <text:p>0,00148541666666667000</text:p>
          </table:table-cell>
          <table:table-cell table:formula="of:=[.D209]-[.D20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62" office:value-type="float" office:value="12896" calcext:value-type="float">
            <text:p>12896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49259259259259" calcext:value-type="float">
            <text:p>0,00149259259259259000</text:p>
          </table:table-cell>
          <table:table-cell table:formula="of:=[.D210]-[.D209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62" office:value-type="float" office:value="12958" calcext:value-type="float">
            <text:p>12958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49976851851852" calcext:value-type="float">
            <text:p>0,00149976851851852000</text:p>
          </table:table-cell>
          <table:table-cell table:formula="of:=[.D211]-[.D210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62" office:value-type="float" office:value="13020" calcext:value-type="float">
            <text:p>1302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50694444444444" calcext:value-type="float">
            <text:p>0,00150694444444444000</text:p>
          </table:table-cell>
          <table:table-cell table:formula="of:=[.D212]-[.D211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62" office:value-type="float" office:value="13082" calcext:value-type="float">
            <text:p>13082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51412037037037" calcext:value-type="float">
            <text:p>0,00151412037037037000</text:p>
          </table:table-cell>
          <table:table-cell table:formula="of:=[.D213]-[.D212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62" office:value-type="float" office:value="13144" calcext:value-type="float">
            <text:p>13144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5212962962963" calcext:value-type="float">
            <text:p>0,00152129629629630000</text:p>
          </table:table-cell>
          <table:table-cell table:formula="of:=[.D214]-[.D21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62" office:value-type="float" office:value="13206" calcext:value-type="float">
            <text:p>13206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52847222222222" calcext:value-type="float">
            <text:p>0,00152847222222222000</text:p>
          </table:table-cell>
          <table:table-cell table:formula="of:=[.D215]-[.D214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62" office:value-type="float" office:value="13268" calcext:value-type="float">
            <text:p>13268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53564814814815" calcext:value-type="float">
            <text:p>0,00153564814814815000</text:p>
          </table:table-cell>
          <table:table-cell table:formula="of:=[.D216]-[.D215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62" office:value-type="float" office:value="13330" calcext:value-type="float">
            <text:p>1333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54282407407407" calcext:value-type="float">
            <text:p>0,00154282407407407000</text:p>
          </table:table-cell>
          <table:table-cell table:formula="of:=[.D217]-[.D216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62" office:value-type="float" office:value="13392" calcext:value-type="float">
            <text:p>13392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55" calcext:value-type="float">
            <text:p>0,00155000000000000000</text:p>
          </table:table-cell>
          <table:table-cell table:formula="of:=[.D218]-[.D217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62" office:value-type="float" office:value="13454" calcext:value-type="float">
            <text:p>13454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55717592592593" calcext:value-type="float">
            <text:p>0,00155717592592593000</text:p>
          </table:table-cell>
          <table:table-cell table:formula="of:=[.D219]-[.D21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62" office:value-type="float" office:value="13516" calcext:value-type="float">
            <text:p>13516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56435185185185" calcext:value-type="float">
            <text:p>0,00156435185185185000</text:p>
          </table:table-cell>
          <table:table-cell table:formula="of:=[.D220]-[.D219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62" office:value-type="float" office:value="13578" calcext:value-type="float">
            <text:p>13578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57152777777778" calcext:value-type="float">
            <text:p>0,00157152777777778000</text:p>
          </table:table-cell>
          <table:table-cell table:formula="of:=[.D221]-[.D220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62" office:value-type="float" office:value="13640" calcext:value-type="float">
            <text:p>1364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5787037037037" calcext:value-type="float">
            <text:p>0,00157870370370370000</text:p>
          </table:table-cell>
          <table:table-cell table:formula="of:=[.D222]-[.D221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62" office:value-type="float" office:value="13702" calcext:value-type="float">
            <text:p>13702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58587962962963" calcext:value-type="float">
            <text:p>0,00158587962962963000</text:p>
          </table:table-cell>
          <table:table-cell table:formula="of:=[.D223]-[.D222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62" office:value-type="float" office:value="13764" calcext:value-type="float">
            <text:p>13764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59305555555556" calcext:value-type="float">
            <text:p>0,00159305555555556000</text:p>
          </table:table-cell>
          <table:table-cell table:formula="of:=[.D224]-[.D22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62" office:value-type="float" office:value="13826" calcext:value-type="float">
            <text:p>13826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60023148148148" calcext:value-type="float">
            <text:p>0,00160023148148148000</text:p>
          </table:table-cell>
          <table:table-cell table:formula="of:=[.D225]-[.D224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62" office:value-type="float" office:value="13888" calcext:value-type="float">
            <text:p>13888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60740740740741" calcext:value-type="float">
            <text:p>0,00160740740740741000</text:p>
          </table:table-cell>
          <table:table-cell table:formula="of:=[.D226]-[.D225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62" office:value-type="float" office:value="13950" calcext:value-type="float">
            <text:p>139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61458333333333" calcext:value-type="float">
            <text:p>0,00161458333333333000</text:p>
          </table:table-cell>
          <table:table-cell table:formula="of:=[.D227]-[.D226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62" office:value-type="float" office:value="14012" calcext:value-type="float">
            <text:p>14012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62175925925926" calcext:value-type="float">
            <text:p>0,00162175925925926000</text:p>
          </table:table-cell>
          <table:table-cell table:formula="of:=[.D228]-[.D227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62" office:value-type="float" office:value="14074" calcext:value-type="float">
            <text:p>14074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62893518518519" calcext:value-type="float">
            <text:p>0,00162893518518518000</text:p>
          </table:table-cell>
          <table:table-cell table:formula="of:=[.D229]-[.D22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62" office:value-type="float" office:value="14136" calcext:value-type="float">
            <text:p>14136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63611111111111" calcext:value-type="float">
            <text:p>0,00163611111111111000</text:p>
          </table:table-cell>
          <table:table-cell table:formula="of:=[.D230]-[.D229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62" office:value-type="float" office:value="14198" calcext:value-type="float">
            <text:p>14198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64328703703704" calcext:value-type="float">
            <text:p>0,00164328703703704000</text:p>
          </table:table-cell>
          <table:table-cell table:formula="of:=[.D231]-[.D230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62" office:value-type="float" office:value="14260" calcext:value-type="float">
            <text:p>1426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65046296296296" calcext:value-type="float">
            <text:p>0,00165046296296296000</text:p>
          </table:table-cell>
          <table:table-cell table:formula="of:=[.D232]-[.D231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62" office:value-type="float" office:value="14322" calcext:value-type="float">
            <text:p>14322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65763888888889" calcext:value-type="float">
            <text:p>0,00165763888888889000</text:p>
          </table:table-cell>
          <table:table-cell table:formula="of:=[.D233]-[.D232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62" office:value-type="float" office:value="14384" calcext:value-type="float">
            <text:p>14384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66481481481481" calcext:value-type="float">
            <text:p>0,00166481481481481000</text:p>
          </table:table-cell>
          <table:table-cell table:formula="of:=[.D234]-[.D23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62" office:value-type="float" office:value="14446" calcext:value-type="float">
            <text:p>14446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67199074074074" calcext:value-type="float">
            <text:p>0,00167199074074074000</text:p>
          </table:table-cell>
          <table:table-cell table:formula="of:=[.D235]-[.D234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62" office:value-type="float" office:value="14508" calcext:value-type="float">
            <text:p>14508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67916666666667" calcext:value-type="float">
            <text:p>0,00167916666666667000</text:p>
          </table:table-cell>
          <table:table-cell table:formula="of:=[.D236]-[.D235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62" office:value-type="float" office:value="14570" calcext:value-type="float">
            <text:p>1457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68634259259259" calcext:value-type="float">
            <text:p>0,00168634259259259000</text:p>
          </table:table-cell>
          <table:table-cell table:formula="of:=[.D237]-[.D236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62" office:value-type="float" office:value="14632" calcext:value-type="float">
            <text:p>14632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69351851851852" calcext:value-type="float">
            <text:p>0,00169351851851852000</text:p>
          </table:table-cell>
          <table:table-cell table:formula="of:=[.D238]-[.D237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62" office:value-type="float" office:value="14694" calcext:value-type="float">
            <text:p>14694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70069444444444" calcext:value-type="float">
            <text:p>0,00170069444444444000</text:p>
          </table:table-cell>
          <table:table-cell table:formula="of:=[.D239]-[.D23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62" office:value-type="float" office:value="14756" calcext:value-type="float">
            <text:p>14756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70787037037037" calcext:value-type="float">
            <text:p>0,00170787037037037000</text:p>
          </table:table-cell>
          <table:table-cell table:formula="of:=[.D240]-[.D239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62" office:value-type="float" office:value="14818" calcext:value-type="float">
            <text:p>14818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7150462962963" calcext:value-type="float">
            <text:p>0,00171504629629630000</text:p>
          </table:table-cell>
          <table:table-cell table:formula="of:=[.D241]-[.D240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62" office:value-type="float" office:value="14880" calcext:value-type="float">
            <text:p>1488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72222222222222" calcext:value-type="float">
            <text:p>0,00172222222222222000</text:p>
          </table:table-cell>
          <table:table-cell table:formula="of:=[.D242]-[.D241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62" office:value-type="float" office:value="14942" calcext:value-type="float">
            <text:p>14942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72939814814815" calcext:value-type="float">
            <text:p>0,00172939814814815000</text:p>
          </table:table-cell>
          <table:table-cell table:formula="of:=[.D243]-[.D242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62" office:value-type="float" office:value="15004" calcext:value-type="float">
            <text:p>15004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73657407407407" calcext:value-type="float">
            <text:p>0,00173657407407407000</text:p>
          </table:table-cell>
          <table:table-cell table:formula="of:=[.D244]-[.D24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62" office:value-type="float" office:value="15066" calcext:value-type="float">
            <text:p>15066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74375" calcext:value-type="float">
            <text:p>0,00174375000000000000</text:p>
          </table:table-cell>
          <table:table-cell table:formula="of:=[.D245]-[.D244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62" office:value-type="float" office:value="15128" calcext:value-type="float">
            <text:p>15128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75092592592593" calcext:value-type="float">
            <text:p>0,00175092592592593000</text:p>
          </table:table-cell>
          <table:table-cell table:formula="of:=[.D246]-[.D245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62" office:value-type="float" office:value="15190" calcext:value-type="float">
            <text:p>1519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75810185185185" calcext:value-type="float">
            <text:p>0,00175810185185185000</text:p>
          </table:table-cell>
          <table:table-cell table:formula="of:=[.D247]-[.D246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62" office:value-type="float" office:value="15252" calcext:value-type="float">
            <text:p>15252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76527777777778" calcext:value-type="float">
            <text:p>0,00176527777777778000</text:p>
          </table:table-cell>
          <table:table-cell table:formula="of:=[.D248]-[.D247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62" office:value-type="float" office:value="15314" calcext:value-type="float">
            <text:p>15314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7724537037037" calcext:value-type="float">
            <text:p>0,00177245370370370000</text:p>
          </table:table-cell>
          <table:table-cell table:formula="of:=[.D249]-[.D24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62" office:value-type="float" office:value="15376" calcext:value-type="float">
            <text:p>15376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77962962962963" calcext:value-type="float">
            <text:p>0,00177962962962963000</text:p>
          </table:table-cell>
          <table:table-cell table:formula="of:=[.D250]-[.D249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62" office:value-type="float" office:value="15438" calcext:value-type="float">
            <text:p>15438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78680555555556" calcext:value-type="float">
            <text:p>0,00178680555555556000</text:p>
          </table:table-cell>
          <table:table-cell table:formula="of:=[.D251]-[.D250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62" office:value-type="float" office:value="15500" calcext:value-type="float">
            <text:p>15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79398148148148" calcext:value-type="float">
            <text:p>0,00179398148148148000</text:p>
          </table:table-cell>
          <table:table-cell table:formula="of:=[.D252]-[.D251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62" office:value-type="float" office:value="15562" calcext:value-type="float">
            <text:p>15562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80115740740741" calcext:value-type="float">
            <text:p>0,00180115740740741000</text:p>
          </table:table-cell>
          <table:table-cell table:formula="of:=[.D253]-[.D252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62" office:value-type="float" office:value="15624" calcext:value-type="float">
            <text:p>15624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80833333333333" calcext:value-type="float">
            <text:p>0,00180833333333333000</text:p>
          </table:table-cell>
          <table:table-cell table:formula="of:=[.D254]-[.D25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62" office:value-type="float" office:value="15686" calcext:value-type="float">
            <text:p>15686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81550925925926" calcext:value-type="float">
            <text:p>0,00181550925925926000</text:p>
          </table:table-cell>
          <table:table-cell table:formula="of:=[.D255]-[.D254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62" office:value-type="float" office:value="15748" calcext:value-type="float">
            <text:p>15748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82268518518519" calcext:value-type="float">
            <text:p>0,00182268518518519000</text:p>
          </table:table-cell>
          <table:table-cell table:formula="of:=[.D256]-[.D255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62" office:value-type="float" office:value="15810" calcext:value-type="float">
            <text:p>1581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82986111111111" calcext:value-type="float">
            <text:p>0,00182986111111111000</text:p>
          </table:table-cell>
          <table:table-cell table:formula="of:=[.D257]-[.D256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62" office:value-type="float" office:value="15872" calcext:value-type="float">
            <text:p>15872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83703703703704" calcext:value-type="float">
            <text:p>0,00183703703703704000</text:p>
          </table:table-cell>
          <table:table-cell table:formula="of:=[.D258]-[.D257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62" office:value-type="float" office:value="15934" calcext:value-type="float">
            <text:p>15934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84421296296296" calcext:value-type="float">
            <text:p>0,00184421296296296000</text:p>
          </table:table-cell>
          <table:table-cell table:formula="of:=[.D259]-[.D25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62" office:value-type="float" office:value="15996" calcext:value-type="float">
            <text:p>15996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85138888888889" calcext:value-type="float">
            <text:p>0,00185138888888889000</text:p>
          </table:table-cell>
          <table:table-cell table:formula="of:=[.D260]-[.D259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62" office:value-type="float" office:value="16058" calcext:value-type="float">
            <text:p>16058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85856481481481" calcext:value-type="float">
            <text:p>0,00185856481481481000</text:p>
          </table:table-cell>
          <table:table-cell table:formula="of:=[.D261]-[.D260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62" office:value-type="float" office:value="16120" calcext:value-type="float">
            <text:p>1612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86574074074074" calcext:value-type="float">
            <text:p>0,00186574074074074000</text:p>
          </table:table-cell>
          <table:table-cell table:formula="of:=[.D262]-[.D261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62" office:value-type="float" office:value="16182" calcext:value-type="float">
            <text:p>16182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87291666666667" calcext:value-type="float">
            <text:p>0,00187291666666667000</text:p>
          </table:table-cell>
          <table:table-cell table:formula="of:=[.D263]-[.D262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62" office:value-type="float" office:value="16244" calcext:value-type="float">
            <text:p>16244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88009259259259" calcext:value-type="float">
            <text:p>0,00188009259259259000</text:p>
          </table:table-cell>
          <table:table-cell table:formula="of:=[.D264]-[.D26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62" office:value-type="float" office:value="16306" calcext:value-type="float">
            <text:p>16306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88726851851852" calcext:value-type="float">
            <text:p>0,00188726851851852000</text:p>
          </table:table-cell>
          <table:table-cell table:formula="of:=[.D265]-[.D264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62" office:value-type="float" office:value="16368" calcext:value-type="float">
            <text:p>16368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89444444444444" calcext:value-type="float">
            <text:p>0,00189444444444444000</text:p>
          </table:table-cell>
          <table:table-cell table:formula="of:=[.D266]-[.D265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62" office:value-type="float" office:value="16430" calcext:value-type="float">
            <text:p>1643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90162037037037" calcext:value-type="float">
            <text:p>0,00190162037037037000</text:p>
          </table:table-cell>
          <table:table-cell table:formula="of:=[.D267]-[.D266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62" office:value-type="float" office:value="16492" calcext:value-type="float">
            <text:p>16492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9087962962963" calcext:value-type="float">
            <text:p>0,00190879629629630000</text:p>
          </table:table-cell>
          <table:table-cell table:formula="of:=[.D268]-[.D267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62" office:value-type="float" office:value="16554" calcext:value-type="float">
            <text:p>16554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91597222222222" calcext:value-type="float">
            <text:p>0,00191597222222222000</text:p>
          </table:table-cell>
          <table:table-cell table:formula="of:=[.D269]-[.D26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62" office:value-type="float" office:value="16616" calcext:value-type="float">
            <text:p>16616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92314814814815" calcext:value-type="float">
            <text:p>0,00192314814814815000</text:p>
          </table:table-cell>
          <table:table-cell table:formula="of:=[.D270]-[.D269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62" office:value-type="float" office:value="16678" calcext:value-type="float">
            <text:p>16678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93032407407407" calcext:value-type="float">
            <text:p>0,00193032407407407000</text:p>
          </table:table-cell>
          <table:table-cell table:formula="of:=[.D271]-[.D270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62" office:value-type="float" office:value="16740" calcext:value-type="float">
            <text:p>1674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9375" calcext:value-type="float">
            <text:p>0,00193750000000000000</text:p>
          </table:table-cell>
          <table:table-cell table:formula="of:=[.D272]-[.D271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62" office:value-type="float" office:value="16802" calcext:value-type="float">
            <text:p>16802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94467592592593" calcext:value-type="float">
            <text:p>0,00194467592592593000</text:p>
          </table:table-cell>
          <table:table-cell table:formula="of:=[.D273]-[.D272]" office:value-type="float" office:value="0.00000717592592592588" calcext:value-type="float">
            <text:p>0,00000717592592592588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62" office:value-type="float" office:value="16864" calcext:value-type="float">
            <text:p>16864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95185185185185" calcext:value-type="float">
            <text:p>0,00195185185185185000</text:p>
          </table:table-cell>
          <table:table-cell table:formula="of:=[.D274]-[.D27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62" office:value-type="float" office:value="16926" calcext:value-type="float">
            <text:p>16926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95902777777778" calcext:value-type="float">
            <text:p>0,00195902777777778000</text:p>
          </table:table-cell>
          <table:table-cell table:formula="of:=[.D275]-[.D274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62" office:value-type="float" office:value="16988" calcext:value-type="float">
            <text:p>16988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9662037037037" calcext:value-type="float">
            <text:p>0,00196620370370370000</text:p>
          </table:table-cell>
          <table:table-cell table:formula="of:=[.D276]-[.D275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62" office:value-type="float" office:value="17050" calcext:value-type="float">
            <text:p>1705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97337962962963" calcext:value-type="float">
            <text:p>0,00197337962962963000</text:p>
          </table:table-cell>
          <table:table-cell table:formula="of:=[.D277]-[.D276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62" office:value-type="float" office:value="17112" calcext:value-type="float">
            <text:p>17112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98055555555556" calcext:value-type="float">
            <text:p>0,00198055555555556000</text:p>
          </table:table-cell>
          <table:table-cell table:formula="of:=[.D278]-[.D277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62" office:value-type="float" office:value="17174" calcext:value-type="float">
            <text:p>17174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98773148148148" calcext:value-type="float">
            <text:p>0,00198773148148148000</text:p>
          </table:table-cell>
          <table:table-cell table:formula="of:=[.D279]-[.D27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62" office:value-type="float" office:value="17236" calcext:value-type="float">
            <text:p>17236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99490740740741" calcext:value-type="float">
            <text:p>0,00199490740740741000</text:p>
          </table:table-cell>
          <table:table-cell table:formula="of:=[.D280]-[.D279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62" office:value-type="float" office:value="17298" calcext:value-type="float">
            <text:p>17298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00208333333333" calcext:value-type="float">
            <text:p>0,00200208333333333000</text:p>
          </table:table-cell>
          <table:table-cell table:formula="of:=[.D281]-[.D280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62" office:value-type="float" office:value="17360" calcext:value-type="float">
            <text:p>1736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00925925925926" calcext:value-type="float">
            <text:p>0,00200925925925926000</text:p>
          </table:table-cell>
          <table:table-cell table:formula="of:=[.D282]-[.D281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62" office:value-type="float" office:value="17422" calcext:value-type="float">
            <text:p>17422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01643518518519" calcext:value-type="float">
            <text:p>0,00201643518518519000</text:p>
          </table:table-cell>
          <table:table-cell table:formula="of:=[.D283]-[.D282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62" office:value-type="float" office:value="17484" calcext:value-type="float">
            <text:p>17484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02361111111111" calcext:value-type="float">
            <text:p>0,00202361111111111000</text:p>
          </table:table-cell>
          <table:table-cell table:formula="of:=[.D284]-[.D28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62" office:value-type="float" office:value="17546" calcext:value-type="float">
            <text:p>17546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03078703703704" calcext:value-type="float">
            <text:p>0,00203078703703704000</text:p>
          </table:table-cell>
          <table:table-cell table:formula="of:=[.D285]-[.D284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62" office:value-type="float" office:value="17608" calcext:value-type="float">
            <text:p>17608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03796296296296" calcext:value-type="float">
            <text:p>0,00203796296296296000</text:p>
          </table:table-cell>
          <table:table-cell table:formula="of:=[.D286]-[.D285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62" office:value-type="float" office:value="17670" calcext:value-type="float">
            <text:p>1767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04513888888889" calcext:value-type="float">
            <text:p>0,00204513888888889000</text:p>
          </table:table-cell>
          <table:table-cell table:formula="of:=[.D287]-[.D286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62" office:value-type="float" office:value="17732" calcext:value-type="float">
            <text:p>17732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05231481481482" calcext:value-type="float">
            <text:p>0,00205231481481482000</text:p>
          </table:table-cell>
          <table:table-cell table:formula="of:=[.D288]-[.D287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62" office:value-type="float" office:value="17794" calcext:value-type="float">
            <text:p>17794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05949074074074" calcext:value-type="float">
            <text:p>0,00205949074074074000</text:p>
          </table:table-cell>
          <table:table-cell table:formula="of:=[.D289]-[.D28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62" office:value-type="float" office:value="17856" calcext:value-type="float">
            <text:p>17856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06666666666667" calcext:value-type="float">
            <text:p>0,00206666666666667000</text:p>
          </table:table-cell>
          <table:table-cell table:formula="of:=[.D290]-[.D289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62" office:value-type="float" office:value="17918" calcext:value-type="float">
            <text:p>17918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07384259259259" calcext:value-type="float">
            <text:p>0,00207384259259259000</text:p>
          </table:table-cell>
          <table:table-cell table:formula="of:=[.D291]-[.D290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62" office:value-type="float" office:value="17980" calcext:value-type="float">
            <text:p>1798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08101851851852" calcext:value-type="float">
            <text:p>0,00208101851851852000</text:p>
          </table:table-cell>
          <table:table-cell table:formula="of:=[.D292]-[.D291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62" office:value-type="float" office:value="18042" calcext:value-type="float">
            <text:p>18042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08819444444444" calcext:value-type="float">
            <text:p>0,00208819444444444000</text:p>
          </table:table-cell>
          <table:table-cell table:formula="of:=[.D293]-[.D292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62" office:value-type="float" office:value="18104" calcext:value-type="float">
            <text:p>18104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09537037037037" calcext:value-type="float">
            <text:p>0,00209537037037037000</text:p>
          </table:table-cell>
          <table:table-cell table:formula="of:=[.D294]-[.D29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62" office:value-type="float" office:value="18166" calcext:value-type="float">
            <text:p>18166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1025462962963" calcext:value-type="float">
            <text:p>0,00210254629629630000</text:p>
          </table:table-cell>
          <table:table-cell table:formula="of:=[.D295]-[.D294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62" office:value-type="float" office:value="18228" calcext:value-type="float">
            <text:p>18228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10972222222222" calcext:value-type="float">
            <text:p>0,00210972222222222000</text:p>
          </table:table-cell>
          <table:table-cell table:formula="of:=[.D296]-[.D295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62" office:value-type="float" office:value="18290" calcext:value-type="float">
            <text:p>1829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11689814814815" calcext:value-type="float">
            <text:p>0,00211689814814815000</text:p>
          </table:table-cell>
          <table:table-cell table:formula="of:=[.D297]-[.D296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62" office:value-type="float" office:value="18352" calcext:value-type="float">
            <text:p>18352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12407407407407" calcext:value-type="float">
            <text:p>0,00212407407407407000</text:p>
          </table:table-cell>
          <table:table-cell table:formula="of:=[.D298]-[.D297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62" office:value-type="float" office:value="18414" calcext:value-type="float">
            <text:p>18414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13125" calcext:value-type="float">
            <text:p>0,00213125000000000000</text:p>
          </table:table-cell>
          <table:table-cell table:formula="of:=[.D299]-[.D29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62" office:value-type="float" office:value="18476" calcext:value-type="float">
            <text:p>18476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13842592592593" calcext:value-type="float">
            <text:p>0,00213842592592593000</text:p>
          </table:table-cell>
          <table:table-cell table:formula="of:=[.D300]-[.D299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62" office:value-type="float" office:value="18538" calcext:value-type="float">
            <text:p>18538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14560185185185" calcext:value-type="float">
            <text:p>0,00214560185185185000</text:p>
          </table:table-cell>
          <table:table-cell table:formula="of:=[.D301]-[.D300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62" office:value-type="float" office:value="18600" calcext:value-type="float">
            <text:p>186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15277777777778" calcext:value-type="float">
            <text:p>0,00215277777777778000</text:p>
          </table:table-cell>
          <table:table-cell table:formula="of:=[.D302]-[.D301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62" office:value-type="float" office:value="18662" calcext:value-type="float">
            <text:p>18662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1599537037037" calcext:value-type="float">
            <text:p>0,00215995370370370000</text:p>
          </table:table-cell>
          <table:table-cell table:formula="of:=[.D303]-[.D302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62" office:value-type="float" office:value="18724" calcext:value-type="float">
            <text:p>18724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16712962962963" calcext:value-type="float">
            <text:p>0,00216712962962963000</text:p>
          </table:table-cell>
          <table:table-cell table:formula="of:=[.D304]-[.D30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62" office:value-type="float" office:value="18786" calcext:value-type="float">
            <text:p>18786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17430555555556" calcext:value-type="float">
            <text:p>0,00217430555555556000</text:p>
          </table:table-cell>
          <table:table-cell table:formula="of:=[.D305]-[.D304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62" office:value-type="float" office:value="18848" calcext:value-type="float">
            <text:p>18848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18148148148148" calcext:value-type="float">
            <text:p>0,00218148148148148000</text:p>
          </table:table-cell>
          <table:table-cell table:formula="of:=[.D306]-[.D305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62" office:value-type="float" office:value="18910" calcext:value-type="float">
            <text:p>1891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18865740740741" calcext:value-type="float">
            <text:p>0,00218865740740741000</text:p>
          </table:table-cell>
          <table:table-cell table:formula="of:=[.D307]-[.D306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62" office:value-type="float" office:value="18972" calcext:value-type="float">
            <text:p>18972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19583333333333" calcext:value-type="float">
            <text:p>0,00219583333333333000</text:p>
          </table:table-cell>
          <table:table-cell table:formula="of:=[.D308]-[.D307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62" office:value-type="float" office:value="19034" calcext:value-type="float">
            <text:p>19034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20300925925926" calcext:value-type="float">
            <text:p>0,00220300925925926000</text:p>
          </table:table-cell>
          <table:table-cell table:formula="of:=[.D309]-[.D30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62" office:value-type="float" office:value="19096" calcext:value-type="float">
            <text:p>19096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221018518518519" calcext:value-type="float">
            <text:p>0,00221018518518519000</text:p>
          </table:table-cell>
          <table:table-cell table:formula="of:=[.D310]-[.D309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62" office:value-type="float" office:value="19158" calcext:value-type="float">
            <text:p>19158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21736111111111" calcext:value-type="float">
            <text:p>0,00221736111111111000</text:p>
          </table:table-cell>
          <table:table-cell table:formula="of:=[.D311]-[.D310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62" office:value-type="float" office:value="19220" calcext:value-type="float">
            <text:p>1922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22453703703704" calcext:value-type="float">
            <text:p>0,00222453703703704000</text:p>
          </table:table-cell>
          <table:table-cell table:formula="of:=[.D312]-[.D311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62" office:value-type="float" office:value="19282" calcext:value-type="float">
            <text:p>19282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23171296296296" calcext:value-type="float">
            <text:p>0,00223171296296296000</text:p>
          </table:table-cell>
          <table:table-cell table:formula="of:=[.D313]-[.D312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62" office:value-type="float" office:value="19344" calcext:value-type="float">
            <text:p>19344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223888888888889" calcext:value-type="float">
            <text:p>0,00223888888888889000</text:p>
          </table:table-cell>
          <table:table-cell table:formula="of:=[.D314]-[.D31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62" office:value-type="float" office:value="19406" calcext:value-type="float">
            <text:p>19406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224606481481482" calcext:value-type="float">
            <text:p>0,00224606481481482000</text:p>
          </table:table-cell>
          <table:table-cell table:formula="of:=[.D315]-[.D314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62" office:value-type="float" office:value="19468" calcext:value-type="float">
            <text:p>19468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225324074074074" calcext:value-type="float">
            <text:p>0,00225324074074074000</text:p>
          </table:table-cell>
          <table:table-cell table:formula="of:=[.D316]-[.D315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62" office:value-type="float" office:value="19530" calcext:value-type="float">
            <text:p>1953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26041666666667" calcext:value-type="float">
            <text:p>0,00226041666666667000</text:p>
          </table:table-cell>
          <table:table-cell table:formula="of:=[.D317]-[.D316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62" office:value-type="float" office:value="19592" calcext:value-type="float">
            <text:p>19592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226759259259259" calcext:value-type="float">
            <text:p>0,00226759259259259000</text:p>
          </table:table-cell>
          <table:table-cell table:formula="of:=[.D318]-[.D317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62" office:value-type="float" office:value="19654" calcext:value-type="float">
            <text:p>19654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227476851851852" calcext:value-type="float">
            <text:p>0,00227476851851852000</text:p>
          </table:table-cell>
          <table:table-cell table:formula="of:=[.D319]-[.D31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62" office:value-type="float" office:value="19716" calcext:value-type="float">
            <text:p>19716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228194444444444" calcext:value-type="float">
            <text:p>0,00228194444444444000</text:p>
          </table:table-cell>
          <table:table-cell table:formula="of:=[.D320]-[.D319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62" office:value-type="float" office:value="19778" calcext:value-type="float">
            <text:p>19778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228912037037037" calcext:value-type="float">
            <text:p>0,00228912037037037000</text:p>
          </table:table-cell>
          <table:table-cell table:formula="of:=[.D321]-[.D320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62" office:value-type="float" office:value="19840" calcext:value-type="float">
            <text:p>1984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2962962962963" calcext:value-type="float">
            <text:p>0,00229629629629630000</text:p>
          </table:table-cell>
          <table:table-cell table:formula="of:=[.D322]-[.D321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62" office:value-type="float" office:value="19902" calcext:value-type="float">
            <text:p>19902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230347222222222" calcext:value-type="float">
            <text:p>0,00230347222222222000</text:p>
          </table:table-cell>
          <table:table-cell table:formula="of:=[.D323]-[.D322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62" office:value-type="float" office:value="19964" calcext:value-type="float">
            <text:p>19964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231064814814815" calcext:value-type="float">
            <text:p>0,00231064814814815000</text:p>
          </table:table-cell>
          <table:table-cell table:formula="of:=[.D324]-[.D32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62" office:value-type="float" office:value="20026" calcext:value-type="float">
            <text:p>20026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231782407407407" calcext:value-type="float">
            <text:p>0,00231782407407407000</text:p>
          </table:table-cell>
          <table:table-cell table:formula="of:=[.D325]-[.D324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62" office:value-type="float" office:value="20088" calcext:value-type="float">
            <text:p>20088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2325" calcext:value-type="float">
            <text:p>0,00232500000000000000</text:p>
          </table:table-cell>
          <table:table-cell table:formula="of:=[.D326]-[.D325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62" office:value-type="float" office:value="20150" calcext:value-type="float">
            <text:p>2015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233217592592593" calcext:value-type="float">
            <text:p>0,00233217592592593000</text:p>
          </table:table-cell>
          <table:table-cell table:formula="of:=[.D327]-[.D326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62" office:value-type="float" office:value="20212" calcext:value-type="float">
            <text:p>20212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233935185185185" calcext:value-type="float">
            <text:p>0,00233935185185185000</text:p>
          </table:table-cell>
          <table:table-cell table:formula="of:=[.D328]-[.D327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62" office:value-type="float" office:value="20274" calcext:value-type="float">
            <text:p>20274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234652777777778" calcext:value-type="float">
            <text:p>0,00234652777777778000</text:p>
          </table:table-cell>
          <table:table-cell table:formula="of:=[.D329]-[.D32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62" office:value-type="float" office:value="20336" calcext:value-type="float">
            <text:p>20336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23537037037037" calcext:value-type="float">
            <text:p>0,00235370370370370000</text:p>
          </table:table-cell>
          <table:table-cell table:formula="of:=[.D330]-[.D329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62" office:value-type="float" office:value="20398" calcext:value-type="float">
            <text:p>20398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236087962962963" calcext:value-type="float">
            <text:p>0,00236087962962963000</text:p>
          </table:table-cell>
          <table:table-cell table:formula="of:=[.D331]-[.D330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62" office:value-type="float" office:value="20460" calcext:value-type="float">
            <text:p>2046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236805555555556" calcext:value-type="float">
            <text:p>0,00236805555555556000</text:p>
          </table:table-cell>
          <table:table-cell table:formula="of:=[.D332]-[.D331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62" office:value-type="float" office:value="20522" calcext:value-type="float">
            <text:p>20522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237523148148148" calcext:value-type="float">
            <text:p>0,00237523148148148000</text:p>
          </table:table-cell>
          <table:table-cell table:formula="of:=[.D333]-[.D332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62" office:value-type="float" office:value="20584" calcext:value-type="float">
            <text:p>20584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238240740740741" calcext:value-type="float">
            <text:p>0,00238240740740741000</text:p>
          </table:table-cell>
          <table:table-cell table:formula="of:=[.D334]-[.D33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62" office:value-type="float" office:value="20646" calcext:value-type="float">
            <text:p>20646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238958333333333" calcext:value-type="float">
            <text:p>0,00238958333333333000</text:p>
          </table:table-cell>
          <table:table-cell table:formula="of:=[.D335]-[.D334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62" office:value-type="float" office:value="20708" calcext:value-type="float">
            <text:p>20708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239675925925926" calcext:value-type="float">
            <text:p>0,00239675925925926000</text:p>
          </table:table-cell>
          <table:table-cell table:formula="of:=[.D336]-[.D335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62" office:value-type="float" office:value="20770" calcext:value-type="float">
            <text:p>2077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240393518518519" calcext:value-type="float">
            <text:p>0,00240393518518519000</text:p>
          </table:table-cell>
          <table:table-cell table:formula="of:=[.D337]-[.D336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62" office:value-type="float" office:value="20832" calcext:value-type="float">
            <text:p>20832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241111111111111" calcext:value-type="float">
            <text:p>0,00241111111111111000</text:p>
          </table:table-cell>
          <table:table-cell table:formula="of:=[.D338]-[.D337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62" office:value-type="float" office:value="20894" calcext:value-type="float">
            <text:p>20894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241828703703704" calcext:value-type="float">
            <text:p>0,00241828703703704000</text:p>
          </table:table-cell>
          <table:table-cell table:formula="of:=[.D339]-[.D33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62" office:value-type="float" office:value="20956" calcext:value-type="float">
            <text:p>20956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242546296296296" calcext:value-type="float">
            <text:p>0,00242546296296296000</text:p>
          </table:table-cell>
          <table:table-cell table:formula="of:=[.D340]-[.D339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62" office:value-type="float" office:value="21018" calcext:value-type="float">
            <text:p>21018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243263888888889" calcext:value-type="float">
            <text:p>0,00243263888888889000</text:p>
          </table:table-cell>
          <table:table-cell table:formula="of:=[.D341]-[.D340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62" office:value-type="float" office:value="21080" calcext:value-type="float">
            <text:p>2108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243981481481482" calcext:value-type="float">
            <text:p>0,00243981481481482000</text:p>
          </table:table-cell>
          <table:table-cell table:formula="of:=[.D342]-[.D341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62" office:value-type="float" office:value="21142" calcext:value-type="float">
            <text:p>21142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244699074074074" calcext:value-type="float">
            <text:p>0,00244699074074074000</text:p>
          </table:table-cell>
          <table:table-cell table:formula="of:=[.D343]-[.D342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62" office:value-type="float" office:value="21204" calcext:value-type="float">
            <text:p>21204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245416666666667" calcext:value-type="float">
            <text:p>0,00245416666666667000</text:p>
          </table:table-cell>
          <table:table-cell table:formula="of:=[.D344]-[.D34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62" office:value-type="float" office:value="21266" calcext:value-type="float">
            <text:p>21266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246134259259259" calcext:value-type="float">
            <text:p>0,00246134259259259000</text:p>
          </table:table-cell>
          <table:table-cell table:formula="of:=[.D345]-[.D344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62" office:value-type="float" office:value="21328" calcext:value-type="float">
            <text:p>21328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246851851851852" calcext:value-type="float">
            <text:p>0,00246851851851852000</text:p>
          </table:table-cell>
          <table:table-cell table:formula="of:=[.D346]-[.D345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62" office:value-type="float" office:value="21390" calcext:value-type="float">
            <text:p>2139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247569444444444" calcext:value-type="float">
            <text:p>0,00247569444444444000</text:p>
          </table:table-cell>
          <table:table-cell table:formula="of:=[.D347]-[.D346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62" office:value-type="float" office:value="21452" calcext:value-type="float">
            <text:p>21452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248287037037037" calcext:value-type="float">
            <text:p>0,00248287037037037000</text:p>
          </table:table-cell>
          <table:table-cell table:formula="of:=[.D348]-[.D347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62" office:value-type="float" office:value="21514" calcext:value-type="float">
            <text:p>21514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24900462962963" calcext:value-type="float">
            <text:p>0,00249004629629630000</text:p>
          </table:table-cell>
          <table:table-cell table:formula="of:=[.D349]-[.D34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62" office:value-type="float" office:value="21576" calcext:value-type="float">
            <text:p>21576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249722222222222" calcext:value-type="float">
            <text:p>0,00249722222222222000</text:p>
          </table:table-cell>
          <table:table-cell table:formula="of:=[.D350]-[.D349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62" office:value-type="float" office:value="21638" calcext:value-type="float">
            <text:p>21638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250439814814815" calcext:value-type="float">
            <text:p>0,00250439814814815000</text:p>
          </table:table-cell>
          <table:table-cell table:formula="of:=[.D351]-[.D350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62" office:value-type="float" office:value="21700" calcext:value-type="float">
            <text:p>217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251157407407407" calcext:value-type="float">
            <text:p>0,00251157407407407000</text:p>
          </table:table-cell>
          <table:table-cell table:formula="of:=[.D352]-[.D351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62" office:value-type="float" office:value="21762" calcext:value-type="float">
            <text:p>21762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251875" calcext:value-type="float">
            <text:p>0,00251875000000000000</text:p>
          </table:table-cell>
          <table:table-cell table:formula="of:=[.D353]-[.D352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62" office:value-type="float" office:value="21824" calcext:value-type="float">
            <text:p>21824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252592592592593" calcext:value-type="float">
            <text:p>0,00252592592592593000</text:p>
          </table:table-cell>
          <table:table-cell table:formula="of:=[.D354]-[.D35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62" office:value-type="float" office:value="21886" calcext:value-type="float">
            <text:p>21886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253310185185185" calcext:value-type="float">
            <text:p>0,00253310185185185000</text:p>
          </table:table-cell>
          <table:table-cell table:formula="of:=[.D355]-[.D354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62" office:value-type="float" office:value="21948" calcext:value-type="float">
            <text:p>21948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254027777777778" calcext:value-type="float">
            <text:p>0,00254027777777778000</text:p>
          </table:table-cell>
          <table:table-cell table:formula="of:=[.D356]-[.D355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62" office:value-type="float" office:value="22010" calcext:value-type="float">
            <text:p>2201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25474537037037" calcext:value-type="float">
            <text:p>0,00254745370370370000</text:p>
          </table:table-cell>
          <table:table-cell table:formula="of:=[.D357]-[.D356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62" office:value-type="float" office:value="22072" calcext:value-type="float">
            <text:p>22072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255462962962963" calcext:value-type="float">
            <text:p>0,00255462962962963000</text:p>
          </table:table-cell>
          <table:table-cell table:formula="of:=[.D358]-[.D357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62" office:value-type="float" office:value="22134" calcext:value-type="float">
            <text:p>22134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256180555555556" calcext:value-type="float">
            <text:p>0,00256180555555556000</text:p>
          </table:table-cell>
          <table:table-cell table:formula="of:=[.D359]-[.D35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62" office:value-type="float" office:value="22196" calcext:value-type="float">
            <text:p>22196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256898148148148" calcext:value-type="float">
            <text:p>0,00256898148148148000</text:p>
          </table:table-cell>
          <table:table-cell table:formula="of:=[.D360]-[.D359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62" office:value-type="float" office:value="22258" calcext:value-type="float">
            <text:p>22258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257615740740741" calcext:value-type="float">
            <text:p>0,00257615740740741000</text:p>
          </table:table-cell>
          <table:table-cell table:formula="of:=[.D361]-[.D360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62" office:value-type="float" office:value="22320" calcext:value-type="float">
            <text:p>2232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258333333333333" calcext:value-type="float">
            <text:p>0,00258333333333333000</text:p>
          </table:table-cell>
          <table:table-cell table:formula="of:=[.D362]-[.D361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62" office:value-type="float" office:value="22382" calcext:value-type="float">
            <text:p>22382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259050925925926" calcext:value-type="float">
            <text:p>0,00259050925925926000</text:p>
          </table:table-cell>
          <table:table-cell table:formula="of:=[.D363]-[.D362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62" office:value-type="float" office:value="22444" calcext:value-type="float">
            <text:p>22444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259768518518519" calcext:value-type="float">
            <text:p>0,00259768518518519000</text:p>
          </table:table-cell>
          <table:table-cell table:formula="of:=[.D364]-[.D36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62" office:value-type="float" office:value="22506" calcext:value-type="float">
            <text:p>22506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260486111111111" calcext:value-type="float">
            <text:p>0,00260486111111111000</text:p>
          </table:table-cell>
          <table:table-cell table:formula="of:=[.D365]-[.D364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62" office:value-type="float" office:value="22568" calcext:value-type="float">
            <text:p>22568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261203703703704" calcext:value-type="float">
            <text:p>0,00261203703703704000</text:p>
          </table:table-cell>
          <table:table-cell table:formula="of:=[.D366]-[.D365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62" office:value-type="float" office:value="22630" calcext:value-type="float">
            <text:p>2263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261921296296296" calcext:value-type="float">
            <text:p>0,00261921296296296000</text:p>
          </table:table-cell>
          <table:table-cell table:formula="of:=[.D367]-[.D366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62" office:value-type="float" office:value="22692" calcext:value-type="float">
            <text:p>22692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262638888888889" calcext:value-type="float">
            <text:p>0,00262638888888889000</text:p>
          </table:table-cell>
          <table:table-cell table:formula="of:=[.D368]-[.D367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62" office:value-type="float" office:value="22754" calcext:value-type="float">
            <text:p>22754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263356481481481" calcext:value-type="float">
            <text:p>0,00263356481481481000</text:p>
          </table:table-cell>
          <table:table-cell table:formula="of:=[.D369]-[.D36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62" office:value-type="float" office:value="22816" calcext:value-type="float">
            <text:p>22816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264074074074074" calcext:value-type="float">
            <text:p>0,00264074074074074000</text:p>
          </table:table-cell>
          <table:table-cell table:formula="of:=[.D370]-[.D369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62" office:value-type="float" office:value="22878" calcext:value-type="float">
            <text:p>22878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264791666666667" calcext:value-type="float">
            <text:p>0,00264791666666667000</text:p>
          </table:table-cell>
          <table:table-cell table:formula="of:=[.D371]-[.D370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62" office:value-type="float" office:value="22940" calcext:value-type="float">
            <text:p>2294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265509259259259" calcext:value-type="float">
            <text:p>0,00265509259259259000</text:p>
          </table:table-cell>
          <table:table-cell table:formula="of:=[.D372]-[.D371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62" office:value-type="float" office:value="23002" calcext:value-type="float">
            <text:p>23002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266226851851852" calcext:value-type="float">
            <text:p>0,00266226851851852000</text:p>
          </table:table-cell>
          <table:table-cell table:formula="of:=[.D373]-[.D372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62" office:value-type="float" office:value="23064" calcext:value-type="float">
            <text:p>23064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266944444444444" calcext:value-type="float">
            <text:p>0,00266944444444444000</text:p>
          </table:table-cell>
          <table:table-cell table:formula="of:=[.D374]-[.D37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62" office:value-type="float" office:value="23126" calcext:value-type="float">
            <text:p>23126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267662037037037" calcext:value-type="float">
            <text:p>0,00267662037037037000</text:p>
          </table:table-cell>
          <table:table-cell table:formula="of:=[.D375]-[.D374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62" office:value-type="float" office:value="23188" calcext:value-type="float">
            <text:p>23188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26837962962963" calcext:value-type="float">
            <text:p>0,00268379629629630000</text:p>
          </table:table-cell>
          <table:table-cell table:formula="of:=[.D376]-[.D375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62" office:value-type="float" office:value="23250" calcext:value-type="float">
            <text:p>2325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269097222222222" calcext:value-type="float">
            <text:p>0,00269097222222222000</text:p>
          </table:table-cell>
          <table:table-cell table:formula="of:=[.D377]-[.D376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62" office:value-type="float" office:value="23312" calcext:value-type="float">
            <text:p>23312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269814814814815" calcext:value-type="float">
            <text:p>0,00269814814814815000</text:p>
          </table:table-cell>
          <table:table-cell table:formula="of:=[.D378]-[.D377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62" office:value-type="float" office:value="23374" calcext:value-type="float">
            <text:p>23374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270532407407407" calcext:value-type="float">
            <text:p>0,00270532407407407000</text:p>
          </table:table-cell>
          <table:table-cell table:formula="of:=[.D379]-[.D378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62" office:value-type="float" office:value="23436" calcext:value-type="float">
            <text:p>23436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27125" calcext:value-type="float">
            <text:p>0,00271250000000000000</text:p>
          </table:table-cell>
          <table:table-cell table:formula="of:=[.D380]-[.D379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62" office:value-type="float" office:value="23498" calcext:value-type="float">
            <text:p>23498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271967592592593" calcext:value-type="float">
            <text:p>0,00271967592592593000</text:p>
          </table:table-cell>
          <table:table-cell table:formula="of:=[.D381]-[.D380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62" office:value-type="float" office:value="23560" calcext:value-type="float">
            <text:p>2356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272685185185185" calcext:value-type="float">
            <text:p>0,00272685185185185000</text:p>
          </table:table-cell>
          <table:table-cell table:formula="of:=[.D382]-[.D381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62" office:value-type="float" office:value="23622" calcext:value-type="float">
            <text:p>23622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273402777777778" calcext:value-type="float">
            <text:p>0,00273402777777778000</text:p>
          </table:table-cell>
          <table:table-cell table:formula="of:=[.D383]-[.D382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62" office:value-type="float" office:value="23684" calcext:value-type="float">
            <text:p>23684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27412037037037" calcext:value-type="float">
            <text:p>0,00274120370370370000</text:p>
          </table:table-cell>
          <table:table-cell table:formula="of:=[.D384]-[.D383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62" office:value-type="float" office:value="23746" calcext:value-type="float">
            <text:p>23746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274837962962963" calcext:value-type="float">
            <text:p>0,00274837962962963000</text:p>
          </table:table-cell>
          <table:table-cell table:formula="of:=[.D385]-[.D384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62" office:value-type="float" office:value="23808" calcext:value-type="float">
            <text:p>23808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275555555555556" calcext:value-type="float">
            <text:p>0,00275555555555556000</text:p>
          </table:table-cell>
          <table:table-cell table:formula="of:=[.D386]-[.D385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62" office:value-type="float" office:value="23870" calcext:value-type="float">
            <text:p>2387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276273148148148" calcext:value-type="float">
            <text:p>0,00276273148148148000</text:p>
          </table:table-cell>
          <table:table-cell table:formula="of:=[.D387]-[.D386]" office:value-type="float" office:value="0.0000071759259259261" calcext:value-type="float">
            <text:p>0,00000717592592592610</text:p>
          </table:table-cell>
          <table:table-cell table:number-columns-repeated="1637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62" office:value-type="float" office:value="23932" calcext:value-type="float">
            <text:p>23932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276990740740741" calcext:value-type="float">
            <text:p>0,00276990740740741000</text:p>
          </table:table-cell>
          <table:table-cell table:formula="of:=[.D388]-[.D387]" office:value-type="float" office:value="0.00000717592592592567" calcext:value-type="float">
            <text:p>0,00000717592592592567</text:p>
          </table:table-cell>
          <table:table-cell table:number-columns-repeated="1637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62" office:value-type="float" office:value="23994" calcext:value-type="float">
            <text:p>23994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277708333333333" calcext:value-type="float">
            <text:p>0,00277708333333333000</text:p>
          </table:table-cell>
          <table:table-cell table:formula="of:=#REF!-[.D388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18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23:25.984098355</meta:creation-date>
    <dc:date>2026-05-17T18:23:38.634265255</dc:date>
    <meta:editing-duration>PT14S</meta:editing-duration>
    <meta:editing-cycles>1</meta:editing-cycles>
    <meta:document-statistic meta:table-count="1" meta:cell-count="1940" meta:object-count="0"/>
    <meta:generator>LibreOffice/24.2.7.2$Linux_X86_64 LibreOffice_project/420$Build-2</meta:generator>
  </office:meta>
</office:document-meta>
</file>