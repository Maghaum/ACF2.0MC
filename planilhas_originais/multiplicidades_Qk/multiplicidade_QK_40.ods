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4" office:value-type="string" calcext:value-type="string">
            <text:p>B / C</text:p>
          </table:table-cell>
          <table:table-cell table:style-name="ce4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462962962962963" calcext:value-type="float">
            <text:p>0,00000462962962962963</text:p>
          </table:table-cell>
          <table:table-cell table:formula="of:=[.D3]-[.D2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0" office:value-type="float" office:value="80" calcext:value-type="float">
            <text:p>8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925925925925926" calcext:value-type="float">
            <text:p>0,00000925925925925926</text:p>
          </table:table-cell>
          <table:table-cell table:formula="of:=[.D4]-[.D3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0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38888888888889" calcext:value-type="float">
            <text:p>0,00001388888888888890</text:p>
          </table:table-cell>
          <table:table-cell table:formula="of:=[.D5]-[.D4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0" office:value-type="float" office:value="160" calcext:value-type="float">
            <text:p>16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85185185185185" calcext:value-type="float">
            <text:p>0,00001851851851851850</text:p>
          </table:table-cell>
          <table:table-cell table:formula="of:=[.D6]-[.D5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0" office:value-type="float" office:value="200" calcext:value-type="float">
            <text:p>20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31481481481481" calcext:value-type="float">
            <text:p>0,00002314814814814820</text:p>
          </table:table-cell>
          <table:table-cell table:formula="of:=[.D7]-[.D6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0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77777777777778" calcext:value-type="float">
            <text:p>0,00002777777777777780</text:p>
          </table:table-cell>
          <table:table-cell table:formula="of:=[.D8]-[.D7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0" office:value-type="float" office:value="280" calcext:value-type="float">
            <text:p>28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24074074074074" calcext:value-type="float">
            <text:p>0,00003240740740740740</text:p>
          </table:table-cell>
          <table:table-cell table:formula="of:=[.D9]-[.D8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0" office:value-type="float" office:value="320" calcext:value-type="float">
            <text:p>32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7037037037037" calcext:value-type="float">
            <text:p>0,00003703703703703700</text:p>
          </table:table-cell>
          <table:table-cell table:formula="of:=[.D10]-[.D9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0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16666666666667" calcext:value-type="float">
            <text:p>0,00004166666666666670</text:p>
          </table:table-cell>
          <table:table-cell table:formula="of:=[.D11]-[.D10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0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462962962962963" calcext:value-type="float">
            <text:p>0,00004629629629629630</text:p>
          </table:table-cell>
          <table:table-cell table:formula="of:=[.D12]-[.D11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0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509259259259259" calcext:value-type="float">
            <text:p>0,00005092592592592590</text:p>
          </table:table-cell>
          <table:table-cell table:formula="of:=[.D13]-[.D12]" office:value-type="float" office:value="0.00000462962962962964" calcext:value-type="float">
            <text:p>0,00000462962962962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0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555555555555556" calcext:value-type="float">
            <text:p>0,00005555555555555560</text:p>
          </table:table-cell>
          <table:table-cell table:formula="of:=[.D14]-[.D13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0" office:value-type="float" office:value="520" calcext:value-type="float">
            <text:p>52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601851851851852" calcext:value-type="float">
            <text:p>0,00006018518518518520</text:p>
          </table:table-cell>
          <table:table-cell table:formula="of:=[.D15]-[.D14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0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648148148148148" calcext:value-type="float">
            <text:p>0,00006481481481481480</text:p>
          </table:table-cell>
          <table:table-cell table:formula="of:=[.D16]-[.D15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0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694444444444444" calcext:value-type="float">
            <text:p>0,00006944444444444440</text:p>
          </table:table-cell>
          <table:table-cell table:formula="of:=[.D17]-[.D16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0" office:value-type="float" office:value="640" calcext:value-type="float">
            <text:p>64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740740740740741" calcext:value-type="float">
            <text:p>0,00007407407407407410</text:p>
          </table:table-cell>
          <table:table-cell table:formula="of:=[.D18]-[.D17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0" office:value-type="float" office:value="680" calcext:value-type="float">
            <text:p>68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787037037037037" calcext:value-type="float">
            <text:p>0,00007870370370370370</text:p>
          </table:table-cell>
          <table:table-cell table:formula="of:=[.D19]-[.D18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0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833333333333333" calcext:value-type="float">
            <text:p>0,00008333333333333330</text:p>
          </table:table-cell>
          <table:table-cell table:formula="of:=[.D20]-[.D19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0" office:value-type="float" office:value="760" calcext:value-type="float">
            <text:p>76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87962962962963" calcext:value-type="float">
            <text:p>0,00008796296296296300</text:p>
          </table:table-cell>
          <table:table-cell table:formula="of:=[.D21]-[.D20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0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925925925925926" calcext:value-type="float">
            <text:p>0,00009259259259259260</text:p>
          </table:table-cell>
          <table:table-cell table:formula="of:=[.D22]-[.D21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0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972222222222222" calcext:value-type="float">
            <text:p>0,00009722222222222220</text:p>
          </table:table-cell>
          <table:table-cell table:formula="of:=[.D23]-[.D22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0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01851851851852" calcext:value-type="float">
            <text:p>0,00010185185185185200</text:p>
          </table:table-cell>
          <table:table-cell table:formula="of:=[.D24]-[.D23]" office:value-type="float" office:value="0.00000462962962962964" calcext:value-type="float">
            <text:p>0,000004629629629629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0" office:value-type="float" office:value="920" calcext:value-type="float">
            <text:p>92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06481481481481" calcext:value-type="float">
            <text:p>0,00010648148148148100</text:p>
          </table:table-cell>
          <table:table-cell table:formula="of:=[.D25]-[.D24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0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11111111111111" calcext:value-type="float">
            <text:p>0,00011111111111111100</text:p>
          </table:table-cell>
          <table:table-cell table:formula="of:=[.D26]-[.D25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0" office:value-type="float" office:value="1000" calcext:value-type="float">
            <text:p>10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15740740740741" calcext:value-type="float">
            <text:p>0,00011574074074074100</text:p>
          </table:table-cell>
          <table:table-cell table:formula="of:=[.D27]-[.D26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0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2037037037037" calcext:value-type="float">
            <text:p>0,00012037037037037000</text:p>
          </table:table-cell>
          <table:table-cell table:formula="of:=[.D28]-[.D27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0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25" calcext:value-type="float">
            <text:p>0,00012500000000000000</text:p>
          </table:table-cell>
          <table:table-cell table:formula="of:=[.D29]-[.D28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0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2962962962963" calcext:value-type="float">
            <text:p>0,00012962962962963000</text:p>
          </table:table-cell>
          <table:table-cell table:formula="of:=[.D30]-[.D29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0" office:value-type="float" office:value="1160" calcext:value-type="float">
            <text:p>116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34259259259259" calcext:value-type="float">
            <text:p>0,00013425925925925900</text:p>
          </table:table-cell>
          <table:table-cell table:formula="of:=[.D31]-[.D30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0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38888888888889" calcext:value-type="float">
            <text:p>0,00013888888888888900</text:p>
          </table:table-cell>
          <table:table-cell table:formula="of:=[.D32]-[.D31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0" office:value-type="float" office:value="1240" calcext:value-type="float">
            <text:p>124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43518518518519" calcext:value-type="float">
            <text:p>0,00014351851851851900</text:p>
          </table:table-cell>
          <table:table-cell table:formula="of:=[.D33]-[.D32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0" office:value-type="float" office:value="1280" calcext:value-type="float">
            <text:p>128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48148148148148" calcext:value-type="float">
            <text:p>0,00014814814814814800</text:p>
          </table:table-cell>
          <table:table-cell table:formula="of:=[.D34]-[.D33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0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52777777777778" calcext:value-type="float">
            <text:p>0,00015277777777777800</text:p>
          </table:table-cell>
          <table:table-cell table:formula="of:=[.D35]-[.D34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0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57407407407407" calcext:value-type="float">
            <text:p>0,00015740740740740700</text:p>
          </table:table-cell>
          <table:table-cell table:formula="of:=[.D36]-[.D35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0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62037037037037" calcext:value-type="float">
            <text:p>0,00016203703703703700</text:p>
          </table:table-cell>
          <table:table-cell table:formula="of:=[.D37]-[.D36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0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66666666666667" calcext:value-type="float">
            <text:p>0,00016666666666666700</text:p>
          </table:table-cell>
          <table:table-cell table:formula="of:=[.D38]-[.D37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0" office:value-type="float" office:value="1480" calcext:value-type="float">
            <text:p>148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71296296296296" calcext:value-type="float">
            <text:p>0,00017129629629629600</text:p>
          </table:table-cell>
          <table:table-cell table:formula="of:=[.D39]-[.D38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0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75925925925926" calcext:value-type="float">
            <text:p>0,00017592592592592600</text:p>
          </table:table-cell>
          <table:table-cell table:formula="of:=[.D40]-[.D39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0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80555555555556" calcext:value-type="float">
            <text:p>0,00018055555555555600</text:p>
          </table:table-cell>
          <table:table-cell table:formula="of:=[.D41]-[.D40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0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85185185185185" calcext:value-type="float">
            <text:p>0,00018518518518518500</text:p>
          </table:table-cell>
          <table:table-cell table:formula="of:=[.D42]-[.D41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0" office:value-type="float" office:value="1640" calcext:value-type="float">
            <text:p>164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89814814814815" calcext:value-type="float">
            <text:p>0,00018981481481481500</text:p>
          </table:table-cell>
          <table:table-cell table:formula="of:=[.D43]-[.D42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0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94444444444444" calcext:value-type="float">
            <text:p>0,00019444444444444400</text:p>
          </table:table-cell>
          <table:table-cell table:formula="of:=[.D44]-[.D43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0" office:value-type="float" office:value="1720" calcext:value-type="float">
            <text:p>172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99074074074074" calcext:value-type="float">
            <text:p>0,00019907407407407400</text:p>
          </table:table-cell>
          <table:table-cell table:formula="of:=[.D45]-[.D44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0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03703703703704" calcext:value-type="float">
            <text:p>0,00020370370370370400</text:p>
          </table:table-cell>
          <table:table-cell table:formula="of:=[.D46]-[.D45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0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08333333333333" calcext:value-type="float">
            <text:p>0,00020833333333333300</text:p>
          </table:table-cell>
          <table:table-cell table:formula="of:=[.D47]-[.D46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0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12962962962963" calcext:value-type="float">
            <text:p>0,00021296296296296300</text:p>
          </table:table-cell>
          <table:table-cell table:formula="of:=[.D48]-[.D47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0" office:value-type="float" office:value="1880" calcext:value-type="float">
            <text:p>188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17592592592593" calcext:value-type="float">
            <text:p>0,00021759259259259300</text:p>
          </table:table-cell>
          <table:table-cell table:formula="of:=[.D49]-[.D48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0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22222222222222" calcext:value-type="float">
            <text:p>0,00022222222222222200</text:p>
          </table:table-cell>
          <table:table-cell table:formula="of:=[.D50]-[.D49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0" office:value-type="float" office:value="1960" calcext:value-type="float">
            <text:p>196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26851851851852" calcext:value-type="float">
            <text:p>0,00022685185185185200</text:p>
          </table:table-cell>
          <table:table-cell table:formula="of:=[.D51]-[.D50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0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31481481481482" calcext:value-type="float">
            <text:p>0,00023148148148148200</text:p>
          </table:table-cell>
          <table:table-cell table:formula="of:=[.D52]-[.D51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0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36111111111111" calcext:value-type="float">
            <text:p>0,00023611111111111100</text:p>
          </table:table-cell>
          <table:table-cell table:formula="of:=[.D53]-[.D52]" office:value-type="float" office:value="0.00000462962962962963" calcext:value-type="float">
            <text:p>0,000004629629629629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0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40740740740741" calcext:value-type="float">
            <text:p>0,00024074074074074100</text:p>
          </table:table-cell>
          <table:table-cell table:formula="of:=[.D54]-[.D5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0" office:value-type="float" office:value="2120" calcext:value-type="float">
            <text:p>212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4537037037037" calcext:value-type="float">
            <text:p>0,00024537037037037000</text:p>
          </table:table-cell>
          <table:table-cell table:formula="of:=[.D55]-[.D54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0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5" calcext:value-type="float">
            <text:p>0,00025000000000000000</text:p>
          </table:table-cell>
          <table:table-cell table:formula="of:=[.D56]-[.D5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0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5462962962963" calcext:value-type="float">
            <text:p>0,00025462962962963000</text:p>
          </table:table-cell>
          <table:table-cell table:formula="of:=[.D57]-[.D56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0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59259259259259" calcext:value-type="float">
            <text:p>0,00025925925925925900</text:p>
          </table:table-cell>
          <table:table-cell table:formula="of:=[.D58]-[.D5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0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63888888888889" calcext:value-type="float">
            <text:p>0,00026388888888888900</text:p>
          </table:table-cell>
          <table:table-cell table:formula="of:=[.D59]-[.D58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0" office:value-type="float" office:value="2320" calcext:value-type="float">
            <text:p>232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68518518518519" calcext:value-type="float">
            <text:p>0,00026851851851851900</text:p>
          </table:table-cell>
          <table:table-cell table:formula="of:=[.D60]-[.D5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0" office:value-type="float" office:value="2360" calcext:value-type="float">
            <text:p>236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73148148148148" calcext:value-type="float">
            <text:p>0,00027314814814814800</text:p>
          </table:table-cell>
          <table:table-cell table:formula="of:=[.D61]-[.D60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0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77777777777778" calcext:value-type="float">
            <text:p>0,00027777777777777800</text:p>
          </table:table-cell>
          <table:table-cell table:formula="of:=[.D62]-[.D61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0" office:value-type="float" office:value="2440" calcext:value-type="float">
            <text:p>244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82407407407407" calcext:value-type="float">
            <text:p>0,00028240740740740700</text:p>
          </table:table-cell>
          <table:table-cell table:formula="of:=[.D63]-[.D6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0" office:value-type="float" office:value="2480" calcext:value-type="float">
            <text:p>248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87037037037037" calcext:value-type="float">
            <text:p>0,00028703703703703700</text:p>
          </table:table-cell>
          <table:table-cell table:formula="of:=[.D64]-[.D63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0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91666666666667" calcext:value-type="float">
            <text:p>0,00029166666666666700</text:p>
          </table:table-cell>
          <table:table-cell table:formula="of:=[.D65]-[.D6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0" office:value-type="float" office:value="2560" calcext:value-type="float">
            <text:p>256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96296296296296" calcext:value-type="float">
            <text:p>0,00029629629629629600</text:p>
          </table:table-cell>
          <table:table-cell table:formula="of:=[.D66]-[.D65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0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00925925925926" calcext:value-type="float">
            <text:p>0,00030092592592592600</text:p>
          </table:table-cell>
          <table:table-cell table:formula="of:=[.D67]-[.D6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0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05555555555556" calcext:value-type="float">
            <text:p>0,00030555555555555600</text:p>
          </table:table-cell>
          <table:table-cell table:formula="of:=[.D68]-[.D67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0" office:value-type="float" office:value="2680" calcext:value-type="float">
            <text:p>268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10185185185185" calcext:value-type="float">
            <text:p>0,00031018518518518500</text:p>
          </table:table-cell>
          <table:table-cell table:formula="of:=[.D69]-[.D6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0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14814814814815" calcext:value-type="float">
            <text:p>0,00031481481481481500</text:p>
          </table:table-cell>
          <table:table-cell table:formula="of:=[.D70]-[.D69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0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19444444444444" calcext:value-type="float">
            <text:p>0,00031944444444444400</text:p>
          </table:table-cell>
          <table:table-cell table:formula="of:=[.D71]-[.D7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0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24074074074074" calcext:value-type="float">
            <text:p>0,00032407407407407400</text:p>
          </table:table-cell>
          <table:table-cell table:formula="of:=[.D72]-[.D71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0" office:value-type="float" office:value="2840" calcext:value-type="float">
            <text:p>284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28703703703704" calcext:value-type="float">
            <text:p>0,00032870370370370400</text:p>
          </table:table-cell>
          <table:table-cell table:formula="of:=[.D73]-[.D7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0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33333333333333" calcext:value-type="float">
            <text:p>0,00033333333333333300</text:p>
          </table:table-cell>
          <table:table-cell table:formula="of:=[.D74]-[.D73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0" office:value-type="float" office:value="2920" calcext:value-type="float">
            <text:p>292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37962962962963" calcext:value-type="float">
            <text:p>0,00033796296296296300</text:p>
          </table:table-cell>
          <table:table-cell table:formula="of:=[.D75]-[.D7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0" office:value-type="float" office:value="2960" calcext:value-type="float">
            <text:p>296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42592592592593" calcext:value-type="float">
            <text:p>0,00034259259259259300</text:p>
          </table:table-cell>
          <table:table-cell table:formula="of:=[.D76]-[.D75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0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47222222222222" calcext:value-type="float">
            <text:p>0,00034722222222222200</text:p>
          </table:table-cell>
          <table:table-cell table:formula="of:=[.D77]-[.D7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0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51851851851852" calcext:value-type="float">
            <text:p>0,00035185185185185200</text:p>
          </table:table-cell>
          <table:table-cell table:formula="of:=[.D78]-[.D77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0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56481481481482" calcext:value-type="float">
            <text:p>0,00035648148148148200</text:p>
          </table:table-cell>
          <table:table-cell table:formula="of:=[.D79]-[.D7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0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61111111111111" calcext:value-type="float">
            <text:p>0,00036111111111111100</text:p>
          </table:table-cell>
          <table:table-cell table:formula="of:=[.D80]-[.D79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0" office:value-type="float" office:value="3160" calcext:value-type="float">
            <text:p>316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65740740740741" calcext:value-type="float">
            <text:p>0,00036574074074074100</text:p>
          </table:table-cell>
          <table:table-cell table:formula="of:=[.D81]-[.D8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0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7037037037037" calcext:value-type="float">
            <text:p>0,00037037037037037000</text:p>
          </table:table-cell>
          <table:table-cell table:formula="of:=[.D82]-[.D81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0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75" calcext:value-type="float">
            <text:p>0,00037500000000000000</text:p>
          </table:table-cell>
          <table:table-cell table:formula="of:=[.D83]-[.D8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0" office:value-type="float" office:value="3280" calcext:value-type="float">
            <text:p>328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7962962962963" calcext:value-type="float">
            <text:p>0,00037962962962963000</text:p>
          </table:table-cell>
          <table:table-cell table:formula="of:=[.D84]-[.D83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0" office:value-type="float" office:value="3320" calcext:value-type="float">
            <text:p>332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84259259259259" calcext:value-type="float">
            <text:p>0,00038425925925925900</text:p>
          </table:table-cell>
          <table:table-cell table:formula="of:=[.D85]-[.D8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0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88888888888889" calcext:value-type="float">
            <text:p>0,00038888888888888900</text:p>
          </table:table-cell>
          <table:table-cell table:formula="of:=[.D86]-[.D85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0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93518518518519" calcext:value-type="float">
            <text:p>0,00039351851851851900</text:p>
          </table:table-cell>
          <table:table-cell table:formula="of:=[.D87]-[.D8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0" office:value-type="float" office:value="3440" calcext:value-type="float">
            <text:p>344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98148148148148" calcext:value-type="float">
            <text:p>0,00039814814814814800</text:p>
          </table:table-cell>
          <table:table-cell table:formula="of:=[.D88]-[.D87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0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02777777777778" calcext:value-type="float">
            <text:p>0,00040277777777777800</text:p>
          </table:table-cell>
          <table:table-cell table:formula="of:=[.D89]-[.D8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0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07407407407407" calcext:value-type="float">
            <text:p>0,00040740740740740700</text:p>
          </table:table-cell>
          <table:table-cell table:formula="of:=[.D90]-[.D89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0" office:value-type="float" office:value="3560" calcext:value-type="float">
            <text:p>356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12037037037037" calcext:value-type="float">
            <text:p>0,00041203703703703700</text:p>
          </table:table-cell>
          <table:table-cell table:formula="of:=[.D91]-[.D90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16666666666667" calcext:value-type="float">
            <text:p>0,00041666666666666700</text:p>
          </table:table-cell>
          <table:table-cell table:formula="of:=[.D92]-[.D9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0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21296296296296" calcext:value-type="float">
            <text:p>0,00042129629629629600</text:p>
          </table:table-cell>
          <table:table-cell table:formula="of:=[.D93]-[.D92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0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25925925925926" calcext:value-type="float">
            <text:p>0,00042592592592592600</text:p>
          </table:table-cell>
          <table:table-cell table:formula="of:=[.D94]-[.D9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0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30555555555556" calcext:value-type="float">
            <text:p>0,00043055555555555600</text:p>
          </table:table-cell>
          <table:table-cell table:formula="of:=[.D95]-[.D94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0" office:value-type="float" office:value="3760" calcext:value-type="float">
            <text:p>376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35185185185185" calcext:value-type="float">
            <text:p>0,00043518518518518500</text:p>
          </table:table-cell>
          <table:table-cell table:formula="of:=[.D96]-[.D9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0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39814814814815" calcext:value-type="float">
            <text:p>0,00043981481481481500</text:p>
          </table:table-cell>
          <table:table-cell table:formula="of:=[.D97]-[.D96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0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44444444444444" calcext:value-type="float">
            <text:p>0,00044444444444444400</text:p>
          </table:table-cell>
          <table:table-cell table:formula="of:=[.D98]-[.D9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0" office:value-type="float" office:value="3880" calcext:value-type="float">
            <text:p>388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49074074074074" calcext:value-type="float">
            <text:p>0,00044907407407407400</text:p>
          </table:table-cell>
          <table:table-cell table:formula="of:=[.D99]-[.D98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0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53703703703704" calcext:value-type="float">
            <text:p>0,00045370370370370400</text:p>
          </table:table-cell>
          <table:table-cell table:formula="of:=[.D100]-[.D9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0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458333333333333" calcext:value-type="float">
            <text:p>0,00045833333333333300</text:p>
          </table:table-cell>
          <table:table-cell table:formula="of:=[.D101]-[.D100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0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462962962962963" calcext:value-type="float">
            <text:p>0,00046296296296296300</text:p>
          </table:table-cell>
          <table:table-cell table:formula="of:=[.D102]-[.D10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0" office:value-type="float" office:value="4040" calcext:value-type="float">
            <text:p>404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467592592592593" calcext:value-type="float">
            <text:p>0,00046759259259259300</text:p>
          </table:table-cell>
          <table:table-cell table:formula="of:=[.D103]-[.D102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0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72222222222222" calcext:value-type="float">
            <text:p>0,00047222222222222200</text:p>
          </table:table-cell>
          <table:table-cell table:formula="of:=[.D104]-[.D10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0" office:value-type="float" office:value="4120" calcext:value-type="float">
            <text:p>412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476851851851852" calcext:value-type="float">
            <text:p>0,00047685185185185200</text:p>
          </table:table-cell>
          <table:table-cell table:formula="of:=[.D105]-[.D104]" office:value-type="float" office:value="0.00000462962962962966" calcext:value-type="float">
            <text:p>0,000004629629629629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0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481481481481482" calcext:value-type="float">
            <text:p>0,00048148148148148200</text:p>
          </table:table-cell>
          <table:table-cell table:formula="of:=[.D106]-[.D10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0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86111111111111" calcext:value-type="float">
            <text:p>0,00048611111111111100</text:p>
          </table:table-cell>
          <table:table-cell table:formula="of:=[.D107]-[.D10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0" office:value-type="float" office:value="4240" calcext:value-type="float">
            <text:p>424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490740740740741" calcext:value-type="float">
            <text:p>0,00049074074074074100</text:p>
          </table:table-cell>
          <table:table-cell table:formula="of:=[.D108]-[.D107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0" office:value-type="float" office:value="4280" calcext:value-type="float">
            <text:p>428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49537037037037" calcext:value-type="float">
            <text:p>0,00049537037037037000</text:p>
          </table:table-cell>
          <table:table-cell table:formula="of:=[.D109]-[.D10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0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5" calcext:value-type="float">
            <text:p>0,00050000000000000000</text:p>
          </table:table-cell>
          <table:table-cell table:formula="of:=[.D110]-[.D10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0" office:value-type="float" office:value="4360" calcext:value-type="float">
            <text:p>436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50462962962963" calcext:value-type="float">
            <text:p>0,00050462962962963000</text:p>
          </table:table-cell>
          <table:table-cell table:formula="of:=[.D111]-[.D11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0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509259259259259" calcext:value-type="float">
            <text:p>0,00050925925925925900</text:p>
          </table:table-cell>
          <table:table-cell table:formula="of:=[.D112]-[.D111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0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513888888888889" calcext:value-type="float">
            <text:p>0,00051388888888888900</text:p>
          </table:table-cell>
          <table:table-cell table:formula="of:=[.D113]-[.D11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0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518518518518519" calcext:value-type="float">
            <text:p>0,00051851851851851900</text:p>
          </table:table-cell>
          <table:table-cell table:formula="of:=[.D114]-[.D11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0" office:value-type="float" office:value="4520" calcext:value-type="float">
            <text:p>452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523148148148148" calcext:value-type="float">
            <text:p>0,00052314814814814800</text:p>
          </table:table-cell>
          <table:table-cell table:formula="of:=[.D115]-[.D11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0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527777777777778" calcext:value-type="float">
            <text:p>0,00052777777777777800</text:p>
          </table:table-cell>
          <table:table-cell table:formula="of:=[.D116]-[.D115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0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532407407407407" calcext:value-type="float">
            <text:p>0,00053240740740740700</text:p>
          </table:table-cell>
          <table:table-cell table:formula="of:=[.D117]-[.D11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0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537037037037037" calcext:value-type="float">
            <text:p>0,00053703703703703700</text:p>
          </table:table-cell>
          <table:table-cell table:formula="of:=[.D118]-[.D11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0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541666666666667" calcext:value-type="float">
            <text:p>0,00054166666666666700</text:p>
          </table:table-cell>
          <table:table-cell table:formula="of:=[.D119]-[.D11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0" office:value-type="float" office:value="4720" calcext:value-type="float">
            <text:p>472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546296296296296" calcext:value-type="float">
            <text:p>0,00054629629629629600</text:p>
          </table:table-cell>
          <table:table-cell table:formula="of:=[.D120]-[.D119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0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550925925925926" calcext:value-type="float">
            <text:p>0,00055092592592592600</text:p>
          </table:table-cell>
          <table:table-cell table:formula="of:=[.D121]-[.D12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0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555555555555556" calcext:value-type="float">
            <text:p>0,00055555555555555600</text:p>
          </table:table-cell>
          <table:table-cell table:formula="of:=[.D122]-[.D12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0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560185185185185" calcext:value-type="float">
            <text:p>0,00056018518518518500</text:p>
          </table:table-cell>
          <table:table-cell table:formula="of:=[.D123]-[.D122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0" office:value-type="float" office:value="4880" calcext:value-type="float">
            <text:p>488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564814814814815" calcext:value-type="float">
            <text:p>0,00056481481481481500</text:p>
          </table:table-cell>
          <table:table-cell table:formula="of:=[.D124]-[.D12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0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569444444444445" calcext:value-type="float">
            <text:p>0,00056944444444444500</text:p>
          </table:table-cell>
          <table:table-cell table:formula="of:=[.D125]-[.D12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0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574074074074074" calcext:value-type="float">
            <text:p>0,00057407407407407400</text:p>
          </table:table-cell>
          <table:table-cell table:formula="of:=[.D126]-[.D12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0" office:value-type="float" office:value="5000" calcext:value-type="float">
            <text:p>5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578703703703704" calcext:value-type="float">
            <text:p>0,00057870370370370400</text:p>
          </table:table-cell>
          <table:table-cell table:formula="of:=[.D127]-[.D126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0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583333333333333" calcext:value-type="float">
            <text:p>0,00058333333333333300</text:p>
          </table:table-cell>
          <table:table-cell table:formula="of:=[.D128]-[.D12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0" office:value-type="float" office:value="5080" calcext:value-type="float">
            <text:p>508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587962962962963" calcext:value-type="float">
            <text:p>0,00058796296296296300</text:p>
          </table:table-cell>
          <table:table-cell table:formula="of:=[.D129]-[.D12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0" office:value-type="float" office:value="5120" calcext:value-type="float">
            <text:p>512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592592592592593" calcext:value-type="float">
            <text:p>0,00059259259259259300</text:p>
          </table:table-cell>
          <table:table-cell table:formula="of:=[.D130]-[.D12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0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597222222222222" calcext:value-type="float">
            <text:p>0,00059722222222222200</text:p>
          </table:table-cell>
          <table:table-cell table:formula="of:=[.D131]-[.D130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0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601851851851852" calcext:value-type="float">
            <text:p>0,00060185185185185200</text:p>
          </table:table-cell>
          <table:table-cell table:formula="of:=[.D132]-[.D13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0" office:value-type="float" office:value="5240" calcext:value-type="float">
            <text:p>524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606481481481482" calcext:value-type="float">
            <text:p>0,00060648148148148200</text:p>
          </table:table-cell>
          <table:table-cell table:formula="of:=[.D133]-[.D13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0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611111111111111" calcext:value-type="float">
            <text:p>0,00061111111111111100</text:p>
          </table:table-cell>
          <table:table-cell table:formula="of:=[.D134]-[.D13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0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615740740740741" calcext:value-type="float">
            <text:p>0,00061574074074074100</text:p>
          </table:table-cell>
          <table:table-cell table:formula="of:=[.D135]-[.D134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0" office:value-type="float" office:value="5360" calcext:value-type="float">
            <text:p>536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62037037037037" calcext:value-type="float">
            <text:p>0,00062037037037037000</text:p>
          </table:table-cell>
          <table:table-cell table:formula="of:=[.D136]-[.D13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0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625" calcext:value-type="float">
            <text:p>0,00062500000000000000</text:p>
          </table:table-cell>
          <table:table-cell table:formula="of:=[.D137]-[.D13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0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62962962962963" calcext:value-type="float">
            <text:p>0,00062962962962963000</text:p>
          </table:table-cell>
          <table:table-cell table:formula="of:=[.D138]-[.D13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0" office:value-type="float" office:value="5480" calcext:value-type="float">
            <text:p>548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634259259259259" calcext:value-type="float">
            <text:p>0,00063425925925925900</text:p>
          </table:table-cell>
          <table:table-cell table:formula="of:=[.D139]-[.D138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0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638888888888889" calcext:value-type="float">
            <text:p>0,00063888888888888900</text:p>
          </table:table-cell>
          <table:table-cell table:formula="of:=[.D140]-[.D13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0" office:value-type="float" office:value="5560" calcext:value-type="float">
            <text:p>556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643518518518519" calcext:value-type="float">
            <text:p>0,00064351851851851900</text:p>
          </table:table-cell>
          <table:table-cell table:formula="of:=[.D141]-[.D14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0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648148148148148" calcext:value-type="float">
            <text:p>0,00064814814814814800</text:p>
          </table:table-cell>
          <table:table-cell table:formula="of:=[.D142]-[.D14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0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652777777777778" calcext:value-type="float">
            <text:p>0,00065277777777777800</text:p>
          </table:table-cell>
          <table:table-cell table:formula="of:=[.D143]-[.D142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0" office:value-type="float" office:value="5680" calcext:value-type="float">
            <text:p>568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657407407407407" calcext:value-type="float">
            <text:p>0,00065740740740740700</text:p>
          </table:table-cell>
          <table:table-cell table:formula="of:=[.D144]-[.D14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0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662037037037037" calcext:value-type="float">
            <text:p>0,00066203703703703700</text:p>
          </table:table-cell>
          <table:table-cell table:formula="of:=[.D145]-[.D14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0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666666666666667" calcext:value-type="float">
            <text:p>0,00066666666666666700</text:p>
          </table:table-cell>
          <table:table-cell table:formula="of:=[.D146]-[.D14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0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671296296296296" calcext:value-type="float">
            <text:p>0,00067129629629629600</text:p>
          </table:table-cell>
          <table:table-cell table:formula="of:=[.D147]-[.D146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0" office:value-type="float" office:value="5840" calcext:value-type="float">
            <text:p>584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675925925925926" calcext:value-type="float">
            <text:p>0,00067592592592592600</text:p>
          </table:table-cell>
          <table:table-cell table:formula="of:=[.D148]-[.D14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0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680555555555556" calcext:value-type="float">
            <text:p>0,00068055555555555600</text:p>
          </table:table-cell>
          <table:table-cell table:formula="of:=[.D149]-[.D14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0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685185185185185" calcext:value-type="float">
            <text:p>0,00068518518518518500</text:p>
          </table:table-cell>
          <table:table-cell table:formula="of:=[.D150]-[.D14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0" office:value-type="float" office:value="5960" calcext:value-type="float">
            <text:p>596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689814814814815" calcext:value-type="float">
            <text:p>0,00068981481481481500</text:p>
          </table:table-cell>
          <table:table-cell table:formula="of:=[.D151]-[.D150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0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694444444444445" calcext:value-type="float">
            <text:p>0,00069444444444444500</text:p>
          </table:table-cell>
          <table:table-cell table:formula="of:=[.D152]-[.D15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0" office:value-type="float" office:value="6040" calcext:value-type="float">
            <text:p>604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699074074074074" calcext:value-type="float">
            <text:p>0,00069907407407407400</text:p>
          </table:table-cell>
          <table:table-cell table:formula="of:=[.D153]-[.D15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0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703703703703704" calcext:value-type="float">
            <text:p>0,00070370370370370400</text:p>
          </table:table-cell>
          <table:table-cell table:formula="of:=[.D154]-[.D153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0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708333333333333" calcext:value-type="float">
            <text:p>0,00070833333333333300</text:p>
          </table:table-cell>
          <table:table-cell table:formula="of:=[.D155]-[.D15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0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712962962962963" calcext:value-type="float">
            <text:p>0,00071296296296296300</text:p>
          </table:table-cell>
          <table:table-cell table:formula="of:=[.D156]-[.D15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0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717592592592593" calcext:value-type="float">
            <text:p>0,00071759259259259300</text:p>
          </table:table-cell>
          <table:table-cell table:formula="of:=[.D157]-[.D15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0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722222222222222" calcext:value-type="float">
            <text:p>0,00072222222222222200</text:p>
          </table:table-cell>
          <table:table-cell table:formula="of:=[.D158]-[.D157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0" office:value-type="float" office:value="6280" calcext:value-type="float">
            <text:p>628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726851851851852" calcext:value-type="float">
            <text:p>0,00072685185185185200</text:p>
          </table:table-cell>
          <table:table-cell table:formula="of:=[.D159]-[.D15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0" office:value-type="float" office:value="6320" calcext:value-type="float">
            <text:p>632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731481481481482" calcext:value-type="float">
            <text:p>0,00073148148148148100</text:p>
          </table:table-cell>
          <table:table-cell table:formula="of:=[.D160]-[.D15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0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736111111111111" calcext:value-type="float">
            <text:p>0,00073611111111111100</text:p>
          </table:table-cell>
          <table:table-cell table:formula="of:=[.D161]-[.D16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0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740740740740741" calcext:value-type="float">
            <text:p>0,00074074074074074100</text:p>
          </table:table-cell>
          <table:table-cell table:formula="of:=[.D162]-[.D161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0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74537037037037" calcext:value-type="float">
            <text:p>0,00074537037037037000</text:p>
          </table:table-cell>
          <table:table-cell table:formula="of:=[.D163]-[.D16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0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75" calcext:value-type="float">
            <text:p>0,00075000000000000000</text:p>
          </table:table-cell>
          <table:table-cell table:formula="of:=[.D164]-[.D16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0" office:value-type="float" office:value="6520" calcext:value-type="float">
            <text:p>652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75462962962963" calcext:value-type="float">
            <text:p>0,00075462962962963000</text:p>
          </table:table-cell>
          <table:table-cell table:formula="of:=[.D165]-[.D16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0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759259259259259" calcext:value-type="float">
            <text:p>0,00075925925925925900</text:p>
          </table:table-cell>
          <table:table-cell table:formula="of:=[.D166]-[.D165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0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763888888888889" calcext:value-type="float">
            <text:p>0,00076388888888888900</text:p>
          </table:table-cell>
          <table:table-cell table:formula="of:=[.D167]-[.D16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0" office:value-type="float" office:value="6640" calcext:value-type="float">
            <text:p>664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768518518518519" calcext:value-type="float">
            <text:p>0,00076851851851851900</text:p>
          </table:table-cell>
          <table:table-cell table:formula="of:=[.D168]-[.D16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0" office:value-type="float" office:value="6680" calcext:value-type="float">
            <text:p>668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773148148148148" calcext:value-type="float">
            <text:p>0,00077314814814814800</text:p>
          </table:table-cell>
          <table:table-cell table:formula="of:=[.D169]-[.D16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0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777777777777778" calcext:value-type="float">
            <text:p>0,00077777777777777800</text:p>
          </table:table-cell>
          <table:table-cell table:formula="of:=[.D170]-[.D169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0" office:value-type="float" office:value="6760" calcext:value-type="float">
            <text:p>676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782407407407407" calcext:value-type="float">
            <text:p>0,00078240740740740800</text:p>
          </table:table-cell>
          <table:table-cell table:formula="of:=[.D171]-[.D17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0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787037037037037" calcext:value-type="float">
            <text:p>0,00078703703703703700</text:p>
          </table:table-cell>
          <table:table-cell table:formula="of:=[.D172]-[.D17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0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791666666666667" calcext:value-type="float">
            <text:p>0,00079166666666666700</text:p>
          </table:table-cell>
          <table:table-cell table:formula="of:=[.D173]-[.D17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0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796296296296296" calcext:value-type="float">
            <text:p>0,00079629629629629600</text:p>
          </table:table-cell>
          <table:table-cell table:formula="of:=[.D174]-[.D173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0" office:value-type="float" office:value="6920" calcext:value-type="float">
            <text:p>692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800925925925926" calcext:value-type="float">
            <text:p>0,00080092592592592600</text:p>
          </table:table-cell>
          <table:table-cell table:formula="of:=[.D175]-[.D17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0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805555555555556" calcext:value-type="float">
            <text:p>0,00080555555555555600</text:p>
          </table:table-cell>
          <table:table-cell table:formula="of:=[.D176]-[.D17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0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810185185185185" calcext:value-type="float">
            <text:p>0,00081018518518518500</text:p>
          </table:table-cell>
          <table:table-cell table:formula="of:=[.D177]-[.D17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0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814814814814815" calcext:value-type="float">
            <text:p>0,00081481481481481500</text:p>
          </table:table-cell>
          <table:table-cell table:formula="of:=[.D178]-[.D177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0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819444444444445" calcext:value-type="float">
            <text:p>0,00081944444444444500</text:p>
          </table:table-cell>
          <table:table-cell table:formula="of:=[.D179]-[.D17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0" office:value-type="float" office:value="7120" calcext:value-type="float">
            <text:p>712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824074074074074" calcext:value-type="float">
            <text:p>0,00082407407407407400</text:p>
          </table:table-cell>
          <table:table-cell table:formula="of:=[.D180]-[.D17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0" office:value-type="float" office:value="7160" calcext:value-type="float">
            <text:p>716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828703703703704" calcext:value-type="float">
            <text:p>0,00082870370370370400</text:p>
          </table:table-cell>
          <table:table-cell table:formula="of:=[.D181]-[.D180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833333333333333" calcext:value-type="float">
            <text:p>0,00083333333333333300</text:p>
          </table:table-cell>
          <table:table-cell table:formula="of:=[.D182]-[.D18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0" office:value-type="float" office:value="7240" calcext:value-type="float">
            <text:p>724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837962962962963" calcext:value-type="float">
            <text:p>0,00083796296296296300</text:p>
          </table:table-cell>
          <table:table-cell table:formula="of:=[.D183]-[.D18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0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842592592592593" calcext:value-type="float">
            <text:p>0,00084259259259259300</text:p>
          </table:table-cell>
          <table:table-cell table:formula="of:=[.D184]-[.D18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0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847222222222222" calcext:value-type="float">
            <text:p>0,00084722222222222200</text:p>
          </table:table-cell>
          <table:table-cell table:formula="of:=[.D185]-[.D184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0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851851851851852" calcext:value-type="float">
            <text:p>0,00085185185185185200</text:p>
          </table:table-cell>
          <table:table-cell table:formula="of:=[.D186]-[.D18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0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856481481481482" calcext:value-type="float">
            <text:p>0,00085648148148148100</text:p>
          </table:table-cell>
          <table:table-cell table:formula="of:=[.D187]-[.D18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0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861111111111111" calcext:value-type="float">
            <text:p>0,00086111111111111100</text:p>
          </table:table-cell>
          <table:table-cell table:formula="of:=[.D188]-[.D18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0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865740740740741" calcext:value-type="float">
            <text:p>0,00086574074074074100</text:p>
          </table:table-cell>
          <table:table-cell table:formula="of:=[.D189]-[.D188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0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87037037037037" calcext:value-type="float">
            <text:p>0,00087037037037037000</text:p>
          </table:table-cell>
          <table:table-cell table:formula="of:=[.D190]-[.D18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0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875" calcext:value-type="float">
            <text:p>0,00087500000000000000</text:p>
          </table:table-cell>
          <table:table-cell table:formula="of:=[.D191]-[.D19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0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87962962962963" calcext:value-type="float">
            <text:p>0,00087962962962963000</text:p>
          </table:table-cell>
          <table:table-cell table:formula="of:=[.D192]-[.D19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0" office:value-type="float" office:value="7640" calcext:value-type="float">
            <text:p>764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884259259259259" calcext:value-type="float">
            <text:p>0,00088425925925925900</text:p>
          </table:table-cell>
          <table:table-cell table:formula="of:=[.D193]-[.D192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0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888888888888889" calcext:value-type="float">
            <text:p>0,00088888888888888900</text:p>
          </table:table-cell>
          <table:table-cell table:formula="of:=[.D194]-[.D19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0" office:value-type="float" office:value="7720" calcext:value-type="float">
            <text:p>772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893518518518519" calcext:value-type="float">
            <text:p>0,00089351851851851900</text:p>
          </table:table-cell>
          <table:table-cell table:formula="of:=[.D195]-[.D19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0" office:value-type="float" office:value="7760" calcext:value-type="float">
            <text:p>776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898148148148148" calcext:value-type="float">
            <text:p>0,00089814814814814800</text:p>
          </table:table-cell>
          <table:table-cell table:formula="of:=[.D196]-[.D19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0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902777777777778" calcext:value-type="float">
            <text:p>0,00090277777777777800</text:p>
          </table:table-cell>
          <table:table-cell table:formula="of:=[.D197]-[.D196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0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907407407407407" calcext:value-type="float">
            <text:p>0,00090740740740740800</text:p>
          </table:table-cell>
          <table:table-cell table:formula="of:=[.D198]-[.D19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0" office:value-type="float" office:value="7880" calcext:value-type="float">
            <text:p>788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912037037037037" calcext:value-type="float">
            <text:p>0,00091203703703703700</text:p>
          </table:table-cell>
          <table:table-cell table:formula="of:=[.D199]-[.D19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0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916666666666667" calcext:value-type="float">
            <text:p>0,00091666666666666700</text:p>
          </table:table-cell>
          <table:table-cell table:formula="of:=[.D200]-[.D19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0" office:value-type="float" office:value="7960" calcext:value-type="float">
            <text:p>796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921296296296296" calcext:value-type="float">
            <text:p>0,00092129629629629600</text:p>
          </table:table-cell>
          <table:table-cell table:formula="of:=[.D201]-[.D200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0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925925925925926" calcext:value-type="float">
            <text:p>0,00092592592592592600</text:p>
          </table:table-cell>
          <table:table-cell table:formula="of:=[.D202]-[.D20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0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930555555555556" calcext:value-type="float">
            <text:p>0,00093055555555555600</text:p>
          </table:table-cell>
          <table:table-cell table:formula="of:=[.D203]-[.D20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0" office:value-type="float" office:value="8080" calcext:value-type="float">
            <text:p>808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935185185185185" calcext:value-type="float">
            <text:p>0,00093518518518518500</text:p>
          </table:table-cell>
          <table:table-cell table:formula="of:=[.D204]-[.D20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0" office:value-type="float" office:value="8120" calcext:value-type="float">
            <text:p>812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939814814814815" calcext:value-type="float">
            <text:p>0,00093981481481481500</text:p>
          </table:table-cell>
          <table:table-cell table:formula="of:=[.D205]-[.D204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0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944444444444445" calcext:value-type="float">
            <text:p>0,00094444444444444500</text:p>
          </table:table-cell>
          <table:table-cell table:formula="of:=[.D206]-[.D20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0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949074074074074" calcext:value-type="float">
            <text:p>0,00094907407407407400</text:p>
          </table:table-cell>
          <table:table-cell table:formula="of:=[.D207]-[.D20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0" office:value-type="float" office:value="8240" calcext:value-type="float">
            <text:p>824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953703703703704" calcext:value-type="float">
            <text:p>0,00095370370370370400</text:p>
          </table:table-cell>
          <table:table-cell table:formula="of:=[.D208]-[.D20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0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958333333333333" calcext:value-type="float">
            <text:p>0,00095833333333333300</text:p>
          </table:table-cell>
          <table:table-cell table:formula="of:=[.D209]-[.D208]" office:value-type="float" office:value="0.00000462962962962971" calcext:value-type="float">
            <text:p>0,000004629629629629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0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962962962962963" calcext:value-type="float">
            <text:p>0,00096296296296296300</text:p>
          </table:table-cell>
          <table:table-cell table:formula="of:=[.D210]-[.D20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0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967592592592593" calcext:value-type="float">
            <text:p>0,00096759259259259300</text:p>
          </table:table-cell>
          <table:table-cell table:formula="of:=[.D211]-[.D21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972222222222222" calcext:value-type="float">
            <text:p>0,00097222222222222200</text:p>
          </table:table-cell>
          <table:table-cell table:formula="of:=[.D212]-[.D21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0" office:value-type="float" office:value="8440" calcext:value-type="float">
            <text:p>844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976851851851852" calcext:value-type="float">
            <text:p>0,00097685185185185200</text:p>
          </table:table-cell>
          <table:table-cell table:formula="of:=[.D213]-[.D21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0" office:value-type="float" office:value="8480" calcext:value-type="float">
            <text:p>848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981481481481481" calcext:value-type="float">
            <text:p>0,00098148148148148100</text:p>
          </table:table-cell>
          <table:table-cell table:formula="of:=[.D214]-[.D213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0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986111111111111" calcext:value-type="float">
            <text:p>0,00098611111111111100</text:p>
          </table:table-cell>
          <table:table-cell table:formula="of:=[.D215]-[.D21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0" office:value-type="float" office:value="8560" calcext:value-type="float">
            <text:p>856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990740740740741" calcext:value-type="float">
            <text:p>0,00099074074074074100</text:p>
          </table:table-cell>
          <table:table-cell table:formula="of:=[.D216]-[.D21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0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99537037037037" calcext:value-type="float">
            <text:p>0,00099537037037037000</text:p>
          </table:table-cell>
          <table:table-cell table:formula="of:=[.D217]-[.D21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0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" calcext:value-type="float">
            <text:p>0,00100000000000000000</text:p>
          </table:table-cell>
          <table:table-cell table:formula="of:=[.D218]-[.D21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0" office:value-type="float" office:value="8680" calcext:value-type="float">
            <text:p>868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00462962962963" calcext:value-type="float">
            <text:p>0,00100462962962963000</text:p>
          </table:table-cell>
          <table:table-cell table:formula="of:=[.D219]-[.D21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0" office:value-type="float" office:value="8720" calcext:value-type="float">
            <text:p>872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00925925925926" calcext:value-type="float">
            <text:p>0,00100925925925926000</text:p>
          </table:table-cell>
          <table:table-cell table:formula="of:=[.D220]-[.D21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0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01388888888889" calcext:value-type="float">
            <text:p>0,00101388888888889000</text:p>
          </table:table-cell>
          <table:table-cell table:formula="of:=[.D221]-[.D22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0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01851851851852" calcext:value-type="float">
            <text:p>0,00101851851851852000</text:p>
          </table:table-cell>
          <table:table-cell table:formula="of:=[.D222]-[.D221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0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02314814814815" calcext:value-type="float">
            <text:p>0,00102314814814815000</text:p>
          </table:table-cell>
          <table:table-cell table:formula="of:=[.D223]-[.D22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0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02777777777778" calcext:value-type="float">
            <text:p>0,00102777777777778000</text:p>
          </table:table-cell>
          <table:table-cell table:formula="of:=[.D224]-[.D22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0" office:value-type="float" office:value="8920" calcext:value-type="float">
            <text:p>892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03240740740741" calcext:value-type="float">
            <text:p>0,00103240740740741000</text:p>
          </table:table-cell>
          <table:table-cell table:formula="of:=[.D225]-[.D22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0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03703703703704" calcext:value-type="float">
            <text:p>0,00103703703703704000</text:p>
          </table:table-cell>
          <table:table-cell table:formula="of:=[.D226]-[.D22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0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04166666666667" calcext:value-type="float">
            <text:p>0,00104166666666667000</text:p>
          </table:table-cell>
          <table:table-cell table:formula="of:=[.D227]-[.D22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0" office:value-type="float" office:value="9040" calcext:value-type="float">
            <text:p>904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0462962962963" calcext:value-type="float">
            <text:p>0,00104629629629630000</text:p>
          </table:table-cell>
          <table:table-cell table:formula="of:=[.D228]-[.D22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0" office:value-type="float" office:value="9080" calcext:value-type="float">
            <text:p>908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05092592592593" calcext:value-type="float">
            <text:p>0,00105092592592593000</text:p>
          </table:table-cell>
          <table:table-cell table:formula="of:=[.D229]-[.D22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0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05555555555556" calcext:value-type="float">
            <text:p>0,00105555555555556000</text:p>
          </table:table-cell>
          <table:table-cell table:formula="of:=[.D230]-[.D229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0" office:value-type="float" office:value="9160" calcext:value-type="float">
            <text:p>916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06018518518519" calcext:value-type="float">
            <text:p>0,00106018518518519000</text:p>
          </table:table-cell>
          <table:table-cell table:formula="of:=[.D231]-[.D23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0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06481481481481" calcext:value-type="float">
            <text:p>0,00106481481481481000</text:p>
          </table:table-cell>
          <table:table-cell table:formula="of:=[.D232]-[.D23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0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06944444444444" calcext:value-type="float">
            <text:p>0,00106944444444444000</text:p>
          </table:table-cell>
          <table:table-cell table:formula="of:=[.D233]-[.D23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0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07407407407407" calcext:value-type="float">
            <text:p>0,00107407407407407000</text:p>
          </table:table-cell>
          <table:table-cell table:formula="of:=[.D234]-[.D23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0" office:value-type="float" office:value="9320" calcext:value-type="float">
            <text:p>932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0787037037037" calcext:value-type="float">
            <text:p>0,00107870370370370000</text:p>
          </table:table-cell>
          <table:table-cell table:formula="of:=[.D235]-[.D23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0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08333333333333" calcext:value-type="float">
            <text:p>0,00108333333333333000</text:p>
          </table:table-cell>
          <table:table-cell table:formula="of:=[.D236]-[.D23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0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08796296296296" calcext:value-type="float">
            <text:p>0,00108796296296296000</text:p>
          </table:table-cell>
          <table:table-cell table:formula="of:=[.D237]-[.D23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0" office:value-type="float" office:value="9440" calcext:value-type="float">
            <text:p>944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09259259259259" calcext:value-type="float">
            <text:p>0,00109259259259259000</text:p>
          </table:table-cell>
          <table:table-cell table:formula="of:=[.D238]-[.D237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0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09722222222222" calcext:value-type="float">
            <text:p>0,00109722222222222000</text:p>
          </table:table-cell>
          <table:table-cell table:formula="of:=[.D239]-[.D23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0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10185185185185" calcext:value-type="float">
            <text:p>0,00110185185185185000</text:p>
          </table:table-cell>
          <table:table-cell table:formula="of:=[.D240]-[.D23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0" office:value-type="float" office:value="9560" calcext:value-type="float">
            <text:p>956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10648148148148" calcext:value-type="float">
            <text:p>0,00110648148148148000</text:p>
          </table:table-cell>
          <table:table-cell table:formula="of:=[.D241]-[.D24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formula="of:=[.B240]+40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11111111111111" calcext:value-type="float">
            <text:p>0,00111111111111111000</text:p>
          </table:table-cell>
          <table:table-cell table:formula="of:=[.D242]-[.D24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0" office:value-type="float" office:value="9640" calcext:value-type="float">
            <text:p>964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11574074074074" calcext:value-type="float">
            <text:p>0,00111574074074074000</text:p>
          </table:table-cell>
          <table:table-cell table:formula="of:=[.D243]-[.D24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0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12037037037037" calcext:value-type="float">
            <text:p>0,00112037037037037000</text:p>
          </table:table-cell>
          <table:table-cell table:formula="of:=[.D244]-[.D24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0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125" calcext:value-type="float">
            <text:p>0,00112500000000000000</text:p>
          </table:table-cell>
          <table:table-cell table:formula="of:=[.D245]-[.D244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0" office:value-type="float" office:value="9760" calcext:value-type="float">
            <text:p>976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12962962962963" calcext:value-type="float">
            <text:p>0,00112962962962963000</text:p>
          </table:table-cell>
          <table:table-cell table:formula="of:=[.D246]-[.D24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0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13425925925926" calcext:value-type="float">
            <text:p>0,00113425925925926000</text:p>
          </table:table-cell>
          <table:table-cell table:formula="of:=[.D247]-[.D24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0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13888888888889" calcext:value-type="float">
            <text:p>0,00113888888888889000</text:p>
          </table:table-cell>
          <table:table-cell table:formula="of:=[.D248]-[.D24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0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14351851851852" calcext:value-type="float">
            <text:p>0,00114351851851852000</text:p>
          </table:table-cell>
          <table:table-cell table:formula="of:=[.D249]-[.D24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0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14814814814815" calcext:value-type="float">
            <text:p>0,00114814814814815000</text:p>
          </table:table-cell>
          <table:table-cell table:formula="of:=[.D250]-[.D24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0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15277777777778" calcext:value-type="float">
            <text:p>0,00115277777777778000</text:p>
          </table:table-cell>
          <table:table-cell table:formula="of:=[.D251]-[.D25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0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15740740740741" calcext:value-type="float">
            <text:p>0,00115740740740741000</text:p>
          </table:table-cell>
          <table:table-cell table:formula="of:=[.D252]-[.D25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0" office:value-type="float" office:value="10040" calcext:value-type="float">
            <text:p>1004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16203703703704" calcext:value-type="float">
            <text:p>0,00116203703703704000</text:p>
          </table:table-cell>
          <table:table-cell table:formula="of:=[.D253]-[.D252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0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16666666666667" calcext:value-type="float">
            <text:p>0,00116666666666667000</text:p>
          </table:table-cell>
          <table:table-cell table:formula="of:=[.D254]-[.D25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0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1712962962963" calcext:value-type="float">
            <text:p>0,00117129629629630000</text:p>
          </table:table-cell>
          <table:table-cell table:formula="of:=[.D255]-[.D25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0" office:value-type="float" office:value="10160" calcext:value-type="float">
            <text:p>1016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17592592592593" calcext:value-type="float">
            <text:p>0,00117592592592593000</text:p>
          </table:table-cell>
          <table:table-cell table:formula="of:=[.D256]-[.D25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0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18055555555556" calcext:value-type="float">
            <text:p>0,00118055555555556000</text:p>
          </table:table-cell>
          <table:table-cell table:formula="of:=[.D257]-[.D25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0" office:value-type="float" office:value="10240" calcext:value-type="float">
            <text:p>1024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18518518518519" calcext:value-type="float">
            <text:p>0,00118518518518519000</text:p>
          </table:table-cell>
          <table:table-cell table:formula="of:=[.D258]-[.D25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0" office:value-type="float" office:value="10280" calcext:value-type="float">
            <text:p>1028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18981481481481" calcext:value-type="float">
            <text:p>0,00118981481481481000</text:p>
          </table:table-cell>
          <table:table-cell table:formula="of:=[.D259]-[.D25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0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19444444444444" calcext:value-type="float">
            <text:p>0,00119444444444444000</text:p>
          </table:table-cell>
          <table:table-cell table:formula="of:=[.D260]-[.D25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0" office:value-type="float" office:value="10360" calcext:value-type="float">
            <text:p>1036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19907407407407" calcext:value-type="float">
            <text:p>0,00119907407407407000</text:p>
          </table:table-cell>
          <table:table-cell table:formula="of:=[.D261]-[.D260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0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2037037037037" calcext:value-type="float">
            <text:p>0,00120370370370370000</text:p>
          </table:table-cell>
          <table:table-cell table:formula="of:=[.D262]-[.D26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0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20833333333333" calcext:value-type="float">
            <text:p>0,00120833333333333000</text:p>
          </table:table-cell>
          <table:table-cell table:formula="of:=[.D263]-[.D26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0" office:value-type="float" office:value="10480" calcext:value-type="float">
            <text:p>1048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21296296296296" calcext:value-type="float">
            <text:p>0,00121296296296296000</text:p>
          </table:table-cell>
          <table:table-cell table:formula="of:=[.D264]-[.D26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0" office:value-type="float" office:value="10520" calcext:value-type="float">
            <text:p>1052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21759259259259" calcext:value-type="float">
            <text:p>0,00121759259259259000</text:p>
          </table:table-cell>
          <table:table-cell table:formula="of:=[.D265]-[.D26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0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22222222222222" calcext:value-type="float">
            <text:p>0,00122222222222222000</text:p>
          </table:table-cell>
          <table:table-cell table:formula="of:=[.D266]-[.D26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0" office:value-type="float" office:value="10600" calcext:value-type="float">
            <text:p>1060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22685185185185" calcext:value-type="float">
            <text:p>0,00122685185185185000</text:p>
          </table:table-cell>
          <table:table-cell table:formula="of:=[.D267]-[.D26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0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23148148148148" calcext:value-type="float">
            <text:p>0,00123148148148148000</text:p>
          </table:table-cell>
          <table:table-cell table:formula="of:=[.D268]-[.D26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0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23611111111111" calcext:value-type="float">
            <text:p>0,00123611111111111000</text:p>
          </table:table-cell>
          <table:table-cell table:formula="of:=[.D269]-[.D268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0" office:value-type="float" office:value="10720" calcext:value-type="float">
            <text:p>1072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24074074074074" calcext:value-type="float">
            <text:p>0,00124074074074074000</text:p>
          </table:table-cell>
          <table:table-cell table:formula="of:=[.D270]-[.D26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0" office:value-type="float" office:value="10760" calcext:value-type="float">
            <text:p>10760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24537037037037" calcext:value-type="float">
            <text:p>0,00124537037037037000</text:p>
          </table:table-cell>
          <table:table-cell table:formula="of:=[.D271]-[.D27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25" calcext:value-type="float">
            <text:p>0,00125000000000000000</text:p>
          </table:table-cell>
          <table:table-cell table:formula="of:=[.D272]-[.D27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0" office:value-type="float" office:value="10840" calcext:value-type="float">
            <text:p>10840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25462962962963" calcext:value-type="float">
            <text:p>0,00125462962962963000</text:p>
          </table:table-cell>
          <table:table-cell table:formula="of:=[.D273]-[.D27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0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25925925925926" calcext:value-type="float">
            <text:p>0,00125925925925926000</text:p>
          </table:table-cell>
          <table:table-cell table:formula="of:=[.D274]-[.D27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0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26388888888889" calcext:value-type="float">
            <text:p>0,00126388888888889000</text:p>
          </table:table-cell>
          <table:table-cell table:formula="of:=[.D275]-[.D27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0" office:value-type="float" office:value="10960" calcext:value-type="float">
            <text:p>1096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26851851851852" calcext:value-type="float">
            <text:p>0,00126851851851852000</text:p>
          </table:table-cell>
          <table:table-cell table:formula="of:=[.D276]-[.D275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0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27314814814815" calcext:value-type="float">
            <text:p>0,00127314814814815000</text:p>
          </table:table-cell>
          <table:table-cell table:formula="of:=[.D277]-[.D27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0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27777777777778" calcext:value-type="float">
            <text:p>0,00127777777777778000</text:p>
          </table:table-cell>
          <table:table-cell table:formula="of:=[.D278]-[.D27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0" office:value-type="float" office:value="11080" calcext:value-type="float">
            <text:p>11080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28240740740741" calcext:value-type="float">
            <text:p>0,00128240740740741000</text:p>
          </table:table-cell>
          <table:table-cell table:formula="of:=[.D279]-[.D27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0" office:value-type="float" office:value="11120" calcext:value-type="float">
            <text:p>1112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28703703703704" calcext:value-type="float">
            <text:p>0,00128703703703704000</text:p>
          </table:table-cell>
          <table:table-cell table:formula="of:=[.D280]-[.D27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0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29166666666667" calcext:value-type="float">
            <text:p>0,00129166666666667000</text:p>
          </table:table-cell>
          <table:table-cell table:formula="of:=[.D281]-[.D28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0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2962962962963" calcext:value-type="float">
            <text:p>0,00129629629629630000</text:p>
          </table:table-cell>
          <table:table-cell table:formula="of:=[.D282]-[.D28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0" office:value-type="float" office:value="11240" calcext:value-type="float">
            <text:p>11240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30092592592593" calcext:value-type="float">
            <text:p>0,00130092592592593000</text:p>
          </table:table-cell>
          <table:table-cell table:formula="of:=[.D283]-[.D28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0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30555555555556" calcext:value-type="float">
            <text:p>0,00130555555555556000</text:p>
          </table:table-cell>
          <table:table-cell table:formula="of:=[.D284]-[.D283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0" office:value-type="float" office:value="11320" calcext:value-type="float">
            <text:p>11320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31018518518519" calcext:value-type="float">
            <text:p>0,00131018518518519000</text:p>
          </table:table-cell>
          <table:table-cell table:formula="of:=[.D285]-[.D28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0" office:value-type="float" office:value="11360" calcext:value-type="float">
            <text:p>1136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31481481481481" calcext:value-type="float">
            <text:p>0,00131481481481481000</text:p>
          </table:table-cell>
          <table:table-cell table:formula="of:=[.D286]-[.D28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0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31944444444444" calcext:value-type="float">
            <text:p>0,00131944444444444000</text:p>
          </table:table-cell>
          <table:table-cell table:formula="of:=[.D287]-[.D28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0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32407407407407" calcext:value-type="float">
            <text:p>0,00132407407407407000</text:p>
          </table:table-cell>
          <table:table-cell table:formula="of:=[.D288]-[.D28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0" office:value-type="float" office:value="11480" calcext:value-type="float">
            <text:p>11480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3287037037037" calcext:value-type="float">
            <text:p>0,00132870370370370000</text:p>
          </table:table-cell>
          <table:table-cell table:formula="of:=[.D289]-[.D28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0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33333333333333" calcext:value-type="float">
            <text:p>0,00133333333333333000</text:p>
          </table:table-cell>
          <table:table-cell table:formula="of:=[.D290]-[.D28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0" office:value-type="float" office:value="11560" calcext:value-type="float">
            <text:p>11560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33796296296296" calcext:value-type="float">
            <text:p>0,00133796296296296000</text:p>
          </table:table-cell>
          <table:table-cell table:formula="of:=[.D291]-[.D29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0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34259259259259" calcext:value-type="float">
            <text:p>0,00134259259259259000</text:p>
          </table:table-cell>
          <table:table-cell table:formula="of:=[.D292]-[.D291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0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34722222222222" calcext:value-type="float">
            <text:p>0,00134722222222222000</text:p>
          </table:table-cell>
          <table:table-cell table:formula="of:=[.D293]-[.D29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0" office:value-type="float" office:value="11680" calcext:value-type="float">
            <text:p>1168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35185185185185" calcext:value-type="float">
            <text:p>0,00135185185185185000</text:p>
          </table:table-cell>
          <table:table-cell table:formula="of:=[.D294]-[.D29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0" office:value-type="float" office:value="11720" calcext:value-type="float">
            <text:p>11720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35648148148148" calcext:value-type="float">
            <text:p>0,00135648148148148000</text:p>
          </table:table-cell>
          <table:table-cell table:formula="of:=[.D295]-[.D29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0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36111111111111" calcext:value-type="float">
            <text:p>0,00136111111111111000</text:p>
          </table:table-cell>
          <table:table-cell table:formula="of:=[.D296]-[.D29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0" office:value-type="float" office:value="11800" calcext:value-type="float">
            <text:p>1180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36574074074074" calcext:value-type="float">
            <text:p>0,00136574074074074000</text:p>
          </table:table-cell>
          <table:table-cell table:formula="of:=[.D297]-[.D29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0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37037037037037" calcext:value-type="float">
            <text:p>0,00137037037037037000</text:p>
          </table:table-cell>
          <table:table-cell table:formula="of:=[.D298]-[.D29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0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375" calcext:value-type="float">
            <text:p>0,00137500000000000000</text:p>
          </table:table-cell>
          <table:table-cell table:formula="of:=[.D299]-[.D29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0" office:value-type="float" office:value="11920" calcext:value-type="float">
            <text:p>1192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37962962962963" calcext:value-type="float">
            <text:p>0,00137962962962963000</text:p>
          </table:table-cell>
          <table:table-cell table:formula="of:=[.D300]-[.D299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0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38425925925926" calcext:value-type="float">
            <text:p>0,00138425925925926000</text:p>
          </table:table-cell>
          <table:table-cell table:formula="of:=[.D301]-[.D30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0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38888888888889" calcext:value-type="float">
            <text:p>0,00138888888888889000</text:p>
          </table:table-cell>
          <table:table-cell table:formula="of:=[.D302]-[.D30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0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39351851851852" calcext:value-type="float">
            <text:p>0,00139351851851852000</text:p>
          </table:table-cell>
          <table:table-cell table:formula="of:=[.D303]-[.D30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0" office:value-type="float" office:value="12080" calcext:value-type="float">
            <text:p>1208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39814814814815" calcext:value-type="float">
            <text:p>0,00139814814814815000</text:p>
          </table:table-cell>
          <table:table-cell table:formula="of:=[.D304]-[.D30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0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40277777777778" calcext:value-type="float">
            <text:p>0,00140277777777778000</text:p>
          </table:table-cell>
          <table:table-cell table:formula="of:=[.D305]-[.D30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0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40740740740741" calcext:value-type="float">
            <text:p>0,00140740740740741000</text:p>
          </table:table-cell>
          <table:table-cell table:formula="of:=[.D306]-[.D30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0" office:value-type="float" office:value="12200" calcext:value-type="float">
            <text:p>1220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41203703703704" calcext:value-type="float">
            <text:p>0,00141203703703704000</text:p>
          </table:table-cell>
          <table:table-cell table:formula="of:=[.D307]-[.D306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0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41666666666667" calcext:value-type="float">
            <text:p>0,00141666666666667000</text:p>
          </table:table-cell>
          <table:table-cell table:formula="of:=[.D308]-[.D30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0" office:value-type="float" office:value="12280" calcext:value-type="float">
            <text:p>12280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4212962962963" calcext:value-type="float">
            <text:p>0,00142129629629630000</text:p>
          </table:table-cell>
          <table:table-cell table:formula="of:=[.D309]-[.D30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0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42592592592593" calcext:value-type="float">
            <text:p>0,00142592592592593000</text:p>
          </table:table-cell>
          <table:table-cell table:formula="of:=[.D310]-[.D30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0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43055555555556" calcext:value-type="float">
            <text:p>0,00143055555555556000</text:p>
          </table:table-cell>
          <table:table-cell table:formula="of:=[.D311]-[.D31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0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43518518518519" calcext:value-type="float">
            <text:p>0,00143518518518519000</text:p>
          </table:table-cell>
          <table:table-cell table:formula="of:=[.D312]-[.D31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0" office:value-type="float" office:value="12440" calcext:value-type="float">
            <text:p>12440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43981481481481" calcext:value-type="float">
            <text:p>0,00143981481481481000</text:p>
          </table:table-cell>
          <table:table-cell table:formula="of:=[.D313]-[.D31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0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44444444444444" calcext:value-type="float">
            <text:p>0,00144444444444444000</text:p>
          </table:table-cell>
          <table:table-cell table:formula="of:=[.D314]-[.D31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0" office:value-type="float" office:value="12520" calcext:value-type="float">
            <text:p>12520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44907407407407" calcext:value-type="float">
            <text:p>0,00144907407407407000</text:p>
          </table:table-cell>
          <table:table-cell table:formula="of:=[.D315]-[.D314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0" office:value-type="float" office:value="12560" calcext:value-type="float">
            <text:p>1256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4537037037037" calcext:value-type="float">
            <text:p>0,00145370370370370000</text:p>
          </table:table-cell>
          <table:table-cell table:formula="of:=[.D316]-[.D31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45833333333333" calcext:value-type="float">
            <text:p>0,00145833333333333000</text:p>
          </table:table-cell>
          <table:table-cell table:formula="of:=[.D317]-[.D31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0" office:value-type="float" office:value="12640" calcext:value-type="float">
            <text:p>1264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46296296296296" calcext:value-type="float">
            <text:p>0,00146296296296296000</text:p>
          </table:table-cell>
          <table:table-cell table:formula="of:=[.D318]-[.D31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0" office:value-type="float" office:value="12680" calcext:value-type="float">
            <text:p>12680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46759259259259" calcext:value-type="float">
            <text:p>0,00146759259259259000</text:p>
          </table:table-cell>
          <table:table-cell table:formula="of:=[.D319]-[.D31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0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47222222222222" calcext:value-type="float">
            <text:p>0,00147222222222222000</text:p>
          </table:table-cell>
          <table:table-cell table:formula="of:=[.D320]-[.D31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0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47685185185185" calcext:value-type="float">
            <text:p>0,00147685185185185000</text:p>
          </table:table-cell>
          <table:table-cell table:formula="of:=[.D321]-[.D32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0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48148148148148" calcext:value-type="float">
            <text:p>0,00148148148148148000</text:p>
          </table:table-cell>
          <table:table-cell table:formula="of:=[.D322]-[.D32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0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48611111111111" calcext:value-type="float">
            <text:p>0,00148611111111111000</text:p>
          </table:table-cell>
          <table:table-cell table:formula="of:=[.D323]-[.D322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0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49074074074074" calcext:value-type="float">
            <text:p>0,00149074074074074000</text:p>
          </table:table-cell>
          <table:table-cell table:formula="of:=[.D324]-[.D32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0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49537037037037" calcext:value-type="float">
            <text:p>0,00149537037037037000</text:p>
          </table:table-cell>
          <table:table-cell table:formula="of:=[.D325]-[.D32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0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5" calcext:value-type="float">
            <text:p>0,00150000000000000000</text:p>
          </table:table-cell>
          <table:table-cell table:formula="of:=[.D326]-[.D32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0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50462962962963" calcext:value-type="float">
            <text:p>0,00150462962962963000</text:p>
          </table:table-cell>
          <table:table-cell table:formula="of:=[.D327]-[.D32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0" office:value-type="float" office:value="13040" calcext:value-type="float">
            <text:p>1304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50925925925926" calcext:value-type="float">
            <text:p>0,00150925925925926000</text:p>
          </table:table-cell>
          <table:table-cell table:formula="of:=[.D328]-[.D32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0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51388888888889" calcext:value-type="float">
            <text:p>0,00151388888888889000</text:p>
          </table:table-cell>
          <table:table-cell table:formula="of:=[.D329]-[.D32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0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51851851851852" calcext:value-type="float">
            <text:p>0,00151851851851852000</text:p>
          </table:table-cell>
          <table:table-cell table:formula="of:=[.D330]-[.D329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0" office:value-type="float" office:value="13160" calcext:value-type="float">
            <text:p>13160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52314814814815" calcext:value-type="float">
            <text:p>0,00152314814814815000</text:p>
          </table:table-cell>
          <table:table-cell table:formula="of:=[.D331]-[.D33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0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52777777777778" calcext:value-type="float">
            <text:p>0,00152777777777778000</text:p>
          </table:table-cell>
          <table:table-cell table:formula="of:=[.D332]-[.D33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0" office:value-type="float" office:value="13240" calcext:value-type="float">
            <text:p>13240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53240740740741" calcext:value-type="float">
            <text:p>0,00153240740740741000</text:p>
          </table:table-cell>
          <table:table-cell table:formula="of:=[.D333]-[.D33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0" office:value-type="float" office:value="13280" calcext:value-type="float">
            <text:p>1328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53703703703704" calcext:value-type="float">
            <text:p>0,00153703703703704000</text:p>
          </table:table-cell>
          <table:table-cell table:formula="of:=[.D334]-[.D33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0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54166666666667" calcext:value-type="float">
            <text:p>0,00154166666666667000</text:p>
          </table:table-cell>
          <table:table-cell table:formula="of:=[.D335]-[.D33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0" office:value-type="float" office:value="13360" calcext:value-type="float">
            <text:p>1336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5462962962963" calcext:value-type="float">
            <text:p>0,00154629629629630000</text:p>
          </table:table-cell>
          <table:table-cell table:formula="of:=[.D336]-[.D33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0" office:value-type="float" office:value="13400" calcext:value-type="float">
            <text:p>1340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55092592592593" calcext:value-type="float">
            <text:p>0,00155092592592593000</text:p>
          </table:table-cell>
          <table:table-cell table:formula="of:=[.D337]-[.D33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0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55555555555556" calcext:value-type="float">
            <text:p>0,00155555555555556000</text:p>
          </table:table-cell>
          <table:table-cell table:formula="of:=[.D338]-[.D337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0" office:value-type="float" office:value="13480" calcext:value-type="float">
            <text:p>13480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56018518518519" calcext:value-type="float">
            <text:p>0,00156018518518519000</text:p>
          </table:table-cell>
          <table:table-cell table:formula="of:=[.D339]-[.D33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0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56481481481481" calcext:value-type="float">
            <text:p>0,00156481481481482000</text:p>
          </table:table-cell>
          <table:table-cell table:formula="of:=[.D340]-[.D33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0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56944444444444" calcext:value-type="float">
            <text:p>0,00156944444444444000</text:p>
          </table:table-cell>
          <table:table-cell table:formula="of:=[.D341]-[.D34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0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57407407407407" calcext:value-type="float">
            <text:p>0,00157407407407407000</text:p>
          </table:table-cell>
          <table:table-cell table:formula="of:=[.D342]-[.D34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0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5787037037037" calcext:value-type="float">
            <text:p>0,00157870370370370000</text:p>
          </table:table-cell>
          <table:table-cell table:formula="of:=[.D343]-[.D34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0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58333333333333" calcext:value-type="float">
            <text:p>0,00158333333333333000</text:p>
          </table:table-cell>
          <table:table-cell table:formula="of:=[.D344]-[.D34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0" office:value-type="float" office:value="13720" calcext:value-type="float">
            <text:p>13720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58796296296296" calcext:value-type="float">
            <text:p>0,00158796296296296000</text:p>
          </table:table-cell>
          <table:table-cell table:formula="of:=[.D345]-[.D34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0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59259259259259" calcext:value-type="float">
            <text:p>0,00159259259259259000</text:p>
          </table:table-cell>
          <table:table-cell table:formula="of:=[.D346]-[.D345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0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59722222222222" calcext:value-type="float">
            <text:p>0,00159722222222222000</text:p>
          </table:table-cell>
          <table:table-cell table:formula="of:=[.D347]-[.D34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0" office:value-type="float" office:value="13840" calcext:value-type="float">
            <text:p>1384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60185185185185" calcext:value-type="float">
            <text:p>0,00160185185185185000</text:p>
          </table:table-cell>
          <table:table-cell table:formula="of:=[.D348]-[.D34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0" office:value-type="float" office:value="13880" calcext:value-type="float">
            <text:p>13880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60648148148148" calcext:value-type="float">
            <text:p>0,00160648148148148000</text:p>
          </table:table-cell>
          <table:table-cell table:formula="of:=[.D349]-[.D34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0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61111111111111" calcext:value-type="float">
            <text:p>0,00161111111111111000</text:p>
          </table:table-cell>
          <table:table-cell table:formula="of:=[.D350]-[.D34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0" office:value-type="float" office:value="13960" calcext:value-type="float">
            <text:p>13960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61574074074074" calcext:value-type="float">
            <text:p>0,00161574074074074000</text:p>
          </table:table-cell>
          <table:table-cell table:formula="of:=[.D351]-[.D35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0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62037037037037" calcext:value-type="float">
            <text:p>0,00162037037037037000</text:p>
          </table:table-cell>
          <table:table-cell table:formula="of:=[.D352]-[.D35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0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625" calcext:value-type="float">
            <text:p>0,00162500000000000000</text:p>
          </table:table-cell>
          <table:table-cell table:formula="of:=[.D353]-[.D35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0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62962962962963" calcext:value-type="float">
            <text:p>0,00162962962962963000</text:p>
          </table:table-cell>
          <table:table-cell table:formula="of:=[.D354]-[.D353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0" office:value-type="float" office:value="14120" calcext:value-type="float">
            <text:p>14120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63425925925926" calcext:value-type="float">
            <text:p>0,00163425925925926000</text:p>
          </table:table-cell>
          <table:table-cell table:formula="of:=[.D355]-[.D35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0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63888888888889" calcext:value-type="float">
            <text:p>0,00163888888888889000</text:p>
          </table:table-cell>
          <table:table-cell table:formula="of:=[.D356]-[.D35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0" office:value-type="float" office:value="14200" calcext:value-type="float">
            <text:p>1420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64351851851852" calcext:value-type="float">
            <text:p>0,00164351851851852000</text:p>
          </table:table-cell>
          <table:table-cell table:formula="of:=[.D357]-[.D35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0" office:value-type="float" office:value="14240" calcext:value-type="float">
            <text:p>1424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64814814814815" calcext:value-type="float">
            <text:p>0,00164814814814815000</text:p>
          </table:table-cell>
          <table:table-cell table:formula="of:=[.D358]-[.D35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0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65277777777778" calcext:value-type="float">
            <text:p>0,00165277777777778000</text:p>
          </table:table-cell>
          <table:table-cell table:formula="of:=[.D359]-[.D35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0" office:value-type="float" office:value="14320" calcext:value-type="float">
            <text:p>1432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65740740740741" calcext:value-type="float">
            <text:p>0,00165740740740741000</text:p>
          </table:table-cell>
          <table:table-cell table:formula="of:=[.D360]-[.D35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0" office:value-type="float" office:value="14360" calcext:value-type="float">
            <text:p>14360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66203703703704" calcext:value-type="float">
            <text:p>0,00166203703703704000</text:p>
          </table:table-cell>
          <table:table-cell table:formula="of:=[.D361]-[.D360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66666666666667" calcext:value-type="float">
            <text:p>0,00166666666666667000</text:p>
          </table:table-cell>
          <table:table-cell table:formula="of:=[.D362]-[.D36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0" office:value-type="float" office:value="14440" calcext:value-type="float">
            <text:p>14440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6712962962963" calcext:value-type="float">
            <text:p>0,00167129629629630000</text:p>
          </table:table-cell>
          <table:table-cell table:formula="of:=[.D363]-[.D36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0" office:value-type="float" office:value="14480" calcext:value-type="float">
            <text:p>1448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67592592592593" calcext:value-type="float">
            <text:p>0,00167592592592593000</text:p>
          </table:table-cell>
          <table:table-cell table:formula="of:=[.D364]-[.D36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0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68055555555556" calcext:value-type="float">
            <text:p>0,00168055555555556000</text:p>
          </table:table-cell>
          <table:table-cell table:formula="of:=[.D365]-[.D36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0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68518518518519" calcext:value-type="float">
            <text:p>0,00168518518518519000</text:p>
          </table:table-cell>
          <table:table-cell table:formula="of:=[.D366]-[.D36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0" office:value-type="float" office:value="14600" calcext:value-type="float">
            <text:p>1460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68981481481481" calcext:value-type="float">
            <text:p>0,00168981481481481000</text:p>
          </table:table-cell>
          <table:table-cell table:formula="of:=[.D367]-[.D36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0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69444444444444" calcext:value-type="float">
            <text:p>0,00169444444444444000</text:p>
          </table:table-cell>
          <table:table-cell table:formula="of:=[.D368]-[.D36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0" office:value-type="float" office:value="14680" calcext:value-type="float">
            <text:p>14680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69907407407407" calcext:value-type="float">
            <text:p>0,00169907407407407000</text:p>
          </table:table-cell>
          <table:table-cell table:formula="of:=[.D369]-[.D368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0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7037037037037" calcext:value-type="float">
            <text:p>0,00170370370370370000</text:p>
          </table:table-cell>
          <table:table-cell table:formula="of:=[.D370]-[.D36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0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70833333333333" calcext:value-type="float">
            <text:p>0,00170833333333333000</text:p>
          </table:table-cell>
          <table:table-cell table:formula="of:=[.D371]-[.D37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0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71296296296296" calcext:value-type="float">
            <text:p>0,00171296296296296000</text:p>
          </table:table-cell>
          <table:table-cell table:formula="of:=[.D372]-[.D37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0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71759259259259" calcext:value-type="float">
            <text:p>0,00171759259259259000</text:p>
          </table:table-cell>
          <table:table-cell table:formula="of:=[.D373]-[.D37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0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72222222222222" calcext:value-type="float">
            <text:p>0,00172222222222222000</text:p>
          </table:table-cell>
          <table:table-cell table:formula="of:=[.D374]-[.D37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0" office:value-type="float" office:value="14920" calcext:value-type="float">
            <text:p>14920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72685185185185" calcext:value-type="float">
            <text:p>0,00172685185185185000</text:p>
          </table:table-cell>
          <table:table-cell table:formula="of:=[.D375]-[.D37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0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73148148148148" calcext:value-type="float">
            <text:p>0,00173148148148148000</text:p>
          </table:table-cell>
          <table:table-cell table:formula="of:=[.D376]-[.D37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0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73611111111111" calcext:value-type="float">
            <text:p>0,00173611111111111000</text:p>
          </table:table-cell>
          <table:table-cell table:formula="of:=[.D377]-[.D376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0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74074074074074" calcext:value-type="float">
            <text:p>0,00174074074074074000</text:p>
          </table:table-cell>
          <table:table-cell table:formula="of:=[.D378]-[.D37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0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74537037037037" calcext:value-type="float">
            <text:p>0,00174537037037037000</text:p>
          </table:table-cell>
          <table:table-cell table:formula="of:=[.D379]-[.D37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0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75" calcext:value-type="float">
            <text:p>0,00175000000000000000</text:p>
          </table:table-cell>
          <table:table-cell table:formula="of:=[.D380]-[.D37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0" office:value-type="float" office:value="15160" calcext:value-type="float">
            <text:p>15160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75462962962963" calcext:value-type="float">
            <text:p>0,00175462962962963000</text:p>
          </table:table-cell>
          <table:table-cell table:formula="of:=[.D381]-[.D38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0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75925925925926" calcext:value-type="float">
            <text:p>0,00175925925925926000</text:p>
          </table:table-cell>
          <table:table-cell table:formula="of:=[.D382]-[.D38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0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76388888888889" calcext:value-type="float">
            <text:p>0,00176388888888889000</text:p>
          </table:table-cell>
          <table:table-cell table:formula="of:=[.D383]-[.D38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0" office:value-type="float" office:value="15280" calcext:value-type="float">
            <text:p>1528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76851851851852" calcext:value-type="float">
            <text:p>0,00176851851851852000</text:p>
          </table:table-cell>
          <table:table-cell table:formula="of:=[.D384]-[.D38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0" office:value-type="float" office:value="15320" calcext:value-type="float">
            <text:p>15320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77314814814815" calcext:value-type="float">
            <text:p>0,00177314814814815000</text:p>
          </table:table-cell>
          <table:table-cell table:formula="of:=[.D385]-[.D384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0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77777777777778" calcext:value-type="float">
            <text:p>0,00177777777777778000</text:p>
          </table:table-cell>
          <table:table-cell table:formula="of:=[.D386]-[.D38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0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78240740740741" calcext:value-type="float">
            <text:p>0,00178240740740741000</text:p>
          </table:table-cell>
          <table:table-cell table:formula="of:=[.D387]-[.D38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0" office:value-type="float" office:value="15440" calcext:value-type="float">
            <text:p>1544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78703703703704" calcext:value-type="float">
            <text:p>0,00178703703703704000</text:p>
          </table:table-cell>
          <table:table-cell table:formula="of:=[.D388]-[.D38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0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79166666666667" calcext:value-type="float">
            <text:p>0,00179166666666667000</text:p>
          </table:table-cell>
          <table:table-cell table:formula="of:=[.D389]-[.D38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0" office:value-type="float" office:value="15520" calcext:value-type="float">
            <text:p>1552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7962962962963" calcext:value-type="float">
            <text:p>0,00179629629629630000</text:p>
          </table:table-cell>
          <table:table-cell table:formula="of:=[.D390]-[.D38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0" office:value-type="float" office:value="15560" calcext:value-type="float">
            <text:p>15560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80092592592593" calcext:value-type="float">
            <text:p>0,00180092592592593000</text:p>
          </table:table-cell>
          <table:table-cell table:formula="of:=[.D391]-[.D39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0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80555555555556" calcext:value-type="float">
            <text:p>0,00180555555555556000</text:p>
          </table:table-cell>
          <table:table-cell table:formula="of:=[.D392]-[.D391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0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81018518518519" calcext:value-type="float">
            <text:p>0,00181018518518519000</text:p>
          </table:table-cell>
          <table:table-cell table:formula="of:=[.D393]-[.D39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0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81481481481482" calcext:value-type="float">
            <text:p>0,00181481481481482000</text:p>
          </table:table-cell>
          <table:table-cell table:formula="of:=[.D394]-[.D39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0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81944444444444" calcext:value-type="float">
            <text:p>0,00181944444444444000</text:p>
          </table:table-cell>
          <table:table-cell table:formula="of:=[.D395]-[.D39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0" office:value-type="float" office:value="15760" calcext:value-type="float">
            <text:p>1576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82407407407407" calcext:value-type="float">
            <text:p>0,00182407407407407000</text:p>
          </table:table-cell>
          <table:table-cell table:formula="of:=[.D396]-[.D39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0" office:value-type="float" office:value="15800" calcext:value-type="float">
            <text:p>1580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8287037037037" calcext:value-type="float">
            <text:p>0,00182870370370370000</text:p>
          </table:table-cell>
          <table:table-cell table:formula="of:=[.D397]-[.D39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0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83333333333333" calcext:value-type="float">
            <text:p>0,00183333333333333000</text:p>
          </table:table-cell>
          <table:table-cell table:formula="of:=[.D398]-[.D39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0" office:value-type="float" office:value="15880" calcext:value-type="float">
            <text:p>15880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83796296296296" calcext:value-type="float">
            <text:p>0,00183796296296296000</text:p>
          </table:table-cell>
          <table:table-cell table:formula="of:=[.D399]-[.D39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0" office:value-type="float" office:value="15920" calcext:value-type="float">
            <text:p>1592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84259259259259" calcext:value-type="float">
            <text:p>0,00184259259259259000</text:p>
          </table:table-cell>
          <table:table-cell table:formula="of:=[.D400]-[.D399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0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84722222222222" calcext:value-type="float">
            <text:p>0,00184722222222222000</text:p>
          </table:table-cell>
          <table:table-cell table:formula="of:=[.D401]-[.D40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0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85185185185185" calcext:value-type="float">
            <text:p>0,00185185185185185000</text:p>
          </table:table-cell>
          <table:table-cell table:formula="of:=[.D402]-[.D40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0" office:value-type="float" office:value="16040" calcext:value-type="float">
            <text:p>16040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85648148148148" calcext:value-type="float">
            <text:p>0,00185648148148148000</text:p>
          </table:table-cell>
          <table:table-cell table:formula="of:=[.D403]-[.D40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0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86111111111111" calcext:value-type="float">
            <text:p>0,00186111111111111000</text:p>
          </table:table-cell>
          <table:table-cell table:formula="of:=[.D404]-[.D40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0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86574074074074" calcext:value-type="float">
            <text:p>0,00186574074074074000</text:p>
          </table:table-cell>
          <table:table-cell table:formula="of:=[.D405]-[.D40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0" office:value-type="float" office:value="16160" calcext:value-type="float">
            <text:p>1616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87037037037037" calcext:value-type="float">
            <text:p>0,00187037037037037000</text:p>
          </table:table-cell>
          <table:table-cell table:formula="of:=[.D406]-[.D40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0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875" calcext:value-type="float">
            <text:p>0,00187500000000000000</text:p>
          </table:table-cell>
          <table:table-cell table:formula="of:=[.D407]-[.D40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0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87962962962963" calcext:value-type="float">
            <text:p>0,00187962962962963000</text:p>
          </table:table-cell>
          <table:table-cell table:formula="of:=[.D408]-[.D407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0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88425925925926" calcext:value-type="float">
            <text:p>0,00188425925925926000</text:p>
          </table:table-cell>
          <table:table-cell table:formula="of:=[.D409]-[.D40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0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88888888888889" calcext:value-type="float">
            <text:p>0,00188888888888889000</text:p>
          </table:table-cell>
          <table:table-cell table:formula="of:=[.D410]-[.D40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0" office:value-type="float" office:value="16360" calcext:value-type="float">
            <text:p>16360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89351851851852" calcext:value-type="float">
            <text:p>0,00189351851851852000</text:p>
          </table:table-cell>
          <table:table-cell table:formula="of:=[.D411]-[.D41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0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89814814814815" calcext:value-type="float">
            <text:p>0,00189814814814815000</text:p>
          </table:table-cell>
          <table:table-cell table:formula="of:=[.D412]-[.D41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0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90277777777778" calcext:value-type="float">
            <text:p>0,00190277777777778000</text:p>
          </table:table-cell>
          <table:table-cell table:formula="of:=[.D413]-[.D41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0" office:value-type="float" office:value="16480" calcext:value-type="float">
            <text:p>1648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90740740740741" calcext:value-type="float">
            <text:p>0,00190740740740741000</text:p>
          </table:table-cell>
          <table:table-cell table:formula="of:=[.D414]-[.D41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0" office:value-type="float" office:value="16520" calcext:value-type="float">
            <text:p>16520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91203703703704" calcext:value-type="float">
            <text:p>0,00191203703703704000</text:p>
          </table:table-cell>
          <table:table-cell table:formula="of:=[.D415]-[.D41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0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91666666666667" calcext:value-type="float">
            <text:p>0,00191666666666667000</text:p>
          </table:table-cell>
          <table:table-cell table:formula="of:=[.D416]-[.D415]" office:value-type="float" office:value="0.00000462962962962982" calcext:value-type="float">
            <text:p>0,0000046296296296298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0" office:value-type="float" office:value="16600" calcext:value-type="float">
            <text:p>1660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9212962962963" calcext:value-type="float">
            <text:p>0,00192129629629630000</text:p>
          </table:table-cell>
          <table:table-cell table:formula="of:=[.D417]-[.D41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0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92592592592593" calcext:value-type="float">
            <text:p>0,00192592592592593000</text:p>
          </table:table-cell>
          <table:table-cell table:formula="of:=[.D418]-[.D41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0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93055555555556" calcext:value-type="float">
            <text:p>0,00193055555555556000</text:p>
          </table:table-cell>
          <table:table-cell table:formula="of:=[.D419]-[.D41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0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93518518518519" calcext:value-type="float">
            <text:p>0,00193518518518519000</text:p>
          </table:table-cell>
          <table:table-cell table:formula="of:=[.D420]-[.D41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0" office:value-type="float" office:value="16760" calcext:value-type="float">
            <text:p>16760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93981481481481" calcext:value-type="float">
            <text:p>0,00193981481481481000</text:p>
          </table:table-cell>
          <table:table-cell table:formula="of:=[.D421]-[.D42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94444444444444" calcext:value-type="float">
            <text:p>0,00194444444444444000</text:p>
          </table:table-cell>
          <table:table-cell table:formula="of:=[.D422]-[.D42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0" office:value-type="float" office:value="16840" calcext:value-type="float">
            <text:p>16840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94907407407407" calcext:value-type="float">
            <text:p>0,00194907407407407000</text:p>
          </table:table-cell>
          <table:table-cell table:formula="of:=[.D423]-[.D42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0" office:value-type="float" office:value="16880" calcext:value-type="float">
            <text:p>1688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9537037037037" calcext:value-type="float">
            <text:p>0,00195370370370370000</text:p>
          </table:table-cell>
          <table:table-cell table:formula="of:=[.D424]-[.D42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0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95833333333333" calcext:value-type="float">
            <text:p>0,00195833333333333000</text:p>
          </table:table-cell>
          <table:table-cell table:formula="of:=[.D425]-[.D42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0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96296296296296" calcext:value-type="float">
            <text:p>0,00196296296296296000</text:p>
          </table:table-cell>
          <table:table-cell table:formula="of:=[.D426]-[.D42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0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96759259259259" calcext:value-type="float">
            <text:p>0,00196759259259259000</text:p>
          </table:table-cell>
          <table:table-cell table:formula="of:=[.D427]-[.D426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0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97222222222222" calcext:value-type="float">
            <text:p>0,00197222222222222000</text:p>
          </table:table-cell>
          <table:table-cell table:formula="of:=[.D428]-[.D42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0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97685185185185" calcext:value-type="float">
            <text:p>0,00197685185185185000</text:p>
          </table:table-cell>
          <table:table-cell table:formula="of:=[.D429]-[.D42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0" office:value-type="float" office:value="17120" calcext:value-type="float">
            <text:p>1712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98148148148148" calcext:value-type="float">
            <text:p>0,00198148148148148000</text:p>
          </table:table-cell>
          <table:table-cell table:formula="of:=[.D430]-[.D42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0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98611111111111" calcext:value-type="float">
            <text:p>0,00198611111111111000</text:p>
          </table:table-cell>
          <table:table-cell table:formula="of:=[.D431]-[.D43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0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99074074074074" calcext:value-type="float">
            <text:p>0,00199074074074074000</text:p>
          </table:table-cell>
          <table:table-cell table:formula="of:=[.D432]-[.D43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0" office:value-type="float" office:value="17240" calcext:value-type="float">
            <text:p>17240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99537037037037" calcext:value-type="float">
            <text:p>0,00199537037037037000</text:p>
          </table:table-cell>
          <table:table-cell table:formula="of:=[.D433]-[.D43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0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" calcext:value-type="float">
            <text:p>0,00200000000000000000</text:p>
          </table:table-cell>
          <table:table-cell table:formula="of:=[.D434]-[.D43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0" office:value-type="float" office:value="17320" calcext:value-type="float">
            <text:p>17320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00462962962963" calcext:value-type="float">
            <text:p>0,00200462962962963000</text:p>
          </table:table-cell>
          <table:table-cell table:formula="of:=[.D435]-[.D43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0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00925925925926" calcext:value-type="float">
            <text:p>0,00200925925925926000</text:p>
          </table:table-cell>
          <table:table-cell table:formula="of:=[.D436]-[.D43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0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01388888888889" calcext:value-type="float">
            <text:p>0,00201388888888889000</text:p>
          </table:table-cell>
          <table:table-cell table:formula="of:=[.D437]-[.D43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0" office:value-type="float" office:value="17440" calcext:value-type="float">
            <text:p>1744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01851851851852" calcext:value-type="float">
            <text:p>0,00201851851851852000</text:p>
          </table:table-cell>
          <table:table-cell table:formula="of:=[.D438]-[.D43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0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02314814814815" calcext:value-type="float">
            <text:p>0,00202314814814815000</text:p>
          </table:table-cell>
          <table:table-cell table:formula="of:=[.D439]-[.D43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0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02777777777778" calcext:value-type="float">
            <text:p>0,00202777777777778000</text:p>
          </table:table-cell>
          <table:table-cell table:formula="of:=[.D440]-[.D43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0" office:value-type="float" office:value="17560" calcext:value-type="float">
            <text:p>17560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03240740740741" calcext:value-type="float">
            <text:p>0,00203240740740741000</text:p>
          </table:table-cell>
          <table:table-cell table:formula="of:=[.D441]-[.D44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0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03703703703704" calcext:value-type="float">
            <text:p>0,00203703703703704000</text:p>
          </table:table-cell>
          <table:table-cell table:formula="of:=[.D442]-[.D44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0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04166666666667" calcext:value-type="float">
            <text:p>0,00204166666666667000</text:p>
          </table:table-cell>
          <table:table-cell table:formula="of:=[.D443]-[.D442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0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0462962962963" calcext:value-type="float">
            <text:p>0,00204629629629630000</text:p>
          </table:table-cell>
          <table:table-cell table:formula="of:=[.D444]-[.D44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0" office:value-type="float" office:value="17720" calcext:value-type="float">
            <text:p>17720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05092592592593" calcext:value-type="float">
            <text:p>0,00205092592592593000</text:p>
          </table:table-cell>
          <table:table-cell table:formula="of:=[.D445]-[.D44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0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05555555555556" calcext:value-type="float">
            <text:p>0,00205555555555556000</text:p>
          </table:table-cell>
          <table:table-cell table:formula="of:=[.D446]-[.D44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0" office:value-type="float" office:value="17800" calcext:value-type="float">
            <text:p>1780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06018518518519" calcext:value-type="float">
            <text:p>0,00206018518518519000</text:p>
          </table:table-cell>
          <table:table-cell table:formula="of:=[.D447]-[.D44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0" office:value-type="float" office:value="17840" calcext:value-type="float">
            <text:p>1784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06481481481482" calcext:value-type="float">
            <text:p>0,00206481481481482000</text:p>
          </table:table-cell>
          <table:table-cell table:formula="of:=[.D448]-[.D44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0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06944444444444" calcext:value-type="float">
            <text:p>0,00206944444444444000</text:p>
          </table:table-cell>
          <table:table-cell table:formula="of:=[.D449]-[.D44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0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07407407407407" calcext:value-type="float">
            <text:p>0,00207407407407407000</text:p>
          </table:table-cell>
          <table:table-cell table:formula="of:=[.D450]-[.D44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0" office:value-type="float" office:value="17960" calcext:value-type="float">
            <text:p>17960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0787037037037" calcext:value-type="float">
            <text:p>0,00207870370370370000</text:p>
          </table:table-cell>
          <table:table-cell table:formula="of:=[.D451]-[.D45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08333333333333" calcext:value-type="float">
            <text:p>0,00208333333333333000</text:p>
          </table:table-cell>
          <table:table-cell table:formula="of:=[.D452]-[.D45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0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08796296296296" calcext:value-type="float">
            <text:p>0,00208796296296296000</text:p>
          </table:table-cell>
          <table:table-cell table:formula="of:=[.D453]-[.D45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0" office:value-type="float" office:value="18080" calcext:value-type="float">
            <text:p>1808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09259259259259" calcext:value-type="float">
            <text:p>0,00209259259259259000</text:p>
          </table:table-cell>
          <table:table-cell table:formula="of:=[.D454]-[.D45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0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09722222222222" calcext:value-type="float">
            <text:p>0,00209722222222222000</text:p>
          </table:table-cell>
          <table:table-cell table:formula="of:=[.D455]-[.D45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0" office:value-type="float" office:value="18160" calcext:value-type="float">
            <text:p>1816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10185185185185" calcext:value-type="float">
            <text:p>0,00210185185185185000</text:p>
          </table:table-cell>
          <table:table-cell table:formula="of:=[.D456]-[.D45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0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10648148148148" calcext:value-type="float">
            <text:p>0,00210648148148148000</text:p>
          </table:table-cell>
          <table:table-cell table:formula="of:=[.D457]-[.D45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0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11111111111111" calcext:value-type="float">
            <text:p>0,00211111111111111000</text:p>
          </table:table-cell>
          <table:table-cell table:formula="of:=[.D458]-[.D457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0" office:value-type="float" office:value="18280" calcext:value-type="float">
            <text:p>18280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11574074074074" calcext:value-type="float">
            <text:p>0,00211574074074074000</text:p>
          </table:table-cell>
          <table:table-cell table:formula="of:=[.D459]-[.D45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0" office:value-type="float" office:value="18320" calcext:value-type="float">
            <text:p>1832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12037037037037" calcext:value-type="float">
            <text:p>0,00212037037037037000</text:p>
          </table:table-cell>
          <table:table-cell table:formula="of:=[.D460]-[.D45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0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125" calcext:value-type="float">
            <text:p>0,00212500000000000000</text:p>
          </table:table-cell>
          <table:table-cell table:formula="of:=[.D461]-[.D46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0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12962962962963" calcext:value-type="float">
            <text:p>0,00212962962962963000</text:p>
          </table:table-cell>
          <table:table-cell table:formula="of:=[.D462]-[.D46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0" office:value-type="float" office:value="18440" calcext:value-type="float">
            <text:p>18440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13425925925926" calcext:value-type="float">
            <text:p>0,00213425925925926000</text:p>
          </table:table-cell>
          <table:table-cell table:formula="of:=[.D463]-[.D46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0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13888888888889" calcext:value-type="float">
            <text:p>0,00213888888888889000</text:p>
          </table:table-cell>
          <table:table-cell table:formula="of:=[.D464]-[.D46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0" office:value-type="float" office:value="18520" calcext:value-type="float">
            <text:p>18520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14351851851852" calcext:value-type="float">
            <text:p>0,00214351851851852000</text:p>
          </table:table-cell>
          <table:table-cell table:formula="of:=[.D465]-[.D46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0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14814814814815" calcext:value-type="float">
            <text:p>0,00214814814814815000</text:p>
          </table:table-cell>
          <table:table-cell table:formula="of:=[.D466]-[.D46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0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15277777777778" calcext:value-type="float">
            <text:p>0,00215277777777778000</text:p>
          </table:table-cell>
          <table:table-cell table:formula="of:=[.D467]-[.D46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0" office:value-type="float" office:value="18640" calcext:value-type="float">
            <text:p>1864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15740740740741" calcext:value-type="float">
            <text:p>0,00215740740740741000</text:p>
          </table:table-cell>
          <table:table-cell table:formula="of:=[.D468]-[.D46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0" office:value-type="float" office:value="18680" calcext:value-type="float">
            <text:p>18680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16203703703704" calcext:value-type="float">
            <text:p>0,00216203703703704000</text:p>
          </table:table-cell>
          <table:table-cell table:formula="of:=[.D469]-[.D46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0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16666666666667" calcext:value-type="float">
            <text:p>0,00216666666666667000</text:p>
          </table:table-cell>
          <table:table-cell table:formula="of:=[.D470]-[.D46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0" office:value-type="float" office:value="18760" calcext:value-type="float">
            <text:p>18760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1712962962963" calcext:value-type="float">
            <text:p>0,00217129629629630000</text:p>
          </table:table-cell>
          <table:table-cell table:formula="of:=[.D471]-[.D47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0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17592592592593" calcext:value-type="float">
            <text:p>0,00217592592592593000</text:p>
          </table:table-cell>
          <table:table-cell table:formula="of:=[.D472]-[.D47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0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18055555555556" calcext:value-type="float">
            <text:p>0,00218055555555556000</text:p>
          </table:table-cell>
          <table:table-cell table:formula="of:=[.D473]-[.D47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0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18518518518519" calcext:value-type="float">
            <text:p>0,00218518518518519000</text:p>
          </table:table-cell>
          <table:table-cell table:formula="of:=[.D474]-[.D473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0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18981481481482" calcext:value-type="float">
            <text:p>0,00218981481481482000</text:p>
          </table:table-cell>
          <table:table-cell table:formula="of:=[.D475]-[.D47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0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19444444444444" calcext:value-type="float">
            <text:p>0,00219444444444444000</text:p>
          </table:table-cell>
          <table:table-cell table:formula="of:=[.D476]-[.D47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0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19907407407407" calcext:value-type="float">
            <text:p>0,00219907407407407000</text:p>
          </table:table-cell>
          <table:table-cell table:formula="of:=[.D477]-[.D47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0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2037037037037" calcext:value-type="float">
            <text:p>0,00220370370370370000</text:p>
          </table:table-cell>
          <table:table-cell table:formula="of:=[.D478]-[.D47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0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20833333333333" calcext:value-type="float">
            <text:p>0,00220833333333333000</text:p>
          </table:table-cell>
          <table:table-cell table:formula="of:=[.D479]-[.D47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0" office:value-type="float" office:value="19120" calcext:value-type="float">
            <text:p>1912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21296296296296" calcext:value-type="float">
            <text:p>0,00221296296296296000</text:p>
          </table:table-cell>
          <table:table-cell table:formula="of:=[.D480]-[.D47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0" office:value-type="float" office:value="19160" calcext:value-type="float">
            <text:p>19160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21759259259259" calcext:value-type="float">
            <text:p>0,00221759259259259000</text:p>
          </table:table-cell>
          <table:table-cell table:formula="of:=[.D481]-[.D48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0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22222222222222" calcext:value-type="float">
            <text:p>0,00222222222222222000</text:p>
          </table:table-cell>
          <table:table-cell table:formula="of:=[.D482]-[.D48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0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22685185185185" calcext:value-type="float">
            <text:p>0,00222685185185185000</text:p>
          </table:table-cell>
          <table:table-cell table:formula="of:=[.D483]-[.D48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0" office:value-type="float" office:value="19280" calcext:value-type="float">
            <text:p>19280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23148148148148" calcext:value-type="float">
            <text:p>0,00223148148148148000</text:p>
          </table:table-cell>
          <table:table-cell table:formula="of:=[.D484]-[.D48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0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23611111111111" calcext:value-type="float">
            <text:p>0,00223611111111111000</text:p>
          </table:table-cell>
          <table:table-cell table:formula="of:=[.D485]-[.D48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0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24074074074074" calcext:value-type="float">
            <text:p>0,00224074074074074000</text:p>
          </table:table-cell>
          <table:table-cell table:formula="of:=[.D486]-[.D48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0" office:value-type="float" office:value="19400" calcext:value-type="float">
            <text:p>1940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24537037037037" calcext:value-type="float">
            <text:p>0,00224537037037037000</text:p>
          </table:table-cell>
          <table:table-cell table:formula="of:=[.D487]-[.D48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0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25" calcext:value-type="float">
            <text:p>0,00225000000000000000</text:p>
          </table:table-cell>
          <table:table-cell table:formula="of:=[.D488]-[.D48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0" office:value-type="float" office:value="19480" calcext:value-type="float">
            <text:p>19480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25462962962963" calcext:value-type="float">
            <text:p>0,00225462962962963000</text:p>
          </table:table-cell>
          <table:table-cell table:formula="of:=[.D489]-[.D488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0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25925925925926" calcext:value-type="float">
            <text:p>0,00225925925925926000</text:p>
          </table:table-cell>
          <table:table-cell table:formula="of:=[.D490]-[.D48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0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26388888888889" calcext:value-type="float">
            <text:p>0,00226388888888889000</text:p>
          </table:table-cell>
          <table:table-cell table:formula="of:=[.D491]-[.D49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0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26851851851852" calcext:value-type="float">
            <text:p>0,00226851851851852000</text:p>
          </table:table-cell>
          <table:table-cell table:formula="of:=[.D492]-[.D49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0" office:value-type="float" office:value="19640" calcext:value-type="float">
            <text:p>19640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27314814814815" calcext:value-type="float">
            <text:p>0,00227314814814815000</text:p>
          </table:table-cell>
          <table:table-cell table:formula="of:=[.D493]-[.D49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0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27777777777778" calcext:value-type="float">
            <text:p>0,00227777777777778000</text:p>
          </table:table-cell>
          <table:table-cell table:formula="of:=[.D494]-[.D49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0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28240740740741" calcext:value-type="float">
            <text:p>0,00228240740740741000</text:p>
          </table:table-cell>
          <table:table-cell table:formula="of:=[.D495]-[.D49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0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28703703703704" calcext:value-type="float">
            <text:p>0,00228703703703704000</text:p>
          </table:table-cell>
          <table:table-cell table:formula="of:=[.D496]-[.D49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0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29166666666667" calcext:value-type="float">
            <text:p>0,00229166666666667000</text:p>
          </table:table-cell>
          <table:table-cell table:formula="of:=[.D497]-[.D49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0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2962962962963" calcext:value-type="float">
            <text:p>0,00229629629629630000</text:p>
          </table:table-cell>
          <table:table-cell table:formula="of:=[.D498]-[.D49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0" office:value-type="float" office:value="19880" calcext:value-type="float">
            <text:p>19880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30092592592593" calcext:value-type="float">
            <text:p>0,00230092592592593000</text:p>
          </table:table-cell>
          <table:table-cell table:formula="of:=[.D499]-[.D49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0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30555555555556" calcext:value-type="float">
            <text:p>0,00230555555555556000</text:p>
          </table:table-cell>
          <table:table-cell table:formula="of:=[.D500]-[.D49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0" office:value-type="float" office:value="19960" calcext:value-type="float">
            <text:p>19960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31018518518519" calcext:value-type="float">
            <text:p>0,00231018518518519000</text:p>
          </table:table-cell>
          <table:table-cell table:formula="of:=[.D501]-[.D50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0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31481481481481" calcext:value-type="float">
            <text:p>0,00231481481481481000</text:p>
          </table:table-cell>
          <table:table-cell table:formula="of:=[.D502]-[.D50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40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31944444444444" calcext:value-type="float">
            <text:p>0,00231944444444444000</text:p>
          </table:table-cell>
          <table:table-cell table:formula="of:=[.D503]-[.D50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40" office:value-type="float" office:value="20080" calcext:value-type="float">
            <text:p>20080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32407407407407" calcext:value-type="float">
            <text:p>0,00232407407407407000</text:p>
          </table:table-cell>
          <table:table-cell table:formula="of:=[.D504]-[.D50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40" office:value-type="float" office:value="20120" calcext:value-type="float">
            <text:p>20120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3287037037037" calcext:value-type="float">
            <text:p>0,00232870370370370000</text:p>
          </table:table-cell>
          <table:table-cell table:formula="of:=[.D505]-[.D504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40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33333333333333" calcext:value-type="float">
            <text:p>0,00233333333333333000</text:p>
          </table:table-cell>
          <table:table-cell table:formula="of:=[.D506]-[.D50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40" office:value-type="float" office:value="20200" calcext:value-type="float">
            <text:p>2020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33796296296296" calcext:value-type="float">
            <text:p>0,00233796296296296000</text:p>
          </table:table-cell>
          <table:table-cell table:formula="of:=[.D507]-[.D50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40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34259259259259" calcext:value-type="float">
            <text:p>0,00234259259259259000</text:p>
          </table:table-cell>
          <table:table-cell table:formula="of:=[.D508]-[.D50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40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34722222222222" calcext:value-type="float">
            <text:p>0,00234722222222222000</text:p>
          </table:table-cell>
          <table:table-cell table:formula="of:=[.D509]-[.D50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40" office:value-type="float" office:value="20320" calcext:value-type="float">
            <text:p>20320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35185185185185" calcext:value-type="float">
            <text:p>0,00235185185185185000</text:p>
          </table:table-cell>
          <table:table-cell table:formula="of:=[.D510]-[.D50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40" office:value-type="float" office:value="20360" calcext:value-type="float">
            <text:p>20360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35648148148148" calcext:value-type="float">
            <text:p>0,00235648148148148000</text:p>
          </table:table-cell>
          <table:table-cell table:formula="of:=[.D511]-[.D51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40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36111111111111" calcext:value-type="float">
            <text:p>0,00236111111111111000</text:p>
          </table:table-cell>
          <table:table-cell table:formula="of:=[.D512]-[.D51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40" office:value-type="float" office:value="20440" calcext:value-type="float">
            <text:p>20440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36574074074074" calcext:value-type="float">
            <text:p>0,00236574074074074000</text:p>
          </table:table-cell>
          <table:table-cell table:formula="of:=[.D513]-[.D51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40" office:value-type="float" office:value="20480" calcext:value-type="float">
            <text:p>20480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37037037037037" calcext:value-type="float">
            <text:p>0,00237037037037037000</text:p>
          </table:table-cell>
          <table:table-cell table:formula="of:=[.D514]-[.D51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40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375" calcext:value-type="float">
            <text:p>0,00237500000000000000</text:p>
          </table:table-cell>
          <table:table-cell table:formula="of:=[.D515]-[.D51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40" office:value-type="float" office:value="20560" calcext:value-type="float">
            <text:p>20560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37962962962963" calcext:value-type="float">
            <text:p>0,00237962962962963000</text:p>
          </table:table-cell>
          <table:table-cell table:formula="of:=[.D516]-[.D51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40" office:value-type="float" office:value="20600" calcext:value-type="float">
            <text:p>2060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38425925925926" calcext:value-type="float">
            <text:p>0,00238425925925926000</text:p>
          </table:table-cell>
          <table:table-cell table:formula="of:=[.D517]-[.D51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40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38888888888889" calcext:value-type="float">
            <text:p>0,00238888888888889000</text:p>
          </table:table-cell>
          <table:table-cell table:formula="of:=[.D518]-[.D51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40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39351851851852" calcext:value-type="float">
            <text:p>0,00239351851851852000</text:p>
          </table:table-cell>
          <table:table-cell table:formula="of:=[.D519]-[.D51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40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39814814814815" calcext:value-type="float">
            <text:p>0,00239814814814815000</text:p>
          </table:table-cell>
          <table:table-cell table:formula="of:=[.D520]-[.D519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40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40277777777778" calcext:value-type="float">
            <text:p>0,00240277777777778000</text:p>
          </table:table-cell>
          <table:table-cell table:formula="of:=[.D521]-[.D52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40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40740740740741" calcext:value-type="float">
            <text:p>0,00240740740740741000</text:p>
          </table:table-cell>
          <table:table-cell table:formula="of:=[.D522]-[.D52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40" office:value-type="float" office:value="20840" calcext:value-type="float">
            <text:p>20840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41203703703704" calcext:value-type="float">
            <text:p>0,00241203703703704000</text:p>
          </table:table-cell>
          <table:table-cell table:formula="of:=[.D523]-[.D52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40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41666666666667" calcext:value-type="float">
            <text:p>0,00241666666666667000</text:p>
          </table:table-cell>
          <table:table-cell table:formula="of:=[.D524]-[.D52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40" office:value-type="float" office:value="20920" calcext:value-type="float">
            <text:p>20920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4212962962963" calcext:value-type="float">
            <text:p>0,00242129629629630000</text:p>
          </table:table-cell>
          <table:table-cell table:formula="of:=[.D525]-[.D52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40" office:value-type="float" office:value="20960" calcext:value-type="float">
            <text:p>20960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42592592592593" calcext:value-type="float">
            <text:p>0,00242592592592593000</text:p>
          </table:table-cell>
          <table:table-cell table:formula="of:=[.D526]-[.D52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40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43055555555556" calcext:value-type="float">
            <text:p>0,00243055555555556000</text:p>
          </table:table-cell>
          <table:table-cell table:formula="of:=[.D527]-[.D52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40" office:value-type="float" office:value="21040" calcext:value-type="float">
            <text:p>21040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43518518518519" calcext:value-type="float">
            <text:p>0,00243518518518519000</text:p>
          </table:table-cell>
          <table:table-cell table:formula="of:=[.D528]-[.D52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40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43981481481482" calcext:value-type="float">
            <text:p>0,00243981481481482000</text:p>
          </table:table-cell>
          <table:table-cell table:formula="of:=[.D529]-[.D52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40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44444444444444" calcext:value-type="float">
            <text:p>0,00244444444444444000</text:p>
          </table:table-cell>
          <table:table-cell table:formula="of:=[.D530]-[.D52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40" office:value-type="float" office:value="21160" calcext:value-type="float">
            <text:p>21160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44907407407407" calcext:value-type="float">
            <text:p>0,00244907407407407000</text:p>
          </table:table-cell>
          <table:table-cell table:formula="of:=[.D531]-[.D53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40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4537037037037" calcext:value-type="float">
            <text:p>0,00245370370370370000</text:p>
          </table:table-cell>
          <table:table-cell table:formula="of:=[.D532]-[.D53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40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45833333333333" calcext:value-type="float">
            <text:p>0,00245833333333333000</text:p>
          </table:table-cell>
          <table:table-cell table:formula="of:=[.D533]-[.D53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40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46296296296296" calcext:value-type="float">
            <text:p>0,00246296296296296000</text:p>
          </table:table-cell>
          <table:table-cell table:formula="of:=[.D534]-[.D53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40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46759259259259" calcext:value-type="float">
            <text:p>0,00246759259259259000</text:p>
          </table:table-cell>
          <table:table-cell table:formula="of:=[.D535]-[.D53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40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47222222222222" calcext:value-type="float">
            <text:p>0,00247222222222222000</text:p>
          </table:table-cell>
          <table:table-cell table:formula="of:=[.D536]-[.D535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40" office:value-type="float" office:value="21400" calcext:value-type="float">
            <text:p>2140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47685185185185" calcext:value-type="float">
            <text:p>0,00247685185185185000</text:p>
          </table:table-cell>
          <table:table-cell table:formula="of:=[.D537]-[.D53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40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48148148148148" calcext:value-type="float">
            <text:p>0,00248148148148148000</text:p>
          </table:table-cell>
          <table:table-cell table:formula="of:=[.D538]-[.D53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40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48611111111111" calcext:value-type="float">
            <text:p>0,00248611111111111000</text:p>
          </table:table-cell>
          <table:table-cell table:formula="of:=[.D539]-[.D53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40" office:value-type="float" office:value="21520" calcext:value-type="float">
            <text:p>21520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49074074074074" calcext:value-type="float">
            <text:p>0,00249074074074074000</text:p>
          </table:table-cell>
          <table:table-cell table:formula="of:=[.D540]-[.D53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40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49537037037037" calcext:value-type="float">
            <text:p>0,00249537037037037000</text:p>
          </table:table-cell>
          <table:table-cell table:formula="of:=[.D541]-[.D54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4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5" calcext:value-type="float">
            <text:p>0,00250000000000000000</text:p>
          </table:table-cell>
          <table:table-cell table:formula="of:=[.D542]-[.D54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40" office:value-type="float" office:value="21640" calcext:value-type="float">
            <text:p>21640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50462962962963" calcext:value-type="float">
            <text:p>0,00250462962962963000</text:p>
          </table:table-cell>
          <table:table-cell table:formula="of:=[.D543]-[.D54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40" office:value-type="float" office:value="21680" calcext:value-type="float">
            <text:p>21680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50925925925926" calcext:value-type="float">
            <text:p>0,00250925925925926000</text:p>
          </table:table-cell>
          <table:table-cell table:formula="of:=[.D544]-[.D54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40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51388888888889" calcext:value-type="float">
            <text:p>0,00251388888888889000</text:p>
          </table:table-cell>
          <table:table-cell table:formula="of:=[.D545]-[.D54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40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51851851851852" calcext:value-type="float">
            <text:p>0,00251851851851852000</text:p>
          </table:table-cell>
          <table:table-cell table:formula="of:=[.D546]-[.D54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40" office:value-type="float" office:value="21800" calcext:value-type="float">
            <text:p>2180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52314814814815" calcext:value-type="float">
            <text:p>0,00252314814814815000</text:p>
          </table:table-cell>
          <table:table-cell table:formula="of:=[.D547]-[.D54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40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52777777777778" calcext:value-type="float">
            <text:p>0,00252777777777778000</text:p>
          </table:table-cell>
          <table:table-cell table:formula="of:=[.D548]-[.D54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40" office:value-type="float" office:value="21880" calcext:value-type="float">
            <text:p>21880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53240740740741" calcext:value-type="float">
            <text:p>0,00253240740740741000</text:p>
          </table:table-cell>
          <table:table-cell table:formula="of:=[.D549]-[.D54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40" office:value-type="float" office:value="21920" calcext:value-type="float">
            <text:p>21920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53703703703704" calcext:value-type="float">
            <text:p>0,00253703703703704000</text:p>
          </table:table-cell>
          <table:table-cell table:formula="of:=[.D550]-[.D54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40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54166666666667" calcext:value-type="float">
            <text:p>0,00254166666666667000</text:p>
          </table:table-cell>
          <table:table-cell table:formula="of:=[.D551]-[.D550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40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5462962962963" calcext:value-type="float">
            <text:p>0,00254629629629630000</text:p>
          </table:table-cell>
          <table:table-cell table:formula="of:=[.D552]-[.D55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40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55092592592593" calcext:value-type="float">
            <text:p>0,00255092592592593000</text:p>
          </table:table-cell>
          <table:table-cell table:formula="of:=[.D553]-[.D55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40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55555555555556" calcext:value-type="float">
            <text:p>0,00255555555555556000</text:p>
          </table:table-cell>
          <table:table-cell table:formula="of:=[.D554]-[.D55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40" office:value-type="float" office:value="22120" calcext:value-type="float">
            <text:p>22120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56018518518519" calcext:value-type="float">
            <text:p>0,00256018518518519000</text:p>
          </table:table-cell>
          <table:table-cell table:formula="of:=[.D555]-[.D55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40" office:value-type="float" office:value="22160" calcext:value-type="float">
            <text:p>22160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56481481481482" calcext:value-type="float">
            <text:p>0,00256481481481482000</text:p>
          </table:table-cell>
          <table:table-cell table:formula="of:=[.D556]-[.D55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40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56944444444444" calcext:value-type="float">
            <text:p>0,00256944444444444000</text:p>
          </table:table-cell>
          <table:table-cell table:formula="of:=[.D557]-[.D55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40" office:value-type="float" office:value="22240" calcext:value-type="float">
            <text:p>22240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57407407407407" calcext:value-type="float">
            <text:p>0,00257407407407407000</text:p>
          </table:table-cell>
          <table:table-cell table:formula="of:=[.D558]-[.D55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40" office:value-type="float" office:value="22280" calcext:value-type="float">
            <text:p>22280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5787037037037" calcext:value-type="float">
            <text:p>0,00257870370370370000</text:p>
          </table:table-cell>
          <table:table-cell table:formula="of:=[.D559]-[.D55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40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58333333333333" calcext:value-type="float">
            <text:p>0,00258333333333333000</text:p>
          </table:table-cell>
          <table:table-cell table:formula="of:=[.D560]-[.D55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40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58796296296296" calcext:value-type="float">
            <text:p>0,00258796296296296000</text:p>
          </table:table-cell>
          <table:table-cell table:formula="of:=[.D561]-[.D56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40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59259259259259" calcext:value-type="float">
            <text:p>0,00259259259259259000</text:p>
          </table:table-cell>
          <table:table-cell table:formula="of:=[.D562]-[.D56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40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59722222222222" calcext:value-type="float">
            <text:p>0,00259722222222222000</text:p>
          </table:table-cell>
          <table:table-cell table:formula="of:=[.D563]-[.D56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40" office:value-type="float" office:value="22480" calcext:value-type="float">
            <text:p>22480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60185185185185" calcext:value-type="float">
            <text:p>0,00260185185185185000</text:p>
          </table:table-cell>
          <table:table-cell table:formula="of:=[.D564]-[.D56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40" office:value-type="float" office:value="22520" calcext:value-type="float">
            <text:p>22520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60648148148148" calcext:value-type="float">
            <text:p>0,00260648148148148000</text:p>
          </table:table-cell>
          <table:table-cell table:formula="of:=[.D565]-[.D56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40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61111111111111" calcext:value-type="float">
            <text:p>0,00261111111111111000</text:p>
          </table:table-cell>
          <table:table-cell table:formula="of:=[.D566]-[.D56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40" office:value-type="float" office:value="22600" calcext:value-type="float">
            <text:p>2260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61574074074074" calcext:value-type="float">
            <text:p>0,00261574074074074000</text:p>
          </table:table-cell>
          <table:table-cell table:formula="of:=[.D567]-[.D566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40" office:value-type="float" office:value="22640" calcext:value-type="float">
            <text:p>22640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62037037037037" calcext:value-type="float">
            <text:p>0,00262037037037037000</text:p>
          </table:table-cell>
          <table:table-cell table:formula="of:=[.D568]-[.D56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40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625" calcext:value-type="float">
            <text:p>0,00262500000000000000</text:p>
          </table:table-cell>
          <table:table-cell table:formula="of:=[.D569]-[.D56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40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62962962962963" calcext:value-type="float">
            <text:p>0,00262962962962963000</text:p>
          </table:table-cell>
          <table:table-cell table:formula="of:=[.D570]-[.D56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40" office:value-type="float" office:value="22760" calcext:value-type="float">
            <text:p>22760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63425925925926" calcext:value-type="float">
            <text:p>0,00263425925925926000</text:p>
          </table:table-cell>
          <table:table-cell table:formula="of:=[.D571]-[.D57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40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63888888888889" calcext:value-type="float">
            <text:p>0,00263888888888889000</text:p>
          </table:table-cell>
          <table:table-cell table:formula="of:=[.D572]-[.D57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40" office:value-type="float" office:value="22840" calcext:value-type="float">
            <text:p>22840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64351851851852" calcext:value-type="float">
            <text:p>0,00264351851851852000</text:p>
          </table:table-cell>
          <table:table-cell table:formula="of:=[.D573]-[.D57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40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64814814814815" calcext:value-type="float">
            <text:p>0,00264814814814815000</text:p>
          </table:table-cell>
          <table:table-cell table:formula="of:=[.D574]-[.D57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40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65277777777778" calcext:value-type="float">
            <text:p>0,00265277777777778000</text:p>
          </table:table-cell>
          <table:table-cell table:formula="of:=[.D575]-[.D57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40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65740740740741" calcext:value-type="float">
            <text:p>0,00265740740740741000</text:p>
          </table:table-cell>
          <table:table-cell table:formula="of:=[.D576]-[.D57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40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66203703703704" calcext:value-type="float">
            <text:p>0,00266203703703704000</text:p>
          </table:table-cell>
          <table:table-cell table:formula="of:=[.D577]-[.D57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40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66666666666667" calcext:value-type="float">
            <text:p>0,00266666666666667000</text:p>
          </table:table-cell>
          <table:table-cell table:formula="of:=[.D578]-[.D57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40" office:value-type="float" office:value="23080" calcext:value-type="float">
            <text:p>23080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6712962962963" calcext:value-type="float">
            <text:p>0,00267129629629630000</text:p>
          </table:table-cell>
          <table:table-cell table:formula="of:=[.D579]-[.D57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40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67592592592593" calcext:value-type="float">
            <text:p>0,00267592592592593000</text:p>
          </table:table-cell>
          <table:table-cell table:formula="of:=[.D580]-[.D57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40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68055555555556" calcext:value-type="float">
            <text:p>0,00268055555555556000</text:p>
          </table:table-cell>
          <table:table-cell table:formula="of:=[.D581]-[.D58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40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68518518518519" calcext:value-type="float">
            <text:p>0,00268518518518519000</text:p>
          </table:table-cell>
          <table:table-cell table:formula="of:=[.D582]-[.D581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40" office:value-type="float" office:value="23240" calcext:value-type="float">
            <text:p>23240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68981481481482" calcext:value-type="float">
            <text:p>0,00268981481481482000</text:p>
          </table:table-cell>
          <table:table-cell table:formula="of:=[.D583]-[.D58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40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69444444444444" calcext:value-type="float">
            <text:p>0,00269444444444444000</text:p>
          </table:table-cell>
          <table:table-cell table:formula="of:=[.D584]-[.D58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40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69907407407407" calcext:value-type="float">
            <text:p>0,00269907407407407000</text:p>
          </table:table-cell>
          <table:table-cell table:formula="of:=[.D585]-[.D58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40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7037037037037" calcext:value-type="float">
            <text:p>0,00270370370370370000</text:p>
          </table:table-cell>
          <table:table-cell table:formula="of:=[.D586]-[.D58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40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70833333333333" calcext:value-type="float">
            <text:p>0,00270833333333333000</text:p>
          </table:table-cell>
          <table:table-cell table:formula="of:=[.D587]-[.D58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40" office:value-type="float" office:value="23440" calcext:value-type="float">
            <text:p>23440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71296296296296" calcext:value-type="float">
            <text:p>0,00271296296296296000</text:p>
          </table:table-cell>
          <table:table-cell table:formula="of:=[.D588]-[.D587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40" office:value-type="float" office:value="23480" calcext:value-type="float">
            <text:p>23480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71759259259259" calcext:value-type="float">
            <text:p>0,00271759259259259000</text:p>
          </table:table-cell>
          <table:table-cell table:formula="of:=[.D589]-[.D58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40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72222222222222" calcext:value-type="float">
            <text:p>0,00272222222222222000</text:p>
          </table:table-cell>
          <table:table-cell table:formula="of:=[.D590]-[.D58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40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72685185185185" calcext:value-type="float">
            <text:p>0,00272685185185185000</text:p>
          </table:table-cell>
          <table:table-cell table:formula="of:=[.D591]-[.D59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40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73148148148148" calcext:value-type="float">
            <text:p>0,00273148148148148000</text:p>
          </table:table-cell>
          <table:table-cell table:formula="of:=[.D592]-[.D591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40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73611111111111" calcext:value-type="float">
            <text:p>0,00273611111111111000</text:p>
          </table:table-cell>
          <table:table-cell table:formula="of:=[.D593]-[.D592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40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74074074074074" calcext:value-type="float">
            <text:p>0,00274074074074074000</text:p>
          </table:table-cell>
          <table:table-cell table:formula="of:=[.D594]-[.D593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40" office:value-type="float" office:value="23720" calcext:value-type="float">
            <text:p>23720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74537037037037" calcext:value-type="float">
            <text:p>0,00274537037037037000</text:p>
          </table:table-cell>
          <table:table-cell table:formula="of:=[.D595]-[.D594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40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75" calcext:value-type="float">
            <text:p>0,00275000000000000000</text:p>
          </table:table-cell>
          <table:table-cell table:formula="of:=[.D596]-[.D595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40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75462962962963" calcext:value-type="float">
            <text:p>0,00275462962962963000</text:p>
          </table:table-cell>
          <table:table-cell table:formula="of:=[.D597]-[.D596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40" office:value-type="float" office:value="23840" calcext:value-type="float">
            <text:p>23840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75925925925926" calcext:value-type="float">
            <text:p>0,00275925925925926000</text:p>
          </table:table-cell>
          <table:table-cell table:formula="of:=[.D598]-[.D597]" office:value-type="float" office:value="0.00000462962962963004" calcext:value-type="float">
            <text:p>0,0000046296296296300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40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76388888888889" calcext:value-type="float">
            <text:p>0,00276388888888889000</text:p>
          </table:table-cell>
          <table:table-cell table:formula="of:=[.D599]-[.D598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40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76851851851852" calcext:value-type="float">
            <text:p>0,00276851851851852000</text:p>
          </table:table-cell>
          <table:table-cell table:formula="of:=[.D600]-[.D599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40" office:value-type="float" office:value="23960" calcext:value-type="float">
            <text:p>23960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77314814814815" calcext:value-type="float">
            <text:p>0,00277314814814815000</text:p>
          </table:table-cell>
          <table:table-cell table:formula="of:=[.D601]-[.D600]" office:value-type="float" office:value="0.0000046296296296296" calcext:value-type="float">
            <text:p>0,0000046296296296296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40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77777777777778" calcext:value-type="float">
            <text:p>0,00277777777777778000</text:p>
          </table:table-cell>
          <table:table-cell table:formula="of:=#REF!-[.D601]" office:value-type="string" office:string-value="" calcext:value-type="error">
            <text:p>#REF!</text:p>
          </table:table-cell>
        </table:table-row>
        <table:table-row table:style-name="ro1" table:number-rows-repeated="10479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5:30.087005198</meta:creation-date>
    <dc:date>2026-05-17T17:35:38.818057836</dc:date>
    <meta:editing-duration>PT10S</meta:editing-duration>
    <meta:editing-cycles>1</meta:editing-cycles>
    <meta:document-statistic meta:table-count="1" meta:cell-count="3005" meta:object-count="0"/>
    <meta:generator>LibreOffice/24.2.7.2$Linux_X86_64 LibreOffice_project/420$Build-2</meta:generator>
  </office:meta>
</office:document-meta>
</file>