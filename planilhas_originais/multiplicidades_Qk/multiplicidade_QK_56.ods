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6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1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48148148148148" calcext:value-type="float">
            <text:p>0,00000648148148148148</text:p>
          </table:table-cell>
          <table:table-cell table:formula="of:=[.D3]-[.D2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6" office:value-type="float" office:value="112" calcext:value-type="float">
            <text:p>11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2962962962963" calcext:value-type="float">
            <text:p>0,00001296296296296300</text:p>
          </table:table-cell>
          <table:table-cell table:formula="of:=[.D4]-[.D3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6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94444444444444" calcext:value-type="float">
            <text:p>0,00001944444444444450</text:p>
          </table:table-cell>
          <table:table-cell table:formula="of:=[.D5]-[.D4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6" office:value-type="float" office:value="224" calcext:value-type="float">
            <text:p>22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59259259259259" calcext:value-type="float">
            <text:p>0,00002592592592592590</text:p>
          </table:table-cell>
          <table:table-cell table:formula="of:=[.D6]-[.D5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6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24074074074074" calcext:value-type="float">
            <text:p>0,00003240740740740740</text:p>
          </table:table-cell>
          <table:table-cell table:formula="of:=[.D7]-[.D6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6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88888888888889" calcext:value-type="float">
            <text:p>0,00003888888888888890</text:p>
          </table:table-cell>
          <table:table-cell table:formula="of:=[.D8]-[.D7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6" office:value-type="float" office:value="392" calcext:value-type="float">
            <text:p>39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53703703703704" calcext:value-type="float">
            <text:p>0,00004537037037037040</text:p>
          </table:table-cell>
          <table:table-cell table:formula="of:=[.D9]-[.D8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6" office:value-type="float" office:value="448" calcext:value-type="float">
            <text:p>44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18518518518519" calcext:value-type="float">
            <text:p>0,00005185185185185190</text:p>
          </table:table-cell>
          <table:table-cell table:formula="of:=[.D10]-[.D9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6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83333333333333" calcext:value-type="float">
            <text:p>0,00005833333333333330</text:p>
          </table:table-cell>
          <table:table-cell table:formula="of:=[.D11]-[.D10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6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48148148148148" calcext:value-type="float">
            <text:p>0,00006481481481481480</text:p>
          </table:table-cell>
          <table:table-cell table:formula="of:=[.D12]-[.D11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6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712962962962963" calcext:value-type="float">
            <text:p>0,00007129629629629630</text:p>
          </table:table-cell>
          <table:table-cell table:formula="of:=[.D13]-[.D12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6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777777777777778" calcext:value-type="float">
            <text:p>0,00007777777777777780</text:p>
          </table:table-cell>
          <table:table-cell table:formula="of:=[.D14]-[.D13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6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842592592592593" calcext:value-type="float">
            <text:p>0,00008425925925925930</text:p>
          </table:table-cell>
          <table:table-cell table:formula="of:=[.D15]-[.D14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6" office:value-type="float" office:value="784" calcext:value-type="float">
            <text:p>78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907407407407408" calcext:value-type="float">
            <text:p>0,00009074074074074070</text:p>
          </table:table-cell>
          <table:table-cell table:formula="of:=[.D16]-[.D15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6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972222222222222" calcext:value-type="float">
            <text:p>0,00009722222222222220</text:p>
          </table:table-cell>
          <table:table-cell table:formula="of:=[.D17]-[.D16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6" office:value-type="float" office:value="896" calcext:value-type="float">
            <text:p>89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03703703703704" calcext:value-type="float">
            <text:p>0,00010370370370370400</text:p>
          </table:table-cell>
          <table:table-cell table:formula="of:=[.D18]-[.D17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6" office:value-type="float" office:value="952" calcext:value-type="float">
            <text:p>95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10185185185185" calcext:value-type="float">
            <text:p>0,00011018518518518500</text:p>
          </table:table-cell>
          <table:table-cell table:formula="of:=[.D19]-[.D18]" office:value-type="float" office:value="0.00000648148148148148" calcext:value-type="float">
            <text:p>0,00000648148148148148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6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16666666666667" calcext:value-type="float">
            <text:p>0,00011666666666666700</text:p>
          </table:table-cell>
          <table:table-cell table:formula="of:=[.D20]-[.D19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6" office:value-type="float" office:value="1064" calcext:value-type="float">
            <text:p>106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23148148148148" calcext:value-type="float">
            <text:p>0,00012314814814814800</text:p>
          </table:table-cell>
          <table:table-cell table:formula="of:=[.D21]-[.D20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6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2962962962963" calcext:value-type="float">
            <text:p>0,00012962962962963000</text:p>
          </table:table-cell>
          <table:table-cell table:formula="of:=[.D22]-[.D21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6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36111111111111" calcext:value-type="float">
            <text:p>0,00013611111111111100</text:p>
          </table:table-cell>
          <table:table-cell table:formula="of:=[.D23]-[.D22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6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42592592592593" calcext:value-type="float">
            <text:p>0,00014259259259259300</text:p>
          </table:table-cell>
          <table:table-cell table:formula="of:=[.D24]-[.D23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6" office:value-type="float" office:value="1288" calcext:value-type="float">
            <text:p>128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49074074074074" calcext:value-type="float">
            <text:p>0,00014907407407407400</text:p>
          </table:table-cell>
          <table:table-cell table:formula="of:=[.D25]-[.D24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6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55555555555556" calcext:value-type="float">
            <text:p>0,00015555555555555600</text:p>
          </table:table-cell>
          <table:table-cell table:formula="of:=[.D26]-[.D25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6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62037037037037" calcext:value-type="float">
            <text:p>0,00016203703703703700</text:p>
          </table:table-cell>
          <table:table-cell table:formula="of:=[.D27]-[.D26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6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68518518518519" calcext:value-type="float">
            <text:p>0,00016851851851851900</text:p>
          </table:table-cell>
          <table:table-cell table:formula="of:=[.D28]-[.D27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6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75" calcext:value-type="float">
            <text:p>0,00017500000000000000</text:p>
          </table:table-cell>
          <table:table-cell table:formula="of:=[.D29]-[.D28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6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81481481481482" calcext:value-type="float">
            <text:p>0,00018148148148148100</text:p>
          </table:table-cell>
          <table:table-cell table:formula="of:=[.D30]-[.D29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6" office:value-type="float" office:value="1624" calcext:value-type="float">
            <text:p>162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87962962962963" calcext:value-type="float">
            <text:p>0,00018796296296296300</text:p>
          </table:table-cell>
          <table:table-cell table:formula="of:=[.D31]-[.D30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6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94444444444444" calcext:value-type="float">
            <text:p>0,00019444444444444400</text:p>
          </table:table-cell>
          <table:table-cell table:formula="of:=[.D32]-[.D31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6" office:value-type="float" office:value="1736" calcext:value-type="float">
            <text:p>173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00925925925926" calcext:value-type="float">
            <text:p>0,00020092592592592600</text:p>
          </table:table-cell>
          <table:table-cell table:formula="of:=[.D33]-[.D32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6" office:value-type="float" office:value="1792" calcext:value-type="float">
            <text:p>179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07407407407407" calcext:value-type="float">
            <text:p>0,00020740740740740700</text:p>
          </table:table-cell>
          <table:table-cell table:formula="of:=[.D34]-[.D33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6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13888888888889" calcext:value-type="float">
            <text:p>0,00021388888888888900</text:p>
          </table:table-cell>
          <table:table-cell table:formula="of:=[.D35]-[.D34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6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2037037037037" calcext:value-type="float">
            <text:p>0,00022037037037037000</text:p>
          </table:table-cell>
          <table:table-cell table:formula="of:=[.D36]-[.D35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6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26851851851852" calcext:value-type="float">
            <text:p>0,00022685185185185200</text:p>
          </table:table-cell>
          <table:table-cell table:formula="of:=[.D37]-[.D36]" office:value-type="float" office:value="0.00000648148148148147" calcext:value-type="float">
            <text:p>0,00000648148148148147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6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33333333333333" calcext:value-type="float">
            <text:p>0,00023333333333333300</text:p>
          </table:table-cell>
          <table:table-cell table:formula="of:=[.D38]-[.D37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6" office:value-type="float" office:value="2072" calcext:value-type="float">
            <text:p>207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39814814814815" calcext:value-type="float">
            <text:p>0,00023981481481481500</text:p>
          </table:table-cell>
          <table:table-cell table:formula="of:=[.D39]-[.D3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6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46296296296296" calcext:value-type="float">
            <text:p>0,00024629629629629600</text:p>
          </table:table-cell>
          <table:table-cell table:formula="of:=[.D40]-[.D39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6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52777777777778" calcext:value-type="float">
            <text:p>0,00025277777777777800</text:p>
          </table:table-cell>
          <table:table-cell table:formula="of:=[.D41]-[.D40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6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59259259259259" calcext:value-type="float">
            <text:p>0,00025925925925925900</text:p>
          </table:table-cell>
          <table:table-cell table:formula="of:=[.D42]-[.D41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6" office:value-type="float" office:value="2296" calcext:value-type="float">
            <text:p>229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65740740740741" calcext:value-type="float">
            <text:p>0,00026574074074074100</text:p>
          </table:table-cell>
          <table:table-cell table:formula="of:=[.D43]-[.D4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6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72222222222222" calcext:value-type="float">
            <text:p>0,00027222222222222200</text:p>
          </table:table-cell>
          <table:table-cell table:formula="of:=[.D44]-[.D43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6" office:value-type="float" office:value="2408" calcext:value-type="float">
            <text:p>240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78703703703704" calcext:value-type="float">
            <text:p>0,00027870370370370400</text:p>
          </table:table-cell>
          <table:table-cell table:formula="of:=[.D45]-[.D44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6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85185185185185" calcext:value-type="float">
            <text:p>0,00028518518518518500</text:p>
          </table:table-cell>
          <table:table-cell table:formula="of:=[.D46]-[.D45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6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91666666666667" calcext:value-type="float">
            <text:p>0,00029166666666666700</text:p>
          </table:table-cell>
          <table:table-cell table:formula="of:=[.D47]-[.D4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6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98148148148148" calcext:value-type="float">
            <text:p>0,00029814814814814800</text:p>
          </table:table-cell>
          <table:table-cell table:formula="of:=[.D48]-[.D47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6" office:value-type="float" office:value="2632" calcext:value-type="float">
            <text:p>263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0462962962963" calcext:value-type="float">
            <text:p>0,00030462962962963000</text:p>
          </table:table-cell>
          <table:table-cell table:formula="of:=[.D49]-[.D48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6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11111111111111" calcext:value-type="float">
            <text:p>0,00031111111111111100</text:p>
          </table:table-cell>
          <table:table-cell table:formula="of:=[.D50]-[.D4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6" office:value-type="float" office:value="2744" calcext:value-type="float">
            <text:p>274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17592592592593" calcext:value-type="float">
            <text:p>0,00031759259259259300</text:p>
          </table:table-cell>
          <table:table-cell table:formula="of:=[.D51]-[.D50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6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24074074074074" calcext:value-type="float">
            <text:p>0,00032407407407407400</text:p>
          </table:table-cell>
          <table:table-cell table:formula="of:=[.D52]-[.D51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6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30555555555556" calcext:value-type="float">
            <text:p>0,00033055555555555600</text:p>
          </table:table-cell>
          <table:table-cell table:formula="of:=[.D53]-[.D52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6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37037037037037" calcext:value-type="float">
            <text:p>0,00033703703703703700</text:p>
          </table:table-cell>
          <table:table-cell table:formula="of:=[.D54]-[.D5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6" office:value-type="float" office:value="2968" calcext:value-type="float">
            <text:p>296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43518518518519" calcext:value-type="float">
            <text:p>0,00034351851851851900</text:p>
          </table:table-cell>
          <table:table-cell table:formula="of:=[.D55]-[.D54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6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5" calcext:value-type="float">
            <text:p>0,00035000000000000000</text:p>
          </table:table-cell>
          <table:table-cell table:formula="of:=[.D56]-[.D55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6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56481481481482" calcext:value-type="float">
            <text:p>0,00035648148148148200</text:p>
          </table:table-cell>
          <table:table-cell table:formula="of:=[.D57]-[.D56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6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62962962962963" calcext:value-type="float">
            <text:p>0,00036296296296296300</text:p>
          </table:table-cell>
          <table:table-cell table:formula="of:=[.D58]-[.D5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6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69444444444444" calcext:value-type="float">
            <text:p>0,00036944444444444400</text:p>
          </table:table-cell>
          <table:table-cell table:formula="of:=[.D59]-[.D58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6" office:value-type="float" office:value="3248" calcext:value-type="float">
            <text:p>324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75925925925926" calcext:value-type="float">
            <text:p>0,00037592592592592600</text:p>
          </table:table-cell>
          <table:table-cell table:formula="of:=[.D60]-[.D59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6" office:value-type="float" office:value="3304" calcext:value-type="float">
            <text:p>330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82407407407407" calcext:value-type="float">
            <text:p>0,00038240740740740700</text:p>
          </table:table-cell>
          <table:table-cell table:formula="of:=[.D61]-[.D6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6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88888888888889" calcext:value-type="float">
            <text:p>0,00038888888888888900</text:p>
          </table:table-cell>
          <table:table-cell table:formula="of:=[.D62]-[.D61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6" office:value-type="float" office:value="3416" calcext:value-type="float">
            <text:p>341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9537037037037" calcext:value-type="float">
            <text:p>0,00039537037037037000</text:p>
          </table:table-cell>
          <table:table-cell table:formula="of:=[.D63]-[.D62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6" office:value-type="float" office:value="3472" calcext:value-type="float">
            <text:p>347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01851851851852" calcext:value-type="float">
            <text:p>0,00040185185185185200</text:p>
          </table:table-cell>
          <table:table-cell table:formula="of:=[.D64]-[.D63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6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08333333333333" calcext:value-type="float">
            <text:p>0,00040833333333333300</text:p>
          </table:table-cell>
          <table:table-cell table:formula="of:=[.D65]-[.D6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6" office:value-type="float" office:value="3584" calcext:value-type="float">
            <text:p>358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14814814814815" calcext:value-type="float">
            <text:p>0,00041481481481481500</text:p>
          </table:table-cell>
          <table:table-cell table:formula="of:=[.D66]-[.D65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6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21296296296296" calcext:value-type="float">
            <text:p>0,00042129629629629600</text:p>
          </table:table-cell>
          <table:table-cell table:formula="of:=[.D67]-[.D66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6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27777777777778" calcext:value-type="float">
            <text:p>0,00042777777777777800</text:p>
          </table:table-cell>
          <table:table-cell table:formula="of:=[.D68]-[.D6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6" office:value-type="float" office:value="3752" calcext:value-type="float">
            <text:p>375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34259259259259" calcext:value-type="float">
            <text:p>0,00043425925925925900</text:p>
          </table:table-cell>
          <table:table-cell table:formula="of:=[.D69]-[.D68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6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40740740740741" calcext:value-type="float">
            <text:p>0,00044074074074074100</text:p>
          </table:table-cell>
          <table:table-cell table:formula="of:=[.D70]-[.D69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6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47222222222222" calcext:value-type="float">
            <text:p>0,00044722222222222200</text:p>
          </table:table-cell>
          <table:table-cell table:formula="of:=[.D71]-[.D70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6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53703703703704" calcext:value-type="float">
            <text:p>0,00045370370370370400</text:p>
          </table:table-cell>
          <table:table-cell table:formula="of:=[.D72]-[.D7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6" office:value-type="float" office:value="3976" calcext:value-type="float">
            <text:p>397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60185185185185" calcext:value-type="float">
            <text:p>0,00046018518518518500</text:p>
          </table:table-cell>
          <table:table-cell table:formula="of:=[.D73]-[.D72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6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66666666666667" calcext:value-type="float">
            <text:p>0,00046666666666666700</text:p>
          </table:table-cell>
          <table:table-cell table:formula="of:=[.D74]-[.D73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6" office:value-type="float" office:value="4088" calcext:value-type="float">
            <text:p>408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73148148148148" calcext:value-type="float">
            <text:p>0,00047314814814814800</text:p>
          </table:table-cell>
          <table:table-cell table:formula="of:=[.D75]-[.D74]" office:value-type="float" office:value="0.0000064814814814815" calcext:value-type="float">
            <text:p>0,0000064814814814815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6" office:value-type="float" office:value="4144" calcext:value-type="float">
            <text:p>414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7962962962963" calcext:value-type="float">
            <text:p>0,00047962962962963000</text:p>
          </table:table-cell>
          <table:table-cell table:formula="of:=[.D76]-[.D7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6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86111111111111" calcext:value-type="float">
            <text:p>0,00048611111111111100</text:p>
          </table:table-cell>
          <table:table-cell table:formula="of:=[.D77]-[.D7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6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92592592592593" calcext:value-type="float">
            <text:p>0,00049259259259259300</text:p>
          </table:table-cell>
          <table:table-cell table:formula="of:=[.D78]-[.D77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6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99074074074074" calcext:value-type="float">
            <text:p>0,00049907407407407400</text:p>
          </table:table-cell>
          <table:table-cell table:formula="of:=[.D79]-[.D7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6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05555555555556" calcext:value-type="float">
            <text:p>0,00050555555555555600</text:p>
          </table:table-cell>
          <table:table-cell table:formula="of:=[.D80]-[.D79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6" office:value-type="float" office:value="4424" calcext:value-type="float">
            <text:p>442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12037037037037" calcext:value-type="float">
            <text:p>0,00051203703703703700</text:p>
          </table:table-cell>
          <table:table-cell table:formula="of:=[.D81]-[.D8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6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18518518518519" calcext:value-type="float">
            <text:p>0,00051851851851851900</text:p>
          </table:table-cell>
          <table:table-cell table:formula="of:=[.D82]-[.D8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6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25" calcext:value-type="float">
            <text:p>0,00052500000000000000</text:p>
          </table:table-cell>
          <table:table-cell table:formula="of:=[.D83]-[.D82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6" office:value-type="float" office:value="4592" calcext:value-type="float">
            <text:p>459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31481481481482" calcext:value-type="float">
            <text:p>0,00053148148148148200</text:p>
          </table:table-cell>
          <table:table-cell table:formula="of:=[.D84]-[.D8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6" office:value-type="float" office:value="4648" calcext:value-type="float">
            <text:p>464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37962962962963" calcext:value-type="float">
            <text:p>0,00053796296296296300</text:p>
          </table:table-cell>
          <table:table-cell table:formula="of:=[.D85]-[.D8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6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44444444444444" calcext:value-type="float">
            <text:p>0,00054444444444444400</text:p>
          </table:table-cell>
          <table:table-cell table:formula="of:=[.D86]-[.D85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6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50925925925926" calcext:value-type="float">
            <text:p>0,00055092592592592600</text:p>
          </table:table-cell>
          <table:table-cell table:formula="of:=[.D87]-[.D8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6" office:value-type="float" office:value="4816" calcext:value-type="float">
            <text:p>481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57407407407407" calcext:value-type="float">
            <text:p>0,00055740740740740700</text:p>
          </table:table-cell>
          <table:table-cell table:formula="of:=[.D88]-[.D8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6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63888888888889" calcext:value-type="float">
            <text:p>0,00056388888888888900</text:p>
          </table:table-cell>
          <table:table-cell table:formula="of:=[.D89]-[.D88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6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7037037037037" calcext:value-type="float">
            <text:p>0,00057037037037037000</text:p>
          </table:table-cell>
          <table:table-cell table:formula="of:=[.D90]-[.D8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6" office:value-type="float" office:value="4984" calcext:value-type="float">
            <text:p>498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76851851851852" calcext:value-type="float">
            <text:p>0,00057685185185185200</text:p>
          </table:table-cell>
          <table:table-cell table:formula="of:=[.D91]-[.D90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6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83333333333333" calcext:value-type="float">
            <text:p>0,00058333333333333300</text:p>
          </table:table-cell>
          <table:table-cell table:formula="of:=[.D92]-[.D9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6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89814814814815" calcext:value-type="float">
            <text:p>0,00058981481481481500</text:p>
          </table:table-cell>
          <table:table-cell table:formula="of:=[.D93]-[.D9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6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96296296296296" calcext:value-type="float">
            <text:p>0,00059629629629629600</text:p>
          </table:table-cell>
          <table:table-cell table:formula="of:=[.D94]-[.D93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6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02777777777778" calcext:value-type="float">
            <text:p>0,00060277777777777800</text:p>
          </table:table-cell>
          <table:table-cell table:formula="of:=[.D95]-[.D9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6" office:value-type="float" office:value="5264" calcext:value-type="float">
            <text:p>526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09259259259259" calcext:value-type="float">
            <text:p>0,00060925925925925900</text:p>
          </table:table-cell>
          <table:table-cell table:formula="of:=[.D96]-[.D9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6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15740740740741" calcext:value-type="float">
            <text:p>0,00061574074074074100</text:p>
          </table:table-cell>
          <table:table-cell table:formula="of:=[.D97]-[.D96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6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22222222222222" calcext:value-type="float">
            <text:p>0,00062222222222222200</text:p>
          </table:table-cell>
          <table:table-cell table:formula="of:=[.D98]-[.D9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6" office:value-type="float" office:value="5432" calcext:value-type="float">
            <text:p>543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28703703703704" calcext:value-type="float">
            <text:p>0,00062870370370370400</text:p>
          </table:table-cell>
          <table:table-cell table:formula="of:=[.D99]-[.D9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6" office:value-type="float" office:value="5488" calcext:value-type="float">
            <text:p>548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35185185185185" calcext:value-type="float">
            <text:p>0,00063518518518518500</text:p>
          </table:table-cell>
          <table:table-cell table:formula="of:=[.D100]-[.D99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6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41666666666667" calcext:value-type="float">
            <text:p>0,00064166666666666700</text:p>
          </table:table-cell>
          <table:table-cell table:formula="of:=[.D101]-[.D10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6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48148148148148" calcext:value-type="float">
            <text:p>0,00064814814814814800</text:p>
          </table:table-cell>
          <table:table-cell table:formula="of:=[.D102]-[.D101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6" office:value-type="float" office:value="5656" calcext:value-type="float">
            <text:p>565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65462962962963" calcext:value-type="float">
            <text:p>0,00065462962962963000</text:p>
          </table:table-cell>
          <table:table-cell table:formula="of:=[.D103]-[.D10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6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61111111111111" calcext:value-type="float">
            <text:p>0,00066111111111111100</text:p>
          </table:table-cell>
          <table:table-cell table:formula="of:=[.D104]-[.D10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6" office:value-type="float" office:value="5768" calcext:value-type="float">
            <text:p>576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667592592592593" calcext:value-type="float">
            <text:p>0,00066759259259259300</text:p>
          </table:table-cell>
          <table:table-cell table:formula="of:=[.D105]-[.D104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6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74074074074074" calcext:value-type="float">
            <text:p>0,00067407407407407400</text:p>
          </table:table-cell>
          <table:table-cell table:formula="of:=[.D106]-[.D10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6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680555555555556" calcext:value-type="float">
            <text:p>0,00068055555555555600</text:p>
          </table:table-cell>
          <table:table-cell table:formula="of:=[.D107]-[.D10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6" office:value-type="float" office:value="5936" calcext:value-type="float">
            <text:p>593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87037037037037" calcext:value-type="float">
            <text:p>0,00068703703703703700</text:p>
          </table:table-cell>
          <table:table-cell table:formula="of:=[.D108]-[.D107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6" office:value-type="float" office:value="5992" calcext:value-type="float">
            <text:p>599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693518518518519" calcext:value-type="float">
            <text:p>0,00069351851851851900</text:p>
          </table:table-cell>
          <table:table-cell table:formula="of:=[.D109]-[.D10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6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7" calcext:value-type="float">
            <text:p>0,00070000000000000000</text:p>
          </table:table-cell>
          <table:table-cell table:formula="of:=[.D110]-[.D10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6" office:value-type="float" office:value="6104" calcext:value-type="float">
            <text:p>610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706481481481481" calcext:value-type="float">
            <text:p>0,00070648148148148100</text:p>
          </table:table-cell>
          <table:table-cell table:formula="of:=[.D111]-[.D110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6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712962962962963" calcext:value-type="float">
            <text:p>0,00071296296296296300</text:p>
          </table:table-cell>
          <table:table-cell table:formula="of:=[.D112]-[.D11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6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719444444444444" calcext:value-type="float">
            <text:p>0,00071944444444444400</text:p>
          </table:table-cell>
          <table:table-cell table:formula="of:=[.D113]-[.D112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6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725925925925926" calcext:value-type="float">
            <text:p>0,00072592592592592600</text:p>
          </table:table-cell>
          <table:table-cell table:formula="of:=[.D114]-[.D11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6" office:value-type="float" office:value="6328" calcext:value-type="float">
            <text:p>632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732407407407407" calcext:value-type="float">
            <text:p>0,00073240740740740700</text:p>
          </table:table-cell>
          <table:table-cell table:formula="of:=[.D115]-[.D11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6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738888888888889" calcext:value-type="float">
            <text:p>0,00073888888888888900</text:p>
          </table:table-cell>
          <table:table-cell table:formula="of:=[.D116]-[.D115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6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74537037037037" calcext:value-type="float">
            <text:p>0,00074537037037037000</text:p>
          </table:table-cell>
          <table:table-cell table:formula="of:=[.D117]-[.D11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6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751851851851852" calcext:value-type="float">
            <text:p>0,00075185185185185200</text:p>
          </table:table-cell>
          <table:table-cell table:formula="of:=[.D118]-[.D11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6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758333333333333" calcext:value-type="float">
            <text:p>0,00075833333333333300</text:p>
          </table:table-cell>
          <table:table-cell table:formula="of:=[.D119]-[.D118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6" office:value-type="float" office:value="6608" calcext:value-type="float">
            <text:p>660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764814814814815" calcext:value-type="float">
            <text:p>0,00076481481481481500</text:p>
          </table:table-cell>
          <table:table-cell table:formula="of:=[.D120]-[.D11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6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771296296296296" calcext:value-type="float">
            <text:p>0,00077129629629629600</text:p>
          </table:table-cell>
          <table:table-cell table:formula="of:=[.D121]-[.D12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6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777777777777778" calcext:value-type="float">
            <text:p>0,00077777777777777800</text:p>
          </table:table-cell>
          <table:table-cell table:formula="of:=[.D122]-[.D121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6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784259259259259" calcext:value-type="float">
            <text:p>0,00078425925925925900</text:p>
          </table:table-cell>
          <table:table-cell table:formula="of:=[.D123]-[.D12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6" office:value-type="float" office:value="6832" calcext:value-type="float">
            <text:p>683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790740740740741" calcext:value-type="float">
            <text:p>0,00079074074074074100</text:p>
          </table:table-cell>
          <table:table-cell table:formula="of:=[.D124]-[.D12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6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797222222222222" calcext:value-type="float">
            <text:p>0,00079722222222222200</text:p>
          </table:table-cell>
          <table:table-cell table:formula="of:=[.D125]-[.D124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6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803703703703704" calcext:value-type="float">
            <text:p>0,00080370370370370400</text:p>
          </table:table-cell>
          <table:table-cell table:formula="of:=[.D126]-[.D12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6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810185185185185" calcext:value-type="float">
            <text:p>0,00081018518518518500</text:p>
          </table:table-cell>
          <table:table-cell table:formula="of:=[.D127]-[.D126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6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816666666666667" calcext:value-type="float">
            <text:p>0,00081666666666666700</text:p>
          </table:table-cell>
          <table:table-cell table:formula="of:=[.D128]-[.D12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6" office:value-type="float" office:value="7112" calcext:value-type="float">
            <text:p>711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823148148148148" calcext:value-type="float">
            <text:p>0,00082314814814814800</text:p>
          </table:table-cell>
          <table:table-cell table:formula="of:=[.D129]-[.D12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6" office:value-type="float" office:value="7168" calcext:value-type="float">
            <text:p>716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82962962962963" calcext:value-type="float">
            <text:p>0,00082962962962963000</text:p>
          </table:table-cell>
          <table:table-cell table:formula="of:=[.D130]-[.D129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6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836111111111111" calcext:value-type="float">
            <text:p>0,00083611111111111100</text:p>
          </table:table-cell>
          <table:table-cell table:formula="of:=[.D131]-[.D13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6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842592592592593" calcext:value-type="float">
            <text:p>0,00084259259259259300</text:p>
          </table:table-cell>
          <table:table-cell table:formula="of:=[.D132]-[.D13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6" office:value-type="float" office:value="7336" calcext:value-type="float">
            <text:p>733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849074074074074" calcext:value-type="float">
            <text:p>0,00084907407407407400</text:p>
          </table:table-cell>
          <table:table-cell table:formula="of:=[.D133]-[.D132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6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855555555555556" calcext:value-type="float">
            <text:p>0,00085555555555555600</text:p>
          </table:table-cell>
          <table:table-cell table:formula="of:=[.D134]-[.D13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6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862037037037037" calcext:value-type="float">
            <text:p>0,00086203703703703700</text:p>
          </table:table-cell>
          <table:table-cell table:formula="of:=[.D135]-[.D13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6" office:value-type="float" office:value="7504" calcext:value-type="float">
            <text:p>750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868518518518519" calcext:value-type="float">
            <text:p>0,00086851851851851800</text:p>
          </table:table-cell>
          <table:table-cell table:formula="of:=[.D136]-[.D135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6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875" calcext:value-type="float">
            <text:p>0,00087500000000000000</text:p>
          </table:table-cell>
          <table:table-cell table:formula="of:=[.D137]-[.D13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6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881481481481482" calcext:value-type="float">
            <text:p>0,00088148148148148200</text:p>
          </table:table-cell>
          <table:table-cell table:formula="of:=[.D138]-[.D137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6" office:value-type="float" office:value="7672" calcext:value-type="float">
            <text:p>767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887962962962963" calcext:value-type="float">
            <text:p>0,00088796296296296300</text:p>
          </table:table-cell>
          <table:table-cell table:formula="of:=[.D139]-[.D13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6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894444444444445" calcext:value-type="float">
            <text:p>0,00089444444444444500</text:p>
          </table:table-cell>
          <table:table-cell table:formula="of:=[.D140]-[.D13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6" office:value-type="float" office:value="7784" calcext:value-type="float">
            <text:p>778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900925925925926" calcext:value-type="float">
            <text:p>0,00090092592592592600</text:p>
          </table:table-cell>
          <table:table-cell table:formula="of:=[.D141]-[.D140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6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907407407407407" calcext:value-type="float">
            <text:p>0,00090740740740740800</text:p>
          </table:table-cell>
          <table:table-cell table:formula="of:=[.D142]-[.D14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6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913888888888889" calcext:value-type="float">
            <text:p>0,00091388888888888900</text:p>
          </table:table-cell>
          <table:table-cell table:formula="of:=[.D143]-[.D14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6" office:value-type="float" office:value="7952" calcext:value-type="float">
            <text:p>795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92037037037037" calcext:value-type="float">
            <text:p>0,00092037037037037000</text:p>
          </table:table-cell>
          <table:table-cell table:formula="of:=[.D144]-[.D143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6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926851851851852" calcext:value-type="float">
            <text:p>0,00092685185185185200</text:p>
          </table:table-cell>
          <table:table-cell table:formula="of:=[.D145]-[.D14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6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933333333333333" calcext:value-type="float">
            <text:p>0,00093333333333333300</text:p>
          </table:table-cell>
          <table:table-cell table:formula="of:=[.D146]-[.D14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6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939814814814815" calcext:value-type="float">
            <text:p>0,00093981481481481500</text:p>
          </table:table-cell>
          <table:table-cell table:formula="of:=[.D147]-[.D146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6" office:value-type="float" office:value="8176" calcext:value-type="float">
            <text:p>817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946296296296296" calcext:value-type="float">
            <text:p>0,00094629629629629600</text:p>
          </table:table-cell>
          <table:table-cell table:formula="of:=[.D148]-[.D14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6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952777777777778" calcext:value-type="float">
            <text:p>0,00095277777777777800</text:p>
          </table:table-cell>
          <table:table-cell table:formula="of:=[.D149]-[.D148]" office:value-type="float" office:value="0.00000648148148148155" calcext:value-type="float">
            <text:p>0,00000648148148148155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6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959259259259259" calcext:value-type="float">
            <text:p>0,00095925925925925900</text:p>
          </table:table-cell>
          <table:table-cell table:formula="of:=[.D150]-[.D14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6" office:value-type="float" office:value="8344" calcext:value-type="float">
            <text:p>834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965740740740741" calcext:value-type="float">
            <text:p>0,00096574074074074100</text:p>
          </table:table-cell>
          <table:table-cell table:formula="of:=[.D151]-[.D15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6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972222222222222" calcext:value-type="float">
            <text:p>0,00097222222222222200</text:p>
          </table:table-cell>
          <table:table-cell table:formula="of:=[.D152]-[.D15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6" office:value-type="float" office:value="8456" calcext:value-type="float">
            <text:p>845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978703703703704" calcext:value-type="float">
            <text:p>0,00097870370370370400</text:p>
          </table:table-cell>
          <table:table-cell table:formula="of:=[.D153]-[.D15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6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985185185185185" calcext:value-type="float">
            <text:p>0,00098518518518518500</text:p>
          </table:table-cell>
          <table:table-cell table:formula="of:=[.D154]-[.D153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6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991666666666667" calcext:value-type="float">
            <text:p>0,00099166666666666700</text:p>
          </table:table-cell>
          <table:table-cell table:formula="of:=[.D155]-[.D15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6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998148148148148" calcext:value-type="float">
            <text:p>0,00099814814814814800</text:p>
          </table:table-cell>
          <table:table-cell table:formula="of:=[.D156]-[.D15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6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00462962962963" calcext:value-type="float">
            <text:p>0,00100462962962963000</text:p>
          </table:table-cell>
          <table:table-cell table:formula="of:=[.D157]-[.D15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6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01111111111111" calcext:value-type="float">
            <text:p>0,00101111111111111000</text:p>
          </table:table-cell>
          <table:table-cell table:formula="of:=[.D158]-[.D15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6" office:value-type="float" office:value="8792" calcext:value-type="float">
            <text:p>879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01759259259259" calcext:value-type="float">
            <text:p>0,00101759259259259000</text:p>
          </table:table-cell>
          <table:table-cell table:formula="of:=[.D159]-[.D158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6" office:value-type="float" office:value="8848" calcext:value-type="float">
            <text:p>884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02407407407407" calcext:value-type="float">
            <text:p>0,00102407407407407000</text:p>
          </table:table-cell>
          <table:table-cell table:formula="of:=[.D160]-[.D15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6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03055555555556" calcext:value-type="float">
            <text:p>0,00103055555555556000</text:p>
          </table:table-cell>
          <table:table-cell table:formula="of:=[.D161]-[.D16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6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03703703703704" calcext:value-type="float">
            <text:p>0,00103703703703704000</text:p>
          </table:table-cell>
          <table:table-cell table:formula="of:=[.D162]-[.D16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6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04351851851852" calcext:value-type="float">
            <text:p>0,00104351851851852000</text:p>
          </table:table-cell>
          <table:table-cell table:formula="of:=[.D163]-[.D16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6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05" calcext:value-type="float">
            <text:p>0,00105000000000000000</text:p>
          </table:table-cell>
          <table:table-cell table:formula="of:=[.D164]-[.D16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6" office:value-type="float" office:value="9128" calcext:value-type="float">
            <text:p>912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05648148148148" calcext:value-type="float">
            <text:p>0,00105648148148148000</text:p>
          </table:table-cell>
          <table:table-cell table:formula="of:=[.D165]-[.D164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6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06296296296296" calcext:value-type="float">
            <text:p>0,00106296296296296000</text:p>
          </table:table-cell>
          <table:table-cell table:formula="of:=[.D166]-[.D16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6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06944444444444" calcext:value-type="float">
            <text:p>0,00106944444444444000</text:p>
          </table:table-cell>
          <table:table-cell table:formula="of:=[.D167]-[.D16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6" office:value-type="float" office:value="9296" calcext:value-type="float">
            <text:p>929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07592592592593" calcext:value-type="float">
            <text:p>0,00107592592592593000</text:p>
          </table:table-cell>
          <table:table-cell table:formula="of:=[.D168]-[.D16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6" office:value-type="float" office:value="9352" calcext:value-type="float">
            <text:p>935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08240740740741" calcext:value-type="float">
            <text:p>0,00108240740740741000</text:p>
          </table:table-cell>
          <table:table-cell table:formula="of:=[.D169]-[.D16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6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08888888888889" calcext:value-type="float">
            <text:p>0,00108888888888889000</text:p>
          </table:table-cell>
          <table:table-cell table:formula="of:=[.D170]-[.D169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6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09537037037037" calcext:value-type="float">
            <text:p>0,00109537037037037000</text:p>
          </table:table-cell>
          <table:table-cell table:formula="of:=[.D171]-[.D17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6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10185185185185" calcext:value-type="float">
            <text:p>0,00110185185185185000</text:p>
          </table:table-cell>
          <table:table-cell table:formula="of:=[.D172]-[.D17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6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10833333333333" calcext:value-type="float">
            <text:p>0,00110833333333333000</text:p>
          </table:table-cell>
          <table:table-cell table:formula="of:=[.D173]-[.D17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6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11481481481481" calcext:value-type="float">
            <text:p>0,00111481481481481000</text:p>
          </table:table-cell>
          <table:table-cell table:formula="of:=[.D174]-[.D17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6" office:value-type="float" office:value="9688" calcext:value-type="float">
            <text:p>968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1212962962963" calcext:value-type="float">
            <text:p>0,00112129629629630000</text:p>
          </table:table-cell>
          <table:table-cell table:formula="of:=[.D175]-[.D17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6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12777777777778" calcext:value-type="float">
            <text:p>0,00112777777777778000</text:p>
          </table:table-cell>
          <table:table-cell table:formula="of:=[.D176]-[.D175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6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13425925925926" calcext:value-type="float">
            <text:p>0,00113425925925926000</text:p>
          </table:table-cell>
          <table:table-cell table:formula="of:=[.D177]-[.D17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6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14074074074074" calcext:value-type="float">
            <text:p>0,00114074074074074000</text:p>
          </table:table-cell>
          <table:table-cell table:formula="of:=[.D178]-[.D17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6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14722222222222" calcext:value-type="float">
            <text:p>0,00114722222222222000</text:p>
          </table:table-cell>
          <table:table-cell table:formula="of:=[.D179]-[.D17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6" office:value-type="float" office:value="9968" calcext:value-type="float">
            <text:p>996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1537037037037" calcext:value-type="float">
            <text:p>0,00115370370370370000</text:p>
          </table:table-cell>
          <table:table-cell table:formula="of:=[.D180]-[.D17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6" office:value-type="float" office:value="10024" calcext:value-type="float">
            <text:p>1002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16018518518519" calcext:value-type="float">
            <text:p>0,00116018518518519000</text:p>
          </table:table-cell>
          <table:table-cell table:formula="of:=[.D181]-[.D180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6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16666666666667" calcext:value-type="float">
            <text:p>0,00116666666666667000</text:p>
          </table:table-cell>
          <table:table-cell table:formula="of:=[.D182]-[.D18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6" office:value-type="float" office:value="10136" calcext:value-type="float">
            <text:p>1013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17314814814815" calcext:value-type="float">
            <text:p>0,00117314814814815000</text:p>
          </table:table-cell>
          <table:table-cell table:formula="of:=[.D183]-[.D18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6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17962962962963" calcext:value-type="float">
            <text:p>0,00117962962962963000</text:p>
          </table:table-cell>
          <table:table-cell table:formula="of:=[.D184]-[.D18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6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18611111111111" calcext:value-type="float">
            <text:p>0,00118611111111111000</text:p>
          </table:table-cell>
          <table:table-cell table:formula="of:=[.D185]-[.D18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6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19259259259259" calcext:value-type="float">
            <text:p>0,00119259259259259000</text:p>
          </table:table-cell>
          <table:table-cell table:formula="of:=[.D186]-[.D18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6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19907407407407" calcext:value-type="float">
            <text:p>0,00119907407407407000</text:p>
          </table:table-cell>
          <table:table-cell table:formula="of:=[.D187]-[.D186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6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20555555555556" calcext:value-type="float">
            <text:p>0,00120555555555556000</text:p>
          </table:table-cell>
          <table:table-cell table:formula="of:=[.D188]-[.D18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6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21203703703704" calcext:value-type="float">
            <text:p>0,00121203703703704000</text:p>
          </table:table-cell>
          <table:table-cell table:formula="of:=[.D189]-[.D18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6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21851851851852" calcext:value-type="float">
            <text:p>0,00121851851851852000</text:p>
          </table:table-cell>
          <table:table-cell table:formula="of:=[.D190]-[.D18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6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225" calcext:value-type="float">
            <text:p>0,00122500000000000000</text:p>
          </table:table-cell>
          <table:table-cell table:formula="of:=[.D191]-[.D19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6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23148148148148" calcext:value-type="float">
            <text:p>0,00123148148148148000</text:p>
          </table:table-cell>
          <table:table-cell table:formula="of:=[.D192]-[.D191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6" office:value-type="float" office:value="10696" calcext:value-type="float">
            <text:p>1069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23796296296296" calcext:value-type="float">
            <text:p>0,00123796296296296000</text:p>
          </table:table-cell>
          <table:table-cell table:formula="of:=[.D193]-[.D19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6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24444444444444" calcext:value-type="float">
            <text:p>0,00124444444444444000</text:p>
          </table:table-cell>
          <table:table-cell table:formula="of:=[.D194]-[.D19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6" office:value-type="float" office:value="10808" calcext:value-type="float">
            <text:p>1080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25092592592593" calcext:value-type="float">
            <text:p>0,00125092592592593000</text:p>
          </table:table-cell>
          <table:table-cell table:formula="of:=[.D195]-[.D19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6" office:value-type="float" office:value="10864" calcext:value-type="float">
            <text:p>1086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25740740740741" calcext:value-type="float">
            <text:p>0,00125740740740741000</text:p>
          </table:table-cell>
          <table:table-cell table:formula="of:=[.D196]-[.D19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6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26388888888889" calcext:value-type="float">
            <text:p>0,00126388888888889000</text:p>
          </table:table-cell>
          <table:table-cell table:formula="of:=[.D197]-[.D19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6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27037037037037" calcext:value-type="float">
            <text:p>0,00127037037037037000</text:p>
          </table:table-cell>
          <table:table-cell table:formula="of:=[.D198]-[.D197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6" office:value-type="float" office:value="11032" calcext:value-type="float">
            <text:p>1103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27685185185185" calcext:value-type="float">
            <text:p>0,00127685185185185000</text:p>
          </table:table-cell>
          <table:table-cell table:formula="of:=[.D199]-[.D19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6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28333333333333" calcext:value-type="float">
            <text:p>0,00128333333333333000</text:p>
          </table:table-cell>
          <table:table-cell table:formula="of:=[.D200]-[.D19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6" office:value-type="float" office:value="11144" calcext:value-type="float">
            <text:p>1114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28981481481481" calcext:value-type="float">
            <text:p>0,00128981481481481000</text:p>
          </table:table-cell>
          <table:table-cell table:formula="of:=[.D201]-[.D20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6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2962962962963" calcext:value-type="float">
            <text:p>0,00129629629629630000</text:p>
          </table:table-cell>
          <table:table-cell table:formula="of:=[.D202]-[.D20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6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30277777777778" calcext:value-type="float">
            <text:p>0,00130277777777778000</text:p>
          </table:table-cell>
          <table:table-cell table:formula="of:=[.D203]-[.D202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6" office:value-type="float" office:value="11312" calcext:value-type="float">
            <text:p>1131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30925925925926" calcext:value-type="float">
            <text:p>0,00130925925925926000</text:p>
          </table:table-cell>
          <table:table-cell table:formula="of:=[.D204]-[.D20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6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31574074074074" calcext:value-type="float">
            <text:p>0,00131574074074074000</text:p>
          </table:table-cell>
          <table:table-cell table:formula="of:=[.D205]-[.D20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6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32222222222222" calcext:value-type="float">
            <text:p>0,00132222222222222000</text:p>
          </table:table-cell>
          <table:table-cell table:formula="of:=[.D206]-[.D20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6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3287037037037" calcext:value-type="float">
            <text:p>0,00132870370370370000</text:p>
          </table:table-cell>
          <table:table-cell table:formula="of:=[.D207]-[.D20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6" office:value-type="float" office:value="11536" calcext:value-type="float">
            <text:p>1153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33518518518519" calcext:value-type="float">
            <text:p>0,00133518518518519000</text:p>
          </table:table-cell>
          <table:table-cell table:formula="of:=[.D208]-[.D20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6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34166666666667" calcext:value-type="float">
            <text:p>0,00134166666666667000</text:p>
          </table:table-cell>
          <table:table-cell table:formula="of:=[.D209]-[.D208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6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34814814814815" calcext:value-type="float">
            <text:p>0,00134814814814815000</text:p>
          </table:table-cell>
          <table:table-cell table:formula="of:=[.D210]-[.D20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6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35462962962963" calcext:value-type="float">
            <text:p>0,00135462962962963000</text:p>
          </table:table-cell>
          <table:table-cell table:formula="of:=[.D211]-[.D21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6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36111111111111" calcext:value-type="float">
            <text:p>0,00136111111111111000</text:p>
          </table:table-cell>
          <table:table-cell table:formula="of:=[.D212]-[.D21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6" office:value-type="float" office:value="11816" calcext:value-type="float">
            <text:p>1181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36759259259259" calcext:value-type="float">
            <text:p>0,00136759259259259000</text:p>
          </table:table-cell>
          <table:table-cell table:formula="of:=[.D213]-[.D21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6" office:value-type="float" office:value="11872" calcext:value-type="float">
            <text:p>1187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37407407407407" calcext:value-type="float">
            <text:p>0,00137407407407407000</text:p>
          </table:table-cell>
          <table:table-cell table:formula="of:=[.D214]-[.D213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6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38055555555556" calcext:value-type="float">
            <text:p>0,00138055555555556000</text:p>
          </table:table-cell>
          <table:table-cell table:formula="of:=[.D215]-[.D21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6" office:value-type="float" office:value="11984" calcext:value-type="float">
            <text:p>1198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38703703703704" calcext:value-type="float">
            <text:p>0,00138703703703704000</text:p>
          </table:table-cell>
          <table:table-cell table:formula="of:=[.D216]-[.D21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6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39351851851852" calcext:value-type="float">
            <text:p>0,00139351851851852000</text:p>
          </table:table-cell>
          <table:table-cell table:formula="of:=[.D217]-[.D21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6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4" calcext:value-type="float">
            <text:p>0,00140000000000000000</text:p>
          </table:table-cell>
          <table:table-cell table:formula="of:=[.D218]-[.D21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6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40648148148148" calcext:value-type="float">
            <text:p>0,00140648148148148000</text:p>
          </table:table-cell>
          <table:table-cell table:formula="of:=[.D219]-[.D21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6" office:value-type="float" office:value="12208" calcext:value-type="float">
            <text:p>1220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41296296296296" calcext:value-type="float">
            <text:p>0,00141296296296296000</text:p>
          </table:table-cell>
          <table:table-cell table:formula="of:=[.D220]-[.D219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6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41944444444444" calcext:value-type="float">
            <text:p>0,00141944444444444000</text:p>
          </table:table-cell>
          <table:table-cell table:formula="of:=[.D221]-[.D22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6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42592592592593" calcext:value-type="float">
            <text:p>0,00142592592592593000</text:p>
          </table:table-cell>
          <table:table-cell table:formula="of:=[.D222]-[.D22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6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43240740740741" calcext:value-type="float">
            <text:p>0,00143240740740741000</text:p>
          </table:table-cell>
          <table:table-cell table:formula="of:=[.D223]-[.D22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6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43888888888889" calcext:value-type="float">
            <text:p>0,00143888888888889000</text:p>
          </table:table-cell>
          <table:table-cell table:formula="of:=[.D224]-[.D22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6" office:value-type="float" office:value="12488" calcext:value-type="float">
            <text:p>1248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44537037037037" calcext:value-type="float">
            <text:p>0,00144537037037037000</text:p>
          </table:table-cell>
          <table:table-cell table:formula="of:=[.D225]-[.D224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6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45185185185185" calcext:value-type="float">
            <text:p>0,00145185185185185000</text:p>
          </table:table-cell>
          <table:table-cell table:formula="of:=[.D226]-[.D22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6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45833333333333" calcext:value-type="float">
            <text:p>0,00145833333333333000</text:p>
          </table:table-cell>
          <table:table-cell table:formula="of:=[.D227]-[.D22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6" office:value-type="float" office:value="12656" calcext:value-type="float">
            <text:p>1265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46481481481481" calcext:value-type="float">
            <text:p>0,00146481481481481000</text:p>
          </table:table-cell>
          <table:table-cell table:formula="of:=[.D228]-[.D22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6" office:value-type="float" office:value="12712" calcext:value-type="float">
            <text:p>1271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4712962962963" calcext:value-type="float">
            <text:p>0,00147129629629630000</text:p>
          </table:table-cell>
          <table:table-cell table:formula="of:=[.D229]-[.D22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6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47777777777778" calcext:value-type="float">
            <text:p>0,00147777777777778000</text:p>
          </table:table-cell>
          <table:table-cell table:formula="of:=[.D230]-[.D22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6" office:value-type="float" office:value="12824" calcext:value-type="float">
            <text:p>1282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48425925925926" calcext:value-type="float">
            <text:p>0,00148425925925926000</text:p>
          </table:table-cell>
          <table:table-cell table:formula="of:=[.D231]-[.D230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6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49074074074074" calcext:value-type="float">
            <text:p>0,00149074074074074000</text:p>
          </table:table-cell>
          <table:table-cell table:formula="of:=[.D232]-[.D23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6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49722222222222" calcext:value-type="float">
            <text:p>0,00149722222222222000</text:p>
          </table:table-cell>
          <table:table-cell table:formula="of:=[.D233]-[.D23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6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5037037037037" calcext:value-type="float">
            <text:p>0,00150370370370370000</text:p>
          </table:table-cell>
          <table:table-cell table:formula="of:=[.D234]-[.D23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6" office:value-type="float" office:value="13048" calcext:value-type="float">
            <text:p>1304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51018518518519" calcext:value-type="float">
            <text:p>0,00151018518518519000</text:p>
          </table:table-cell>
          <table:table-cell table:formula="of:=[.D235]-[.D23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6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51666666666667" calcext:value-type="float">
            <text:p>0,00151666666666667000</text:p>
          </table:table-cell>
          <table:table-cell table:formula="of:=[.D236]-[.D235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6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52314814814815" calcext:value-type="float">
            <text:p>0,00152314814814815000</text:p>
          </table:table-cell>
          <table:table-cell table:formula="of:=[.D237]-[.D23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6" office:value-type="float" office:value="13216" calcext:value-type="float">
            <text:p>1321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52962962962963" calcext:value-type="float">
            <text:p>0,00152962962962963000</text:p>
          </table:table-cell>
          <table:table-cell table:formula="of:=[.D238]-[.D23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6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53611111111111" calcext:value-type="float">
            <text:p>0,00153611111111111000</text:p>
          </table:table-cell>
          <table:table-cell table:formula="of:=[.D239]-[.D23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6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54259259259259" calcext:value-type="float">
            <text:p>0,00154259259259259000</text:p>
          </table:table-cell>
          <table:table-cell table:formula="of:=[.D240]-[.D23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6" office:value-type="float" office:value="13384" calcext:value-type="float">
            <text:p>1338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54907407407407" calcext:value-type="float">
            <text:p>0,00154907407407407000</text:p>
          </table:table-cell>
          <table:table-cell table:formula="of:=[.D241]-[.D24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6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55555555555556" calcext:value-type="float">
            <text:p>0,00155555555555556000</text:p>
          </table:table-cell>
          <table:table-cell table:formula="of:=[.D242]-[.D241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6" office:value-type="float" office:value="13496" calcext:value-type="float">
            <text:p>1349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56203703703704" calcext:value-type="float">
            <text:p>0,00156203703703704000</text:p>
          </table:table-cell>
          <table:table-cell table:formula="of:=[.D243]-[.D24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6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56851851851852" calcext:value-type="float">
            <text:p>0,00156851851851852000</text:p>
          </table:table-cell>
          <table:table-cell table:formula="of:=[.D244]-[.D24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6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575" calcext:value-type="float">
            <text:p>0,00157500000000000000</text:p>
          </table:table-cell>
          <table:table-cell table:formula="of:=[.D245]-[.D24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6" office:value-type="float" office:value="13664" calcext:value-type="float">
            <text:p>1366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58148148148148" calcext:value-type="float">
            <text:p>0,00158148148148148000</text:p>
          </table:table-cell>
          <table:table-cell table:formula="of:=[.D246]-[.D24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6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58796296296296" calcext:value-type="float">
            <text:p>0,00158796296296296000</text:p>
          </table:table-cell>
          <table:table-cell table:formula="of:=[.D247]-[.D24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6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59444444444444" calcext:value-type="float">
            <text:p>0,00159444444444444000</text:p>
          </table:table-cell>
          <table:table-cell table:formula="of:=[.D248]-[.D247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6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60092592592593" calcext:value-type="float">
            <text:p>0,00160092592592593000</text:p>
          </table:table-cell>
          <table:table-cell table:formula="of:=[.D249]-[.D24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6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60740740740741" calcext:value-type="float">
            <text:p>0,00160740740740741000</text:p>
          </table:table-cell>
          <table:table-cell table:formula="of:=[.D250]-[.D24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6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61388888888889" calcext:value-type="float">
            <text:p>0,00161388888888889000</text:p>
          </table:table-cell>
          <table:table-cell table:formula="of:=[.D251]-[.D25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6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62037037037037" calcext:value-type="float">
            <text:p>0,00162037037037037000</text:p>
          </table:table-cell>
          <table:table-cell table:formula="of:=[.D252]-[.D25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6" office:value-type="float" office:value="14056" calcext:value-type="float">
            <text:p>14056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62685185185185" calcext:value-type="float">
            <text:p>0,00162685185185185000</text:p>
          </table:table-cell>
          <table:table-cell table:formula="of:=[.D253]-[.D252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6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63333333333333" calcext:value-type="float">
            <text:p>0,00163333333333333000</text:p>
          </table:table-cell>
          <table:table-cell table:formula="of:=[.D254]-[.D25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6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63981481481481" calcext:value-type="float">
            <text:p>0,00163981481481481000</text:p>
          </table:table-cell>
          <table:table-cell table:formula="of:=[.D255]-[.D25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6" office:value-type="float" office:value="14224" calcext:value-type="float">
            <text:p>1422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6462962962963" calcext:value-type="float">
            <text:p>0,00164629629629630000</text:p>
          </table:table-cell>
          <table:table-cell table:formula="of:=[.D256]-[.D25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6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65277777777778" calcext:value-type="float">
            <text:p>0,00165277777777778000</text:p>
          </table:table-cell>
          <table:table-cell table:formula="of:=[.D257]-[.D25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6" office:value-type="float" office:value="14336" calcext:value-type="float">
            <text:p>1433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65925925925926" calcext:value-type="float">
            <text:p>0,00165925925925926000</text:p>
          </table:table-cell>
          <table:table-cell table:formula="of:=[.D258]-[.D25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6" office:value-type="float" office:value="14392" calcext:value-type="float">
            <text:p>14392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66574074074074" calcext:value-type="float">
            <text:p>0,00166574074074074000</text:p>
          </table:table-cell>
          <table:table-cell table:formula="of:=[.D259]-[.D258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6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67222222222222" calcext:value-type="float">
            <text:p>0,00167222222222222000</text:p>
          </table:table-cell>
          <table:table-cell table:formula="of:=[.D260]-[.D25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6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6787037037037" calcext:value-type="float">
            <text:p>0,00167870370370370000</text:p>
          </table:table-cell>
          <table:table-cell table:formula="of:=[.D261]-[.D26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6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68518518518519" calcext:value-type="float">
            <text:p>0,00168518518518519000</text:p>
          </table:table-cell>
          <table:table-cell table:formula="of:=[.D262]-[.D26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6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69166666666667" calcext:value-type="float">
            <text:p>0,00169166666666667000</text:p>
          </table:table-cell>
          <table:table-cell table:formula="of:=[.D263]-[.D26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6" office:value-type="float" office:value="14672" calcext:value-type="float">
            <text:p>1467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69814814814815" calcext:value-type="float">
            <text:p>0,00169814814814815000</text:p>
          </table:table-cell>
          <table:table-cell table:formula="of:=[.D264]-[.D263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6" office:value-type="float" office:value="14728" calcext:value-type="float">
            <text:p>14728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70462962962963" calcext:value-type="float">
            <text:p>0,00170462962962963000</text:p>
          </table:table-cell>
          <table:table-cell table:formula="of:=[.D265]-[.D26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6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71111111111111" calcext:value-type="float">
            <text:p>0,00171111111111111000</text:p>
          </table:table-cell>
          <table:table-cell table:formula="of:=[.D266]-[.D26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6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71759259259259" calcext:value-type="float">
            <text:p>0,00171759259259259000</text:p>
          </table:table-cell>
          <table:table-cell table:formula="of:=[.D267]-[.D26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6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72407407407407" calcext:value-type="float">
            <text:p>0,00172407407407407000</text:p>
          </table:table-cell>
          <table:table-cell table:formula="of:=[.D268]-[.D26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6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73055555555556" calcext:value-type="float">
            <text:p>0,00173055555555556000</text:p>
          </table:table-cell>
          <table:table-cell table:formula="of:=[.D269]-[.D26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6" office:value-type="float" office:value="15008" calcext:value-type="float">
            <text:p>1500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73703703703704" calcext:value-type="float">
            <text:p>0,00173703703703704000</text:p>
          </table:table-cell>
          <table:table-cell table:formula="of:=[.D270]-[.D269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6" office:value-type="float" office:value="15064" calcext:value-type="float">
            <text:p>15064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74351851851852" calcext:value-type="float">
            <text:p>0,00174351851851852000</text:p>
          </table:table-cell>
          <table:table-cell table:formula="of:=[.D271]-[.D27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6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75" calcext:value-type="float">
            <text:p>0,00175000000000000000</text:p>
          </table:table-cell>
          <table:table-cell table:formula="of:=[.D272]-[.D27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6" office:value-type="float" office:value="15176" calcext:value-type="float">
            <text:p>15176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75648148148148" calcext:value-type="float">
            <text:p>0,00175648148148148000</text:p>
          </table:table-cell>
          <table:table-cell table:formula="of:=[.D273]-[.D27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6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76296296296296" calcext:value-type="float">
            <text:p>0,00176296296296296000</text:p>
          </table:table-cell>
          <table:table-cell table:formula="of:=[.D274]-[.D27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6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76944444444444" calcext:value-type="float">
            <text:p>0,00176944444444444000</text:p>
          </table:table-cell>
          <table:table-cell table:formula="of:=[.D275]-[.D274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6" office:value-type="float" office:value="15344" calcext:value-type="float">
            <text:p>1534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77592592592593" calcext:value-type="float">
            <text:p>0,00177592592592593000</text:p>
          </table:table-cell>
          <table:table-cell table:formula="of:=[.D276]-[.D27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6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78240740740741" calcext:value-type="float">
            <text:p>0,00178240740740741000</text:p>
          </table:table-cell>
          <table:table-cell table:formula="of:=[.D277]-[.D27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6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78888888888889" calcext:value-type="float">
            <text:p>0,00178888888888889000</text:p>
          </table:table-cell>
          <table:table-cell table:formula="of:=[.D278]-[.D27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6" office:value-type="float" office:value="15512" calcext:value-type="float">
            <text:p>15512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79537037037037" calcext:value-type="float">
            <text:p>0,00179537037037037000</text:p>
          </table:table-cell>
          <table:table-cell table:formula="of:=[.D279]-[.D27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6" office:value-type="float" office:value="15568" calcext:value-type="float">
            <text:p>1556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80185185185185" calcext:value-type="float">
            <text:p>0,00180185185185185000</text:p>
          </table:table-cell>
          <table:table-cell table:formula="of:=[.D280]-[.D27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6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80833333333333" calcext:value-type="float">
            <text:p>0,00180833333333333000</text:p>
          </table:table-cell>
          <table:table-cell table:formula="of:=[.D281]-[.D280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6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81481481481482" calcext:value-type="float">
            <text:p>0,00181481481481482000</text:p>
          </table:table-cell>
          <table:table-cell table:formula="of:=[.D282]-[.D28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6" office:value-type="float" office:value="15736" calcext:value-type="float">
            <text:p>15736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8212962962963" calcext:value-type="float">
            <text:p>0,00182129629629630000</text:p>
          </table:table-cell>
          <table:table-cell table:formula="of:=[.D283]-[.D28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6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82777777777778" calcext:value-type="float">
            <text:p>0,00182777777777778000</text:p>
          </table:table-cell>
          <table:table-cell table:formula="of:=[.D284]-[.D28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6" office:value-type="float" office:value="15848" calcext:value-type="float">
            <text:p>15848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83425925925926" calcext:value-type="float">
            <text:p>0,00183425925925926000</text:p>
          </table:table-cell>
          <table:table-cell table:formula="of:=[.D285]-[.D28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6" office:value-type="float" office:value="15904" calcext:value-type="float">
            <text:p>1590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84074074074074" calcext:value-type="float">
            <text:p>0,00184074074074074000</text:p>
          </table:table-cell>
          <table:table-cell table:formula="of:=[.D286]-[.D285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6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84722222222222" calcext:value-type="float">
            <text:p>0,00184722222222222000</text:p>
          </table:table-cell>
          <table:table-cell table:formula="of:=[.D287]-[.D28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6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8537037037037" calcext:value-type="float">
            <text:p>0,00185370370370370000</text:p>
          </table:table-cell>
          <table:table-cell table:formula="of:=[.D288]-[.D28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6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86018518518519" calcext:value-type="float">
            <text:p>0,00186018518518519000</text:p>
          </table:table-cell>
          <table:table-cell table:formula="of:=[.D289]-[.D28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6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86666666666667" calcext:value-type="float">
            <text:p>0,00186666666666667000</text:p>
          </table:table-cell>
          <table:table-cell table:formula="of:=[.D290]-[.D28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6" office:value-type="float" office:value="16184" calcext:value-type="float">
            <text:p>16184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87314814814815" calcext:value-type="float">
            <text:p>0,00187314814814815000</text:p>
          </table:table-cell>
          <table:table-cell table:formula="of:=[.D291]-[.D29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6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87962962962963" calcext:value-type="float">
            <text:p>0,00187962962962963000</text:p>
          </table:table-cell>
          <table:table-cell table:formula="of:=[.D292]-[.D291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6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88611111111111" calcext:value-type="float">
            <text:p>0,00188611111111111000</text:p>
          </table:table-cell>
          <table:table-cell table:formula="of:=[.D293]-[.D29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6" office:value-type="float" office:value="16352" calcext:value-type="float">
            <text:p>1635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89259259259259" calcext:value-type="float">
            <text:p>0,00189259259259259000</text:p>
          </table:table-cell>
          <table:table-cell table:formula="of:=[.D294]-[.D29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6" office:value-type="float" office:value="16408" calcext:value-type="float">
            <text:p>16408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89907407407407" calcext:value-type="float">
            <text:p>0,00189907407407407000</text:p>
          </table:table-cell>
          <table:table-cell table:formula="of:=[.D295]-[.D29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6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90555555555556" calcext:value-type="float">
            <text:p>0,00190555555555556000</text:p>
          </table:table-cell>
          <table:table-cell table:formula="of:=[.D296]-[.D29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6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91203703703704" calcext:value-type="float">
            <text:p>0,00191203703703704000</text:p>
          </table:table-cell>
          <table:table-cell table:formula="of:=[.D297]-[.D296]" office:value-type="float" office:value="0.00000648148148148166" calcext:value-type="float">
            <text:p>0,00000648148148148166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6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91851851851852" calcext:value-type="float">
            <text:p>0,00191851851851852000</text:p>
          </table:table-cell>
          <table:table-cell table:formula="of:=[.D298]-[.D29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6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925" calcext:value-type="float">
            <text:p>0,00192500000000000000</text:p>
          </table:table-cell>
          <table:table-cell table:formula="of:=[.D299]-[.D29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6" office:value-type="float" office:value="16688" calcext:value-type="float">
            <text:p>1668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93148148148148" calcext:value-type="float">
            <text:p>0,00193148148148148000</text:p>
          </table:table-cell>
          <table:table-cell table:formula="of:=[.D300]-[.D29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6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93796296296296" calcext:value-type="float">
            <text:p>0,00193796296296296000</text:p>
          </table:table-cell>
          <table:table-cell table:formula="of:=[.D301]-[.D30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6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94444444444444" calcext:value-type="float">
            <text:p>0,00194444444444444000</text:p>
          </table:table-cell>
          <table:table-cell table:formula="of:=[.D302]-[.D30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6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95092592592593" calcext:value-type="float">
            <text:p>0,00195092592592593000</text:p>
          </table:table-cell>
          <table:table-cell table:formula="of:=[.D303]-[.D30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6" office:value-type="float" office:value="16912" calcext:value-type="float">
            <text:p>1691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95740740740741" calcext:value-type="float">
            <text:p>0,00195740740740741000</text:p>
          </table:table-cell>
          <table:table-cell table:formula="of:=[.D304]-[.D30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6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96388888888889" calcext:value-type="float">
            <text:p>0,00196388888888889000</text:p>
          </table:table-cell>
          <table:table-cell table:formula="of:=[.D305]-[.D30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6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97037037037037" calcext:value-type="float">
            <text:p>0,00197037037037037000</text:p>
          </table:table-cell>
          <table:table-cell table:formula="of:=[.D306]-[.D305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6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97685185185185" calcext:value-type="float">
            <text:p>0,00197685185185185000</text:p>
          </table:table-cell>
          <table:table-cell table:formula="of:=[.D307]-[.D30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6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98333333333333" calcext:value-type="float">
            <text:p>0,00198333333333333000</text:p>
          </table:table-cell>
          <table:table-cell table:formula="of:=[.D308]-[.D30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6" office:value-type="float" office:value="17192" calcext:value-type="float">
            <text:p>17192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98981481481482" calcext:value-type="float">
            <text:p>0,00198981481481482000</text:p>
          </table:table-cell>
          <table:table-cell table:formula="of:=[.D309]-[.D30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6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9962962962963" calcext:value-type="float">
            <text:p>0,00199629629629630000</text:p>
          </table:table-cell>
          <table:table-cell table:formula="of:=[.D310]-[.D30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6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00277777777778" calcext:value-type="float">
            <text:p>0,00200277777777778000</text:p>
          </table:table-cell>
          <table:table-cell table:formula="of:=[.D311]-[.D31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6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00925925925926" calcext:value-type="float">
            <text:p>0,00200925925925926000</text:p>
          </table:table-cell>
          <table:table-cell table:formula="of:=[.D312]-[.D31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6" office:value-type="float" office:value="17416" calcext:value-type="float">
            <text:p>17416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01574074074074" calcext:value-type="float">
            <text:p>0,00201574074074074000</text:p>
          </table:table-cell>
          <table:table-cell table:formula="of:=[.D313]-[.D31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6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02222222222222" calcext:value-type="float">
            <text:p>0,00202222222222222000</text:p>
          </table:table-cell>
          <table:table-cell table:formula="of:=[.D314]-[.D31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6" office:value-type="float" office:value="17528" calcext:value-type="float">
            <text:p>17528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0287037037037" calcext:value-type="float">
            <text:p>0,00202870370370370000</text:p>
          </table:table-cell>
          <table:table-cell table:formula="of:=[.D315]-[.D31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6" office:value-type="float" office:value="17584" calcext:value-type="float">
            <text:p>1758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03518518518519" calcext:value-type="float">
            <text:p>0,00203518518518519000</text:p>
          </table:table-cell>
          <table:table-cell table:formula="of:=[.D316]-[.D31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6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04166666666667" calcext:value-type="float">
            <text:p>0,00204166666666667000</text:p>
          </table:table-cell>
          <table:table-cell table:formula="of:=[.D317]-[.D316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6" office:value-type="float" office:value="17696" calcext:value-type="float">
            <text:p>1769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04814814814815" calcext:value-type="float">
            <text:p>0,00204814814814815000</text:p>
          </table:table-cell>
          <table:table-cell table:formula="of:=[.D318]-[.D31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6" office:value-type="float" office:value="17752" calcext:value-type="float">
            <text:p>17752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05462962962963" calcext:value-type="float">
            <text:p>0,00205462962962963000</text:p>
          </table:table-cell>
          <table:table-cell table:formula="of:=[.D319]-[.D31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6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06111111111111" calcext:value-type="float">
            <text:p>0,00206111111111111000</text:p>
          </table:table-cell>
          <table:table-cell table:formula="of:=[.D320]-[.D31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6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06759259259259" calcext:value-type="float">
            <text:p>0,00206759259259259000</text:p>
          </table:table-cell>
          <table:table-cell table:formula="of:=[.D321]-[.D32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6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07407407407407" calcext:value-type="float">
            <text:p>0,00207407407407407000</text:p>
          </table:table-cell>
          <table:table-cell table:formula="of:=[.D322]-[.D32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6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08055555555556" calcext:value-type="float">
            <text:p>0,00208055555555556000</text:p>
          </table:table-cell>
          <table:table-cell table:formula="of:=[.D323]-[.D32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6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08703703703704" calcext:value-type="float">
            <text:p>0,00208703703703704000</text:p>
          </table:table-cell>
          <table:table-cell table:formula="of:=[.D324]-[.D32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6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09351851851852" calcext:value-type="float">
            <text:p>0,00209351851851852000</text:p>
          </table:table-cell>
          <table:table-cell table:formula="of:=[.D325]-[.D32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6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1" calcext:value-type="float">
            <text:p>0,00210000000000000000</text:p>
          </table:table-cell>
          <table:table-cell table:formula="of:=[.D326]-[.D32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6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10648148148148" calcext:value-type="float">
            <text:p>0,00210648148148148000</text:p>
          </table:table-cell>
          <table:table-cell table:formula="of:=[.D327]-[.D32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6" office:value-type="float" office:value="18256" calcext:value-type="float">
            <text:p>1825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11296296296296" calcext:value-type="float">
            <text:p>0,00211296296296296000</text:p>
          </table:table-cell>
          <table:table-cell table:formula="of:=[.D328]-[.D327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6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11944444444444" calcext:value-type="float">
            <text:p>0,00211944444444444000</text:p>
          </table:table-cell>
          <table:table-cell table:formula="of:=[.D329]-[.D32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6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12592592592593" calcext:value-type="float">
            <text:p>0,00212592592592593000</text:p>
          </table:table-cell>
          <table:table-cell table:formula="of:=[.D330]-[.D32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6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13240740740741" calcext:value-type="float">
            <text:p>0,00213240740740741000</text:p>
          </table:table-cell>
          <table:table-cell table:formula="of:=[.D331]-[.D33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6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13888888888889" calcext:value-type="float">
            <text:p>0,00213888888888889000</text:p>
          </table:table-cell>
          <table:table-cell table:formula="of:=[.D332]-[.D33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6" office:value-type="float" office:value="18536" calcext:value-type="float">
            <text:p>18536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14537037037037" calcext:value-type="float">
            <text:p>0,00214537037037037000</text:p>
          </table:table-cell>
          <table:table-cell table:formula="of:=[.D333]-[.D33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6" office:value-type="float" office:value="18592" calcext:value-type="float">
            <text:p>1859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15185185185185" calcext:value-type="float">
            <text:p>0,00215185185185185000</text:p>
          </table:table-cell>
          <table:table-cell table:formula="of:=[.D334]-[.D33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6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15833333333333" calcext:value-type="float">
            <text:p>0,00215833333333333000</text:p>
          </table:table-cell>
          <table:table-cell table:formula="of:=[.D335]-[.D33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6" office:value-type="float" office:value="18704" calcext:value-type="float">
            <text:p>1870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16481481481481" calcext:value-type="float">
            <text:p>0,00216481481481481000</text:p>
          </table:table-cell>
          <table:table-cell table:formula="of:=[.D336]-[.D33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6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1712962962963" calcext:value-type="float">
            <text:p>0,00217129629629630000</text:p>
          </table:table-cell>
          <table:table-cell table:formula="of:=[.D337]-[.D33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6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17777777777778" calcext:value-type="float">
            <text:p>0,00217777777777778000</text:p>
          </table:table-cell>
          <table:table-cell table:formula="of:=[.D338]-[.D33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6" office:value-type="float" office:value="18872" calcext:value-type="float">
            <text:p>18872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18425925925926" calcext:value-type="float">
            <text:p>0,00218425925925926000</text:p>
          </table:table-cell>
          <table:table-cell table:formula="of:=[.D339]-[.D338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6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19074074074074" calcext:value-type="float">
            <text:p>0,00219074074074074000</text:p>
          </table:table-cell>
          <table:table-cell table:formula="of:=[.D340]-[.D33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6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19722222222222" calcext:value-type="float">
            <text:p>0,00219722222222222000</text:p>
          </table:table-cell>
          <table:table-cell table:formula="of:=[.D341]-[.D34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6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2037037037037" calcext:value-type="float">
            <text:p>0,00220370370370370000</text:p>
          </table:table-cell>
          <table:table-cell table:formula="of:=[.D342]-[.D34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6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21018518518519" calcext:value-type="float">
            <text:p>0,00221018518518519000</text:p>
          </table:table-cell>
          <table:table-cell table:formula="of:=[.D343]-[.D34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6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21666666666667" calcext:value-type="float">
            <text:p>0,00221666666666667000</text:p>
          </table:table-cell>
          <table:table-cell table:formula="of:=[.D344]-[.D34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6" office:value-type="float" office:value="19208" calcext:value-type="float">
            <text:p>19208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22314814814815" calcext:value-type="float">
            <text:p>0,00222314814814815000</text:p>
          </table:table-cell>
          <table:table-cell table:formula="of:=[.D345]-[.D34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6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22962962962963" calcext:value-type="float">
            <text:p>0,00222962962962963000</text:p>
          </table:table-cell>
          <table:table-cell table:formula="of:=[.D346]-[.D34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6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23611111111111" calcext:value-type="float">
            <text:p>0,00223611111111111000</text:p>
          </table:table-cell>
          <table:table-cell table:formula="of:=[.D347]-[.D34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6" office:value-type="float" office:value="19376" calcext:value-type="float">
            <text:p>1937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24259259259259" calcext:value-type="float">
            <text:p>0,00224259259259259000</text:p>
          </table:table-cell>
          <table:table-cell table:formula="of:=[.D348]-[.D34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6" office:value-type="float" office:value="19432" calcext:value-type="float">
            <text:p>19432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24907407407407" calcext:value-type="float">
            <text:p>0,00224907407407407000</text:p>
          </table:table-cell>
          <table:table-cell table:formula="of:=[.D349]-[.D34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6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25555555555556" calcext:value-type="float">
            <text:p>0,00225555555555556000</text:p>
          </table:table-cell>
          <table:table-cell table:formula="of:=[.D350]-[.D349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6" office:value-type="float" office:value="19544" calcext:value-type="float">
            <text:p>19544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26203703703704" calcext:value-type="float">
            <text:p>0,00226203703703704000</text:p>
          </table:table-cell>
          <table:table-cell table:formula="of:=[.D351]-[.D35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6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26851851851852" calcext:value-type="float">
            <text:p>0,00226851851851852000</text:p>
          </table:table-cell>
          <table:table-cell table:formula="of:=[.D352]-[.D35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6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275" calcext:value-type="float">
            <text:p>0,00227500000000000000</text:p>
          </table:table-cell>
          <table:table-cell table:formula="of:=[.D353]-[.D35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6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28148148148148" calcext:value-type="float">
            <text:p>0,00228148148148148000</text:p>
          </table:table-cell>
          <table:table-cell table:formula="of:=[.D354]-[.D35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6" office:value-type="float" office:value="19768" calcext:value-type="float">
            <text:p>19768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28796296296296" calcext:value-type="float">
            <text:p>0,00228796296296296000</text:p>
          </table:table-cell>
          <table:table-cell table:formula="of:=[.D355]-[.D35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6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29444444444444" calcext:value-type="float">
            <text:p>0,00229444444444444000</text:p>
          </table:table-cell>
          <table:table-cell table:formula="of:=[.D356]-[.D35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6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30092592592593" calcext:value-type="float">
            <text:p>0,00230092592592593000</text:p>
          </table:table-cell>
          <table:table-cell table:formula="of:=[.D357]-[.D35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6" office:value-type="float" office:value="19936" calcext:value-type="float">
            <text:p>1993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30740740740741" calcext:value-type="float">
            <text:p>0,00230740740740741000</text:p>
          </table:table-cell>
          <table:table-cell table:formula="of:=[.D358]-[.D35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6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31388888888889" calcext:value-type="float">
            <text:p>0,00231388888888889000</text:p>
          </table:table-cell>
          <table:table-cell table:formula="of:=[.D359]-[.D35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6" office:value-type="float" office:value="20048" calcext:value-type="float">
            <text:p>2004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32037037037037" calcext:value-type="float">
            <text:p>0,00232037037037037000</text:p>
          </table:table-cell>
          <table:table-cell table:formula="of:=[.D360]-[.D35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6" office:value-type="float" office:value="20104" calcext:value-type="float">
            <text:p>20104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32685185185185" calcext:value-type="float">
            <text:p>0,00232685185185185000</text:p>
          </table:table-cell>
          <table:table-cell table:formula="of:=[.D361]-[.D360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6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33333333333333" calcext:value-type="float">
            <text:p>0,00233333333333333000</text:p>
          </table:table-cell>
          <table:table-cell table:formula="of:=[.D362]-[.D36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6" office:value-type="float" office:value="20216" calcext:value-type="float">
            <text:p>20216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33981481481482" calcext:value-type="float">
            <text:p>0,00233981481481482000</text:p>
          </table:table-cell>
          <table:table-cell table:formula="of:=[.D363]-[.D36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6" office:value-type="float" office:value="20272" calcext:value-type="float">
            <text:p>2027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3462962962963" calcext:value-type="float">
            <text:p>0,00234629629629630000</text:p>
          </table:table-cell>
          <table:table-cell table:formula="of:=[.D364]-[.D36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6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35277777777778" calcext:value-type="float">
            <text:p>0,00235277777777778000</text:p>
          </table:table-cell>
          <table:table-cell table:formula="of:=[.D365]-[.D36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6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35925925925926" calcext:value-type="float">
            <text:p>0,00235925925925926000</text:p>
          </table:table-cell>
          <table:table-cell table:formula="of:=[.D366]-[.D36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6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36574074074074" calcext:value-type="float">
            <text:p>0,00236574074074074000</text:p>
          </table:table-cell>
          <table:table-cell table:formula="of:=[.D367]-[.D36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6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37222222222222" calcext:value-type="float">
            <text:p>0,00237222222222222000</text:p>
          </table:table-cell>
          <table:table-cell table:formula="of:=[.D368]-[.D36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6" office:value-type="float" office:value="20552" calcext:value-type="float">
            <text:p>20552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3787037037037" calcext:value-type="float">
            <text:p>0,00237870370370370000</text:p>
          </table:table-cell>
          <table:table-cell table:formula="of:=[.D369]-[.D36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6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38518518518519" calcext:value-type="float">
            <text:p>0,00238518518518519000</text:p>
          </table:table-cell>
          <table:table-cell table:formula="of:=[.D370]-[.D36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6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39166666666667" calcext:value-type="float">
            <text:p>0,00239166666666667000</text:p>
          </table:table-cell>
          <table:table-cell table:formula="of:=[.D371]-[.D37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6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39814814814815" calcext:value-type="float">
            <text:p>0,00239814814814815000</text:p>
          </table:table-cell>
          <table:table-cell table:formula="of:=[.D372]-[.D371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6" office:value-type="float" office:value="20776" calcext:value-type="float">
            <text:p>20776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40462962962963" calcext:value-type="float">
            <text:p>0,00240462962962963000</text:p>
          </table:table-cell>
          <table:table-cell table:formula="of:=[.D373]-[.D37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6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41111111111111" calcext:value-type="float">
            <text:p>0,00241111111111111000</text:p>
          </table:table-cell>
          <table:table-cell table:formula="of:=[.D374]-[.D37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6" office:value-type="float" office:value="20888" calcext:value-type="float">
            <text:p>20888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41759259259259" calcext:value-type="float">
            <text:p>0,00241759259259259000</text:p>
          </table:table-cell>
          <table:table-cell table:formula="of:=[.D375]-[.D37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6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42407407407407" calcext:value-type="float">
            <text:p>0,00242407407407407000</text:p>
          </table:table-cell>
          <table:table-cell table:formula="of:=[.D376]-[.D37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6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43055555555556" calcext:value-type="float">
            <text:p>0,00243055555555556000</text:p>
          </table:table-cell>
          <table:table-cell table:formula="of:=[.D377]-[.D37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6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43703703703704" calcext:value-type="float">
            <text:p>0,00243703703703704000</text:p>
          </table:table-cell>
          <table:table-cell table:formula="of:=[.D378]-[.D37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6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44351851851852" calcext:value-type="float">
            <text:p>0,00244351851851852000</text:p>
          </table:table-cell>
          <table:table-cell table:formula="of:=[.D379]-[.D37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6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45" calcext:value-type="float">
            <text:p>0,00245000000000000000</text:p>
          </table:table-cell>
          <table:table-cell table:formula="of:=[.D380]-[.D37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6" office:value-type="float" office:value="21224" calcext:value-type="float">
            <text:p>21224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45648148148148" calcext:value-type="float">
            <text:p>0,00245648148148148000</text:p>
          </table:table-cell>
          <table:table-cell table:formula="of:=[.D381]-[.D38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6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46296296296296" calcext:value-type="float">
            <text:p>0,00246296296296296000</text:p>
          </table:table-cell>
          <table:table-cell table:formula="of:=[.D382]-[.D38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6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46944444444444" calcext:value-type="float">
            <text:p>0,00246944444444444000</text:p>
          </table:table-cell>
          <table:table-cell table:formula="of:=[.D383]-[.D382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6" office:value-type="float" office:value="21392" calcext:value-type="float">
            <text:p>2139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47592592592593" calcext:value-type="float">
            <text:p>0,00247592592592593000</text:p>
          </table:table-cell>
          <table:table-cell table:formula="of:=[.D384]-[.D38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6" office:value-type="float" office:value="21448" calcext:value-type="float">
            <text:p>21448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48240740740741" calcext:value-type="float">
            <text:p>0,00248240740740741000</text:p>
          </table:table-cell>
          <table:table-cell table:formula="of:=[.D385]-[.D38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6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48888888888889" calcext:value-type="float">
            <text:p>0,00248888888888889000</text:p>
          </table:table-cell>
          <table:table-cell table:formula="of:=[.D386]-[.D38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6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49537037037037" calcext:value-type="float">
            <text:p>0,00249537037037037000</text:p>
          </table:table-cell>
          <table:table-cell table:formula="of:=[.D387]-[.D38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6" office:value-type="float" office:value="21616" calcext:value-type="float">
            <text:p>2161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50185185185185" calcext:value-type="float">
            <text:p>0,00250185185185185000</text:p>
          </table:table-cell>
          <table:table-cell table:formula="of:=[.D388]-[.D38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6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50833333333333" calcext:value-type="float">
            <text:p>0,00250833333333333000</text:p>
          </table:table-cell>
          <table:table-cell table:formula="of:=[.D389]-[.D38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6" office:value-type="float" office:value="21728" calcext:value-type="float">
            <text:p>2172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51481481481481" calcext:value-type="float">
            <text:p>0,00251481481481481000</text:p>
          </table:table-cell>
          <table:table-cell table:formula="of:=[.D390]-[.D38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6" office:value-type="float" office:value="21784" calcext:value-type="float">
            <text:p>21784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5212962962963" calcext:value-type="float">
            <text:p>0,00252129629629630000</text:p>
          </table:table-cell>
          <table:table-cell table:formula="of:=[.D391]-[.D39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6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52777777777778" calcext:value-type="float">
            <text:p>0,00252777777777778000</text:p>
          </table:table-cell>
          <table:table-cell table:formula="of:=[.D392]-[.D39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6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53425925925926" calcext:value-type="float">
            <text:p>0,00253425925925926000</text:p>
          </table:table-cell>
          <table:table-cell table:formula="of:=[.D393]-[.D39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6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54074074074074" calcext:value-type="float">
            <text:p>0,00254074074074074000</text:p>
          </table:table-cell>
          <table:table-cell table:formula="of:=[.D394]-[.D393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6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54722222222222" calcext:value-type="float">
            <text:p>0,00254722222222222000</text:p>
          </table:table-cell>
          <table:table-cell table:formula="of:=[.D395]-[.D39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6" office:value-type="float" office:value="22064" calcext:value-type="float">
            <text:p>2206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5537037037037" calcext:value-type="float">
            <text:p>0,00255370370370370000</text:p>
          </table:table-cell>
          <table:table-cell table:formula="of:=[.D396]-[.D39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6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56018518518519" calcext:value-type="float">
            <text:p>0,00256018518518519000</text:p>
          </table:table-cell>
          <table:table-cell table:formula="of:=[.D397]-[.D39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6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56666666666667" calcext:value-type="float">
            <text:p>0,00256666666666667000</text:p>
          </table:table-cell>
          <table:table-cell table:formula="of:=[.D398]-[.D39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6" office:value-type="float" office:value="22232" calcext:value-type="float">
            <text:p>22232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57314814814815" calcext:value-type="float">
            <text:p>0,00257314814814815000</text:p>
          </table:table-cell>
          <table:table-cell table:formula="of:=[.D399]-[.D39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6" office:value-type="float" office:value="22288" calcext:value-type="float">
            <text:p>2228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57962962962963" calcext:value-type="float">
            <text:p>0,00257962962962963000</text:p>
          </table:table-cell>
          <table:table-cell table:formula="of:=[.D400]-[.D39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6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58611111111111" calcext:value-type="float">
            <text:p>0,00258611111111111000</text:p>
          </table:table-cell>
          <table:table-cell table:formula="of:=[.D401]-[.D40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6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59259259259259" calcext:value-type="float">
            <text:p>0,00259259259259259000</text:p>
          </table:table-cell>
          <table:table-cell table:formula="of:=[.D402]-[.D40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6" office:value-type="float" office:value="22456" calcext:value-type="float">
            <text:p>22456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59907407407407" calcext:value-type="float">
            <text:p>0,00259907407407407000</text:p>
          </table:table-cell>
          <table:table-cell table:formula="of:=[.D403]-[.D40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6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60555555555556" calcext:value-type="float">
            <text:p>0,00260555555555556000</text:p>
          </table:table-cell>
          <table:table-cell table:formula="of:=[.D404]-[.D40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6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61203703703704" calcext:value-type="float">
            <text:p>0,00261203703703704000</text:p>
          </table:table-cell>
          <table:table-cell table:formula="of:=[.D405]-[.D404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6" office:value-type="float" office:value="22624" calcext:value-type="float">
            <text:p>2262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61851851851852" calcext:value-type="float">
            <text:p>0,00261851851851852000</text:p>
          </table:table-cell>
          <table:table-cell table:formula="of:=[.D406]-[.D40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6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625" calcext:value-type="float">
            <text:p>0,00262500000000000000</text:p>
          </table:table-cell>
          <table:table-cell table:formula="of:=[.D407]-[.D40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6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63148148148148" calcext:value-type="float">
            <text:p>0,00263148148148148000</text:p>
          </table:table-cell>
          <table:table-cell table:formula="of:=[.D408]-[.D40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6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63796296296296" calcext:value-type="float">
            <text:p>0,00263796296296296000</text:p>
          </table:table-cell>
          <table:table-cell table:formula="of:=[.D409]-[.D40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6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64444444444444" calcext:value-type="float">
            <text:p>0,00264444444444444000</text:p>
          </table:table-cell>
          <table:table-cell table:formula="of:=[.D410]-[.D40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6" office:value-type="float" office:value="22904" calcext:value-type="float">
            <text:p>22904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65092592592593" calcext:value-type="float">
            <text:p>0,00265092592592593000</text:p>
          </table:table-cell>
          <table:table-cell table:formula="of:=[.D411]-[.D41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6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65740740740741" calcext:value-type="float">
            <text:p>0,00265740740740741000</text:p>
          </table:table-cell>
          <table:table-cell table:formula="of:=[.D412]-[.D41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6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66388888888889" calcext:value-type="float">
            <text:p>0,00266388888888889000</text:p>
          </table:table-cell>
          <table:table-cell table:formula="of:=[.D413]-[.D41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6" office:value-type="float" office:value="23072" calcext:value-type="float">
            <text:p>2307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67037037037037" calcext:value-type="float">
            <text:p>0,00267037037037037000</text:p>
          </table:table-cell>
          <table:table-cell table:formula="of:=[.D414]-[.D41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6" office:value-type="float" office:value="23128" calcext:value-type="float">
            <text:p>23128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67685185185185" calcext:value-type="float">
            <text:p>0,00267685185185185000</text:p>
          </table:table-cell>
          <table:table-cell table:formula="of:=[.D415]-[.D41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56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68333333333333" calcext:value-type="float">
            <text:p>0,00268333333333333000</text:p>
          </table:table-cell>
          <table:table-cell table:formula="of:=[.D416]-[.D415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56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68981481481482" calcext:value-type="float">
            <text:p>0,00268981481481482000</text:p>
          </table:table-cell>
          <table:table-cell table:formula="of:=[.D417]-[.D416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56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6962962962963" calcext:value-type="float">
            <text:p>0,00269629629629630000</text:p>
          </table:table-cell>
          <table:table-cell table:formula="of:=[.D418]-[.D41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56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70277777777778" calcext:value-type="float">
            <text:p>0,00270277777777778000</text:p>
          </table:table-cell>
          <table:table-cell table:formula="of:=[.D419]-[.D41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56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70925925925926" calcext:value-type="float">
            <text:p>0,00270925925925926000</text:p>
          </table:table-cell>
          <table:table-cell table:formula="of:=[.D420]-[.D419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56" office:value-type="float" office:value="23464" calcext:value-type="float">
            <text:p>23464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71574074074074" calcext:value-type="float">
            <text:p>0,00271574074074074000</text:p>
          </table:table-cell>
          <table:table-cell table:formula="of:=[.D421]-[.D420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56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72222222222222" calcext:value-type="float">
            <text:p>0,00272222222222222000</text:p>
          </table:table-cell>
          <table:table-cell table:formula="of:=[.D422]-[.D421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56" office:value-type="float" office:value="23576" calcext:value-type="float">
            <text:p>23576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7287037037037" calcext:value-type="float">
            <text:p>0,00272870370370370000</text:p>
          </table:table-cell>
          <table:table-cell table:formula="of:=[.D423]-[.D422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56" office:value-type="float" office:value="23632" calcext:value-type="float">
            <text:p>2363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73518518518519" calcext:value-type="float">
            <text:p>0,00273518518518519000</text:p>
          </table:table-cell>
          <table:table-cell table:formula="of:=[.D424]-[.D423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56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74166666666667" calcext:value-type="float">
            <text:p>0,00274166666666667000</text:p>
          </table:table-cell>
          <table:table-cell table:formula="of:=[.D425]-[.D424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56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74814814814815" calcext:value-type="float">
            <text:p>0,00274814814814815000</text:p>
          </table:table-cell>
          <table:table-cell table:formula="of:=[.D426]-[.D425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56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75462962962963" calcext:value-type="float">
            <text:p>0,00275462962962963000</text:p>
          </table:table-cell>
          <table:table-cell table:formula="of:=[.D427]-[.D426]" office:value-type="float" office:value="0.00000648148148148188" calcext:value-type="float">
            <text:p>0,00000648148148148188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56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76111111111111" calcext:value-type="float">
            <text:p>0,00276111111111111000</text:p>
          </table:table-cell>
          <table:table-cell table:formula="of:=[.D428]-[.D427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56" office:value-type="float" office:value="23912" calcext:value-type="float">
            <text:p>23912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76759259259259" calcext:value-type="float">
            <text:p>0,00276759259259259000</text:p>
          </table:table-cell>
          <table:table-cell table:formula="of:=[.D429]-[.D428]" office:value-type="float" office:value="0.00000648148148148144" calcext:value-type="float">
            <text:p>0,00000648148148148144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56" office:value-type="float" office:value="23968" calcext:value-type="float">
            <text:p>2396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77407407407407" calcext:value-type="float">
            <text:p>0,00277407407407407000</text:p>
          </table:table-cell>
          <table:table-cell table:formula="of:=#REF!-[.D429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10:09.157434238</meta:creation-date>
    <dc:date>2026-05-17T18:10:27.639001129</dc:date>
    <meta:editing-duration>PT20S</meta:editing-duration>
    <meta:editing-cycles>1</meta:editing-cycles>
    <meta:document-statistic meta:table-count="1" meta:cell-count="2145" meta:object-count="0"/>
    <meta:generator>LibreOffice/24.2.7.2$Linux_X86_64 LibreOffice_project/420$Build-2</meta:generator>
  </office:meta>
</office:document-meta>
</file>