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38888888888889" calcext:value-type="float">
            <text:p>0,00000138888888888889</text:p>
          </table:table-cell>
          <table:table-cell table:formula="of:=[.D3]-[.D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2" office:value-type="float" office:value="24" calcext:value-type="float">
            <text:p>2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277777777777778" calcext:value-type="float">
            <text:p>0,00000277777777777778</text:p>
          </table:table-cell>
          <table:table-cell table:formula="of:=[.D4]-[.D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2" office:value-type="float" office:value="36" calcext:value-type="float">
            <text:p>3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416666666666667" calcext:value-type="float">
            <text:p>0,00000416666666666667</text:p>
          </table:table-cell>
          <table:table-cell table:formula="of:=[.D5]-[.D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2" office:value-type="float" office:value="48" calcext:value-type="float">
            <text:p>4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555555555555556" calcext:value-type="float">
            <text:p>0,00000555555555555556</text:p>
          </table:table-cell>
          <table:table-cell table:formula="of:=[.D6]-[.D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2"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694444444444445" calcext:value-type="float">
            <text:p>0,00000694444444444445</text:p>
          </table:table-cell>
          <table:table-cell table:formula="of:=[.D7]-[.D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2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833333333333333" calcext:value-type="float">
            <text:p>0,00000833333333333333</text:p>
          </table:table-cell>
          <table:table-cell table:formula="of:=[.D8]-[.D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2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972222222222222" calcext:value-type="float">
            <text:p>0,00000972222222222222</text:p>
          </table:table-cell>
          <table:table-cell table:formula="of:=[.D9]-[.D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2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11111111111111" calcext:value-type="float">
            <text:p>0,00001111111111111110</text:p>
          </table:table-cell>
          <table:table-cell table:formula="of:=[.D10]-[.D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2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25" calcext:value-type="float">
            <text:p>0,00001250000000000000</text:p>
          </table:table-cell>
          <table:table-cell table:formula="of:=[.D11]-[.D1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2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38888888888889" calcext:value-type="float">
            <text:p>0,00001388888888888890</text:p>
          </table:table-cell>
          <table:table-cell table:formula="of:=[.D12]-[.D1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2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52777777777778" calcext:value-type="float">
            <text:p>0,00001527777777777780</text:p>
          </table:table-cell>
          <table:table-cell table:formula="of:=[.D13]-[.D1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2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66666666666667" calcext:value-type="float">
            <text:p>0,00001666666666666670</text:p>
          </table:table-cell>
          <table:table-cell table:formula="of:=[.D14]-[.D1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2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80555555555556" calcext:value-type="float">
            <text:p>0,00001805555555555560</text:p>
          </table:table-cell>
          <table:table-cell table:formula="of:=[.D15]-[.D1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2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94444444444444" calcext:value-type="float">
            <text:p>0,00001944444444444450</text:p>
          </table:table-cell>
          <table:table-cell table:formula="of:=[.D16]-[.D1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2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08333333333333" calcext:value-type="float">
            <text:p>0,00002083333333333330</text:p>
          </table:table-cell>
          <table:table-cell table:formula="of:=[.D17]-[.D1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2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22222222222222" calcext:value-type="float">
            <text:p>0,00002222222222222220</text:p>
          </table:table-cell>
          <table:table-cell table:formula="of:=[.D18]-[.D1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2" office:value-type="float" office:value="204" calcext:value-type="float">
            <text:p>20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236111111111111" calcext:value-type="float">
            <text:p>0,00002361111111111110</text:p>
          </table:table-cell>
          <table:table-cell table:formula="of:=[.D19]-[.D1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2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25" calcext:value-type="float">
            <text:p>0,00002500000000000000</text:p>
          </table:table-cell>
          <table:table-cell table:formula="of:=[.D20]-[.D1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2" office:value-type="float" office:value="228" calcext:value-type="float">
            <text:p>22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263888888888889" calcext:value-type="float">
            <text:p>0,00002638888888888890</text:p>
          </table:table-cell>
          <table:table-cell table:formula="of:=[.D21]-[.D2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2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277777777777778" calcext:value-type="float">
            <text:p>0,00002777777777777780</text:p>
          </table:table-cell>
          <table:table-cell table:formula="of:=[.D22]-[.D2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2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291666666666667" calcext:value-type="float">
            <text:p>0,00002916666666666670</text:p>
          </table:table-cell>
          <table:table-cell table:formula="of:=[.D23]-[.D2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2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305555555555556" calcext:value-type="float">
            <text:p>0,00003055555555555560</text:p>
          </table:table-cell>
          <table:table-cell table:formula="of:=[.D24]-[.D2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2" office:value-type="float" office:value="276" calcext:value-type="float">
            <text:p>27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319444444444445" calcext:value-type="float">
            <text:p>0,00003194444444444450</text:p>
          </table:table-cell>
          <table:table-cell table:formula="of:=[.D25]-[.D2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2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333333333333333" calcext:value-type="float">
            <text:p>0,00003333333333333330</text:p>
          </table:table-cell>
          <table:table-cell table:formula="of:=[.D26]-[.D2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2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347222222222222" calcext:value-type="float">
            <text:p>0,00003472222222222220</text:p>
          </table:table-cell>
          <table:table-cell table:formula="of:=[.D27]-[.D2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2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361111111111111" calcext:value-type="float">
            <text:p>0,00003611111111111110</text:p>
          </table:table-cell>
          <table:table-cell table:formula="of:=[.D28]-[.D2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2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375" calcext:value-type="float">
            <text:p>0,00003750000000000000</text:p>
          </table:table-cell>
          <table:table-cell table:formula="of:=[.D29]-[.D2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2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388888888888889" calcext:value-type="float">
            <text:p>0,00003888888888888890</text:p>
          </table:table-cell>
          <table:table-cell table:formula="of:=[.D30]-[.D2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2" office:value-type="float" office:value="348" calcext:value-type="float">
            <text:p>34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402777777777778" calcext:value-type="float">
            <text:p>0,00004027777777777780</text:p>
          </table:table-cell>
          <table:table-cell table:formula="of:=[.D31]-[.D3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2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416666666666667" calcext:value-type="float">
            <text:p>0,00004166666666666670</text:p>
          </table:table-cell>
          <table:table-cell table:formula="of:=[.D32]-[.D3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2" office:value-type="float" office:value="372" calcext:value-type="float">
            <text:p>37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430555555555556" calcext:value-type="float">
            <text:p>0,00004305555555555560</text:p>
          </table:table-cell>
          <table:table-cell table:formula="of:=[.D33]-[.D3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2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444444444444444" calcext:value-type="float">
            <text:p>0,00004444444444444450</text:p>
          </table:table-cell>
          <table:table-cell table:formula="of:=[.D34]-[.D3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2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458333333333333" calcext:value-type="float">
            <text:p>0,00004583333333333330</text:p>
          </table:table-cell>
          <table:table-cell table:formula="of:=[.D35]-[.D3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2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472222222222222" calcext:value-type="float">
            <text:p>0,00004722222222222220</text:p>
          </table:table-cell>
          <table:table-cell table:formula="of:=[.D36]-[.D3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2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486111111111111" calcext:value-type="float">
            <text:p>0,00004861111111111110</text:p>
          </table:table-cell>
          <table:table-cell table:formula="of:=[.D37]-[.D3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2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5" calcext:value-type="float">
            <text:p>0,00005000000000000000</text:p>
          </table:table-cell>
          <table:table-cell table:formula="of:=[.D38]-[.D3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2" office:value-type="float" office:value="444" calcext:value-type="float">
            <text:p>44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513888888888889" calcext:value-type="float">
            <text:p>0,00005138888888888890</text:p>
          </table:table-cell>
          <table:table-cell table:formula="of:=[.D39]-[.D3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2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527777777777778" calcext:value-type="float">
            <text:p>0,00005277777777777780</text:p>
          </table:table-cell>
          <table:table-cell table:formula="of:=[.D40]-[.D3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2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541666666666667" calcext:value-type="float">
            <text:p>0,00005416666666666670</text:p>
          </table:table-cell>
          <table:table-cell table:formula="of:=[.D41]-[.D4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2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555555555555556" calcext:value-type="float">
            <text:p>0,00005555555555555560</text:p>
          </table:table-cell>
          <table:table-cell table:formula="of:=[.D42]-[.D4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2" office:value-type="float" office:value="492" calcext:value-type="float">
            <text:p>49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569444444444444" calcext:value-type="float">
            <text:p>0,00005694444444444450</text:p>
          </table:table-cell>
          <table:table-cell table:formula="of:=[.D43]-[.D4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2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583333333333333" calcext:value-type="float">
            <text:p>0,00005833333333333330</text:p>
          </table:table-cell>
          <table:table-cell table:formula="of:=[.D44]-[.D4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2" office:value-type="float" office:value="516" calcext:value-type="float">
            <text:p>51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597222222222222" calcext:value-type="float">
            <text:p>0,00005972222222222220</text:p>
          </table:table-cell>
          <table:table-cell table:formula="of:=[.D45]-[.D4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2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611111111111111" calcext:value-type="float">
            <text:p>0,00006111111111111110</text:p>
          </table:table-cell>
          <table:table-cell table:formula="of:=[.D46]-[.D4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2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625" calcext:value-type="float">
            <text:p>0,00006250000000000000</text:p>
          </table:table-cell>
          <table:table-cell table:formula="of:=[.D47]-[.D4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2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638888888888889" calcext:value-type="float">
            <text:p>0,00006388888888888890</text:p>
          </table:table-cell>
          <table:table-cell table:formula="of:=[.D48]-[.D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2" office:value-type="float" office:value="564" calcext:value-type="float">
            <text:p>56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652777777777778" calcext:value-type="float">
            <text:p>0,00006527777777777780</text:p>
          </table:table-cell>
          <table:table-cell table:formula="of:=[.D49]-[.D4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2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666666666666667" calcext:value-type="float">
            <text:p>0,00006666666666666670</text:p>
          </table:table-cell>
          <table:table-cell table:formula="of:=[.D50]-[.D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2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680555555555556" calcext:value-type="float">
            <text:p>0,00006805555555555560</text:p>
          </table:table-cell>
          <table:table-cell table:formula="of:=[.D51]-[.D5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2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694444444444444" calcext:value-type="float">
            <text:p>0,00006944444444444440</text:p>
          </table:table-cell>
          <table:table-cell table:formula="of:=[.D52]-[.D5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2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708333333333333" calcext:value-type="float">
            <text:p>0,00007083333333333330</text:p>
          </table:table-cell>
          <table:table-cell table:formula="of:=[.D53]-[.D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2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722222222222222" calcext:value-type="float">
            <text:p>0,00007222222222222220</text:p>
          </table:table-cell>
          <table:table-cell table:formula="of:=[.D54]-[.D5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2" office:value-type="float" office:value="636" calcext:value-type="float">
            <text:p>63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736111111111111" calcext:value-type="float">
            <text:p>0,00007361111111111110</text:p>
          </table:table-cell>
          <table:table-cell table:formula="of:=[.D55]-[.D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2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75" calcext:value-type="float">
            <text:p>0,00007500000000000000</text:p>
          </table:table-cell>
          <table:table-cell table:formula="of:=[.D56]-[.D5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2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763888888888889" calcext:value-type="float">
            <text:p>0,00007638888888888890</text:p>
          </table:table-cell>
          <table:table-cell table:formula="of:=[.D57]-[.D5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2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777777777777778" calcext:value-type="float">
            <text:p>0,00007777777777777780</text:p>
          </table:table-cell>
          <table:table-cell table:formula="of:=[.D58]-[.D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2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791666666666667" calcext:value-type="float">
            <text:p>0,00007916666666666670</text:p>
          </table:table-cell>
          <table:table-cell table:formula="of:=[.D59]-[.D58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2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805555555555556" calcext:value-type="float">
            <text:p>0,00008055555555555560</text:p>
          </table:table-cell>
          <table:table-cell table:formula="of:=[.D60]-[.D5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2" office:value-type="float" office:value="708" calcext:value-type="float">
            <text:p>70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819444444444445" calcext:value-type="float">
            <text:p>0,00008194444444444450</text:p>
          </table:table-cell>
          <table:table-cell table:formula="of:=[.D61]-[.D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2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833333333333333" calcext:value-type="float">
            <text:p>0,00008333333333333330</text:p>
          </table:table-cell>
          <table:table-cell table:formula="of:=[.D62]-[.D6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2" office:value-type="float" office:value="732" calcext:value-type="float">
            <text:p>73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847222222222222" calcext:value-type="float">
            <text:p>0,00008472222222222220</text:p>
          </table:table-cell>
          <table:table-cell table:formula="of:=[.D63]-[.D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2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861111111111111" calcext:value-type="float">
            <text:p>0,00008611111111111110</text:p>
          </table:table-cell>
          <table:table-cell table:formula="of:=[.D64]-[.D63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2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875" calcext:value-type="float">
            <text:p>0,00008750000000000000</text:p>
          </table:table-cell>
          <table:table-cell table:formula="of:=[.D65]-[.D6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2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888888888888889" calcext:value-type="float">
            <text:p>0,00008888888888888890</text:p>
          </table:table-cell>
          <table:table-cell table:formula="of:=[.D66]-[.D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2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902777777777778" calcext:value-type="float">
            <text:p>0,00009027777777777780</text:p>
          </table:table-cell>
          <table:table-cell table:formula="of:=[.D67]-[.D66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2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916666666666667" calcext:value-type="float">
            <text:p>0,00009166666666666670</text:p>
          </table:table-cell>
          <table:table-cell table:formula="of:=[.D68]-[.D6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2" office:value-type="float" office:value="804" calcext:value-type="float">
            <text:p>80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930555555555556" calcext:value-type="float">
            <text:p>0,00009305555555555560</text:p>
          </table:table-cell>
          <table:table-cell table:formula="of:=[.D69]-[.D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2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944444444444444" calcext:value-type="float">
            <text:p>0,00009444444444444440</text:p>
          </table:table-cell>
          <table:table-cell table:formula="of:=[.D70]-[.D6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2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958333333333333" calcext:value-type="float">
            <text:p>0,00009583333333333330</text:p>
          </table:table-cell>
          <table:table-cell table:formula="of:=[.D71]-[.D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2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972222222222222" calcext:value-type="float">
            <text:p>0,00009722222222222220</text:p>
          </table:table-cell>
          <table:table-cell table:formula="of:=[.D72]-[.D71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2" office:value-type="float" office:value="852" calcext:value-type="float">
            <text:p>85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986111111111111" calcext:value-type="float">
            <text:p>0,00009861111111111110</text:p>
          </table:table-cell>
          <table:table-cell table:formula="of:=[.D73]-[.D7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2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" calcext:value-type="float">
            <text:p>0,00010000000000000000</text:p>
          </table:table-cell>
          <table:table-cell table:formula="of:=[.D74]-[.D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2" office:value-type="float" office:value="876" calcext:value-type="float">
            <text:p>87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01388888888889" calcext:value-type="float">
            <text:p>0,00010138888888888900</text:p>
          </table:table-cell>
          <table:table-cell table:formula="of:=[.D75]-[.D7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2" office:value-type="float" office:value="888" calcext:value-type="float">
            <text:p>88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02777777777778" calcext:value-type="float">
            <text:p>0,00010277777777777800</text:p>
          </table:table-cell>
          <table:table-cell table:formula="of:=[.D76]-[.D7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2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04166666666667" calcext:value-type="float">
            <text:p>0,00010416666666666700</text:p>
          </table:table-cell>
          <table:table-cell table:formula="of:=[.D77]-[.D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2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05555555555556" calcext:value-type="float">
            <text:p>0,00010555555555555600</text:p>
          </table:table-cell>
          <table:table-cell table:formula="of:=[.D78]-[.D7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2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06944444444444" calcext:value-type="float">
            <text:p>0,00010694444444444400</text:p>
          </table:table-cell>
          <table:table-cell table:formula="of:=[.D79]-[.D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2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08333333333333" calcext:value-type="float">
            <text:p>0,00010833333333333300</text:p>
          </table:table-cell>
          <table:table-cell table:formula="of:=[.D80]-[.D79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2" office:value-type="float" office:value="948" calcext:value-type="float">
            <text:p>94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09722222222222" calcext:value-type="float">
            <text:p>0,00010972222222222200</text:p>
          </table:table-cell>
          <table:table-cell table:formula="of:=[.D81]-[.D80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2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11111111111111" calcext:value-type="float">
            <text:p>0,00011111111111111100</text:p>
          </table:table-cell>
          <table:table-cell table:formula="of:=[.D82]-[.D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2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125" calcext:value-type="float">
            <text:p>0,00011250000000000000</text:p>
          </table:table-cell>
          <table:table-cell table:formula="of:=[.D83]-[.D82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2" office:value-type="float" office:value="984" calcext:value-type="float">
            <text:p>98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13888888888889" calcext:value-type="float">
            <text:p>0,00011388888888888900</text:p>
          </table:table-cell>
          <table:table-cell table:formula="of:=[.D84]-[.D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2" office:value-type="float" office:value="996" calcext:value-type="float">
            <text:p>99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15277777777778" calcext:value-type="float">
            <text:p>0,00011527777777777800</text:p>
          </table:table-cell>
          <table:table-cell table:formula="of:=[.D85]-[.D84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2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16666666666667" calcext:value-type="float">
            <text:p>0,00011666666666666700</text:p>
          </table:table-cell>
          <table:table-cell table:formula="of:=[.D86]-[.D85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2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18055555555556" calcext:value-type="float">
            <text:p>0,00011805555555555600</text:p>
          </table:table-cell>
          <table:table-cell table:formula="of:=[.D87]-[.D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2" office:value-type="float" office:value="1032" calcext:value-type="float">
            <text:p>103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19444444444444" calcext:value-type="float">
            <text:p>0,00011944444444444400</text:p>
          </table:table-cell>
          <table:table-cell table:formula="of:=[.D88]-[.D87]" office:value-type="float" office:value="0.00000138888888888889" calcext:value-type="float">
            <text:p>0,000001388888888888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2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20833333333333" calcext:value-type="float">
            <text:p>0,00012083333333333300</text:p>
          </table:table-cell>
          <table:table-cell table:formula="of:=[.D89]-[.D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2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22222222222222" calcext:value-type="float">
            <text:p>0,00012222222222222200</text:p>
          </table:table-cell>
          <table:table-cell table:formula="of:=[.D90]-[.D89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2" office:value-type="float" office:value="1068" calcext:value-type="float">
            <text:p>106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23611111111111" calcext:value-type="float">
            <text:p>0,00012361111111111100</text:p>
          </table:table-cell>
          <table:table-cell table:formula="of:=[.D91]-[.D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2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25" calcext:value-type="float">
            <text:p>0,00012500000000000000</text:p>
          </table:table-cell>
          <table:table-cell table:formula="of:=[.D92]-[.D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2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26388888888889" calcext:value-type="float">
            <text:p>0,00012638888888888900</text:p>
          </table:table-cell>
          <table:table-cell table:formula="of:=[.D93]-[.D92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2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27777777777778" calcext:value-type="float">
            <text:p>0,00012777777777777800</text:p>
          </table:table-cell>
          <table:table-cell table:formula="of:=[.D94]-[.D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2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29166666666667" calcext:value-type="float">
            <text:p>0,00012916666666666700</text:p>
          </table:table-cell>
          <table:table-cell table:formula="of:=[.D95]-[.D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2" office:value-type="float" office:value="1128" calcext:value-type="float">
            <text:p>112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30555555555556" calcext:value-type="float">
            <text:p>0,00013055555555555600</text:p>
          </table:table-cell>
          <table:table-cell table:formula="of:=[.D96]-[.D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2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31944444444444" calcext:value-type="float">
            <text:p>0,00013194444444444400</text:p>
          </table:table-cell>
          <table:table-cell table:formula="of:=[.D97]-[.D96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2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33333333333333" calcext:value-type="float">
            <text:p>0,00013333333333333300</text:p>
          </table:table-cell>
          <table:table-cell table:formula="of:=[.D98]-[.D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2" office:value-type="float" office:value="1164" calcext:value-type="float">
            <text:p>116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34722222222222" calcext:value-type="float">
            <text:p>0,00013472222222222200</text:p>
          </table:table-cell>
          <table:table-cell table:formula="of:=[.D99]-[.D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2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36111111111111" calcext:value-type="float">
            <text:p>0,00013611111111111100</text:p>
          </table:table-cell>
          <table:table-cell table:formula="of:=[.D100]-[.D99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2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375" calcext:value-type="float">
            <text:p>0,00013750000000000000</text:p>
          </table:table-cell>
          <table:table-cell table:formula="of:=[.D101]-[.D1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2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38888888888889" calcext:value-type="float">
            <text:p>0,00013888888888888900</text:p>
          </table:table-cell>
          <table:table-cell table:formula="of:=[.D102]-[.D1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2" office:value-type="float" office:value="1212" calcext:value-type="float">
            <text:p>121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40277777777778" calcext:value-type="float">
            <text:p>0,00014027777777777800</text:p>
          </table:table-cell>
          <table:table-cell table:formula="of:=[.D103]-[.D102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2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41666666666667" calcext:value-type="float">
            <text:p>0,00014166666666666700</text:p>
          </table:table-cell>
          <table:table-cell table:formula="of:=[.D104]-[.D1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2" office:value-type="float" office:value="1236" calcext:value-type="float">
            <text:p>123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43055555555556" calcext:value-type="float">
            <text:p>0,00014305555555555600</text:p>
          </table:table-cell>
          <table:table-cell table:formula="of:=[.D105]-[.D1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2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44444444444444" calcext:value-type="float">
            <text:p>0,00014444444444444400</text:p>
          </table:table-cell>
          <table:table-cell table:formula="of:=[.D106]-[.D105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2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45833333333333" calcext:value-type="float">
            <text:p>0,00014583333333333300</text:p>
          </table:table-cell>
          <table:table-cell table:formula="of:=[.D107]-[.D1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2" office:value-type="float" office:value="1272" calcext:value-type="float">
            <text:p>127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47222222222222" calcext:value-type="float">
            <text:p>0,00014722222222222200</text:p>
          </table:table-cell>
          <table:table-cell table:formula="of:=[.D108]-[.D1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2" office:value-type="float" office:value="1284" calcext:value-type="float">
            <text:p>128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48611111111111" calcext:value-type="float">
            <text:p>0,00014861111111111100</text:p>
          </table:table-cell>
          <table:table-cell table:formula="of:=[.D109]-[.D1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2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5" calcext:value-type="float">
            <text:p>0,00015000000000000000</text:p>
          </table:table-cell>
          <table:table-cell table:formula="of:=[.D110]-[.D109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2" office:value-type="float" office:value="1308" calcext:value-type="float">
            <text:p>130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51388888888889" calcext:value-type="float">
            <text:p>0,00015138888888888900</text:p>
          </table:table-cell>
          <table:table-cell table:formula="of:=[.D111]-[.D1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2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52777777777778" calcext:value-type="float">
            <text:p>0,00015277777777777800</text:p>
          </table:table-cell>
          <table:table-cell table:formula="of:=[.D112]-[.D1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2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54166666666667" calcext:value-type="float">
            <text:p>0,00015416666666666700</text:p>
          </table:table-cell>
          <table:table-cell table:formula="of:=[.D113]-[.D112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2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55555555555556" calcext:value-type="float">
            <text:p>0,00015555555555555600</text:p>
          </table:table-cell>
          <table:table-cell table:formula="of:=[.D114]-[.D1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2" office:value-type="float" office:value="1356" calcext:value-type="float">
            <text:p>135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56944444444444" calcext:value-type="float">
            <text:p>0,00015694444444444400</text:p>
          </table:table-cell>
          <table:table-cell table:formula="of:=[.D115]-[.D1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2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58333333333333" calcext:value-type="float">
            <text:p>0,00015833333333333300</text:p>
          </table:table-cell>
          <table:table-cell table:formula="of:=[.D116]-[.D115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2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59722222222222" calcext:value-type="float">
            <text:p>0,00015972222222222200</text:p>
          </table:table-cell>
          <table:table-cell table:formula="of:=[.D117]-[.D1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2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61111111111111" calcext:value-type="float">
            <text:p>0,00016111111111111100</text:p>
          </table:table-cell>
          <table:table-cell table:formula="of:=[.D118]-[.D1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2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625" calcext:value-type="float">
            <text:p>0,00016250000000000000</text:p>
          </table:table-cell>
          <table:table-cell table:formula="of:=[.D119]-[.D118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2" office:value-type="float" office:value="1416" calcext:value-type="float">
            <text:p>141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63888888888889" calcext:value-type="float">
            <text:p>0,00016388888888888900</text:p>
          </table:table-cell>
          <table:table-cell table:formula="of:=[.D120]-[.D1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2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65277777777778" calcext:value-type="float">
            <text:p>0,00016527777777777800</text:p>
          </table:table-cell>
          <table:table-cell table:formula="of:=[.D121]-[.D1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2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66666666666667" calcext:value-type="float">
            <text:p>0,00016666666666666700</text:p>
          </table:table-cell>
          <table:table-cell table:formula="of:=[.D122]-[.D121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2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68055555555556" calcext:value-type="float">
            <text:p>0,00016805555555555600</text:p>
          </table:table-cell>
          <table:table-cell table:formula="of:=[.D123]-[.D1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2" office:value-type="float" office:value="1464" calcext:value-type="float">
            <text:p>146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69444444444444" calcext:value-type="float">
            <text:p>0,00016944444444444400</text:p>
          </table:table-cell>
          <table:table-cell table:formula="of:=[.D124]-[.D1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2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70833333333333" calcext:value-type="float">
            <text:p>0,00017083333333333300</text:p>
          </table:table-cell>
          <table:table-cell table:formula="of:=[.D125]-[.D1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2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72222222222222" calcext:value-type="float">
            <text:p>0,00017222222222222200</text:p>
          </table:table-cell>
          <table:table-cell table:formula="of:=[.D126]-[.D125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2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73611111111111" calcext:value-type="float">
            <text:p>0,00017361111111111100</text:p>
          </table:table-cell>
          <table:table-cell table:formula="of:=[.D127]-[.D1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2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75" calcext:value-type="float">
            <text:p>0,00017500000000000000</text:p>
          </table:table-cell>
          <table:table-cell table:formula="of:=[.D128]-[.D1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2" office:value-type="float" office:value="1524" calcext:value-type="float">
            <text:p>152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76388888888889" calcext:value-type="float">
            <text:p>0,00017638888888888900</text:p>
          </table:table-cell>
          <table:table-cell table:formula="of:=[.D129]-[.D128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2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77777777777778" calcext:value-type="float">
            <text:p>0,00017777777777777800</text:p>
          </table:table-cell>
          <table:table-cell table:formula="of:=[.D130]-[.D1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2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79166666666667" calcext:value-type="float">
            <text:p>0,00017916666666666700</text:p>
          </table:table-cell>
          <table:table-cell table:formula="of:=[.D131]-[.D1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2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80555555555556" calcext:value-type="float">
            <text:p>0,00018055555555555600</text:p>
          </table:table-cell>
          <table:table-cell table:formula="of:=[.D132]-[.D131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2" office:value-type="float" office:value="1572" calcext:value-type="float">
            <text:p>157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81944444444444" calcext:value-type="float">
            <text:p>0,00018194444444444400</text:p>
          </table:table-cell>
          <table:table-cell table:formula="of:=[.D133]-[.D1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2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83333333333333" calcext:value-type="float">
            <text:p>0,00018333333333333300</text:p>
          </table:table-cell>
          <table:table-cell table:formula="of:=[.D134]-[.D1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2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84722222222222" calcext:value-type="float">
            <text:p>0,00018472222222222200</text:p>
          </table:table-cell>
          <table:table-cell table:formula="of:=[.D135]-[.D134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2" office:value-type="float" office:value="1608" calcext:value-type="float">
            <text:p>160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86111111111111" calcext:value-type="float">
            <text:p>0,00018611111111111100</text:p>
          </table:table-cell>
          <table:table-cell table:formula="of:=[.D136]-[.D1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2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875" calcext:value-type="float">
            <text:p>0,00018750000000000000</text:p>
          </table:table-cell>
          <table:table-cell table:formula="of:=[.D137]-[.D1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2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88888888888889" calcext:value-type="float">
            <text:p>0,00018888888888888900</text:p>
          </table:table-cell>
          <table:table-cell table:formula="of:=[.D138]-[.D1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2" office:value-type="float" office:value="1644" calcext:value-type="float">
            <text:p>164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90277777777778" calcext:value-type="float">
            <text:p>0,00019027777777777800</text:p>
          </table:table-cell>
          <table:table-cell table:formula="of:=[.D139]-[.D138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2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91666666666667" calcext:value-type="float">
            <text:p>0,00019166666666666700</text:p>
          </table:table-cell>
          <table:table-cell table:formula="of:=[.D140]-[.D1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2" office:value-type="float" office:value="1668" calcext:value-type="float">
            <text:p>166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93055555555556" calcext:value-type="float">
            <text:p>0,00019305555555555600</text:p>
          </table:table-cell>
          <table:table-cell table:formula="of:=[.D141]-[.D1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2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94444444444444" calcext:value-type="float">
            <text:p>0,00019444444444444400</text:p>
          </table:table-cell>
          <table:table-cell table:formula="of:=[.D142]-[.D141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2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95833333333333" calcext:value-type="float">
            <text:p>0,00019583333333333300</text:p>
          </table:table-cell>
          <table:table-cell table:formula="of:=[.D143]-[.D1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2" office:value-type="float" office:value="1704" calcext:value-type="float">
            <text:p>170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97222222222222" calcext:value-type="float">
            <text:p>0,00019722222222222200</text:p>
          </table:table-cell>
          <table:table-cell table:formula="of:=[.D144]-[.D1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2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98611111111111" calcext:value-type="float">
            <text:p>0,00019861111111111100</text:p>
          </table:table-cell>
          <table:table-cell table:formula="of:=[.D145]-[.D144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2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" calcext:value-type="float">
            <text:p>0,00020000000000000000</text:p>
          </table:table-cell>
          <table:table-cell table:formula="of:=[.D146]-[.D1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2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01388888888889" calcext:value-type="float">
            <text:p>0,00020138888888888900</text:p>
          </table:table-cell>
          <table:table-cell table:formula="of:=[.D147]-[.D1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2" office:value-type="float" office:value="1752" calcext:value-type="float">
            <text:p>175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02777777777778" calcext:value-type="float">
            <text:p>0,00020277777777777800</text:p>
          </table:table-cell>
          <table:table-cell table:formula="of:=[.D148]-[.D147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2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04166666666667" calcext:value-type="float">
            <text:p>0,00020416666666666700</text:p>
          </table:table-cell>
          <table:table-cell table:formula="of:=[.D149]-[.D1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2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05555555555556" calcext:value-type="float">
            <text:p>0,00020555555555555600</text:p>
          </table:table-cell>
          <table:table-cell table:formula="of:=[.D150]-[.D1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2" office:value-type="float" office:value="1788" calcext:value-type="float">
            <text:p>178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06944444444444" calcext:value-type="float">
            <text:p>0,00020694444444444400</text:p>
          </table:table-cell>
          <table:table-cell table:formula="of:=[.D151]-[.D150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2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08333333333333" calcext:value-type="float">
            <text:p>0,00020833333333333300</text:p>
          </table:table-cell>
          <table:table-cell table:formula="of:=[.D152]-[.D1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2" office:value-type="float" office:value="1812" calcext:value-type="float">
            <text:p>181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09722222222222" calcext:value-type="float">
            <text:p>0,00020972222222222200</text:p>
          </table:table-cell>
          <table:table-cell table:formula="of:=[.D153]-[.D1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2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11111111111111" calcext:value-type="float">
            <text:p>0,00021111111111111100</text:p>
          </table:table-cell>
          <table:table-cell table:formula="of:=[.D154]-[.D1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2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2125" calcext:value-type="float">
            <text:p>0,00021250000000000000</text:p>
          </table:table-cell>
          <table:table-cell table:formula="of:=[.D155]-[.D154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2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213888888888889" calcext:value-type="float">
            <text:p>0,00021388888888888900</text:p>
          </table:table-cell>
          <table:table-cell table:formula="of:=[.D156]-[.D1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2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215277777777778" calcext:value-type="float">
            <text:p>0,00021527777777777800</text:p>
          </table:table-cell>
          <table:table-cell table:formula="of:=[.D157]-[.D1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2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216666666666667" calcext:value-type="float">
            <text:p>0,00021666666666666700</text:p>
          </table:table-cell>
          <table:table-cell table:formula="of:=[.D158]-[.D157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2" office:value-type="float" office:value="1884" calcext:value-type="float">
            <text:p>188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218055555555556" calcext:value-type="float">
            <text:p>0,00021805555555555600</text:p>
          </table:table-cell>
          <table:table-cell table:formula="of:=[.D159]-[.D1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2" office:value-type="float" office:value="1896" calcext:value-type="float">
            <text:p>189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19444444444444" calcext:value-type="float">
            <text:p>0,00021944444444444400</text:p>
          </table:table-cell>
          <table:table-cell table:formula="of:=[.D160]-[.D1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2" office:value-type="float" office:value="1908" calcext:value-type="float">
            <text:p>190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20833333333333" calcext:value-type="float">
            <text:p>0,00022083333333333300</text:p>
          </table:table-cell>
          <table:table-cell table:formula="of:=[.D161]-[.D160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2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22222222222222" calcext:value-type="float">
            <text:p>0,00022222222222222200</text:p>
          </table:table-cell>
          <table:table-cell table:formula="of:=[.D162]-[.D1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2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23611111111111" calcext:value-type="float">
            <text:p>0,00022361111111111100</text:p>
          </table:table-cell>
          <table:table-cell table:formula="of:=[.D163]-[.D1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2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225" calcext:value-type="float">
            <text:p>0,00022500000000000000</text:p>
          </table:table-cell>
          <table:table-cell table:formula="of:=[.D164]-[.D163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2" office:value-type="float" office:value="1956" calcext:value-type="float">
            <text:p>195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226388888888889" calcext:value-type="float">
            <text:p>0,00022638888888888900</text:p>
          </table:table-cell>
          <table:table-cell table:formula="of:=[.D165]-[.D1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2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227777777777778" calcext:value-type="float">
            <text:p>0,00022777777777777800</text:p>
          </table:table-cell>
          <table:table-cell table:formula="of:=[.D166]-[.D1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2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229166666666667" calcext:value-type="float">
            <text:p>0,00022916666666666700</text:p>
          </table:table-cell>
          <table:table-cell table:formula="of:=[.D167]-[.D1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2" office:value-type="float" office:value="1992" calcext:value-type="float">
            <text:p>199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230555555555556" calcext:value-type="float">
            <text:p>0,00023055555555555600</text:p>
          </table:table-cell>
          <table:table-cell table:formula="of:=[.D168]-[.D167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2" office:value-type="float" office:value="2004" calcext:value-type="float">
            <text:p>200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231944444444444" calcext:value-type="float">
            <text:p>0,00023194444444444400</text:p>
          </table:table-cell>
          <table:table-cell table:formula="of:=[.D169]-[.D1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2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233333333333333" calcext:value-type="float">
            <text:p>0,00023333333333333300</text:p>
          </table:table-cell>
          <table:table-cell table:formula="of:=[.D170]-[.D1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2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234722222222222" calcext:value-type="float">
            <text:p>0,00023472222222222200</text:p>
          </table:table-cell>
          <table:table-cell table:formula="of:=[.D171]-[.D170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2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236111111111111" calcext:value-type="float">
            <text:p>0,00023611111111111100</text:p>
          </table:table-cell>
          <table:table-cell table:formula="of:=[.D172]-[.D1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2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2375" calcext:value-type="float">
            <text:p>0,00023750000000000000</text:p>
          </table:table-cell>
          <table:table-cell table:formula="of:=[.D173]-[.D1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2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238888888888889" calcext:value-type="float">
            <text:p>0,00023888888888888900</text:p>
          </table:table-cell>
          <table:table-cell table:formula="of:=[.D174]-[.D173]" office:value-type="float" office:value="0.00000138888888888891" calcext:value-type="float">
            <text:p>0,000001388888888888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2" office:value-type="float" office:value="2076" calcext:value-type="float">
            <text:p>207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240277777777778" calcext:value-type="float">
            <text:p>0,00024027777777777800</text:p>
          </table:table-cell>
          <table:table-cell table:formula="of:=[.D175]-[.D1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2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241666666666667" calcext:value-type="float">
            <text:p>0,00024166666666666700</text:p>
          </table:table-cell>
          <table:table-cell table:formula="of:=[.D176]-[.D1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2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243055555555556" calcext:value-type="float">
            <text:p>0,00024305555555555600</text:p>
          </table:table-cell>
          <table:table-cell table:formula="of:=[.D177]-[.D1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2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244444444444444" calcext:value-type="float">
            <text:p>0,00024444444444444400</text:p>
          </table:table-cell>
          <table:table-cell table:formula="of:=[.D178]-[.D1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2" office:value-type="float" office:value="2124" calcext:value-type="float">
            <text:p>212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245833333333333" calcext:value-type="float">
            <text:p>0,00024583333333333300</text:p>
          </table:table-cell>
          <table:table-cell table:formula="of:=[.D179]-[.D178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2" office:value-type="float" office:value="2136" calcext:value-type="float">
            <text:p>213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247222222222222" calcext:value-type="float">
            <text:p>0,00024722222222222200</text:p>
          </table:table-cell>
          <table:table-cell table:formula="of:=[.D180]-[.D1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2" office:value-type="float" office:value="2148" calcext:value-type="float">
            <text:p>214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248611111111111" calcext:value-type="float">
            <text:p>0,00024861111111111100</text:p>
          </table:table-cell>
          <table:table-cell table:formula="of:=[.D181]-[.D1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2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25" calcext:value-type="float">
            <text:p>0,00025000000000000000</text:p>
          </table:table-cell>
          <table:table-cell table:formula="of:=[.D182]-[.D1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2" office:value-type="float" office:value="2172" calcext:value-type="float">
            <text:p>217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251388888888889" calcext:value-type="float">
            <text:p>0,00025138888888888900</text:p>
          </table:table-cell>
          <table:table-cell table:formula="of:=[.D183]-[.D1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2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252777777777778" calcext:value-type="float">
            <text:p>0,00025277777777777800</text:p>
          </table:table-cell>
          <table:table-cell table:formula="of:=[.D184]-[.D1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2" office:value-type="float" office:value="2196" calcext:value-type="float">
            <text:p>219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254166666666667" calcext:value-type="float">
            <text:p>0,00025416666666666700</text:p>
          </table:table-cell>
          <table:table-cell table:formula="of:=[.D185]-[.D184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2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255555555555556" calcext:value-type="float">
            <text:p>0,00025555555555555600</text:p>
          </table:table-cell>
          <table:table-cell table:formula="of:=[.D186]-[.D1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2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256944444444444" calcext:value-type="float">
            <text:p>0,00025694444444444400</text:p>
          </table:table-cell>
          <table:table-cell table:formula="of:=[.D187]-[.D1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2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258333333333333" calcext:value-type="float">
            <text:p>0,00025833333333333300</text:p>
          </table:table-cell>
          <table:table-cell table:formula="of:=[.D188]-[.D1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2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259722222222222" calcext:value-type="float">
            <text:p>0,00025972222222222200</text:p>
          </table:table-cell>
          <table:table-cell table:formula="of:=[.D189]-[.D1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2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261111111111111" calcext:value-type="float">
            <text:p>0,00026111111111111100</text:p>
          </table:table-cell>
          <table:table-cell table:formula="of:=[.D190]-[.D1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2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2625" calcext:value-type="float">
            <text:p>0,00026250000000000000</text:p>
          </table:table-cell>
          <table:table-cell table:formula="of:=[.D191]-[.D1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2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263888888888889" calcext:value-type="float">
            <text:p>0,00026388888888888900</text:p>
          </table:table-cell>
          <table:table-cell table:formula="of:=[.D192]-[.D191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2" office:value-type="float" office:value="2292" calcext:value-type="float">
            <text:p>229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265277777777778" calcext:value-type="float">
            <text:p>0,00026527777777777800</text:p>
          </table:table-cell>
          <table:table-cell table:formula="of:=[.D193]-[.D1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2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266666666666667" calcext:value-type="float">
            <text:p>0,00026666666666666700</text:p>
          </table:table-cell>
          <table:table-cell table:formula="of:=[.D194]-[.D1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2" office:value-type="float" office:value="2316" calcext:value-type="float">
            <text:p>231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268055555555556" calcext:value-type="float">
            <text:p>0,00026805555555555600</text:p>
          </table:table-cell>
          <table:table-cell table:formula="of:=[.D195]-[.D1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2" office:value-type="float" office:value="2328" calcext:value-type="float">
            <text:p>232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269444444444444" calcext:value-type="float">
            <text:p>0,00026944444444444400</text:p>
          </table:table-cell>
          <table:table-cell table:formula="of:=[.D196]-[.D1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2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270833333333333" calcext:value-type="float">
            <text:p>0,00027083333333333300</text:p>
          </table:table-cell>
          <table:table-cell table:formula="of:=[.D197]-[.D1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2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272222222222222" calcext:value-type="float">
            <text:p>0,00027222222222222200</text:p>
          </table:table-cell>
          <table:table-cell table:formula="of:=[.D198]-[.D197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2" office:value-type="float" office:value="2364" calcext:value-type="float">
            <text:p>236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273611111111111" calcext:value-type="float">
            <text:p>0,00027361111111111100</text:p>
          </table:table-cell>
          <table:table-cell table:formula="of:=[.D199]-[.D1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2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275" calcext:value-type="float">
            <text:p>0,00027500000000000000</text:p>
          </table:table-cell>
          <table:table-cell table:formula="of:=[.D200]-[.D1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2" office:value-type="float" office:value="2388" calcext:value-type="float">
            <text:p>238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276388888888889" calcext:value-type="float">
            <text:p>0,00027638888888888900</text:p>
          </table:table-cell>
          <table:table-cell table:formula="of:=[.D201]-[.D2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2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277777777777778" calcext:value-type="float">
            <text:p>0,00027777777777777800</text:p>
          </table:table-cell>
          <table:table-cell table:formula="of:=[.D202]-[.D2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2" office:value-type="float" office:value="2412" calcext:value-type="float">
            <text:p>241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279166666666667" calcext:value-type="float">
            <text:p>0,00027916666666666700</text:p>
          </table:table-cell>
          <table:table-cell table:formula="of:=[.D203]-[.D2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2" office:value-type="float" office:value="2424" calcext:value-type="float">
            <text:p>242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280555555555556" calcext:value-type="float">
            <text:p>0,00028055555555555600</text:p>
          </table:table-cell>
          <table:table-cell table:formula="of:=[.D204]-[.D2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2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281944444444444" calcext:value-type="float">
            <text:p>0,00028194444444444400</text:p>
          </table:table-cell>
          <table:table-cell table:formula="of:=[.D205]-[.D204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2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283333333333333" calcext:value-type="float">
            <text:p>0,00028333333333333300</text:p>
          </table:table-cell>
          <table:table-cell table:formula="of:=[.D206]-[.D2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2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284722222222222" calcext:value-type="float">
            <text:p>0,00028472222222222200</text:p>
          </table:table-cell>
          <table:table-cell table:formula="of:=[.D207]-[.D2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2" office:value-type="float" office:value="2472" calcext:value-type="float">
            <text:p>247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286111111111111" calcext:value-type="float">
            <text:p>0,00028611111111111100</text:p>
          </table:table-cell>
          <table:table-cell table:formula="of:=[.D208]-[.D2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2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2875" calcext:value-type="float">
            <text:p>0,00028750000000000000</text:p>
          </table:table-cell>
          <table:table-cell table:formula="of:=[.D209]-[.D2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2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288888888888889" calcext:value-type="float">
            <text:p>0,00028888888888888900</text:p>
          </table:table-cell>
          <table:table-cell table:formula="of:=[.D210]-[.D2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2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290277777777778" calcext:value-type="float">
            <text:p>0,00029027777777777800</text:p>
          </table:table-cell>
          <table:table-cell table:formula="of:=[.D211]-[.D210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2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291666666666667" calcext:value-type="float">
            <text:p>0,00029166666666666700</text:p>
          </table:table-cell>
          <table:table-cell table:formula="of:=[.D212]-[.D2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2" office:value-type="float" office:value="2532" calcext:value-type="float">
            <text:p>253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293055555555556" calcext:value-type="float">
            <text:p>0,00029305555555555600</text:p>
          </table:table-cell>
          <table:table-cell table:formula="of:=[.D213]-[.D2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2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294444444444444" calcext:value-type="float">
            <text:p>0,00029444444444444400</text:p>
          </table:table-cell>
          <table:table-cell table:formula="of:=[.D214]-[.D2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2" office:value-type="float" office:value="2556" calcext:value-type="float">
            <text:p>255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295833333333333" calcext:value-type="float">
            <text:p>0,00029583333333333300</text:p>
          </table:table-cell>
          <table:table-cell table:formula="of:=[.D215]-[.D2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2" office:value-type="float" office:value="2568" calcext:value-type="float">
            <text:p>256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297222222222222" calcext:value-type="float">
            <text:p>0,00029722222222222200</text:p>
          </table:table-cell>
          <table:table-cell table:formula="of:=[.D216]-[.D2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2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298611111111111" calcext:value-type="float">
            <text:p>0,00029861111111111100</text:p>
          </table:table-cell>
          <table:table-cell table:formula="of:=[.D217]-[.D2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2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3" calcext:value-type="float">
            <text:p>0,00030000000000000000</text:p>
          </table:table-cell>
          <table:table-cell table:formula="of:=[.D218]-[.D217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2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301388888888889" calcext:value-type="float">
            <text:p>0,00030138888888888900</text:p>
          </table:table-cell>
          <table:table-cell table:formula="of:=[.D219]-[.D2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2" office:value-type="float" office:value="2616" calcext:value-type="float">
            <text:p>261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302777777777778" calcext:value-type="float">
            <text:p>0,00030277777777777800</text:p>
          </table:table-cell>
          <table:table-cell table:formula="of:=[.D220]-[.D2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2" office:value-type="float" office:value="2628" calcext:value-type="float">
            <text:p>262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304166666666667" calcext:value-type="float">
            <text:p>0,00030416666666666700</text:p>
          </table:table-cell>
          <table:table-cell table:formula="of:=[.D221]-[.D2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2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305555555555556" calcext:value-type="float">
            <text:p>0,00030555555555555600</text:p>
          </table:table-cell>
          <table:table-cell table:formula="of:=[.D222]-[.D2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2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306944444444444" calcext:value-type="float">
            <text:p>0,00030694444444444400</text:p>
          </table:table-cell>
          <table:table-cell table:formula="of:=[.D223]-[.D2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2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308333333333333" calcext:value-type="float">
            <text:p>0,00030833333333333300</text:p>
          </table:table-cell>
          <table:table-cell table:formula="of:=[.D224]-[.D223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2" office:value-type="float" office:value="2676" calcext:value-type="float">
            <text:p>267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309722222222222" calcext:value-type="float">
            <text:p>0,00030972222222222200</text:p>
          </table:table-cell>
          <table:table-cell table:formula="of:=[.D225]-[.D2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2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311111111111111" calcext:value-type="float">
            <text:p>0,00031111111111111100</text:p>
          </table:table-cell>
          <table:table-cell table:formula="of:=[.D226]-[.D2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2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3125" calcext:value-type="float">
            <text:p>0,00031250000000000000</text:p>
          </table:table-cell>
          <table:table-cell table:formula="of:=[.D227]-[.D2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2" office:value-type="float" office:value="2712" calcext:value-type="float">
            <text:p>271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313888888888889" calcext:value-type="float">
            <text:p>0,00031388888888888900</text:p>
          </table:table-cell>
          <table:table-cell table:formula="of:=[.D228]-[.D2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2" office:value-type="float" office:value="2724" calcext:value-type="float">
            <text:p>272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315277777777778" calcext:value-type="float">
            <text:p>0,00031527777777777800</text:p>
          </table:table-cell>
          <table:table-cell table:formula="of:=[.D229]-[.D2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2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316666666666667" calcext:value-type="float">
            <text:p>0,00031666666666666700</text:p>
          </table:table-cell>
          <table:table-cell table:formula="of:=[.D230]-[.D229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2" office:value-type="float" office:value="2748" calcext:value-type="float">
            <text:p>274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318055555555556" calcext:value-type="float">
            <text:p>0,00031805555555555600</text:p>
          </table:table-cell>
          <table:table-cell table:formula="of:=[.D231]-[.D2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2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319444444444444" calcext:value-type="float">
            <text:p>0,00031944444444444400</text:p>
          </table:table-cell>
          <table:table-cell table:formula="of:=[.D232]-[.D2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2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320833333333333" calcext:value-type="float">
            <text:p>0,00032083333333333300</text:p>
          </table:table-cell>
          <table:table-cell table:formula="of:=[.D233]-[.D2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2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322222222222222" calcext:value-type="float">
            <text:p>0,00032222222222222200</text:p>
          </table:table-cell>
          <table:table-cell table:formula="of:=[.D234]-[.D2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2" office:value-type="float" office:value="2796" calcext:value-type="float">
            <text:p>279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323611111111111" calcext:value-type="float">
            <text:p>0,00032361111111111100</text:p>
          </table:table-cell>
          <table:table-cell table:formula="of:=[.D235]-[.D2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2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325" calcext:value-type="float">
            <text:p>0,00032500000000000000</text:p>
          </table:table-cell>
          <table:table-cell table:formula="of:=[.D236]-[.D2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2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326388888888889" calcext:value-type="float">
            <text:p>0,00032638888888888900</text:p>
          </table:table-cell>
          <table:table-cell table:formula="of:=[.D237]-[.D236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2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327777777777778" calcext:value-type="float">
            <text:p>0,00032777777777777800</text:p>
          </table:table-cell>
          <table:table-cell table:formula="of:=[.D238]-[.D2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2" office:value-type="float" office:value="2844" calcext:value-type="float">
            <text:p>284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329166666666667" calcext:value-type="float">
            <text:p>0,00032916666666666700</text:p>
          </table:table-cell>
          <table:table-cell table:formula="of:=[.D239]-[.D2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2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330555555555556" calcext:value-type="float">
            <text:p>0,00033055555555555600</text:p>
          </table:table-cell>
          <table:table-cell table:formula="of:=[.D240]-[.D2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2" office:value-type="float" office:value="2868" calcext:value-type="float">
            <text:p>286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331944444444444" calcext:value-type="float">
            <text:p>0,00033194444444444400</text:p>
          </table:table-cell>
          <table:table-cell table:formula="of:=[.D241]-[.D2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2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333333333333333" calcext:value-type="float">
            <text:p>0,00033333333333333300</text:p>
          </table:table-cell>
          <table:table-cell table:formula="of:=[.D242]-[.D2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2" office:value-type="float" office:value="2892" calcext:value-type="float">
            <text:p>289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334722222222222" calcext:value-type="float">
            <text:p>0,00033472222222222200</text:p>
          </table:table-cell>
          <table:table-cell table:formula="of:=[.D243]-[.D242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2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336111111111111" calcext:value-type="float">
            <text:p>0,00033611111111111100</text:p>
          </table:table-cell>
          <table:table-cell table:formula="of:=[.D244]-[.D2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2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3375" calcext:value-type="float">
            <text:p>0,00033750000000000000</text:p>
          </table:table-cell>
          <table:table-cell table:formula="of:=[.D245]-[.D2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2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338888888888889" calcext:value-type="float">
            <text:p>0,00033888888888888900</text:p>
          </table:table-cell>
          <table:table-cell table:formula="of:=[.D246]-[.D2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2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340277777777778" calcext:value-type="float">
            <text:p>0,00034027777777777800</text:p>
          </table:table-cell>
          <table:table-cell table:formula="of:=[.D247]-[.D2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2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341666666666667" calcext:value-type="float">
            <text:p>0,00034166666666666700</text:p>
          </table:table-cell>
          <table:table-cell table:formula="of:=[.D248]-[.D2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2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343055555555556" calcext:value-type="float">
            <text:p>0,00034305555555555600</text:p>
          </table:table-cell>
          <table:table-cell table:formula="of:=[.D249]-[.D2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2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344444444444444" calcext:value-type="float">
            <text:p>0,00034444444444444400</text:p>
          </table:table-cell>
          <table:table-cell table:formula="of:=[.D250]-[.D249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2" office:value-type="float" office:value="2988" calcext:value-type="float">
            <text:p>298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345833333333333" calcext:value-type="float">
            <text:p>0,00034583333333333300</text:p>
          </table:table-cell>
          <table:table-cell table:formula="of:=[.D251]-[.D2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2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347222222222222" calcext:value-type="float">
            <text:p>0,00034722222222222200</text:p>
          </table:table-cell>
          <table:table-cell table:formula="of:=[.D252]-[.D2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2" office:value-type="float" office:value="3012" calcext:value-type="float">
            <text:p>301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348611111111111" calcext:value-type="float">
            <text:p>0,00034861111111111100</text:p>
          </table:table-cell>
          <table:table-cell table:formula="of:=[.D253]-[.D2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2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35" calcext:value-type="float">
            <text:p>0,00035000000000000000</text:p>
          </table:table-cell>
          <table:table-cell table:formula="of:=[.D254]-[.D2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2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351388888888889" calcext:value-type="float">
            <text:p>0,00035138888888888900</text:p>
          </table:table-cell>
          <table:table-cell table:formula="of:=[.D255]-[.D2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2" office:value-type="float" office:value="3048" calcext:value-type="float">
            <text:p>304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352777777777778" calcext:value-type="float">
            <text:p>0,00035277777777777800</text:p>
          </table:table-cell>
          <table:table-cell table:formula="of:=[.D256]-[.D255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2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354166666666667" calcext:value-type="float">
            <text:p>0,00035416666666666700</text:p>
          </table:table-cell>
          <table:table-cell table:formula="of:=[.D257]-[.D2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2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355555555555556" calcext:value-type="float">
            <text:p>0,00035555555555555600</text:p>
          </table:table-cell>
          <table:table-cell table:formula="of:=[.D258]-[.D2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2" office:value-type="float" office:value="3084" calcext:value-type="float">
            <text:p>308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356944444444444" calcext:value-type="float">
            <text:p>0,00035694444444444400</text:p>
          </table:table-cell>
          <table:table-cell table:formula="of:=[.D259]-[.D2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2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358333333333333" calcext:value-type="float">
            <text:p>0,00035833333333333300</text:p>
          </table:table-cell>
          <table:table-cell table:formula="of:=[.D260]-[.D2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2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359722222222222" calcext:value-type="float">
            <text:p>0,00035972222222222200</text:p>
          </table:table-cell>
          <table:table-cell table:formula="of:=[.D261]-[.D2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2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361111111111111" calcext:value-type="float">
            <text:p>0,00036111111111111100</text:p>
          </table:table-cell>
          <table:table-cell table:formula="of:=[.D262]-[.D2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2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3625" calcext:value-type="float">
            <text:p>0,00036250000000000000</text:p>
          </table:table-cell>
          <table:table-cell table:formula="of:=[.D263]-[.D262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2" office:value-type="float" office:value="3144" calcext:value-type="float">
            <text:p>314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363888888888889" calcext:value-type="float">
            <text:p>0,00036388888888888900</text:p>
          </table:table-cell>
          <table:table-cell table:formula="of:=[.D264]-[.D2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2" office:value-type="float" office:value="3156" calcext:value-type="float">
            <text:p>315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365277777777778" calcext:value-type="float">
            <text:p>0,00036527777777777800</text:p>
          </table:table-cell>
          <table:table-cell table:formula="of:=[.D265]-[.D2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2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366666666666667" calcext:value-type="float">
            <text:p>0,00036666666666666700</text:p>
          </table:table-cell>
          <table:table-cell table:formula="of:=[.D266]-[.D2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2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368055555555556" calcext:value-type="float">
            <text:p>0,00036805555555555600</text:p>
          </table:table-cell>
          <table:table-cell table:formula="of:=[.D267]-[.D2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2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369444444444444" calcext:value-type="float">
            <text:p>0,00036944444444444400</text:p>
          </table:table-cell>
          <table:table-cell table:formula="of:=[.D268]-[.D2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2" office:value-type="float" office:value="3204" calcext:value-type="float">
            <text:p>320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370833333333333" calcext:value-type="float">
            <text:p>0,00037083333333333300</text:p>
          </table:table-cell>
          <table:table-cell table:formula="of:=[.D269]-[.D268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2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372222222222222" calcext:value-type="float">
            <text:p>0,00037222222222222200</text:p>
          </table:table-cell>
          <table:table-cell table:formula="of:=[.D270]-[.D2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2" office:value-type="float" office:value="3228" calcext:value-type="float">
            <text:p>322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373611111111111" calcext:value-type="float">
            <text:p>0,00037361111111111100</text:p>
          </table:table-cell>
          <table:table-cell table:formula="of:=[.D271]-[.D2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2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375" calcext:value-type="float">
            <text:p>0,00037500000000000000</text:p>
          </table:table-cell>
          <table:table-cell table:formula="of:=[.D272]-[.D2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2" office:value-type="float" office:value="3252" calcext:value-type="float">
            <text:p>325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376388888888889" calcext:value-type="float">
            <text:p>0,00037638888888888900</text:p>
          </table:table-cell>
          <table:table-cell table:formula="of:=[.D273]-[.D2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2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377777777777778" calcext:value-type="float">
            <text:p>0,00037777777777777800</text:p>
          </table:table-cell>
          <table:table-cell table:formula="of:=[.D274]-[.D2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2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379166666666667" calcext:value-type="float">
            <text:p>0,00037916666666666700</text:p>
          </table:table-cell>
          <table:table-cell table:formula="of:=[.D275]-[.D2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2" office:value-type="float" office:value="3288" calcext:value-type="float">
            <text:p>328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380555555555556" calcext:value-type="float">
            <text:p>0,00038055555555555600</text:p>
          </table:table-cell>
          <table:table-cell table:formula="of:=[.D276]-[.D275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2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381944444444444" calcext:value-type="float">
            <text:p>0,00038194444444444400</text:p>
          </table:table-cell>
          <table:table-cell table:formula="of:=[.D277]-[.D2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2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383333333333333" calcext:value-type="float">
            <text:p>0,00038333333333333300</text:p>
          </table:table-cell>
          <table:table-cell table:formula="of:=[.D278]-[.D2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2" office:value-type="float" office:value="3324" calcext:value-type="float">
            <text:p>332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384722222222222" calcext:value-type="float">
            <text:p>0,00038472222222222200</text:p>
          </table:table-cell>
          <table:table-cell table:formula="of:=[.D279]-[.D2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2" office:value-type="float" office:value="3336" calcext:value-type="float">
            <text:p>333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386111111111111" calcext:value-type="float">
            <text:p>0,00038611111111111100</text:p>
          </table:table-cell>
          <table:table-cell table:formula="of:=[.D280]-[.D2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2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3875" calcext:value-type="float">
            <text:p>0,00038750000000000000</text:p>
          </table:table-cell>
          <table:table-cell table:formula="of:=[.D281]-[.D2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2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388888888888889" calcext:value-type="float">
            <text:p>0,00038888888888888900</text:p>
          </table:table-cell>
          <table:table-cell table:formula="of:=[.D282]-[.D281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2" office:value-type="float" office:value="3372" calcext:value-type="float">
            <text:p>337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390277777777778" calcext:value-type="float">
            <text:p>0,00039027777777777800</text:p>
          </table:table-cell>
          <table:table-cell table:formula="of:=[.D283]-[.D2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2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391666666666667" calcext:value-type="float">
            <text:p>0,00039166666666666700</text:p>
          </table:table-cell>
          <table:table-cell table:formula="of:=[.D284]-[.D2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2" office:value-type="float" office:value="3396" calcext:value-type="float">
            <text:p>339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393055555555556" calcext:value-type="float">
            <text:p>0,00039305555555555600</text:p>
          </table:table-cell>
          <table:table-cell table:formula="of:=[.D285]-[.D2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2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394444444444444" calcext:value-type="float">
            <text:p>0,00039444444444444500</text:p>
          </table:table-cell>
          <table:table-cell table:formula="of:=[.D286]-[.D2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2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395833333333333" calcext:value-type="float">
            <text:p>0,00039583333333333300</text:p>
          </table:table-cell>
          <table:table-cell table:formula="of:=[.D287]-[.D2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2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397222222222222" calcext:value-type="float">
            <text:p>0,00039722222222222200</text:p>
          </table:table-cell>
          <table:table-cell table:formula="of:=[.D288]-[.D2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2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398611111111111" calcext:value-type="float">
            <text:p>0,00039861111111111100</text:p>
          </table:table-cell>
          <table:table-cell table:formula="of:=[.D289]-[.D288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2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4" calcext:value-type="float">
            <text:p>0,00040000000000000000</text:p>
          </table:table-cell>
          <table:table-cell table:formula="of:=[.D290]-[.D2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2" office:value-type="float" office:value="3468" calcext:value-type="float">
            <text:p>346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401388888888889" calcext:value-type="float">
            <text:p>0,00040138888888888900</text:p>
          </table:table-cell>
          <table:table-cell table:formula="of:=[.D291]-[.D2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2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402777777777778" calcext:value-type="float">
            <text:p>0,00040277777777777800</text:p>
          </table:table-cell>
          <table:table-cell table:formula="of:=[.D292]-[.D2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2" office:value-type="float" office:value="3492" calcext:value-type="float">
            <text:p>349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404166666666667" calcext:value-type="float">
            <text:p>0,00040416666666666700</text:p>
          </table:table-cell>
          <table:table-cell table:formula="of:=[.D293]-[.D2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2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405555555555556" calcext:value-type="float">
            <text:p>0,00040555555555555600</text:p>
          </table:table-cell>
          <table:table-cell table:formula="of:=[.D294]-[.D2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2" office:value-type="float" office:value="3516" calcext:value-type="float">
            <text:p>351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406944444444444" calcext:value-type="float">
            <text:p>0,00040694444444444400</text:p>
          </table:table-cell>
          <table:table-cell table:formula="of:=[.D295]-[.D294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2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408333333333333" calcext:value-type="float">
            <text:p>0,00040833333333333300</text:p>
          </table:table-cell>
          <table:table-cell table:formula="of:=[.D296]-[.D2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2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409722222222222" calcext:value-type="float">
            <text:p>0,00040972222222222200</text:p>
          </table:table-cell>
          <table:table-cell table:formula="of:=[.D297]-[.D2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2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411111111111111" calcext:value-type="float">
            <text:p>0,00041111111111111100</text:p>
          </table:table-cell>
          <table:table-cell table:formula="of:=[.D298]-[.D2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2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4125" calcext:value-type="float">
            <text:p>0,00041250000000000000</text:p>
          </table:table-cell>
          <table:table-cell table:formula="of:=[.D299]-[.D2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2" office:value-type="float" office:value="3576" calcext:value-type="float">
            <text:p>357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413888888888889" calcext:value-type="float">
            <text:p>0,00041388888888888900</text:p>
          </table:table-cell>
          <table:table-cell table:formula="of:=[.D300]-[.D2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2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415277777777778" calcext:value-type="float">
            <text:p>0,00041527777777777800</text:p>
          </table:table-cell>
          <table:table-cell table:formula="of:=[.D301]-[.D300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2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416666666666667" calcext:value-type="float">
            <text:p>0,00041666666666666700</text:p>
          </table:table-cell>
          <table:table-cell table:formula="of:=[.D302]-[.D3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2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418055555555556" calcext:value-type="float">
            <text:p>0,00041805555555555600</text:p>
          </table:table-cell>
          <table:table-cell table:formula="of:=[.D303]-[.D3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2" office:value-type="float" office:value="3624" calcext:value-type="float">
            <text:p>362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419444444444444" calcext:value-type="float">
            <text:p>0,00041944444444444400</text:p>
          </table:table-cell>
          <table:table-cell table:formula="of:=[.D304]-[.D3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2" office:value-type="float" office:value="3636" calcext:value-type="float">
            <text:p>363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420833333333333" calcext:value-type="float">
            <text:p>0,00042083333333333300</text:p>
          </table:table-cell>
          <table:table-cell table:formula="of:=[.D305]-[.D3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2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422222222222222" calcext:value-type="float">
            <text:p>0,00042222222222222200</text:p>
          </table:table-cell>
          <table:table-cell table:formula="of:=[.D306]-[.D3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2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423611111111111" calcext:value-type="float">
            <text:p>0,00042361111111111100</text:p>
          </table:table-cell>
          <table:table-cell table:formula="of:=[.D307]-[.D3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2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425" calcext:value-type="float">
            <text:p>0,00042500000000000000</text:p>
          </table:table-cell>
          <table:table-cell table:formula="of:=[.D308]-[.D307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2" office:value-type="float" office:value="3684" calcext:value-type="float">
            <text:p>368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426388888888889" calcext:value-type="float">
            <text:p>0,00042638888888888900</text:p>
          </table:table-cell>
          <table:table-cell table:formula="of:=[.D309]-[.D3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2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427777777777778" calcext:value-type="float">
            <text:p>0,00042777777777777800</text:p>
          </table:table-cell>
          <table:table-cell table:formula="of:=[.D310]-[.D3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2" office:value-type="float" office:value="3708" calcext:value-type="float">
            <text:p>370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429166666666667" calcext:value-type="float">
            <text:p>0,00042916666666666700</text:p>
          </table:table-cell>
          <table:table-cell table:formula="of:=[.D311]-[.D3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2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430555555555556" calcext:value-type="float">
            <text:p>0,00043055555555555600</text:p>
          </table:table-cell>
          <table:table-cell table:formula="of:=[.D312]-[.D3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2" office:value-type="float" office:value="3732" calcext:value-type="float">
            <text:p>373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431944444444444" calcext:value-type="float">
            <text:p>0,00043194444444444400</text:p>
          </table:table-cell>
          <table:table-cell table:formula="of:=[.D313]-[.D3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2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433333333333333" calcext:value-type="float">
            <text:p>0,00043333333333333300</text:p>
          </table:table-cell>
          <table:table-cell table:formula="of:=[.D314]-[.D313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2" office:value-type="float" office:value="3756" calcext:value-type="float">
            <text:p>375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434722222222222" calcext:value-type="float">
            <text:p>0,00043472222222222200</text:p>
          </table:table-cell>
          <table:table-cell table:formula="of:=[.D315]-[.D3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2" office:value-type="float" office:value="3768" calcext:value-type="float">
            <text:p>376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436111111111111" calcext:value-type="float">
            <text:p>0,00043611111111111100</text:p>
          </table:table-cell>
          <table:table-cell table:formula="of:=[.D316]-[.D3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2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4375" calcext:value-type="float">
            <text:p>0,00043750000000000000</text:p>
          </table:table-cell>
          <table:table-cell table:formula="of:=[.D317]-[.D3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2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438888888888889" calcext:value-type="float">
            <text:p>0,00043888888888888900</text:p>
          </table:table-cell>
          <table:table-cell table:formula="of:=[.D318]-[.D3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2" office:value-type="float" office:value="3804" calcext:value-type="float">
            <text:p>380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440277777777778" calcext:value-type="float">
            <text:p>0,00044027777777777800</text:p>
          </table:table-cell>
          <table:table-cell table:formula="of:=[.D319]-[.D3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2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441666666666667" calcext:value-type="float">
            <text:p>0,00044166666666666700</text:p>
          </table:table-cell>
          <table:table-cell table:formula="of:=[.D320]-[.D3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2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443055555555556" calcext:value-type="float">
            <text:p>0,00044305555555555600</text:p>
          </table:table-cell>
          <table:table-cell table:formula="of:=[.D321]-[.D320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2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444444444444444" calcext:value-type="float">
            <text:p>0,00044444444444444400</text:p>
          </table:table-cell>
          <table:table-cell table:formula="of:=[.D322]-[.D3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2" office:value-type="float" office:value="3852" calcext:value-type="float">
            <text:p>385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445833333333333" calcext:value-type="float">
            <text:p>0,00044583333333333300</text:p>
          </table:table-cell>
          <table:table-cell table:formula="of:=[.D323]-[.D3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2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447222222222222" calcext:value-type="float">
            <text:p>0,00044722222222222200</text:p>
          </table:table-cell>
          <table:table-cell table:formula="of:=[.D324]-[.D3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2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448611111111111" calcext:value-type="float">
            <text:p>0,00044861111111111100</text:p>
          </table:table-cell>
          <table:table-cell table:formula="of:=[.D325]-[.D3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2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45" calcext:value-type="float">
            <text:p>0,00045000000000000000</text:p>
          </table:table-cell>
          <table:table-cell table:formula="of:=[.D326]-[.D3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2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451388888888889" calcext:value-type="float">
            <text:p>0,00045138888888888900</text:p>
          </table:table-cell>
          <table:table-cell table:formula="of:=[.D327]-[.D326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2" office:value-type="float" office:value="3912" calcext:value-type="float">
            <text:p>391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452777777777778" calcext:value-type="float">
            <text:p>0,00045277777777777800</text:p>
          </table:table-cell>
          <table:table-cell table:formula="of:=[.D328]-[.D3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2" office:value-type="float" office:value="3924" calcext:value-type="float">
            <text:p>392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454166666666667" calcext:value-type="float">
            <text:p>0,00045416666666666700</text:p>
          </table:table-cell>
          <table:table-cell table:formula="of:=[.D329]-[.D3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2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455555555555556" calcext:value-type="float">
            <text:p>0,00045555555555555600</text:p>
          </table:table-cell>
          <table:table-cell table:formula="of:=[.D330]-[.D3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2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456944444444444" calcext:value-type="float">
            <text:p>0,00045694444444444500</text:p>
          </table:table-cell>
          <table:table-cell table:formula="of:=[.D331]-[.D3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2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458333333333333" calcext:value-type="float">
            <text:p>0,00045833333333333300</text:p>
          </table:table-cell>
          <table:table-cell table:formula="of:=[.D332]-[.D3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2" office:value-type="float" office:value="3972" calcext:value-type="float">
            <text:p>397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459722222222222" calcext:value-type="float">
            <text:p>0,00045972222222222200</text:p>
          </table:table-cell>
          <table:table-cell table:formula="of:=[.D333]-[.D3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2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461111111111111" calcext:value-type="float">
            <text:p>0,00046111111111111100</text:p>
          </table:table-cell>
          <table:table-cell table:formula="of:=[.D334]-[.D333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2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4625" calcext:value-type="float">
            <text:p>0,00046250000000000000</text:p>
          </table:table-cell>
          <table:table-cell table:formula="of:=[.D335]-[.D3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2" office:value-type="float" office:value="4008" calcext:value-type="float">
            <text:p>400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463888888888889" calcext:value-type="float">
            <text:p>0,00046388888888888900</text:p>
          </table:table-cell>
          <table:table-cell table:formula="of:=[.D336]-[.D3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2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465277777777778" calcext:value-type="float">
            <text:p>0,00046527777777777800</text:p>
          </table:table-cell>
          <table:table-cell table:formula="of:=[.D337]-[.D3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2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466666666666667" calcext:value-type="float">
            <text:p>0,00046666666666666700</text:p>
          </table:table-cell>
          <table:table-cell table:formula="of:=[.D338]-[.D3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2" office:value-type="float" office:value="4044" calcext:value-type="float">
            <text:p>404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468055555555556" calcext:value-type="float">
            <text:p>0,00046805555555555600</text:p>
          </table:table-cell>
          <table:table-cell table:formula="of:=[.D339]-[.D3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2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469444444444444" calcext:value-type="float">
            <text:p>0,00046944444444444400</text:p>
          </table:table-cell>
          <table:table-cell table:formula="of:=[.D340]-[.D339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2" office:value-type="float" office:value="4068" calcext:value-type="float">
            <text:p>406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470833333333333" calcext:value-type="float">
            <text:p>0,00047083333333333300</text:p>
          </table:table-cell>
          <table:table-cell table:formula="of:=[.D341]-[.D3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2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472222222222222" calcext:value-type="float">
            <text:p>0,00047222222222222200</text:p>
          </table:table-cell>
          <table:table-cell table:formula="of:=[.D342]-[.D3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2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473611111111111" calcext:value-type="float">
            <text:p>0,00047361111111111100</text:p>
          </table:table-cell>
          <table:table-cell table:formula="of:=[.D343]-[.D3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2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475" calcext:value-type="float">
            <text:p>0,00047500000000000000</text:p>
          </table:table-cell>
          <table:table-cell table:formula="of:=[.D344]-[.D3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2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476388888888889" calcext:value-type="float">
            <text:p>0,00047638888888888900</text:p>
          </table:table-cell>
          <table:table-cell table:formula="of:=[.D345]-[.D3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2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477777777777778" calcext:value-type="float">
            <text:p>0,00047777777777777800</text:p>
          </table:table-cell>
          <table:table-cell table:formula="of:=[.D346]-[.D3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2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479166666666667" calcext:value-type="float">
            <text:p>0,00047916666666666700</text:p>
          </table:table-cell>
          <table:table-cell table:formula="of:=[.D347]-[.D346]" office:value-type="float" office:value="0.00000138888888888893" calcext:value-type="float">
            <text:p>0,0000013888888888889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2" office:value-type="float" office:value="4152" calcext:value-type="float">
            <text:p>415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480555555555556" calcext:value-type="float">
            <text:p>0,00048055555555555600</text:p>
          </table:table-cell>
          <table:table-cell table:formula="of:=[.D348]-[.D3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2" office:value-type="float" office:value="4164" calcext:value-type="float">
            <text:p>416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481944444444444" calcext:value-type="float">
            <text:p>0,00048194444444444400</text:p>
          </table:table-cell>
          <table:table-cell table:formula="of:=[.D349]-[.D3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2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483333333333333" calcext:value-type="float">
            <text:p>0,00048333333333333300</text:p>
          </table:table-cell>
          <table:table-cell table:formula="of:=[.D350]-[.D3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2" office:value-type="float" office:value="4188" calcext:value-type="float">
            <text:p>418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484722222222222" calcext:value-type="float">
            <text:p>0,00048472222222222200</text:p>
          </table:table-cell>
          <table:table-cell table:formula="of:=[.D351]-[.D3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2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486111111111111" calcext:value-type="float">
            <text:p>0,00048611111111111100</text:p>
          </table:table-cell>
          <table:table-cell table:formula="of:=[.D352]-[.D3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2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4875" calcext:value-type="float">
            <text:p>0,00048750000000000000</text:p>
          </table:table-cell>
          <table:table-cell table:formula="of:=[.D353]-[.D3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2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488888888888889" calcext:value-type="float">
            <text:p>0,00048888888888888900</text:p>
          </table:table-cell>
          <table:table-cell table:formula="of:=[.D354]-[.D3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2" office:value-type="float" office:value="4236" calcext:value-type="float">
            <text:p>423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490277777777778" calcext:value-type="float">
            <text:p>0,00049027777777777800</text:p>
          </table:table-cell>
          <table:table-cell table:formula="of:=[.D355]-[.D3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2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491666666666667" calcext:value-type="float">
            <text:p>0,00049166666666666700</text:p>
          </table:table-cell>
          <table:table-cell table:formula="of:=[.D356]-[.D355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2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493055555555556" calcext:value-type="float">
            <text:p>0,00049305555555555600</text:p>
          </table:table-cell>
          <table:table-cell table:formula="of:=[.D357]-[.D3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2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494444444444445" calcext:value-type="float">
            <text:p>0,00049444444444444500</text:p>
          </table:table-cell>
          <table:table-cell table:formula="of:=[.D358]-[.D3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2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495833333333333" calcext:value-type="float">
            <text:p>0,00049583333333333300</text:p>
          </table:table-cell>
          <table:table-cell table:formula="of:=[.D359]-[.D3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2" office:value-type="float" office:value="4296" calcext:value-type="float">
            <text:p>429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497222222222222" calcext:value-type="float">
            <text:p>0,00049722222222222200</text:p>
          </table:table-cell>
          <table:table-cell table:formula="of:=[.D360]-[.D3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2" office:value-type="float" office:value="4308" calcext:value-type="float">
            <text:p>430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498611111111111" calcext:value-type="float">
            <text:p>0,00049861111111111100</text:p>
          </table:table-cell>
          <table:table-cell table:formula="of:=[.D361]-[.D3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2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5" calcext:value-type="float">
            <text:p>0,00050000000000000000</text:p>
          </table:table-cell>
          <table:table-cell table:formula="of:=[.D362]-[.D3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2" office:value-type="float" office:value="4332" calcext:value-type="float">
            <text:p>433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501388888888889" calcext:value-type="float">
            <text:p>0,00050138888888888900</text:p>
          </table:table-cell>
          <table:table-cell table:formula="of:=[.D363]-[.D3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2" office:value-type="float" office:value="4344" calcext:value-type="float">
            <text:p>434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502777777777778" calcext:value-type="float">
            <text:p>0,00050277777777777800</text:p>
          </table:table-cell>
          <table:table-cell table:formula="of:=[.D364]-[.D3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2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504166666666667" calcext:value-type="float">
            <text:p>0,00050416666666666700</text:p>
          </table:table-cell>
          <table:table-cell table:formula="of:=[.D365]-[.D3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2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505555555555556" calcext:value-type="float">
            <text:p>0,00050555555555555600</text:p>
          </table:table-cell>
          <table:table-cell table:formula="of:=[.D366]-[.D3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2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506944444444444" calcext:value-type="float">
            <text:p>0,00050694444444444400</text:p>
          </table:table-cell>
          <table:table-cell table:formula="of:=[.D367]-[.D3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2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508333333333333" calcext:value-type="float">
            <text:p>0,00050833333333333300</text:p>
          </table:table-cell>
          <table:table-cell table:formula="of:=[.D368]-[.D3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2" office:value-type="float" office:value="4404" calcext:value-type="float">
            <text:p>440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509722222222222" calcext:value-type="float">
            <text:p>0,00050972222222222200</text:p>
          </table:table-cell>
          <table:table-cell table:formula="of:=[.D369]-[.D368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2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511111111111111" calcext:value-type="float">
            <text:p>0,00051111111111111100</text:p>
          </table:table-cell>
          <table:table-cell table:formula="of:=[.D370]-[.D3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2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5125" calcext:value-type="float">
            <text:p>0,00051250000000000000</text:p>
          </table:table-cell>
          <table:table-cell table:formula="of:=[.D371]-[.D3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2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513888888888889" calcext:value-type="float">
            <text:p>0,00051388888888888900</text:p>
          </table:table-cell>
          <table:table-cell table:formula="of:=[.D372]-[.D3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2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515277777777778" calcext:value-type="float">
            <text:p>0,00051527777777777800</text:p>
          </table:table-cell>
          <table:table-cell table:formula="of:=[.D373]-[.D3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2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516666666666667" calcext:value-type="float">
            <text:p>0,00051666666666666700</text:p>
          </table:table-cell>
          <table:table-cell table:formula="of:=[.D374]-[.D3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2" office:value-type="float" office:value="4476" calcext:value-type="float">
            <text:p>447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518055555555556" calcext:value-type="float">
            <text:p>0,00051805555555555600</text:p>
          </table:table-cell>
          <table:table-cell table:formula="of:=[.D375]-[.D3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2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519444444444444" calcext:value-type="float">
            <text:p>0,00051944444444444400</text:p>
          </table:table-cell>
          <table:table-cell table:formula="of:=[.D376]-[.D3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2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520833333333333" calcext:value-type="float">
            <text:p>0,00052083333333333300</text:p>
          </table:table-cell>
          <table:table-cell table:formula="of:=[.D377]-[.D3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2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522222222222222" calcext:value-type="float">
            <text:p>0,00052222222222222200</text:p>
          </table:table-cell>
          <table:table-cell table:formula="of:=[.D378]-[.D3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2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523611111111111" calcext:value-type="float">
            <text:p>0,00052361111111111100</text:p>
          </table:table-cell>
          <table:table-cell table:formula="of:=[.D379]-[.D3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2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525" calcext:value-type="float">
            <text:p>0,00052500000000000000</text:p>
          </table:table-cell>
          <table:table-cell table:formula="of:=[.D380]-[.D3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2" office:value-type="float" office:value="4548" calcext:value-type="float">
            <text:p>454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526388888888889" calcext:value-type="float">
            <text:p>0,00052638888888888900</text:p>
          </table:table-cell>
          <table:table-cell table:formula="of:=[.D381]-[.D3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2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527777777777778" calcext:value-type="float">
            <text:p>0,00052777777777777800</text:p>
          </table:table-cell>
          <table:table-cell table:formula="of:=[.D382]-[.D381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2" office:value-type="float" office:value="4572" calcext:value-type="float">
            <text:p>457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529166666666667" calcext:value-type="float">
            <text:p>0,00052916666666666700</text:p>
          </table:table-cell>
          <table:table-cell table:formula="of:=[.D383]-[.D3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2" office:value-type="float" office:value="4584" calcext:value-type="float">
            <text:p>458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530555555555556" calcext:value-type="float">
            <text:p>0,00053055555555555600</text:p>
          </table:table-cell>
          <table:table-cell table:formula="of:=[.D384]-[.D3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2" office:value-type="float" office:value="4596" calcext:value-type="float">
            <text:p>459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531944444444445" calcext:value-type="float">
            <text:p>0,00053194444444444500</text:p>
          </table:table-cell>
          <table:table-cell table:formula="of:=[.D385]-[.D3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2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533333333333333" calcext:value-type="float">
            <text:p>0,00053333333333333300</text:p>
          </table:table-cell>
          <table:table-cell table:formula="of:=[.D386]-[.D3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2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534722222222222" calcext:value-type="float">
            <text:p>0,00053472222222222200</text:p>
          </table:table-cell>
          <table:table-cell table:formula="of:=[.D387]-[.D3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2" office:value-type="float" office:value="4632" calcext:value-type="float">
            <text:p>463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536111111111111" calcext:value-type="float">
            <text:p>0,00053611111111111100</text:p>
          </table:table-cell>
          <table:table-cell table:formula="of:=[.D388]-[.D3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2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5375" calcext:value-type="float">
            <text:p>0,00053750000000000000</text:p>
          </table:table-cell>
          <table:table-cell table:formula="of:=[.D389]-[.D3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2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538888888888889" calcext:value-type="float">
            <text:p>0,00053888888888888900</text:p>
          </table:table-cell>
          <table:table-cell table:formula="of:=[.D390]-[.D3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2" office:value-type="float" office:value="4668" calcext:value-type="float">
            <text:p>4668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540277777777778" calcext:value-type="float">
            <text:p>0,00054027777777777800</text:p>
          </table:table-cell>
          <table:table-cell table:formula="of:=[.D391]-[.D3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2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541666666666667" calcext:value-type="float">
            <text:p>0,00054166666666666700</text:p>
          </table:table-cell>
          <table:table-cell table:formula="of:=[.D392]-[.D3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2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543055555555556" calcext:value-type="float">
            <text:p>0,00054305555555555600</text:p>
          </table:table-cell>
          <table:table-cell table:formula="of:=[.D393]-[.D3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2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544444444444444" calcext:value-type="float">
            <text:p>0,00054444444444444400</text:p>
          </table:table-cell>
          <table:table-cell table:formula="of:=[.D394]-[.D3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2" office:value-type="float" office:value="4716" calcext:value-type="float">
            <text:p>4716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545833333333333" calcext:value-type="float">
            <text:p>0,00054583333333333300</text:p>
          </table:table-cell>
          <table:table-cell table:formula="of:=[.D395]-[.D394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2" office:value-type="float" office:value="4728" calcext:value-type="float">
            <text:p>472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547222222222222" calcext:value-type="float">
            <text:p>0,00054722222222222200</text:p>
          </table:table-cell>
          <table:table-cell table:formula="of:=[.D396]-[.D3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2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548611111111111" calcext:value-type="float">
            <text:p>0,00054861111111111100</text:p>
          </table:table-cell>
          <table:table-cell table:formula="of:=[.D397]-[.D3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2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55" calcext:value-type="float">
            <text:p>0,00055000000000000000</text:p>
          </table:table-cell>
          <table:table-cell table:formula="of:=[.D398]-[.D3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2" office:value-type="float" office:value="4764" calcext:value-type="float">
            <text:p>4764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551388888888889" calcext:value-type="float">
            <text:p>0,00055138888888888900</text:p>
          </table:table-cell>
          <table:table-cell table:formula="of:=[.D399]-[.D3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2" office:value-type="float" office:value="4776" calcext:value-type="float">
            <text:p>477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552777777777778" calcext:value-type="float">
            <text:p>0,00055277777777777800</text:p>
          </table:table-cell>
          <table:table-cell table:formula="of:=[.D400]-[.D3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2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554166666666667" calcext:value-type="float">
            <text:p>0,00055416666666666700</text:p>
          </table:table-cell>
          <table:table-cell table:formula="of:=[.D401]-[.D4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2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555555555555556" calcext:value-type="float">
            <text:p>0,00055555555555555600</text:p>
          </table:table-cell>
          <table:table-cell table:formula="of:=[.D402]-[.D4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2" office:value-type="float" office:value="4812" calcext:value-type="float">
            <text:p>4812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556944444444444" calcext:value-type="float">
            <text:p>0,00055694444444444400</text:p>
          </table:table-cell>
          <table:table-cell table:formula="of:=[.D403]-[.D4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2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558333333333333" calcext:value-type="float">
            <text:p>0,00055833333333333300</text:p>
          </table:table-cell>
          <table:table-cell table:formula="of:=[.D404]-[.D4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2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559722222222222" calcext:value-type="float">
            <text:p>0,00055972222222222200</text:p>
          </table:table-cell>
          <table:table-cell table:formula="of:=[.D405]-[.D4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2" office:value-type="float" office:value="4848" calcext:value-type="float">
            <text:p>484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561111111111111" calcext:value-type="float">
            <text:p>0,00056111111111111100</text:p>
          </table:table-cell>
          <table:table-cell table:formula="of:=[.D406]-[.D4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2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5625" calcext:value-type="float">
            <text:p>0,00056250000000000000</text:p>
          </table:table-cell>
          <table:table-cell table:formula="of:=[.D407]-[.D4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2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563888888888889" calcext:value-type="float">
            <text:p>0,00056388888888888900</text:p>
          </table:table-cell>
          <table:table-cell table:formula="of:=[.D408]-[.D407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2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565277777777778" calcext:value-type="float">
            <text:p>0,00056527777777777800</text:p>
          </table:table-cell>
          <table:table-cell table:formula="of:=[.D409]-[.D4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2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566666666666667" calcext:value-type="float">
            <text:p>0,00056666666666666700</text:p>
          </table:table-cell>
          <table:table-cell table:formula="of:=[.D410]-[.D4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2" office:value-type="float" office:value="4908" calcext:value-type="float">
            <text:p>4908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568055555555556" calcext:value-type="float">
            <text:p>0,00056805555555555600</text:p>
          </table:table-cell>
          <table:table-cell table:formula="of:=[.D411]-[.D4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2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569444444444445" calcext:value-type="float">
            <text:p>0,00056944444444444500</text:p>
          </table:table-cell>
          <table:table-cell table:formula="of:=[.D412]-[.D4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2" office:value-type="float" office:value="4932" calcext:value-type="float">
            <text:p>4932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570833333333333" calcext:value-type="float">
            <text:p>0,00057083333333333300</text:p>
          </table:table-cell>
          <table:table-cell table:formula="of:=[.D413]-[.D4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2" office:value-type="float" office:value="4944" calcext:value-type="float">
            <text:p>494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572222222222222" calcext:value-type="float">
            <text:p>0,00057222222222222200</text:p>
          </table:table-cell>
          <table:table-cell table:formula="of:=[.D414]-[.D4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2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573611111111111" calcext:value-type="float">
            <text:p>0,00057361111111111100</text:p>
          </table:table-cell>
          <table:table-cell table:formula="of:=[.D415]-[.D4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2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575" calcext:value-type="float">
            <text:p>0,00057500000000000000</text:p>
          </table:table-cell>
          <table:table-cell table:formula="of:=[.D416]-[.D4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2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576388888888889" calcext:value-type="float">
            <text:p>0,00057638888888888900</text:p>
          </table:table-cell>
          <table:table-cell table:formula="of:=[.D417]-[.D4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2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577777777777778" calcext:value-type="float">
            <text:p>0,00057777777777777800</text:p>
          </table:table-cell>
          <table:table-cell table:formula="of:=[.D418]-[.D4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2" office:value-type="float" office:value="5004" calcext:value-type="float">
            <text:p>5004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579166666666667" calcext:value-type="float">
            <text:p>0,00057916666666666700</text:p>
          </table:table-cell>
          <table:table-cell table:formula="of:=[.D419]-[.D4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2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580555555555556" calcext:value-type="float">
            <text:p>0,00058055555555555600</text:p>
          </table:table-cell>
          <table:table-cell table:formula="of:=[.D420]-[.D4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2" office:value-type="float" office:value="5028" calcext:value-type="float">
            <text:p>5028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581944444444444" calcext:value-type="float">
            <text:p>0,00058194444444444400</text:p>
          </table:table-cell>
          <table:table-cell table:formula="of:=[.D421]-[.D420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2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583333333333333" calcext:value-type="float">
            <text:p>0,00058333333333333300</text:p>
          </table:table-cell>
          <table:table-cell table:formula="of:=[.D422]-[.D4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2" office:value-type="float" office:value="5052" calcext:value-type="float">
            <text:p>5052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584722222222222" calcext:value-type="float">
            <text:p>0,00058472222222222200</text:p>
          </table:table-cell>
          <table:table-cell table:formula="of:=[.D423]-[.D4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2" office:value-type="float" office:value="5064" calcext:value-type="float">
            <text:p>506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586111111111111" calcext:value-type="float">
            <text:p>0,00058611111111111100</text:p>
          </table:table-cell>
          <table:table-cell table:formula="of:=[.D424]-[.D4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2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5875" calcext:value-type="float">
            <text:p>0,00058750000000000000</text:p>
          </table:table-cell>
          <table:table-cell table:formula="of:=[.D425]-[.D4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2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588888888888889" calcext:value-type="float">
            <text:p>0,00058888888888888900</text:p>
          </table:table-cell>
          <table:table-cell table:formula="of:=[.D426]-[.D4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2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590277777777778" calcext:value-type="float">
            <text:p>0,00059027777777777800</text:p>
          </table:table-cell>
          <table:table-cell table:formula="of:=[.D427]-[.D4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2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591666666666667" calcext:value-type="float">
            <text:p>0,00059166666666666700</text:p>
          </table:table-cell>
          <table:table-cell table:formula="of:=[.D428]-[.D4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2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593055555555556" calcext:value-type="float">
            <text:p>0,00059305555555555600</text:p>
          </table:table-cell>
          <table:table-cell table:formula="of:=[.D429]-[.D4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2" office:value-type="float" office:value="5136" calcext:value-type="float">
            <text:p>513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594444444444444" calcext:value-type="float">
            <text:p>0,00059444444444444400</text:p>
          </table:table-cell>
          <table:table-cell table:formula="of:=[.D430]-[.D4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2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595833333333333" calcext:value-type="float">
            <text:p>0,00059583333333333300</text:p>
          </table:table-cell>
          <table:table-cell table:formula="of:=[.D431]-[.D4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2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597222222222222" calcext:value-type="float">
            <text:p>0,00059722222222222200</text:p>
          </table:table-cell>
          <table:table-cell table:formula="of:=[.D432]-[.D4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2" office:value-type="float" office:value="5172" calcext:value-type="float">
            <text:p>5172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598611111111111" calcext:value-type="float">
            <text:p>0,00059861111111111100</text:p>
          </table:table-cell>
          <table:table-cell table:formula="of:=[.D433]-[.D4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2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6" calcext:value-type="float">
            <text:p>0,00060000000000000000</text:p>
          </table:table-cell>
          <table:table-cell table:formula="of:=[.D434]-[.D433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2" office:value-type="float" office:value="5196" calcext:value-type="float">
            <text:p>5196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601388888888889" calcext:value-type="float">
            <text:p>0,00060138888888888900</text:p>
          </table:table-cell>
          <table:table-cell table:formula="of:=[.D435]-[.D4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2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602777777777778" calcext:value-type="float">
            <text:p>0,00060277777777777800</text:p>
          </table:table-cell>
          <table:table-cell table:formula="of:=[.D436]-[.D4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2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604166666666667" calcext:value-type="float">
            <text:p>0,00060416666666666700</text:p>
          </table:table-cell>
          <table:table-cell table:formula="of:=[.D437]-[.D4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2" office:value-type="float" office:value="5232" calcext:value-type="float">
            <text:p>523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605555555555556" calcext:value-type="float">
            <text:p>0,00060555555555555600</text:p>
          </table:table-cell>
          <table:table-cell table:formula="of:=[.D438]-[.D4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2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606944444444445" calcext:value-type="float">
            <text:p>0,00060694444444444500</text:p>
          </table:table-cell>
          <table:table-cell table:formula="of:=[.D439]-[.D4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2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608333333333333" calcext:value-type="float">
            <text:p>0,00060833333333333300</text:p>
          </table:table-cell>
          <table:table-cell table:formula="of:=[.D440]-[.D4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2" office:value-type="float" office:value="5268" calcext:value-type="float">
            <text:p>5268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609722222222222" calcext:value-type="float">
            <text:p>0,00060972222222222200</text:p>
          </table:table-cell>
          <table:table-cell table:formula="of:=[.D441]-[.D4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2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611111111111111" calcext:value-type="float">
            <text:p>0,00061111111111111100</text:p>
          </table:table-cell>
          <table:table-cell table:formula="of:=[.D442]-[.D4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2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6125" calcext:value-type="float">
            <text:p>0,00061250000000000000</text:p>
          </table:table-cell>
          <table:table-cell table:formula="of:=[.D443]-[.D4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2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613888888888889" calcext:value-type="float">
            <text:p>0,00061388888888888900</text:p>
          </table:table-cell>
          <table:table-cell table:formula="of:=[.D444]-[.D4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2" office:value-type="float" office:value="5316" calcext:value-type="float">
            <text:p>5316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615277777777778" calcext:value-type="float">
            <text:p>0,00061527777777777800</text:p>
          </table:table-cell>
          <table:table-cell table:formula="of:=[.D445]-[.D4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2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616666666666667" calcext:value-type="float">
            <text:p>0,00061666666666666700</text:p>
          </table:table-cell>
          <table:table-cell table:formula="of:=[.D446]-[.D4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2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618055555555556" calcext:value-type="float">
            <text:p>0,00061805555555555600</text:p>
          </table:table-cell>
          <table:table-cell table:formula="of:=[.D447]-[.D446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2" office:value-type="float" office:value="5352" calcext:value-type="float">
            <text:p>535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619444444444445" calcext:value-type="float">
            <text:p>0,00061944444444444500</text:p>
          </table:table-cell>
          <table:table-cell table:formula="of:=[.D448]-[.D4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2" office:value-type="float" office:value="5364" calcext:value-type="float">
            <text:p>5364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620833333333333" calcext:value-type="float">
            <text:p>0,00062083333333333300</text:p>
          </table:table-cell>
          <table:table-cell table:formula="of:=[.D449]-[.D4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2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622222222222222" calcext:value-type="float">
            <text:p>0,00062222222222222200</text:p>
          </table:table-cell>
          <table:table-cell table:formula="of:=[.D450]-[.D4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2" office:value-type="float" office:value="5388" calcext:value-type="float">
            <text:p>5388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623611111111111" calcext:value-type="float">
            <text:p>0,00062361111111111100</text:p>
          </table:table-cell>
          <table:table-cell table:formula="of:=[.D451]-[.D4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2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625" calcext:value-type="float">
            <text:p>0,00062500000000000000</text:p>
          </table:table-cell>
          <table:table-cell table:formula="of:=[.D452]-[.D4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2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626388888888889" calcext:value-type="float">
            <text:p>0,00062638888888888900</text:p>
          </table:table-cell>
          <table:table-cell table:formula="of:=[.D453]-[.D4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2" office:value-type="float" office:value="5424" calcext:value-type="float">
            <text:p>542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627777777777778" calcext:value-type="float">
            <text:p>0,00062777777777777800</text:p>
          </table:table-cell>
          <table:table-cell table:formula="of:=[.D454]-[.D4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2" office:value-type="float" office:value="5436" calcext:value-type="float">
            <text:p>5436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629166666666667" calcext:value-type="float">
            <text:p>0,00062916666666666700</text:p>
          </table:table-cell>
          <table:table-cell table:formula="of:=[.D455]-[.D4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2" office:value-type="float" office:value="5448" calcext:value-type="float">
            <text:p>544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630555555555556" calcext:value-type="float">
            <text:p>0,00063055555555555600</text:p>
          </table:table-cell>
          <table:table-cell table:formula="of:=[.D456]-[.D4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2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631944444444444" calcext:value-type="float">
            <text:p>0,00063194444444444400</text:p>
          </table:table-cell>
          <table:table-cell table:formula="of:=[.D457]-[.D4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2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633333333333333" calcext:value-type="float">
            <text:p>0,00063333333333333300</text:p>
          </table:table-cell>
          <table:table-cell table:formula="of:=[.D458]-[.D4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2" office:value-type="float" office:value="5484" calcext:value-type="float">
            <text:p>5484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634722222222222" calcext:value-type="float">
            <text:p>0,00063472222222222200</text:p>
          </table:table-cell>
          <table:table-cell table:formula="of:=[.D459]-[.D458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2" office:value-type="float" office:value="5496" calcext:value-type="float">
            <text:p>549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636111111111111" calcext:value-type="float">
            <text:p>0,00063611111111111100</text:p>
          </table:table-cell>
          <table:table-cell table:formula="of:=[.D460]-[.D4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2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6375" calcext:value-type="float">
            <text:p>0,00063750000000000000</text:p>
          </table:table-cell>
          <table:table-cell table:formula="of:=[.D461]-[.D4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2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638888888888889" calcext:value-type="float">
            <text:p>0,00063888888888888900</text:p>
          </table:table-cell>
          <table:table-cell table:formula="of:=[.D462]-[.D4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2" office:value-type="float" office:value="5532" calcext:value-type="float">
            <text:p>5532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640277777777778" calcext:value-type="float">
            <text:p>0,00064027777777777800</text:p>
          </table:table-cell>
          <table:table-cell table:formula="of:=[.D463]-[.D4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2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641666666666667" calcext:value-type="float">
            <text:p>0,00064166666666666700</text:p>
          </table:table-cell>
          <table:table-cell table:formula="of:=[.D464]-[.D4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2" office:value-type="float" office:value="5556" calcext:value-type="float">
            <text:p>5556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643055555555556" calcext:value-type="float">
            <text:p>0,00064305555555555600</text:p>
          </table:table-cell>
          <table:table-cell table:formula="of:=[.D465]-[.D4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2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644444444444444" calcext:value-type="float">
            <text:p>0,00064444444444444400</text:p>
          </table:table-cell>
          <table:table-cell table:formula="of:=[.D466]-[.D4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2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645833333333333" calcext:value-type="float">
            <text:p>0,00064583333333333300</text:p>
          </table:table-cell>
          <table:table-cell table:formula="of:=[.D467]-[.D4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2" office:value-type="float" office:value="5592" calcext:value-type="float">
            <text:p>559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647222222222222" calcext:value-type="float">
            <text:p>0,00064722222222222200</text:p>
          </table:table-cell>
          <table:table-cell table:formula="of:=[.D468]-[.D4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2" office:value-type="float" office:value="5604" calcext:value-type="float">
            <text:p>5604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648611111111111" calcext:value-type="float">
            <text:p>0,00064861111111111100</text:p>
          </table:table-cell>
          <table:table-cell table:formula="of:=[.D469]-[.D4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2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65" calcext:value-type="float">
            <text:p>0,00065000000000000000</text:p>
          </table:table-cell>
          <table:table-cell table:formula="of:=[.D470]-[.D4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2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651388888888889" calcext:value-type="float">
            <text:p>0,00065138888888888900</text:p>
          </table:table-cell>
          <table:table-cell table:formula="of:=[.D471]-[.D4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2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652777777777778" calcext:value-type="float">
            <text:p>0,00065277777777777800</text:p>
          </table:table-cell>
          <table:table-cell table:formula="of:=[.D472]-[.D471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2" office:value-type="float" office:value="5652" calcext:value-type="float">
            <text:p>5652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654166666666667" calcext:value-type="float">
            <text:p>0,00065416666666666700</text:p>
          </table:table-cell>
          <table:table-cell table:formula="of:=[.D473]-[.D4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2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655555555555556" calcext:value-type="float">
            <text:p>0,00065555555555555600</text:p>
          </table:table-cell>
          <table:table-cell table:formula="of:=[.D474]-[.D4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2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656944444444445" calcext:value-type="float">
            <text:p>0,00065694444444444500</text:p>
          </table:table-cell>
          <table:table-cell table:formula="of:=[.D475]-[.D4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2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658333333333333" calcext:value-type="float">
            <text:p>0,00065833333333333300</text:p>
          </table:table-cell>
          <table:table-cell table:formula="of:=[.D476]-[.D4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2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659722222222222" calcext:value-type="float">
            <text:p>0,00065972222222222200</text:p>
          </table:table-cell>
          <table:table-cell table:formula="of:=[.D477]-[.D4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2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661111111111111" calcext:value-type="float">
            <text:p>0,00066111111111111100</text:p>
          </table:table-cell>
          <table:table-cell table:formula="of:=[.D478]-[.D4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2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6625" calcext:value-type="float">
            <text:p>0,00066250000000000000</text:p>
          </table:table-cell>
          <table:table-cell table:formula="of:=[.D479]-[.D4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2" office:value-type="float" office:value="5736" calcext:value-type="float">
            <text:p>573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663888888888889" calcext:value-type="float">
            <text:p>0,00066388888888888900</text:p>
          </table:table-cell>
          <table:table-cell table:formula="of:=[.D480]-[.D4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2" office:value-type="float" office:value="5748" calcext:value-type="float">
            <text:p>5748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665277777777778" calcext:value-type="float">
            <text:p>0,00066527777777777800</text:p>
          </table:table-cell>
          <table:table-cell table:formula="of:=[.D481]-[.D4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2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666666666666667" calcext:value-type="float">
            <text:p>0,00066666666666666700</text:p>
          </table:table-cell>
          <table:table-cell table:formula="of:=[.D482]-[.D4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2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668055555555556" calcext:value-type="float">
            <text:p>0,00066805555555555600</text:p>
          </table:table-cell>
          <table:table-cell table:formula="of:=[.D483]-[.D4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2" office:value-type="float" office:value="5784" calcext:value-type="float">
            <text:p>578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669444444444444" calcext:value-type="float">
            <text:p>0,00066944444444444400</text:p>
          </table:table-cell>
          <table:table-cell table:formula="of:=[.D484]-[.D4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2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670833333333333" calcext:value-type="float">
            <text:p>0,00067083333333333300</text:p>
          </table:table-cell>
          <table:table-cell table:formula="of:=[.D485]-[.D484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2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672222222222222" calcext:value-type="float">
            <text:p>0,00067222222222222200</text:p>
          </table:table-cell>
          <table:table-cell table:formula="of:=[.D486]-[.D4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2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673611111111111" calcext:value-type="float">
            <text:p>0,00067361111111111100</text:p>
          </table:table-cell>
          <table:table-cell table:formula="of:=[.D487]-[.D4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2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675" calcext:value-type="float">
            <text:p>0,00067500000000000000</text:p>
          </table:table-cell>
          <table:table-cell table:formula="of:=[.D488]-[.D4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2" office:value-type="float" office:value="5844" calcext:value-type="float">
            <text:p>5844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676388888888889" calcext:value-type="float">
            <text:p>0,00067638888888888900</text:p>
          </table:table-cell>
          <table:table-cell table:formula="of:=[.D489]-[.D4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2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677777777777778" calcext:value-type="float">
            <text:p>0,00067777777777777800</text:p>
          </table:table-cell>
          <table:table-cell table:formula="of:=[.D490]-[.D4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2" office:value-type="float" office:value="5868" calcext:value-type="float">
            <text:p>5868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679166666666667" calcext:value-type="float">
            <text:p>0,00067916666666666700</text:p>
          </table:table-cell>
          <table:table-cell table:formula="of:=[.D491]-[.D4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2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680555555555556" calcext:value-type="float">
            <text:p>0,00068055555555555600</text:p>
          </table:table-cell>
          <table:table-cell table:formula="of:=[.D492]-[.D4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2" office:value-type="float" office:value="5892" calcext:value-type="float">
            <text:p>5892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681944444444444" calcext:value-type="float">
            <text:p>0,00068194444444444400</text:p>
          </table:table-cell>
          <table:table-cell table:formula="of:=[.D493]-[.D4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2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683333333333333" calcext:value-type="float">
            <text:p>0,00068333333333333300</text:p>
          </table:table-cell>
          <table:table-cell table:formula="of:=[.D494]-[.D4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2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684722222222222" calcext:value-type="float">
            <text:p>0,00068472222222222200</text:p>
          </table:table-cell>
          <table:table-cell table:formula="of:=[.D495]-[.D4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2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686111111111111" calcext:value-type="float">
            <text:p>0,00068611111111111100</text:p>
          </table:table-cell>
          <table:table-cell table:formula="of:=[.D496]-[.D4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2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6875" calcext:value-type="float">
            <text:p>0,00068750000000000000</text:p>
          </table:table-cell>
          <table:table-cell table:formula="of:=[.D497]-[.D4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2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688888888888889" calcext:value-type="float">
            <text:p>0,00068888888888888900</text:p>
          </table:table-cell>
          <table:table-cell table:formula="of:=[.D498]-[.D497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2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690277777777778" calcext:value-type="float">
            <text:p>0,00069027777777777800</text:p>
          </table:table-cell>
          <table:table-cell table:formula="of:=[.D499]-[.D4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2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691666666666667" calcext:value-type="float">
            <text:p>0,00069166666666666700</text:p>
          </table:table-cell>
          <table:table-cell table:formula="of:=[.D500]-[.D4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2" office:value-type="float" office:value="5988" calcext:value-type="float">
            <text:p>5988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693055555555556" calcext:value-type="float">
            <text:p>0,00069305555555555600</text:p>
          </table:table-cell>
          <table:table-cell table:formula="of:=[.D501]-[.D5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2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694444444444445" calcext:value-type="float">
            <text:p>0,00069444444444444500</text:p>
          </table:table-cell>
          <table:table-cell table:formula="of:=[.D502]-[.D5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2" office:value-type="float" office:value="6012" calcext:value-type="float">
            <text:p>6012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695833333333333" calcext:value-type="float">
            <text:p>0,00069583333333333300</text:p>
          </table:table-cell>
          <table:table-cell table:formula="of:=[.D503]-[.D5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2" office:value-type="float" office:value="6024" calcext:value-type="float">
            <text:p>602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697222222222222" calcext:value-type="float">
            <text:p>0,00069722222222222200</text:p>
          </table:table-cell>
          <table:table-cell table:formula="of:=[.D504]-[.D5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2" office:value-type="float" office:value="6036" calcext:value-type="float">
            <text:p>6036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698611111111111" calcext:value-type="float">
            <text:p>0,00069861111111111100</text:p>
          </table:table-cell>
          <table:table-cell table:formula="of:=[.D505]-[.D5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2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7" calcext:value-type="float">
            <text:p>0,00070000000000000000</text:p>
          </table:table-cell>
          <table:table-cell table:formula="of:=[.D506]-[.D5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2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701388888888889" calcext:value-type="float">
            <text:p>0,00070138888888888900</text:p>
          </table:table-cell>
          <table:table-cell table:formula="of:=[.D507]-[.D5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2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702777777777778" calcext:value-type="float">
            <text:p>0,00070277777777777800</text:p>
          </table:table-cell>
          <table:table-cell table:formula="of:=[.D508]-[.D5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2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704166666666667" calcext:value-type="float">
            <text:p>0,00070416666666666700</text:p>
          </table:table-cell>
          <table:table-cell table:formula="of:=[.D509]-[.D5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2" office:value-type="float" office:value="6096" calcext:value-type="float">
            <text:p>609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705555555555556" calcext:value-type="float">
            <text:p>0,00070555555555555600</text:p>
          </table:table-cell>
          <table:table-cell table:formula="of:=[.D510]-[.D5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2" office:value-type="float" office:value="6108" calcext:value-type="float">
            <text:p>6108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706944444444444" calcext:value-type="float">
            <text:p>0,00070694444444444400</text:p>
          </table:table-cell>
          <table:table-cell table:formula="of:=[.D511]-[.D510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2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708333333333333" calcext:value-type="float">
            <text:p>0,00070833333333333300</text:p>
          </table:table-cell>
          <table:table-cell table:formula="of:=[.D512]-[.D5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2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709722222222222" calcext:value-type="float">
            <text:p>0,00070972222222222200</text:p>
          </table:table-cell>
          <table:table-cell table:formula="of:=[.D513]-[.D5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2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711111111111111" calcext:value-type="float">
            <text:p>0,00071111111111111100</text:p>
          </table:table-cell>
          <table:table-cell table:formula="of:=[.D514]-[.D5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2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7125" calcext:value-type="float">
            <text:p>0,00071250000000000000</text:p>
          </table:table-cell>
          <table:table-cell table:formula="of:=[.D515]-[.D5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2" office:value-type="float" office:value="6168" calcext:value-type="float">
            <text:p>616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713888888888889" calcext:value-type="float">
            <text:p>0,00071388888888888900</text:p>
          </table:table-cell>
          <table:table-cell table:formula="of:=[.D516]-[.D5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2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715277777777778" calcext:value-type="float">
            <text:p>0,00071527777777777800</text:p>
          </table:table-cell>
          <table:table-cell table:formula="of:=[.D517]-[.D5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2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716666666666667" calcext:value-type="float">
            <text:p>0,00071666666666666700</text:p>
          </table:table-cell>
          <table:table-cell table:formula="of:=[.D518]-[.D5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2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718055555555556" calcext:value-type="float">
            <text:p>0,00071805555555555600</text:p>
          </table:table-cell>
          <table:table-cell table:formula="of:=[.D519]-[.D5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2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719444444444444" calcext:value-type="float">
            <text:p>0,00071944444444444400</text:p>
          </table:table-cell>
          <table:table-cell table:formula="of:=[.D520]-[.D5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2" office:value-type="float" office:value="6228" calcext:value-type="float">
            <text:p>6228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720833333333333" calcext:value-type="float">
            <text:p>0,00072083333333333300</text:p>
          </table:table-cell>
          <table:table-cell table:formula="of:=[.D521]-[.D5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2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722222222222222" calcext:value-type="float">
            <text:p>0,00072222222222222200</text:p>
          </table:table-cell>
          <table:table-cell table:formula="of:=[.D522]-[.D5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2" office:value-type="float" office:value="6252" calcext:value-type="float">
            <text:p>6252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723611111111111" calcext:value-type="float">
            <text:p>0,00072361111111111100</text:p>
          </table:table-cell>
          <table:table-cell table:formula="of:=[.D523]-[.D5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2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725" calcext:value-type="float">
            <text:p>0,00072500000000000000</text:p>
          </table:table-cell>
          <table:table-cell table:formula="of:=[.D524]-[.D523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2" office:value-type="float" office:value="6276" calcext:value-type="float">
            <text:p>6276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726388888888889" calcext:value-type="float">
            <text:p>0,00072638888888888900</text:p>
          </table:table-cell>
          <table:table-cell table:formula="of:=[.D525]-[.D5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2" office:value-type="float" office:value="6288" calcext:value-type="float">
            <text:p>628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727777777777778" calcext:value-type="float">
            <text:p>0,00072777777777777800</text:p>
          </table:table-cell>
          <table:table-cell table:formula="of:=[.D526]-[.D5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2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729166666666667" calcext:value-type="float">
            <text:p>0,00072916666666666700</text:p>
          </table:table-cell>
          <table:table-cell table:formula="of:=[.D527]-[.D5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2" office:value-type="float" office:value="6312" calcext:value-type="float">
            <text:p>631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730555555555556" calcext:value-type="float">
            <text:p>0,00073055555555555600</text:p>
          </table:table-cell>
          <table:table-cell table:formula="of:=[.D528]-[.D5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2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731944444444445" calcext:value-type="float">
            <text:p>0,00073194444444444500</text:p>
          </table:table-cell>
          <table:table-cell table:formula="of:=[.D529]-[.D5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2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733333333333333" calcext:value-type="float">
            <text:p>0,00073333333333333300</text:p>
          </table:table-cell>
          <table:table-cell table:formula="of:=[.D530]-[.D5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2" office:value-type="float" office:value="6348" calcext:value-type="float">
            <text:p>6348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734722222222222" calcext:value-type="float">
            <text:p>0,00073472222222222200</text:p>
          </table:table-cell>
          <table:table-cell table:formula="of:=[.D531]-[.D5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2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736111111111111" calcext:value-type="float">
            <text:p>0,00073611111111111100</text:p>
          </table:table-cell>
          <table:table-cell table:formula="of:=[.D532]-[.D5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2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7375" calcext:value-type="float">
            <text:p>0,00073750000000000000</text:p>
          </table:table-cell>
          <table:table-cell table:formula="of:=[.D533]-[.D5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2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738888888888889" calcext:value-type="float">
            <text:p>0,00073888888888888900</text:p>
          </table:table-cell>
          <table:table-cell table:formula="of:=[.D534]-[.D5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2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740277777777778" calcext:value-type="float">
            <text:p>0,00074027777777777800</text:p>
          </table:table-cell>
          <table:table-cell table:formula="of:=[.D535]-[.D5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2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741666666666667" calcext:value-type="float">
            <text:p>0,00074166666666666700</text:p>
          </table:table-cell>
          <table:table-cell table:formula="of:=[.D536]-[.D5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2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743055555555556" calcext:value-type="float">
            <text:p>0,00074305555555555600</text:p>
          </table:table-cell>
          <table:table-cell table:formula="of:=[.D537]-[.D536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2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744444444444445" calcext:value-type="float">
            <text:p>0,00074444444444444500</text:p>
          </table:table-cell>
          <table:table-cell table:formula="of:=[.D538]-[.D5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2" office:value-type="float" office:value="6444" calcext:value-type="float">
            <text:p>6444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745833333333333" calcext:value-type="float">
            <text:p>0,00074583333333333400</text:p>
          </table:table-cell>
          <table:table-cell table:formula="of:=[.D539]-[.D5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2" office:value-type="float" office:value="6456" calcext:value-type="float">
            <text:p>645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747222222222222" calcext:value-type="float">
            <text:p>0,00074722222222222200</text:p>
          </table:table-cell>
          <table:table-cell table:formula="of:=[.D540]-[.D5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2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748611111111111" calcext:value-type="float">
            <text:p>0,00074861111111111100</text:p>
          </table:table-cell>
          <table:table-cell table:formula="of:=[.D541]-[.D5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2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75" calcext:value-type="float">
            <text:p>0,00075000000000000000</text:p>
          </table:table-cell>
          <table:table-cell table:formula="of:=[.D542]-[.D5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2" office:value-type="float" office:value="6492" calcext:value-type="float">
            <text:p>6492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751388888888889" calcext:value-type="float">
            <text:p>0,00075138888888888900</text:p>
          </table:table-cell>
          <table:table-cell table:formula="of:=[.D543]-[.D5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2" office:value-type="float" office:value="6504" calcext:value-type="float">
            <text:p>650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752777777777778" calcext:value-type="float">
            <text:p>0,00075277777777777800</text:p>
          </table:table-cell>
          <table:table-cell table:formula="of:=[.D544]-[.D5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2" office:value-type="float" office:value="6516" calcext:value-type="float">
            <text:p>6516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754166666666667" calcext:value-type="float">
            <text:p>0,00075416666666666700</text:p>
          </table:table-cell>
          <table:table-cell table:formula="of:=[.D545]-[.D5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2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755555555555556" calcext:value-type="float">
            <text:p>0,00075555555555555600</text:p>
          </table:table-cell>
          <table:table-cell table:formula="of:=[.D546]-[.D5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2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756944444444444" calcext:value-type="float">
            <text:p>0,00075694444444444500</text:p>
          </table:table-cell>
          <table:table-cell table:formula="of:=[.D547]-[.D5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2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758333333333333" calcext:value-type="float">
            <text:p>0,00075833333333333300</text:p>
          </table:table-cell>
          <table:table-cell table:formula="of:=[.D548]-[.D5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2" office:value-type="float" office:value="6564" calcext:value-type="float">
            <text:p>6564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759722222222222" calcext:value-type="float">
            <text:p>0,00075972222222222200</text:p>
          </table:table-cell>
          <table:table-cell table:formula="of:=[.D549]-[.D5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2" office:value-type="float" office:value="6576" calcext:value-type="float">
            <text:p>657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761111111111111" calcext:value-type="float">
            <text:p>0,00076111111111111100</text:p>
          </table:table-cell>
          <table:table-cell table:formula="of:=[.D550]-[.D549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2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7625" calcext:value-type="float">
            <text:p>0,00076250000000000000</text:p>
          </table:table-cell>
          <table:table-cell table:formula="of:=[.D551]-[.D5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2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763888888888889" calcext:value-type="float">
            <text:p>0,00076388888888888900</text:p>
          </table:table-cell>
          <table:table-cell table:formula="of:=[.D552]-[.D5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2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765277777777778" calcext:value-type="float">
            <text:p>0,00076527777777777800</text:p>
          </table:table-cell>
          <table:table-cell table:formula="of:=[.D553]-[.D5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2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766666666666667" calcext:value-type="float">
            <text:p>0,00076666666666666700</text:p>
          </table:table-cell>
          <table:table-cell table:formula="of:=[.D554]-[.D5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2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768055555555556" calcext:value-type="float">
            <text:p>0,00076805555555555600</text:p>
          </table:table-cell>
          <table:table-cell table:formula="of:=[.D555]-[.D5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2" office:value-type="float" office:value="6648" calcext:value-type="float">
            <text:p>664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769444444444445" calcext:value-type="float">
            <text:p>0,00076944444444444500</text:p>
          </table:table-cell>
          <table:table-cell table:formula="of:=[.D556]-[.D5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2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770833333333333" calcext:value-type="float">
            <text:p>0,00077083333333333300</text:p>
          </table:table-cell>
          <table:table-cell table:formula="of:=[.D557]-[.D5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2" office:value-type="float" office:value="6672" calcext:value-type="float">
            <text:p>667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772222222222222" calcext:value-type="float">
            <text:p>0,00077222222222222200</text:p>
          </table:table-cell>
          <table:table-cell table:formula="of:=[.D558]-[.D5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2" office:value-type="float" office:value="6684" calcext:value-type="float">
            <text:p>6684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773611111111111" calcext:value-type="float">
            <text:p>0,00077361111111111100</text:p>
          </table:table-cell>
          <table:table-cell table:formula="of:=[.D559]-[.D5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2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775" calcext:value-type="float">
            <text:p>0,00077500000000000000</text:p>
          </table:table-cell>
          <table:table-cell table:formula="of:=[.D560]-[.D5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2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776388888888889" calcext:value-type="float">
            <text:p>0,00077638888888888900</text:p>
          </table:table-cell>
          <table:table-cell table:formula="of:=[.D561]-[.D5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2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777777777777778" calcext:value-type="float">
            <text:p>0,00077777777777777800</text:p>
          </table:table-cell>
          <table:table-cell table:formula="of:=[.D562]-[.D5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2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779166666666667" calcext:value-type="float">
            <text:p>0,00077916666666666700</text:p>
          </table:table-cell>
          <table:table-cell table:formula="of:=[.D563]-[.D562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2" office:value-type="float" office:value="6744" calcext:value-type="float">
            <text:p>674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780555555555556" calcext:value-type="float">
            <text:p>0,00078055555555555600</text:p>
          </table:table-cell>
          <table:table-cell table:formula="of:=[.D564]-[.D5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2" office:value-type="float" office:value="6756" calcext:value-type="float">
            <text:p>6756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781944444444445" calcext:value-type="float">
            <text:p>0,00078194444444444500</text:p>
          </table:table-cell>
          <table:table-cell table:formula="of:=[.D565]-[.D5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2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783333333333333" calcext:value-type="float">
            <text:p>0,00078333333333333400</text:p>
          </table:table-cell>
          <table:table-cell table:formula="of:=[.D566]-[.D5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2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784722222222222" calcext:value-type="float">
            <text:p>0,00078472222222222200</text:p>
          </table:table-cell>
          <table:table-cell table:formula="of:=[.D567]-[.D5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2" office:value-type="float" office:value="6792" calcext:value-type="float">
            <text:p>679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786111111111111" calcext:value-type="float">
            <text:p>0,00078611111111111100</text:p>
          </table:table-cell>
          <table:table-cell table:formula="of:=[.D568]-[.D5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2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7875" calcext:value-type="float">
            <text:p>0,00078750000000000000</text:p>
          </table:table-cell>
          <table:table-cell table:formula="of:=[.D569]-[.D5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2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788888888888889" calcext:value-type="float">
            <text:p>0,00078888888888888900</text:p>
          </table:table-cell>
          <table:table-cell table:formula="of:=[.D570]-[.D5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2" office:value-type="float" office:value="6828" calcext:value-type="float">
            <text:p>6828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790277777777778" calcext:value-type="float">
            <text:p>0,00079027777777777800</text:p>
          </table:table-cell>
          <table:table-cell table:formula="of:=[.D571]-[.D5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2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791666666666667" calcext:value-type="float">
            <text:p>0,00079166666666666700</text:p>
          </table:table-cell>
          <table:table-cell table:formula="of:=[.D572]-[.D5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2" office:value-type="float" office:value="6852" calcext:value-type="float">
            <text:p>6852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793055555555556" calcext:value-type="float">
            <text:p>0,00079305555555555600</text:p>
          </table:table-cell>
          <table:table-cell table:formula="of:=[.D573]-[.D5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2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794444444444444" calcext:value-type="float">
            <text:p>0,00079444444444444500</text:p>
          </table:table-cell>
          <table:table-cell table:formula="of:=[.D574]-[.D5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2" office:value-type="float" office:value="6876" calcext:value-type="float">
            <text:p>6876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795833333333333" calcext:value-type="float">
            <text:p>0,00079583333333333300</text:p>
          </table:table-cell>
          <table:table-cell table:formula="of:=[.D575]-[.D5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2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797222222222222" calcext:value-type="float">
            <text:p>0,00079722222222222200</text:p>
          </table:table-cell>
          <table:table-cell table:formula="of:=[.D576]-[.D575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2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798611111111111" calcext:value-type="float">
            <text:p>0,00079861111111111100</text:p>
          </table:table-cell>
          <table:table-cell table:formula="of:=[.D577]-[.D5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2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8" calcext:value-type="float">
            <text:p>0,00080000000000000000</text:p>
          </table:table-cell>
          <table:table-cell table:formula="of:=[.D578]-[.D5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2" office:value-type="float" office:value="6924" calcext:value-type="float">
            <text:p>6924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801388888888889" calcext:value-type="float">
            <text:p>0,00080138888888888900</text:p>
          </table:table-cell>
          <table:table-cell table:formula="of:=[.D579]-[.D5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2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802777777777778" calcext:value-type="float">
            <text:p>0,00080277777777777800</text:p>
          </table:table-cell>
          <table:table-cell table:formula="of:=[.D580]-[.D5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2" office:value-type="float" office:value="6948" calcext:value-type="float">
            <text:p>6948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804166666666667" calcext:value-type="float">
            <text:p>0,00080416666666666700</text:p>
          </table:table-cell>
          <table:table-cell table:formula="of:=[.D581]-[.D5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2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805555555555556" calcext:value-type="float">
            <text:p>0,00080555555555555600</text:p>
          </table:table-cell>
          <table:table-cell table:formula="of:=[.D582]-[.D5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2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806944444444444" calcext:value-type="float">
            <text:p>0,00080694444444444400</text:p>
          </table:table-cell>
          <table:table-cell table:formula="of:=[.D583]-[.D5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2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808333333333333" calcext:value-type="float">
            <text:p>0,00080833333333333300</text:p>
          </table:table-cell>
          <table:table-cell table:formula="of:=[.D584]-[.D5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2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809722222222222" calcext:value-type="float">
            <text:p>0,00080972222222222200</text:p>
          </table:table-cell>
          <table:table-cell table:formula="of:=[.D585]-[.D5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2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811111111111111" calcext:value-type="float">
            <text:p>0,00081111111111111100</text:p>
          </table:table-cell>
          <table:table-cell table:formula="of:=[.D586]-[.D5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2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8125" calcext:value-type="float">
            <text:p>0,00081250000000000000</text:p>
          </table:table-cell>
          <table:table-cell table:formula="of:=[.D587]-[.D5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2" office:value-type="float" office:value="7032" calcext:value-type="float">
            <text:p>703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813888888888889" calcext:value-type="float">
            <text:p>0,00081388888888888900</text:p>
          </table:table-cell>
          <table:table-cell table:formula="of:=[.D588]-[.D5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2" office:value-type="float" office:value="7044" calcext:value-type="float">
            <text:p>7044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815277777777778" calcext:value-type="float">
            <text:p>0,00081527777777777800</text:p>
          </table:table-cell>
          <table:table-cell table:formula="of:=[.D589]-[.D588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2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816666666666667" calcext:value-type="float">
            <text:p>0,00081666666666666700</text:p>
          </table:table-cell>
          <table:table-cell table:formula="of:=[.D590]-[.D5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2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818055555555556" calcext:value-type="float">
            <text:p>0,00081805555555555600</text:p>
          </table:table-cell>
          <table:table-cell table:formula="of:=[.D591]-[.D5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2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819444444444445" calcext:value-type="float">
            <text:p>0,00081944444444444500</text:p>
          </table:table-cell>
          <table:table-cell table:formula="of:=[.D592]-[.D5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2" office:value-type="float" office:value="7092" calcext:value-type="float">
            <text:p>7092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820833333333333" calcext:value-type="float">
            <text:p>0,00082083333333333300</text:p>
          </table:table-cell>
          <table:table-cell table:formula="of:=[.D593]-[.D5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2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822222222222222" calcext:value-type="float">
            <text:p>0,00082222222222222200</text:p>
          </table:table-cell>
          <table:table-cell table:formula="of:=[.D594]-[.D5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2" office:value-type="float" office:value="7116" calcext:value-type="float">
            <text:p>7116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823611111111111" calcext:value-type="float">
            <text:p>0,00082361111111111100</text:p>
          </table:table-cell>
          <table:table-cell table:formula="of:=[.D595]-[.D5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2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825" calcext:value-type="float">
            <text:p>0,00082500000000000000</text:p>
          </table:table-cell>
          <table:table-cell table:formula="of:=[.D596]-[.D5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2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826388888888889" calcext:value-type="float">
            <text:p>0,00082638888888888900</text:p>
          </table:table-cell>
          <table:table-cell table:formula="of:=[.D597]-[.D5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2" office:value-type="float" office:value="7152" calcext:value-type="float">
            <text:p>715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827777777777778" calcext:value-type="float">
            <text:p>0,00082777777777777800</text:p>
          </table:table-cell>
          <table:table-cell table:formula="of:=[.D598]-[.D5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2" office:value-type="float" office:value="7164" calcext:value-type="float">
            <text:p>7164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829166666666667" calcext:value-type="float">
            <text:p>0,00082916666666666700</text:p>
          </table:table-cell>
          <table:table-cell table:formula="of:=[.D599]-[.D5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2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830555555555556" calcext:value-type="float">
            <text:p>0,00083055555555555600</text:p>
          </table:table-cell>
          <table:table-cell table:formula="of:=[.D600]-[.D5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2" office:value-type="float" office:value="7188" calcext:value-type="float">
            <text:p>7188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831944444444444" calcext:value-type="float">
            <text:p>0,00083194444444444400</text:p>
          </table:table-cell>
          <table:table-cell table:formula="of:=[.D601]-[.D600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2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833333333333333" calcext:value-type="float">
            <text:p>0,00083333333333333300</text:p>
          </table:table-cell>
          <table:table-cell table:formula="of:=[.D602]-[.D6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2" office:value-type="float" office:value="7212" calcext:value-type="float">
            <text:p>7212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834722222222222" calcext:value-type="float">
            <text:p>0,00083472222222222200</text:p>
          </table:table-cell>
          <table:table-cell table:formula="of:=[.D603]-[.D6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2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836111111111111" calcext:value-type="float">
            <text:p>0,00083611111111111100</text:p>
          </table:table-cell>
          <table:table-cell table:formula="of:=[.D604]-[.D6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2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8375" calcext:value-type="float">
            <text:p>0,00083750000000000000</text:p>
          </table:table-cell>
          <table:table-cell table:formula="of:=[.D605]-[.D6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2" office:value-type="float" office:value="7248" calcext:value-type="float">
            <text:p>724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838888888888889" calcext:value-type="float">
            <text:p>0,00083888888888888900</text:p>
          </table:table-cell>
          <table:table-cell table:formula="of:=[.D606]-[.D6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2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840277777777778" calcext:value-type="float">
            <text:p>0,00084027777777777800</text:p>
          </table:table-cell>
          <table:table-cell table:formula="of:=[.D607]-[.D6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2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841666666666667" calcext:value-type="float">
            <text:p>0,00084166666666666700</text:p>
          </table:table-cell>
          <table:table-cell table:formula="of:=[.D608]-[.D6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2" office:value-type="float" office:value="7284" calcext:value-type="float">
            <text:p>7284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843055555555556" calcext:value-type="float">
            <text:p>0,00084305555555555600</text:p>
          </table:table-cell>
          <table:table-cell table:formula="of:=[.D609]-[.D6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2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844444444444444" calcext:value-type="float">
            <text:p>0,00084444444444444400</text:p>
          </table:table-cell>
          <table:table-cell table:formula="of:=[.D610]-[.D6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2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845833333333333" calcext:value-type="float">
            <text:p>0,00084583333333333300</text:p>
          </table:table-cell>
          <table:table-cell table:formula="of:=[.D611]-[.D6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2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847222222222222" calcext:value-type="float">
            <text:p>0,00084722222222222200</text:p>
          </table:table-cell>
          <table:table-cell table:formula="of:=[.D612]-[.D6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2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848611111111111" calcext:value-type="float">
            <text:p>0,00084861111111111100</text:p>
          </table:table-cell>
          <table:table-cell table:formula="of:=[.D613]-[.D6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2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85" calcext:value-type="float">
            <text:p>0,00085000000000000000</text:p>
          </table:table-cell>
          <table:table-cell table:formula="of:=[.D614]-[.D613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2" office:value-type="float" office:value="7356" calcext:value-type="float">
            <text:p>7356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851388888888889" calcext:value-type="float">
            <text:p>0,00085138888888888900</text:p>
          </table:table-cell>
          <table:table-cell table:formula="of:=[.D615]-[.D6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2" office:value-type="float" office:value="7368" calcext:value-type="float">
            <text:p>736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852777777777778" calcext:value-type="float">
            <text:p>0,00085277777777777800</text:p>
          </table:table-cell>
          <table:table-cell table:formula="of:=[.D616]-[.D6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2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854166666666667" calcext:value-type="float">
            <text:p>0,00085416666666666700</text:p>
          </table:table-cell>
          <table:table-cell table:formula="of:=[.D617]-[.D6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2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855555555555556" calcext:value-type="float">
            <text:p>0,00085555555555555600</text:p>
          </table:table-cell>
          <table:table-cell table:formula="of:=[.D618]-[.D6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2" office:value-type="float" office:value="7404" calcext:value-type="float">
            <text:p>7404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856944444444445" calcext:value-type="float">
            <text:p>0,00085694444444444500</text:p>
          </table:table-cell>
          <table:table-cell table:formula="of:=[.D619]-[.D6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2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858333333333333" calcext:value-type="float">
            <text:p>0,00085833333333333300</text:p>
          </table:table-cell>
          <table:table-cell table:formula="of:=[.D620]-[.D6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2" office:value-type="float" office:value="7428" calcext:value-type="float">
            <text:p>7428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859722222222222" calcext:value-type="float">
            <text:p>0,00085972222222222200</text:p>
          </table:table-cell>
          <table:table-cell table:formula="of:=[.D621]-[.D6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2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861111111111111" calcext:value-type="float">
            <text:p>0,00086111111111111100</text:p>
          </table:table-cell>
          <table:table-cell table:formula="of:=[.D622]-[.D6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2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8625" calcext:value-type="float">
            <text:p>0,00086250000000000000</text:p>
          </table:table-cell>
          <table:table-cell table:formula="of:=[.D623]-[.D6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2" office:value-type="float" office:value="7464" calcext:value-type="float">
            <text:p>746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863888888888889" calcext:value-type="float">
            <text:p>0,00086388888888888900</text:p>
          </table:table-cell>
          <table:table-cell table:formula="of:=[.D624]-[.D6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2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865277777777778" calcext:value-type="float">
            <text:p>0,00086527777777777800</text:p>
          </table:table-cell>
          <table:table-cell table:formula="of:=[.D625]-[.D6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2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866666666666667" calcext:value-type="float">
            <text:p>0,00086666666666666700</text:p>
          </table:table-cell>
          <table:table-cell table:formula="of:=[.D626]-[.D6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2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868055555555556" calcext:value-type="float">
            <text:p>0,00086805555555555600</text:p>
          </table:table-cell>
          <table:table-cell table:formula="of:=[.D627]-[.D626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2" office:value-type="float" office:value="7512" calcext:value-type="float">
            <text:p>751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869444444444445" calcext:value-type="float">
            <text:p>0,00086944444444444500</text:p>
          </table:table-cell>
          <table:table-cell table:formula="of:=[.D628]-[.D6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2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870833333333333" calcext:value-type="float">
            <text:p>0,00087083333333333400</text:p>
          </table:table-cell>
          <table:table-cell table:formula="of:=[.D629]-[.D6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2" office:value-type="float" office:value="7536" calcext:value-type="float">
            <text:p>753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872222222222222" calcext:value-type="float">
            <text:p>0,00087222222222222200</text:p>
          </table:table-cell>
          <table:table-cell table:formula="of:=[.D630]-[.D6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2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873611111111111" calcext:value-type="float">
            <text:p>0,00087361111111111100</text:p>
          </table:table-cell>
          <table:table-cell table:formula="of:=[.D631]-[.D6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2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875" calcext:value-type="float">
            <text:p>0,00087500000000000000</text:p>
          </table:table-cell>
          <table:table-cell table:formula="of:=[.D632]-[.D6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2" office:value-type="float" office:value="7572" calcext:value-type="float">
            <text:p>7572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876388888888889" calcext:value-type="float">
            <text:p>0,00087638888888888900</text:p>
          </table:table-cell>
          <table:table-cell table:formula="of:=[.D633]-[.D6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2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877777777777778" calcext:value-type="float">
            <text:p>0,00087777777777777800</text:p>
          </table:table-cell>
          <table:table-cell table:formula="of:=[.D634]-[.D6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2" office:value-type="float" office:value="7596" calcext:value-type="float">
            <text:p>7596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879166666666667" calcext:value-type="float">
            <text:p>0,00087916666666666700</text:p>
          </table:table-cell>
          <table:table-cell table:formula="of:=[.D635]-[.D6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2" office:value-type="float" office:value="7608" calcext:value-type="float">
            <text:p>760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880555555555556" calcext:value-type="float">
            <text:p>0,00088055555555555600</text:p>
          </table:table-cell>
          <table:table-cell table:formula="of:=[.D636]-[.D6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2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881944444444444" calcext:value-type="float">
            <text:p>0,00088194444444444500</text:p>
          </table:table-cell>
          <table:table-cell table:formula="of:=[.D637]-[.D6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2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883333333333333" calcext:value-type="float">
            <text:p>0,00088333333333333300</text:p>
          </table:table-cell>
          <table:table-cell table:formula="of:=[.D638]-[.D6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2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884722222222222" calcext:value-type="float">
            <text:p>0,00088472222222222200</text:p>
          </table:table-cell>
          <table:table-cell table:formula="of:=[.D639]-[.D6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2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886111111111111" calcext:value-type="float">
            <text:p>0,00088611111111111100</text:p>
          </table:table-cell>
          <table:table-cell table:formula="of:=[.D640]-[.D639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2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8875" calcext:value-type="float">
            <text:p>0,00088750000000000000</text:p>
          </table:table-cell>
          <table:table-cell table:formula="of:=[.D641]-[.D6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2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888888888888889" calcext:value-type="float">
            <text:p>0,00088888888888888900</text:p>
          </table:table-cell>
          <table:table-cell table:formula="of:=[.D642]-[.D6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2" office:value-type="float" office:value="7692" calcext:value-type="float">
            <text:p>7692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890277777777778" calcext:value-type="float">
            <text:p>0,00089027777777777800</text:p>
          </table:table-cell>
          <table:table-cell table:formula="of:=[.D643]-[.D6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2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891666666666667" calcext:value-type="float">
            <text:p>0,00089166666666666700</text:p>
          </table:table-cell>
          <table:table-cell table:formula="of:=[.D644]-[.D6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2" office:value-type="float" office:value="7716" calcext:value-type="float">
            <text:p>7716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893055555555556" calcext:value-type="float">
            <text:p>0,00089305555555555600</text:p>
          </table:table-cell>
          <table:table-cell table:formula="of:=[.D645]-[.D6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2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894444444444445" calcext:value-type="float">
            <text:p>0,00089444444444444500</text:p>
          </table:table-cell>
          <table:table-cell table:formula="of:=[.D646]-[.D6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2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895833333333333" calcext:value-type="float">
            <text:p>0,00089583333333333300</text:p>
          </table:table-cell>
          <table:table-cell table:formula="of:=[.D647]-[.D6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2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897222222222222" calcext:value-type="float">
            <text:p>0,00089722222222222200</text:p>
          </table:table-cell>
          <table:table-cell table:formula="of:=[.D648]-[.D6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2" office:value-type="float" office:value="7764" calcext:value-type="float">
            <text:p>7764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898611111111111" calcext:value-type="float">
            <text:p>0,00089861111111111100</text:p>
          </table:table-cell>
          <table:table-cell table:formula="of:=[.D649]-[.D6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2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9" calcext:value-type="float">
            <text:p>0,00090000000000000000</text:p>
          </table:table-cell>
          <table:table-cell table:formula="of:=[.D650]-[.D6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2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901388888888889" calcext:value-type="float">
            <text:p>0,00090138888888888900</text:p>
          </table:table-cell>
          <table:table-cell table:formula="of:=[.D651]-[.D6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2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902777777777778" calcext:value-type="float">
            <text:p>0,00090277777777777800</text:p>
          </table:table-cell>
          <table:table-cell table:formula="of:=[.D652]-[.D6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2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904166666666667" calcext:value-type="float">
            <text:p>0,00090416666666666700</text:p>
          </table:table-cell>
          <table:table-cell table:formula="of:=[.D653]-[.D652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2" office:value-type="float" office:value="7824" calcext:value-type="float">
            <text:p>782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905555555555556" calcext:value-type="float">
            <text:p>0,00090555555555555600</text:p>
          </table:table-cell>
          <table:table-cell table:formula="of:=[.D654]-[.D6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2" office:value-type="float" office:value="7836" calcext:value-type="float">
            <text:p>7836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906944444444445" calcext:value-type="float">
            <text:p>0,00090694444444444500</text:p>
          </table:table-cell>
          <table:table-cell table:formula="of:=[.D655]-[.D6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2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908333333333333" calcext:value-type="float">
            <text:p>0,00090833333333333400</text:p>
          </table:table-cell>
          <table:table-cell table:formula="of:=[.D656]-[.D6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2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909722222222222" calcext:value-type="float">
            <text:p>0,00090972222222222200</text:p>
          </table:table-cell>
          <table:table-cell table:formula="of:=[.D657]-[.D6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2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911111111111111" calcext:value-type="float">
            <text:p>0,00091111111111111100</text:p>
          </table:table-cell>
          <table:table-cell table:formula="of:=[.D658]-[.D6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2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9125" calcext:value-type="float">
            <text:p>0,00091250000000000000</text:p>
          </table:table-cell>
          <table:table-cell table:formula="of:=[.D659]-[.D6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2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913888888888889" calcext:value-type="float">
            <text:p>0,00091388888888888900</text:p>
          </table:table-cell>
          <table:table-cell table:formula="of:=[.D660]-[.D6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2" office:value-type="float" office:value="7908" calcext:value-type="float">
            <text:p>7908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915277777777778" calcext:value-type="float">
            <text:p>0,00091527777777777800</text:p>
          </table:table-cell>
          <table:table-cell table:formula="of:=[.D661]-[.D6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2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916666666666667" calcext:value-type="float">
            <text:p>0,00091666666666666700</text:p>
          </table:table-cell>
          <table:table-cell table:formula="of:=[.D662]-[.D6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2" office:value-type="float" office:value="7932" calcext:value-type="float">
            <text:p>7932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918055555555556" calcext:value-type="float">
            <text:p>0,00091805555555555600</text:p>
          </table:table-cell>
          <table:table-cell table:formula="of:=[.D663]-[.D6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2" office:value-type="float" office:value="7944" calcext:value-type="float">
            <text:p>794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919444444444444" calcext:value-type="float">
            <text:p>0,00091944444444444500</text:p>
          </table:table-cell>
          <table:table-cell table:formula="of:=[.D664]-[.D6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2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920833333333333" calcext:value-type="float">
            <text:p>0,00092083333333333300</text:p>
          </table:table-cell>
          <table:table-cell table:formula="of:=[.D665]-[.D6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2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922222222222222" calcext:value-type="float">
            <text:p>0,00092222222222222200</text:p>
          </table:table-cell>
          <table:table-cell table:formula="of:=[.D666]-[.D665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2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923611111111111" calcext:value-type="float">
            <text:p>0,00092361111111111100</text:p>
          </table:table-cell>
          <table:table-cell table:formula="of:=[.D667]-[.D6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2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925" calcext:value-type="float">
            <text:p>0,00092500000000000000</text:p>
          </table:table-cell>
          <table:table-cell table:formula="of:=[.D668]-[.D6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2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926388888888889" calcext:value-type="float">
            <text:p>0,00092638888888888900</text:p>
          </table:table-cell>
          <table:table-cell table:formula="of:=[.D669]-[.D6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2" office:value-type="float" office:value="8016" calcext:value-type="float">
            <text:p>801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927777777777778" calcext:value-type="float">
            <text:p>0,00092777777777777800</text:p>
          </table:table-cell>
          <table:table-cell table:formula="of:=[.D670]-[.D6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2" office:value-type="float" office:value="8028" calcext:value-type="float">
            <text:p>8028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929166666666667" calcext:value-type="float">
            <text:p>0,00092916666666666700</text:p>
          </table:table-cell>
          <table:table-cell table:formula="of:=[.D671]-[.D6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2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930555555555556" calcext:value-type="float">
            <text:p>0,00093055555555555600</text:p>
          </table:table-cell>
          <table:table-cell table:formula="of:=[.D672]-[.D6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2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931944444444444" calcext:value-type="float">
            <text:p>0,00093194444444444400</text:p>
          </table:table-cell>
          <table:table-cell table:formula="of:=[.D673]-[.D6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2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933333333333333" calcext:value-type="float">
            <text:p>0,00093333333333333300</text:p>
          </table:table-cell>
          <table:table-cell table:formula="of:=[.D674]-[.D6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2" office:value-type="float" office:value="8076" calcext:value-type="float">
            <text:p>8076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934722222222222" calcext:value-type="float">
            <text:p>0,00093472222222222200</text:p>
          </table:table-cell>
          <table:table-cell table:formula="of:=[.D675]-[.D6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2" office:value-type="float" office:value="8088" calcext:value-type="float">
            <text:p>808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936111111111111" calcext:value-type="float">
            <text:p>0,00093611111111111100</text:p>
          </table:table-cell>
          <table:table-cell table:formula="of:=[.D676]-[.D6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2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9375" calcext:value-type="float">
            <text:p>0,00093750000000000000</text:p>
          </table:table-cell>
          <table:table-cell table:formula="of:=[.D677]-[.D6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2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938888888888889" calcext:value-type="float">
            <text:p>0,00093888888888888900</text:p>
          </table:table-cell>
          <table:table-cell table:formula="of:=[.D678]-[.D6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2" office:value-type="float" office:value="8124" calcext:value-type="float">
            <text:p>8124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940277777777778" calcext:value-type="float">
            <text:p>0,00094027777777777800</text:p>
          </table:table-cell>
          <table:table-cell table:formula="of:=[.D679]-[.D678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2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941666666666667" calcext:value-type="float">
            <text:p>0,00094166666666666700</text:p>
          </table:table-cell>
          <table:table-cell table:formula="of:=[.D680]-[.D6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2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943055555555556" calcext:value-type="float">
            <text:p>0,00094305555555555600</text:p>
          </table:table-cell>
          <table:table-cell table:formula="of:=[.D681]-[.D6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2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944444444444445" calcext:value-type="float">
            <text:p>0,00094444444444444500</text:p>
          </table:table-cell>
          <table:table-cell table:formula="of:=[.D682]-[.D6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2" office:value-type="float" office:value="8172" calcext:value-type="float">
            <text:p>8172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945833333333333" calcext:value-type="float">
            <text:p>0,00094583333333333300</text:p>
          </table:table-cell>
          <table:table-cell table:formula="of:=[.D683]-[.D6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2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947222222222222" calcext:value-type="float">
            <text:p>0,00094722222222222200</text:p>
          </table:table-cell>
          <table:table-cell table:formula="of:=[.D684]-[.D6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2" office:value-type="float" office:value="8196" calcext:value-type="float">
            <text:p>8196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948611111111111" calcext:value-type="float">
            <text:p>0,00094861111111111100</text:p>
          </table:table-cell>
          <table:table-cell table:formula="of:=[.D685]-[.D6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2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95" calcext:value-type="float">
            <text:p>0,00095000000000000000</text:p>
          </table:table-cell>
          <table:table-cell table:formula="of:=[.D686]-[.D6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2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951388888888889" calcext:value-type="float">
            <text:p>0,00095138888888888900</text:p>
          </table:table-cell>
          <table:table-cell table:formula="of:=[.D687]-[.D6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2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952777777777778" calcext:value-type="float">
            <text:p>0,00095277777777777800</text:p>
          </table:table-cell>
          <table:table-cell table:formula="of:=[.D688]-[.D6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2" office:value-type="float" office:value="8244" calcext:value-type="float">
            <text:p>8244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954166666666667" calcext:value-type="float">
            <text:p>0,00095416666666666700</text:p>
          </table:table-cell>
          <table:table-cell table:formula="of:=[.D689]-[.D6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2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955555555555556" calcext:value-type="float">
            <text:p>0,00095555555555555600</text:p>
          </table:table-cell>
          <table:table-cell table:formula="of:=[.D690]-[.D6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2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956944444444444" calcext:value-type="float">
            <text:p>0,00095694444444444500</text:p>
          </table:table-cell>
          <table:table-cell table:formula="of:=[.D691]-[.D6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2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958333333333333" calcext:value-type="float">
            <text:p>0,00095833333333333300</text:p>
          </table:table-cell>
          <table:table-cell table:formula="of:=[.D692]-[.D691]" office:value-type="float" office:value="0.00000138888888888899" calcext:value-type="float">
            <text:p>0,0000013888888888889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2" office:value-type="float" office:value="8292" calcext:value-type="float">
            <text:p>8292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959722222222222" calcext:value-type="float">
            <text:p>0,00095972222222222200</text:p>
          </table:table-cell>
          <table:table-cell table:formula="of:=[.D693]-[.D6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2" office:value-type="float" office:value="8304" calcext:value-type="float">
            <text:p>830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961111111111111" calcext:value-type="float">
            <text:p>0,00096111111111111100</text:p>
          </table:table-cell>
          <table:table-cell table:formula="of:=[.D694]-[.D6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2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9625" calcext:value-type="float">
            <text:p>0,00096250000000000000</text:p>
          </table:table-cell>
          <table:table-cell table:formula="of:=[.D695]-[.D6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2" office:value-type="float" office:value="8328" calcext:value-type="float">
            <text:p>832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963888888888889" calcext:value-type="float">
            <text:p>0,00096388888888888900</text:p>
          </table:table-cell>
          <table:table-cell table:formula="of:=[.D696]-[.D6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2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965277777777778" calcext:value-type="float">
            <text:p>0,00096527777777777800</text:p>
          </table:table-cell>
          <table:table-cell table:formula="of:=[.D697]-[.D6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2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966666666666667" calcext:value-type="float">
            <text:p>0,00096666666666666700</text:p>
          </table:table-cell>
          <table:table-cell table:formula="of:=[.D698]-[.D6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2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968055555555556" calcext:value-type="float">
            <text:p>0,00096805555555555600</text:p>
          </table:table-cell>
          <table:table-cell table:formula="of:=[.D699]-[.D6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2" office:value-type="float" office:value="8376" calcext:value-type="float">
            <text:p>837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969444444444444" calcext:value-type="float">
            <text:p>0,00096944444444444400</text:p>
          </table:table-cell>
          <table:table-cell table:formula="of:=[.D700]-[.D6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2" office:value-type="float" office:value="8388" calcext:value-type="float">
            <text:p>8388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970833333333333" calcext:value-type="float">
            <text:p>0,00097083333333333300</text:p>
          </table:table-cell>
          <table:table-cell table:formula="of:=[.D701]-[.D7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2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972222222222222" calcext:value-type="float">
            <text:p>0,00097222222222222200</text:p>
          </table:table-cell>
          <table:table-cell table:formula="of:=[.D702]-[.D7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2" office:value-type="float" office:value="8412" calcext:value-type="float">
            <text:p>8412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973611111111111" calcext:value-type="float">
            <text:p>0,00097361111111111100</text:p>
          </table:table-cell>
          <table:table-cell table:formula="of:=[.D703]-[.D7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2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975" calcext:value-type="float">
            <text:p>0,00097500000000000000</text:p>
          </table:table-cell>
          <table:table-cell table:formula="of:=[.D704]-[.D7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2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976388888888889" calcext:value-type="float">
            <text:p>0,00097638888888888900</text:p>
          </table:table-cell>
          <table:table-cell table:formula="of:=[.D705]-[.D7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2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977777777777778" calcext:value-type="float">
            <text:p>0,00097777777777777800</text:p>
          </table:table-cell>
          <table:table-cell table:formula="of:=[.D706]-[.D7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2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979166666666667" calcext:value-type="float">
            <text:p>0,00097916666666666700</text:p>
          </table:table-cell>
          <table:table-cell table:formula="of:=[.D707]-[.D7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2" office:value-type="float" office:value="8472" calcext:value-type="float">
            <text:p>847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980555555555556" calcext:value-type="float">
            <text:p>0,00098055555555555600</text:p>
          </table:table-cell>
          <table:table-cell table:formula="of:=[.D708]-[.D7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2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981944444444444" calcext:value-type="float">
            <text:p>0,00098194444444444400</text:p>
          </table:table-cell>
          <table:table-cell table:formula="of:=[.D709]-[.D7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2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983333333333333" calcext:value-type="float">
            <text:p>0,00098333333333333300</text:p>
          </table:table-cell>
          <table:table-cell table:formula="of:=[.D710]-[.D7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2" office:value-type="float" office:value="8508" calcext:value-type="float">
            <text:p>8508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984722222222222" calcext:value-type="float">
            <text:p>0,00098472222222222200</text:p>
          </table:table-cell>
          <table:table-cell table:formula="of:=[.D711]-[.D710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2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986111111111111" calcext:value-type="float">
            <text:p>0,00098611111111111100</text:p>
          </table:table-cell>
          <table:table-cell table:formula="of:=[.D712]-[.D7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2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9875" calcext:value-type="float">
            <text:p>0,00098750000000000000</text:p>
          </table:table-cell>
          <table:table-cell table:formula="of:=[.D713]-[.D7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2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988888888888889" calcext:value-type="float">
            <text:p>0,00098888888888888900</text:p>
          </table:table-cell>
          <table:table-cell table:formula="of:=[.D714]-[.D7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2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990277777777778" calcext:value-type="float">
            <text:p>0,00099027777777777800</text:p>
          </table:table-cell>
          <table:table-cell table:formula="of:=[.D715]-[.D7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2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991666666666667" calcext:value-type="float">
            <text:p>0,00099166666666666700</text:p>
          </table:table-cell>
          <table:table-cell table:formula="of:=[.D716]-[.D7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2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993055555555556" calcext:value-type="float">
            <text:p>0,00099305555555555600</text:p>
          </table:table-cell>
          <table:table-cell table:formula="of:=[.D717]-[.D7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2" office:value-type="float" office:value="8592" calcext:value-type="float">
            <text:p>859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994444444444445" calcext:value-type="float">
            <text:p>0,00099444444444444500</text:p>
          </table:table-cell>
          <table:table-cell table:formula="of:=[.D718]-[.D7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2" office:value-type="float" office:value="8604" calcext:value-type="float">
            <text:p>8604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995833333333333" calcext:value-type="float">
            <text:p>0,00099583333333333300</text:p>
          </table:table-cell>
          <table:table-cell table:formula="of:=[.D719]-[.D7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2" office:value-type="float" office:value="8616" calcext:value-type="float">
            <text:p>861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997222222222222" calcext:value-type="float">
            <text:p>0,00099722222222222200</text:p>
          </table:table-cell>
          <table:table-cell table:formula="of:=[.D720]-[.D7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2" office:value-type="float" office:value="8628" calcext:value-type="float">
            <text:p>8628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998611111111111" calcext:value-type="float">
            <text:p>0,00099861111111111100</text:p>
          </table:table-cell>
          <table:table-cell table:formula="of:=[.D721]-[.D7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2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" calcext:value-type="float">
            <text:p>0,00100000000000000000</text:p>
          </table:table-cell>
          <table:table-cell table:formula="of:=[.D722]-[.D7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2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00138888888889" calcext:value-type="float">
            <text:p>0,00100138888888889000</text:p>
          </table:table-cell>
          <table:table-cell table:formula="of:=[.D723]-[.D7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2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00277777777778" calcext:value-type="float">
            <text:p>0,00100277777777778000</text:p>
          </table:table-cell>
          <table:table-cell table:formula="of:=[.D724]-[.D7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2" office:value-type="float" office:value="8676" calcext:value-type="float">
            <text:p>8676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00416666666667" calcext:value-type="float">
            <text:p>0,00100416666666667000</text:p>
          </table:table-cell>
          <table:table-cell table:formula="of:=[.D725]-[.D7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2" office:value-type="float" office:value="8688" calcext:value-type="float">
            <text:p>868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00555555555556" calcext:value-type="float">
            <text:p>0,00100555555555556000</text:p>
          </table:table-cell>
          <table:table-cell table:formula="of:=[.D726]-[.D7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2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00694444444444" calcext:value-type="float">
            <text:p>0,00100694444444444000</text:p>
          </table:table-cell>
          <table:table-cell table:formula="of:=[.D727]-[.D7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2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00833333333333" calcext:value-type="float">
            <text:p>0,00100833333333333000</text:p>
          </table:table-cell>
          <table:table-cell table:formula="of:=[.D728]-[.D7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2" office:value-type="float" office:value="8724" calcext:value-type="float">
            <text:p>8724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00972222222222" calcext:value-type="float">
            <text:p>0,00100972222222222000</text:p>
          </table:table-cell>
          <table:table-cell table:formula="of:=[.D729]-[.D7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2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01111111111111" calcext:value-type="float">
            <text:p>0,00101111111111111000</text:p>
          </table:table-cell>
          <table:table-cell table:formula="of:=[.D730]-[.D7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2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0125" calcext:value-type="float">
            <text:p>0,00101250000000000000</text:p>
          </table:table-cell>
          <table:table-cell table:formula="of:=[.D731]-[.D7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2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01388888888889" calcext:value-type="float">
            <text:p>0,00101388888888889000</text:p>
          </table:table-cell>
          <table:table-cell table:formula="of:=[.D732]-[.D7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2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01527777777778" calcext:value-type="float">
            <text:p>0,00101527777777778000</text:p>
          </table:table-cell>
          <table:table-cell table:formula="of:=[.D733]-[.D7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2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01666666666667" calcext:value-type="float">
            <text:p>0,00101666666666667000</text:p>
          </table:table-cell>
          <table:table-cell table:formula="of:=[.D734]-[.D7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2" office:value-type="float" office:value="8796" calcext:value-type="float">
            <text:p>8796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01805555555556" calcext:value-type="float">
            <text:p>0,00101805555555556000</text:p>
          </table:table-cell>
          <table:table-cell table:formula="of:=[.D735]-[.D7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2" office:value-type="float" office:value="8808" calcext:value-type="float">
            <text:p>880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01944444444444" calcext:value-type="float">
            <text:p>0,00101944444444444000</text:p>
          </table:table-cell>
          <table:table-cell table:formula="of:=[.D736]-[.D7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2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02083333333333" calcext:value-type="float">
            <text:p>0,00102083333333333000</text:p>
          </table:table-cell>
          <table:table-cell table:formula="of:=[.D737]-[.D736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2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02222222222222" calcext:value-type="float">
            <text:p>0,00102222222222222000</text:p>
          </table:table-cell>
          <table:table-cell table:formula="of:=[.D738]-[.D7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2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02361111111111" calcext:value-type="float">
            <text:p>0,00102361111111111000</text:p>
          </table:table-cell>
          <table:table-cell table:formula="of:=[.D739]-[.D7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2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025" calcext:value-type="float">
            <text:p>0,00102500000000000000</text:p>
          </table:table-cell>
          <table:table-cell table:formula="of:=[.D740]-[.D7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2" office:value-type="float" office:value="8868" calcext:value-type="float">
            <text:p>8868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02638888888889" calcext:value-type="float">
            <text:p>0,00102638888888889000</text:p>
          </table:table-cell>
          <table:table-cell table:formula="of:=[.D741]-[.D7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2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02777777777778" calcext:value-type="float">
            <text:p>0,00102777777777778000</text:p>
          </table:table-cell>
          <table:table-cell table:formula="of:=[.D742]-[.D7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2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02916666666667" calcext:value-type="float">
            <text:p>0,00102916666666667000</text:p>
          </table:table-cell>
          <table:table-cell table:formula="of:=[.D743]-[.D7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2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03055555555556" calcext:value-type="float">
            <text:p>0,00103055555555556000</text:p>
          </table:table-cell>
          <table:table-cell table:formula="of:=[.D744]-[.D7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2" office:value-type="float" office:value="8916" calcext:value-type="float">
            <text:p>8916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03194444444444" calcext:value-type="float">
            <text:p>0,00103194444444444000</text:p>
          </table:table-cell>
          <table:table-cell table:formula="of:=[.D745]-[.D7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2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03333333333333" calcext:value-type="float">
            <text:p>0,00103333333333333000</text:p>
          </table:table-cell>
          <table:table-cell table:formula="of:=[.D746]-[.D7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2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03472222222222" calcext:value-type="float">
            <text:p>0,00103472222222222000</text:p>
          </table:table-cell>
          <table:table-cell table:formula="of:=[.D747]-[.D7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2" office:value-type="float" office:value="8952" calcext:value-type="float">
            <text:p>895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03611111111111" calcext:value-type="float">
            <text:p>0,00103611111111111000</text:p>
          </table:table-cell>
          <table:table-cell table:formula="of:=[.D748]-[.D7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2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0375" calcext:value-type="float">
            <text:p>0,00103750000000000000</text:p>
          </table:table-cell>
          <table:table-cell table:formula="of:=[.D749]-[.D7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2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03888888888889" calcext:value-type="float">
            <text:p>0,00103888888888889000</text:p>
          </table:table-cell>
          <table:table-cell table:formula="of:=[.D750]-[.D7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2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04027777777778" calcext:value-type="float">
            <text:p>0,00104027777777778000</text:p>
          </table:table-cell>
          <table:table-cell table:formula="of:=[.D751]-[.D7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2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04166666666667" calcext:value-type="float">
            <text:p>0,00104166666666667000</text:p>
          </table:table-cell>
          <table:table-cell table:formula="of:=[.D752]-[.D7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2" office:value-type="float" office:value="9012" calcext:value-type="float">
            <text:p>9012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04305555555556" calcext:value-type="float">
            <text:p>0,00104305555555556000</text:p>
          </table:table-cell>
          <table:table-cell table:formula="of:=[.D753]-[.D7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2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04444444444444" calcext:value-type="float">
            <text:p>0,00104444444444444000</text:p>
          </table:table-cell>
          <table:table-cell table:formula="of:=[.D754]-[.D7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2" office:value-type="float" office:value="9036" calcext:value-type="float">
            <text:p>9036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04583333333333" calcext:value-type="float">
            <text:p>0,00104583333333333000</text:p>
          </table:table-cell>
          <table:table-cell table:formula="of:=[.D755]-[.D7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2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04722222222222" calcext:value-type="float">
            <text:p>0,00104722222222222000</text:p>
          </table:table-cell>
          <table:table-cell table:formula="of:=[.D756]-[.D7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2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04861111111111" calcext:value-type="float">
            <text:p>0,00104861111111111000</text:p>
          </table:table-cell>
          <table:table-cell table:formula="of:=[.D757]-[.D7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2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05" calcext:value-type="float">
            <text:p>0,00105000000000000000</text:p>
          </table:table-cell>
          <table:table-cell table:formula="of:=[.D758]-[.D7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2" office:value-type="float" office:value="9084" calcext:value-type="float">
            <text:p>9084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05138888888889" calcext:value-type="float">
            <text:p>0,00105138888888889000</text:p>
          </table:table-cell>
          <table:table-cell table:formula="of:=[.D759]-[.D7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2" office:value-type="float" office:value="9096" calcext:value-type="float">
            <text:p>9096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05277777777778" calcext:value-type="float">
            <text:p>0,00105277777777778000</text:p>
          </table:table-cell>
          <table:table-cell table:formula="of:=[.D760]-[.D7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2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05416666666667" calcext:value-type="float">
            <text:p>0,00105416666666667000</text:p>
          </table:table-cell>
          <table:table-cell table:formula="of:=[.D761]-[.D7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2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05555555555556" calcext:value-type="float">
            <text:p>0,00105555555555556000</text:p>
          </table:table-cell>
          <table:table-cell table:formula="of:=[.D762]-[.D7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2" office:value-type="float" office:value="9132" calcext:value-type="float">
            <text:p>9132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05694444444444" calcext:value-type="float">
            <text:p>0,00105694444444444000</text:p>
          </table:table-cell>
          <table:table-cell table:formula="of:=[.D763]-[.D762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2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05833333333333" calcext:value-type="float">
            <text:p>0,00105833333333333000</text:p>
          </table:table-cell>
          <table:table-cell table:formula="of:=[.D764]-[.D7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2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05972222222222" calcext:value-type="float">
            <text:p>0,00105972222222222000</text:p>
          </table:table-cell>
          <table:table-cell table:formula="of:=[.D765]-[.D7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2" office:value-type="float" office:value="9168" calcext:value-type="float">
            <text:p>9168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06111111111111" calcext:value-type="float">
            <text:p>0,00106111111111111000</text:p>
          </table:table-cell>
          <table:table-cell table:formula="of:=[.D766]-[.D7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2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0625" calcext:value-type="float">
            <text:p>0,00106250000000000000</text:p>
          </table:table-cell>
          <table:table-cell table:formula="of:=[.D767]-[.D7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2" office:value-type="float" office:value="9192" calcext:value-type="float">
            <text:p>9192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06388888888889" calcext:value-type="float">
            <text:p>0,00106388888888889000</text:p>
          </table:table-cell>
          <table:table-cell table:formula="of:=[.D768]-[.D7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2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06527777777778" calcext:value-type="float">
            <text:p>0,00106527777777778000</text:p>
          </table:table-cell>
          <table:table-cell table:formula="of:=[.D769]-[.D7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2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06666666666667" calcext:value-type="float">
            <text:p>0,00106666666666667000</text:p>
          </table:table-cell>
          <table:table-cell table:formula="of:=[.D770]-[.D7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2" office:value-type="float" office:value="9228" calcext:value-type="float">
            <text:p>9228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06805555555556" calcext:value-type="float">
            <text:p>0,00106805555555556000</text:p>
          </table:table-cell>
          <table:table-cell table:formula="of:=[.D771]-[.D7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2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06944444444444" calcext:value-type="float">
            <text:p>0,00106944444444444000</text:p>
          </table:table-cell>
          <table:table-cell table:formula="of:=[.D772]-[.D7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2" office:value-type="float" office:value="9252" calcext:value-type="float">
            <text:p>9252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07083333333333" calcext:value-type="float">
            <text:p>0,00107083333333333000</text:p>
          </table:table-cell>
          <table:table-cell table:formula="of:=[.D773]-[.D7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2" office:value-type="float" office:value="9264" calcext:value-type="float">
            <text:p>9264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07222222222222" calcext:value-type="float">
            <text:p>0,00107222222222222000</text:p>
          </table:table-cell>
          <table:table-cell table:formula="of:=[.D774]-[.D7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2" office:value-type="float" office:value="9276" calcext:value-type="float">
            <text:p>9276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07361111111111" calcext:value-type="float">
            <text:p>0,00107361111111111000</text:p>
          </table:table-cell>
          <table:table-cell table:formula="of:=[.D775]-[.D7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2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075" calcext:value-type="float">
            <text:p>0,00107500000000000000</text:p>
          </table:table-cell>
          <table:table-cell table:formula="of:=[.D776]-[.D7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2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07638888888889" calcext:value-type="float">
            <text:p>0,00107638888888889000</text:p>
          </table:table-cell>
          <table:table-cell table:formula="of:=[.D777]-[.D7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2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07777777777778" calcext:value-type="float">
            <text:p>0,00107777777777778000</text:p>
          </table:table-cell>
          <table:table-cell table:formula="of:=[.D778]-[.D7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2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07916666666667" calcext:value-type="float">
            <text:p>0,00107916666666667000</text:p>
          </table:table-cell>
          <table:table-cell table:formula="of:=[.D779]-[.D7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2" office:value-type="float" office:value="9336" calcext:value-type="float">
            <text:p>9336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08055555555556" calcext:value-type="float">
            <text:p>0,00108055555555556000</text:p>
          </table:table-cell>
          <table:table-cell table:formula="of:=[.D780]-[.D7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2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08194444444444" calcext:value-type="float">
            <text:p>0,00108194444444444000</text:p>
          </table:table-cell>
          <table:table-cell table:formula="of:=[.D781]-[.D7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2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08333333333333" calcext:value-type="float">
            <text:p>0,00108333333333333000</text:p>
          </table:table-cell>
          <table:table-cell table:formula="of:=[.D782]-[.D7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2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08472222222222" calcext:value-type="float">
            <text:p>0,00108472222222222000</text:p>
          </table:table-cell>
          <table:table-cell table:formula="of:=[.D783]-[.D7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2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08611111111111" calcext:value-type="float">
            <text:p>0,00108611111111111000</text:p>
          </table:table-cell>
          <table:table-cell table:formula="of:=[.D784]-[.D7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2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0875" calcext:value-type="float">
            <text:p>0,00108750000000000000</text:p>
          </table:table-cell>
          <table:table-cell table:formula="of:=[.D785]-[.D7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2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08888888888889" calcext:value-type="float">
            <text:p>0,00108888888888889000</text:p>
          </table:table-cell>
          <table:table-cell table:formula="of:=[.D786]-[.D7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2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09027777777778" calcext:value-type="float">
            <text:p>0,00109027777777778000</text:p>
          </table:table-cell>
          <table:table-cell table:formula="of:=[.D787]-[.D7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2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09166666666667" calcext:value-type="float">
            <text:p>0,00109166666666667000</text:p>
          </table:table-cell>
          <table:table-cell table:formula="of:=[.D788]-[.D787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2" office:value-type="float" office:value="9444" calcext:value-type="float">
            <text:p>9444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09305555555556" calcext:value-type="float">
            <text:p>0,00109305555555556000</text:p>
          </table:table-cell>
          <table:table-cell table:formula="of:=[.D789]-[.D7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2" office:value-type="float" office:value="9456" calcext:value-type="float">
            <text:p>9456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09444444444444" calcext:value-type="float">
            <text:p>0,00109444444444444000</text:p>
          </table:table-cell>
          <table:table-cell table:formula="of:=[.D790]-[.D7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2" office:value-type="float" office:value="9468" calcext:value-type="float">
            <text:p>9468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09583333333333" calcext:value-type="float">
            <text:p>0,00109583333333333000</text:p>
          </table:table-cell>
          <table:table-cell table:formula="of:=[.D791]-[.D7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2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09722222222222" calcext:value-type="float">
            <text:p>0,00109722222222222000</text:p>
          </table:table-cell>
          <table:table-cell table:formula="of:=[.D792]-[.D7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2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09861111111111" calcext:value-type="float">
            <text:p>0,00109861111111111000</text:p>
          </table:table-cell>
          <table:table-cell table:formula="of:=[.D793]-[.D7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2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1" calcext:value-type="float">
            <text:p>0,00110000000000000000</text:p>
          </table:table-cell>
          <table:table-cell table:formula="of:=[.D794]-[.D7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2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10138888888889" calcext:value-type="float">
            <text:p>0,00110138888888889000</text:p>
          </table:table-cell>
          <table:table-cell table:formula="of:=[.D795]-[.D7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2" office:value-type="float" office:value="9528" calcext:value-type="float">
            <text:p>9528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10277777777778" calcext:value-type="float">
            <text:p>0,00110277777777778000</text:p>
          </table:table-cell>
          <table:table-cell table:formula="of:=[.D796]-[.D7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2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10416666666667" calcext:value-type="float">
            <text:p>0,00110416666666667000</text:p>
          </table:table-cell>
          <table:table-cell table:formula="of:=[.D797]-[.D7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2" office:value-type="float" office:value="9552" calcext:value-type="float">
            <text:p>9552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10555555555556" calcext:value-type="float">
            <text:p>0,00110555555555556000</text:p>
          </table:table-cell>
          <table:table-cell table:formula="of:=[.D798]-[.D7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2" office:value-type="float" office:value="9564" calcext:value-type="float">
            <text:p>9564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10694444444444" calcext:value-type="float">
            <text:p>0,00110694444444444000</text:p>
          </table:table-cell>
          <table:table-cell table:formula="of:=[.D799]-[.D7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2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10833333333333" calcext:value-type="float">
            <text:p>0,00110833333333333000</text:p>
          </table:table-cell>
          <table:table-cell table:formula="of:=[.D800]-[.D7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2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10972222222222" calcext:value-type="float">
            <text:p>0,00110972222222222000</text:p>
          </table:table-cell>
          <table:table-cell table:formula="of:=[.D801]-[.D8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2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11111111111111" calcext:value-type="float">
            <text:p>0,00111111111111111000</text:p>
          </table:table-cell>
          <table:table-cell table:formula="of:=[.D802]-[.D8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2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1125" calcext:value-type="float">
            <text:p>0,00111250000000000000</text:p>
          </table:table-cell>
          <table:table-cell table:formula="of:=[.D803]-[.D8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2" office:value-type="float" office:value="9624" calcext:value-type="float">
            <text:p>9624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11388888888889" calcext:value-type="float">
            <text:p>0,00111388888888889000</text:p>
          </table:table-cell>
          <table:table-cell table:formula="of:=[.D804]-[.D8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2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11527777777778" calcext:value-type="float">
            <text:p>0,00111527777777778000</text:p>
          </table:table-cell>
          <table:table-cell table:formula="of:=[.D805]-[.D8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2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11666666666667" calcext:value-type="float">
            <text:p>0,00111666666666667000</text:p>
          </table:table-cell>
          <table:table-cell table:formula="of:=[.D806]-[.D8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2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11805555555556" calcext:value-type="float">
            <text:p>0,00111805555555556000</text:p>
          </table:table-cell>
          <table:table-cell table:formula="of:=[.D807]-[.D8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2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11944444444444" calcext:value-type="float">
            <text:p>0,00111944444444444000</text:p>
          </table:table-cell>
          <table:table-cell table:formula="of:=[.D808]-[.D8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2" office:value-type="float" office:value="9684" calcext:value-type="float">
            <text:p>9684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12083333333333" calcext:value-type="float">
            <text:p>0,00112083333333333000</text:p>
          </table:table-cell>
          <table:table-cell table:formula="of:=[.D809]-[.D8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2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12222222222222" calcext:value-type="float">
            <text:p>0,00112222222222222000</text:p>
          </table:table-cell>
          <table:table-cell table:formula="of:=[.D810]-[.D8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2" office:value-type="float" office:value="9708" calcext:value-type="float">
            <text:p>9708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12361111111111" calcext:value-type="float">
            <text:p>0,00112361111111111000</text:p>
          </table:table-cell>
          <table:table-cell table:formula="of:=[.D811]-[.D8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2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125" calcext:value-type="float">
            <text:p>0,00112500000000000000</text:p>
          </table:table-cell>
          <table:table-cell table:formula="of:=[.D812]-[.D8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2" office:value-type="float" office:value="9732" calcext:value-type="float">
            <text:p>9732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12638888888889" calcext:value-type="float">
            <text:p>0,00112638888888889000</text:p>
          </table:table-cell>
          <table:table-cell table:formula="of:=[.D813]-[.D8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2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12777777777778" calcext:value-type="float">
            <text:p>0,00112777777777778000</text:p>
          </table:table-cell>
          <table:table-cell table:formula="of:=[.D814]-[.D813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2" office:value-type="float" office:value="9756" calcext:value-type="float">
            <text:p>9756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12916666666667" calcext:value-type="float">
            <text:p>0,00112916666666667000</text:p>
          </table:table-cell>
          <table:table-cell table:formula="of:=[.D815]-[.D8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2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13055555555556" calcext:value-type="float">
            <text:p>0,00113055555555556000</text:p>
          </table:table-cell>
          <table:table-cell table:formula="of:=[.D816]-[.D8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2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13194444444444" calcext:value-type="float">
            <text:p>0,00113194444444444000</text:p>
          </table:table-cell>
          <table:table-cell table:formula="of:=[.D817]-[.D8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2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13333333333333" calcext:value-type="float">
            <text:p>0,00113333333333333000</text:p>
          </table:table-cell>
          <table:table-cell table:formula="of:=[.D818]-[.D8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2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13472222222222" calcext:value-type="float">
            <text:p>0,00113472222222222000</text:p>
          </table:table-cell>
          <table:table-cell table:formula="of:=[.D819]-[.D8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2" office:value-type="float" office:value="9816" calcext:value-type="float">
            <text:p>9816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13611111111111" calcext:value-type="float">
            <text:p>0,00113611111111111000</text:p>
          </table:table-cell>
          <table:table-cell table:formula="of:=[.D820]-[.D8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2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1375" calcext:value-type="float">
            <text:p>0,00113750000000000000</text:p>
          </table:table-cell>
          <table:table-cell table:formula="of:=[.D821]-[.D8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2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13888888888889" calcext:value-type="float">
            <text:p>0,00113888888888889000</text:p>
          </table:table-cell>
          <table:table-cell table:formula="of:=[.D822]-[.D8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2" office:value-type="float" office:value="9852" calcext:value-type="float">
            <text:p>9852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14027777777778" calcext:value-type="float">
            <text:p>0,00114027777777778000</text:p>
          </table:table-cell>
          <table:table-cell table:formula="of:=[.D823]-[.D8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2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14166666666667" calcext:value-type="float">
            <text:p>0,00114166666666667000</text:p>
          </table:table-cell>
          <table:table-cell table:formula="of:=[.D824]-[.D8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2" office:value-type="float" office:value="9876" calcext:value-type="float">
            <text:p>9876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14305555555556" calcext:value-type="float">
            <text:p>0,00114305555555556000</text:p>
          </table:table-cell>
          <table:table-cell table:formula="of:=[.D825]-[.D8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2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14444444444444" calcext:value-type="float">
            <text:p>0,00114444444444444000</text:p>
          </table:table-cell>
          <table:table-cell table:formula="of:=[.D826]-[.D8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2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14583333333333" calcext:value-type="float">
            <text:p>0,00114583333333333000</text:p>
          </table:table-cell>
          <table:table-cell table:formula="of:=[.D827]-[.D8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2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14722222222222" calcext:value-type="float">
            <text:p>0,00114722222222222000</text:p>
          </table:table-cell>
          <table:table-cell table:formula="of:=[.D828]-[.D8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2" office:value-type="float" office:value="9924" calcext:value-type="float">
            <text:p>9924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14861111111111" calcext:value-type="float">
            <text:p>0,00114861111111111000</text:p>
          </table:table-cell>
          <table:table-cell table:formula="of:=[.D829]-[.D8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2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15" calcext:value-type="float">
            <text:p>0,00115000000000000000</text:p>
          </table:table-cell>
          <table:table-cell table:formula="of:=[.D830]-[.D8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2" office:value-type="float" office:value="9948" calcext:value-type="float">
            <text:p>9948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15138888888889" calcext:value-type="float">
            <text:p>0,00115138888888889000</text:p>
          </table:table-cell>
          <table:table-cell table:formula="of:=[.D831]-[.D8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2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15277777777778" calcext:value-type="float">
            <text:p>0,00115277777777778000</text:p>
          </table:table-cell>
          <table:table-cell table:formula="of:=[.D832]-[.D8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2" office:value-type="float" office:value="9972" calcext:value-type="float">
            <text:p>9972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15416666666667" calcext:value-type="float">
            <text:p>0,00115416666666667000</text:p>
          </table:table-cell>
          <table:table-cell table:formula="of:=[.D833]-[.D8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2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15555555555556" calcext:value-type="float">
            <text:p>0,00115555555555556000</text:p>
          </table:table-cell>
          <table:table-cell table:formula="of:=[.D834]-[.D8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2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15694444444444" calcext:value-type="float">
            <text:p>0,00115694444444444000</text:p>
          </table:table-cell>
          <table:table-cell table:formula="of:=[.D835]-[.D8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2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15833333333333" calcext:value-type="float">
            <text:p>0,00115833333333333000</text:p>
          </table:table-cell>
          <table:table-cell table:formula="of:=[.D836]-[.D8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2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15972222222222" calcext:value-type="float">
            <text:p>0,00115972222222222000</text:p>
          </table:table-cell>
          <table:table-cell table:formula="of:=[.D837]-[.D8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2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16111111111111" calcext:value-type="float">
            <text:p>0,00116111111111111000</text:p>
          </table:table-cell>
          <table:table-cell table:formula="of:=[.D838]-[.D8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2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1625" calcext:value-type="float">
            <text:p>0,00116250000000000000</text:p>
          </table:table-cell>
          <table:table-cell table:formula="of:=[.D839]-[.D8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2" office:value-type="float" office:value="10056" calcext:value-type="float">
            <text:p>10056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16388888888889" calcext:value-type="float">
            <text:p>0,00116388888888889000</text:p>
          </table:table-cell>
          <table:table-cell table:formula="of:=[.D840]-[.D839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2" office:value-type="float" office:value="10068" calcext:value-type="float">
            <text:p>10068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16527777777778" calcext:value-type="float">
            <text:p>0,00116527777777778000</text:p>
          </table:table-cell>
          <table:table-cell table:formula="of:=[.D841]-[.D8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2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16666666666667" calcext:value-type="float">
            <text:p>0,00116666666666667000</text:p>
          </table:table-cell>
          <table:table-cell table:formula="of:=[.D842]-[.D8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2" office:value-type="float" office:value="10092" calcext:value-type="float">
            <text:p>10092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16805555555556" calcext:value-type="float">
            <text:p>0,00116805555555556000</text:p>
          </table:table-cell>
          <table:table-cell table:formula="of:=[.D843]-[.D8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2" office:value-type="float" office:value="10104" calcext:value-type="float">
            <text:p>10104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16944444444444" calcext:value-type="float">
            <text:p>0,00116944444444444000</text:p>
          </table:table-cell>
          <table:table-cell table:formula="of:=[.D844]-[.D8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2" office:value-type="float" office:value="10116" calcext:value-type="float">
            <text:p>10116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17083333333333" calcext:value-type="float">
            <text:p>0,00117083333333333000</text:p>
          </table:table-cell>
          <table:table-cell table:formula="of:=[.D845]-[.D8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2" office:value-type="float" office:value="10128" calcext:value-type="float">
            <text:p>10128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17222222222222" calcext:value-type="float">
            <text:p>0,00117222222222222000</text:p>
          </table:table-cell>
          <table:table-cell table:formula="of:=[.D846]-[.D8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2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17361111111111" calcext:value-type="float">
            <text:p>0,00117361111111111000</text:p>
          </table:table-cell>
          <table:table-cell table:formula="of:=[.D847]-[.D8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2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175" calcext:value-type="float">
            <text:p>0,00117500000000000000</text:p>
          </table:table-cell>
          <table:table-cell table:formula="of:=[.D848]-[.D8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2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17638888888889" calcext:value-type="float">
            <text:p>0,00117638888888889000</text:p>
          </table:table-cell>
          <table:table-cell table:formula="of:=[.D849]-[.D8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2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17777777777778" calcext:value-type="float">
            <text:p>0,00117777777777778000</text:p>
          </table:table-cell>
          <table:table-cell table:formula="of:=[.D850]-[.D8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2" office:value-type="float" office:value="10188" calcext:value-type="float">
            <text:p>10188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17916666666667" calcext:value-type="float">
            <text:p>0,00117916666666667000</text:p>
          </table:table-cell>
          <table:table-cell table:formula="of:=[.D851]-[.D8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2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18055555555556" calcext:value-type="float">
            <text:p>0,00118055555555556000</text:p>
          </table:table-cell>
          <table:table-cell table:formula="of:=[.D852]-[.D8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2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18194444444444" calcext:value-type="float">
            <text:p>0,00118194444444444000</text:p>
          </table:table-cell>
          <table:table-cell table:formula="of:=[.D853]-[.D8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2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18333333333333" calcext:value-type="float">
            <text:p>0,00118333333333333000</text:p>
          </table:table-cell>
          <table:table-cell table:formula="of:=[.D854]-[.D8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2" office:value-type="float" office:value="10236" calcext:value-type="float">
            <text:p>10236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18472222222222" calcext:value-type="float">
            <text:p>0,00118472222222222000</text:p>
          </table:table-cell>
          <table:table-cell table:formula="of:=[.D855]-[.D8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2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18611111111111" calcext:value-type="float">
            <text:p>0,00118611111111111000</text:p>
          </table:table-cell>
          <table:table-cell table:formula="of:=[.D856]-[.D8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2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1875" calcext:value-type="float">
            <text:p>0,00118750000000000000</text:p>
          </table:table-cell>
          <table:table-cell table:formula="of:=[.D857]-[.D8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2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18888888888889" calcext:value-type="float">
            <text:p>0,00118888888888889000</text:p>
          </table:table-cell>
          <table:table-cell table:formula="of:=[.D858]-[.D8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2" office:value-type="float" office:value="10284" calcext:value-type="float">
            <text:p>10284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19027777777778" calcext:value-type="float">
            <text:p>0,00119027777777778000</text:p>
          </table:table-cell>
          <table:table-cell table:formula="of:=[.D859]-[.D8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2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19166666666667" calcext:value-type="float">
            <text:p>0,00119166666666667000</text:p>
          </table:table-cell>
          <table:table-cell table:formula="of:=[.D860]-[.D8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2" office:value-type="float" office:value="10308" calcext:value-type="float">
            <text:p>10308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19305555555556" calcext:value-type="float">
            <text:p>0,00119305555555556000</text:p>
          </table:table-cell>
          <table:table-cell table:formula="of:=[.D861]-[.D8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2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19444444444444" calcext:value-type="float">
            <text:p>0,00119444444444444000</text:p>
          </table:table-cell>
          <table:table-cell table:formula="of:=[.D862]-[.D8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2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19583333333333" calcext:value-type="float">
            <text:p>0,00119583333333333000</text:p>
          </table:table-cell>
          <table:table-cell table:formula="of:=[.D863]-[.D8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2" office:value-type="float" office:value="10344" calcext:value-type="float">
            <text:p>10344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19722222222222" calcext:value-type="float">
            <text:p>0,00119722222222222000</text:p>
          </table:table-cell>
          <table:table-cell table:formula="of:=[.D864]-[.D8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2" office:value-type="float" office:value="10356" calcext:value-type="float">
            <text:p>10356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19861111111111" calcext:value-type="float">
            <text:p>0,00119861111111111000</text:p>
          </table:table-cell>
          <table:table-cell table:formula="of:=[.D865]-[.D8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2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2" calcext:value-type="float">
            <text:p>0,00120000000000000000</text:p>
          </table:table-cell>
          <table:table-cell table:formula="of:=[.D866]-[.D865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2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20138888888889" calcext:value-type="float">
            <text:p>0,00120138888888889000</text:p>
          </table:table-cell>
          <table:table-cell table:formula="of:=[.D867]-[.D8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2" office:value-type="float" office:value="10392" calcext:value-type="float">
            <text:p>10392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20277777777778" calcext:value-type="float">
            <text:p>0,00120277777777778000</text:p>
          </table:table-cell>
          <table:table-cell table:formula="of:=[.D868]-[.D8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2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20416666666667" calcext:value-type="float">
            <text:p>0,00120416666666667000</text:p>
          </table:table-cell>
          <table:table-cell table:formula="of:=[.D869]-[.D8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2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20555555555556" calcext:value-type="float">
            <text:p>0,00120555555555556000</text:p>
          </table:table-cell>
          <table:table-cell table:formula="of:=[.D870]-[.D8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2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20694444444444" calcext:value-type="float">
            <text:p>0,00120694444444444000</text:p>
          </table:table-cell>
          <table:table-cell table:formula="of:=[.D871]-[.D8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2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20833333333333" calcext:value-type="float">
            <text:p>0,00120833333333333000</text:p>
          </table:table-cell>
          <table:table-cell table:formula="of:=[.D872]-[.D8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2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20972222222222" calcext:value-type="float">
            <text:p>0,00120972222222222000</text:p>
          </table:table-cell>
          <table:table-cell table:formula="of:=[.D873]-[.D8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2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21111111111111" calcext:value-type="float">
            <text:p>0,00121111111111111000</text:p>
          </table:table-cell>
          <table:table-cell table:formula="of:=[.D874]-[.D8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2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2125" calcext:value-type="float">
            <text:p>0,00121250000000000000</text:p>
          </table:table-cell>
          <table:table-cell table:formula="of:=[.D875]-[.D8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2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21388888888889" calcext:value-type="float">
            <text:p>0,00121388888888889000</text:p>
          </table:table-cell>
          <table:table-cell table:formula="of:=[.D876]-[.D8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2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21527777777778" calcext:value-type="float">
            <text:p>0,00121527777777778000</text:p>
          </table:table-cell>
          <table:table-cell table:formula="of:=[.D877]-[.D8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2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21666666666667" calcext:value-type="float">
            <text:p>0,00121666666666667000</text:p>
          </table:table-cell>
          <table:table-cell table:formula="of:=[.D878]-[.D8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2" office:value-type="float" office:value="10524" calcext:value-type="float">
            <text:p>10524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21805555555556" calcext:value-type="float">
            <text:p>0,00121805555555556000</text:p>
          </table:table-cell>
          <table:table-cell table:formula="of:=[.D879]-[.D8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2" office:value-type="float" office:value="10536" calcext:value-type="float">
            <text:p>10536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21944444444444" calcext:value-type="float">
            <text:p>0,00121944444444444000</text:p>
          </table:table-cell>
          <table:table-cell table:formula="of:=[.D880]-[.D8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2" office:value-type="float" office:value="10548" calcext:value-type="float">
            <text:p>10548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22083333333333" calcext:value-type="float">
            <text:p>0,00122083333333333000</text:p>
          </table:table-cell>
          <table:table-cell table:formula="of:=[.D881]-[.D8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2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22222222222222" calcext:value-type="float">
            <text:p>0,00122222222222222000</text:p>
          </table:table-cell>
          <table:table-cell table:formula="of:=[.D882]-[.D8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2" office:value-type="float" office:value="10572" calcext:value-type="float">
            <text:p>10572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22361111111111" calcext:value-type="float">
            <text:p>0,00122361111111111000</text:p>
          </table:table-cell>
          <table:table-cell table:formula="of:=[.D883]-[.D8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2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225" calcext:value-type="float">
            <text:p>0,00122500000000000000</text:p>
          </table:table-cell>
          <table:table-cell table:formula="of:=[.D884]-[.D8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2" office:value-type="float" office:value="10596" calcext:value-type="float">
            <text:p>10596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22638888888889" calcext:value-type="float">
            <text:p>0,00122638888888889000</text:p>
          </table:table-cell>
          <table:table-cell table:formula="of:=[.D885]-[.D8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2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22777777777778" calcext:value-type="float">
            <text:p>0,00122777777777778000</text:p>
          </table:table-cell>
          <table:table-cell table:formula="of:=[.D886]-[.D8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2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22916666666667" calcext:value-type="float">
            <text:p>0,00122916666666667000</text:p>
          </table:table-cell>
          <table:table-cell table:formula="of:=[.D887]-[.D8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2" office:value-type="float" office:value="10632" calcext:value-type="float">
            <text:p>10632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23055555555556" calcext:value-type="float">
            <text:p>0,00123055555555556000</text:p>
          </table:table-cell>
          <table:table-cell table:formula="of:=[.D888]-[.D8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2" office:value-type="float" office:value="10644" calcext:value-type="float">
            <text:p>10644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23194444444444" calcext:value-type="float">
            <text:p>0,00123194444444444000</text:p>
          </table:table-cell>
          <table:table-cell table:formula="of:=[.D889]-[.D8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2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23333333333333" calcext:value-type="float">
            <text:p>0,00123333333333333000</text:p>
          </table:table-cell>
          <table:table-cell table:formula="of:=[.D890]-[.D8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2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23472222222222" calcext:value-type="float">
            <text:p>0,00123472222222222000</text:p>
          </table:table-cell>
          <table:table-cell table:formula="of:=[.D891]-[.D8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2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23611111111111" calcext:value-type="float">
            <text:p>0,00123611111111111000</text:p>
          </table:table-cell>
          <table:table-cell table:formula="of:=[.D892]-[.D891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2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2375" calcext:value-type="float">
            <text:p>0,00123750000000000000</text:p>
          </table:table-cell>
          <table:table-cell table:formula="of:=[.D893]-[.D8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2" office:value-type="float" office:value="10704" calcext:value-type="float">
            <text:p>10704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23888888888889" calcext:value-type="float">
            <text:p>0,00123888888888889000</text:p>
          </table:table-cell>
          <table:table-cell table:formula="of:=[.D894]-[.D8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2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24027777777778" calcext:value-type="float">
            <text:p>0,00124027777777778000</text:p>
          </table:table-cell>
          <table:table-cell table:formula="of:=[.D895]-[.D8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2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24166666666667" calcext:value-type="float">
            <text:p>0,00124166666666667000</text:p>
          </table:table-cell>
          <table:table-cell table:formula="of:=[.D896]-[.D8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2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24305555555556" calcext:value-type="float">
            <text:p>0,00124305555555556000</text:p>
          </table:table-cell>
          <table:table-cell table:formula="of:=[.D897]-[.D8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2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24444444444444" calcext:value-type="float">
            <text:p>0,00124444444444444000</text:p>
          </table:table-cell>
          <table:table-cell table:formula="of:=[.D898]-[.D8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2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24583333333333" calcext:value-type="float">
            <text:p>0,00124583333333333000</text:p>
          </table:table-cell>
          <table:table-cell table:formula="of:=[.D899]-[.D8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2" office:value-type="float" office:value="10776" calcext:value-type="float">
            <text:p>10776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24722222222222" calcext:value-type="float">
            <text:p>0,00124722222222222000</text:p>
          </table:table-cell>
          <table:table-cell table:formula="of:=[.D900]-[.D8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2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24861111111111" calcext:value-type="float">
            <text:p>0,00124861111111111000</text:p>
          </table:table-cell>
          <table:table-cell table:formula="of:=[.D901]-[.D9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2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25" calcext:value-type="float">
            <text:p>0,00125000000000000000</text:p>
          </table:table-cell>
          <table:table-cell table:formula="of:=[.D902]-[.D9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2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25138888888889" calcext:value-type="float">
            <text:p>0,00125138888888889000</text:p>
          </table:table-cell>
          <table:table-cell table:formula="of:=[.D903]-[.D9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2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25277777777778" calcext:value-type="float">
            <text:p>0,00125277777777778000</text:p>
          </table:table-cell>
          <table:table-cell table:formula="of:=[.D904]-[.D9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2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25416666666667" calcext:value-type="float">
            <text:p>0,00125416666666667000</text:p>
          </table:table-cell>
          <table:table-cell table:formula="of:=[.D905]-[.D9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2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25555555555556" calcext:value-type="float">
            <text:p>0,00125555555555556000</text:p>
          </table:table-cell>
          <table:table-cell table:formula="of:=[.D906]-[.D9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2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25694444444444" calcext:value-type="float">
            <text:p>0,00125694444444444000</text:p>
          </table:table-cell>
          <table:table-cell table:formula="of:=[.D907]-[.D9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2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25833333333333" calcext:value-type="float">
            <text:p>0,00125833333333333000</text:p>
          </table:table-cell>
          <table:table-cell table:formula="of:=[.D908]-[.D9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2" office:value-type="float" office:value="10884" calcext:value-type="float">
            <text:p>10884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25972222222222" calcext:value-type="float">
            <text:p>0,00125972222222222000</text:p>
          </table:table-cell>
          <table:table-cell table:formula="of:=[.D909]-[.D9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2" office:value-type="float" office:value="10896" calcext:value-type="float">
            <text:p>10896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26111111111111" calcext:value-type="float">
            <text:p>0,00126111111111111000</text:p>
          </table:table-cell>
          <table:table-cell table:formula="of:=[.D910]-[.D9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2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2625" calcext:value-type="float">
            <text:p>0,00126250000000000000</text:p>
          </table:table-cell>
          <table:table-cell table:formula="of:=[.D911]-[.D9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2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26388888888889" calcext:value-type="float">
            <text:p>0,00126388888888889000</text:p>
          </table:table-cell>
          <table:table-cell table:formula="of:=[.D912]-[.D9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2" office:value-type="float" office:value="10932" calcext:value-type="float">
            <text:p>10932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26527777777778" calcext:value-type="float">
            <text:p>0,00126527777777778000</text:p>
          </table:table-cell>
          <table:table-cell table:formula="of:=[.D913]-[.D9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2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26666666666667" calcext:value-type="float">
            <text:p>0,00126666666666667000</text:p>
          </table:table-cell>
          <table:table-cell table:formula="of:=[.D914]-[.D9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2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26805555555556" calcext:value-type="float">
            <text:p>0,00126805555555556000</text:p>
          </table:table-cell>
          <table:table-cell table:formula="of:=[.D915]-[.D9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2" office:value-type="float" office:value="10968" calcext:value-type="float">
            <text:p>10968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26944444444444" calcext:value-type="float">
            <text:p>0,00126944444444444000</text:p>
          </table:table-cell>
          <table:table-cell table:formula="of:=[.D916]-[.D9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2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27083333333333" calcext:value-type="float">
            <text:p>0,00127083333333333000</text:p>
          </table:table-cell>
          <table:table-cell table:formula="of:=[.D917]-[.D916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2" office:value-type="float" office:value="10992" calcext:value-type="float">
            <text:p>10992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27222222222222" calcext:value-type="float">
            <text:p>0,00127222222222222000</text:p>
          </table:table-cell>
          <table:table-cell table:formula="of:=[.D918]-[.D9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2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27361111111111" calcext:value-type="float">
            <text:p>0,00127361111111111000</text:p>
          </table:table-cell>
          <table:table-cell table:formula="of:=[.D919]-[.D9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2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275" calcext:value-type="float">
            <text:p>0,00127500000000000000</text:p>
          </table:table-cell>
          <table:table-cell table:formula="of:=[.D920]-[.D9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2" office:value-type="float" office:value="11028" calcext:value-type="float">
            <text:p>11028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27638888888889" calcext:value-type="float">
            <text:p>0,00127638888888889000</text:p>
          </table:table-cell>
          <table:table-cell table:formula="of:=[.D921]-[.D9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2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27777777777778" calcext:value-type="float">
            <text:p>0,00127777777777778000</text:p>
          </table:table-cell>
          <table:table-cell table:formula="of:=[.D922]-[.D9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2" office:value-type="float" office:value="11052" calcext:value-type="float">
            <text:p>11052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27916666666667" calcext:value-type="float">
            <text:p>0,00127916666666667000</text:p>
          </table:table-cell>
          <table:table-cell table:formula="of:=[.D923]-[.D9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2" office:value-type="float" office:value="11064" calcext:value-type="float">
            <text:p>11064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28055555555556" calcext:value-type="float">
            <text:p>0,00128055555555556000</text:p>
          </table:table-cell>
          <table:table-cell table:formula="of:=[.D924]-[.D9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2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28194444444444" calcext:value-type="float">
            <text:p>0,00128194444444444000</text:p>
          </table:table-cell>
          <table:table-cell table:formula="of:=[.D925]-[.D9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2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28333333333333" calcext:value-type="float">
            <text:p>0,00128333333333333000</text:p>
          </table:table-cell>
          <table:table-cell table:formula="of:=[.D926]-[.D9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2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28472222222222" calcext:value-type="float">
            <text:p>0,00128472222222222000</text:p>
          </table:table-cell>
          <table:table-cell table:formula="of:=[.D927]-[.D9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2" office:value-type="float" office:value="11112" calcext:value-type="float">
            <text:p>11112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28611111111111" calcext:value-type="float">
            <text:p>0,00128611111111111000</text:p>
          </table:table-cell>
          <table:table-cell table:formula="of:=[.D928]-[.D9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2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2875" calcext:value-type="float">
            <text:p>0,00128750000000000000</text:p>
          </table:table-cell>
          <table:table-cell table:formula="of:=[.D929]-[.D9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2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28888888888889" calcext:value-type="float">
            <text:p>0,00128888888888889000</text:p>
          </table:table-cell>
          <table:table-cell table:formula="of:=[.D930]-[.D9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2" office:value-type="float" office:value="11148" calcext:value-type="float">
            <text:p>11148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29027777777778" calcext:value-type="float">
            <text:p>0,00129027777777778000</text:p>
          </table:table-cell>
          <table:table-cell table:formula="of:=[.D931]-[.D9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2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29166666666667" calcext:value-type="float">
            <text:p>0,00129166666666667000</text:p>
          </table:table-cell>
          <table:table-cell table:formula="of:=[.D932]-[.D9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2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29305555555556" calcext:value-type="float">
            <text:p>0,00129305555555556000</text:p>
          </table:table-cell>
          <table:table-cell table:formula="of:=[.D933]-[.D9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2" office:value-type="float" office:value="11184" calcext:value-type="float">
            <text:p>11184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29444444444444" calcext:value-type="float">
            <text:p>0,00129444444444444000</text:p>
          </table:table-cell>
          <table:table-cell table:formula="of:=[.D934]-[.D9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2" office:value-type="float" office:value="11196" calcext:value-type="float">
            <text:p>11196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29583333333333" calcext:value-type="float">
            <text:p>0,00129583333333333000</text:p>
          </table:table-cell>
          <table:table-cell table:formula="of:=[.D935]-[.D9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2" office:value-type="float" office:value="11208" calcext:value-type="float">
            <text:p>11208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29722222222222" calcext:value-type="float">
            <text:p>0,00129722222222222000</text:p>
          </table:table-cell>
          <table:table-cell table:formula="of:=[.D936]-[.D9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2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29861111111111" calcext:value-type="float">
            <text:p>0,00129861111111111000</text:p>
          </table:table-cell>
          <table:table-cell table:formula="of:=[.D937]-[.D9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2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3" calcext:value-type="float">
            <text:p>0,00130000000000000000</text:p>
          </table:table-cell>
          <table:table-cell table:formula="of:=[.D938]-[.D9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2" office:value-type="float" office:value="11244" calcext:value-type="float">
            <text:p>11244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30138888888889" calcext:value-type="float">
            <text:p>0,00130138888888889000</text:p>
          </table:table-cell>
          <table:table-cell table:formula="of:=[.D939]-[.D9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2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30277777777778" calcext:value-type="float">
            <text:p>0,00130277777777778000</text:p>
          </table:table-cell>
          <table:table-cell table:formula="of:=[.D940]-[.D9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2" office:value-type="float" office:value="11268" calcext:value-type="float">
            <text:p>11268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30416666666667" calcext:value-type="float">
            <text:p>0,00130416666666667000</text:p>
          </table:table-cell>
          <table:table-cell table:formula="of:=[.D941]-[.D9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2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30555555555556" calcext:value-type="float">
            <text:p>0,00130555555555556000</text:p>
          </table:table-cell>
          <table:table-cell table:formula="of:=[.D942]-[.D9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2" office:value-type="float" office:value="11292" calcext:value-type="float">
            <text:p>11292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30694444444444" calcext:value-type="float">
            <text:p>0,00130694444444444000</text:p>
          </table:table-cell>
          <table:table-cell table:formula="of:=[.D943]-[.D942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2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30833333333333" calcext:value-type="float">
            <text:p>0,00130833333333333000</text:p>
          </table:table-cell>
          <table:table-cell table:formula="of:=[.D944]-[.D9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2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30972222222222" calcext:value-type="float">
            <text:p>0,00130972222222222000</text:p>
          </table:table-cell>
          <table:table-cell table:formula="of:=[.D945]-[.D9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2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31111111111111" calcext:value-type="float">
            <text:p>0,00131111111111111000</text:p>
          </table:table-cell>
          <table:table-cell table:formula="of:=[.D946]-[.D9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2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3125" calcext:value-type="float">
            <text:p>0,00131250000000000000</text:p>
          </table:table-cell>
          <table:table-cell table:formula="of:=[.D947]-[.D9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2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31388888888889" calcext:value-type="float">
            <text:p>0,00131388888888889000</text:p>
          </table:table-cell>
          <table:table-cell table:formula="of:=[.D948]-[.D9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2" office:value-type="float" office:value="11364" calcext:value-type="float">
            <text:p>11364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31527777777778" calcext:value-type="float">
            <text:p>0,00131527777777778000</text:p>
          </table:table-cell>
          <table:table-cell table:formula="of:=[.D949]-[.D9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2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31666666666667" calcext:value-type="float">
            <text:p>0,00131666666666667000</text:p>
          </table:table-cell>
          <table:table-cell table:formula="of:=[.D950]-[.D9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2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31805555555556" calcext:value-type="float">
            <text:p>0,00131805555555556000</text:p>
          </table:table-cell>
          <table:table-cell table:formula="of:=[.D951]-[.D9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2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31944444444444" calcext:value-type="float">
            <text:p>0,00131944444444444000</text:p>
          </table:table-cell>
          <table:table-cell table:formula="of:=[.D952]-[.D9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2" office:value-type="float" office:value="11412" calcext:value-type="float">
            <text:p>11412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32083333333333" calcext:value-type="float">
            <text:p>0,00132083333333333000</text:p>
          </table:table-cell>
          <table:table-cell table:formula="of:=[.D953]-[.D9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2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32222222222222" calcext:value-type="float">
            <text:p>0,00132222222222222000</text:p>
          </table:table-cell>
          <table:table-cell table:formula="of:=[.D954]-[.D9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2" office:value-type="float" office:value="11436" calcext:value-type="float">
            <text:p>11436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32361111111111" calcext:value-type="float">
            <text:p>0,00132361111111111000</text:p>
          </table:table-cell>
          <table:table-cell table:formula="of:=[.D955]-[.D9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2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325" calcext:value-type="float">
            <text:p>0,00132500000000000000</text:p>
          </table:table-cell>
          <table:table-cell table:formula="of:=[.D956]-[.D9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2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32638888888889" calcext:value-type="float">
            <text:p>0,00132638888888889000</text:p>
          </table:table-cell>
          <table:table-cell table:formula="of:=[.D957]-[.D9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2" office:value-type="float" office:value="11472" calcext:value-type="float">
            <text:p>11472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32777777777778" calcext:value-type="float">
            <text:p>0,00132777777777778000</text:p>
          </table:table-cell>
          <table:table-cell table:formula="of:=[.D958]-[.D9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2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32916666666667" calcext:value-type="float">
            <text:p>0,00132916666666667000</text:p>
          </table:table-cell>
          <table:table-cell table:formula="of:=[.D959]-[.D9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2" office:value-type="float" office:value="11496" calcext:value-type="float">
            <text:p>11496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33055555555556" calcext:value-type="float">
            <text:p>0,00133055555555556000</text:p>
          </table:table-cell>
          <table:table-cell table:formula="of:=[.D960]-[.D9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2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33194444444444" calcext:value-type="float">
            <text:p>0,00133194444444444000</text:p>
          </table:table-cell>
          <table:table-cell table:formula="of:=[.D961]-[.D9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2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33333333333333" calcext:value-type="float">
            <text:p>0,00133333333333333000</text:p>
          </table:table-cell>
          <table:table-cell table:formula="of:=[.D962]-[.D9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2" office:value-type="float" office:value="11532" calcext:value-type="float">
            <text:p>11532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33472222222222" calcext:value-type="float">
            <text:p>0,00133472222222222000</text:p>
          </table:table-cell>
          <table:table-cell table:formula="of:=[.D963]-[.D9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2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33611111111111" calcext:value-type="float">
            <text:p>0,00133611111111111000</text:p>
          </table:table-cell>
          <table:table-cell table:formula="of:=[.D964]-[.D9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2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3375" calcext:value-type="float">
            <text:p>0,00133750000000000000</text:p>
          </table:table-cell>
          <table:table-cell table:formula="of:=[.D965]-[.D9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2" office:value-type="float" office:value="11568" calcext:value-type="float">
            <text:p>11568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33888888888889" calcext:value-type="float">
            <text:p>0,00133888888888889000</text:p>
          </table:table-cell>
          <table:table-cell table:formula="of:=[.D966]-[.D9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2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34027777777778" calcext:value-type="float">
            <text:p>0,00134027777777778000</text:p>
          </table:table-cell>
          <table:table-cell table:formula="of:=[.D967]-[.D9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2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34166666666667" calcext:value-type="float">
            <text:p>0,00134166666666667000</text:p>
          </table:table-cell>
          <table:table-cell table:formula="of:=[.D968]-[.D9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2" office:value-type="float" office:value="11604" calcext:value-type="float">
            <text:p>11604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34305555555556" calcext:value-type="float">
            <text:p>0,00134305555555556000</text:p>
          </table:table-cell>
          <table:table-cell table:formula="of:=[.D969]-[.D968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2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34444444444444" calcext:value-type="float">
            <text:p>0,00134444444444444000</text:p>
          </table:table-cell>
          <table:table-cell table:formula="of:=[.D970]-[.D9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2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34583333333333" calcext:value-type="float">
            <text:p>0,00134583333333333000</text:p>
          </table:table-cell>
          <table:table-cell table:formula="of:=[.D971]-[.D9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2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34722222222222" calcext:value-type="float">
            <text:p>0,00134722222222222000</text:p>
          </table:table-cell>
          <table:table-cell table:formula="of:=[.D972]-[.D9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2" office:value-type="float" office:value="11652" calcext:value-type="float">
            <text:p>11652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34861111111111" calcext:value-type="float">
            <text:p>0,00134861111111111000</text:p>
          </table:table-cell>
          <table:table-cell table:formula="of:=[.D973]-[.D9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2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35" calcext:value-type="float">
            <text:p>0,00135000000000000000</text:p>
          </table:table-cell>
          <table:table-cell table:formula="of:=[.D974]-[.D9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2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35138888888889" calcext:value-type="float">
            <text:p>0,00135138888888889000</text:p>
          </table:table-cell>
          <table:table-cell table:formula="of:=[.D975]-[.D9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2" office:value-type="float" office:value="11688" calcext:value-type="float">
            <text:p>11688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35277777777778" calcext:value-type="float">
            <text:p>0,00135277777777778000</text:p>
          </table:table-cell>
          <table:table-cell table:formula="of:=[.D976]-[.D9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2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35416666666667" calcext:value-type="float">
            <text:p>0,00135416666666667000</text:p>
          </table:table-cell>
          <table:table-cell table:formula="of:=[.D977]-[.D9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2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35555555555556" calcext:value-type="float">
            <text:p>0,00135555555555556000</text:p>
          </table:table-cell>
          <table:table-cell table:formula="of:=[.D978]-[.D9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2" office:value-type="float" office:value="11724" calcext:value-type="float">
            <text:p>11724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35694444444444" calcext:value-type="float">
            <text:p>0,00135694444444444000</text:p>
          </table:table-cell>
          <table:table-cell table:formula="of:=[.D979]-[.D9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2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35833333333333" calcext:value-type="float">
            <text:p>0,00135833333333333000</text:p>
          </table:table-cell>
          <table:table-cell table:formula="of:=[.D980]-[.D9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2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35972222222222" calcext:value-type="float">
            <text:p>0,00135972222222222000</text:p>
          </table:table-cell>
          <table:table-cell table:formula="of:=[.D981]-[.D9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2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36111111111111" calcext:value-type="float">
            <text:p>0,00136111111111111000</text:p>
          </table:table-cell>
          <table:table-cell table:formula="of:=[.D982]-[.D9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2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3625" calcext:value-type="float">
            <text:p>0,00136250000000000000</text:p>
          </table:table-cell>
          <table:table-cell table:formula="of:=[.D983]-[.D9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2" office:value-type="float" office:value="11784" calcext:value-type="float">
            <text:p>11784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36388888888889" calcext:value-type="float">
            <text:p>0,00136388888888889000</text:p>
          </table:table-cell>
          <table:table-cell table:formula="of:=[.D984]-[.D9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2" office:value-type="float" office:value="11796" calcext:value-type="float">
            <text:p>11796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36527777777778" calcext:value-type="float">
            <text:p>0,00136527777777778000</text:p>
          </table:table-cell>
          <table:table-cell table:formula="of:=[.D985]-[.D9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2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36666666666667" calcext:value-type="float">
            <text:p>0,00136666666666667000</text:p>
          </table:table-cell>
          <table:table-cell table:formula="of:=[.D986]-[.D9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2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36805555555556" calcext:value-type="float">
            <text:p>0,00136805555555556000</text:p>
          </table:table-cell>
          <table:table-cell table:formula="of:=[.D987]-[.D9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2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36944444444444" calcext:value-type="float">
            <text:p>0,00136944444444444000</text:p>
          </table:table-cell>
          <table:table-cell table:formula="of:=[.D988]-[.D9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2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37083333333333" calcext:value-type="float">
            <text:p>0,00137083333333333000</text:p>
          </table:table-cell>
          <table:table-cell table:formula="of:=[.D989]-[.D9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2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37222222222222" calcext:value-type="float">
            <text:p>0,00137222222222222000</text:p>
          </table:table-cell>
          <table:table-cell table:formula="of:=[.D990]-[.D9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2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37361111111111" calcext:value-type="float">
            <text:p>0,00137361111111111000</text:p>
          </table:table-cell>
          <table:table-cell table:formula="of:=[.D991]-[.D9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2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375" calcext:value-type="float">
            <text:p>0,00137500000000000000</text:p>
          </table:table-cell>
          <table:table-cell table:formula="of:=[.D992]-[.D9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2" office:value-type="float" office:value="11892" calcext:value-type="float">
            <text:p>11892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37638888888889" calcext:value-type="float">
            <text:p>0,00137638888888889000</text:p>
          </table:table-cell>
          <table:table-cell table:formula="of:=[.D993]-[.D9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2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37777777777778" calcext:value-type="float">
            <text:p>0,00137777777777778000</text:p>
          </table:table-cell>
          <table:table-cell table:formula="of:=[.D994]-[.D9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2" office:value-type="float" office:value="11916" calcext:value-type="float">
            <text:p>11916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37916666666667" calcext:value-type="float">
            <text:p>0,00137916666666667000</text:p>
          </table:table-cell>
          <table:table-cell table:formula="of:=[.D995]-[.D994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2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38055555555556" calcext:value-type="float">
            <text:p>0,00138055555555556000</text:p>
          </table:table-cell>
          <table:table-cell table:formula="of:=[.D996]-[.D9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2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38194444444444" calcext:value-type="float">
            <text:p>0,00138194444444444000</text:p>
          </table:table-cell>
          <table:table-cell table:formula="of:=[.D997]-[.D9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2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38333333333333" calcext:value-type="float">
            <text:p>0,00138333333333333000</text:p>
          </table:table-cell>
          <table:table-cell table:formula="of:=[.D998]-[.D9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2" office:value-type="float" office:value="11964" calcext:value-type="float">
            <text:p>11964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38472222222222" calcext:value-type="float">
            <text:p>0,00138472222222222000</text:p>
          </table:table-cell>
          <table:table-cell table:formula="of:=[.D999]-[.D9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2" office:value-type="float" office:value="11976" calcext:value-type="float">
            <text:p>11976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38611111111111" calcext:value-type="float">
            <text:p>0,00138611111111111000</text:p>
          </table:table-cell>
          <table:table-cell table:formula="of:=[.D1000]-[.D9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2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3875" calcext:value-type="float">
            <text:p>0,00138750000000000000</text:p>
          </table:table-cell>
          <table:table-cell table:formula="of:=[.D1001]-[.D10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2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38888888888889" calcext:value-type="float">
            <text:p>0,00138888888888889000</text:p>
          </table:table-cell>
          <table:table-cell table:formula="of:=[.D1002]-[.D10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2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39027777777778" calcext:value-type="float">
            <text:p>0,00139027777777778000</text:p>
          </table:table-cell>
          <table:table-cell table:formula="of:=[.D1003]-[.D10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2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39166666666667" calcext:value-type="float">
            <text:p>0,00139166666666667000</text:p>
          </table:table-cell>
          <table:table-cell table:formula="of:=[.D1004]-[.D10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2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39305555555556" calcext:value-type="float">
            <text:p>0,00139305555555556000</text:p>
          </table:table-cell>
          <table:table-cell table:formula="of:=[.D1005]-[.D10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2" office:value-type="float" office:value="12048" calcext:value-type="float">
            <text:p>12048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39444444444444" calcext:value-type="float">
            <text:p>0,00139444444444444000</text:p>
          </table:table-cell>
          <table:table-cell table:formula="of:=[.D1006]-[.D10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2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39583333333333" calcext:value-type="float">
            <text:p>0,00139583333333333000</text:p>
          </table:table-cell>
          <table:table-cell table:formula="of:=[.D1007]-[.D10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2" office:value-type="float" office:value="12072" calcext:value-type="float">
            <text:p>12072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39722222222222" calcext:value-type="float">
            <text:p>0,00139722222222222000</text:p>
          </table:table-cell>
          <table:table-cell table:formula="of:=[.D1008]-[.D10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2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39861111111111" calcext:value-type="float">
            <text:p>0,00139861111111111000</text:p>
          </table:table-cell>
          <table:table-cell table:formula="of:=[.D1009]-[.D10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2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4" calcext:value-type="float">
            <text:p>0,00140000000000000000</text:p>
          </table:table-cell>
          <table:table-cell table:formula="of:=[.D1010]-[.D10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2" office:value-type="float" office:value="12108" calcext:value-type="float">
            <text:p>12108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40138888888889" calcext:value-type="float">
            <text:p>0,00140138888888889000</text:p>
          </table:table-cell>
          <table:table-cell table:formula="of:=[.D1011]-[.D10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2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40277777777778" calcext:value-type="float">
            <text:p>0,00140277777777778000</text:p>
          </table:table-cell>
          <table:table-cell table:formula="of:=[.D1012]-[.D10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2" office:value-type="float" office:value="12132" calcext:value-type="float">
            <text:p>12132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40416666666667" calcext:value-type="float">
            <text:p>0,00140416666666667000</text:p>
          </table:table-cell>
          <table:table-cell table:formula="of:=[.D1013]-[.D10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2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40555555555556" calcext:value-type="float">
            <text:p>0,00140555555555556000</text:p>
          </table:table-cell>
          <table:table-cell table:formula="of:=[.D1014]-[.D10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2" office:value-type="float" office:value="12156" calcext:value-type="float">
            <text:p>12156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40694444444444" calcext:value-type="float">
            <text:p>0,00140694444444444000</text:p>
          </table:table-cell>
          <table:table-cell table:formula="of:=[.D1015]-[.D10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2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40833333333333" calcext:value-type="float">
            <text:p>0,00140833333333333000</text:p>
          </table:table-cell>
          <table:table-cell table:formula="of:=[.D1016]-[.D10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2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40972222222222" calcext:value-type="float">
            <text:p>0,00140972222222222000</text:p>
          </table:table-cell>
          <table:table-cell table:formula="of:=[.D1017]-[.D10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2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41111111111111" calcext:value-type="float">
            <text:p>0,00141111111111111000</text:p>
          </table:table-cell>
          <table:table-cell table:formula="of:=[.D1018]-[.D10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2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4125" calcext:value-type="float">
            <text:p>0,00141250000000000000</text:p>
          </table:table-cell>
          <table:table-cell table:formula="of:=[.D1019]-[.D10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2" office:value-type="float" office:value="12216" calcext:value-type="float">
            <text:p>12216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41388888888889" calcext:value-type="float">
            <text:p>0,00141388888888889000</text:p>
          </table:table-cell>
          <table:table-cell table:formula="of:=[.D1020]-[.D10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2" office:value-type="float" office:value="12228" calcext:value-type="float">
            <text:p>12228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41527777777778" calcext:value-type="float">
            <text:p>0,00141527777777778000</text:p>
          </table:table-cell>
          <table:table-cell table:formula="of:=[.D1021]-[.D1020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2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41666666666667" calcext:value-type="float">
            <text:p>0,00141666666666667000</text:p>
          </table:table-cell>
          <table:table-cell table:formula="of:=[.D1022]-[.D10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2" office:value-type="float" office:value="12252" calcext:value-type="float">
            <text:p>12252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41805555555556" calcext:value-type="float">
            <text:p>0,00141805555555556000</text:p>
          </table:table-cell>
          <table:table-cell table:formula="of:=[.D1023]-[.D10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2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41944444444444" calcext:value-type="float">
            <text:p>0,00141944444444444000</text:p>
          </table:table-cell>
          <table:table-cell table:formula="of:=[.D1024]-[.D10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2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42083333333333" calcext:value-type="float">
            <text:p>0,00142083333333333000</text:p>
          </table:table-cell>
          <table:table-cell table:formula="of:=[.D1025]-[.D10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2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42222222222222" calcext:value-type="float">
            <text:p>0,00142222222222222000</text:p>
          </table:table-cell>
          <table:table-cell table:formula="of:=[.D1026]-[.D10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2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42361111111111" calcext:value-type="float">
            <text:p>0,00142361111111111000</text:p>
          </table:table-cell>
          <table:table-cell table:formula="of:=[.D1027]-[.D10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2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425" calcext:value-type="float">
            <text:p>0,00142500000000000000</text:p>
          </table:table-cell>
          <table:table-cell table:formula="of:=[.D1028]-[.D10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2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42638888888889" calcext:value-type="float">
            <text:p>0,00142638888888889000</text:p>
          </table:table-cell>
          <table:table-cell table:formula="of:=[.D1029]-[.D10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2" office:value-type="float" office:value="12336" calcext:value-type="float">
            <text:p>12336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42777777777778" calcext:value-type="float">
            <text:p>0,00142777777777778000</text:p>
          </table:table-cell>
          <table:table-cell table:formula="of:=[.D1030]-[.D10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2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42916666666667" calcext:value-type="float">
            <text:p>0,00142916666666667000</text:p>
          </table:table-cell>
          <table:table-cell table:formula="of:=[.D1031]-[.D10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2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43055555555556" calcext:value-type="float">
            <text:p>0,00143055555555556000</text:p>
          </table:table-cell>
          <table:table-cell table:formula="of:=[.D1032]-[.D10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2" office:value-type="float" office:value="12372" calcext:value-type="float">
            <text:p>12372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43194444444444" calcext:value-type="float">
            <text:p>0,00143194444444444000</text:p>
          </table:table-cell>
          <table:table-cell table:formula="of:=[.D1033]-[.D10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2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43333333333333" calcext:value-type="float">
            <text:p>0,00143333333333333000</text:p>
          </table:table-cell>
          <table:table-cell table:formula="of:=[.D1034]-[.D10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2" office:value-type="float" office:value="12396" calcext:value-type="float">
            <text:p>12396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43472222222222" calcext:value-type="float">
            <text:p>0,00143472222222222000</text:p>
          </table:table-cell>
          <table:table-cell table:formula="of:=[.D1035]-[.D10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2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43611111111111" calcext:value-type="float">
            <text:p>0,00143611111111111000</text:p>
          </table:table-cell>
          <table:table-cell table:formula="of:=[.D1036]-[.D10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2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4375" calcext:value-type="float">
            <text:p>0,00143750000000000000</text:p>
          </table:table-cell>
          <table:table-cell table:formula="of:=[.D1037]-[.D10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2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43888888888889" calcext:value-type="float">
            <text:p>0,00143888888888889000</text:p>
          </table:table-cell>
          <table:table-cell table:formula="of:=[.D1038]-[.D10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2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44027777777778" calcext:value-type="float">
            <text:p>0,00144027777777778000</text:p>
          </table:table-cell>
          <table:table-cell table:formula="of:=[.D1039]-[.D10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2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44166666666667" calcext:value-type="float">
            <text:p>0,00144166666666667000</text:p>
          </table:table-cell>
          <table:table-cell table:formula="of:=[.D1040]-[.D10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2" office:value-type="float" office:value="12468" calcext:value-type="float">
            <text:p>12468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44305555555556" calcext:value-type="float">
            <text:p>0,00144305555555556000</text:p>
          </table:table-cell>
          <table:table-cell table:formula="of:=[.D1041]-[.D10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2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44444444444444" calcext:value-type="float">
            <text:p>0,00144444444444444000</text:p>
          </table:table-cell>
          <table:table-cell table:formula="of:=[.D1042]-[.D10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2" office:value-type="float" office:value="12492" calcext:value-type="float">
            <text:p>12492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44583333333333" calcext:value-type="float">
            <text:p>0,00144583333333333000</text:p>
          </table:table-cell>
          <table:table-cell table:formula="of:=[.D1043]-[.D10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2" office:value-type="float" office:value="12504" calcext:value-type="float">
            <text:p>12504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44722222222222" calcext:value-type="float">
            <text:p>0,00144722222222222000</text:p>
          </table:table-cell>
          <table:table-cell table:formula="of:=[.D1044]-[.D10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2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44861111111111" calcext:value-type="float">
            <text:p>0,00144861111111111000</text:p>
          </table:table-cell>
          <table:table-cell table:formula="of:=[.D1045]-[.D10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2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45" calcext:value-type="float">
            <text:p>0,00145000000000000000</text:p>
          </table:table-cell>
          <table:table-cell table:formula="of:=[.D1046]-[.D10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2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45138888888889" calcext:value-type="float">
            <text:p>0,00145138888888889000</text:p>
          </table:table-cell>
          <table:table-cell table:formula="of:=[.D1047]-[.D1046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2" office:value-type="float" office:value="12552" calcext:value-type="float">
            <text:p>12552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45277777777778" calcext:value-type="float">
            <text:p>0,00145277777777778000</text:p>
          </table:table-cell>
          <table:table-cell table:formula="of:=[.D1048]-[.D10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2" office:value-type="float" office:value="12564" calcext:value-type="float">
            <text:p>12564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45416666666667" calcext:value-type="float">
            <text:p>0,00145416666666667000</text:p>
          </table:table-cell>
          <table:table-cell table:formula="of:=[.D1049]-[.D10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2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45555555555556" calcext:value-type="float">
            <text:p>0,00145555555555556000</text:p>
          </table:table-cell>
          <table:table-cell table:formula="of:=[.D1050]-[.D10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2" office:value-type="float" office:value="12588" calcext:value-type="float">
            <text:p>12588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45694444444444" calcext:value-type="float">
            <text:p>0,00145694444444444000</text:p>
          </table:table-cell>
          <table:table-cell table:formula="of:=[.D1051]-[.D10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2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45833333333333" calcext:value-type="float">
            <text:p>0,00145833333333333000</text:p>
          </table:table-cell>
          <table:table-cell table:formula="of:=[.D1052]-[.D10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2" office:value-type="float" office:value="12612" calcext:value-type="float">
            <text:p>12612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45972222222222" calcext:value-type="float">
            <text:p>0,00145972222222222000</text:p>
          </table:table-cell>
          <table:table-cell table:formula="of:=[.D1053]-[.D10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2" office:value-type="float" office:value="12624" calcext:value-type="float">
            <text:p>12624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46111111111111" calcext:value-type="float">
            <text:p>0,00146111111111111000</text:p>
          </table:table-cell>
          <table:table-cell table:formula="of:=[.D1054]-[.D10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2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4625" calcext:value-type="float">
            <text:p>0,00146250000000000000</text:p>
          </table:table-cell>
          <table:table-cell table:formula="of:=[.D1055]-[.D10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2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46388888888889" calcext:value-type="float">
            <text:p>0,00146388888888889000</text:p>
          </table:table-cell>
          <table:table-cell table:formula="of:=[.D1056]-[.D10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2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46527777777778" calcext:value-type="float">
            <text:p>0,00146527777777778000</text:p>
          </table:table-cell>
          <table:table-cell table:formula="of:=[.D1057]-[.D10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2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46666666666667" calcext:value-type="float">
            <text:p>0,00146666666666667000</text:p>
          </table:table-cell>
          <table:table-cell table:formula="of:=[.D1058]-[.D10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2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46805555555556" calcext:value-type="float">
            <text:p>0,00146805555555556000</text:p>
          </table:table-cell>
          <table:table-cell table:formula="of:=[.D1059]-[.D10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2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46944444444444" calcext:value-type="float">
            <text:p>0,00146944444444444000</text:p>
          </table:table-cell>
          <table:table-cell table:formula="of:=[.D1060]-[.D10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2" office:value-type="float" office:value="12708" calcext:value-type="float">
            <text:p>12708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47083333333333" calcext:value-type="float">
            <text:p>0,00147083333333333000</text:p>
          </table:table-cell>
          <table:table-cell table:formula="of:=[.D1061]-[.D10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2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47222222222222" calcext:value-type="float">
            <text:p>0,00147222222222222000</text:p>
          </table:table-cell>
          <table:table-cell table:formula="of:=[.D1062]-[.D10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2" office:value-type="float" office:value="12732" calcext:value-type="float">
            <text:p>12732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47361111111111" calcext:value-type="float">
            <text:p>0,00147361111111111000</text:p>
          </table:table-cell>
          <table:table-cell table:formula="of:=[.D1063]-[.D10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2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475" calcext:value-type="float">
            <text:p>0,00147500000000000000</text:p>
          </table:table-cell>
          <table:table-cell table:formula="of:=[.D1064]-[.D10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2" office:value-type="float" office:value="12756" calcext:value-type="float">
            <text:p>12756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47638888888889" calcext:value-type="float">
            <text:p>0,00147638888888889000</text:p>
          </table:table-cell>
          <table:table-cell table:formula="of:=[.D1065]-[.D10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2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47777777777778" calcext:value-type="float">
            <text:p>0,00147777777777778000</text:p>
          </table:table-cell>
          <table:table-cell table:formula="of:=[.D1066]-[.D10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2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47916666666667" calcext:value-type="float">
            <text:p>0,00147916666666667000</text:p>
          </table:table-cell>
          <table:table-cell table:formula="of:=[.D1067]-[.D10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2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48055555555556" calcext:value-type="float">
            <text:p>0,00148055555555556000</text:p>
          </table:table-cell>
          <table:table-cell table:formula="of:=[.D1068]-[.D10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2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48194444444444" calcext:value-type="float">
            <text:p>0,00148194444444444000</text:p>
          </table:table-cell>
          <table:table-cell table:formula="of:=[.D1069]-[.D10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2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48333333333333" calcext:value-type="float">
            <text:p>0,00148333333333333000</text:p>
          </table:table-cell>
          <table:table-cell table:formula="of:=[.D1070]-[.D10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2" office:value-type="float" office:value="12828" calcext:value-type="float">
            <text:p>12828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48472222222222" calcext:value-type="float">
            <text:p>0,00148472222222222000</text:p>
          </table:table-cell>
          <table:table-cell table:formula="of:=[.D1071]-[.D10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2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48611111111111" calcext:value-type="float">
            <text:p>0,00148611111111111000</text:p>
          </table:table-cell>
          <table:table-cell table:formula="of:=[.D1072]-[.D1071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2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4875" calcext:value-type="float">
            <text:p>0,00148750000000000000</text:p>
          </table:table-cell>
          <table:table-cell table:formula="of:=[.D1073]-[.D10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2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48888888888889" calcext:value-type="float">
            <text:p>0,00148888888888889000</text:p>
          </table:table-cell>
          <table:table-cell table:formula="of:=[.D1074]-[.D10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2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49027777777778" calcext:value-type="float">
            <text:p>0,00149027777777778000</text:p>
          </table:table-cell>
          <table:table-cell table:formula="of:=[.D1075]-[.D10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2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49166666666667" calcext:value-type="float">
            <text:p>0,00149166666666667000</text:p>
          </table:table-cell>
          <table:table-cell table:formula="of:=[.D1076]-[.D10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2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49305555555556" calcext:value-type="float">
            <text:p>0,00149305555555556000</text:p>
          </table:table-cell>
          <table:table-cell table:formula="of:=[.D1077]-[.D10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2" office:value-type="float" office:value="12912" calcext:value-type="float">
            <text:p>12912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49444444444444" calcext:value-type="float">
            <text:p>0,00149444444444444000</text:p>
          </table:table-cell>
          <table:table-cell table:formula="of:=[.D1078]-[.D10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2" office:value-type="float" office:value="12924" calcext:value-type="float">
            <text:p>12924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49583333333333" calcext:value-type="float">
            <text:p>0,00149583333333333000</text:p>
          </table:table-cell>
          <table:table-cell table:formula="of:=[.D1079]-[.D10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2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49722222222222" calcext:value-type="float">
            <text:p>0,00149722222222222000</text:p>
          </table:table-cell>
          <table:table-cell table:formula="of:=[.D1080]-[.D10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2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49861111111111" calcext:value-type="float">
            <text:p>0,00149861111111111000</text:p>
          </table:table-cell>
          <table:table-cell table:formula="of:=[.D1081]-[.D10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2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5" calcext:value-type="float">
            <text:p>0,00150000000000000000</text:p>
          </table:table-cell>
          <table:table-cell table:formula="of:=[.D1082]-[.D10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2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50138888888889" calcext:value-type="float">
            <text:p>0,00150138888888889000</text:p>
          </table:table-cell>
          <table:table-cell table:formula="of:=[.D1083]-[.D10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2" office:value-type="float" office:value="12984" calcext:value-type="float">
            <text:p>12984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50277777777778" calcext:value-type="float">
            <text:p>0,00150277777777778000</text:p>
          </table:table-cell>
          <table:table-cell table:formula="of:=[.D1084]-[.D10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2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50416666666667" calcext:value-type="float">
            <text:p>0,00150416666666667000</text:p>
          </table:table-cell>
          <table:table-cell table:formula="of:=[.D1085]-[.D10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2" office:value-type="float" office:value="13008" calcext:value-type="float">
            <text:p>13008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50555555555556" calcext:value-type="float">
            <text:p>0,00150555555555556000</text:p>
          </table:table-cell>
          <table:table-cell table:formula="of:=[.D1086]-[.D10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2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50694444444444" calcext:value-type="float">
            <text:p>0,00150694444444444000</text:p>
          </table:table-cell>
          <table:table-cell table:formula="of:=[.D1087]-[.D10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2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50833333333333" calcext:value-type="float">
            <text:p>0,00150833333333333000</text:p>
          </table:table-cell>
          <table:table-cell table:formula="of:=[.D1088]-[.D10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2" office:value-type="float" office:value="13044" calcext:value-type="float">
            <text:p>13044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50972222222222" calcext:value-type="float">
            <text:p>0,00150972222222222000</text:p>
          </table:table-cell>
          <table:table-cell table:formula="of:=[.D1089]-[.D10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2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51111111111111" calcext:value-type="float">
            <text:p>0,00151111111111111000</text:p>
          </table:table-cell>
          <table:table-cell table:formula="of:=[.D1090]-[.D10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2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5125" calcext:value-type="float">
            <text:p>0,00151250000000000000</text:p>
          </table:table-cell>
          <table:table-cell table:formula="of:=[.D1091]-[.D10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2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51388888888889" calcext:value-type="float">
            <text:p>0,00151388888888889000</text:p>
          </table:table-cell>
          <table:table-cell table:formula="of:=[.D1092]-[.D10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2" office:value-type="float" office:value="13092" calcext:value-type="float">
            <text:p>13092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51527777777778" calcext:value-type="float">
            <text:p>0,00151527777777778000</text:p>
          </table:table-cell>
          <table:table-cell table:formula="of:=[.D1093]-[.D10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2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51666666666667" calcext:value-type="float">
            <text:p>0,00151666666666667000</text:p>
          </table:table-cell>
          <table:table-cell table:formula="of:=[.D1094]-[.D10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2" office:value-type="float" office:value="13116" calcext:value-type="float">
            <text:p>13116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51805555555556" calcext:value-type="float">
            <text:p>0,00151805555555556000</text:p>
          </table:table-cell>
          <table:table-cell table:formula="of:=[.D1095]-[.D10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2" office:value-type="float" office:value="13128" calcext:value-type="float">
            <text:p>13128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51944444444444" calcext:value-type="float">
            <text:p>0,00151944444444444000</text:p>
          </table:table-cell>
          <table:table-cell table:formula="of:=[.D1096]-[.D10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2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52083333333333" calcext:value-type="float">
            <text:p>0,00152083333333333000</text:p>
          </table:table-cell>
          <table:table-cell table:formula="of:=[.D1097]-[.D10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2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52222222222222" calcext:value-type="float">
            <text:p>0,00152222222222222000</text:p>
          </table:table-cell>
          <table:table-cell table:formula="of:=[.D1098]-[.D1097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2" office:value-type="float" office:value="13164" calcext:value-type="float">
            <text:p>13164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52361111111111" calcext:value-type="float">
            <text:p>0,00152361111111111000</text:p>
          </table:table-cell>
          <table:table-cell table:formula="of:=[.D1099]-[.D10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2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525" calcext:value-type="float">
            <text:p>0,00152500000000000000</text:p>
          </table:table-cell>
          <table:table-cell table:formula="of:=[.D1100]-[.D10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2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52638888888889" calcext:value-type="float">
            <text:p>0,00152638888888889000</text:p>
          </table:table-cell>
          <table:table-cell table:formula="of:=[.D1101]-[.D11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2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52777777777778" calcext:value-type="float">
            <text:p>0,00152777777777778000</text:p>
          </table:table-cell>
          <table:table-cell table:formula="of:=[.D1102]-[.D11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2" office:value-type="float" office:value="13212" calcext:value-type="float">
            <text:p>13212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52916666666667" calcext:value-type="float">
            <text:p>0,00152916666666667000</text:p>
          </table:table-cell>
          <table:table-cell table:formula="of:=[.D1103]-[.D11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2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53055555555556" calcext:value-type="float">
            <text:p>0,00153055555555556000</text:p>
          </table:table-cell>
          <table:table-cell table:formula="of:=[.D1104]-[.D11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2" office:value-type="float" office:value="13236" calcext:value-type="float">
            <text:p>13236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53194444444444" calcext:value-type="float">
            <text:p>0,00153194444444444000</text:p>
          </table:table-cell>
          <table:table-cell table:formula="of:=[.D1105]-[.D11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2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53333333333333" calcext:value-type="float">
            <text:p>0,00153333333333333000</text:p>
          </table:table-cell>
          <table:table-cell table:formula="of:=[.D1106]-[.D11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2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53472222222222" calcext:value-type="float">
            <text:p>0,00153472222222222000</text:p>
          </table:table-cell>
          <table:table-cell table:formula="of:=[.D1107]-[.D11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2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53611111111111" calcext:value-type="float">
            <text:p>0,00153611111111111000</text:p>
          </table:table-cell>
          <table:table-cell table:formula="of:=[.D1108]-[.D11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2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5375" calcext:value-type="float">
            <text:p>0,00153750000000000000</text:p>
          </table:table-cell>
          <table:table-cell table:formula="of:=[.D1109]-[.D11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2" office:value-type="float" office:value="13296" calcext:value-type="float">
            <text:p>13296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53888888888889" calcext:value-type="float">
            <text:p>0,00153888888888889000</text:p>
          </table:table-cell>
          <table:table-cell table:formula="of:=[.D1110]-[.D11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2" office:value-type="float" office:value="13308" calcext:value-type="float">
            <text:p>13308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54027777777778" calcext:value-type="float">
            <text:p>0,00154027777777778000</text:p>
          </table:table-cell>
          <table:table-cell table:formula="of:=[.D1111]-[.D11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2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54166666666667" calcext:value-type="float">
            <text:p>0,00154166666666667000</text:p>
          </table:table-cell>
          <table:table-cell table:formula="of:=[.D1112]-[.D11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2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54305555555556" calcext:value-type="float">
            <text:p>0,00154305555555556000</text:p>
          </table:table-cell>
          <table:table-cell table:formula="of:=[.D1113]-[.D11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2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54444444444444" calcext:value-type="float">
            <text:p>0,00154444444444444000</text:p>
          </table:table-cell>
          <table:table-cell table:formula="of:=[.D1114]-[.D11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2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54583333333333" calcext:value-type="float">
            <text:p>0,00154583333333333000</text:p>
          </table:table-cell>
          <table:table-cell table:formula="of:=[.D1115]-[.D11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2" office:value-type="float" office:value="13368" calcext:value-type="float">
            <text:p>13368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54722222222222" calcext:value-type="float">
            <text:p>0,00154722222222222000</text:p>
          </table:table-cell>
          <table:table-cell table:formula="of:=[.D1116]-[.D11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2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54861111111111" calcext:value-type="float">
            <text:p>0,00154861111111111000</text:p>
          </table:table-cell>
          <table:table-cell table:formula="of:=[.D1117]-[.D11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2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55" calcext:value-type="float">
            <text:p>0,00155000000000000000</text:p>
          </table:table-cell>
          <table:table-cell table:formula="of:=[.D1118]-[.D11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2" office:value-type="float" office:value="13404" calcext:value-type="float">
            <text:p>13404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55138888888889" calcext:value-type="float">
            <text:p>0,00155138888888889000</text:p>
          </table:table-cell>
          <table:table-cell table:formula="of:=[.D1119]-[.D11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2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55277777777778" calcext:value-type="float">
            <text:p>0,00155277777777778000</text:p>
          </table:table-cell>
          <table:table-cell table:formula="of:=[.D1120]-[.D11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2" office:value-type="float" office:value="13428" calcext:value-type="float">
            <text:p>13428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55416666666667" calcext:value-type="float">
            <text:p>0,00155416666666667000</text:p>
          </table:table-cell>
          <table:table-cell table:formula="of:=[.D1121]-[.D11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2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55555555555556" calcext:value-type="float">
            <text:p>0,00155555555555556000</text:p>
          </table:table-cell>
          <table:table-cell table:formula="of:=[.D1122]-[.D11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2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55694444444444" calcext:value-type="float">
            <text:p>0,00155694444444444000</text:p>
          </table:table-cell>
          <table:table-cell table:formula="of:=[.D1123]-[.D11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2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55833333333333" calcext:value-type="float">
            <text:p>0,00155833333333333000</text:p>
          </table:table-cell>
          <table:table-cell table:formula="of:=[.D1124]-[.D1123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2" office:value-type="float" office:value="13476" calcext:value-type="float">
            <text:p>13476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55972222222222" calcext:value-type="float">
            <text:p>0,00155972222222222000</text:p>
          </table:table-cell>
          <table:table-cell table:formula="of:=[.D1125]-[.D11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2" office:value-type="float" office:value="13488" calcext:value-type="float">
            <text:p>13488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56111111111111" calcext:value-type="float">
            <text:p>0,00156111111111111000</text:p>
          </table:table-cell>
          <table:table-cell table:formula="of:=[.D1126]-[.D11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2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5625" calcext:value-type="float">
            <text:p>0,00156250000000000000</text:p>
          </table:table-cell>
          <table:table-cell table:formula="of:=[.D1127]-[.D11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2" office:value-type="float" office:value="13512" calcext:value-type="float">
            <text:p>13512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56388888888889" calcext:value-type="float">
            <text:p>0,00156388888888889000</text:p>
          </table:table-cell>
          <table:table-cell table:formula="of:=[.D1128]-[.D11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2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56527777777778" calcext:value-type="float">
            <text:p>0,00156527777777778000</text:p>
          </table:table-cell>
          <table:table-cell table:formula="of:=[.D1129]-[.D11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2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56666666666667" calcext:value-type="float">
            <text:p>0,00156666666666667000</text:p>
          </table:table-cell>
          <table:table-cell table:formula="of:=[.D1130]-[.D11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2" office:value-type="float" office:value="13548" calcext:value-type="float">
            <text:p>13548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56805555555556" calcext:value-type="float">
            <text:p>0,00156805555555556000</text:p>
          </table:table-cell>
          <table:table-cell table:formula="of:=[.D1131]-[.D11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2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56944444444444" calcext:value-type="float">
            <text:p>0,00156944444444444000</text:p>
          </table:table-cell>
          <table:table-cell table:formula="of:=[.D1132]-[.D11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2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57083333333333" calcext:value-type="float">
            <text:p>0,00157083333333333000</text:p>
          </table:table-cell>
          <table:table-cell table:formula="of:=[.D1133]-[.D11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2" office:value-type="float" office:value="13584" calcext:value-type="float">
            <text:p>13584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57222222222222" calcext:value-type="float">
            <text:p>0,00157222222222222000</text:p>
          </table:table-cell>
          <table:table-cell table:formula="of:=[.D1134]-[.D11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2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57361111111111" calcext:value-type="float">
            <text:p>0,00157361111111111000</text:p>
          </table:table-cell>
          <table:table-cell table:formula="of:=[.D1135]-[.D11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2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575" calcext:value-type="float">
            <text:p>0,00157500000000000000</text:p>
          </table:table-cell>
          <table:table-cell table:formula="of:=[.D1136]-[.D11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2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57638888888889" calcext:value-type="float">
            <text:p>0,00157638888888889000</text:p>
          </table:table-cell>
          <table:table-cell table:formula="of:=[.D1137]-[.D11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2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57777777777778" calcext:value-type="float">
            <text:p>0,00157777777777778000</text:p>
          </table:table-cell>
          <table:table-cell table:formula="of:=[.D1138]-[.D11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2" office:value-type="float" office:value="13644" calcext:value-type="float">
            <text:p>13644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57916666666667" calcext:value-type="float">
            <text:p>0,00157916666666667000</text:p>
          </table:table-cell>
          <table:table-cell table:formula="of:=[.D1139]-[.D11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2" office:value-type="float" office:value="13656" calcext:value-type="float">
            <text:p>13656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58055555555556" calcext:value-type="float">
            <text:p>0,00158055555555556000</text:p>
          </table:table-cell>
          <table:table-cell table:formula="of:=[.D1140]-[.D11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2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58194444444444" calcext:value-type="float">
            <text:p>0,00158194444444444000</text:p>
          </table:table-cell>
          <table:table-cell table:formula="of:=[.D1141]-[.D11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2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58333333333333" calcext:value-type="float">
            <text:p>0,00158333333333333000</text:p>
          </table:table-cell>
          <table:table-cell table:formula="of:=[.D1142]-[.D11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2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58472222222222" calcext:value-type="float">
            <text:p>0,00158472222222222000</text:p>
          </table:table-cell>
          <table:table-cell table:formula="of:=[.D1143]-[.D11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2" office:value-type="float" office:value="13704" calcext:value-type="float">
            <text:p>13704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58611111111111" calcext:value-type="float">
            <text:p>0,00158611111111111000</text:p>
          </table:table-cell>
          <table:table-cell table:formula="of:=[.D1144]-[.D11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2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5875" calcext:value-type="float">
            <text:p>0,00158750000000000000</text:p>
          </table:table-cell>
          <table:table-cell table:formula="of:=[.D1145]-[.D11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2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58888888888889" calcext:value-type="float">
            <text:p>0,00158888888888889000</text:p>
          </table:table-cell>
          <table:table-cell table:formula="of:=[.D1146]-[.D11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2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59027777777778" calcext:value-type="float">
            <text:p>0,00159027777777778000</text:p>
          </table:table-cell>
          <table:table-cell table:formula="of:=[.D1147]-[.D11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2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59166666666667" calcext:value-type="float">
            <text:p>0,00159166666666667000</text:p>
          </table:table-cell>
          <table:table-cell table:formula="of:=[.D1148]-[.D11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2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59305555555556" calcext:value-type="float">
            <text:p>0,00159305555555556000</text:p>
          </table:table-cell>
          <table:table-cell table:formula="of:=[.D1149]-[.D11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2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59444444444444" calcext:value-type="float">
            <text:p>0,00159444444444444000</text:p>
          </table:table-cell>
          <table:table-cell table:formula="of:=[.D1150]-[.D1149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2" office:value-type="float" office:value="13788" calcext:value-type="float">
            <text:p>13788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59583333333333" calcext:value-type="float">
            <text:p>0,00159583333333333000</text:p>
          </table:table-cell>
          <table:table-cell table:formula="of:=[.D1151]-[.D11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2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59722222222222" calcext:value-type="float">
            <text:p>0,00159722222222222000</text:p>
          </table:table-cell>
          <table:table-cell table:formula="of:=[.D1152]-[.D11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2" office:value-type="float" office:value="13812" calcext:value-type="float">
            <text:p>13812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59861111111111" calcext:value-type="float">
            <text:p>0,00159861111111111000</text:p>
          </table:table-cell>
          <table:table-cell table:formula="of:=[.D1153]-[.D11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2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6" calcext:value-type="float">
            <text:p>0,00160000000000000000</text:p>
          </table:table-cell>
          <table:table-cell table:formula="of:=[.D1154]-[.D11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2" office:value-type="float" office:value="13836" calcext:value-type="float">
            <text:p>13836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60138888888889" calcext:value-type="float">
            <text:p>0,00160138888888889000</text:p>
          </table:table-cell>
          <table:table-cell table:formula="of:=[.D1155]-[.D11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2" office:value-type="float" office:value="13848" calcext:value-type="float">
            <text:p>13848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60277777777778" calcext:value-type="float">
            <text:p>0,00160277777777778000</text:p>
          </table:table-cell>
          <table:table-cell table:formula="of:=[.D1156]-[.D11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2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60416666666667" calcext:value-type="float">
            <text:p>0,00160416666666667000</text:p>
          </table:table-cell>
          <table:table-cell table:formula="of:=[.D1157]-[.D11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2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60555555555556" calcext:value-type="float">
            <text:p>0,00160555555555556000</text:p>
          </table:table-cell>
          <table:table-cell table:formula="of:=[.D1158]-[.D11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2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60694444444444" calcext:value-type="float">
            <text:p>0,00160694444444444000</text:p>
          </table:table-cell>
          <table:table-cell table:formula="of:=[.D1159]-[.D11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2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60833333333333" calcext:value-type="float">
            <text:p>0,00160833333333333000</text:p>
          </table:table-cell>
          <table:table-cell table:formula="of:=[.D1160]-[.D11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2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60972222222222" calcext:value-type="float">
            <text:p>0,00160972222222222000</text:p>
          </table:table-cell>
          <table:table-cell table:formula="of:=[.D1161]-[.D11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2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61111111111111" calcext:value-type="float">
            <text:p>0,00161111111111111000</text:p>
          </table:table-cell>
          <table:table-cell table:formula="of:=[.D1162]-[.D11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2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6125" calcext:value-type="float">
            <text:p>0,00161250000000000000</text:p>
          </table:table-cell>
          <table:table-cell table:formula="of:=[.D1163]-[.D11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2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61388888888889" calcext:value-type="float">
            <text:p>0,00161388888888889000</text:p>
          </table:table-cell>
          <table:table-cell table:formula="of:=[.D1164]-[.D11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2" office:value-type="float" office:value="13956" calcext:value-type="float">
            <text:p>13956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61527777777778" calcext:value-type="float">
            <text:p>0,00161527777777778000</text:p>
          </table:table-cell>
          <table:table-cell table:formula="of:=[.D1165]-[.D11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2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61666666666667" calcext:value-type="float">
            <text:p>0,00161666666666667000</text:p>
          </table:table-cell>
          <table:table-cell table:formula="of:=[.D1166]-[.D11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2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61805555555556" calcext:value-type="float">
            <text:p>0,00161805555555556000</text:p>
          </table:table-cell>
          <table:table-cell table:formula="of:=[.D1167]-[.D11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2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61944444444444" calcext:value-type="float">
            <text:p>0,00161944444444444000</text:p>
          </table:table-cell>
          <table:table-cell table:formula="of:=[.D1168]-[.D11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2" office:value-type="float" office:value="14004" calcext:value-type="float">
            <text:p>14004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62083333333333" calcext:value-type="float">
            <text:p>0,00162083333333333000</text:p>
          </table:table-cell>
          <table:table-cell table:formula="of:=[.D1169]-[.D11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2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62222222222222" calcext:value-type="float">
            <text:p>0,00162222222222222000</text:p>
          </table:table-cell>
          <table:table-cell table:formula="of:=[.D1170]-[.D11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2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62361111111111" calcext:value-type="float">
            <text:p>0,00162361111111111000</text:p>
          </table:table-cell>
          <table:table-cell table:formula="of:=[.D1171]-[.D11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2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625" calcext:value-type="float">
            <text:p>0,00162500000000000000</text:p>
          </table:table-cell>
          <table:table-cell table:formula="of:=[.D1172]-[.D11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2" office:value-type="float" office:value="14052" calcext:value-type="float">
            <text:p>14052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62638888888889" calcext:value-type="float">
            <text:p>0,00162638888888889000</text:p>
          </table:table-cell>
          <table:table-cell table:formula="of:=[.D1173]-[.D11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2" office:value-type="float" office:value="14064" calcext:value-type="float">
            <text:p>14064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62777777777778" calcext:value-type="float">
            <text:p>0,00162777777777778000</text:p>
          </table:table-cell>
          <table:table-cell table:formula="of:=[.D1174]-[.D11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2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62916666666667" calcext:value-type="float">
            <text:p>0,00162916666666667000</text:p>
          </table:table-cell>
          <table:table-cell table:formula="of:=[.D1175]-[.D11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2" office:value-type="float" office:value="14088" calcext:value-type="float">
            <text:p>14088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63055555555556" calcext:value-type="float">
            <text:p>0,00163055555555556000</text:p>
          </table:table-cell>
          <table:table-cell table:formula="of:=[.D1176]-[.D1175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2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63194444444444" calcext:value-type="float">
            <text:p>0,00163194444444444000</text:p>
          </table:table-cell>
          <table:table-cell table:formula="of:=[.D1177]-[.D11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2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63333333333333" calcext:value-type="float">
            <text:p>0,00163333333333333000</text:p>
          </table:table-cell>
          <table:table-cell table:formula="of:=[.D1178]-[.D11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2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63472222222222" calcext:value-type="float">
            <text:p>0,00163472222222222000</text:p>
          </table:table-cell>
          <table:table-cell table:formula="of:=[.D1179]-[.D11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2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63611111111111" calcext:value-type="float">
            <text:p>0,00163611111111111000</text:p>
          </table:table-cell>
          <table:table-cell table:formula="of:=[.D1180]-[.D11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2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6375" calcext:value-type="float">
            <text:p>0,00163750000000000000</text:p>
          </table:table-cell>
          <table:table-cell table:formula="of:=[.D1181]-[.D11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2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63888888888889" calcext:value-type="float">
            <text:p>0,00163888888888889000</text:p>
          </table:table-cell>
          <table:table-cell table:formula="of:=[.D1182]-[.D11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2" office:value-type="float" office:value="14172" calcext:value-type="float">
            <text:p>14172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64027777777778" calcext:value-type="float">
            <text:p>0,00164027777777778000</text:p>
          </table:table-cell>
          <table:table-cell table:formula="of:=[.D1183]-[.D11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2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64166666666667" calcext:value-type="float">
            <text:p>0,00164166666666667000</text:p>
          </table:table-cell>
          <table:table-cell table:formula="of:=[.D1184]-[.D11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2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64305555555556" calcext:value-type="float">
            <text:p>0,00164305555555556000</text:p>
          </table:table-cell>
          <table:table-cell table:formula="of:=[.D1185]-[.D11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2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64444444444444" calcext:value-type="float">
            <text:p>0,00164444444444444000</text:p>
          </table:table-cell>
          <table:table-cell table:formula="of:=[.D1186]-[.D11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2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64583333333333" calcext:value-type="float">
            <text:p>0,00164583333333333000</text:p>
          </table:table-cell>
          <table:table-cell table:formula="of:=[.D1187]-[.D11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2" office:value-type="float" office:value="14232" calcext:value-type="float">
            <text:p>14232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64722222222222" calcext:value-type="float">
            <text:p>0,00164722222222222000</text:p>
          </table:table-cell>
          <table:table-cell table:formula="of:=[.D1188]-[.D11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2" office:value-type="float" office:value="14244" calcext:value-type="float">
            <text:p>14244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64861111111111" calcext:value-type="float">
            <text:p>0,00164861111111111000</text:p>
          </table:table-cell>
          <table:table-cell table:formula="of:=[.D1189]-[.D11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2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65" calcext:value-type="float">
            <text:p>0,00165000000000000000</text:p>
          </table:table-cell>
          <table:table-cell table:formula="of:=[.D1190]-[.D11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2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65138888888889" calcext:value-type="float">
            <text:p>0,00165138888888889000</text:p>
          </table:table-cell>
          <table:table-cell table:formula="of:=[.D1191]-[.D11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2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65277777777778" calcext:value-type="float">
            <text:p>0,00165277777777778000</text:p>
          </table:table-cell>
          <table:table-cell table:formula="of:=[.D1192]-[.D11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2" office:value-type="float" office:value="14292" calcext:value-type="float">
            <text:p>14292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65416666666667" calcext:value-type="float">
            <text:p>0,00165416666666667000</text:p>
          </table:table-cell>
          <table:table-cell table:formula="of:=[.D1193]-[.D11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2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65555555555556" calcext:value-type="float">
            <text:p>0,00165555555555556000</text:p>
          </table:table-cell>
          <table:table-cell table:formula="of:=[.D1194]-[.D11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2" office:value-type="float" office:value="14316" calcext:value-type="float">
            <text:p>14316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65694444444444" calcext:value-type="float">
            <text:p>0,00165694444444444000</text:p>
          </table:table-cell>
          <table:table-cell table:formula="of:=[.D1195]-[.D11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2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65833333333333" calcext:value-type="float">
            <text:p>0,00165833333333333000</text:p>
          </table:table-cell>
          <table:table-cell table:formula="of:=[.D1196]-[.D11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2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65972222222222" calcext:value-type="float">
            <text:p>0,00165972222222222000</text:p>
          </table:table-cell>
          <table:table-cell table:formula="of:=[.D1197]-[.D11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2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66111111111111" calcext:value-type="float">
            <text:p>0,00166111111111111000</text:p>
          </table:table-cell>
          <table:table-cell table:formula="of:=[.D1198]-[.D11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2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6625" calcext:value-type="float">
            <text:p>0,00166250000000000000</text:p>
          </table:table-cell>
          <table:table-cell table:formula="of:=[.D1199]-[.D11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2" office:value-type="float" office:value="14376" calcext:value-type="float">
            <text:p>14376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66388888888889" calcext:value-type="float">
            <text:p>0,00166388888888889000</text:p>
          </table:table-cell>
          <table:table-cell table:formula="of:=[.D1200]-[.D11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2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66527777777778" calcext:value-type="float">
            <text:p>0,00166527777777778000</text:p>
          </table:table-cell>
          <table:table-cell table:formula="of:=[.D1201]-[.D1200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2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66666666666667" calcext:value-type="float">
            <text:p>0,00166666666666667000</text:p>
          </table:table-cell>
          <table:table-cell table:formula="of:=[.D1202]-[.D12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2" office:value-type="float" office:value="14412" calcext:value-type="float">
            <text:p>14412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66805555555556" calcext:value-type="float">
            <text:p>0,00166805555555556000</text:p>
          </table:table-cell>
          <table:table-cell table:formula="of:=[.D1203]-[.D12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2" office:value-type="float" office:value="14424" calcext:value-type="float">
            <text:p>14424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66944444444444" calcext:value-type="float">
            <text:p>0,00166944444444444000</text:p>
          </table:table-cell>
          <table:table-cell table:formula="of:=[.D1204]-[.D12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2" office:value-type="float" office:value="14436" calcext:value-type="float">
            <text:p>14436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67083333333333" calcext:value-type="float">
            <text:p>0,00167083333333333000</text:p>
          </table:table-cell>
          <table:table-cell table:formula="of:=[.D1205]-[.D12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2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67222222222222" calcext:value-type="float">
            <text:p>0,00167222222222222000</text:p>
          </table:table-cell>
          <table:table-cell table:formula="of:=[.D1206]-[.D12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2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67361111111111" calcext:value-type="float">
            <text:p>0,00167361111111111000</text:p>
          </table:table-cell>
          <table:table-cell table:formula="of:=[.D1207]-[.D12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2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675" calcext:value-type="float">
            <text:p>0,00167500000000000000</text:p>
          </table:table-cell>
          <table:table-cell table:formula="of:=[.D1208]-[.D12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2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67638888888889" calcext:value-type="float">
            <text:p>0,00167638888888889000</text:p>
          </table:table-cell>
          <table:table-cell table:formula="of:=[.D1209]-[.D12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2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67777777777778" calcext:value-type="float">
            <text:p>0,00167777777777778000</text:p>
          </table:table-cell>
          <table:table-cell table:formula="of:=[.D1210]-[.D12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2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67916666666667" calcext:value-type="float">
            <text:p>0,00167916666666667000</text:p>
          </table:table-cell>
          <table:table-cell table:formula="of:=[.D1211]-[.D12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2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68055555555556" calcext:value-type="float">
            <text:p>0,00168055555555556000</text:p>
          </table:table-cell>
          <table:table-cell table:formula="of:=[.D1212]-[.D12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2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68194444444444" calcext:value-type="float">
            <text:p>0,00168194444444444000</text:p>
          </table:table-cell>
          <table:table-cell table:formula="of:=[.D1213]-[.D12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2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68333333333333" calcext:value-type="float">
            <text:p>0,00168333333333333000</text:p>
          </table:table-cell>
          <table:table-cell table:formula="of:=[.D1214]-[.D12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2" office:value-type="float" office:value="14556" calcext:value-type="float">
            <text:p>14556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68472222222222" calcext:value-type="float">
            <text:p>0,00168472222222222000</text:p>
          </table:table-cell>
          <table:table-cell table:formula="of:=[.D1215]-[.D12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2" office:value-type="float" office:value="14568" calcext:value-type="float">
            <text:p>14568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68611111111111" calcext:value-type="float">
            <text:p>0,00168611111111111000</text:p>
          </table:table-cell>
          <table:table-cell table:formula="of:=[.D1216]-[.D12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2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6875" calcext:value-type="float">
            <text:p>0,00168750000000000000</text:p>
          </table:table-cell>
          <table:table-cell table:formula="of:=[.D1217]-[.D12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2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68888888888889" calcext:value-type="float">
            <text:p>0,00168888888888889000</text:p>
          </table:table-cell>
          <table:table-cell table:formula="of:=[.D1218]-[.D12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2" office:value-type="float" office:value="14604" calcext:value-type="float">
            <text:p>14604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69027777777778" calcext:value-type="float">
            <text:p>0,00169027777777778000</text:p>
          </table:table-cell>
          <table:table-cell table:formula="of:=[.D1219]-[.D12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2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69166666666667" calcext:value-type="float">
            <text:p>0,00169166666666667000</text:p>
          </table:table-cell>
          <table:table-cell table:formula="of:=[.D1220]-[.D12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2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69305555555556" calcext:value-type="float">
            <text:p>0,00169305555555556000</text:p>
          </table:table-cell>
          <table:table-cell table:formula="of:=[.D1221]-[.D12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2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69444444444444" calcext:value-type="float">
            <text:p>0,00169444444444444000</text:p>
          </table:table-cell>
          <table:table-cell table:formula="of:=[.D1222]-[.D12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2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69583333333333" calcext:value-type="float">
            <text:p>0,00169583333333333000</text:p>
          </table:table-cell>
          <table:table-cell table:formula="of:=[.D1223]-[.D12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2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69722222222222" calcext:value-type="float">
            <text:p>0,00169722222222222000</text:p>
          </table:table-cell>
          <table:table-cell table:formula="of:=[.D1224]-[.D12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2" office:value-type="float" office:value="14676" calcext:value-type="float">
            <text:p>14676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69861111111111" calcext:value-type="float">
            <text:p>0,00169861111111111000</text:p>
          </table:table-cell>
          <table:table-cell table:formula="of:=[.D1225]-[.D12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2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7" calcext:value-type="float">
            <text:p>0,00170000000000000000</text:p>
          </table:table-cell>
          <table:table-cell table:formula="of:=[.D1226]-[.D12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2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70138888888889" calcext:value-type="float">
            <text:p>0,00170138888888889000</text:p>
          </table:table-cell>
          <table:table-cell table:formula="of:=[.D1227]-[.D1226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2" office:value-type="float" office:value="14712" calcext:value-type="float">
            <text:p>14712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70277777777778" calcext:value-type="float">
            <text:p>0,00170277777777778000</text:p>
          </table:table-cell>
          <table:table-cell table:formula="of:=[.D1228]-[.D12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2" office:value-type="float" office:value="14724" calcext:value-type="float">
            <text:p>14724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70416666666667" calcext:value-type="float">
            <text:p>0,00170416666666667000</text:p>
          </table:table-cell>
          <table:table-cell table:formula="of:=[.D1229]-[.D12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2" office:value-type="float" office:value="14736" calcext:value-type="float">
            <text:p>14736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70555555555556" calcext:value-type="float">
            <text:p>0,00170555555555556000</text:p>
          </table:table-cell>
          <table:table-cell table:formula="of:=[.D1230]-[.D12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2" office:value-type="float" office:value="14748" calcext:value-type="float">
            <text:p>14748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70694444444444" calcext:value-type="float">
            <text:p>0,00170694444444444000</text:p>
          </table:table-cell>
          <table:table-cell table:formula="of:=[.D1231]-[.D12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2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70833333333333" calcext:value-type="float">
            <text:p>0,00170833333333333000</text:p>
          </table:table-cell>
          <table:table-cell table:formula="of:=[.D1232]-[.D12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2" office:value-type="float" office:value="14772" calcext:value-type="float">
            <text:p>14772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70972222222222" calcext:value-type="float">
            <text:p>0,00170972222222222000</text:p>
          </table:table-cell>
          <table:table-cell table:formula="of:=[.D1233]-[.D12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2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71111111111111" calcext:value-type="float">
            <text:p>0,00171111111111111000</text:p>
          </table:table-cell>
          <table:table-cell table:formula="of:=[.D1234]-[.D12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2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7125" calcext:value-type="float">
            <text:p>0,00171250000000000000</text:p>
          </table:table-cell>
          <table:table-cell table:formula="of:=[.D1235]-[.D12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2" office:value-type="float" office:value="14808" calcext:value-type="float">
            <text:p>14808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71388888888889" calcext:value-type="float">
            <text:p>0,00171388888888889000</text:p>
          </table:table-cell>
          <table:table-cell table:formula="of:=[.D1236]-[.D12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2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71527777777778" calcext:value-type="float">
            <text:p>0,00171527777777778000</text:p>
          </table:table-cell>
          <table:table-cell table:formula="of:=[.D1237]-[.D12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2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71666666666667" calcext:value-type="float">
            <text:p>0,00171666666666667000</text:p>
          </table:table-cell>
          <table:table-cell table:formula="of:=[.D1238]-[.D12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2" office:value-type="float" office:value="14844" calcext:value-type="float">
            <text:p>14844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71805555555556" calcext:value-type="float">
            <text:p>0,00171805555555556000</text:p>
          </table:table-cell>
          <table:table-cell table:formula="of:=[.D1239]-[.D12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2" office:value-type="float" office:value="14856" calcext:value-type="float">
            <text:p>14856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71944444444444" calcext:value-type="float">
            <text:p>0,00171944444444444000</text:p>
          </table:table-cell>
          <table:table-cell table:formula="of:=[.D1240]-[.D12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2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72083333333333" calcext:value-type="float">
            <text:p>0,00172083333333333000</text:p>
          </table:table-cell>
          <table:table-cell table:formula="of:=[.D1241]-[.D12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2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72222222222222" calcext:value-type="float">
            <text:p>0,00172222222222222000</text:p>
          </table:table-cell>
          <table:table-cell table:formula="of:=[.D1242]-[.D12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2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72361111111111" calcext:value-type="float">
            <text:p>0,00172361111111111000</text:p>
          </table:table-cell>
          <table:table-cell table:formula="of:=[.D1243]-[.D12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2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725" calcext:value-type="float">
            <text:p>0,00172500000000000000</text:p>
          </table:table-cell>
          <table:table-cell table:formula="of:=[.D1244]-[.D12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2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72638888888889" calcext:value-type="float">
            <text:p>0,00172638888888889000</text:p>
          </table:table-cell>
          <table:table-cell table:formula="of:=[.D1245]-[.D12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2" office:value-type="float" office:value="14928" calcext:value-type="float">
            <text:p>14928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72777777777778" calcext:value-type="float">
            <text:p>0,00172777777777778000</text:p>
          </table:table-cell>
          <table:table-cell table:formula="of:=[.D1246]-[.D12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2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72916666666667" calcext:value-type="float">
            <text:p>0,00172916666666667000</text:p>
          </table:table-cell>
          <table:table-cell table:formula="of:=[.D1247]-[.D12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2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73055555555556" calcext:value-type="float">
            <text:p>0,00173055555555556000</text:p>
          </table:table-cell>
          <table:table-cell table:formula="of:=[.D1248]-[.D12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2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73194444444444" calcext:value-type="float">
            <text:p>0,00173194444444444000</text:p>
          </table:table-cell>
          <table:table-cell table:formula="of:=[.D1249]-[.D12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2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73333333333333" calcext:value-type="float">
            <text:p>0,00173333333333333000</text:p>
          </table:table-cell>
          <table:table-cell table:formula="of:=[.D1250]-[.D12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2" office:value-type="float" office:value="14988" calcext:value-type="float">
            <text:p>14988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73472222222222" calcext:value-type="float">
            <text:p>0,00173472222222222000</text:p>
          </table:table-cell>
          <table:table-cell table:formula="of:=[.D1251]-[.D12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2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73611111111111" calcext:value-type="float">
            <text:p>0,00173611111111111000</text:p>
          </table:table-cell>
          <table:table-cell table:formula="of:=[.D1252]-[.D12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2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7375" calcext:value-type="float">
            <text:p>0,00173750000000000000</text:p>
          </table:table-cell>
          <table:table-cell table:formula="of:=[.D1253]-[.D1252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2" office:value-type="float" office:value="15024" calcext:value-type="float">
            <text:p>15024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73888888888889" calcext:value-type="float">
            <text:p>0,00173888888888889000</text:p>
          </table:table-cell>
          <table:table-cell table:formula="of:=[.D1254]-[.D12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2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74027777777778" calcext:value-type="float">
            <text:p>0,00174027777777778000</text:p>
          </table:table-cell>
          <table:table-cell table:formula="of:=[.D1255]-[.D12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2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74166666666667" calcext:value-type="float">
            <text:p>0,00174166666666667000</text:p>
          </table:table-cell>
          <table:table-cell table:formula="of:=[.D1256]-[.D12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2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74305555555556" calcext:value-type="float">
            <text:p>0,00174305555555556000</text:p>
          </table:table-cell>
          <table:table-cell table:formula="of:=[.D1257]-[.D12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2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74444444444444" calcext:value-type="float">
            <text:p>0,00174444444444444000</text:p>
          </table:table-cell>
          <table:table-cell table:formula="of:=[.D1258]-[.D12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2" office:value-type="float" office:value="15084" calcext:value-type="float">
            <text:p>15084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74583333333333" calcext:value-type="float">
            <text:p>0,00174583333333333000</text:p>
          </table:table-cell>
          <table:table-cell table:formula="of:=[.D1259]-[.D12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2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74722222222222" calcext:value-type="float">
            <text:p>0,00174722222222222000</text:p>
          </table:table-cell>
          <table:table-cell table:formula="of:=[.D1260]-[.D12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2" office:value-type="float" office:value="15108" calcext:value-type="float">
            <text:p>15108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74861111111111" calcext:value-type="float">
            <text:p>0,00174861111111111000</text:p>
          </table:table-cell>
          <table:table-cell table:formula="of:=[.D1261]-[.D12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2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75" calcext:value-type="float">
            <text:p>0,00175000000000000000</text:p>
          </table:table-cell>
          <table:table-cell table:formula="of:=[.D1262]-[.D12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2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75138888888889" calcext:value-type="float">
            <text:p>0,00175138888888889000</text:p>
          </table:table-cell>
          <table:table-cell table:formula="of:=[.D1263]-[.D12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2" office:value-type="float" office:value="15144" calcext:value-type="float">
            <text:p>15144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75277777777778" calcext:value-type="float">
            <text:p>0,00175277777777778000</text:p>
          </table:table-cell>
          <table:table-cell table:formula="of:=[.D1264]-[.D12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2" office:value-type="float" office:value="15156" calcext:value-type="float">
            <text:p>15156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75416666666667" calcext:value-type="float">
            <text:p>0,00175416666666667000</text:p>
          </table:table-cell>
          <table:table-cell table:formula="of:=[.D1265]-[.D12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2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75555555555556" calcext:value-type="float">
            <text:p>0,00175555555555556000</text:p>
          </table:table-cell>
          <table:table-cell table:formula="of:=[.D1266]-[.D12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2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75694444444444" calcext:value-type="float">
            <text:p>0,00175694444444444000</text:p>
          </table:table-cell>
          <table:table-cell table:formula="of:=[.D1267]-[.D12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2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75833333333333" calcext:value-type="float">
            <text:p>0,00175833333333333000</text:p>
          </table:table-cell>
          <table:table-cell table:formula="of:=[.D1268]-[.D12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2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75972222222222" calcext:value-type="float">
            <text:p>0,00175972222222222000</text:p>
          </table:table-cell>
          <table:table-cell table:formula="of:=[.D1269]-[.D12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2" office:value-type="float" office:value="15216" calcext:value-type="float">
            <text:p>15216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76111111111111" calcext:value-type="float">
            <text:p>0,00176111111111111000</text:p>
          </table:table-cell>
          <table:table-cell table:formula="of:=[.D1270]-[.D12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2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7625" calcext:value-type="float">
            <text:p>0,00176250000000000000</text:p>
          </table:table-cell>
          <table:table-cell table:formula="of:=[.D1271]-[.D12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2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76388888888889" calcext:value-type="float">
            <text:p>0,00176388888888889000</text:p>
          </table:table-cell>
          <table:table-cell table:formula="of:=[.D1272]-[.D12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2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76527777777778" calcext:value-type="float">
            <text:p>0,00176527777777778000</text:p>
          </table:table-cell>
          <table:table-cell table:formula="of:=[.D1273]-[.D12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2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76666666666667" calcext:value-type="float">
            <text:p>0,00176666666666667000</text:p>
          </table:table-cell>
          <table:table-cell table:formula="of:=[.D1274]-[.D12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2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76805555555556" calcext:value-type="float">
            <text:p>0,00176805555555556000</text:p>
          </table:table-cell>
          <table:table-cell table:formula="of:=[.D1275]-[.D12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2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76944444444444" calcext:value-type="float">
            <text:p>0,00176944444444444000</text:p>
          </table:table-cell>
          <table:table-cell table:formula="of:=[.D1276]-[.D12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2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77083333333333" calcext:value-type="float">
            <text:p>0,00177083333333333000</text:p>
          </table:table-cell>
          <table:table-cell table:formula="of:=[.D1277]-[.D12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2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77222222222222" calcext:value-type="float">
            <text:p>0,00177222222222222000</text:p>
          </table:table-cell>
          <table:table-cell table:formula="of:=[.D1278]-[.D12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2" office:value-type="float" office:value="15324" calcext:value-type="float">
            <text:p>15324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77361111111111" calcext:value-type="float">
            <text:p>0,00177361111111111000</text:p>
          </table:table-cell>
          <table:table-cell table:formula="of:=[.D1279]-[.D1278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2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775" calcext:value-type="float">
            <text:p>0,00177500000000000000</text:p>
          </table:table-cell>
          <table:table-cell table:formula="of:=[.D1280]-[.D12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2" office:value-type="float" office:value="15348" calcext:value-type="float">
            <text:p>15348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77638888888889" calcext:value-type="float">
            <text:p>0,00177638888888889000</text:p>
          </table:table-cell>
          <table:table-cell table:formula="of:=[.D1281]-[.D12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2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77777777777778" calcext:value-type="float">
            <text:p>0,00177777777777778000</text:p>
          </table:table-cell>
          <table:table-cell table:formula="of:=[.D1282]-[.D12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2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77916666666667" calcext:value-type="float">
            <text:p>0,00177916666666667000</text:p>
          </table:table-cell>
          <table:table-cell table:formula="of:=[.D1283]-[.D12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2" office:value-type="float" office:value="15384" calcext:value-type="float">
            <text:p>15384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78055555555556" calcext:value-type="float">
            <text:p>0,00178055555555556000</text:p>
          </table:table-cell>
          <table:table-cell table:formula="of:=[.D1284]-[.D12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2" office:value-type="float" office:value="15396" calcext:value-type="float">
            <text:p>15396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78194444444444" calcext:value-type="float">
            <text:p>0,00178194444444444000</text:p>
          </table:table-cell>
          <table:table-cell table:formula="of:=[.D1285]-[.D12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2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78333333333333" calcext:value-type="float">
            <text:p>0,00178333333333333000</text:p>
          </table:table-cell>
          <table:table-cell table:formula="of:=[.D1286]-[.D12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2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78472222222222" calcext:value-type="float">
            <text:p>0,00178472222222222000</text:p>
          </table:table-cell>
          <table:table-cell table:formula="of:=[.D1287]-[.D12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2" office:value-type="float" office:value="15432" calcext:value-type="float">
            <text:p>15432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78611111111111" calcext:value-type="float">
            <text:p>0,00178611111111111000</text:p>
          </table:table-cell>
          <table:table-cell table:formula="of:=[.D1288]-[.D12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2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7875" calcext:value-type="float">
            <text:p>0,00178750000000000000</text:p>
          </table:table-cell>
          <table:table-cell table:formula="of:=[.D1289]-[.D12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2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78888888888889" calcext:value-type="float">
            <text:p>0,00178888888888889000</text:p>
          </table:table-cell>
          <table:table-cell table:formula="of:=[.D1290]-[.D12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2" office:value-type="float" office:value="15468" calcext:value-type="float">
            <text:p>15468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79027777777778" calcext:value-type="float">
            <text:p>0,00179027777777778000</text:p>
          </table:table-cell>
          <table:table-cell table:formula="of:=[.D1291]-[.D12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2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79166666666667" calcext:value-type="float">
            <text:p>0,00179166666666667000</text:p>
          </table:table-cell>
          <table:table-cell table:formula="of:=[.D1292]-[.D12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2" office:value-type="float" office:value="15492" calcext:value-type="float">
            <text:p>15492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79305555555556" calcext:value-type="float">
            <text:p>0,00179305555555556000</text:p>
          </table:table-cell>
          <table:table-cell table:formula="of:=[.D1293]-[.D12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2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79444444444444" calcext:value-type="float">
            <text:p>0,00179444444444444000</text:p>
          </table:table-cell>
          <table:table-cell table:formula="of:=[.D1294]-[.D12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2" office:value-type="float" office:value="15516" calcext:value-type="float">
            <text:p>15516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79583333333333" calcext:value-type="float">
            <text:p>0,00179583333333333000</text:p>
          </table:table-cell>
          <table:table-cell table:formula="of:=[.D1295]-[.D12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2" office:value-type="float" office:value="15528" calcext:value-type="float">
            <text:p>15528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79722222222222" calcext:value-type="float">
            <text:p>0,00179722222222222000</text:p>
          </table:table-cell>
          <table:table-cell table:formula="of:=[.D1296]-[.D12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2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79861111111111" calcext:value-type="float">
            <text:p>0,00179861111111111000</text:p>
          </table:table-cell>
          <table:table-cell table:formula="of:=[.D1297]-[.D12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2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8" calcext:value-type="float">
            <text:p>0,00180000000000000000</text:p>
          </table:table-cell>
          <table:table-cell table:formula="of:=[.D1298]-[.D12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2" office:value-type="float" office:value="15564" calcext:value-type="float">
            <text:p>15564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80138888888889" calcext:value-type="float">
            <text:p>0,00180138888888889000</text:p>
          </table:table-cell>
          <table:table-cell table:formula="of:=[.D1299]-[.D12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2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80277777777778" calcext:value-type="float">
            <text:p>0,00180277777777778000</text:p>
          </table:table-cell>
          <table:table-cell table:formula="of:=[.D1300]-[.D12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2" office:value-type="float" office:value="15588" calcext:value-type="float">
            <text:p>15588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80416666666667" calcext:value-type="float">
            <text:p>0,00180416666666667000</text:p>
          </table:table-cell>
          <table:table-cell table:formula="of:=[.D1301]-[.D13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2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80555555555556" calcext:value-type="float">
            <text:p>0,00180555555555556000</text:p>
          </table:table-cell>
          <table:table-cell table:formula="of:=[.D1302]-[.D13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2" office:value-type="float" office:value="15612" calcext:value-type="float">
            <text:p>15612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80694444444444" calcext:value-type="float">
            <text:p>0,00180694444444444000</text:p>
          </table:table-cell>
          <table:table-cell table:formula="of:=[.D1303]-[.D13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2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80833333333333" calcext:value-type="float">
            <text:p>0,00180833333333333000</text:p>
          </table:table-cell>
          <table:table-cell table:formula="of:=[.D1304]-[.D13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2" office:value-type="float" office:value="15636" calcext:value-type="float">
            <text:p>15636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80972222222222" calcext:value-type="float">
            <text:p>0,00180972222222222000</text:p>
          </table:table-cell>
          <table:table-cell table:formula="of:=[.D1305]-[.D1304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2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81111111111111" calcext:value-type="float">
            <text:p>0,00181111111111111000</text:p>
          </table:table-cell>
          <table:table-cell table:formula="of:=[.D1306]-[.D13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2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8125" calcext:value-type="float">
            <text:p>0,00181250000000000000</text:p>
          </table:table-cell>
          <table:table-cell table:formula="of:=[.D1307]-[.D13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2" office:value-type="float" office:value="15672" calcext:value-type="float">
            <text:p>15672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81388888888889" calcext:value-type="float">
            <text:p>0,00181388888888889000</text:p>
          </table:table-cell>
          <table:table-cell table:formula="of:=[.D1308]-[.D13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2" office:value-type="float" office:value="15684" calcext:value-type="float">
            <text:p>15684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81527777777778" calcext:value-type="float">
            <text:p>0,00181527777777778000</text:p>
          </table:table-cell>
          <table:table-cell table:formula="of:=[.D1309]-[.D13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2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81666666666667" calcext:value-type="float">
            <text:p>0,00181666666666667000</text:p>
          </table:table-cell>
          <table:table-cell table:formula="of:=[.D1310]-[.D13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2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81805555555556" calcext:value-type="float">
            <text:p>0,00181805555555556000</text:p>
          </table:table-cell>
          <table:table-cell table:formula="of:=[.D1311]-[.D13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2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81944444444444" calcext:value-type="float">
            <text:p>0,00181944444444444000</text:p>
          </table:table-cell>
          <table:table-cell table:formula="of:=[.D1312]-[.D13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2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82083333333333" calcext:value-type="float">
            <text:p>0,00182083333333333000</text:p>
          </table:table-cell>
          <table:table-cell table:formula="of:=[.D1313]-[.D13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2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82222222222222" calcext:value-type="float">
            <text:p>0,00182222222222222000</text:p>
          </table:table-cell>
          <table:table-cell table:formula="of:=[.D1314]-[.D13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2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82361111111111" calcext:value-type="float">
            <text:p>0,00182361111111111000</text:p>
          </table:table-cell>
          <table:table-cell table:formula="of:=[.D1315]-[.D13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2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825" calcext:value-type="float">
            <text:p>0,00182500000000000000</text:p>
          </table:table-cell>
          <table:table-cell table:formula="of:=[.D1316]-[.D13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2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82638888888889" calcext:value-type="float">
            <text:p>0,00182638888888889000</text:p>
          </table:table-cell>
          <table:table-cell table:formula="of:=[.D1317]-[.D13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2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82777777777778" calcext:value-type="float">
            <text:p>0,00182777777777778000</text:p>
          </table:table-cell>
          <table:table-cell table:formula="of:=[.D1318]-[.D13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2" office:value-type="float" office:value="15804" calcext:value-type="float">
            <text:p>15804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82916666666667" calcext:value-type="float">
            <text:p>0,00182916666666667000</text:p>
          </table:table-cell>
          <table:table-cell table:formula="of:=[.D1319]-[.D13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2" office:value-type="float" office:value="15816" calcext:value-type="float">
            <text:p>15816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83055555555556" calcext:value-type="float">
            <text:p>0,00183055555555556000</text:p>
          </table:table-cell>
          <table:table-cell table:formula="of:=[.D1320]-[.D13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2" office:value-type="float" office:value="15828" calcext:value-type="float">
            <text:p>15828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83194444444444" calcext:value-type="float">
            <text:p>0,00183194444444444000</text:p>
          </table:table-cell>
          <table:table-cell table:formula="of:=[.D1321]-[.D13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2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83333333333333" calcext:value-type="float">
            <text:p>0,00183333333333333000</text:p>
          </table:table-cell>
          <table:table-cell table:formula="of:=[.D1322]-[.D13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2" office:value-type="float" office:value="15852" calcext:value-type="float">
            <text:p>15852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83472222222222" calcext:value-type="float">
            <text:p>0,00183472222222222000</text:p>
          </table:table-cell>
          <table:table-cell table:formula="of:=[.D1323]-[.D13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2" office:value-type="float" office:value="15864" calcext:value-type="float">
            <text:p>15864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83611111111111" calcext:value-type="float">
            <text:p>0,00183611111111111000</text:p>
          </table:table-cell>
          <table:table-cell table:formula="of:=[.D1324]-[.D13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2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8375" calcext:value-type="float">
            <text:p>0,00183750000000000000</text:p>
          </table:table-cell>
          <table:table-cell table:formula="of:=[.D1325]-[.D13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2" office:value-type="float" office:value="15888" calcext:value-type="float">
            <text:p>15888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83888888888889" calcext:value-type="float">
            <text:p>0,00183888888888889000</text:p>
          </table:table-cell>
          <table:table-cell table:formula="of:=[.D1326]-[.D13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2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84027777777778" calcext:value-type="float">
            <text:p>0,00184027777777778000</text:p>
          </table:table-cell>
          <table:table-cell table:formula="of:=[.D1327]-[.D13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2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84166666666667" calcext:value-type="float">
            <text:p>0,00184166666666667000</text:p>
          </table:table-cell>
          <table:table-cell table:formula="of:=[.D1328]-[.D13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2" office:value-type="float" office:value="15924" calcext:value-type="float">
            <text:p>15924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84305555555556" calcext:value-type="float">
            <text:p>0,00184305555555556000</text:p>
          </table:table-cell>
          <table:table-cell table:formula="of:=[.D1329]-[.D13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2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84444444444444" calcext:value-type="float">
            <text:p>0,00184444444444444000</text:p>
          </table:table-cell>
          <table:table-cell table:formula="of:=[.D1330]-[.D1329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2" office:value-type="float" office:value="15948" calcext:value-type="float">
            <text:p>15948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84583333333333" calcext:value-type="float">
            <text:p>0,00184583333333333000</text:p>
          </table:table-cell>
          <table:table-cell table:formula="of:=[.D1331]-[.D13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2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84722222222222" calcext:value-type="float">
            <text:p>0,00184722222222222000</text:p>
          </table:table-cell>
          <table:table-cell table:formula="of:=[.D1332]-[.D13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2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84861111111111" calcext:value-type="float">
            <text:p>0,00184861111111111000</text:p>
          </table:table-cell>
          <table:table-cell table:formula="of:=[.D1333]-[.D13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2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85" calcext:value-type="float">
            <text:p>0,00185000000000000000</text:p>
          </table:table-cell>
          <table:table-cell table:formula="of:=[.D1334]-[.D13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2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85138888888889" calcext:value-type="float">
            <text:p>0,00185138888888889000</text:p>
          </table:table-cell>
          <table:table-cell table:formula="of:=[.D1335]-[.D13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2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85277777777778" calcext:value-type="float">
            <text:p>0,00185277777777778000</text:p>
          </table:table-cell>
          <table:table-cell table:formula="of:=[.D1336]-[.D13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2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85416666666667" calcext:value-type="float">
            <text:p>0,00185416666666667000</text:p>
          </table:table-cell>
          <table:table-cell table:formula="of:=[.D1337]-[.D13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2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85555555555556" calcext:value-type="float">
            <text:p>0,00185555555555556000</text:p>
          </table:table-cell>
          <table:table-cell table:formula="of:=[.D1338]-[.D13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2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85694444444444" calcext:value-type="float">
            <text:p>0,00185694444444444000</text:p>
          </table:table-cell>
          <table:table-cell table:formula="of:=[.D1339]-[.D13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2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85833333333333" calcext:value-type="float">
            <text:p>0,00185833333333333000</text:p>
          </table:table-cell>
          <table:table-cell table:formula="of:=[.D1340]-[.D13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2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85972222222222" calcext:value-type="float">
            <text:p>0,00185972222222222000</text:p>
          </table:table-cell>
          <table:table-cell table:formula="of:=[.D1341]-[.D13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2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86111111111111" calcext:value-type="float">
            <text:p>0,00186111111111111000</text:p>
          </table:table-cell>
          <table:table-cell table:formula="of:=[.D1342]-[.D13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2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8625" calcext:value-type="float">
            <text:p>0,00186250000000000000</text:p>
          </table:table-cell>
          <table:table-cell table:formula="of:=[.D1343]-[.D13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2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86388888888889" calcext:value-type="float">
            <text:p>0,00186388888888889000</text:p>
          </table:table-cell>
          <table:table-cell table:formula="of:=[.D1344]-[.D13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2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86527777777778" calcext:value-type="float">
            <text:p>0,00186527777777778000</text:p>
          </table:table-cell>
          <table:table-cell table:formula="of:=[.D1345]-[.D13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2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86666666666667" calcext:value-type="float">
            <text:p>0,00186666666666667000</text:p>
          </table:table-cell>
          <table:table-cell table:formula="of:=[.D1346]-[.D13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2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86805555555556" calcext:value-type="float">
            <text:p>0,00186805555555556000</text:p>
          </table:table-cell>
          <table:table-cell table:formula="of:=[.D1347]-[.D13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2" office:value-type="float" office:value="16152" calcext:value-type="float">
            <text:p>16152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86944444444444" calcext:value-type="float">
            <text:p>0,00186944444444444000</text:p>
          </table:table-cell>
          <table:table-cell table:formula="of:=[.D1348]-[.D13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2" office:value-type="float" office:value="16164" calcext:value-type="float">
            <text:p>16164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87083333333333" calcext:value-type="float">
            <text:p>0,00187083333333333000</text:p>
          </table:table-cell>
          <table:table-cell table:formula="of:=[.D1349]-[.D13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2" office:value-type="float" office:value="16176" calcext:value-type="float">
            <text:p>16176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87222222222222" calcext:value-type="float">
            <text:p>0,00187222222222222000</text:p>
          </table:table-cell>
          <table:table-cell table:formula="of:=[.D1350]-[.D13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2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87361111111111" calcext:value-type="float">
            <text:p>0,00187361111111111000</text:p>
          </table:table-cell>
          <table:table-cell table:formula="of:=[.D1351]-[.D13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2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875" calcext:value-type="float">
            <text:p>0,00187500000000000000</text:p>
          </table:table-cell>
          <table:table-cell table:formula="of:=[.D1352]-[.D13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2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87638888888889" calcext:value-type="float">
            <text:p>0,00187638888888889000</text:p>
          </table:table-cell>
          <table:table-cell table:formula="of:=[.D1353]-[.D13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2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87777777777778" calcext:value-type="float">
            <text:p>0,00187777777777778000</text:p>
          </table:table-cell>
          <table:table-cell table:formula="of:=[.D1354]-[.D13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2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87916666666667" calcext:value-type="float">
            <text:p>0,00187916666666667000</text:p>
          </table:table-cell>
          <table:table-cell table:formula="of:=[.D1355]-[.D13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2" office:value-type="float" office:value="16248" calcext:value-type="float">
            <text:p>16248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88055555555556" calcext:value-type="float">
            <text:p>0,00188055555555556000</text:p>
          </table:table-cell>
          <table:table-cell table:formula="of:=[.D1356]-[.D1355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2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88194444444444" calcext:value-type="float">
            <text:p>0,00188194444444444000</text:p>
          </table:table-cell>
          <table:table-cell table:formula="of:=[.D1357]-[.D13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2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88333333333333" calcext:value-type="float">
            <text:p>0,00188333333333333000</text:p>
          </table:table-cell>
          <table:table-cell table:formula="of:=[.D1358]-[.D13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2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88472222222222" calcext:value-type="float">
            <text:p>0,00188472222222222000</text:p>
          </table:table-cell>
          <table:table-cell table:formula="of:=[.D1359]-[.D13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2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88611111111111" calcext:value-type="float">
            <text:p>0,00188611111111111000</text:p>
          </table:table-cell>
          <table:table-cell table:formula="of:=[.D1360]-[.D13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2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8875" calcext:value-type="float">
            <text:p>0,00188750000000000000</text:p>
          </table:table-cell>
          <table:table-cell table:formula="of:=[.D1361]-[.D13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2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88888888888889" calcext:value-type="float">
            <text:p>0,00188888888888889000</text:p>
          </table:table-cell>
          <table:table-cell table:formula="of:=[.D1362]-[.D13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2" office:value-type="float" office:value="16332" calcext:value-type="float">
            <text:p>16332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89027777777778" calcext:value-type="float">
            <text:p>0,00189027777777778000</text:p>
          </table:table-cell>
          <table:table-cell table:formula="of:=[.D1363]-[.D13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2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89166666666667" calcext:value-type="float">
            <text:p>0,00189166666666667000</text:p>
          </table:table-cell>
          <table:table-cell table:formula="of:=[.D1364]-[.D13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2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89305555555556" calcext:value-type="float">
            <text:p>0,00189305555555556000</text:p>
          </table:table-cell>
          <table:table-cell table:formula="of:=[.D1365]-[.D13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2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89444444444444" calcext:value-type="float">
            <text:p>0,00189444444444444000</text:p>
          </table:table-cell>
          <table:table-cell table:formula="of:=[.D1366]-[.D13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2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89583333333333" calcext:value-type="float">
            <text:p>0,00189583333333333000</text:p>
          </table:table-cell>
          <table:table-cell table:formula="of:=[.D1367]-[.D13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2" office:value-type="float" office:value="16392" calcext:value-type="float">
            <text:p>16392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89722222222222" calcext:value-type="float">
            <text:p>0,00189722222222222000</text:p>
          </table:table-cell>
          <table:table-cell table:formula="of:=[.D1368]-[.D13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2" office:value-type="float" office:value="16404" calcext:value-type="float">
            <text:p>16404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89861111111111" calcext:value-type="float">
            <text:p>0,00189861111111111000</text:p>
          </table:table-cell>
          <table:table-cell table:formula="of:=[.D1369]-[.D13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2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9" calcext:value-type="float">
            <text:p>0,00190000000000000000</text:p>
          </table:table-cell>
          <table:table-cell table:formula="of:=[.D1370]-[.D13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2" office:value-type="float" office:value="16428" calcext:value-type="float">
            <text:p>16428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90138888888889" calcext:value-type="float">
            <text:p>0,00190138888888889000</text:p>
          </table:table-cell>
          <table:table-cell table:formula="of:=[.D1371]-[.D13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2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90277777777778" calcext:value-type="float">
            <text:p>0,00190277777777778000</text:p>
          </table:table-cell>
          <table:table-cell table:formula="of:=[.D1372]-[.D13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2" office:value-type="float" office:value="16452" calcext:value-type="float">
            <text:p>16452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90416666666667" calcext:value-type="float">
            <text:p>0,00190416666666667000</text:p>
          </table:table-cell>
          <table:table-cell table:formula="of:=[.D1373]-[.D13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2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90555555555556" calcext:value-type="float">
            <text:p>0,00190555555555556000</text:p>
          </table:table-cell>
          <table:table-cell table:formula="of:=[.D1374]-[.D13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2" office:value-type="float" office:value="16476" calcext:value-type="float">
            <text:p>16476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90694444444444" calcext:value-type="float">
            <text:p>0,00190694444444444000</text:p>
          </table:table-cell>
          <table:table-cell table:formula="of:=[.D1375]-[.D13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2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90833333333333" calcext:value-type="float">
            <text:p>0,00190833333333333000</text:p>
          </table:table-cell>
          <table:table-cell table:formula="of:=[.D1376]-[.D13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2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90972222222222" calcext:value-type="float">
            <text:p>0,00190972222222222000</text:p>
          </table:table-cell>
          <table:table-cell table:formula="of:=[.D1377]-[.D13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2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91111111111111" calcext:value-type="float">
            <text:p>0,00191111111111111000</text:p>
          </table:table-cell>
          <table:table-cell table:formula="of:=[.D1378]-[.D13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2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9125" calcext:value-type="float">
            <text:p>0,00191250000000000000</text:p>
          </table:table-cell>
          <table:table-cell table:formula="of:=[.D1379]-[.D13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2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91388888888889" calcext:value-type="float">
            <text:p>0,00191388888888889000</text:p>
          </table:table-cell>
          <table:table-cell table:formula="of:=[.D1380]-[.D13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2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91527777777778" calcext:value-type="float">
            <text:p>0,00191527777777778000</text:p>
          </table:table-cell>
          <table:table-cell table:formula="of:=[.D1381]-[.D13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2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91666666666667" calcext:value-type="float">
            <text:p>0,00191666666666667000</text:p>
          </table:table-cell>
          <table:table-cell table:formula="of:=[.D1382]-[.D1381]" office:value-type="float" office:value="0.0000013888888888891" calcext:value-type="float">
            <text:p>0,0000013888888888891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2" office:value-type="float" office:value="16572" calcext:value-type="float">
            <text:p>16572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91805555555556" calcext:value-type="float">
            <text:p>0,00191805555555556000</text:p>
          </table:table-cell>
          <table:table-cell table:formula="of:=[.D1383]-[.D13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2" office:value-type="float" office:value="16584" calcext:value-type="float">
            <text:p>16584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91944444444444" calcext:value-type="float">
            <text:p>0,00191944444444444000</text:p>
          </table:table-cell>
          <table:table-cell table:formula="of:=[.D1384]-[.D13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2" office:value-type="float" office:value="16596" calcext:value-type="float">
            <text:p>16596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92083333333333" calcext:value-type="float">
            <text:p>0,00192083333333333000</text:p>
          </table:table-cell>
          <table:table-cell table:formula="of:=[.D1385]-[.D13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2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92222222222222" calcext:value-type="float">
            <text:p>0,00192222222222222000</text:p>
          </table:table-cell>
          <table:table-cell table:formula="of:=[.D1386]-[.D13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2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92361111111111" calcext:value-type="float">
            <text:p>0,00192361111111111000</text:p>
          </table:table-cell>
          <table:table-cell table:formula="of:=[.D1387]-[.D13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2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925" calcext:value-type="float">
            <text:p>0,00192500000000000000</text:p>
          </table:table-cell>
          <table:table-cell table:formula="of:=[.D1388]-[.D13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2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92638888888889" calcext:value-type="float">
            <text:p>0,00192638888888889000</text:p>
          </table:table-cell>
          <table:table-cell table:formula="of:=[.D1389]-[.D13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2" office:value-type="float" office:value="16656" calcext:value-type="float">
            <text:p>16656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92777777777778" calcext:value-type="float">
            <text:p>0,00192777777777778000</text:p>
          </table:table-cell>
          <table:table-cell table:formula="of:=[.D1390]-[.D13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2" office:value-type="float" office:value="16668" calcext:value-type="float">
            <text:p>16668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92916666666667" calcext:value-type="float">
            <text:p>0,00192916666666667000</text:p>
          </table:table-cell>
          <table:table-cell table:formula="of:=[.D1391]-[.D13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2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93055555555556" calcext:value-type="float">
            <text:p>0,00193055555555556000</text:p>
          </table:table-cell>
          <table:table-cell table:formula="of:=[.D1392]-[.D13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2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93194444444444" calcext:value-type="float">
            <text:p>0,00193194444444444000</text:p>
          </table:table-cell>
          <table:table-cell table:formula="of:=[.D1393]-[.D13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2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93333333333333" calcext:value-type="float">
            <text:p>0,00193333333333333000</text:p>
          </table:table-cell>
          <table:table-cell table:formula="of:=[.D1394]-[.D13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2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93472222222222" calcext:value-type="float">
            <text:p>0,00193472222222222000</text:p>
          </table:table-cell>
          <table:table-cell table:formula="of:=[.D1395]-[.D13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2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93611111111111" calcext:value-type="float">
            <text:p>0,00193611111111111000</text:p>
          </table:table-cell>
          <table:table-cell table:formula="of:=[.D1396]-[.D13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2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9375" calcext:value-type="float">
            <text:p>0,00193750000000000000</text:p>
          </table:table-cell>
          <table:table-cell table:formula="of:=[.D1397]-[.D13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2" office:value-type="float" office:value="16752" calcext:value-type="float">
            <text:p>16752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93888888888889" calcext:value-type="float">
            <text:p>0,00193888888888889000</text:p>
          </table:table-cell>
          <table:table-cell table:formula="of:=[.D1398]-[.D13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2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94027777777778" calcext:value-type="float">
            <text:p>0,00194027777777778000</text:p>
          </table:table-cell>
          <table:table-cell table:formula="of:=[.D1399]-[.D13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2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94166666666667" calcext:value-type="float">
            <text:p>0,00194166666666667000</text:p>
          </table:table-cell>
          <table:table-cell table:formula="of:=[.D1400]-[.D13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2" office:value-type="float" office:value="16788" calcext:value-type="float">
            <text:p>16788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94305555555556" calcext:value-type="float">
            <text:p>0,00194305555555556000</text:p>
          </table:table-cell>
          <table:table-cell table:formula="of:=[.D1401]-[.D14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2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94444444444444" calcext:value-type="float">
            <text:p>0,00194444444444444000</text:p>
          </table:table-cell>
          <table:table-cell table:formula="of:=[.D1402]-[.D14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2" office:value-type="float" office:value="16812" calcext:value-type="float">
            <text:p>16812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94583333333333" calcext:value-type="float">
            <text:p>0,00194583333333333000</text:p>
          </table:table-cell>
          <table:table-cell table:formula="of:=[.D1403]-[.D14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2" office:value-type="float" office:value="16824" calcext:value-type="float">
            <text:p>16824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94722222222222" calcext:value-type="float">
            <text:p>0,00194722222222222000</text:p>
          </table:table-cell>
          <table:table-cell table:formula="of:=[.D1404]-[.D14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2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94861111111111" calcext:value-type="float">
            <text:p>0,00194861111111111000</text:p>
          </table:table-cell>
          <table:table-cell table:formula="of:=[.D1405]-[.D14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2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95" calcext:value-type="float">
            <text:p>0,00195000000000000000</text:p>
          </table:table-cell>
          <table:table-cell table:formula="of:=[.D1406]-[.D14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2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95138888888889" calcext:value-type="float">
            <text:p>0,00195138888888889000</text:p>
          </table:table-cell>
          <table:table-cell table:formula="of:=[.D1407]-[.D14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2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95277777777778" calcext:value-type="float">
            <text:p>0,00195277777777778000</text:p>
          </table:table-cell>
          <table:table-cell table:formula="of:=[.D1408]-[.D14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2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95416666666667" calcext:value-type="float">
            <text:p>0,00195416666666667000</text:p>
          </table:table-cell>
          <table:table-cell table:formula="of:=[.D1409]-[.D14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2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95555555555556" calcext:value-type="float">
            <text:p>0,00195555555555556000</text:p>
          </table:table-cell>
          <table:table-cell table:formula="of:=[.D1410]-[.D14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2" office:value-type="float" office:value="16908" calcext:value-type="float">
            <text:p>16908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95694444444444" calcext:value-type="float">
            <text:p>0,00195694444444444000</text:p>
          </table:table-cell>
          <table:table-cell table:formula="of:=[.D1411]-[.D14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2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95833333333333" calcext:value-type="float">
            <text:p>0,00195833333333333000</text:p>
          </table:table-cell>
          <table:table-cell table:formula="of:=[.D1412]-[.D14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2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95972222222222" calcext:value-type="float">
            <text:p>0,00195972222222222000</text:p>
          </table:table-cell>
          <table:table-cell table:formula="of:=[.D1413]-[.D14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2" office:value-type="float" office:value="16944" calcext:value-type="float">
            <text:p>16944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96111111111111" calcext:value-type="float">
            <text:p>0,00196111111111111000</text:p>
          </table:table-cell>
          <table:table-cell table:formula="of:=[.D1414]-[.D14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2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9625" calcext:value-type="float">
            <text:p>0,00196250000000000000</text:p>
          </table:table-cell>
          <table:table-cell table:formula="of:=[.D1415]-[.D14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2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96388888888889" calcext:value-type="float">
            <text:p>0,00196388888888889000</text:p>
          </table:table-cell>
          <table:table-cell table:formula="of:=[.D1416]-[.D14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2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96527777777778" calcext:value-type="float">
            <text:p>0,00196527777777778000</text:p>
          </table:table-cell>
          <table:table-cell table:formula="of:=[.D1417]-[.D14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2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96666666666667" calcext:value-type="float">
            <text:p>0,00196666666666667000</text:p>
          </table:table-cell>
          <table:table-cell table:formula="of:=[.D1418]-[.D14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2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96805555555556" calcext:value-type="float">
            <text:p>0,00196805555555556000</text:p>
          </table:table-cell>
          <table:table-cell table:formula="of:=[.D1419]-[.D14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2" office:value-type="float" office:value="17016" calcext:value-type="float">
            <text:p>17016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96944444444444" calcext:value-type="float">
            <text:p>0,00196944444444444000</text:p>
          </table:table-cell>
          <table:table-cell table:formula="of:=[.D1420]-[.D14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2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97083333333333" calcext:value-type="float">
            <text:p>0,00197083333333333000</text:p>
          </table:table-cell>
          <table:table-cell table:formula="of:=[.D1421]-[.D1420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2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97222222222222" calcext:value-type="float">
            <text:p>0,00197222222222222000</text:p>
          </table:table-cell>
          <table:table-cell table:formula="of:=[.D1422]-[.D14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2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97361111111111" calcext:value-type="float">
            <text:p>0,00197361111111111000</text:p>
          </table:table-cell>
          <table:table-cell table:formula="of:=[.D1423]-[.D14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2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975" calcext:value-type="float">
            <text:p>0,00197500000000000000</text:p>
          </table:table-cell>
          <table:table-cell table:formula="of:=[.D1424]-[.D14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2" office:value-type="float" office:value="17076" calcext:value-type="float">
            <text:p>17076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97638888888889" calcext:value-type="float">
            <text:p>0,00197638888888889000</text:p>
          </table:table-cell>
          <table:table-cell table:formula="of:=[.D1425]-[.D14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2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97777777777778" calcext:value-type="float">
            <text:p>0,00197777777777778000</text:p>
          </table:table-cell>
          <table:table-cell table:formula="of:=[.D1426]-[.D14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2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97916666666667" calcext:value-type="float">
            <text:p>0,00197916666666667000</text:p>
          </table:table-cell>
          <table:table-cell table:formula="of:=[.D1427]-[.D14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2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98055555555556" calcext:value-type="float">
            <text:p>0,00198055555555556000</text:p>
          </table:table-cell>
          <table:table-cell table:formula="of:=[.D1428]-[.D14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2" office:value-type="float" office:value="17124" calcext:value-type="float">
            <text:p>17124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98194444444444" calcext:value-type="float">
            <text:p>0,00198194444444444000</text:p>
          </table:table-cell>
          <table:table-cell table:formula="of:=[.D1429]-[.D14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2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98333333333333" calcext:value-type="float">
            <text:p>0,00198333333333333000</text:p>
          </table:table-cell>
          <table:table-cell table:formula="of:=[.D1430]-[.D14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2" office:value-type="float" office:value="17148" calcext:value-type="float">
            <text:p>17148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98472222222222" calcext:value-type="float">
            <text:p>0,00198472222222222000</text:p>
          </table:table-cell>
          <table:table-cell table:formula="of:=[.D1431]-[.D14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2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98611111111111" calcext:value-type="float">
            <text:p>0,00198611111111111000</text:p>
          </table:table-cell>
          <table:table-cell table:formula="of:=[.D1432]-[.D14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2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9875" calcext:value-type="float">
            <text:p>0,00198750000000000000</text:p>
          </table:table-cell>
          <table:table-cell table:formula="of:=[.D1433]-[.D14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2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98888888888889" calcext:value-type="float">
            <text:p>0,00198888888888889000</text:p>
          </table:table-cell>
          <table:table-cell table:formula="of:=[.D1434]-[.D14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2" office:value-type="float" office:value="17196" calcext:value-type="float">
            <text:p>17196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99027777777778" calcext:value-type="float">
            <text:p>0,00199027777777778000</text:p>
          </table:table-cell>
          <table:table-cell table:formula="of:=[.D1435]-[.D14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2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99166666666667" calcext:value-type="float">
            <text:p>0,00199166666666667000</text:p>
          </table:table-cell>
          <table:table-cell table:formula="of:=[.D1436]-[.D14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2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99305555555556" calcext:value-type="float">
            <text:p>0,00199305555555556000</text:p>
          </table:table-cell>
          <table:table-cell table:formula="of:=[.D1437]-[.D14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2" office:value-type="float" office:value="17232" calcext:value-type="float">
            <text:p>17232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99444444444444" calcext:value-type="float">
            <text:p>0,00199444444444444000</text:p>
          </table:table-cell>
          <table:table-cell table:formula="of:=[.D1438]-[.D14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2" office:value-type="float" office:value="17244" calcext:value-type="float">
            <text:p>17244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99583333333333" calcext:value-type="float">
            <text:p>0,00199583333333333000</text:p>
          </table:table-cell>
          <table:table-cell table:formula="of:=[.D1439]-[.D14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2" office:value-type="float" office:value="17256" calcext:value-type="float">
            <text:p>17256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99722222222222" calcext:value-type="float">
            <text:p>0,00199722222222222000</text:p>
          </table:table-cell>
          <table:table-cell table:formula="of:=[.D1440]-[.D14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2" office:value-type="float" office:value="17268" calcext:value-type="float">
            <text:p>17268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99861111111111" calcext:value-type="float">
            <text:p>0,00199861111111111000</text:p>
          </table:table-cell>
          <table:table-cell table:formula="of:=[.D1441]-[.D14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2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2" calcext:value-type="float">
            <text:p>0,00200000000000000000</text:p>
          </table:table-cell>
          <table:table-cell table:formula="of:=[.D1442]-[.D14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2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200138888888889" calcext:value-type="float">
            <text:p>0,00200138888888889000</text:p>
          </table:table-cell>
          <table:table-cell table:formula="of:=[.D1443]-[.D14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2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200277777777778" calcext:value-type="float">
            <text:p>0,00200277777777778000</text:p>
          </table:table-cell>
          <table:table-cell table:formula="of:=[.D1444]-[.D14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2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200416666666667" calcext:value-type="float">
            <text:p>0,00200416666666667000</text:p>
          </table:table-cell>
          <table:table-cell table:formula="of:=[.D1445]-[.D14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2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200555555555556" calcext:value-type="float">
            <text:p>0,00200555555555556000</text:p>
          </table:table-cell>
          <table:table-cell table:formula="of:=[.D1446]-[.D14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2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200694444444444" calcext:value-type="float">
            <text:p>0,00200694444444444000</text:p>
          </table:table-cell>
          <table:table-cell table:formula="of:=[.D1447]-[.D14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2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200833333333333" calcext:value-type="float">
            <text:p>0,00200833333333333000</text:p>
          </table:table-cell>
          <table:table-cell table:formula="of:=[.D1448]-[.D14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2" office:value-type="float" office:value="17364" calcext:value-type="float">
            <text:p>17364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200972222222222" calcext:value-type="float">
            <text:p>0,00200972222222222000</text:p>
          </table:table-cell>
          <table:table-cell table:formula="of:=[.D1449]-[.D14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2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201111111111111" calcext:value-type="float">
            <text:p>0,00201111111111111000</text:p>
          </table:table-cell>
          <table:table-cell table:formula="of:=[.D1450]-[.D14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2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20125" calcext:value-type="float">
            <text:p>0,00201250000000000000</text:p>
          </table:table-cell>
          <table:table-cell table:formula="of:=[.D1451]-[.D14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2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201388888888889" calcext:value-type="float">
            <text:p>0,00201388888888889000</text:p>
          </table:table-cell>
          <table:table-cell table:formula="of:=[.D1452]-[.D14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2" office:value-type="float" office:value="17412" calcext:value-type="float">
            <text:p>17412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201527777777778" calcext:value-type="float">
            <text:p>0,00201527777777778000</text:p>
          </table:table-cell>
          <table:table-cell table:formula="of:=[.D1453]-[.D14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2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201666666666667" calcext:value-type="float">
            <text:p>0,00201666666666667000</text:p>
          </table:table-cell>
          <table:table-cell table:formula="of:=[.D1454]-[.D14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2" office:value-type="float" office:value="17436" calcext:value-type="float">
            <text:p>17436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201805555555556" calcext:value-type="float">
            <text:p>0,00201805555555556000</text:p>
          </table:table-cell>
          <table:table-cell table:formula="of:=[.D1455]-[.D14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2" office:value-type="float" office:value="17448" calcext:value-type="float">
            <text:p>17448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201944444444444" calcext:value-type="float">
            <text:p>0,00201944444444444000</text:p>
          </table:table-cell>
          <table:table-cell table:formula="of:=[.D1456]-[.D14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2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202083333333333" calcext:value-type="float">
            <text:p>0,00202083333333333000</text:p>
          </table:table-cell>
          <table:table-cell table:formula="of:=[.D1457]-[.D14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2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202222222222222" calcext:value-type="float">
            <text:p>0,00202222222222222000</text:p>
          </table:table-cell>
          <table:table-cell table:formula="of:=[.D1458]-[.D14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2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202361111111111" calcext:value-type="float">
            <text:p>0,00202361111111111000</text:p>
          </table:table-cell>
          <table:table-cell table:formula="of:=[.D1459]-[.D14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2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2025" calcext:value-type="float">
            <text:p>0,00202500000000000000</text:p>
          </table:table-cell>
          <table:table-cell table:formula="of:=[.D1460]-[.D14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2" office:value-type="float" office:value="17508" calcext:value-type="float">
            <text:p>17508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202638888888889" calcext:value-type="float">
            <text:p>0,00202638888888889000</text:p>
          </table:table-cell>
          <table:table-cell table:formula="of:=[.D1461]-[.D14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2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202777777777778" calcext:value-type="float">
            <text:p>0,00202777777777778000</text:p>
          </table:table-cell>
          <table:table-cell table:formula="of:=[.D1462]-[.D14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2" office:value-type="float" office:value="17532" calcext:value-type="float">
            <text:p>17532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202916666666667" calcext:value-type="float">
            <text:p>0,00202916666666667000</text:p>
          </table:table-cell>
          <table:table-cell table:formula="of:=[.D1463]-[.D14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2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203055555555556" calcext:value-type="float">
            <text:p>0,00203055555555556000</text:p>
          </table:table-cell>
          <table:table-cell table:formula="of:=[.D1464]-[.D14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2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203194444444444" calcext:value-type="float">
            <text:p>0,00203194444444444000</text:p>
          </table:table-cell>
          <table:table-cell table:formula="of:=[.D1465]-[.D14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2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203333333333333" calcext:value-type="float">
            <text:p>0,00203333333333333000</text:p>
          </table:table-cell>
          <table:table-cell table:formula="of:=[.D1466]-[.D14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2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203472222222222" calcext:value-type="float">
            <text:p>0,00203472222222222000</text:p>
          </table:table-cell>
          <table:table-cell table:formula="of:=[.D1467]-[.D14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2" office:value-type="float" office:value="17592" calcext:value-type="float">
            <text:p>17592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203611111111111" calcext:value-type="float">
            <text:p>0,00203611111111111000</text:p>
          </table:table-cell>
          <table:table-cell table:formula="of:=[.D1468]-[.D14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2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20375" calcext:value-type="float">
            <text:p>0,00203750000000000000</text:p>
          </table:table-cell>
          <table:table-cell table:formula="of:=[.D1469]-[.D14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2" office:value-type="float" office:value="17616" calcext:value-type="float">
            <text:p>17616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203888888888889" calcext:value-type="float">
            <text:p>0,00203888888888889000</text:p>
          </table:table-cell>
          <table:table-cell table:formula="of:=[.D1470]-[.D14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2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204027777777778" calcext:value-type="float">
            <text:p>0,00204027777777778000</text:p>
          </table:table-cell>
          <table:table-cell table:formula="of:=[.D1471]-[.D14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2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204166666666667" calcext:value-type="float">
            <text:p>0,00204166666666667000</text:p>
          </table:table-cell>
          <table:table-cell table:formula="of:=[.D1472]-[.D1471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2" office:value-type="float" office:value="17652" calcext:value-type="float">
            <text:p>17652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204305555555556" calcext:value-type="float">
            <text:p>0,00204305555555556000</text:p>
          </table:table-cell>
          <table:table-cell table:formula="of:=[.D1473]-[.D14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2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204444444444444" calcext:value-type="float">
            <text:p>0,00204444444444444000</text:p>
          </table:table-cell>
          <table:table-cell table:formula="of:=[.D1474]-[.D14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2" office:value-type="float" office:value="17676" calcext:value-type="float">
            <text:p>17676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204583333333333" calcext:value-type="float">
            <text:p>0,00204583333333333000</text:p>
          </table:table-cell>
          <table:table-cell table:formula="of:=[.D1475]-[.D14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2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204722222222222" calcext:value-type="float">
            <text:p>0,00204722222222222000</text:p>
          </table:table-cell>
          <table:table-cell table:formula="of:=[.D1476]-[.D14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2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204861111111111" calcext:value-type="float">
            <text:p>0,00204861111111111000</text:p>
          </table:table-cell>
          <table:table-cell table:formula="of:=[.D1477]-[.D14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2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205" calcext:value-type="float">
            <text:p>0,00205000000000000000</text:p>
          </table:table-cell>
          <table:table-cell table:formula="of:=[.D1478]-[.D14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2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205138888888889" calcext:value-type="float">
            <text:p>0,00205138888888889000</text:p>
          </table:table-cell>
          <table:table-cell table:formula="of:=[.D1479]-[.D14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2" office:value-type="float" office:value="17736" calcext:value-type="float">
            <text:p>17736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205277777777778" calcext:value-type="float">
            <text:p>0,00205277777777778000</text:p>
          </table:table-cell>
          <table:table-cell table:formula="of:=[.D1480]-[.D14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2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205416666666667" calcext:value-type="float">
            <text:p>0,00205416666666667000</text:p>
          </table:table-cell>
          <table:table-cell table:formula="of:=[.D1481]-[.D14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2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205555555555556" calcext:value-type="float">
            <text:p>0,00205555555555556000</text:p>
          </table:table-cell>
          <table:table-cell table:formula="of:=[.D1482]-[.D14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2" office:value-type="float" office:value="17772" calcext:value-type="float">
            <text:p>17772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205694444444444" calcext:value-type="float">
            <text:p>0,00205694444444444000</text:p>
          </table:table-cell>
          <table:table-cell table:formula="of:=[.D1483]-[.D14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2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205833333333333" calcext:value-type="float">
            <text:p>0,00205833333333333000</text:p>
          </table:table-cell>
          <table:table-cell table:formula="of:=[.D1484]-[.D14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2" office:value-type="float" office:value="17796" calcext:value-type="float">
            <text:p>17796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205972222222222" calcext:value-type="float">
            <text:p>0,00205972222222222000</text:p>
          </table:table-cell>
          <table:table-cell table:formula="of:=[.D1485]-[.D14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2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206111111111111" calcext:value-type="float">
            <text:p>0,00206111111111111000</text:p>
          </table:table-cell>
          <table:table-cell table:formula="of:=[.D1486]-[.D14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2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20625" calcext:value-type="float">
            <text:p>0,00206250000000000000</text:p>
          </table:table-cell>
          <table:table-cell table:formula="of:=[.D1487]-[.D14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2" office:value-type="float" office:value="17832" calcext:value-type="float">
            <text:p>17832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206388888888889" calcext:value-type="float">
            <text:p>0,00206388888888889000</text:p>
          </table:table-cell>
          <table:table-cell table:formula="of:=[.D1488]-[.D14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2" office:value-type="float" office:value="17844" calcext:value-type="float">
            <text:p>17844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206527777777778" calcext:value-type="float">
            <text:p>0,00206527777777778000</text:p>
          </table:table-cell>
          <table:table-cell table:formula="of:=[.D1489]-[.D14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2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206666666666667" calcext:value-type="float">
            <text:p>0,00206666666666667000</text:p>
          </table:table-cell>
          <table:table-cell table:formula="of:=[.D1490]-[.D14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2" office:value-type="float" office:value="17868" calcext:value-type="float">
            <text:p>17868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206805555555556" calcext:value-type="float">
            <text:p>0,00206805555555556000</text:p>
          </table:table-cell>
          <table:table-cell table:formula="of:=[.D1491]-[.D14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2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206944444444444" calcext:value-type="float">
            <text:p>0,00206944444444444000</text:p>
          </table:table-cell>
          <table:table-cell table:formula="of:=[.D1492]-[.D14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2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207083333333333" calcext:value-type="float">
            <text:p>0,00207083333333333000</text:p>
          </table:table-cell>
          <table:table-cell table:formula="of:=[.D1493]-[.D14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2" office:value-type="float" office:value="17904" calcext:value-type="float">
            <text:p>17904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207222222222222" calcext:value-type="float">
            <text:p>0,00207222222222222000</text:p>
          </table:table-cell>
          <table:table-cell table:formula="of:=[.D1494]-[.D14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2" office:value-type="float" office:value="17916" calcext:value-type="float">
            <text:p>17916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207361111111111" calcext:value-type="float">
            <text:p>0,00207361111111111000</text:p>
          </table:table-cell>
          <table:table-cell table:formula="of:=[.D1495]-[.D14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2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2075" calcext:value-type="float">
            <text:p>0,00207500000000000000</text:p>
          </table:table-cell>
          <table:table-cell table:formula="of:=[.D1496]-[.D14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2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207638888888889" calcext:value-type="float">
            <text:p>0,00207638888888889000</text:p>
          </table:table-cell>
          <table:table-cell table:formula="of:=[.D1497]-[.D14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2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207777777777778" calcext:value-type="float">
            <text:p>0,00207777777777778000</text:p>
          </table:table-cell>
          <table:table-cell table:formula="of:=[.D1498]-[.D14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2" office:value-type="float" office:value="17964" calcext:value-type="float">
            <text:p>17964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207916666666667" calcext:value-type="float">
            <text:p>0,00207916666666667000</text:p>
          </table:table-cell>
          <table:table-cell table:formula="of:=[.D1499]-[.D14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2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208055555555556" calcext:value-type="float">
            <text:p>0,00208055555555556000</text:p>
          </table:table-cell>
          <table:table-cell table:formula="of:=[.D1500]-[.D14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2" office:value-type="float" office:value="17988" calcext:value-type="float">
            <text:p>17988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208194444444444" calcext:value-type="float">
            <text:p>0,00208194444444444000</text:p>
          </table:table-cell>
          <table:table-cell table:formula="of:=[.D1501]-[.D15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2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208333333333333" calcext:value-type="float">
            <text:p>0,00208333333333333000</text:p>
          </table:table-cell>
          <table:table-cell table:formula="of:=[.D1502]-[.D15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2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208472222222222" calcext:value-type="float">
            <text:p>0,00208472222222222000</text:p>
          </table:table-cell>
          <table:table-cell table:formula="of:=[.D1503]-[.D15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2" office:value-type="float" office:value="18024" calcext:value-type="float">
            <text:p>18024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208611111111111" calcext:value-type="float">
            <text:p>0,00208611111111111000</text:p>
          </table:table-cell>
          <table:table-cell table:formula="of:=[.D1504]-[.D15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2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20875" calcext:value-type="float">
            <text:p>0,00208750000000000000</text:p>
          </table:table-cell>
          <table:table-cell table:formula="of:=[.D1505]-[.D15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2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208888888888889" calcext:value-type="float">
            <text:p>0,00208888888888889000</text:p>
          </table:table-cell>
          <table:table-cell table:formula="of:=[.D1506]-[.D15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2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209027777777778" calcext:value-type="float">
            <text:p>0,00209027777777778000</text:p>
          </table:table-cell>
          <table:table-cell table:formula="of:=[.D1507]-[.D15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2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209166666666667" calcext:value-type="float">
            <text:p>0,00209166666666667000</text:p>
          </table:table-cell>
          <table:table-cell table:formula="of:=[.D1508]-[.D15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2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209305555555556" calcext:value-type="float">
            <text:p>0,00209305555555556000</text:p>
          </table:table-cell>
          <table:table-cell table:formula="of:=[.D1509]-[.D15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2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209444444444444" calcext:value-type="float">
            <text:p>0,00209444444444444000</text:p>
          </table:table-cell>
          <table:table-cell table:formula="of:=[.D1510]-[.D15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2" office:value-type="float" office:value="18108" calcext:value-type="float">
            <text:p>18108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209583333333333" calcext:value-type="float">
            <text:p>0,00209583333333333000</text:p>
          </table:table-cell>
          <table:table-cell table:formula="of:=[.D1511]-[.D15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2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209722222222222" calcext:value-type="float">
            <text:p>0,00209722222222222000</text:p>
          </table:table-cell>
          <table:table-cell table:formula="of:=[.D1512]-[.D15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2" office:value-type="float" office:value="18132" calcext:value-type="float">
            <text:p>18132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209861111111111" calcext:value-type="float">
            <text:p>0,00209861111111111000</text:p>
          </table:table-cell>
          <table:table-cell table:formula="of:=[.D1513]-[.D15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2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21" calcext:value-type="float">
            <text:p>0,00210000000000000000</text:p>
          </table:table-cell>
          <table:table-cell table:formula="of:=[.D1514]-[.D15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2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210138888888889" calcext:value-type="float">
            <text:p>0,00210138888888889000</text:p>
          </table:table-cell>
          <table:table-cell table:formula="of:=[.D1515]-[.D15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2" office:value-type="float" office:value="18168" calcext:value-type="float">
            <text:p>18168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210277777777778" calcext:value-type="float">
            <text:p>0,00210277777777778000</text:p>
          </table:table-cell>
          <table:table-cell table:formula="of:=[.D1516]-[.D15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2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210416666666667" calcext:value-type="float">
            <text:p>0,00210416666666667000</text:p>
          </table:table-cell>
          <table:table-cell table:formula="of:=[.D1517]-[.D15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2" office:value-type="float" office:value="18192" calcext:value-type="float">
            <text:p>18192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210555555555556" calcext:value-type="float">
            <text:p>0,00210555555555556000</text:p>
          </table:table-cell>
          <table:table-cell table:formula="of:=[.D1518]-[.D15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2" office:value-type="float" office:value="18204" calcext:value-type="float">
            <text:p>18204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210694444444444" calcext:value-type="float">
            <text:p>0,00210694444444444000</text:p>
          </table:table-cell>
          <table:table-cell table:formula="of:=[.D1519]-[.D15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2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210833333333333" calcext:value-type="float">
            <text:p>0,00210833333333333000</text:p>
          </table:table-cell>
          <table:table-cell table:formula="of:=[.D1520]-[.D15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2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210972222222222" calcext:value-type="float">
            <text:p>0,00210972222222222000</text:p>
          </table:table-cell>
          <table:table-cell table:formula="of:=[.D1521]-[.D15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2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211111111111111" calcext:value-type="float">
            <text:p>0,00211111111111111000</text:p>
          </table:table-cell>
          <table:table-cell table:formula="of:=[.D1522]-[.D15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2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21125" calcext:value-type="float">
            <text:p>0,00211250000000000000</text:p>
          </table:table-cell>
          <table:table-cell table:formula="of:=[.D1523]-[.D15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2" office:value-type="float" office:value="18264" calcext:value-type="float">
            <text:p>18264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211388888888889" calcext:value-type="float">
            <text:p>0,00211388888888889000</text:p>
          </table:table-cell>
          <table:table-cell table:formula="of:=[.D1524]-[.D1523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2" office:value-type="float" office:value="18276" calcext:value-type="float">
            <text:p>18276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211527777777778" calcext:value-type="float">
            <text:p>0,00211527777777778000</text:p>
          </table:table-cell>
          <table:table-cell table:formula="of:=[.D1525]-[.D15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2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211666666666667" calcext:value-type="float">
            <text:p>0,00211666666666667000</text:p>
          </table:table-cell>
          <table:table-cell table:formula="of:=[.D1526]-[.D15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2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211805555555556" calcext:value-type="float">
            <text:p>0,00211805555555556000</text:p>
          </table:table-cell>
          <table:table-cell table:formula="of:=[.D1527]-[.D15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2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211944444444444" calcext:value-type="float">
            <text:p>0,00211944444444444000</text:p>
          </table:table-cell>
          <table:table-cell table:formula="of:=[.D1528]-[.D15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2" office:value-type="float" office:value="18324" calcext:value-type="float">
            <text:p>18324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212083333333333" calcext:value-type="float">
            <text:p>0,00212083333333333000</text:p>
          </table:table-cell>
          <table:table-cell table:formula="of:=[.D1529]-[.D15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2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212222222222222" calcext:value-type="float">
            <text:p>0,00212222222222222000</text:p>
          </table:table-cell>
          <table:table-cell table:formula="of:=[.D1530]-[.D15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2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212361111111111" calcext:value-type="float">
            <text:p>0,00212361111111111000</text:p>
          </table:table-cell>
          <table:table-cell table:formula="of:=[.D1531]-[.D15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2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2125" calcext:value-type="float">
            <text:p>0,00212500000000000000</text:p>
          </table:table-cell>
          <table:table-cell table:formula="of:=[.D1532]-[.D15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2" office:value-type="float" office:value="18372" calcext:value-type="float">
            <text:p>18372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212638888888889" calcext:value-type="float">
            <text:p>0,00212638888888889000</text:p>
          </table:table-cell>
          <table:table-cell table:formula="of:=[.D1533]-[.D15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2" office:value-type="float" office:value="18384" calcext:value-type="float">
            <text:p>18384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212777777777778" calcext:value-type="float">
            <text:p>0,00212777777777778000</text:p>
          </table:table-cell>
          <table:table-cell table:formula="of:=[.D1534]-[.D15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2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212916666666667" calcext:value-type="float">
            <text:p>0,00212916666666667000</text:p>
          </table:table-cell>
          <table:table-cell table:formula="of:=[.D1535]-[.D15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2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213055555555556" calcext:value-type="float">
            <text:p>0,00213055555555556000</text:p>
          </table:table-cell>
          <table:table-cell table:formula="of:=[.D1536]-[.D15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2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213194444444444" calcext:value-type="float">
            <text:p>0,00213194444444444000</text:p>
          </table:table-cell>
          <table:table-cell table:formula="of:=[.D1537]-[.D15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2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213333333333333" calcext:value-type="float">
            <text:p>0,00213333333333333000</text:p>
          </table:table-cell>
          <table:table-cell table:formula="of:=[.D1538]-[.D15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2" office:value-type="float" office:value="18444" calcext:value-type="float">
            <text:p>18444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213472222222222" calcext:value-type="float">
            <text:p>0,00213472222222222000</text:p>
          </table:table-cell>
          <table:table-cell table:formula="of:=[.D1539]-[.D15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2" office:value-type="float" office:value="18456" calcext:value-type="float">
            <text:p>18456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213611111111111" calcext:value-type="float">
            <text:p>0,00213611111111111000</text:p>
          </table:table-cell>
          <table:table-cell table:formula="of:=[.D1540]-[.D15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2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21375" calcext:value-type="float">
            <text:p>0,00213750000000000000</text:p>
          </table:table-cell>
          <table:table-cell table:formula="of:=[.D1541]-[.D15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2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213888888888889" calcext:value-type="float">
            <text:p>0,00213888888888889000</text:p>
          </table:table-cell>
          <table:table-cell table:formula="of:=[.D1542]-[.D15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2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214027777777778" calcext:value-type="float">
            <text:p>0,00214027777777778000</text:p>
          </table:table-cell>
          <table:table-cell table:formula="of:=[.D1543]-[.D15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2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214166666666667" calcext:value-type="float">
            <text:p>0,00214166666666667000</text:p>
          </table:table-cell>
          <table:table-cell table:formula="of:=[.D1544]-[.D15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2" office:value-type="float" office:value="18516" calcext:value-type="float">
            <text:p>18516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214305555555556" calcext:value-type="float">
            <text:p>0,00214305555555556000</text:p>
          </table:table-cell>
          <table:table-cell table:formula="of:=[.D1545]-[.D15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2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214444444444444" calcext:value-type="float">
            <text:p>0,00214444444444444000</text:p>
          </table:table-cell>
          <table:table-cell table:formula="of:=[.D1546]-[.D15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2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214583333333333" calcext:value-type="float">
            <text:p>0,00214583333333333000</text:p>
          </table:table-cell>
          <table:table-cell table:formula="of:=[.D1547]-[.D15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2" office:value-type="float" office:value="18552" calcext:value-type="float">
            <text:p>18552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214722222222222" calcext:value-type="float">
            <text:p>0,00214722222222222000</text:p>
          </table:table-cell>
          <table:table-cell table:formula="of:=[.D1548]-[.D15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2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214861111111111" calcext:value-type="float">
            <text:p>0,00214861111111111000</text:p>
          </table:table-cell>
          <table:table-cell table:formula="of:=[.D1549]-[.D15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2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215" calcext:value-type="float">
            <text:p>0,00215000000000000000</text:p>
          </table:table-cell>
          <table:table-cell table:formula="of:=[.D1550]-[.D15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2" office:value-type="float" office:value="18588" calcext:value-type="float">
            <text:p>18588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215138888888889" calcext:value-type="float">
            <text:p>0,00215138888888889000</text:p>
          </table:table-cell>
          <table:table-cell table:formula="of:=[.D1551]-[.D15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2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215277777777778" calcext:value-type="float">
            <text:p>0,00215277777777778000</text:p>
          </table:table-cell>
          <table:table-cell table:formula="of:=[.D1552]-[.D15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2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215416666666667" calcext:value-type="float">
            <text:p>0,00215416666666667000</text:p>
          </table:table-cell>
          <table:table-cell table:formula="of:=[.D1553]-[.D15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2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215555555555556" calcext:value-type="float">
            <text:p>0,00215555555555556000</text:p>
          </table:table-cell>
          <table:table-cell table:formula="of:=[.D1554]-[.D15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2" office:value-type="float" office:value="18636" calcext:value-type="float">
            <text:p>18636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215694444444444" calcext:value-type="float">
            <text:p>0,00215694444444444000</text:p>
          </table:table-cell>
          <table:table-cell table:formula="of:=[.D1555]-[.D15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2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215833333333333" calcext:value-type="float">
            <text:p>0,00215833333333333000</text:p>
          </table:table-cell>
          <table:table-cell table:formula="of:=[.D1556]-[.D15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2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215972222222222" calcext:value-type="float">
            <text:p>0,00215972222222222000</text:p>
          </table:table-cell>
          <table:table-cell table:formula="of:=[.D1557]-[.D15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2" office:value-type="float" office:value="18672" calcext:value-type="float">
            <text:p>18672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216111111111111" calcext:value-type="float">
            <text:p>0,00216111111111111000</text:p>
          </table:table-cell>
          <table:table-cell table:formula="of:=[.D1558]-[.D15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2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21625" calcext:value-type="float">
            <text:p>0,00216250000000000000</text:p>
          </table:table-cell>
          <table:table-cell table:formula="of:=[.D1559]-[.D15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2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216388888888889" calcext:value-type="float">
            <text:p>0,00216388888888889000</text:p>
          </table:table-cell>
          <table:table-cell table:formula="of:=[.D1560]-[.D15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2" office:value-type="float" office:value="18708" calcext:value-type="float">
            <text:p>18708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216527777777778" calcext:value-type="float">
            <text:p>0,00216527777777778000</text:p>
          </table:table-cell>
          <table:table-cell table:formula="of:=[.D1561]-[.D15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2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216666666666667" calcext:value-type="float">
            <text:p>0,00216666666666667000</text:p>
          </table:table-cell>
          <table:table-cell table:formula="of:=[.D1562]-[.D15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2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216805555555556" calcext:value-type="float">
            <text:p>0,00216805555555556000</text:p>
          </table:table-cell>
          <table:table-cell table:formula="of:=[.D1563]-[.D15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2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216944444444444" calcext:value-type="float">
            <text:p>0,00216944444444444000</text:p>
          </table:table-cell>
          <table:table-cell table:formula="of:=[.D1564]-[.D15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2" office:value-type="float" office:value="18756" calcext:value-type="float">
            <text:p>18756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217083333333333" calcext:value-type="float">
            <text:p>0,00217083333333333000</text:p>
          </table:table-cell>
          <table:table-cell table:formula="of:=[.D1565]-[.D15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2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217222222222222" calcext:value-type="float">
            <text:p>0,00217222222222222000</text:p>
          </table:table-cell>
          <table:table-cell table:formula="of:=[.D1566]-[.D15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2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217361111111111" calcext:value-type="float">
            <text:p>0,00217361111111111000</text:p>
          </table:table-cell>
          <table:table-cell table:formula="of:=[.D1567]-[.D15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2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2175" calcext:value-type="float">
            <text:p>0,00217500000000000000</text:p>
          </table:table-cell>
          <table:table-cell table:formula="of:=[.D1568]-[.D15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2" office:value-type="float" office:value="18804" calcext:value-type="float">
            <text:p>18804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217638888888889" calcext:value-type="float">
            <text:p>0,00217638888888889000</text:p>
          </table:table-cell>
          <table:table-cell table:formula="of:=[.D1569]-[.D15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2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217777777777778" calcext:value-type="float">
            <text:p>0,00217777777777778000</text:p>
          </table:table-cell>
          <table:table-cell table:formula="of:=[.D1570]-[.D15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2" office:value-type="float" office:value="18828" calcext:value-type="float">
            <text:p>18828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217916666666667" calcext:value-type="float">
            <text:p>0,00217916666666667000</text:p>
          </table:table-cell>
          <table:table-cell table:formula="of:=[.D1571]-[.D15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2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218055555555556" calcext:value-type="float">
            <text:p>0,00218055555555556000</text:p>
          </table:table-cell>
          <table:table-cell table:formula="of:=[.D1572]-[.D15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2" office:value-type="float" office:value="18852" calcext:value-type="float">
            <text:p>18852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218194444444444" calcext:value-type="float">
            <text:p>0,00218194444444444000</text:p>
          </table:table-cell>
          <table:table-cell table:formula="of:=[.D1573]-[.D15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2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218333333333333" calcext:value-type="float">
            <text:p>0,00218333333333333000</text:p>
          </table:table-cell>
          <table:table-cell table:formula="of:=[.D1574]-[.D15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2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218472222222222" calcext:value-type="float">
            <text:p>0,00218472222222222000</text:p>
          </table:table-cell>
          <table:table-cell table:formula="of:=[.D1575]-[.D1574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2" office:value-type="float" office:value="18888" calcext:value-type="float">
            <text:p>18888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218611111111111" calcext:value-type="float">
            <text:p>0,00218611111111111000</text:p>
          </table:table-cell>
          <table:table-cell table:formula="of:=[.D1576]-[.D15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2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21875" calcext:value-type="float">
            <text:p>0,00218750000000000000</text:p>
          </table:table-cell>
          <table:table-cell table:formula="of:=[.D1577]-[.D15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2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218888888888889" calcext:value-type="float">
            <text:p>0,00218888888888889000</text:p>
          </table:table-cell>
          <table:table-cell table:formula="of:=[.D1578]-[.D15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2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219027777777778" calcext:value-type="float">
            <text:p>0,00219027777777778000</text:p>
          </table:table-cell>
          <table:table-cell table:formula="of:=[.D1579]-[.D15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2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219166666666667" calcext:value-type="float">
            <text:p>0,00219166666666667000</text:p>
          </table:table-cell>
          <table:table-cell table:formula="of:=[.D1580]-[.D15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2" office:value-type="float" office:value="18948" calcext:value-type="float">
            <text:p>18948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219305555555556" calcext:value-type="float">
            <text:p>0,00219305555555556000</text:p>
          </table:table-cell>
          <table:table-cell table:formula="of:=[.D1581]-[.D15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2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219444444444444" calcext:value-type="float">
            <text:p>0,00219444444444444000</text:p>
          </table:table-cell>
          <table:table-cell table:formula="of:=[.D1582]-[.D15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2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219583333333333" calcext:value-type="float">
            <text:p>0,00219583333333333000</text:p>
          </table:table-cell>
          <table:table-cell table:formula="of:=[.D1583]-[.D15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2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219722222222222" calcext:value-type="float">
            <text:p>0,00219722222222222000</text:p>
          </table:table-cell>
          <table:table-cell table:formula="of:=[.D1584]-[.D15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2" office:value-type="float" office:value="18996" calcext:value-type="float">
            <text:p>18996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219861111111111" calcext:value-type="float">
            <text:p>0,00219861111111111000</text:p>
          </table:table-cell>
          <table:table-cell table:formula="of:=[.D1585]-[.D15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2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22" calcext:value-type="float">
            <text:p>0,00220000000000000000</text:p>
          </table:table-cell>
          <table:table-cell table:formula="of:=[.D1586]-[.D15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2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220138888888889" calcext:value-type="float">
            <text:p>0,00220138888888889000</text:p>
          </table:table-cell>
          <table:table-cell table:formula="of:=[.D1587]-[.D15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2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220277777777778" calcext:value-type="float">
            <text:p>0,00220277777777778000</text:p>
          </table:table-cell>
          <table:table-cell table:formula="of:=[.D1588]-[.D15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2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220416666666667" calcext:value-type="float">
            <text:p>0,00220416666666667000</text:p>
          </table:table-cell>
          <table:table-cell table:formula="of:=[.D1589]-[.D15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2" office:value-type="float" office:value="19056" calcext:value-type="float">
            <text:p>19056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220555555555556" calcext:value-type="float">
            <text:p>0,00220555555555556000</text:p>
          </table:table-cell>
          <table:table-cell table:formula="of:=[.D1590]-[.D15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2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220694444444444" calcext:value-type="float">
            <text:p>0,00220694444444444000</text:p>
          </table:table-cell>
          <table:table-cell table:formula="of:=[.D1591]-[.D15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2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220833333333333" calcext:value-type="float">
            <text:p>0,00220833333333333000</text:p>
          </table:table-cell>
          <table:table-cell table:formula="of:=[.D1592]-[.D15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2" office:value-type="float" office:value="19092" calcext:value-type="float">
            <text:p>19092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220972222222222" calcext:value-type="float">
            <text:p>0,00220972222222222000</text:p>
          </table:table-cell>
          <table:table-cell table:formula="of:=[.D1593]-[.D15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2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221111111111111" calcext:value-type="float">
            <text:p>0,00221111111111111000</text:p>
          </table:table-cell>
          <table:table-cell table:formula="of:=[.D1594]-[.D15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2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22125" calcext:value-type="float">
            <text:p>0,00221250000000000000</text:p>
          </table:table-cell>
          <table:table-cell table:formula="of:=[.D1595]-[.D15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2" office:value-type="float" office:value="19128" calcext:value-type="float">
            <text:p>19128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221388888888889" calcext:value-type="float">
            <text:p>0,00221388888888889000</text:p>
          </table:table-cell>
          <table:table-cell table:formula="of:=[.D1596]-[.D15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2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221527777777778" calcext:value-type="float">
            <text:p>0,00221527777777778000</text:p>
          </table:table-cell>
          <table:table-cell table:formula="of:=[.D1597]-[.D15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2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221666666666667" calcext:value-type="float">
            <text:p>0,00221666666666667000</text:p>
          </table:table-cell>
          <table:table-cell table:formula="of:=[.D1598]-[.D15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2" office:value-type="float" office:value="19164" calcext:value-type="float">
            <text:p>19164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221805555555556" calcext:value-type="float">
            <text:p>0,00221805555555556000</text:p>
          </table:table-cell>
          <table:table-cell table:formula="of:=[.D1599]-[.D15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2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221944444444444" calcext:value-type="float">
            <text:p>0,00221944444444444000</text:p>
          </table:table-cell>
          <table:table-cell table:formula="of:=[.D1600]-[.D15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2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222083333333333" calcext:value-type="float">
            <text:p>0,00222083333333333000</text:p>
          </table:table-cell>
          <table:table-cell table:formula="of:=[.D1601]-[.D16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2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222222222222222" calcext:value-type="float">
            <text:p>0,00222222222222222000</text:p>
          </table:table-cell>
          <table:table-cell table:formula="of:=[.D1602]-[.D16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12" office:value-type="float" office:value="19212" calcext:value-type="float">
            <text:p>19212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222361111111111" calcext:value-type="float">
            <text:p>0,00222361111111111000</text:p>
          </table:table-cell>
          <table:table-cell table:formula="of:=[.D1603]-[.D16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12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2225" calcext:value-type="float">
            <text:p>0,00222500000000000000</text:p>
          </table:table-cell>
          <table:table-cell table:formula="of:=[.D1604]-[.D16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12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222638888888889" calcext:value-type="float">
            <text:p>0,00222638888888889000</text:p>
          </table:table-cell>
          <table:table-cell table:formula="of:=[.D1605]-[.D16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12" office:value-type="float" office:value="19248" calcext:value-type="float">
            <text:p>19248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222777777777778" calcext:value-type="float">
            <text:p>0,00222777777777778000</text:p>
          </table:table-cell>
          <table:table-cell table:formula="of:=[.D1606]-[.D16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12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222916666666667" calcext:value-type="float">
            <text:p>0,00222916666666667000</text:p>
          </table:table-cell>
          <table:table-cell table:formula="of:=[.D1607]-[.D16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12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223055555555556" calcext:value-type="float">
            <text:p>0,00223055555555556000</text:p>
          </table:table-cell>
          <table:table-cell table:formula="of:=[.D1608]-[.D16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12" office:value-type="float" office:value="19284" calcext:value-type="float">
            <text:p>19284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223194444444444" calcext:value-type="float">
            <text:p>0,00223194444444444000</text:p>
          </table:table-cell>
          <table:table-cell table:formula="of:=[.D1609]-[.D16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12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223333333333333" calcext:value-type="float">
            <text:p>0,00223333333333333000</text:p>
          </table:table-cell>
          <table:table-cell table:formula="of:=[.D1610]-[.D16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12" office:value-type="float" office:value="19308" calcext:value-type="float">
            <text:p>19308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223472222222222" calcext:value-type="float">
            <text:p>0,00223472222222222000</text:p>
          </table:table-cell>
          <table:table-cell table:formula="of:=[.D1611]-[.D16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12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223611111111111" calcext:value-type="float">
            <text:p>0,00223611111111111000</text:p>
          </table:table-cell>
          <table:table-cell table:formula="of:=[.D1612]-[.D16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12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22375" calcext:value-type="float">
            <text:p>0,00223750000000000000</text:p>
          </table:table-cell>
          <table:table-cell table:formula="of:=[.D1613]-[.D16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12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223888888888889" calcext:value-type="float">
            <text:p>0,00223888888888889000</text:p>
          </table:table-cell>
          <table:table-cell table:formula="of:=[.D1614]-[.D16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12" office:value-type="float" office:value="19356" calcext:value-type="float">
            <text:p>19356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224027777777778" calcext:value-type="float">
            <text:p>0,00224027777777778000</text:p>
          </table:table-cell>
          <table:table-cell table:formula="of:=[.D1615]-[.D16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12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224166666666667" calcext:value-type="float">
            <text:p>0,00224166666666667000</text:p>
          </table:table-cell>
          <table:table-cell table:formula="of:=[.D1616]-[.D16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12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224305555555556" calcext:value-type="float">
            <text:p>0,00224305555555556000</text:p>
          </table:table-cell>
          <table:table-cell table:formula="of:=[.D1617]-[.D16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12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224444444444444" calcext:value-type="float">
            <text:p>0,00224444444444444000</text:p>
          </table:table-cell>
          <table:table-cell table:formula="of:=[.D1618]-[.D16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12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224583333333333" calcext:value-type="float">
            <text:p>0,00224583333333333000</text:p>
          </table:table-cell>
          <table:table-cell table:formula="of:=[.D1619]-[.D16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12" office:value-type="float" office:value="19416" calcext:value-type="float">
            <text:p>19416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224722222222222" calcext:value-type="float">
            <text:p>0,00224722222222222000</text:p>
          </table:table-cell>
          <table:table-cell table:formula="of:=[.D1620]-[.D16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12" office:value-type="float" office:value="19428" calcext:value-type="float">
            <text:p>19428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224861111111111" calcext:value-type="float">
            <text:p>0,00224861111111111000</text:p>
          </table:table-cell>
          <table:table-cell table:formula="of:=[.D1621]-[.D16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12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225" calcext:value-type="float">
            <text:p>0,00225000000000000000</text:p>
          </table:table-cell>
          <table:table-cell table:formula="of:=[.D1622]-[.D16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12" office:value-type="float" office:value="19452" calcext:value-type="float">
            <text:p>19452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225138888888889" calcext:value-type="float">
            <text:p>0,00225138888888889000</text:p>
          </table:table-cell>
          <table:table-cell table:formula="of:=[.D1623]-[.D16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12" office:value-type="float" office:value="19464" calcext:value-type="float">
            <text:p>19464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225277777777778" calcext:value-type="float">
            <text:p>0,00225277777777778000</text:p>
          </table:table-cell>
          <table:table-cell table:formula="of:=[.D1624]-[.D16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12" office:value-type="float" office:value="19476" calcext:value-type="float">
            <text:p>19476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225416666666667" calcext:value-type="float">
            <text:p>0,00225416666666667000</text:p>
          </table:table-cell>
          <table:table-cell table:formula="of:=[.D1625]-[.D16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12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225555555555556" calcext:value-type="float">
            <text:p>0,00225555555555556000</text:p>
          </table:table-cell>
          <table:table-cell table:formula="of:=[.D1626]-[.D16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12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225694444444444" calcext:value-type="float">
            <text:p>0,00225694444444444000</text:p>
          </table:table-cell>
          <table:table-cell table:formula="of:=[.D1627]-[.D1626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12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225833333333333" calcext:value-type="float">
            <text:p>0,00225833333333333000</text:p>
          </table:table-cell>
          <table:table-cell table:formula="of:=[.D1628]-[.D16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12" office:value-type="float" office:value="19524" calcext:value-type="float">
            <text:p>19524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225972222222222" calcext:value-type="float">
            <text:p>0,00225972222222222000</text:p>
          </table:table-cell>
          <table:table-cell table:formula="of:=[.D1629]-[.D16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12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226111111111111" calcext:value-type="float">
            <text:p>0,00226111111111111000</text:p>
          </table:table-cell>
          <table:table-cell table:formula="of:=[.D1630]-[.D16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12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22625" calcext:value-type="float">
            <text:p>0,00226250000000000000</text:p>
          </table:table-cell>
          <table:table-cell table:formula="of:=[.D1631]-[.D16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12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226388888888889" calcext:value-type="float">
            <text:p>0,00226388888888889000</text:p>
          </table:table-cell>
          <table:table-cell table:formula="of:=[.D1632]-[.D16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12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226527777777778" calcext:value-type="float">
            <text:p>0,00226527777777778000</text:p>
          </table:table-cell>
          <table:table-cell table:formula="of:=[.D1633]-[.D16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12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226666666666667" calcext:value-type="float">
            <text:p>0,00226666666666667000</text:p>
          </table:table-cell>
          <table:table-cell table:formula="of:=[.D1634]-[.D16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12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226805555555556" calcext:value-type="float">
            <text:p>0,00226805555555556000</text:p>
          </table:table-cell>
          <table:table-cell table:formula="of:=[.D1635]-[.D16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12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226944444444444" calcext:value-type="float">
            <text:p>0,00226944444444444000</text:p>
          </table:table-cell>
          <table:table-cell table:formula="of:=[.D1636]-[.D16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12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227083333333333" calcext:value-type="float">
            <text:p>0,00227083333333333000</text:p>
          </table:table-cell>
          <table:table-cell table:formula="of:=[.D1637]-[.D16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12" office:value-type="float" office:value="19632" calcext:value-type="float">
            <text:p>19632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227222222222222" calcext:value-type="float">
            <text:p>0,00227222222222222000</text:p>
          </table:table-cell>
          <table:table-cell table:formula="of:=[.D1638]-[.D16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12" office:value-type="float" office:value="19644" calcext:value-type="float">
            <text:p>19644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227361111111111" calcext:value-type="float">
            <text:p>0,00227361111111111000</text:p>
          </table:table-cell>
          <table:table-cell table:formula="of:=[.D1639]-[.D16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12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2275" calcext:value-type="float">
            <text:p>0,00227500000000000000</text:p>
          </table:table-cell>
          <table:table-cell table:formula="of:=[.D1640]-[.D16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12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227638888888889" calcext:value-type="float">
            <text:p>0,00227638888888889000</text:p>
          </table:table-cell>
          <table:table-cell table:formula="of:=[.D1641]-[.D16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12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227777777777778" calcext:value-type="float">
            <text:p>0,00227777777777778000</text:p>
          </table:table-cell>
          <table:table-cell table:formula="of:=[.D1642]-[.D16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12" office:value-type="float" office:value="19692" calcext:value-type="float">
            <text:p>19692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227916666666667" calcext:value-type="float">
            <text:p>0,00227916666666667000</text:p>
          </table:table-cell>
          <table:table-cell table:formula="of:=[.D1643]-[.D16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12" office:value-type="float" office:value="19704" calcext:value-type="float">
            <text:p>19704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228055555555556" calcext:value-type="float">
            <text:p>0,00228055555555556000</text:p>
          </table:table-cell>
          <table:table-cell table:formula="of:=[.D1644]-[.D16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12" office:value-type="float" office:value="19716" calcext:value-type="float">
            <text:p>19716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228194444444444" calcext:value-type="float">
            <text:p>0,00228194444444444000</text:p>
          </table:table-cell>
          <table:table-cell table:formula="of:=[.D1645]-[.D16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12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228333333333333" calcext:value-type="float">
            <text:p>0,00228333333333333000</text:p>
          </table:table-cell>
          <table:table-cell table:formula="of:=[.D1646]-[.D16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12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228472222222222" calcext:value-type="float">
            <text:p>0,00228472222222222000</text:p>
          </table:table-cell>
          <table:table-cell table:formula="of:=[.D1647]-[.D16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12" office:value-type="float" office:value="19752" calcext:value-type="float">
            <text:p>19752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228611111111111" calcext:value-type="float">
            <text:p>0,00228611111111111000</text:p>
          </table:table-cell>
          <table:table-cell table:formula="of:=[.D1648]-[.D16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12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22875" calcext:value-type="float">
            <text:p>0,00228750000000000000</text:p>
          </table:table-cell>
          <table:table-cell table:formula="of:=[.D1649]-[.D16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12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228888888888889" calcext:value-type="float">
            <text:p>0,00228888888888889000</text:p>
          </table:table-cell>
          <table:table-cell table:formula="of:=[.D1650]-[.D16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12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229027777777778" calcext:value-type="float">
            <text:p>0,00229027777777778000</text:p>
          </table:table-cell>
          <table:table-cell table:formula="of:=[.D1651]-[.D16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12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229166666666667" calcext:value-type="float">
            <text:p>0,00229166666666667000</text:p>
          </table:table-cell>
          <table:table-cell table:formula="of:=[.D1652]-[.D16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12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229305555555556" calcext:value-type="float">
            <text:p>0,00229305555555556000</text:p>
          </table:table-cell>
          <table:table-cell table:formula="of:=[.D1653]-[.D16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12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229444444444444" calcext:value-type="float">
            <text:p>0,00229444444444444000</text:p>
          </table:table-cell>
          <table:table-cell table:formula="of:=[.D1654]-[.D16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12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229583333333333" calcext:value-type="float">
            <text:p>0,00229583333333333000</text:p>
          </table:table-cell>
          <table:table-cell table:formula="of:=[.D1655]-[.D16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12" office:value-type="float" office:value="19848" calcext:value-type="float">
            <text:p>19848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229722222222222" calcext:value-type="float">
            <text:p>0,00229722222222222000</text:p>
          </table:table-cell>
          <table:table-cell table:formula="of:=[.D1656]-[.D16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12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229861111111111" calcext:value-type="float">
            <text:p>0,00229861111111111000</text:p>
          </table:table-cell>
          <table:table-cell table:formula="of:=[.D1657]-[.D16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12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23" calcext:value-type="float">
            <text:p>0,00230000000000000000</text:p>
          </table:table-cell>
          <table:table-cell table:formula="of:=[.D1658]-[.D16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12" office:value-type="float" office:value="19884" calcext:value-type="float">
            <text:p>19884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230138888888889" calcext:value-type="float">
            <text:p>0,00230138888888889000</text:p>
          </table:table-cell>
          <table:table-cell table:formula="of:=[.D1659]-[.D16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12" office:value-type="float" office:value="19896" calcext:value-type="float">
            <text:p>19896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230277777777778" calcext:value-type="float">
            <text:p>0,00230277777777778000</text:p>
          </table:table-cell>
          <table:table-cell table:formula="of:=[.D1660]-[.D16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12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230416666666667" calcext:value-type="float">
            <text:p>0,00230416666666667000</text:p>
          </table:table-cell>
          <table:table-cell table:formula="of:=[.D1661]-[.D16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12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230555555555556" calcext:value-type="float">
            <text:p>0,00230555555555556000</text:p>
          </table:table-cell>
          <table:table-cell table:formula="of:=[.D1662]-[.D16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12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230694444444444" calcext:value-type="float">
            <text:p>0,00230694444444444000</text:p>
          </table:table-cell>
          <table:table-cell table:formula="of:=[.D1663]-[.D16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12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230833333333333" calcext:value-type="float">
            <text:p>0,00230833333333333000</text:p>
          </table:table-cell>
          <table:table-cell table:formula="of:=[.D1664]-[.D16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12" office:value-type="float" office:value="19956" calcext:value-type="float">
            <text:p>19956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230972222222222" calcext:value-type="float">
            <text:p>0,00230972222222222000</text:p>
          </table:table-cell>
          <table:table-cell table:formula="of:=[.D1665]-[.D16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12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231111111111111" calcext:value-type="float">
            <text:p>0,00231111111111111000</text:p>
          </table:table-cell>
          <table:table-cell table:formula="of:=[.D1666]-[.D16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12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23125" calcext:value-type="float">
            <text:p>0,00231250000000000000</text:p>
          </table:table-cell>
          <table:table-cell table:formula="of:=[.D1667]-[.D16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12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231388888888889" calcext:value-type="float">
            <text:p>0,00231388888888889000</text:p>
          </table:table-cell>
          <table:table-cell table:formula="of:=[.D1668]-[.D16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12" office:value-type="float" office:value="20004" calcext:value-type="float">
            <text:p>20004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231527777777778" calcext:value-type="float">
            <text:p>0,00231527777777778000</text:p>
          </table:table-cell>
          <table:table-cell table:formula="of:=[.D1669]-[.D16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12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231666666666667" calcext:value-type="float">
            <text:p>0,00231666666666667000</text:p>
          </table:table-cell>
          <table:table-cell table:formula="of:=[.D1670]-[.D16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12" office:value-type="float" office:value="20028" calcext:value-type="float">
            <text:p>20028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231805555555556" calcext:value-type="float">
            <text:p>0,00231805555555556000</text:p>
          </table:table-cell>
          <table:table-cell table:formula="of:=[.D1671]-[.D16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12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231944444444444" calcext:value-type="float">
            <text:p>0,00231944444444444000</text:p>
          </table:table-cell>
          <table:table-cell table:formula="of:=[.D1672]-[.D16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12" office:value-type="float" office:value="20052" calcext:value-type="float">
            <text:p>20052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232083333333333" calcext:value-type="float">
            <text:p>0,00232083333333333000</text:p>
          </table:table-cell>
          <table:table-cell table:formula="of:=[.D1673]-[.D16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12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232222222222222" calcext:value-type="float">
            <text:p>0,00232222222222222000</text:p>
          </table:table-cell>
          <table:table-cell table:formula="of:=[.D1674]-[.D16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12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232361111111111" calcext:value-type="float">
            <text:p>0,00232361111111111000</text:p>
          </table:table-cell>
          <table:table-cell table:formula="of:=[.D1675]-[.D16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12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2325" calcext:value-type="float">
            <text:p>0,00232500000000000000</text:p>
          </table:table-cell>
          <table:table-cell table:formula="of:=[.D1676]-[.D16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12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232638888888889" calcext:value-type="float">
            <text:p>0,00232638888888889000</text:p>
          </table:table-cell>
          <table:table-cell table:formula="of:=[.D1677]-[.D16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12" office:value-type="float" office:value="20112" calcext:value-type="float">
            <text:p>20112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232777777777778" calcext:value-type="float">
            <text:p>0,00232777777777778000</text:p>
          </table:table-cell>
          <table:table-cell table:formula="of:=[.D1678]-[.D16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12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232916666666667" calcext:value-type="float">
            <text:p>0,00232916666666667000</text:p>
          </table:table-cell>
          <table:table-cell table:formula="of:=[.D1679]-[.D1678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12" office:value-type="float" office:value="20136" calcext:value-type="float">
            <text:p>20136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233055555555556" calcext:value-type="float">
            <text:p>0,00233055555555556000</text:p>
          </table:table-cell>
          <table:table-cell table:formula="of:=[.D1680]-[.D16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12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233194444444444" calcext:value-type="float">
            <text:p>0,00233194444444444000</text:p>
          </table:table-cell>
          <table:table-cell table:formula="of:=[.D1681]-[.D16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12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233333333333333" calcext:value-type="float">
            <text:p>0,00233333333333333000</text:p>
          </table:table-cell>
          <table:table-cell table:formula="of:=[.D1682]-[.D16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12" office:value-type="float" office:value="20172" calcext:value-type="float">
            <text:p>20172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233472222222222" calcext:value-type="float">
            <text:p>0,00233472222222222000</text:p>
          </table:table-cell>
          <table:table-cell table:formula="of:=[.D1683]-[.D16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12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233611111111111" calcext:value-type="float">
            <text:p>0,00233611111111111000</text:p>
          </table:table-cell>
          <table:table-cell table:formula="of:=[.D1684]-[.D16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12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23375" calcext:value-type="float">
            <text:p>0,00233750000000000000</text:p>
          </table:table-cell>
          <table:table-cell table:formula="of:=[.D1685]-[.D16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12" office:value-type="float" office:value="20208" calcext:value-type="float">
            <text:p>20208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233888888888889" calcext:value-type="float">
            <text:p>0,00233888888888889000</text:p>
          </table:table-cell>
          <table:table-cell table:formula="of:=[.D1686]-[.D16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12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234027777777778" calcext:value-type="float">
            <text:p>0,00234027777777778000</text:p>
          </table:table-cell>
          <table:table-cell table:formula="of:=[.D1687]-[.D16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12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234166666666667" calcext:value-type="float">
            <text:p>0,00234166666666667000</text:p>
          </table:table-cell>
          <table:table-cell table:formula="of:=[.D1688]-[.D16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12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234305555555556" calcext:value-type="float">
            <text:p>0,00234305555555556000</text:p>
          </table:table-cell>
          <table:table-cell table:formula="of:=[.D1689]-[.D16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12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234444444444444" calcext:value-type="float">
            <text:p>0,00234444444444444000</text:p>
          </table:table-cell>
          <table:table-cell table:formula="of:=[.D1690]-[.D16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12" office:value-type="float" office:value="20268" calcext:value-type="float">
            <text:p>20268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234583333333333" calcext:value-type="float">
            <text:p>0,00234583333333333000</text:p>
          </table:table-cell>
          <table:table-cell table:formula="of:=[.D1691]-[.D16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12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234722222222222" calcext:value-type="float">
            <text:p>0,00234722222222222000</text:p>
          </table:table-cell>
          <table:table-cell table:formula="of:=[.D1692]-[.D16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12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234861111111111" calcext:value-type="float">
            <text:p>0,00234861111111111000</text:p>
          </table:table-cell>
          <table:table-cell table:formula="of:=[.D1693]-[.D16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12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235" calcext:value-type="float">
            <text:p>0,00235000000000000000</text:p>
          </table:table-cell>
          <table:table-cell table:formula="of:=[.D1694]-[.D16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12" office:value-type="float" office:value="20316" calcext:value-type="float">
            <text:p>20316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235138888888889" calcext:value-type="float">
            <text:p>0,00235138888888889000</text:p>
          </table:table-cell>
          <table:table-cell table:formula="of:=[.D1695]-[.D16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12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235277777777778" calcext:value-type="float">
            <text:p>0,00235277777777778000</text:p>
          </table:table-cell>
          <table:table-cell table:formula="of:=[.D1696]-[.D16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12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235416666666667" calcext:value-type="float">
            <text:p>0,00235416666666667000</text:p>
          </table:table-cell>
          <table:table-cell table:formula="of:=[.D1697]-[.D16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12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235555555555556" calcext:value-type="float">
            <text:p>0,00235555555555556000</text:p>
          </table:table-cell>
          <table:table-cell table:formula="of:=[.D1698]-[.D16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12" office:value-type="float" office:value="20364" calcext:value-type="float">
            <text:p>20364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235694444444444" calcext:value-type="float">
            <text:p>0,00235694444444444000</text:p>
          </table:table-cell>
          <table:table-cell table:formula="of:=[.D1699]-[.D16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12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235833333333333" calcext:value-type="float">
            <text:p>0,00235833333333333000</text:p>
          </table:table-cell>
          <table:table-cell table:formula="of:=[.D1700]-[.D16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12" office:value-type="float" office:value="20388" calcext:value-type="float">
            <text:p>20388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235972222222222" calcext:value-type="float">
            <text:p>0,00235972222222222000</text:p>
          </table:table-cell>
          <table:table-cell table:formula="of:=[.D1701]-[.D17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12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236111111111111" calcext:value-type="float">
            <text:p>0,00236111111111111000</text:p>
          </table:table-cell>
          <table:table-cell table:formula="of:=[.D1702]-[.D17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12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23625" calcext:value-type="float">
            <text:p>0,00236250000000000000</text:p>
          </table:table-cell>
          <table:table-cell table:formula="of:=[.D1703]-[.D17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12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236388888888889" calcext:value-type="float">
            <text:p>0,00236388888888889000</text:p>
          </table:table-cell>
          <table:table-cell table:formula="of:=[.D1704]-[.D17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12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236527777777778" calcext:value-type="float">
            <text:p>0,00236527777777778000</text:p>
          </table:table-cell>
          <table:table-cell table:formula="of:=[.D1705]-[.D17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12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236666666666667" calcext:value-type="float">
            <text:p>0,00236666666666667000</text:p>
          </table:table-cell>
          <table:table-cell table:formula="of:=[.D1706]-[.D17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12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236805555555556" calcext:value-type="float">
            <text:p>0,00236805555555556000</text:p>
          </table:table-cell>
          <table:table-cell table:formula="of:=[.D1707]-[.D17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12" office:value-type="float" office:value="20472" calcext:value-type="float">
            <text:p>20472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236944444444444" calcext:value-type="float">
            <text:p>0,00236944444444444000</text:p>
          </table:table-cell>
          <table:table-cell table:formula="of:=[.D1708]-[.D17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12" office:value-type="float" office:value="20484" calcext:value-type="float">
            <text:p>20484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237083333333333" calcext:value-type="float">
            <text:p>0,00237083333333333000</text:p>
          </table:table-cell>
          <table:table-cell table:formula="of:=[.D1709]-[.D17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12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237222222222222" calcext:value-type="float">
            <text:p>0,00237222222222222000</text:p>
          </table:table-cell>
          <table:table-cell table:formula="of:=[.D1710]-[.D17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12" office:value-type="float" office:value="20508" calcext:value-type="float">
            <text:p>20508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237361111111111" calcext:value-type="float">
            <text:p>0,00237361111111111000</text:p>
          </table:table-cell>
          <table:table-cell table:formula="of:=[.D1711]-[.D17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12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2375" calcext:value-type="float">
            <text:p>0,00237500000000000000</text:p>
          </table:table-cell>
          <table:table-cell table:formula="of:=[.D1712]-[.D17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12" office:value-type="float" office:value="20532" calcext:value-type="float">
            <text:p>20532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237638888888889" calcext:value-type="float">
            <text:p>0,00237638888888889000</text:p>
          </table:table-cell>
          <table:table-cell table:formula="of:=[.D1713]-[.D17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12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237777777777778" calcext:value-type="float">
            <text:p>0,00237777777777778000</text:p>
          </table:table-cell>
          <table:table-cell table:formula="of:=[.D1714]-[.D17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12" office:value-type="float" office:value="20556" calcext:value-type="float">
            <text:p>20556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237916666666667" calcext:value-type="float">
            <text:p>0,00237916666666667000</text:p>
          </table:table-cell>
          <table:table-cell table:formula="of:=[.D1715]-[.D17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12" office:value-type="float" office:value="20568" calcext:value-type="float">
            <text:p>20568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238055555555556" calcext:value-type="float">
            <text:p>0,00238055555555556000</text:p>
          </table:table-cell>
          <table:table-cell table:formula="of:=[.D1716]-[.D17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12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238194444444444" calcext:value-type="float">
            <text:p>0,00238194444444444000</text:p>
          </table:table-cell>
          <table:table-cell table:formula="of:=[.D1717]-[.D17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12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238333333333333" calcext:value-type="float">
            <text:p>0,00238333333333333000</text:p>
          </table:table-cell>
          <table:table-cell table:formula="of:=[.D1718]-[.D17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12" office:value-type="float" office:value="20604" calcext:value-type="float">
            <text:p>20604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238472222222222" calcext:value-type="float">
            <text:p>0,00238472222222222000</text:p>
          </table:table-cell>
          <table:table-cell table:formula="of:=[.D1719]-[.D17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12" office:value-type="float" office:value="20616" calcext:value-type="float">
            <text:p>20616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238611111111111" calcext:value-type="float">
            <text:p>0,00238611111111111000</text:p>
          </table:table-cell>
          <table:table-cell table:formula="of:=[.D1720]-[.D17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12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23875" calcext:value-type="float">
            <text:p>0,00238750000000000000</text:p>
          </table:table-cell>
          <table:table-cell table:formula="of:=[.D1721]-[.D17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12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238888888888889" calcext:value-type="float">
            <text:p>0,00238888888888889000</text:p>
          </table:table-cell>
          <table:table-cell table:formula="of:=[.D1722]-[.D17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12" office:value-type="float" office:value="20652" calcext:value-type="float">
            <text:p>20652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239027777777778" calcext:value-type="float">
            <text:p>0,00239027777777778000</text:p>
          </table:table-cell>
          <table:table-cell table:formula="of:=[.D1723]-[.D17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12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239166666666667" calcext:value-type="float">
            <text:p>0,00239166666666667000</text:p>
          </table:table-cell>
          <table:table-cell table:formula="of:=[.D1724]-[.D17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12" office:value-type="float" office:value="20676" calcext:value-type="float">
            <text:p>20676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239305555555556" calcext:value-type="float">
            <text:p>0,00239305555555556000</text:p>
          </table:table-cell>
          <table:table-cell table:formula="of:=[.D1725]-[.D17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12" office:value-type="float" office:value="20688" calcext:value-type="float">
            <text:p>20688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239444444444444" calcext:value-type="float">
            <text:p>0,00239444444444444000</text:p>
          </table:table-cell>
          <table:table-cell table:formula="of:=[.D1726]-[.D17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12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239583333333333" calcext:value-type="float">
            <text:p>0,00239583333333333000</text:p>
          </table:table-cell>
          <table:table-cell table:formula="of:=[.D1727]-[.D17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12" office:value-type="float" office:value="20712" calcext:value-type="float">
            <text:p>20712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239722222222222" calcext:value-type="float">
            <text:p>0,00239722222222222000</text:p>
          </table:table-cell>
          <table:table-cell table:formula="of:=[.D1728]-[.D17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12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239861111111111" calcext:value-type="float">
            <text:p>0,00239861111111111000</text:p>
          </table:table-cell>
          <table:table-cell table:formula="of:=[.D1729]-[.D17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12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24" calcext:value-type="float">
            <text:p>0,00240000000000000000</text:p>
          </table:table-cell>
          <table:table-cell table:formula="of:=[.D1730]-[.D1729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12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240138888888889" calcext:value-type="float">
            <text:p>0,00240138888888889000</text:p>
          </table:table-cell>
          <table:table-cell table:formula="of:=[.D1731]-[.D17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12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240277777777778" calcext:value-type="float">
            <text:p>0,00240277777777778000</text:p>
          </table:table-cell>
          <table:table-cell table:formula="of:=[.D1732]-[.D17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12" office:value-type="float" office:value="20772" calcext:value-type="float">
            <text:p>20772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240416666666667" calcext:value-type="float">
            <text:p>0,00240416666666667000</text:p>
          </table:table-cell>
          <table:table-cell table:formula="of:=[.D1733]-[.D17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12" office:value-type="float" office:value="20784" calcext:value-type="float">
            <text:p>20784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240555555555556" calcext:value-type="float">
            <text:p>0,00240555555555556000</text:p>
          </table:table-cell>
          <table:table-cell table:formula="of:=[.D1734]-[.D17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12" office:value-type="float" office:value="20796" calcext:value-type="float">
            <text:p>20796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240694444444444" calcext:value-type="float">
            <text:p>0,00240694444444444000</text:p>
          </table:table-cell>
          <table:table-cell table:formula="of:=[.D1735]-[.D17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12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240833333333333" calcext:value-type="float">
            <text:p>0,00240833333333333000</text:p>
          </table:table-cell>
          <table:table-cell table:formula="of:=[.D1736]-[.D17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12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240972222222222" calcext:value-type="float">
            <text:p>0,00240972222222222000</text:p>
          </table:table-cell>
          <table:table-cell table:formula="of:=[.D1737]-[.D17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12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241111111111111" calcext:value-type="float">
            <text:p>0,00241111111111111000</text:p>
          </table:table-cell>
          <table:table-cell table:formula="of:=[.D1738]-[.D17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12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24125" calcext:value-type="float">
            <text:p>0,00241250000000000000</text:p>
          </table:table-cell>
          <table:table-cell table:formula="of:=[.D1739]-[.D17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12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241388888888889" calcext:value-type="float">
            <text:p>0,00241388888888889000</text:p>
          </table:table-cell>
          <table:table-cell table:formula="of:=[.D1740]-[.D17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12" office:value-type="float" office:value="20868" calcext:value-type="float">
            <text:p>20868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241527777777778" calcext:value-type="float">
            <text:p>0,00241527777777778000</text:p>
          </table:table-cell>
          <table:table-cell table:formula="of:=[.D1741]-[.D17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12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241666666666667" calcext:value-type="float">
            <text:p>0,00241666666666667000</text:p>
          </table:table-cell>
          <table:table-cell table:formula="of:=[.D1742]-[.D17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12" office:value-type="float" office:value="20892" calcext:value-type="float">
            <text:p>20892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241805555555556" calcext:value-type="float">
            <text:p>0,00241805555555556000</text:p>
          </table:table-cell>
          <table:table-cell table:formula="of:=[.D1743]-[.D17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12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241944444444444" calcext:value-type="float">
            <text:p>0,00241944444444444000</text:p>
          </table:table-cell>
          <table:table-cell table:formula="of:=[.D1744]-[.D17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12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242083333333333" calcext:value-type="float">
            <text:p>0,00242083333333333000</text:p>
          </table:table-cell>
          <table:table-cell table:formula="of:=[.D1745]-[.D17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12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242222222222222" calcext:value-type="float">
            <text:p>0,00242222222222222000</text:p>
          </table:table-cell>
          <table:table-cell table:formula="of:=[.D1746]-[.D17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12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242361111111111" calcext:value-type="float">
            <text:p>0,00242361111111111000</text:p>
          </table:table-cell>
          <table:table-cell table:formula="of:=[.D1747]-[.D17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12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2425" calcext:value-type="float">
            <text:p>0,00242500000000000000</text:p>
          </table:table-cell>
          <table:table-cell table:formula="of:=[.D1748]-[.D17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12" office:value-type="float" office:value="20964" calcext:value-type="float">
            <text:p>20964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242638888888889" calcext:value-type="float">
            <text:p>0,00242638888888889000</text:p>
          </table:table-cell>
          <table:table-cell table:formula="of:=[.D1749]-[.D17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12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242777777777778" calcext:value-type="float">
            <text:p>0,00242777777777778000</text:p>
          </table:table-cell>
          <table:table-cell table:formula="of:=[.D1750]-[.D17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12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242916666666667" calcext:value-type="float">
            <text:p>0,00242916666666667000</text:p>
          </table:table-cell>
          <table:table-cell table:formula="of:=[.D1751]-[.D17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12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243055555555556" calcext:value-type="float">
            <text:p>0,00243055555555556000</text:p>
          </table:table-cell>
          <table:table-cell table:formula="of:=[.D1752]-[.D17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12" office:value-type="float" office:value="21012" calcext:value-type="float">
            <text:p>21012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243194444444444" calcext:value-type="float">
            <text:p>0,00243194444444444000</text:p>
          </table:table-cell>
          <table:table-cell table:formula="of:=[.D1753]-[.D17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12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243333333333333" calcext:value-type="float">
            <text:p>0,00243333333333333000</text:p>
          </table:table-cell>
          <table:table-cell table:formula="of:=[.D1754]-[.D17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12" office:value-type="float" office:value="21036" calcext:value-type="float">
            <text:p>21036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243472222222222" calcext:value-type="float">
            <text:p>0,00243472222222222000</text:p>
          </table:table-cell>
          <table:table-cell table:formula="of:=[.D1755]-[.D17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12" office:value-type="float" office:value="21048" calcext:value-type="float">
            <text:p>21048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243611111111111" calcext:value-type="float">
            <text:p>0,00243611111111111000</text:p>
          </table:table-cell>
          <table:table-cell table:formula="of:=[.D1756]-[.D17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12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24375" calcext:value-type="float">
            <text:p>0,00243750000000000000</text:p>
          </table:table-cell>
          <table:table-cell table:formula="of:=[.D1757]-[.D17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12" office:value-type="float" office:value="21072" calcext:value-type="float">
            <text:p>21072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243888888888889" calcext:value-type="float">
            <text:p>0,00243888888888889000</text:p>
          </table:table-cell>
          <table:table-cell table:formula="of:=[.D1758]-[.D17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12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244027777777778" calcext:value-type="float">
            <text:p>0,00244027777777778000</text:p>
          </table:table-cell>
          <table:table-cell table:formula="of:=[.D1759]-[.D17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12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244166666666667" calcext:value-type="float">
            <text:p>0,00244166666666667000</text:p>
          </table:table-cell>
          <table:table-cell table:formula="of:=[.D1760]-[.D17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12" office:value-type="float" office:value="21108" calcext:value-type="float">
            <text:p>21108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244305555555556" calcext:value-type="float">
            <text:p>0,00244305555555556000</text:p>
          </table:table-cell>
          <table:table-cell table:formula="of:=[.D1761]-[.D17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12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244444444444444" calcext:value-type="float">
            <text:p>0,00244444444444444000</text:p>
          </table:table-cell>
          <table:table-cell table:formula="of:=[.D1762]-[.D17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12" office:value-type="float" office:value="21132" calcext:value-type="float">
            <text:p>21132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244583333333333" calcext:value-type="float">
            <text:p>0,00244583333333333000</text:p>
          </table:table-cell>
          <table:table-cell table:formula="of:=[.D1763]-[.D17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12" office:value-type="float" office:value="21144" calcext:value-type="float">
            <text:p>21144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244722222222222" calcext:value-type="float">
            <text:p>0,00244722222222222000</text:p>
          </table:table-cell>
          <table:table-cell table:formula="of:=[.D1764]-[.D17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12" office:value-type="float" office:value="21156" calcext:value-type="float">
            <text:p>21156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244861111111111" calcext:value-type="float">
            <text:p>0,00244861111111111000</text:p>
          </table:table-cell>
          <table:table-cell table:formula="of:=[.D1765]-[.D17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12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245" calcext:value-type="float">
            <text:p>0,00245000000000000000</text:p>
          </table:table-cell>
          <table:table-cell table:formula="of:=[.D1766]-[.D17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12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245138888888889" calcext:value-type="float">
            <text:p>0,00245138888888889000</text:p>
          </table:table-cell>
          <table:table-cell table:formula="of:=[.D1767]-[.D17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12" office:value-type="float" office:value="21192" calcext:value-type="float">
            <text:p>21192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245277777777778" calcext:value-type="float">
            <text:p>0,00245277777777778000</text:p>
          </table:table-cell>
          <table:table-cell table:formula="of:=[.D1768]-[.D17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12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245416666666667" calcext:value-type="float">
            <text:p>0,00245416666666667000</text:p>
          </table:table-cell>
          <table:table-cell table:formula="of:=[.D1769]-[.D17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12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245555555555556" calcext:value-type="float">
            <text:p>0,00245555555555556000</text:p>
          </table:table-cell>
          <table:table-cell table:formula="of:=[.D1770]-[.D17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12" office:value-type="float" office:value="21228" calcext:value-type="float">
            <text:p>21228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245694444444444" calcext:value-type="float">
            <text:p>0,00245694444444444000</text:p>
          </table:table-cell>
          <table:table-cell table:formula="of:=[.D1771]-[.D17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12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245833333333333" calcext:value-type="float">
            <text:p>0,00245833333333333000</text:p>
          </table:table-cell>
          <table:table-cell table:formula="of:=[.D1772]-[.D17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12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245972222222222" calcext:value-type="float">
            <text:p>0,00245972222222222000</text:p>
          </table:table-cell>
          <table:table-cell table:formula="of:=[.D1773]-[.D17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12" office:value-type="float" office:value="21264" calcext:value-type="float">
            <text:p>21264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246111111111111" calcext:value-type="float">
            <text:p>0,00246111111111111000</text:p>
          </table:table-cell>
          <table:table-cell table:formula="of:=[.D1774]-[.D17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12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24625" calcext:value-type="float">
            <text:p>0,00246250000000000000</text:p>
          </table:table-cell>
          <table:table-cell table:formula="of:=[.D1775]-[.D17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12" office:value-type="float" office:value="21288" calcext:value-type="float">
            <text:p>21288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246388888888889" calcext:value-type="float">
            <text:p>0,00246388888888889000</text:p>
          </table:table-cell>
          <table:table-cell table:formula="of:=[.D1776]-[.D17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12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246527777777778" calcext:value-type="float">
            <text:p>0,00246527777777778000</text:p>
          </table:table-cell>
          <table:table-cell table:formula="of:=[.D1777]-[.D17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12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246666666666667" calcext:value-type="float">
            <text:p>0,00246666666666667000</text:p>
          </table:table-cell>
          <table:table-cell table:formula="of:=[.D1778]-[.D17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12" office:value-type="float" office:value="21324" calcext:value-type="float">
            <text:p>21324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246805555555556" calcext:value-type="float">
            <text:p>0,00246805555555556000</text:p>
          </table:table-cell>
          <table:table-cell table:formula="of:=[.D1779]-[.D17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12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246944444444444" calcext:value-type="float">
            <text:p>0,00246944444444444000</text:p>
          </table:table-cell>
          <table:table-cell table:formula="of:=[.D1780]-[.D17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12" office:value-type="float" office:value="21348" calcext:value-type="float">
            <text:p>21348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247083333333333" calcext:value-type="float">
            <text:p>0,00247083333333333000</text:p>
          </table:table-cell>
          <table:table-cell table:formula="of:=[.D1781]-[.D17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12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247222222222222" calcext:value-type="float">
            <text:p>0,00247222222222222000</text:p>
          </table:table-cell>
          <table:table-cell table:formula="of:=[.D1782]-[.D1781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12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247361111111111" calcext:value-type="float">
            <text:p>0,00247361111111111000</text:p>
          </table:table-cell>
          <table:table-cell table:formula="of:=[.D1783]-[.D17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12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2475" calcext:value-type="float">
            <text:p>0,00247500000000000000</text:p>
          </table:table-cell>
          <table:table-cell table:formula="of:=[.D1784]-[.D17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12" office:value-type="float" office:value="21396" calcext:value-type="float">
            <text:p>21396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247638888888889" calcext:value-type="float">
            <text:p>0,00247638888888889000</text:p>
          </table:table-cell>
          <table:table-cell table:formula="of:=[.D1785]-[.D17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12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247777777777778" calcext:value-type="float">
            <text:p>0,00247777777777778000</text:p>
          </table:table-cell>
          <table:table-cell table:formula="of:=[.D1786]-[.D17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12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247916666666667" calcext:value-type="float">
            <text:p>0,00247916666666667000</text:p>
          </table:table-cell>
          <table:table-cell table:formula="of:=[.D1787]-[.D17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12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248055555555556" calcext:value-type="float">
            <text:p>0,00248055555555556000</text:p>
          </table:table-cell>
          <table:table-cell table:formula="of:=[.D1788]-[.D17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12" office:value-type="float" office:value="21444" calcext:value-type="float">
            <text:p>21444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248194444444444" calcext:value-type="float">
            <text:p>0,00248194444444444000</text:p>
          </table:table-cell>
          <table:table-cell table:formula="of:=[.D1789]-[.D17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12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248333333333333" calcext:value-type="float">
            <text:p>0,00248333333333333000</text:p>
          </table:table-cell>
          <table:table-cell table:formula="of:=[.D1790]-[.D17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12" office:value-type="float" office:value="21468" calcext:value-type="float">
            <text:p>21468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248472222222222" calcext:value-type="float">
            <text:p>0,00248472222222222000</text:p>
          </table:table-cell>
          <table:table-cell table:formula="of:=[.D1791]-[.D17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12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248611111111111" calcext:value-type="float">
            <text:p>0,00248611111111111000</text:p>
          </table:table-cell>
          <table:table-cell table:formula="of:=[.D1792]-[.D17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12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24875" calcext:value-type="float">
            <text:p>0,00248750000000000000</text:p>
          </table:table-cell>
          <table:table-cell table:formula="of:=[.D1793]-[.D17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12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248888888888889" calcext:value-type="float">
            <text:p>0,00248888888888889000</text:p>
          </table:table-cell>
          <table:table-cell table:formula="of:=[.D1794]-[.D17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12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249027777777778" calcext:value-type="float">
            <text:p>0,00249027777777778000</text:p>
          </table:table-cell>
          <table:table-cell table:formula="of:=[.D1795]-[.D17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12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249166666666667" calcext:value-type="float">
            <text:p>0,00249166666666667000</text:p>
          </table:table-cell>
          <table:table-cell table:formula="of:=[.D1796]-[.D17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12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249305555555556" calcext:value-type="float">
            <text:p>0,00249305555555556000</text:p>
          </table:table-cell>
          <table:table-cell table:formula="of:=[.D1797]-[.D17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12" office:value-type="float" office:value="21552" calcext:value-type="float">
            <text:p>21552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249444444444444" calcext:value-type="float">
            <text:p>0,00249444444444444000</text:p>
          </table:table-cell>
          <table:table-cell table:formula="of:=[.D1798]-[.D17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12" office:value-type="float" office:value="21564" calcext:value-type="float">
            <text:p>21564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249583333333333" calcext:value-type="float">
            <text:p>0,00249583333333333000</text:p>
          </table:table-cell>
          <table:table-cell table:formula="of:=[.D1799]-[.D17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12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249722222222222" calcext:value-type="float">
            <text:p>0,00249722222222222000</text:p>
          </table:table-cell>
          <table:table-cell table:formula="of:=[.D1800]-[.D17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12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249861111111111" calcext:value-type="float">
            <text:p>0,00249861111111111000</text:p>
          </table:table-cell>
          <table:table-cell table:formula="of:=[.D1801]-[.D18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12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25" calcext:value-type="float">
            <text:p>0,00250000000000000000</text:p>
          </table:table-cell>
          <table:table-cell table:formula="of:=[.D1802]-[.D18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12" office:value-type="float" office:value="21612" calcext:value-type="float">
            <text:p>21612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250138888888889" calcext:value-type="float">
            <text:p>0,00250138888888889000</text:p>
          </table:table-cell>
          <table:table-cell table:formula="of:=[.D1803]-[.D18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12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250277777777778" calcext:value-type="float">
            <text:p>0,00250277777777778000</text:p>
          </table:table-cell>
          <table:table-cell table:formula="of:=[.D1804]-[.D18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12" office:value-type="float" office:value="21636" calcext:value-type="float">
            <text:p>21636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250416666666667" calcext:value-type="float">
            <text:p>0,00250416666666667000</text:p>
          </table:table-cell>
          <table:table-cell table:formula="of:=[.D1805]-[.D18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12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250555555555556" calcext:value-type="float">
            <text:p>0,00250555555555556000</text:p>
          </table:table-cell>
          <table:table-cell table:formula="of:=[.D1806]-[.D18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12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250694444444444" calcext:value-type="float">
            <text:p>0,00250694444444444000</text:p>
          </table:table-cell>
          <table:table-cell table:formula="of:=[.D1807]-[.D18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12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250833333333333" calcext:value-type="float">
            <text:p>0,00250833333333333000</text:p>
          </table:table-cell>
          <table:table-cell table:formula="of:=[.D1808]-[.D18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12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250972222222222" calcext:value-type="float">
            <text:p>0,00250972222222222000</text:p>
          </table:table-cell>
          <table:table-cell table:formula="of:=[.D1809]-[.D18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12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251111111111111" calcext:value-type="float">
            <text:p>0,00251111111111111000</text:p>
          </table:table-cell>
          <table:table-cell table:formula="of:=[.D1810]-[.D18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12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25125" calcext:value-type="float">
            <text:p>0,00251250000000000000</text:p>
          </table:table-cell>
          <table:table-cell table:formula="of:=[.D1811]-[.D18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12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251388888888889" calcext:value-type="float">
            <text:p>0,00251388888888889000</text:p>
          </table:table-cell>
          <table:table-cell table:formula="of:=[.D1812]-[.D18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12" office:value-type="float" office:value="21732" calcext:value-type="float">
            <text:p>21732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251527777777778" calcext:value-type="float">
            <text:p>0,00251527777777778000</text:p>
          </table:table-cell>
          <table:table-cell table:formula="of:=[.D1813]-[.D18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12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251666666666667" calcext:value-type="float">
            <text:p>0,00251666666666667000</text:p>
          </table:table-cell>
          <table:table-cell table:formula="of:=[.D1814]-[.D18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12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251805555555556" calcext:value-type="float">
            <text:p>0,00251805555555556000</text:p>
          </table:table-cell>
          <table:table-cell table:formula="of:=[.D1815]-[.D18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12" office:value-type="float" office:value="21768" calcext:value-type="float">
            <text:p>21768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251944444444444" calcext:value-type="float">
            <text:p>0,00251944444444444000</text:p>
          </table:table-cell>
          <table:table-cell table:formula="of:=[.D1816]-[.D18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12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252083333333333" calcext:value-type="float">
            <text:p>0,00252083333333333000</text:p>
          </table:table-cell>
          <table:table-cell table:formula="of:=[.D1817]-[.D18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12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252222222222222" calcext:value-type="float">
            <text:p>0,00252222222222222000</text:p>
          </table:table-cell>
          <table:table-cell table:formula="of:=[.D1818]-[.D18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12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252361111111111" calcext:value-type="float">
            <text:p>0,00252361111111111000</text:p>
          </table:table-cell>
          <table:table-cell table:formula="of:=[.D1819]-[.D18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12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2525" calcext:value-type="float">
            <text:p>0,00252500000000000000</text:p>
          </table:table-cell>
          <table:table-cell table:formula="of:=[.D1820]-[.D18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12" office:value-type="float" office:value="21828" calcext:value-type="float">
            <text:p>21828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252638888888889" calcext:value-type="float">
            <text:p>0,00252638888888889000</text:p>
          </table:table-cell>
          <table:table-cell table:formula="of:=[.D1821]-[.D18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12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252777777777778" calcext:value-type="float">
            <text:p>0,00252777777777778000</text:p>
          </table:table-cell>
          <table:table-cell table:formula="of:=[.D1822]-[.D18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12" office:value-type="float" office:value="21852" calcext:value-type="float">
            <text:p>21852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252916666666667" calcext:value-type="float">
            <text:p>0,00252916666666667000</text:p>
          </table:table-cell>
          <table:table-cell table:formula="of:=[.D1823]-[.D18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12" office:value-type="float" office:value="21864" calcext:value-type="float">
            <text:p>21864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253055555555556" calcext:value-type="float">
            <text:p>0,00253055555555556000</text:p>
          </table:table-cell>
          <table:table-cell table:formula="of:=[.D1824]-[.D18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12" office:value-type="float" office:value="21876" calcext:value-type="float">
            <text:p>21876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253194444444444" calcext:value-type="float">
            <text:p>0,00253194444444444000</text:p>
          </table:table-cell>
          <table:table-cell table:formula="of:=[.D1825]-[.D18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12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253333333333333" calcext:value-type="float">
            <text:p>0,00253333333333333000</text:p>
          </table:table-cell>
          <table:table-cell table:formula="of:=[.D1826]-[.D18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12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253472222222222" calcext:value-type="float">
            <text:p>0,00253472222222222000</text:p>
          </table:table-cell>
          <table:table-cell table:formula="of:=[.D1827]-[.D18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12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253611111111111" calcext:value-type="float">
            <text:p>0,00253611111111111000</text:p>
          </table:table-cell>
          <table:table-cell table:formula="of:=[.D1828]-[.D18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12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25375" calcext:value-type="float">
            <text:p>0,00253750000000000000</text:p>
          </table:table-cell>
          <table:table-cell table:formula="of:=[.D1829]-[.D18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12" office:value-type="float" office:value="21936" calcext:value-type="float">
            <text:p>21936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253888888888889" calcext:value-type="float">
            <text:p>0,00253888888888889000</text:p>
          </table:table-cell>
          <table:table-cell table:formula="of:=[.D1830]-[.D18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12" office:value-type="float" office:value="21948" calcext:value-type="float">
            <text:p>21948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254027777777778" calcext:value-type="float">
            <text:p>0,00254027777777778000</text:p>
          </table:table-cell>
          <table:table-cell table:formula="of:=[.D1831]-[.D18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12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254166666666667" calcext:value-type="float">
            <text:p>0,00254166666666667000</text:p>
          </table:table-cell>
          <table:table-cell table:formula="of:=[.D1832]-[.D18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12" office:value-type="float" office:value="21972" calcext:value-type="float">
            <text:p>21972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254305555555556" calcext:value-type="float">
            <text:p>0,00254305555555556000</text:p>
          </table:table-cell>
          <table:table-cell table:formula="of:=[.D1833]-[.D1832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12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254444444444444" calcext:value-type="float">
            <text:p>0,00254444444444444000</text:p>
          </table:table-cell>
          <table:table-cell table:formula="of:=[.D1834]-[.D18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12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254583333333333" calcext:value-type="float">
            <text:p>0,00254583333333333000</text:p>
          </table:table-cell>
          <table:table-cell table:formula="of:=[.D1835]-[.D18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12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254722222222222" calcext:value-type="float">
            <text:p>0,00254722222222222000</text:p>
          </table:table-cell>
          <table:table-cell table:formula="of:=[.D1836]-[.D18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12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254861111111111" calcext:value-type="float">
            <text:p>0,00254861111111111000</text:p>
          </table:table-cell>
          <table:table-cell table:formula="of:=[.D1837]-[.D183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12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255" calcext:value-type="float">
            <text:p>0,00255000000000000000</text:p>
          </table:table-cell>
          <table:table-cell table:formula="of:=[.D1838]-[.D18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12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255138888888889" calcext:value-type="float">
            <text:p>0,00255138888888889000</text:p>
          </table:table-cell>
          <table:table-cell table:formula="of:=[.D1839]-[.D18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12" office:value-type="float" office:value="22056" calcext:value-type="float">
            <text:p>22056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255277777777778" calcext:value-type="float">
            <text:p>0,00255277777777778000</text:p>
          </table:table-cell>
          <table:table-cell table:formula="of:=[.D1840]-[.D18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12" office:value-type="float" office:value="22068" calcext:value-type="float">
            <text:p>22068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255416666666667" calcext:value-type="float">
            <text:p>0,00255416666666667000</text:p>
          </table:table-cell>
          <table:table-cell table:formula="of:=[.D1841]-[.D18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12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255555555555556" calcext:value-type="float">
            <text:p>0,00255555555555556000</text:p>
          </table:table-cell>
          <table:table-cell table:formula="of:=[.D1842]-[.D18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12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255694444444444" calcext:value-type="float">
            <text:p>0,00255694444444444000</text:p>
          </table:table-cell>
          <table:table-cell table:formula="of:=[.D1843]-[.D18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12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255833333333333" calcext:value-type="float">
            <text:p>0,00255833333333333000</text:p>
          </table:table-cell>
          <table:table-cell table:formula="of:=[.D1844]-[.D18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12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255972222222222" calcext:value-type="float">
            <text:p>0,00255972222222222000</text:p>
          </table:table-cell>
          <table:table-cell table:formula="of:=[.D1845]-[.D18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12" office:value-type="float" office:value="22128" calcext:value-type="float">
            <text:p>22128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256111111111111" calcext:value-type="float">
            <text:p>0,00256111111111111000</text:p>
          </table:table-cell>
          <table:table-cell table:formula="of:=[.D1846]-[.D18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12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25625" calcext:value-type="float">
            <text:p>0,00256250000000000000</text:p>
          </table:table-cell>
          <table:table-cell table:formula="of:=[.D1847]-[.D18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12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256388888888889" calcext:value-type="float">
            <text:p>0,00256388888888889000</text:p>
          </table:table-cell>
          <table:table-cell table:formula="of:=[.D1848]-[.D18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12" office:value-type="float" office:value="22164" calcext:value-type="float">
            <text:p>22164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256527777777778" calcext:value-type="float">
            <text:p>0,00256527777777778000</text:p>
          </table:table-cell>
          <table:table-cell table:formula="of:=[.D1849]-[.D18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12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256666666666667" calcext:value-type="float">
            <text:p>0,00256666666666667000</text:p>
          </table:table-cell>
          <table:table-cell table:formula="of:=[.D1850]-[.D18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12" office:value-type="float" office:value="22188" calcext:value-type="float">
            <text:p>22188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256805555555556" calcext:value-type="float">
            <text:p>0,00256805555555556000</text:p>
          </table:table-cell>
          <table:table-cell table:formula="of:=[.D1851]-[.D18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12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256944444444444" calcext:value-type="float">
            <text:p>0,00256944444444444000</text:p>
          </table:table-cell>
          <table:table-cell table:formula="of:=[.D1852]-[.D18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12" office:value-type="float" office:value="22212" calcext:value-type="float">
            <text:p>22212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257083333333333" calcext:value-type="float">
            <text:p>0,00257083333333333000</text:p>
          </table:table-cell>
          <table:table-cell table:formula="of:=[.D1853]-[.D18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12" office:value-type="float" office:value="22224" calcext:value-type="float">
            <text:p>22224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257222222222222" calcext:value-type="float">
            <text:p>0,00257222222222222000</text:p>
          </table:table-cell>
          <table:table-cell table:formula="of:=[.D1854]-[.D18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12" office:value-type="float" office:value="22236" calcext:value-type="float">
            <text:p>22236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257361111111111" calcext:value-type="float">
            <text:p>0,00257361111111111000</text:p>
          </table:table-cell>
          <table:table-cell table:formula="of:=[.D1855]-[.D18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12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2575" calcext:value-type="float">
            <text:p>0,00257500000000000000</text:p>
          </table:table-cell>
          <table:table-cell table:formula="of:=[.D1856]-[.D18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12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257638888888889" calcext:value-type="float">
            <text:p>0,00257638888888889000</text:p>
          </table:table-cell>
          <table:table-cell table:formula="of:=[.D1857]-[.D18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12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257777777777778" calcext:value-type="float">
            <text:p>0,00257777777777778000</text:p>
          </table:table-cell>
          <table:table-cell table:formula="of:=[.D1858]-[.D18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12" office:value-type="float" office:value="22284" calcext:value-type="float">
            <text:p>22284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257916666666667" calcext:value-type="float">
            <text:p>0,00257916666666667000</text:p>
          </table:table-cell>
          <table:table-cell table:formula="of:=[.D1859]-[.D18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12" office:value-type="float" office:value="22296" calcext:value-type="float">
            <text:p>22296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258055555555556" calcext:value-type="float">
            <text:p>0,00258055555555556000</text:p>
          </table:table-cell>
          <table:table-cell table:formula="of:=[.D1860]-[.D18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12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258194444444444" calcext:value-type="float">
            <text:p>0,00258194444444444000</text:p>
          </table:table-cell>
          <table:table-cell table:formula="of:=[.D1861]-[.D18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12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258333333333333" calcext:value-type="float">
            <text:p>0,00258333333333333000</text:p>
          </table:table-cell>
          <table:table-cell table:formula="of:=[.D1862]-[.D18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12" office:value-type="float" office:value="22332" calcext:value-type="float">
            <text:p>22332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258472222222222" calcext:value-type="float">
            <text:p>0,00258472222222222000</text:p>
          </table:table-cell>
          <table:table-cell table:formula="of:=[.D1863]-[.D18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12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258611111111111" calcext:value-type="float">
            <text:p>0,00258611111111111000</text:p>
          </table:table-cell>
          <table:table-cell table:formula="of:=[.D1864]-[.D18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12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25875" calcext:value-type="float">
            <text:p>0,00258750000000000000</text:p>
          </table:table-cell>
          <table:table-cell table:formula="of:=[.D1865]-[.D18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12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258888888888889" calcext:value-type="float">
            <text:p>0,00258888888888889000</text:p>
          </table:table-cell>
          <table:table-cell table:formula="of:=[.D1866]-[.D18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12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259027777777778" calcext:value-type="float">
            <text:p>0,00259027777777778000</text:p>
          </table:table-cell>
          <table:table-cell table:formula="of:=[.D1867]-[.D18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12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259166666666667" calcext:value-type="float">
            <text:p>0,00259166666666667000</text:p>
          </table:table-cell>
          <table:table-cell table:formula="of:=[.D1868]-[.D18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12" office:value-type="float" office:value="22404" calcext:value-type="float">
            <text:p>22404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259305555555556" calcext:value-type="float">
            <text:p>0,00259305555555556000</text:p>
          </table:table-cell>
          <table:table-cell table:formula="of:=[.D1869]-[.D18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12" office:value-type="float" office:value="22416" calcext:value-type="float">
            <text:p>22416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259444444444444" calcext:value-type="float">
            <text:p>0,00259444444444444000</text:p>
          </table:table-cell>
          <table:table-cell table:formula="of:=[.D1870]-[.D18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12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259583333333333" calcext:value-type="float">
            <text:p>0,00259583333333333000</text:p>
          </table:table-cell>
          <table:table-cell table:formula="of:=[.D1871]-[.D18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12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259722222222222" calcext:value-type="float">
            <text:p>0,00259722222222222000</text:p>
          </table:table-cell>
          <table:table-cell table:formula="of:=[.D1872]-[.D18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12" office:value-type="float" office:value="22452" calcext:value-type="float">
            <text:p>22452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259861111111111" calcext:value-type="float">
            <text:p>0,00259861111111111000</text:p>
          </table:table-cell>
          <table:table-cell table:formula="of:=[.D1873]-[.D18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12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26" calcext:value-type="float">
            <text:p>0,00260000000000000000</text:p>
          </table:table-cell>
          <table:table-cell table:formula="of:=[.D1874]-[.D18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12" office:value-type="float" office:value="22476" calcext:value-type="float">
            <text:p>22476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260138888888889" calcext:value-type="float">
            <text:p>0,00260138888888889000</text:p>
          </table:table-cell>
          <table:table-cell table:formula="of:=[.D1875]-[.D18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12" office:value-type="float" office:value="22488" calcext:value-type="float">
            <text:p>22488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260277777777778" calcext:value-type="float">
            <text:p>0,00260277777777778000</text:p>
          </table:table-cell>
          <table:table-cell table:formula="of:=[.D1876]-[.D18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12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260416666666667" calcext:value-type="float">
            <text:p>0,00260416666666667000</text:p>
          </table:table-cell>
          <table:table-cell table:formula="of:=[.D1877]-[.D18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12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260555555555556" calcext:value-type="float">
            <text:p>0,00260555555555556000</text:p>
          </table:table-cell>
          <table:table-cell table:formula="of:=[.D1878]-[.D18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12" office:value-type="float" office:value="22524" calcext:value-type="float">
            <text:p>22524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260694444444444" calcext:value-type="float">
            <text:p>0,00260694444444444000</text:p>
          </table:table-cell>
          <table:table-cell table:formula="of:=[.D1879]-[.D18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12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260833333333333" calcext:value-type="float">
            <text:p>0,00260833333333333000</text:p>
          </table:table-cell>
          <table:table-cell table:formula="of:=[.D1880]-[.D18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12" office:value-type="float" office:value="22548" calcext:value-type="float">
            <text:p>22548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260972222222222" calcext:value-type="float">
            <text:p>0,00260972222222222000</text:p>
          </table:table-cell>
          <table:table-cell table:formula="of:=[.D1881]-[.D18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12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261111111111111" calcext:value-type="float">
            <text:p>0,00261111111111111000</text:p>
          </table:table-cell>
          <table:table-cell table:formula="of:=[.D1882]-[.D18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12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26125" calcext:value-type="float">
            <text:p>0,00261250000000000000</text:p>
          </table:table-cell>
          <table:table-cell table:formula="of:=[.D1883]-[.D18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12" office:value-type="float" office:value="22584" calcext:value-type="float">
            <text:p>22584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261388888888889" calcext:value-type="float">
            <text:p>0,00261388888888889000</text:p>
          </table:table-cell>
          <table:table-cell table:formula="of:=[.D1884]-[.D18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12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261527777777778" calcext:value-type="float">
            <text:p>0,00261527777777778000</text:p>
          </table:table-cell>
          <table:table-cell table:formula="of:=[.D1885]-[.D1884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12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261666666666667" calcext:value-type="float">
            <text:p>0,00261666666666667000</text:p>
          </table:table-cell>
          <table:table-cell table:formula="of:=[.D1886]-[.D18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12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261805555555556" calcext:value-type="float">
            <text:p>0,00261805555555556000</text:p>
          </table:table-cell>
          <table:table-cell table:formula="of:=[.D1887]-[.D18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12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261944444444444" calcext:value-type="float">
            <text:p>0,00261944444444444000</text:p>
          </table:table-cell>
          <table:table-cell table:formula="of:=[.D1888]-[.D188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12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262083333333333" calcext:value-type="float">
            <text:p>0,00262083333333333000</text:p>
          </table:table-cell>
          <table:table-cell table:formula="of:=[.D1889]-[.D18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12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262222222222222" calcext:value-type="float">
            <text:p>0,00262222222222222000</text:p>
          </table:table-cell>
          <table:table-cell table:formula="of:=[.D1890]-[.D18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12" office:value-type="float" office:value="22668" calcext:value-type="float">
            <text:p>22668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262361111111111" calcext:value-type="float">
            <text:p>0,00262361111111111000</text:p>
          </table:table-cell>
          <table:table-cell table:formula="of:=[.D1891]-[.D18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12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2625" calcext:value-type="float">
            <text:p>0,00262500000000000000</text:p>
          </table:table-cell>
          <table:table-cell table:formula="of:=[.D1892]-[.D18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12" office:value-type="float" office:value="22692" calcext:value-type="float">
            <text:p>22692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262638888888889" calcext:value-type="float">
            <text:p>0,00262638888888889000</text:p>
          </table:table-cell>
          <table:table-cell table:formula="of:=[.D1893]-[.D18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12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262777777777778" calcext:value-type="float">
            <text:p>0,00262777777777778000</text:p>
          </table:table-cell>
          <table:table-cell table:formula="of:=[.D1894]-[.D18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12" office:value-type="float" office:value="22716" calcext:value-type="float">
            <text:p>22716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262916666666667" calcext:value-type="float">
            <text:p>0,00262916666666667000</text:p>
          </table:table-cell>
          <table:table-cell table:formula="of:=[.D1895]-[.D18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12" office:value-type="float" office:value="22728" calcext:value-type="float">
            <text:p>22728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263055555555556" calcext:value-type="float">
            <text:p>0,00263055555555556000</text:p>
          </table:table-cell>
          <table:table-cell table:formula="of:=[.D1896]-[.D18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12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263194444444444" calcext:value-type="float">
            <text:p>0,00263194444444444000</text:p>
          </table:table-cell>
          <table:table-cell table:formula="of:=[.D1897]-[.D18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12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263333333333333" calcext:value-type="float">
            <text:p>0,00263333333333333000</text:p>
          </table:table-cell>
          <table:table-cell table:formula="of:=[.D1898]-[.D18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12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263472222222222" calcext:value-type="float">
            <text:p>0,00263472222222222000</text:p>
          </table:table-cell>
          <table:table-cell table:formula="of:=[.D1899]-[.D18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12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263611111111111" calcext:value-type="float">
            <text:p>0,00263611111111111000</text:p>
          </table:table-cell>
          <table:table-cell table:formula="of:=[.D1900]-[.D18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12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26375" calcext:value-type="float">
            <text:p>0,00263750000000000000</text:p>
          </table:table-cell>
          <table:table-cell table:formula="of:=[.D1901]-[.D19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12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263888888888889" calcext:value-type="float">
            <text:p>0,00263888888888889000</text:p>
          </table:table-cell>
          <table:table-cell table:formula="of:=[.D1902]-[.D190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12" office:value-type="float" office:value="22812" calcext:value-type="float">
            <text:p>22812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264027777777778" calcext:value-type="float">
            <text:p>0,00264027777777778000</text:p>
          </table:table-cell>
          <table:table-cell table:formula="of:=[.D1903]-[.D190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12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264166666666667" calcext:value-type="float">
            <text:p>0,00264166666666667000</text:p>
          </table:table-cell>
          <table:table-cell table:formula="of:=[.D1904]-[.D190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12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264305555555556" calcext:value-type="float">
            <text:p>0,00264305555555556000</text:p>
          </table:table-cell>
          <table:table-cell table:formula="of:=[.D1905]-[.D190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12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264444444444444" calcext:value-type="float">
            <text:p>0,00264444444444444000</text:p>
          </table:table-cell>
          <table:table-cell table:formula="of:=[.D1906]-[.D190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12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264583333333333" calcext:value-type="float">
            <text:p>0,00264583333333333000</text:p>
          </table:table-cell>
          <table:table-cell table:formula="of:=[.D1907]-[.D190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12" office:value-type="float" office:value="22872" calcext:value-type="float">
            <text:p>22872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264722222222222" calcext:value-type="float">
            <text:p>0,00264722222222222000</text:p>
          </table:table-cell>
          <table:table-cell table:formula="of:=[.D1908]-[.D190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12" office:value-type="float" office:value="22884" calcext:value-type="float">
            <text:p>22884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264861111111111" calcext:value-type="float">
            <text:p>0,00264861111111111000</text:p>
          </table:table-cell>
          <table:table-cell table:formula="of:=[.D1909]-[.D190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12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265" calcext:value-type="float">
            <text:p>0,00265000000000000000</text:p>
          </table:table-cell>
          <table:table-cell table:formula="of:=[.D1910]-[.D190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12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265138888888889" calcext:value-type="float">
            <text:p>0,00265138888888889000</text:p>
          </table:table-cell>
          <table:table-cell table:formula="of:=[.D1911]-[.D191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12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265277777777778" calcext:value-type="float">
            <text:p>0,00265277777777778000</text:p>
          </table:table-cell>
          <table:table-cell table:formula="of:=[.D1912]-[.D191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12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265416666666667" calcext:value-type="float">
            <text:p>0,00265416666666667000</text:p>
          </table:table-cell>
          <table:table-cell table:formula="of:=[.D1913]-[.D191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12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265555555555556" calcext:value-type="float">
            <text:p>0,00265555555555556000</text:p>
          </table:table-cell>
          <table:table-cell table:formula="of:=[.D1914]-[.D191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12" office:value-type="float" office:value="22956" calcext:value-type="float">
            <text:p>22956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265694444444444" calcext:value-type="float">
            <text:p>0,00265694444444444000</text:p>
          </table:table-cell>
          <table:table-cell table:formula="of:=[.D1915]-[.D191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12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265833333333333" calcext:value-type="float">
            <text:p>0,00265833333333333000</text:p>
          </table:table-cell>
          <table:table-cell table:formula="of:=[.D1916]-[.D191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12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265972222222222" calcext:value-type="float">
            <text:p>0,00265972222222222000</text:p>
          </table:table-cell>
          <table:table-cell table:formula="of:=[.D1917]-[.D191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12" office:value-type="float" office:value="22992" calcext:value-type="float">
            <text:p>22992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266111111111111" calcext:value-type="float">
            <text:p>0,00266111111111111000</text:p>
          </table:table-cell>
          <table:table-cell table:formula="of:=[.D1918]-[.D191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12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26625" calcext:value-type="float">
            <text:p>0,00266250000000000000</text:p>
          </table:table-cell>
          <table:table-cell table:formula="of:=[.D1919]-[.D191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12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266388888888889" calcext:value-type="float">
            <text:p>0,00266388888888889000</text:p>
          </table:table-cell>
          <table:table-cell table:formula="of:=[.D1920]-[.D191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12" office:value-type="float" office:value="23028" calcext:value-type="float">
            <text:p>23028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266527777777778" calcext:value-type="float">
            <text:p>0,00266527777777778000</text:p>
          </table:table-cell>
          <table:table-cell table:formula="of:=[.D1921]-[.D192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12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266666666666667" calcext:value-type="float">
            <text:p>0,00266666666666667000</text:p>
          </table:table-cell>
          <table:table-cell table:formula="of:=[.D1922]-[.D192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12" office:value-type="float" office:value="23052" calcext:value-type="float">
            <text:p>23052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266805555555556" calcext:value-type="float">
            <text:p>0,00266805555555556000</text:p>
          </table:table-cell>
          <table:table-cell table:formula="of:=[.D1923]-[.D192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12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266944444444444" calcext:value-type="float">
            <text:p>0,00266944444444444000</text:p>
          </table:table-cell>
          <table:table-cell table:formula="of:=[.D1924]-[.D192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12" office:value-type="float" office:value="23076" calcext:value-type="float">
            <text:p>23076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267083333333333" calcext:value-type="float">
            <text:p>0,00267083333333333000</text:p>
          </table:table-cell>
          <table:table-cell table:formula="of:=[.D1925]-[.D192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12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267222222222222" calcext:value-type="float">
            <text:p>0,00267222222222222000</text:p>
          </table:table-cell>
          <table:table-cell table:formula="of:=[.D1926]-[.D192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12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267361111111111" calcext:value-type="float">
            <text:p>0,00267361111111111000</text:p>
          </table:table-cell>
          <table:table-cell table:formula="of:=[.D1927]-[.D192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12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2675" calcext:value-type="float">
            <text:p>0,00267500000000000000</text:p>
          </table:table-cell>
          <table:table-cell table:formula="of:=[.D1928]-[.D192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12" office:value-type="float" office:value="23124" calcext:value-type="float">
            <text:p>23124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267638888888889" calcext:value-type="float">
            <text:p>0,00267638888888889000</text:p>
          </table:table-cell>
          <table:table-cell table:formula="of:=[.D1929]-[.D192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12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267777777777778" calcext:value-type="float">
            <text:p>0,00267777777777778000</text:p>
          </table:table-cell>
          <table:table-cell table:formula="of:=[.D1930]-[.D192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12" office:value-type="float" office:value="23148" calcext:value-type="float">
            <text:p>23148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267916666666667" calcext:value-type="float">
            <text:p>0,00267916666666667000</text:p>
          </table:table-cell>
          <table:table-cell table:formula="of:=[.D1931]-[.D193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12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268055555555556" calcext:value-type="float">
            <text:p>0,00268055555555556000</text:p>
          </table:table-cell>
          <table:table-cell table:formula="of:=[.D1932]-[.D193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12" office:value-type="float" office:value="23172" calcext:value-type="float">
            <text:p>23172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268194444444444" calcext:value-type="float">
            <text:p>0,00268194444444444000</text:p>
          </table:table-cell>
          <table:table-cell table:formula="of:=[.D1933]-[.D193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12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268333333333333" calcext:value-type="float">
            <text:p>0,00268333333333333000</text:p>
          </table:table-cell>
          <table:table-cell table:formula="of:=[.D1934]-[.D193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12" office:value-type="float" office:value="23196" calcext:value-type="float">
            <text:p>23196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268472222222222" calcext:value-type="float">
            <text:p>0,00268472222222222000</text:p>
          </table:table-cell>
          <table:table-cell table:formula="of:=[.D1935]-[.D193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12" office:value-type="float" office:value="23208" calcext:value-type="float">
            <text:p>23208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268611111111111" calcext:value-type="float">
            <text:p>0,00268611111111111000</text:p>
          </table:table-cell>
          <table:table-cell table:formula="of:=[.D1936]-[.D193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12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26875" calcext:value-type="float">
            <text:p>0,00268750000000000000</text:p>
          </table:table-cell>
          <table:table-cell table:formula="of:=[.D1937]-[.D1936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12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268888888888889" calcext:value-type="float">
            <text:p>0,00268888888888889000</text:p>
          </table:table-cell>
          <table:table-cell table:formula="of:=[.D1938]-[.D193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12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269027777777778" calcext:value-type="float">
            <text:p>0,00269027777777778000</text:p>
          </table:table-cell>
          <table:table-cell table:formula="of:=[.D1939]-[.D193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12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269166666666667" calcext:value-type="float">
            <text:p>0,00269166666666667000</text:p>
          </table:table-cell>
          <table:table-cell table:formula="of:=[.D1940]-[.D193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12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269305555555556" calcext:value-type="float">
            <text:p>0,00269305555555556000</text:p>
          </table:table-cell>
          <table:table-cell table:formula="of:=[.D1941]-[.D194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12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269444444444444" calcext:value-type="float">
            <text:p>0,00269444444444444000</text:p>
          </table:table-cell>
          <table:table-cell table:formula="of:=[.D1942]-[.D194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12" office:value-type="float" office:value="23292" calcext:value-type="float">
            <text:p>23292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269583333333333" calcext:value-type="float">
            <text:p>0,00269583333333333000</text:p>
          </table:table-cell>
          <table:table-cell table:formula="of:=[.D1943]-[.D194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12" office:value-type="float" office:value="23304" calcext:value-type="float">
            <text:p>23304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269722222222222" calcext:value-type="float">
            <text:p>0,00269722222222222000</text:p>
          </table:table-cell>
          <table:table-cell table:formula="of:=[.D1944]-[.D194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12" office:value-type="float" office:value="23316" calcext:value-type="float">
            <text:p>23316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269861111111111" calcext:value-type="float">
            <text:p>0,00269861111111111000</text:p>
          </table:table-cell>
          <table:table-cell table:formula="of:=[.D1945]-[.D194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12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27" calcext:value-type="float">
            <text:p>0,00270000000000000000</text:p>
          </table:table-cell>
          <table:table-cell table:formula="of:=[.D1946]-[.D194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12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270138888888889" calcext:value-type="float">
            <text:p>0,00270138888888889000</text:p>
          </table:table-cell>
          <table:table-cell table:formula="of:=[.D1947]-[.D194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12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270277777777778" calcext:value-type="float">
            <text:p>0,00270277777777778000</text:p>
          </table:table-cell>
          <table:table-cell table:formula="of:=[.D1948]-[.D194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12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270416666666667" calcext:value-type="float">
            <text:p>0,00270416666666667000</text:p>
          </table:table-cell>
          <table:table-cell table:formula="of:=[.D1949]-[.D194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12" office:value-type="float" office:value="23376" calcext:value-type="float">
            <text:p>23376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270555555555556" calcext:value-type="float">
            <text:p>0,00270555555555556000</text:p>
          </table:table-cell>
          <table:table-cell table:formula="of:=[.D1950]-[.D194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12" office:value-type="float" office:value="23388" calcext:value-type="float">
            <text:p>23388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270694444444444" calcext:value-type="float">
            <text:p>0,00270694444444444000</text:p>
          </table:table-cell>
          <table:table-cell table:formula="of:=[.D1951]-[.D195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12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270833333333333" calcext:value-type="float">
            <text:p>0,00270833333333333000</text:p>
          </table:table-cell>
          <table:table-cell table:formula="of:=[.D1952]-[.D195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12" office:value-type="float" office:value="23412" calcext:value-type="float">
            <text:p>23412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270972222222222" calcext:value-type="float">
            <text:p>0,00270972222222222000</text:p>
          </table:table-cell>
          <table:table-cell table:formula="of:=[.D1953]-[.D195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12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271111111111111" calcext:value-type="float">
            <text:p>0,00271111111111111000</text:p>
          </table:table-cell>
          <table:table-cell table:formula="of:=[.D1954]-[.D195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12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27125" calcext:value-type="float">
            <text:p>0,00271250000000000000</text:p>
          </table:table-cell>
          <table:table-cell table:formula="of:=[.D1955]-[.D195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12" office:value-type="float" office:value="23448" calcext:value-type="float">
            <text:p>23448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271388888888889" calcext:value-type="float">
            <text:p>0,00271388888888889000</text:p>
          </table:table-cell>
          <table:table-cell table:formula="of:=[.D1956]-[.D195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12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271527777777778" calcext:value-type="float">
            <text:p>0,00271527777777778000</text:p>
          </table:table-cell>
          <table:table-cell table:formula="of:=[.D1957]-[.D195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12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271666666666667" calcext:value-type="float">
            <text:p>0,00271666666666667000</text:p>
          </table:table-cell>
          <table:table-cell table:formula="of:=[.D1958]-[.D195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12" office:value-type="float" office:value="23484" calcext:value-type="float">
            <text:p>23484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271805555555556" calcext:value-type="float">
            <text:p>0,00271805555555556000</text:p>
          </table:table-cell>
          <table:table-cell table:formula="of:=[.D1959]-[.D195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12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271944444444444" calcext:value-type="float">
            <text:p>0,00271944444444444000</text:p>
          </table:table-cell>
          <table:table-cell table:formula="of:=[.D1960]-[.D195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12" office:value-type="float" office:value="23508" calcext:value-type="float">
            <text:p>23508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272083333333333" calcext:value-type="float">
            <text:p>0,00272083333333333000</text:p>
          </table:table-cell>
          <table:table-cell table:formula="of:=[.D1961]-[.D196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12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272222222222222" calcext:value-type="float">
            <text:p>0,00272222222222222000</text:p>
          </table:table-cell>
          <table:table-cell table:formula="of:=[.D1962]-[.D196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12" office:value-type="float" office:value="23532" calcext:value-type="float">
            <text:p>23532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272361111111111" calcext:value-type="float">
            <text:p>0,00272361111111111000</text:p>
          </table:table-cell>
          <table:table-cell table:formula="of:=[.D1963]-[.D196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12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2725" calcext:value-type="float">
            <text:p>0,00272500000000000000</text:p>
          </table:table-cell>
          <table:table-cell table:formula="of:=[.D1964]-[.D196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12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272638888888889" calcext:value-type="float">
            <text:p>0,00272638888888889000</text:p>
          </table:table-cell>
          <table:table-cell table:formula="of:=[.D1965]-[.D196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12" office:value-type="float" office:value="23568" calcext:value-type="float">
            <text:p>23568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272777777777778" calcext:value-type="float">
            <text:p>0,00272777777777778000</text:p>
          </table:table-cell>
          <table:table-cell table:formula="of:=[.D1966]-[.D196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12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272916666666667" calcext:value-type="float">
            <text:p>0,00272916666666667000</text:p>
          </table:table-cell>
          <table:table-cell table:formula="of:=[.D1967]-[.D196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12" office:value-type="float" office:value="23592" calcext:value-type="float">
            <text:p>23592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273055555555556" calcext:value-type="float">
            <text:p>0,00273055555555556000</text:p>
          </table:table-cell>
          <table:table-cell table:formula="of:=[.D1968]-[.D196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12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273194444444444" calcext:value-type="float">
            <text:p>0,00273194444444444000</text:p>
          </table:table-cell>
          <table:table-cell table:formula="of:=[.D1969]-[.D196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12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273333333333333" calcext:value-type="float">
            <text:p>0,00273333333333333000</text:p>
          </table:table-cell>
          <table:table-cell table:formula="of:=[.D1970]-[.D196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12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273472222222222" calcext:value-type="float">
            <text:p>0,00273472222222222000</text:p>
          </table:table-cell>
          <table:table-cell table:formula="of:=[.D1971]-[.D197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12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273611111111111" calcext:value-type="float">
            <text:p>0,00273611111111111000</text:p>
          </table:table-cell>
          <table:table-cell table:formula="of:=[.D1972]-[.D197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12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27375" calcext:value-type="float">
            <text:p>0,00273750000000000000</text:p>
          </table:table-cell>
          <table:table-cell table:formula="of:=[.D1973]-[.D197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12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273888888888889" calcext:value-type="float">
            <text:p>0,00273888888888889000</text:p>
          </table:table-cell>
          <table:table-cell table:formula="of:=[.D1974]-[.D197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12" office:value-type="float" office:value="23676" calcext:value-type="float">
            <text:p>23676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274027777777778" calcext:value-type="float">
            <text:p>0,00274027777777778000</text:p>
          </table:table-cell>
          <table:table-cell table:formula="of:=[.D1975]-[.D197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12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274166666666667" calcext:value-type="float">
            <text:p>0,00274166666666667000</text:p>
          </table:table-cell>
          <table:table-cell table:formula="of:=[.D1976]-[.D197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12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274305555555556" calcext:value-type="float">
            <text:p>0,00274305555555556000</text:p>
          </table:table-cell>
          <table:table-cell table:formula="of:=[.D1977]-[.D197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12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274444444444444" calcext:value-type="float">
            <text:p>0,00274444444444444000</text:p>
          </table:table-cell>
          <table:table-cell table:formula="of:=[.D1978]-[.D197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12" office:value-type="float" office:value="23724" calcext:value-type="float">
            <text:p>23724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274583333333333" calcext:value-type="float">
            <text:p>0,00274583333333333000</text:p>
          </table:table-cell>
          <table:table-cell table:formula="of:=[.D1979]-[.D197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12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274722222222222" calcext:value-type="float">
            <text:p>0,00274722222222222000</text:p>
          </table:table-cell>
          <table:table-cell table:formula="of:=[.D1980]-[.D197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12" office:value-type="float" office:value="23748" calcext:value-type="float">
            <text:p>23748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274861111111111" calcext:value-type="float">
            <text:p>0,00274861111111111000</text:p>
          </table:table-cell>
          <table:table-cell table:formula="of:=[.D1981]-[.D198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12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275" calcext:value-type="float">
            <text:p>0,00275000000000000000</text:p>
          </table:table-cell>
          <table:table-cell table:formula="of:=[.D1982]-[.D198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12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275138888888889" calcext:value-type="float">
            <text:p>0,00275138888888889000</text:p>
          </table:table-cell>
          <table:table-cell table:formula="of:=[.D1983]-[.D198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12" office:value-type="float" office:value="23784" calcext:value-type="float">
            <text:p>23784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275277777777778" calcext:value-type="float">
            <text:p>0,00275277777777778000</text:p>
          </table:table-cell>
          <table:table-cell table:formula="of:=[.D1984]-[.D198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12" office:value-type="float" office:value="23796" calcext:value-type="float">
            <text:p>23796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275416666666667" calcext:value-type="float">
            <text:p>0,00275416666666667000</text:p>
          </table:table-cell>
          <table:table-cell table:formula="of:=[.D1985]-[.D198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12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275555555555556" calcext:value-type="float">
            <text:p>0,00275555555555556000</text:p>
          </table:table-cell>
          <table:table-cell table:formula="of:=[.D1986]-[.D198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12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275694444444444" calcext:value-type="float">
            <text:p>0,00275694444444444000</text:p>
          </table:table-cell>
          <table:table-cell table:formula="of:=[.D1987]-[.D198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12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275833333333333" calcext:value-type="float">
            <text:p>0,00275833333333333000</text:p>
          </table:table-cell>
          <table:table-cell table:formula="of:=[.D1988]-[.D1987]" office:value-type="float" office:value="0.00000138888888888931" calcext:value-type="float">
            <text:p>0,0000013888888888893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12" office:value-type="float" office:value="23844" calcext:value-type="float">
            <text:p>23844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275972222222222" calcext:value-type="float">
            <text:p>0,00275972222222222000</text:p>
          </table:table-cell>
          <table:table-cell table:formula="of:=[.D1989]-[.D198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12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276111111111111" calcext:value-type="float">
            <text:p>0,00276111111111111000</text:p>
          </table:table-cell>
          <table:table-cell table:formula="of:=[.D1990]-[.D198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12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27625" calcext:value-type="float">
            <text:p>0,00276250000000000000</text:p>
          </table:table-cell>
          <table:table-cell table:formula="of:=[.D1991]-[.D199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12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276388888888889" calcext:value-type="float">
            <text:p>0,00276388888888889000</text:p>
          </table:table-cell>
          <table:table-cell table:formula="of:=[.D1992]-[.D1991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12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276527777777778" calcext:value-type="float">
            <text:p>0,00276527777777778000</text:p>
          </table:table-cell>
          <table:table-cell table:formula="of:=[.D1993]-[.D1992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12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276666666666667" calcext:value-type="float">
            <text:p>0,00276666666666667000</text:p>
          </table:table-cell>
          <table:table-cell table:formula="of:=[.D1994]-[.D1993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12" office:value-type="float" office:value="23916" calcext:value-type="float">
            <text:p>23916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276805555555556" calcext:value-type="float">
            <text:p>0,00276805555555556000</text:p>
          </table:table-cell>
          <table:table-cell table:formula="of:=[.D1995]-[.D1994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12" office:value-type="float" office:value="23928" calcext:value-type="float">
            <text:p>23928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276944444444444" calcext:value-type="float">
            <text:p>0,00276944444444444000</text:p>
          </table:table-cell>
          <table:table-cell table:formula="of:=[.D1996]-[.D1995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12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277083333333333" calcext:value-type="float">
            <text:p>0,00277083333333333000</text:p>
          </table:table-cell>
          <table:table-cell table:formula="of:=[.D1997]-[.D1996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12" office:value-type="float" office:value="23952" calcext:value-type="float">
            <text:p>23952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277222222222222" calcext:value-type="float">
            <text:p>0,00277222222222222000</text:p>
          </table:table-cell>
          <table:table-cell table:formula="of:=[.D1998]-[.D1997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12" office:value-type="float" office:value="23964" calcext:value-type="float">
            <text:p>23964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277361111111111" calcext:value-type="float">
            <text:p>0,00277361111111111000</text:p>
          </table:table-cell>
          <table:table-cell table:formula="of:=[.D1999]-[.D1998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12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2775" calcext:value-type="float">
            <text:p>0,00277500000000000000</text:p>
          </table:table-cell>
          <table:table-cell table:formula="of:=[.D2000]-[.D1999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12" office:value-type="float" office:value="23988" calcext:value-type="float">
            <text:p>23988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277638888888889" calcext:value-type="float">
            <text:p>0,00277638888888889000</text:p>
          </table:table-cell>
          <table:table-cell table:formula="of:=[.D2001]-[.D2000]" office:value-type="float" office:value="0.00000138888888888888" calcext:value-type="float">
            <text:p>0,000001388888888888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12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277777777777778" calcext:value-type="float">
            <text:p>0,00277777777777778000</text:p>
          </table:table-cell>
          <table:table-cell table:formula="of:=#REF!-[.D2001]" office:value-type="string" office:string-value="" calcext:value-type="error">
            <text:p>#REF!</text:p>
          </table:table-cell>
        </table:table-row>
        <table:table-row table:style-name="ro1" table:number-rows-repeated="1046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3:17.818893722</meta:creation-date>
    <dc:date>2026-05-17T15:34:25.282197149</dc:date>
    <meta:editing-duration>PT1M8S</meta:editing-duration>
    <meta:editing-cycles>1</meta:editing-cycles>
    <meta:document-statistic meta:table-count="1" meta:cell-count="10005" meta:object-count="0"/>
    <meta:generator>LibreOffice/24.2.7.2$Linux_X86_64 LibreOffice_project/420$Build-2</meta:generator>
  </office:meta>
</office:document-meta>
</file>