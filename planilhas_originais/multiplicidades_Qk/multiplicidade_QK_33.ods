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3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33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381944444444444" calcext:value-type="float">
            <text:p>0,00000381944444444444</text:p>
          </table:table-cell>
          <table:table-cell table:formula="of:=[.D3]-[.D2]" office:value-type="float" office:value="0.00000381944444444444" calcext:value-type="float">
            <text:p>0,000003819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33" office:value-type="float" office:value="66" calcext:value-type="float">
            <text:p>6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763888888888889" calcext:value-type="float">
            <text:p>0,00000763888888888889</text:p>
          </table:table-cell>
          <table:table-cell table:formula="of:=[.D4]-[.D3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33" office:value-type="float" office:value="99" calcext:value-type="float">
            <text:p>99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14583333333333" calcext:value-type="float">
            <text:p>0,00001145833333333330</text:p>
          </table:table-cell>
          <table:table-cell table:formula="of:=[.D5]-[.D4]" office:value-type="float" office:value="0.00000381944444444444" calcext:value-type="float">
            <text:p>0,00000381944444444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33" office:value-type="float" office:value="132" calcext:value-type="float">
            <text:p>13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52777777777778" calcext:value-type="float">
            <text:p>0,00001527777777777780</text:p>
          </table:table-cell>
          <table:table-cell table:formula="of:=[.D6]-[.D5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33" office:value-type="float" office:value="165" calcext:value-type="float">
            <text:p>16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90972222222222" calcext:value-type="float">
            <text:p>0,00001909722222222220</text:p>
          </table:table-cell>
          <table:table-cell table:formula="of:=[.D7]-[.D6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33" office:value-type="float" office:value="198" calcext:value-type="float">
            <text:p>19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29166666666667" calcext:value-type="float">
            <text:p>0,00002291666666666670</text:p>
          </table:table-cell>
          <table:table-cell table:formula="of:=[.D8]-[.D7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33" office:value-type="float" office:value="231" calcext:value-type="float">
            <text:p>231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267361111111111" calcext:value-type="float">
            <text:p>0,00002673611111111110</text:p>
          </table:table-cell>
          <table:table-cell table:formula="of:=[.D9]-[.D8]" office:value-type="float" office:value="0.00000381944444444444" calcext:value-type="float">
            <text:p>0,000003819444444444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33" office:value-type="float" office:value="264" calcext:value-type="float">
            <text:p>26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305555555555556" calcext:value-type="float">
            <text:p>0,00003055555555555560</text:p>
          </table:table-cell>
          <table:table-cell table:formula="of:=[.D10]-[.D9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33" office:value-type="float" office:value="297" calcext:value-type="float">
            <text:p>297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34375" calcext:value-type="float">
            <text:p>0,00003437500000000000</text:p>
          </table:table-cell>
          <table:table-cell table:formula="of:=[.D11]-[.D10]" office:value-type="float" office:value="0.00000381944444444444" calcext:value-type="float">
            <text:p>0,00000381944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33" office:value-type="float" office:value="330" calcext:value-type="float">
            <text:p>33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381944444444444" calcext:value-type="float">
            <text:p>0,00003819444444444450</text:p>
          </table:table-cell>
          <table:table-cell table:formula="of:=[.D12]-[.D11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33" office:value-type="float" office:value="363" calcext:value-type="float">
            <text:p>363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420138888888889" calcext:value-type="float">
            <text:p>0,00004201388888888890</text:p>
          </table:table-cell>
          <table:table-cell table:formula="of:=[.D13]-[.D12]" office:value-type="float" office:value="0.00000381944444444444" calcext:value-type="float">
            <text:p>0,00000381944444444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33" office:value-type="float" office:value="396" calcext:value-type="float">
            <text:p>39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458333333333333" calcext:value-type="float">
            <text:p>0,00004583333333333330</text:p>
          </table:table-cell>
          <table:table-cell table:formula="of:=[.D14]-[.D13]" office:value-type="float" office:value="0.00000381944444444444" calcext:value-type="float">
            <text:p>0,000003819444444444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33" office:value-type="float" office:value="429" calcext:value-type="float">
            <text:p>429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496527777777778" calcext:value-type="float">
            <text:p>0,00004965277777777780</text:p>
          </table:table-cell>
          <table:table-cell table:formula="of:=[.D15]-[.D14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33" office:value-type="float" office:value="462" calcext:value-type="float">
            <text:p>46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534722222222222" calcext:value-type="float">
            <text:p>0,00005347222222222220</text:p>
          </table:table-cell>
          <table:table-cell table:formula="of:=[.D16]-[.D15]" office:value-type="float" office:value="0.00000381944444444444" calcext:value-type="float">
            <text:p>0,000003819444444444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33" office:value-type="float" office:value="495" calcext:value-type="float">
            <text:p>49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572916666666667" calcext:value-type="float">
            <text:p>0,00005729166666666670</text:p>
          </table:table-cell>
          <table:table-cell table:formula="of:=[.D17]-[.D16]" office:value-type="float" office:value="0.00000381944444444444" calcext:value-type="float">
            <text:p>0,00000381944444444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33" office:value-type="float" office:value="528" calcext:value-type="float">
            <text:p>52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611111111111111" calcext:value-type="float">
            <text:p>0,00006111111111111110</text:p>
          </table:table-cell>
          <table:table-cell table:formula="of:=[.D18]-[.D17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33" office:value-type="float" office:value="561" calcext:value-type="float">
            <text:p>561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649305555555556" calcext:value-type="float">
            <text:p>0,00006493055555555560</text:p>
          </table:table-cell>
          <table:table-cell table:formula="of:=[.D19]-[.D18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33" office:value-type="float" office:value="594" calcext:value-type="float">
            <text:p>59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6875" calcext:value-type="float">
            <text:p>0,00006875000000000000</text:p>
          </table:table-cell>
          <table:table-cell table:formula="of:=[.D20]-[.D19]" office:value-type="float" office:value="0.00000381944444444444" calcext:value-type="float">
            <text:p>0,000003819444444444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33" office:value-type="float" office:value="627" calcext:value-type="float">
            <text:p>627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725694444444444" calcext:value-type="float">
            <text:p>0,00007256944444444440</text:p>
          </table:table-cell>
          <table:table-cell table:formula="of:=[.D21]-[.D20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33" office:value-type="float" office:value="660" calcext:value-type="float">
            <text:p>6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763888888888889" calcext:value-type="float">
            <text:p>0,00007638888888888890</text:p>
          </table:table-cell>
          <table:table-cell table:formula="of:=[.D22]-[.D21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33" office:value-type="float" office:value="693" calcext:value-type="float">
            <text:p>693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802083333333333" calcext:value-type="float">
            <text:p>0,00008020833333333330</text:p>
          </table:table-cell>
          <table:table-cell table:formula="of:=[.D23]-[.D22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33" office:value-type="float" office:value="726" calcext:value-type="float">
            <text:p>72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840277777777778" calcext:value-type="float">
            <text:p>0,00008402777777777780</text:p>
          </table:table-cell>
          <table:table-cell table:formula="of:=[.D24]-[.D23]" office:value-type="float" office:value="0.00000381944444444444" calcext:value-type="float">
            <text:p>0,000003819444444444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33" office:value-type="float" office:value="759" calcext:value-type="float">
            <text:p>759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878472222222222" calcext:value-type="float">
            <text:p>0,00008784722222222220</text:p>
          </table:table-cell>
          <table:table-cell table:formula="of:=[.D25]-[.D24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33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916666666666667" calcext:value-type="float">
            <text:p>0,00009166666666666670</text:p>
          </table:table-cell>
          <table:table-cell table:formula="of:=[.D26]-[.D25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33" office:value-type="float" office:value="825" calcext:value-type="float">
            <text:p>8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954861111111111" calcext:value-type="float">
            <text:p>0,00009548611111111110</text:p>
          </table:table-cell>
          <table:table-cell table:formula="of:=[.D27]-[.D26]" office:value-type="float" office:value="0.00000381944444444444" calcext:value-type="float">
            <text:p>0,00000381944444444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33" office:value-type="float" office:value="858" calcext:value-type="float">
            <text:p>85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993055555555556" calcext:value-type="float">
            <text:p>0,00009930555555555560</text:p>
          </table:table-cell>
          <table:table-cell table:formula="of:=[.D28]-[.D27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33" office:value-type="float" office:value="891" calcext:value-type="float">
            <text:p>891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03125" calcext:value-type="float">
            <text:p>0,00010312500000000000</text:p>
          </table:table-cell>
          <table:table-cell table:formula="of:=[.D29]-[.D28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33" office:value-type="float" office:value="924" calcext:value-type="float">
            <text:p>92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06944444444444" calcext:value-type="float">
            <text:p>0,00010694444444444400</text:p>
          </table:table-cell>
          <table:table-cell table:formula="of:=[.D30]-[.D29]" office:value-type="float" office:value="0.00000381944444444444" calcext:value-type="float">
            <text:p>0,000003819444444444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33" office:value-type="float" office:value="957" calcext:value-type="float">
            <text:p>957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10763888888889" calcext:value-type="float">
            <text:p>0,00011076388888888900</text:p>
          </table:table-cell>
          <table:table-cell table:formula="of:=[.D31]-[.D30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33" office:value-type="float" office:value="990" calcext:value-type="float">
            <text:p>99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14583333333333" calcext:value-type="float">
            <text:p>0,00011458333333333300</text:p>
          </table:table-cell>
          <table:table-cell table:formula="of:=[.D32]-[.D31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33" office:value-type="float" office:value="1023" calcext:value-type="float">
            <text:p>1023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18402777777778" calcext:value-type="float">
            <text:p>0,00011840277777777800</text:p>
          </table:table-cell>
          <table:table-cell table:formula="of:=[.D33]-[.D32]" office:value-type="float" office:value="0.00000381944444444444" calcext:value-type="float">
            <text:p>0,00000381944444444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33" office:value-type="float" office:value="1056" calcext:value-type="float">
            <text:p>105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22222222222222" calcext:value-type="float">
            <text:p>0,00012222222222222200</text:p>
          </table:table-cell>
          <table:table-cell table:formula="of:=[.D34]-[.D33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33" office:value-type="float" office:value="1089" calcext:value-type="float">
            <text:p>1089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26041666666667" calcext:value-type="float">
            <text:p>0,00012604166666666700</text:p>
          </table:table-cell>
          <table:table-cell table:formula="of:=[.D35]-[.D34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33" office:value-type="float" office:value="1122" calcext:value-type="float">
            <text:p>112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29861111111111" calcext:value-type="float">
            <text:p>0,00012986111111111100</text:p>
          </table:table-cell>
          <table:table-cell table:formula="of:=[.D36]-[.D35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33" office:value-type="float" office:value="1155" calcext:value-type="float">
            <text:p>115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33680555555556" calcext:value-type="float">
            <text:p>0,00013368055555555600</text:p>
          </table:table-cell>
          <table:table-cell table:formula="of:=[.D37]-[.D36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33" office:value-type="float" office:value="1188" calcext:value-type="float">
            <text:p>118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375" calcext:value-type="float">
            <text:p>0,00013750000000000000</text:p>
          </table:table-cell>
          <table:table-cell table:formula="of:=[.D38]-[.D37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33" office:value-type="float" office:value="1221" calcext:value-type="float">
            <text:p>1221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41319444444444" calcext:value-type="float">
            <text:p>0,00014131944444444400</text:p>
          </table:table-cell>
          <table:table-cell table:formula="of:=[.D39]-[.D3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33" office:value-type="float" office:value="1254" calcext:value-type="float">
            <text:p>125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45138888888889" calcext:value-type="float">
            <text:p>0,00014513888888888900</text:p>
          </table:table-cell>
          <table:table-cell table:formula="of:=[.D40]-[.D39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33" office:value-type="float" office:value="1287" calcext:value-type="float">
            <text:p>1287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48958333333333" calcext:value-type="float">
            <text:p>0,00014895833333333300</text:p>
          </table:table-cell>
          <table:table-cell table:formula="of:=[.D41]-[.D40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33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52777777777778" calcext:value-type="float">
            <text:p>0,00015277777777777800</text:p>
          </table:table-cell>
          <table:table-cell table:formula="of:=[.D42]-[.D41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33" office:value-type="float" office:value="1353" calcext:value-type="float">
            <text:p>1353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56597222222222" calcext:value-type="float">
            <text:p>0,00015659722222222200</text:p>
          </table:table-cell>
          <table:table-cell table:formula="of:=[.D43]-[.D42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33" office:value-type="float" office:value="1386" calcext:value-type="float">
            <text:p>138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60416666666667" calcext:value-type="float">
            <text:p>0,00016041666666666700</text:p>
          </table:table-cell>
          <table:table-cell table:formula="of:=[.D44]-[.D43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33" office:value-type="float" office:value="1419" calcext:value-type="float">
            <text:p>1419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64236111111111" calcext:value-type="float">
            <text:p>0,00016423611111111100</text:p>
          </table:table-cell>
          <table:table-cell table:formula="of:=[.D45]-[.D44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33" office:value-type="float" office:value="1452" calcext:value-type="float">
            <text:p>145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68055555555556" calcext:value-type="float">
            <text:p>0,00016805555555555600</text:p>
          </table:table-cell>
          <table:table-cell table:formula="of:=[.D46]-[.D4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33" office:value-type="float" office:value="1485" calcext:value-type="float">
            <text:p>148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71875" calcext:value-type="float">
            <text:p>0,00017187500000000000</text:p>
          </table:table-cell>
          <table:table-cell table:formula="of:=[.D47]-[.D46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33" office:value-type="float" office:value="1518" calcext:value-type="float">
            <text:p>151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75694444444444" calcext:value-type="float">
            <text:p>0,00017569444444444400</text:p>
          </table:table-cell>
          <table:table-cell table:formula="of:=[.D48]-[.D47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33" office:value-type="float" office:value="1551" calcext:value-type="float">
            <text:p>1551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79513888888889" calcext:value-type="float">
            <text:p>0,00017951388888888900</text:p>
          </table:table-cell>
          <table:table-cell table:formula="of:=[.D49]-[.D48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33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83333333333333" calcext:value-type="float">
            <text:p>0,00018333333333333300</text:p>
          </table:table-cell>
          <table:table-cell table:formula="of:=[.D50]-[.D49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33" office:value-type="float" office:value="1617" calcext:value-type="float">
            <text:p>1617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87152777777778" calcext:value-type="float">
            <text:p>0,00018715277777777800</text:p>
          </table:table-cell>
          <table:table-cell table:formula="of:=[.D51]-[.D50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33" office:value-type="float" office:value="1650" calcext:value-type="float">
            <text:p>16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90972222222222" calcext:value-type="float">
            <text:p>0,00019097222222222200</text:p>
          </table:table-cell>
          <table:table-cell table:formula="of:=[.D52]-[.D5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33" office:value-type="float" office:value="1683" calcext:value-type="float">
            <text:p>1683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94791666666667" calcext:value-type="float">
            <text:p>0,00019479166666666700</text:p>
          </table:table-cell>
          <table:table-cell table:formula="of:=[.D53]-[.D52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33" office:value-type="float" office:value="1716" calcext:value-type="float">
            <text:p>171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98611111111111" calcext:value-type="float">
            <text:p>0,00019861111111111100</text:p>
          </table:table-cell>
          <table:table-cell table:formula="of:=[.D54]-[.D53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33" office:value-type="float" office:value="1749" calcext:value-type="float">
            <text:p>1749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02430555555556" calcext:value-type="float">
            <text:p>0,00020243055555555600</text:p>
          </table:table-cell>
          <table:table-cell table:formula="of:=[.D55]-[.D54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33" office:value-type="float" office:value="1782" calcext:value-type="float">
            <text:p>178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0625" calcext:value-type="float">
            <text:p>0,00020625000000000000</text:p>
          </table:table-cell>
          <table:table-cell table:formula="of:=[.D56]-[.D55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33" office:value-type="float" office:value="1815" calcext:value-type="float">
            <text:p>181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10069444444444" calcext:value-type="float">
            <text:p>0,00021006944444444400</text:p>
          </table:table-cell>
          <table:table-cell table:formula="of:=[.D57]-[.D56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33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13888888888889" calcext:value-type="float">
            <text:p>0,00021388888888888900</text:p>
          </table:table-cell>
          <table:table-cell table:formula="of:=[.D58]-[.D57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33" office:value-type="float" office:value="1881" calcext:value-type="float">
            <text:p>1881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17708333333333" calcext:value-type="float">
            <text:p>0,00021770833333333300</text:p>
          </table:table-cell>
          <table:table-cell table:formula="of:=[.D59]-[.D5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33" office:value-type="float" office:value="1914" calcext:value-type="float">
            <text:p>191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21527777777778" calcext:value-type="float">
            <text:p>0,00022152777777777800</text:p>
          </table:table-cell>
          <table:table-cell table:formula="of:=[.D60]-[.D59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33" office:value-type="float" office:value="1947" calcext:value-type="float">
            <text:p>1947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25347222222222" calcext:value-type="float">
            <text:p>0,00022534722222222200</text:p>
          </table:table-cell>
          <table:table-cell table:formula="of:=[.D61]-[.D60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33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29166666666667" calcext:value-type="float">
            <text:p>0,00022916666666666700</text:p>
          </table:table-cell>
          <table:table-cell table:formula="of:=[.D62]-[.D61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33" office:value-type="float" office:value="2013" calcext:value-type="float">
            <text:p>2013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32986111111111" calcext:value-type="float">
            <text:p>0,00023298611111111100</text:p>
          </table:table-cell>
          <table:table-cell table:formula="of:=[.D63]-[.D62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33" office:value-type="float" office:value="2046" calcext:value-type="float">
            <text:p>204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36805555555556" calcext:value-type="float">
            <text:p>0,00023680555555555600</text:p>
          </table:table-cell>
          <table:table-cell table:formula="of:=[.D64]-[.D63]" office:value-type="float" office:value="0.00000381944444444445" calcext:value-type="float">
            <text:p>0,000003819444444444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33" office:value-type="float" office:value="2079" calcext:value-type="float">
            <text:p>2079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40625" calcext:value-type="float">
            <text:p>0,00024062500000000000</text:p>
          </table:table-cell>
          <table:table-cell table:formula="of:=[.D65]-[.D64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33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44444444444444" calcext:value-type="float">
            <text:p>0,00024444444444444400</text:p>
          </table:table-cell>
          <table:table-cell table:formula="of:=[.D66]-[.D65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33" office:value-type="float" office:value="2145" calcext:value-type="float">
            <text:p>214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248263888888889" calcext:value-type="float">
            <text:p>0,00024826388888888900</text:p>
          </table:table-cell>
          <table:table-cell table:formula="of:=[.D67]-[.D6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33" office:value-type="float" office:value="2178" calcext:value-type="float">
            <text:p>217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252083333333333" calcext:value-type="float">
            <text:p>0,00025208333333333300</text:p>
          </table:table-cell>
          <table:table-cell table:formula="of:=[.D68]-[.D67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33" office:value-type="float" office:value="2211" calcext:value-type="float">
            <text:p>2211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255902777777778" calcext:value-type="float">
            <text:p>0,00025590277777777800</text:p>
          </table:table-cell>
          <table:table-cell table:formula="of:=[.D69]-[.D6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33" office:value-type="float" office:value="2244" calcext:value-type="float">
            <text:p>224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259722222222222" calcext:value-type="float">
            <text:p>0,00025972222222222200</text:p>
          </table:table-cell>
          <table:table-cell table:formula="of:=[.D70]-[.D6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33" office:value-type="float" office:value="2277" calcext:value-type="float">
            <text:p>2277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263541666666667" calcext:value-type="float">
            <text:p>0,00026354166666666700</text:p>
          </table:table-cell>
          <table:table-cell table:formula="of:=[.D71]-[.D70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33" office:value-type="float" office:value="2310" calcext:value-type="float">
            <text:p>231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267361111111111" calcext:value-type="float">
            <text:p>0,00026736111111111100</text:p>
          </table:table-cell>
          <table:table-cell table:formula="of:=[.D72]-[.D7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33" office:value-type="float" office:value="2343" calcext:value-type="float">
            <text:p>2343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271180555555556" calcext:value-type="float">
            <text:p>0,00027118055555555600</text:p>
          </table:table-cell>
          <table:table-cell table:formula="of:=[.D73]-[.D72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33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275" calcext:value-type="float">
            <text:p>0,00027500000000000000</text:p>
          </table:table-cell>
          <table:table-cell table:formula="of:=[.D74]-[.D7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33" office:value-type="float" office:value="2409" calcext:value-type="float">
            <text:p>2409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278819444444444" calcext:value-type="float">
            <text:p>0,00027881944444444400</text:p>
          </table:table-cell>
          <table:table-cell table:formula="of:=[.D75]-[.D74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33" office:value-type="float" office:value="2442" calcext:value-type="float">
            <text:p>244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282638888888889" calcext:value-type="float">
            <text:p>0,00028263888888888900</text:p>
          </table:table-cell>
          <table:table-cell table:formula="of:=[.D76]-[.D7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33" office:value-type="float" office:value="2475" calcext:value-type="float">
            <text:p>24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286458333333333" calcext:value-type="float">
            <text:p>0,00028645833333333300</text:p>
          </table:table-cell>
          <table:table-cell table:formula="of:=[.D77]-[.D7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33" office:value-type="float" office:value="2508" calcext:value-type="float">
            <text:p>250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290277777777778" calcext:value-type="float">
            <text:p>0,00029027777777777800</text:p>
          </table:table-cell>
          <table:table-cell table:formula="of:=[.D78]-[.D77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33" office:value-type="float" office:value="2541" calcext:value-type="float">
            <text:p>2541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294097222222222" calcext:value-type="float">
            <text:p>0,00029409722222222200</text:p>
          </table:table-cell>
          <table:table-cell table:formula="of:=[.D79]-[.D7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33" office:value-type="float" office:value="2574" calcext:value-type="float">
            <text:p>257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297916666666667" calcext:value-type="float">
            <text:p>0,00029791666666666700</text:p>
          </table:table-cell>
          <table:table-cell table:formula="of:=[.D80]-[.D79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33" office:value-type="float" office:value="2607" calcext:value-type="float">
            <text:p>2607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301736111111111" calcext:value-type="float">
            <text:p>0,00030173611111111100</text:p>
          </table:table-cell>
          <table:table-cell table:formula="of:=[.D81]-[.D8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33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305555555555556" calcext:value-type="float">
            <text:p>0,00030555555555555600</text:p>
          </table:table-cell>
          <table:table-cell table:formula="of:=[.D82]-[.D81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33" office:value-type="float" office:value="2673" calcext:value-type="float">
            <text:p>2673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309375" calcext:value-type="float">
            <text:p>0,00030937500000000000</text:p>
          </table:table-cell>
          <table:table-cell table:formula="of:=[.D83]-[.D8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33" office:value-type="float" office:value="2706" calcext:value-type="float">
            <text:p>270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313194444444444" calcext:value-type="float">
            <text:p>0,00031319444444444400</text:p>
          </table:table-cell>
          <table:table-cell table:formula="of:=[.D84]-[.D8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33" office:value-type="float" office:value="2739" calcext:value-type="float">
            <text:p>2739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317013888888889" calcext:value-type="float">
            <text:p>0,00031701388888888900</text:p>
          </table:table-cell>
          <table:table-cell table:formula="of:=[.D85]-[.D84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33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320833333333333" calcext:value-type="float">
            <text:p>0,00032083333333333300</text:p>
          </table:table-cell>
          <table:table-cell table:formula="of:=[.D86]-[.D8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33" office:value-type="float" office:value="2805" calcext:value-type="float">
            <text:p>280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324652777777778" calcext:value-type="float">
            <text:p>0,00032465277777777800</text:p>
          </table:table-cell>
          <table:table-cell table:formula="of:=[.D87]-[.D86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33" office:value-type="float" office:value="2838" calcext:value-type="float">
            <text:p>283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328472222222222" calcext:value-type="float">
            <text:p>0,00032847222222222200</text:p>
          </table:table-cell>
          <table:table-cell table:formula="of:=[.D88]-[.D87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33" office:value-type="float" office:value="2871" calcext:value-type="float">
            <text:p>2871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332291666666667" calcext:value-type="float">
            <text:p>0,00033229166666666700</text:p>
          </table:table-cell>
          <table:table-cell table:formula="of:=[.D89]-[.D88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33" office:value-type="float" office:value="2904" calcext:value-type="float">
            <text:p>290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336111111111111" calcext:value-type="float">
            <text:p>0,00033611111111111100</text:p>
          </table:table-cell>
          <table:table-cell table:formula="of:=[.D90]-[.D8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33" office:value-type="float" office:value="2937" calcext:value-type="float">
            <text:p>2937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339930555555556" calcext:value-type="float">
            <text:p>0,00033993055555555600</text:p>
          </table:table-cell>
          <table:table-cell table:formula="of:=[.D91]-[.D9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33" office:value-type="float" office:value="2970" calcext:value-type="float">
            <text:p>297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34375" calcext:value-type="float">
            <text:p>0,00034375000000000000</text:p>
          </table:table-cell>
          <table:table-cell table:formula="of:=[.D92]-[.D91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33" office:value-type="float" office:value="3003" calcext:value-type="float">
            <text:p>3003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347569444444444" calcext:value-type="float">
            <text:p>0,00034756944444444400</text:p>
          </table:table-cell>
          <table:table-cell table:formula="of:=[.D93]-[.D9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33" office:value-type="float" office:value="3036" calcext:value-type="float">
            <text:p>303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351388888888889" calcext:value-type="float">
            <text:p>0,00035138888888888900</text:p>
          </table:table-cell>
          <table:table-cell table:formula="of:=[.D94]-[.D93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33" office:value-type="float" office:value="3069" calcext:value-type="float">
            <text:p>3069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355208333333333" calcext:value-type="float">
            <text:p>0,00035520833333333300</text:p>
          </table:table-cell>
          <table:table-cell table:formula="of:=[.D95]-[.D94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33" office:value-type="float" office:value="3102" calcext:value-type="float">
            <text:p>310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359027777777778" calcext:value-type="float">
            <text:p>0,00035902777777777800</text:p>
          </table:table-cell>
          <table:table-cell table:formula="of:=[.D96]-[.D9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33" office:value-type="float" office:value="3135" calcext:value-type="float">
            <text:p>313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362847222222222" calcext:value-type="float">
            <text:p>0,00036284722222222200</text:p>
          </table:table-cell>
          <table:table-cell table:formula="of:=[.D97]-[.D96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33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366666666666667" calcext:value-type="float">
            <text:p>0,00036666666666666700</text:p>
          </table:table-cell>
          <table:table-cell table:formula="of:=[.D98]-[.D97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33" office:value-type="float" office:value="3201" calcext:value-type="float">
            <text:p>3201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370486111111111" calcext:value-type="float">
            <text:p>0,00037048611111111100</text:p>
          </table:table-cell>
          <table:table-cell table:formula="of:=[.D99]-[.D98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33" office:value-type="float" office:value="3234" calcext:value-type="float">
            <text:p>323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374305555555556" calcext:value-type="float">
            <text:p>0,00037430555555555600</text:p>
          </table:table-cell>
          <table:table-cell table:formula="of:=[.D100]-[.D9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33" office:value-type="float" office:value="3267" calcext:value-type="float">
            <text:p>3267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378125" calcext:value-type="float">
            <text:p>0,00037812500000000000</text:p>
          </table:table-cell>
          <table:table-cell table:formula="of:=[.D101]-[.D100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33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381944444444444" calcext:value-type="float">
            <text:p>0,00038194444444444400</text:p>
          </table:table-cell>
          <table:table-cell table:formula="of:=[.D102]-[.D10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33" office:value-type="float" office:value="3333" calcext:value-type="float">
            <text:p>3333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385763888888889" calcext:value-type="float">
            <text:p>0,00038576388888888900</text:p>
          </table:table-cell>
          <table:table-cell table:formula="of:=[.D103]-[.D10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33" office:value-type="float" office:value="3366" calcext:value-type="float">
            <text:p>336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389583333333333" calcext:value-type="float">
            <text:p>0,00038958333333333300</text:p>
          </table:table-cell>
          <table:table-cell table:formula="of:=[.D104]-[.D103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33" office:value-type="float" office:value="3399" calcext:value-type="float">
            <text:p>3399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393402777777778" calcext:value-type="float">
            <text:p>0,00039340277777777800</text:p>
          </table:table-cell>
          <table:table-cell table:formula="of:=[.D105]-[.D104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33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397222222222222" calcext:value-type="float">
            <text:p>0,00039722222222222200</text:p>
          </table:table-cell>
          <table:table-cell table:formula="of:=[.D106]-[.D105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33" office:value-type="float" office:value="3465" calcext:value-type="float">
            <text:p>346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401041666666667" calcext:value-type="float">
            <text:p>0,00040104166666666700</text:p>
          </table:table-cell>
          <table:table-cell table:formula="of:=[.D107]-[.D10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33" office:value-type="float" office:value="3498" calcext:value-type="float">
            <text:p>349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404861111111111" calcext:value-type="float">
            <text:p>0,00040486111111111100</text:p>
          </table:table-cell>
          <table:table-cell table:formula="of:=[.D108]-[.D107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33" office:value-type="float" office:value="3531" calcext:value-type="float">
            <text:p>3531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408680555555556" calcext:value-type="float">
            <text:p>0,00040868055555555600</text:p>
          </table:table-cell>
          <table:table-cell table:formula="of:=[.D109]-[.D10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33" office:value-type="float" office:value="3564" calcext:value-type="float">
            <text:p>356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4125" calcext:value-type="float">
            <text:p>0,00041250000000000000</text:p>
          </table:table-cell>
          <table:table-cell table:formula="of:=[.D110]-[.D10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33" office:value-type="float" office:value="3597" calcext:value-type="float">
            <text:p>3597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416319444444444" calcext:value-type="float">
            <text:p>0,00041631944444444400</text:p>
          </table:table-cell>
          <table:table-cell table:formula="of:=[.D111]-[.D110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33" office:value-type="float" office:value="3630" calcext:value-type="float">
            <text:p>363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420138888888889" calcext:value-type="float">
            <text:p>0,00042013888888888900</text:p>
          </table:table-cell>
          <table:table-cell table:formula="of:=[.D112]-[.D11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33" office:value-type="float" office:value="3663" calcext:value-type="float">
            <text:p>3663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423958333333333" calcext:value-type="float">
            <text:p>0,00042395833333333300</text:p>
          </table:table-cell>
          <table:table-cell table:formula="of:=[.D113]-[.D112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33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427777777777778" calcext:value-type="float">
            <text:p>0,00042777777777777800</text:p>
          </table:table-cell>
          <table:table-cell table:formula="of:=[.D114]-[.D11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33" office:value-type="float" office:value="3729" calcext:value-type="float">
            <text:p>3729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431597222222222" calcext:value-type="float">
            <text:p>0,00043159722222222200</text:p>
          </table:table-cell>
          <table:table-cell table:formula="of:=[.D115]-[.D114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33" office:value-type="float" office:value="3762" calcext:value-type="float">
            <text:p>376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435416666666667" calcext:value-type="float">
            <text:p>0,00043541666666666700</text:p>
          </table:table-cell>
          <table:table-cell table:formula="of:=[.D116]-[.D11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33" office:value-type="float" office:value="3795" calcext:value-type="float">
            <text:p>379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439236111111111" calcext:value-type="float">
            <text:p>0,00043923611111111100</text:p>
          </table:table-cell>
          <table:table-cell table:formula="of:=[.D117]-[.D11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33" office:value-type="float" office:value="3828" calcext:value-type="float">
            <text:p>382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443055555555556" calcext:value-type="float">
            <text:p>0,00044305555555555600</text:p>
          </table:table-cell>
          <table:table-cell table:formula="of:=[.D118]-[.D117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33" office:value-type="float" office:value="3861" calcext:value-type="float">
            <text:p>3861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446875" calcext:value-type="float">
            <text:p>0,00044687500000000000</text:p>
          </table:table-cell>
          <table:table-cell table:formula="of:=[.D119]-[.D11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33" office:value-type="float" office:value="3894" calcext:value-type="float">
            <text:p>389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450694444444444" calcext:value-type="float">
            <text:p>0,00045069444444444400</text:p>
          </table:table-cell>
          <table:table-cell table:formula="of:=[.D120]-[.D119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33" office:value-type="float" office:value="3927" calcext:value-type="float">
            <text:p>3927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454513888888889" calcext:value-type="float">
            <text:p>0,00045451388888888900</text:p>
          </table:table-cell>
          <table:table-cell table:formula="of:=[.D121]-[.D12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33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458333333333333" calcext:value-type="float">
            <text:p>0,00045833333333333300</text:p>
          </table:table-cell>
          <table:table-cell table:formula="of:=[.D122]-[.D121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33" office:value-type="float" office:value="3993" calcext:value-type="float">
            <text:p>3993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462152777777778" calcext:value-type="float">
            <text:p>0,00046215277777777800</text:p>
          </table:table-cell>
          <table:table-cell table:formula="of:=[.D123]-[.D12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33" office:value-type="float" office:value="4026" calcext:value-type="float">
            <text:p>402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465972222222222" calcext:value-type="float">
            <text:p>0,00046597222222222200</text:p>
          </table:table-cell>
          <table:table-cell table:formula="of:=[.D124]-[.D12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33" office:value-type="float" office:value="4059" calcext:value-type="float">
            <text:p>4059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469791666666667" calcext:value-type="float">
            <text:p>0,00046979166666666700</text:p>
          </table:table-cell>
          <table:table-cell table:formula="of:=[.D125]-[.D124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33" office:value-type="float" office:value="4092" calcext:value-type="float">
            <text:p>409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473611111111111" calcext:value-type="float">
            <text:p>0,00047361111111111100</text:p>
          </table:table-cell>
          <table:table-cell table:formula="of:=[.D126]-[.D12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33" office:value-type="float" office:value="4125" calcext:value-type="float">
            <text:p>41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477430555555556" calcext:value-type="float">
            <text:p>0,00047743055555555600</text:p>
          </table:table-cell>
          <table:table-cell table:formula="of:=[.D127]-[.D126]" office:value-type="float" office:value="0.00000381944444444448" calcext:value-type="float">
            <text:p>0,000003819444444444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33" office:value-type="float" office:value="4158" calcext:value-type="float">
            <text:p>415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48125" calcext:value-type="float">
            <text:p>0,00048125000000000000</text:p>
          </table:table-cell>
          <table:table-cell table:formula="of:=[.D128]-[.D127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33" office:value-type="float" office:value="4191" calcext:value-type="float">
            <text:p>4191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485069444444444" calcext:value-type="float">
            <text:p>0,00048506944444444400</text:p>
          </table:table-cell>
          <table:table-cell table:formula="of:=[.D129]-[.D12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33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488888888888889" calcext:value-type="float">
            <text:p>0,00048888888888888900</text:p>
          </table:table-cell>
          <table:table-cell table:formula="of:=[.D130]-[.D12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33" office:value-type="float" office:value="4257" calcext:value-type="float">
            <text:p>4257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492708333333333" calcext:value-type="float">
            <text:p>0,00049270833333333300</text:p>
          </table:table-cell>
          <table:table-cell table:formula="of:=[.D131]-[.D13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33" office:value-type="float" office:value="4290" calcext:value-type="float">
            <text:p>429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496527777777778" calcext:value-type="float">
            <text:p>0,00049652777777777800</text:p>
          </table:table-cell>
          <table:table-cell table:formula="of:=[.D132]-[.D13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33" office:value-type="float" office:value="4323" calcext:value-type="float">
            <text:p>4323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500347222222222" calcext:value-type="float">
            <text:p>0,00050034722222222200</text:p>
          </table:table-cell>
          <table:table-cell table:formula="of:=[.D133]-[.D13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33" office:value-type="float" office:value="4356" calcext:value-type="float">
            <text:p>435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504166666666667" calcext:value-type="float">
            <text:p>0,00050416666666666700</text:p>
          </table:table-cell>
          <table:table-cell table:formula="of:=[.D134]-[.D13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33" office:value-type="float" office:value="4389" calcext:value-type="float">
            <text:p>4389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507986111111111" calcext:value-type="float">
            <text:p>0,00050798611111111100</text:p>
          </table:table-cell>
          <table:table-cell table:formula="of:=[.D135]-[.D13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33" office:value-type="float" office:value="4422" calcext:value-type="float">
            <text:p>442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511805555555556" calcext:value-type="float">
            <text:p>0,00051180555555555600</text:p>
          </table:table-cell>
          <table:table-cell table:formula="of:=[.D136]-[.D13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33" office:value-type="float" office:value="4455" calcext:value-type="float">
            <text:p>445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515625" calcext:value-type="float">
            <text:p>0,00051562500000000000</text:p>
          </table:table-cell>
          <table:table-cell table:formula="of:=[.D137]-[.D13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33" office:value-type="float" office:value="4488" calcext:value-type="float">
            <text:p>448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519444444444444" calcext:value-type="float">
            <text:p>0,00051944444444444400</text:p>
          </table:table-cell>
          <table:table-cell table:formula="of:=[.D138]-[.D137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33" office:value-type="float" office:value="4521" calcext:value-type="float">
            <text:p>4521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523263888888889" calcext:value-type="float">
            <text:p>0,00052326388888888900</text:p>
          </table:table-cell>
          <table:table-cell table:formula="of:=[.D139]-[.D13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33" office:value-type="float" office:value="4554" calcext:value-type="float">
            <text:p>455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527083333333333" calcext:value-type="float">
            <text:p>0,00052708333333333300</text:p>
          </table:table-cell>
          <table:table-cell table:formula="of:=[.D140]-[.D13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33" office:value-type="float" office:value="4587" calcext:value-type="float">
            <text:p>4587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530902777777778" calcext:value-type="float">
            <text:p>0,00053090277777777800</text:p>
          </table:table-cell>
          <table:table-cell table:formula="of:=[.D141]-[.D14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33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534722222222222" calcext:value-type="float">
            <text:p>0,00053472222222222200</text:p>
          </table:table-cell>
          <table:table-cell table:formula="of:=[.D142]-[.D14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33" office:value-type="float" office:value="4653" calcext:value-type="float">
            <text:p>4653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538541666666667" calcext:value-type="float">
            <text:p>0,00053854166666666700</text:p>
          </table:table-cell>
          <table:table-cell table:formula="of:=[.D143]-[.D14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33" office:value-type="float" office:value="4686" calcext:value-type="float">
            <text:p>468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542361111111111" calcext:value-type="float">
            <text:p>0,00054236111111111100</text:p>
          </table:table-cell>
          <table:table-cell table:formula="of:=[.D144]-[.D14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33" office:value-type="float" office:value="4719" calcext:value-type="float">
            <text:p>4719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546180555555556" calcext:value-type="float">
            <text:p>0,00054618055555555600</text:p>
          </table:table-cell>
          <table:table-cell table:formula="of:=[.D145]-[.D14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33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55" calcext:value-type="float">
            <text:p>0,00055000000000000000</text:p>
          </table:table-cell>
          <table:table-cell table:formula="of:=[.D146]-[.D14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33" office:value-type="float" office:value="4785" calcext:value-type="float">
            <text:p>478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553819444444445" calcext:value-type="float">
            <text:p>0,00055381944444444500</text:p>
          </table:table-cell>
          <table:table-cell table:formula="of:=[.D147]-[.D14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33" office:value-type="float" office:value="4818" calcext:value-type="float">
            <text:p>481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557638888888889" calcext:value-type="float">
            <text:p>0,00055763888888888900</text:p>
          </table:table-cell>
          <table:table-cell table:formula="of:=[.D148]-[.D147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33" office:value-type="float" office:value="4851" calcext:value-type="float">
            <text:p>4851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561458333333333" calcext:value-type="float">
            <text:p>0,00056145833333333300</text:p>
          </table:table-cell>
          <table:table-cell table:formula="of:=[.D149]-[.D14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33" office:value-type="float" office:value="4884" calcext:value-type="float">
            <text:p>488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565277777777778" calcext:value-type="float">
            <text:p>0,00056527777777777800</text:p>
          </table:table-cell>
          <table:table-cell table:formula="of:=[.D150]-[.D14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33" office:value-type="float" office:value="4917" calcext:value-type="float">
            <text:p>4917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569097222222222" calcext:value-type="float">
            <text:p>0,00056909722222222200</text:p>
          </table:table-cell>
          <table:table-cell table:formula="of:=[.D151]-[.D15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33" office:value-type="float" office:value="4950" calcext:value-type="float">
            <text:p>49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572916666666667" calcext:value-type="float">
            <text:p>0,00057291666666666700</text:p>
          </table:table-cell>
          <table:table-cell table:formula="of:=[.D152]-[.D15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33" office:value-type="float" office:value="4983" calcext:value-type="float">
            <text:p>4983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576736111111111" calcext:value-type="float">
            <text:p>0,00057673611111111100</text:p>
          </table:table-cell>
          <table:table-cell table:formula="of:=[.D153]-[.D15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33" office:value-type="float" office:value="5016" calcext:value-type="float">
            <text:p>501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580555555555556" calcext:value-type="float">
            <text:p>0,00058055555555555600</text:p>
          </table:table-cell>
          <table:table-cell table:formula="of:=[.D154]-[.D15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33" office:value-type="float" office:value="5049" calcext:value-type="float">
            <text:p>5049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584375" calcext:value-type="float">
            <text:p>0,00058437500000000000</text:p>
          </table:table-cell>
          <table:table-cell table:formula="of:=[.D155]-[.D154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33" office:value-type="float" office:value="5082" calcext:value-type="float">
            <text:p>508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588194444444445" calcext:value-type="float">
            <text:p>0,00058819444444444500</text:p>
          </table:table-cell>
          <table:table-cell table:formula="of:=[.D156]-[.D15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33" office:value-type="float" office:value="5115" calcext:value-type="float">
            <text:p>511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592013888888889" calcext:value-type="float">
            <text:p>0,00059201388888888900</text:p>
          </table:table-cell>
          <table:table-cell table:formula="of:=[.D157]-[.D15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33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595833333333333" calcext:value-type="float">
            <text:p>0,00059583333333333300</text:p>
          </table:table-cell>
          <table:table-cell table:formula="of:=[.D158]-[.D157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33" office:value-type="float" office:value="5181" calcext:value-type="float">
            <text:p>5181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599652777777778" calcext:value-type="float">
            <text:p>0,00059965277777777800</text:p>
          </table:table-cell>
          <table:table-cell table:formula="of:=[.D159]-[.D15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33" office:value-type="float" office:value="5214" calcext:value-type="float">
            <text:p>521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603472222222222" calcext:value-type="float">
            <text:p>0,00060347222222222200</text:p>
          </table:table-cell>
          <table:table-cell table:formula="of:=[.D160]-[.D15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33" office:value-type="float" office:value="5247" calcext:value-type="float">
            <text:p>5247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607291666666667" calcext:value-type="float">
            <text:p>0,00060729166666666700</text:p>
          </table:table-cell>
          <table:table-cell table:formula="of:=[.D161]-[.D16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33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611111111111111" calcext:value-type="float">
            <text:p>0,00061111111111111100</text:p>
          </table:table-cell>
          <table:table-cell table:formula="of:=[.D162]-[.D16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33" office:value-type="float" office:value="5313" calcext:value-type="float">
            <text:p>5313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614930555555556" calcext:value-type="float">
            <text:p>0,00061493055555555600</text:p>
          </table:table-cell>
          <table:table-cell table:formula="of:=[.D163]-[.D16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33" office:value-type="float" office:value="5346" calcext:value-type="float">
            <text:p>534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61875" calcext:value-type="float">
            <text:p>0,00061875000000000000</text:p>
          </table:table-cell>
          <table:table-cell table:formula="of:=[.D164]-[.D16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33" office:value-type="float" office:value="5379" calcext:value-type="float">
            <text:p>5379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622569444444445" calcext:value-type="float">
            <text:p>0,00062256944444444500</text:p>
          </table:table-cell>
          <table:table-cell table:formula="of:=[.D165]-[.D164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33" office:value-type="float" office:value="5412" calcext:value-type="float">
            <text:p>541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626388888888889" calcext:value-type="float">
            <text:p>0,00062638888888888900</text:p>
          </table:table-cell>
          <table:table-cell table:formula="of:=[.D166]-[.D16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33" office:value-type="float" office:value="5445" calcext:value-type="float">
            <text:p>544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630208333333333" calcext:value-type="float">
            <text:p>0,00063020833333333300</text:p>
          </table:table-cell>
          <table:table-cell table:formula="of:=[.D167]-[.D16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33" office:value-type="float" office:value="5478" calcext:value-type="float">
            <text:p>547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634027777777778" calcext:value-type="float">
            <text:p>0,00063402777777777800</text:p>
          </table:table-cell>
          <table:table-cell table:formula="of:=[.D168]-[.D16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33" office:value-type="float" office:value="5511" calcext:value-type="float">
            <text:p>5511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637847222222222" calcext:value-type="float">
            <text:p>0,00063784722222222200</text:p>
          </table:table-cell>
          <table:table-cell table:formula="of:=[.D169]-[.D16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33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641666666666667" calcext:value-type="float">
            <text:p>0,00064166666666666700</text:p>
          </table:table-cell>
          <table:table-cell table:formula="of:=[.D170]-[.D16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33" office:value-type="float" office:value="5577" calcext:value-type="float">
            <text:p>5577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645486111111111" calcext:value-type="float">
            <text:p>0,00064548611111111100</text:p>
          </table:table-cell>
          <table:table-cell table:formula="of:=[.D171]-[.D17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33" office:value-type="float" office:value="5610" calcext:value-type="float">
            <text:p>561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649305555555556" calcext:value-type="float">
            <text:p>0,00064930555555555600</text:p>
          </table:table-cell>
          <table:table-cell table:formula="of:=[.D172]-[.D17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33" office:value-type="float" office:value="5643" calcext:value-type="float">
            <text:p>5643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653125" calcext:value-type="float">
            <text:p>0,00065312500000000000</text:p>
          </table:table-cell>
          <table:table-cell table:formula="of:=[.D173]-[.D17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33" office:value-type="float" office:value="5676" calcext:value-type="float">
            <text:p>567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656944444444445" calcext:value-type="float">
            <text:p>0,00065694444444444500</text:p>
          </table:table-cell>
          <table:table-cell table:formula="of:=[.D174]-[.D17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33" office:value-type="float" office:value="5709" calcext:value-type="float">
            <text:p>5709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660763888888889" calcext:value-type="float">
            <text:p>0,00066076388888888900</text:p>
          </table:table-cell>
          <table:table-cell table:formula="of:=[.D175]-[.D174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33" office:value-type="float" office:value="5742" calcext:value-type="float">
            <text:p>574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664583333333333" calcext:value-type="float">
            <text:p>0,00066458333333333300</text:p>
          </table:table-cell>
          <table:table-cell table:formula="of:=[.D176]-[.D17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33" office:value-type="float" office:value="5775" calcext:value-type="float">
            <text:p>57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668402777777778" calcext:value-type="float">
            <text:p>0,00066840277777777800</text:p>
          </table:table-cell>
          <table:table-cell table:formula="of:=[.D177]-[.D17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33" office:value-type="float" office:value="5808" calcext:value-type="float">
            <text:p>580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672222222222222" calcext:value-type="float">
            <text:p>0,00067222222222222200</text:p>
          </table:table-cell>
          <table:table-cell table:formula="of:=[.D178]-[.D177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33" office:value-type="float" office:value="5841" calcext:value-type="float">
            <text:p>5841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676041666666667" calcext:value-type="float">
            <text:p>0,00067604166666666700</text:p>
          </table:table-cell>
          <table:table-cell table:formula="of:=[.D179]-[.D17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33" office:value-type="float" office:value="5874" calcext:value-type="float">
            <text:p>587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679861111111111" calcext:value-type="float">
            <text:p>0,00067986111111111100</text:p>
          </table:table-cell>
          <table:table-cell table:formula="of:=[.D180]-[.D17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33" office:value-type="float" office:value="5907" calcext:value-type="float">
            <text:p>5907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683680555555556" calcext:value-type="float">
            <text:p>0,00068368055555555600</text:p>
          </table:table-cell>
          <table:table-cell table:formula="of:=[.D181]-[.D18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33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6875" calcext:value-type="float">
            <text:p>0,00068750000000000000</text:p>
          </table:table-cell>
          <table:table-cell table:formula="of:=[.D182]-[.D18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33" office:value-type="float" office:value="5973" calcext:value-type="float">
            <text:p>5973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691319444444445" calcext:value-type="float">
            <text:p>0,00069131944444444500</text:p>
          </table:table-cell>
          <table:table-cell table:formula="of:=[.D183]-[.D18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33" office:value-type="float" office:value="6006" calcext:value-type="float">
            <text:p>600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695138888888889" calcext:value-type="float">
            <text:p>0,00069513888888888900</text:p>
          </table:table-cell>
          <table:table-cell table:formula="of:=[.D184]-[.D18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33" office:value-type="float" office:value="6039" calcext:value-type="float">
            <text:p>6039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698958333333333" calcext:value-type="float">
            <text:p>0,00069895833333333300</text:p>
          </table:table-cell>
          <table:table-cell table:formula="of:=[.D185]-[.D184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33" office:value-type="float" office:value="6072" calcext:value-type="float">
            <text:p>607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702777777777778" calcext:value-type="float">
            <text:p>0,00070277777777777800</text:p>
          </table:table-cell>
          <table:table-cell table:formula="of:=[.D186]-[.D18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33" office:value-type="float" office:value="6105" calcext:value-type="float">
            <text:p>610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706597222222222" calcext:value-type="float">
            <text:p>0,00070659722222222200</text:p>
          </table:table-cell>
          <table:table-cell table:formula="of:=[.D187]-[.D18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33" office:value-type="float" office:value="6138" calcext:value-type="float">
            <text:p>613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710416666666667" calcext:value-type="float">
            <text:p>0,00071041666666666700</text:p>
          </table:table-cell>
          <table:table-cell table:formula="of:=[.D188]-[.D187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33" office:value-type="float" office:value="6171" calcext:value-type="float">
            <text:p>6171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714236111111111" calcext:value-type="float">
            <text:p>0,00071423611111111100</text:p>
          </table:table-cell>
          <table:table-cell table:formula="of:=[.D189]-[.D18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33" office:value-type="float" office:value="6204" calcext:value-type="float">
            <text:p>620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718055555555556" calcext:value-type="float">
            <text:p>0,00071805555555555600</text:p>
          </table:table-cell>
          <table:table-cell table:formula="of:=[.D190]-[.D18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33" office:value-type="float" office:value="6237" calcext:value-type="float">
            <text:p>6237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721875" calcext:value-type="float">
            <text:p>0,00072187500000000000</text:p>
          </table:table-cell>
          <table:table-cell table:formula="of:=[.D191]-[.D19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33" office:value-type="float" office:value="6270" calcext:value-type="float">
            <text:p>627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725694444444444" calcext:value-type="float">
            <text:p>0,00072569444444444400</text:p>
          </table:table-cell>
          <table:table-cell table:formula="of:=[.D192]-[.D19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33" office:value-type="float" office:value="6303" calcext:value-type="float">
            <text:p>6303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729513888888889" calcext:value-type="float">
            <text:p>0,00072951388888888900</text:p>
          </table:table-cell>
          <table:table-cell table:formula="of:=[.D193]-[.D19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33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733333333333333" calcext:value-type="float">
            <text:p>0,00073333333333333300</text:p>
          </table:table-cell>
          <table:table-cell table:formula="of:=[.D194]-[.D19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33" office:value-type="float" office:value="6369" calcext:value-type="float">
            <text:p>6369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737152777777778" calcext:value-type="float">
            <text:p>0,00073715277777777800</text:p>
          </table:table-cell>
          <table:table-cell table:formula="of:=[.D195]-[.D194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33" office:value-type="float" office:value="6402" calcext:value-type="float">
            <text:p>640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740972222222222" calcext:value-type="float">
            <text:p>0,00074097222222222200</text:p>
          </table:table-cell>
          <table:table-cell table:formula="of:=[.D196]-[.D19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33" office:value-type="float" office:value="6435" calcext:value-type="float">
            <text:p>643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744791666666667" calcext:value-type="float">
            <text:p>0,00074479166666666700</text:p>
          </table:table-cell>
          <table:table-cell table:formula="of:=[.D197]-[.D19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33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748611111111111" calcext:value-type="float">
            <text:p>0,00074861111111111100</text:p>
          </table:table-cell>
          <table:table-cell table:formula="of:=[.D198]-[.D197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33" office:value-type="float" office:value="6501" calcext:value-type="float">
            <text:p>6501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752430555555556" calcext:value-type="float">
            <text:p>0,00075243055555555600</text:p>
          </table:table-cell>
          <table:table-cell table:formula="of:=[.D199]-[.D19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33" office:value-type="float" office:value="6534" calcext:value-type="float">
            <text:p>653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75625" calcext:value-type="float">
            <text:p>0,00075625000000000000</text:p>
          </table:table-cell>
          <table:table-cell table:formula="of:=[.D200]-[.D19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33" office:value-type="float" office:value="6567" calcext:value-type="float">
            <text:p>6567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760069444444444" calcext:value-type="float">
            <text:p>0,00076006944444444400</text:p>
          </table:table-cell>
          <table:table-cell table:formula="of:=[.D201]-[.D20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33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763888888888889" calcext:value-type="float">
            <text:p>0,00076388888888888900</text:p>
          </table:table-cell>
          <table:table-cell table:formula="of:=[.D202]-[.D20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33" office:value-type="float" office:value="6633" calcext:value-type="float">
            <text:p>6633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767708333333333" calcext:value-type="float">
            <text:p>0,00076770833333333300</text:p>
          </table:table-cell>
          <table:table-cell table:formula="of:=[.D203]-[.D20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33" office:value-type="float" office:value="6666" calcext:value-type="float">
            <text:p>666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771527777777778" calcext:value-type="float">
            <text:p>0,00077152777777777800</text:p>
          </table:table-cell>
          <table:table-cell table:formula="of:=[.D204]-[.D20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33" office:value-type="float" office:value="6699" calcext:value-type="float">
            <text:p>6699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775347222222222" calcext:value-type="float">
            <text:p>0,00077534722222222200</text:p>
          </table:table-cell>
          <table:table-cell table:formula="of:=[.D205]-[.D204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33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779166666666667" calcext:value-type="float">
            <text:p>0,00077916666666666700</text:p>
          </table:table-cell>
          <table:table-cell table:formula="of:=[.D206]-[.D20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33" office:value-type="float" office:value="6765" calcext:value-type="float">
            <text:p>676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782986111111111" calcext:value-type="float">
            <text:p>0,00078298611111111100</text:p>
          </table:table-cell>
          <table:table-cell table:formula="of:=[.D207]-[.D20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33" office:value-type="float" office:value="6798" calcext:value-type="float">
            <text:p>679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786805555555556" calcext:value-type="float">
            <text:p>0,00078680555555555600</text:p>
          </table:table-cell>
          <table:table-cell table:formula="of:=[.D208]-[.D207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33" office:value-type="float" office:value="6831" calcext:value-type="float">
            <text:p>6831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790625" calcext:value-type="float">
            <text:p>0,00079062500000000000</text:p>
          </table:table-cell>
          <table:table-cell table:formula="of:=[.D209]-[.D20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33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794444444444444" calcext:value-type="float">
            <text:p>0,00079444444444444500</text:p>
          </table:table-cell>
          <table:table-cell table:formula="of:=[.D210]-[.D20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33" office:value-type="float" office:value="6897" calcext:value-type="float">
            <text:p>6897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798263888888889" calcext:value-type="float">
            <text:p>0,00079826388888888900</text:p>
          </table:table-cell>
          <table:table-cell table:formula="of:=[.D211]-[.D21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33" office:value-type="float" office:value="6930" calcext:value-type="float">
            <text:p>693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802083333333333" calcext:value-type="float">
            <text:p>0,00080208333333333300</text:p>
          </table:table-cell>
          <table:table-cell table:formula="of:=[.D212]-[.D21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33" office:value-type="float" office:value="6963" calcext:value-type="float">
            <text:p>6963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805902777777778" calcext:value-type="float">
            <text:p>0,00080590277777777800</text:p>
          </table:table-cell>
          <table:table-cell table:formula="of:=[.D213]-[.D21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33" office:value-type="float" office:value="6996" calcext:value-type="float">
            <text:p>699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809722222222222" calcext:value-type="float">
            <text:p>0,00080972222222222200</text:p>
          </table:table-cell>
          <table:table-cell table:formula="of:=[.D214]-[.D21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33" office:value-type="float" office:value="7029" calcext:value-type="float">
            <text:p>7029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813541666666667" calcext:value-type="float">
            <text:p>0,00081354166666666700</text:p>
          </table:table-cell>
          <table:table-cell table:formula="of:=[.D215]-[.D21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33" office:value-type="float" office:value="7062" calcext:value-type="float">
            <text:p>706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817361111111111" calcext:value-type="float">
            <text:p>0,00081736111111111100</text:p>
          </table:table-cell>
          <table:table-cell table:formula="of:=[.D216]-[.D21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33" office:value-type="float" office:value="7095" calcext:value-type="float">
            <text:p>709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821180555555556" calcext:value-type="float">
            <text:p>0,00082118055555555600</text:p>
          </table:table-cell>
          <table:table-cell table:formula="of:=[.D217]-[.D21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33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825" calcext:value-type="float">
            <text:p>0,00082500000000000000</text:p>
          </table:table-cell>
          <table:table-cell table:formula="of:=[.D218]-[.D217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33" office:value-type="float" office:value="7161" calcext:value-type="float">
            <text:p>7161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828819444444444" calcext:value-type="float">
            <text:p>0,00082881944444444500</text:p>
          </table:table-cell>
          <table:table-cell table:formula="of:=[.D219]-[.D21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33" office:value-type="float" office:value="7194" calcext:value-type="float">
            <text:p>719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832638888888889" calcext:value-type="float">
            <text:p>0,00083263888888888900</text:p>
          </table:table-cell>
          <table:table-cell table:formula="of:=[.D220]-[.D21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33" office:value-type="float" office:value="7227" calcext:value-type="float">
            <text:p>7227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836458333333333" calcext:value-type="float">
            <text:p>0,00083645833333333400</text:p>
          </table:table-cell>
          <table:table-cell table:formula="of:=[.D221]-[.D22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33" office:value-type="float" office:value="7260" calcext:value-type="float">
            <text:p>72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840277777777778" calcext:value-type="float">
            <text:p>0,00084027777777777800</text:p>
          </table:table-cell>
          <table:table-cell table:formula="of:=[.D222]-[.D22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33" office:value-type="float" office:value="7293" calcext:value-type="float">
            <text:p>7293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844097222222222" calcext:value-type="float">
            <text:p>0,00084409722222222200</text:p>
          </table:table-cell>
          <table:table-cell table:formula="of:=[.D223]-[.D22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33" office:value-type="float" office:value="7326" calcext:value-type="float">
            <text:p>732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847916666666667" calcext:value-type="float">
            <text:p>0,00084791666666666700</text:p>
          </table:table-cell>
          <table:table-cell table:formula="of:=[.D224]-[.D22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33" office:value-type="float" office:value="7359" calcext:value-type="float">
            <text:p>7359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851736111111111" calcext:value-type="float">
            <text:p>0,00085173611111111100</text:p>
          </table:table-cell>
          <table:table-cell table:formula="of:=[.D225]-[.D224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33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855555555555556" calcext:value-type="float">
            <text:p>0,00085555555555555600</text:p>
          </table:table-cell>
          <table:table-cell table:formula="of:=[.D226]-[.D22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33" office:value-type="float" office:value="7425" calcext:value-type="float">
            <text:p>74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859375" calcext:value-type="float">
            <text:p>0,00085937500000000000</text:p>
          </table:table-cell>
          <table:table-cell table:formula="of:=[.D227]-[.D22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33" office:value-type="float" office:value="7458" calcext:value-type="float">
            <text:p>745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863194444444444" calcext:value-type="float">
            <text:p>0,00086319444444444500</text:p>
          </table:table-cell>
          <table:table-cell table:formula="of:=[.D228]-[.D227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33" office:value-type="float" office:value="7491" calcext:value-type="float">
            <text:p>7491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867013888888889" calcext:value-type="float">
            <text:p>0,00086701388888888900</text:p>
          </table:table-cell>
          <table:table-cell table:formula="of:=[.D229]-[.D22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33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870833333333333" calcext:value-type="float">
            <text:p>0,00087083333333333400</text:p>
          </table:table-cell>
          <table:table-cell table:formula="of:=[.D230]-[.D22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33" office:value-type="float" office:value="7557" calcext:value-type="float">
            <text:p>7557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874652777777778" calcext:value-type="float">
            <text:p>0,00087465277777777800</text:p>
          </table:table-cell>
          <table:table-cell table:formula="of:=[.D231]-[.D23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33" office:value-type="float" office:value="7590" calcext:value-type="float">
            <text:p>759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878472222222222" calcext:value-type="float">
            <text:p>0,00087847222222222200</text:p>
          </table:table-cell>
          <table:table-cell table:formula="of:=[.D232]-[.D23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33" office:value-type="float" office:value="7623" calcext:value-type="float">
            <text:p>7623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882291666666667" calcext:value-type="float">
            <text:p>0,00088229166666666700</text:p>
          </table:table-cell>
          <table:table-cell table:formula="of:=[.D233]-[.D23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33" office:value-type="float" office:value="7656" calcext:value-type="float">
            <text:p>765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886111111111111" calcext:value-type="float">
            <text:p>0,00088611111111111100</text:p>
          </table:table-cell>
          <table:table-cell table:formula="of:=[.D234]-[.D23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33" office:value-type="float" office:value="7689" calcext:value-type="float">
            <text:p>7689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889930555555556" calcext:value-type="float">
            <text:p>0,00088993055555555600</text:p>
          </table:table-cell>
          <table:table-cell table:formula="of:=[.D235]-[.D234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33" office:value-type="float" office:value="7722" calcext:value-type="float">
            <text:p>772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89375" calcext:value-type="float">
            <text:p>0,00089375000000000000</text:p>
          </table:table-cell>
          <table:table-cell table:formula="of:=[.D236]-[.D23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33" office:value-type="float" office:value="7755" calcext:value-type="float">
            <text:p>775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897569444444444" calcext:value-type="float">
            <text:p>0,00089756944444444400</text:p>
          </table:table-cell>
          <table:table-cell table:formula="of:=[.D237]-[.D23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33" office:value-type="float" office:value="7788" calcext:value-type="float">
            <text:p>778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901388888888889" calcext:value-type="float">
            <text:p>0,00090138888888888900</text:p>
          </table:table-cell>
          <table:table-cell table:formula="of:=[.D238]-[.D23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33" office:value-type="float" office:value="7821" calcext:value-type="float">
            <text:p>7821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905208333333333" calcext:value-type="float">
            <text:p>0,00090520833333333400</text:p>
          </table:table-cell>
          <table:table-cell table:formula="of:=[.D239]-[.D23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33" office:value-type="float" office:value="7854" calcext:value-type="float">
            <text:p>785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909027777777778" calcext:value-type="float">
            <text:p>0,00090902777777777800</text:p>
          </table:table-cell>
          <table:table-cell table:formula="of:=[.D240]-[.D23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33" office:value-type="float" office:value="7887" calcext:value-type="float">
            <text:p>7887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912847222222222" calcext:value-type="float">
            <text:p>0,00091284722222222200</text:p>
          </table:table-cell>
          <table:table-cell table:formula="of:=[.D241]-[.D24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33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916666666666667" calcext:value-type="float">
            <text:p>0,00091666666666666700</text:p>
          </table:table-cell>
          <table:table-cell table:formula="of:=[.D242]-[.D241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33" office:value-type="float" office:value="7953" calcext:value-type="float">
            <text:p>7953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920486111111111" calcext:value-type="float">
            <text:p>0,00092048611111111100</text:p>
          </table:table-cell>
          <table:table-cell table:formula="of:=[.D243]-[.D24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33" office:value-type="float" office:value="7986" calcext:value-type="float">
            <text:p>798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924305555555556" calcext:value-type="float">
            <text:p>0,00092430555555555600</text:p>
          </table:table-cell>
          <table:table-cell table:formula="of:=[.D244]-[.D24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33" office:value-type="float" office:value="8019" calcext:value-type="float">
            <text:p>8019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928125" calcext:value-type="float">
            <text:p>0,00092812500000000000</text:p>
          </table:table-cell>
          <table:table-cell table:formula="of:=[.D245]-[.D244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33" office:value-type="float" office:value="8052" calcext:value-type="float">
            <text:p>805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931944444444444" calcext:value-type="float">
            <text:p>0,00093194444444444400</text:p>
          </table:table-cell>
          <table:table-cell table:formula="of:=[.D246]-[.D24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33" office:value-type="float" office:value="8085" calcext:value-type="float">
            <text:p>808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935763888888889" calcext:value-type="float">
            <text:p>0,00093576388888888900</text:p>
          </table:table-cell>
          <table:table-cell table:formula="of:=[.D247]-[.D24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33" office:value-type="float" office:value="8118" calcext:value-type="float">
            <text:p>811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939583333333333" calcext:value-type="float">
            <text:p>0,00093958333333333300</text:p>
          </table:table-cell>
          <table:table-cell table:formula="of:=[.D248]-[.D24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33" office:value-type="float" office:value="8151" calcext:value-type="float">
            <text:p>8151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943402777777778" calcext:value-type="float">
            <text:p>0,00094340277777777800</text:p>
          </table:table-cell>
          <table:table-cell table:formula="of:=[.D249]-[.D248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33" office:value-type="float" office:value="8184" calcext:value-type="float">
            <text:p>818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947222222222222" calcext:value-type="float">
            <text:p>0,00094722222222222200</text:p>
          </table:table-cell>
          <table:table-cell table:formula="of:=[.D250]-[.D249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33" office:value-type="float" office:value="8217" calcext:value-type="float">
            <text:p>8217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951041666666667" calcext:value-type="float">
            <text:p>0,00095104166666666700</text:p>
          </table:table-cell>
          <table:table-cell table:formula="of:=[.D251]-[.D250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33" office:value-type="float" office:value="8250" calcext:value-type="float">
            <text:p>8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954861111111111" calcext:value-type="float">
            <text:p>0,00095486111111111100</text:p>
          </table:table-cell>
          <table:table-cell table:formula="of:=[.D252]-[.D25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33" office:value-type="float" office:value="8283" calcext:value-type="float">
            <text:p>8283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958680555555556" calcext:value-type="float">
            <text:p>0,00095868055555555600</text:p>
          </table:table-cell>
          <table:table-cell table:formula="of:=[.D253]-[.D252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33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9625" calcext:value-type="float">
            <text:p>0,00096250000000000000</text:p>
          </table:table-cell>
          <table:table-cell table:formula="of:=[.D254]-[.D253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33" office:value-type="float" office:value="8349" calcext:value-type="float">
            <text:p>8349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966319444444445" calcext:value-type="float">
            <text:p>0,00096631944444444500</text:p>
          </table:table-cell>
          <table:table-cell table:formula="of:=[.D255]-[.D254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33" office:value-type="float" office:value="8382" calcext:value-type="float">
            <text:p>838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970138888888889" calcext:value-type="float">
            <text:p>0,00097013888888888900</text:p>
          </table:table-cell>
          <table:table-cell table:formula="of:=[.D256]-[.D255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33" office:value-type="float" office:value="8415" calcext:value-type="float">
            <text:p>841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973958333333333" calcext:value-type="float">
            <text:p>0,00097395833333333300</text:p>
          </table:table-cell>
          <table:table-cell table:formula="of:=[.D257]-[.D256]" office:value-type="float" office:value="0.00000381944444444442" calcext:value-type="float">
            <text:p>0,000003819444444444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33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977777777777778" calcext:value-type="float">
            <text:p>0,00097777777777777800</text:p>
          </table:table-cell>
          <table:table-cell table:formula="of:=[.D258]-[.D25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33" office:value-type="float" office:value="8481" calcext:value-type="float">
            <text:p>8481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981597222222222" calcext:value-type="float">
            <text:p>0,00098159722222222200</text:p>
          </table:table-cell>
          <table:table-cell table:formula="of:=[.D259]-[.D25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33" office:value-type="float" office:value="8514" calcext:value-type="float">
            <text:p>851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985416666666667" calcext:value-type="float">
            <text:p>0,00098541666666666700</text:p>
          </table:table-cell>
          <table:table-cell table:formula="of:=[.D260]-[.D25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33" office:value-type="float" office:value="8547" calcext:value-type="float">
            <text:p>8547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989236111111111" calcext:value-type="float">
            <text:p>0,00098923611111111100</text:p>
          </table:table-cell>
          <table:table-cell table:formula="of:=[.D261]-[.D26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33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993055555555556" calcext:value-type="float">
            <text:p>0,00099305555555555600</text:p>
          </table:table-cell>
          <table:table-cell table:formula="of:=[.D262]-[.D26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33" office:value-type="float" office:value="8613" calcext:value-type="float">
            <text:p>8613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996875" calcext:value-type="float">
            <text:p>0,00099687500000000000</text:p>
          </table:table-cell>
          <table:table-cell table:formula="of:=[.D263]-[.D26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33" office:value-type="float" office:value="8646" calcext:value-type="float">
            <text:p>864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00069444444444" calcext:value-type="float">
            <text:p>0,00100069444444444000</text:p>
          </table:table-cell>
          <table:table-cell table:formula="of:=[.D264]-[.D26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33" office:value-type="float" office:value="8679" calcext:value-type="float">
            <text:p>8679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00451388888889" calcext:value-type="float">
            <text:p>0,00100451388888889000</text:p>
          </table:table-cell>
          <table:table-cell table:formula="of:=[.D265]-[.D26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33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00833333333333" calcext:value-type="float">
            <text:p>0,00100833333333333000</text:p>
          </table:table-cell>
          <table:table-cell table:formula="of:=[.D266]-[.D26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33" office:value-type="float" office:value="8745" calcext:value-type="float">
            <text:p>874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01215277777778" calcext:value-type="float">
            <text:p>0,00101215277777778000</text:p>
          </table:table-cell>
          <table:table-cell table:formula="of:=[.D267]-[.D26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33" office:value-type="float" office:value="8778" calcext:value-type="float">
            <text:p>877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01597222222222" calcext:value-type="float">
            <text:p>0,00101597222222222000</text:p>
          </table:table-cell>
          <table:table-cell table:formula="of:=[.D268]-[.D26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33" office:value-type="float" office:value="8811" calcext:value-type="float">
            <text:p>8811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01979166666667" calcext:value-type="float">
            <text:p>0,00101979166666667000</text:p>
          </table:table-cell>
          <table:table-cell table:formula="of:=[.D269]-[.D26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33" office:value-type="float" office:value="8844" calcext:value-type="float">
            <text:p>884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02361111111111" calcext:value-type="float">
            <text:p>0,00102361111111111000</text:p>
          </table:table-cell>
          <table:table-cell table:formula="of:=[.D270]-[.D26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33" office:value-type="float" office:value="8877" calcext:value-type="float">
            <text:p>8877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02743055555556" calcext:value-type="float">
            <text:p>0,00102743055555556000</text:p>
          </table:table-cell>
          <table:table-cell table:formula="of:=[.D271]-[.D27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33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03125" calcext:value-type="float">
            <text:p>0,00103125000000000000</text:p>
          </table:table-cell>
          <table:table-cell table:formula="of:=[.D272]-[.D27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33" office:value-type="float" office:value="8943" calcext:value-type="float">
            <text:p>8943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03506944444444" calcext:value-type="float">
            <text:p>0,00103506944444444000</text:p>
          </table:table-cell>
          <table:table-cell table:formula="of:=[.D273]-[.D27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33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03888888888889" calcext:value-type="float">
            <text:p>0,00103888888888889000</text:p>
          </table:table-cell>
          <table:table-cell table:formula="of:=[.D274]-[.D27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33" office:value-type="float" office:value="9009" calcext:value-type="float">
            <text:p>9009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04270833333333" calcext:value-type="float">
            <text:p>0,00104270833333333000</text:p>
          </table:table-cell>
          <table:table-cell table:formula="of:=[.D275]-[.D27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33" office:value-type="float" office:value="9042" calcext:value-type="float">
            <text:p>904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04652777777778" calcext:value-type="float">
            <text:p>0,00104652777777778000</text:p>
          </table:table-cell>
          <table:table-cell table:formula="of:=[.D276]-[.D27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33" office:value-type="float" office:value="9075" calcext:value-type="float">
            <text:p>90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05034722222222" calcext:value-type="float">
            <text:p>0,00105034722222222000</text:p>
          </table:table-cell>
          <table:table-cell table:formula="of:=[.D277]-[.D27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33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05416666666667" calcext:value-type="float">
            <text:p>0,00105416666666667000</text:p>
          </table:table-cell>
          <table:table-cell table:formula="of:=[.D278]-[.D27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33" office:value-type="float" office:value="9141" calcext:value-type="float">
            <text:p>9141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05798611111111" calcext:value-type="float">
            <text:p>0,00105798611111111000</text:p>
          </table:table-cell>
          <table:table-cell table:formula="of:=[.D279]-[.D27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33" office:value-type="float" office:value="9174" calcext:value-type="float">
            <text:p>917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06180555555556" calcext:value-type="float">
            <text:p>0,00106180555555556000</text:p>
          </table:table-cell>
          <table:table-cell table:formula="of:=[.D280]-[.D27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33" office:value-type="float" office:value="9207" calcext:value-type="float">
            <text:p>9207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065625" calcext:value-type="float">
            <text:p>0,00106562500000000000</text:p>
          </table:table-cell>
          <table:table-cell table:formula="of:=[.D281]-[.D28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33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06944444444444" calcext:value-type="float">
            <text:p>0,00106944444444444000</text:p>
          </table:table-cell>
          <table:table-cell table:formula="of:=[.D282]-[.D28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33" office:value-type="float" office:value="9273" calcext:value-type="float">
            <text:p>9273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07326388888889" calcext:value-type="float">
            <text:p>0,00107326388888889000</text:p>
          </table:table-cell>
          <table:table-cell table:formula="of:=[.D283]-[.D28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33" office:value-type="float" office:value="9306" calcext:value-type="float">
            <text:p>930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07708333333333" calcext:value-type="float">
            <text:p>0,00107708333333333000</text:p>
          </table:table-cell>
          <table:table-cell table:formula="of:=[.D284]-[.D28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33" office:value-type="float" office:value="9339" calcext:value-type="float">
            <text:p>9339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08090277777778" calcext:value-type="float">
            <text:p>0,00108090277777778000</text:p>
          </table:table-cell>
          <table:table-cell table:formula="of:=[.D285]-[.D28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33" office:value-type="float" office:value="9372" calcext:value-type="float">
            <text:p>937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08472222222222" calcext:value-type="float">
            <text:p>0,00108472222222222000</text:p>
          </table:table-cell>
          <table:table-cell table:formula="of:=[.D286]-[.D28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33" office:value-type="float" office:value="9405" calcext:value-type="float">
            <text:p>940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08854166666667" calcext:value-type="float">
            <text:p>0,00108854166666667000</text:p>
          </table:table-cell>
          <table:table-cell table:formula="of:=[.D287]-[.D28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33" office:value-type="float" office:value="9438" calcext:value-type="float">
            <text:p>943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09236111111111" calcext:value-type="float">
            <text:p>0,00109236111111111000</text:p>
          </table:table-cell>
          <table:table-cell table:formula="of:=[.D288]-[.D28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33" office:value-type="float" office:value="9471" calcext:value-type="float">
            <text:p>9471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09618055555556" calcext:value-type="float">
            <text:p>0,00109618055555556000</text:p>
          </table:table-cell>
          <table:table-cell table:formula="of:=[.D289]-[.D28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33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1" calcext:value-type="float">
            <text:p>0,00110000000000000000</text:p>
          </table:table-cell>
          <table:table-cell table:formula="of:=[.D290]-[.D28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33" office:value-type="float" office:value="9537" calcext:value-type="float">
            <text:p>9537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10381944444444" calcext:value-type="float">
            <text:p>0,00110381944444444000</text:p>
          </table:table-cell>
          <table:table-cell table:formula="of:=[.D291]-[.D29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33" office:value-type="float" office:value="9570" calcext:value-type="float">
            <text:p>957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10763888888889" calcext:value-type="float">
            <text:p>0,00110763888888889000</text:p>
          </table:table-cell>
          <table:table-cell table:formula="of:=[.D292]-[.D29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33" office:value-type="float" office:value="9603" calcext:value-type="float">
            <text:p>9603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11145833333333" calcext:value-type="float">
            <text:p>0,00111145833333333000</text:p>
          </table:table-cell>
          <table:table-cell table:formula="of:=[.D293]-[.D29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33" office:value-type="float" office:value="9636" calcext:value-type="float">
            <text:p>963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11527777777778" calcext:value-type="float">
            <text:p>0,00111527777777778000</text:p>
          </table:table-cell>
          <table:table-cell table:formula="of:=[.D294]-[.D29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33" office:value-type="float" office:value="9669" calcext:value-type="float">
            <text:p>9669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11909722222222" calcext:value-type="float">
            <text:p>0,00111909722222222000</text:p>
          </table:table-cell>
          <table:table-cell table:formula="of:=[.D295]-[.D29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33" office:value-type="float" office:value="9702" calcext:value-type="float">
            <text:p>970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12291666666667" calcext:value-type="float">
            <text:p>0,00112291666666667000</text:p>
          </table:table-cell>
          <table:table-cell table:formula="of:=[.D296]-[.D29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33" office:value-type="float" office:value="9735" calcext:value-type="float">
            <text:p>973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12673611111111" calcext:value-type="float">
            <text:p>0,00112673611111111000</text:p>
          </table:table-cell>
          <table:table-cell table:formula="of:=[.D297]-[.D29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33" office:value-type="float" office:value="9768" calcext:value-type="float">
            <text:p>976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13055555555556" calcext:value-type="float">
            <text:p>0,00113055555555556000</text:p>
          </table:table-cell>
          <table:table-cell table:formula="of:=[.D298]-[.D29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33" office:value-type="float" office:value="9801" calcext:value-type="float">
            <text:p>9801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134375" calcext:value-type="float">
            <text:p>0,00113437500000000000</text:p>
          </table:table-cell>
          <table:table-cell table:formula="of:=[.D299]-[.D29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33" office:value-type="float" office:value="9834" calcext:value-type="float">
            <text:p>983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13819444444444" calcext:value-type="float">
            <text:p>0,00113819444444444000</text:p>
          </table:table-cell>
          <table:table-cell table:formula="of:=[.D300]-[.D29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33" office:value-type="float" office:value="9867" calcext:value-type="float">
            <text:p>9867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14201388888889" calcext:value-type="float">
            <text:p>0,00114201388888889000</text:p>
          </table:table-cell>
          <table:table-cell table:formula="of:=[.D301]-[.D30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33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14583333333333" calcext:value-type="float">
            <text:p>0,00114583333333333000</text:p>
          </table:table-cell>
          <table:table-cell table:formula="of:=[.D302]-[.D30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33" office:value-type="float" office:value="9933" calcext:value-type="float">
            <text:p>9933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14965277777778" calcext:value-type="float">
            <text:p>0,00114965277777778000</text:p>
          </table:table-cell>
          <table:table-cell table:formula="of:=[.D303]-[.D30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33" office:value-type="float" office:value="9966" calcext:value-type="float">
            <text:p>996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15347222222222" calcext:value-type="float">
            <text:p>0,00115347222222222000</text:p>
          </table:table-cell>
          <table:table-cell table:formula="of:=[.D304]-[.D30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33" office:value-type="float" office:value="9999" calcext:value-type="float">
            <text:p>9999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15729166666667" calcext:value-type="float">
            <text:p>0,00115729166666667000</text:p>
          </table:table-cell>
          <table:table-cell table:formula="of:=[.D305]-[.D30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33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16111111111111" calcext:value-type="float">
            <text:p>0,00116111111111111000</text:p>
          </table:table-cell>
          <table:table-cell table:formula="of:=[.D306]-[.D30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33" office:value-type="float" office:value="10065" calcext:value-type="float">
            <text:p>1006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16493055555556" calcext:value-type="float">
            <text:p>0,00116493055555556000</text:p>
          </table:table-cell>
          <table:table-cell table:formula="of:=[.D307]-[.D30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33" office:value-type="float" office:value="10098" calcext:value-type="float">
            <text:p>1009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16875" calcext:value-type="float">
            <text:p>0,00116875000000000000</text:p>
          </table:table-cell>
          <table:table-cell table:formula="of:=[.D308]-[.D30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33" office:value-type="float" office:value="10131" calcext:value-type="float">
            <text:p>10131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17256944444444" calcext:value-type="float">
            <text:p>0,00117256944444444000</text:p>
          </table:table-cell>
          <table:table-cell table:formula="of:=[.D309]-[.D30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33" office:value-type="float" office:value="10164" calcext:value-type="float">
            <text:p>1016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17638888888889" calcext:value-type="float">
            <text:p>0,00117638888888889000</text:p>
          </table:table-cell>
          <table:table-cell table:formula="of:=[.D310]-[.D30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33" office:value-type="float" office:value="10197" calcext:value-type="float">
            <text:p>10197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18020833333333" calcext:value-type="float">
            <text:p>0,00118020833333333000</text:p>
          </table:table-cell>
          <table:table-cell table:formula="of:=[.D311]-[.D31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33" office:value-type="float" office:value="10230" calcext:value-type="float">
            <text:p>1023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18402777777778" calcext:value-type="float">
            <text:p>0,00118402777777778000</text:p>
          </table:table-cell>
          <table:table-cell table:formula="of:=[.D312]-[.D31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33" office:value-type="float" office:value="10263" calcext:value-type="float">
            <text:p>10263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18784722222222" calcext:value-type="float">
            <text:p>0,00118784722222222000</text:p>
          </table:table-cell>
          <table:table-cell table:formula="of:=[.D313]-[.D31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33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19166666666667" calcext:value-type="float">
            <text:p>0,00119166666666667000</text:p>
          </table:table-cell>
          <table:table-cell table:formula="of:=[.D314]-[.D31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33" office:value-type="float" office:value="10329" calcext:value-type="float">
            <text:p>10329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19548611111111" calcext:value-type="float">
            <text:p>0,00119548611111111000</text:p>
          </table:table-cell>
          <table:table-cell table:formula="of:=[.D315]-[.D31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33" office:value-type="float" office:value="10362" calcext:value-type="float">
            <text:p>1036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19930555555556" calcext:value-type="float">
            <text:p>0,00119930555555556000</text:p>
          </table:table-cell>
          <table:table-cell table:formula="of:=[.D316]-[.D31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33" office:value-type="float" office:value="10395" calcext:value-type="float">
            <text:p>1039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203125" calcext:value-type="float">
            <text:p>0,00120312500000000000</text:p>
          </table:table-cell>
          <table:table-cell table:formula="of:=[.D317]-[.D31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33" office:value-type="float" office:value="10428" calcext:value-type="float">
            <text:p>1042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20694444444444" calcext:value-type="float">
            <text:p>0,00120694444444444000</text:p>
          </table:table-cell>
          <table:table-cell table:formula="of:=[.D318]-[.D31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33" office:value-type="float" office:value="10461" calcext:value-type="float">
            <text:p>10461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21076388888889" calcext:value-type="float">
            <text:p>0,00121076388888889000</text:p>
          </table:table-cell>
          <table:table-cell table:formula="of:=[.D319]-[.D31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33" office:value-type="float" office:value="10494" calcext:value-type="float">
            <text:p>1049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21458333333333" calcext:value-type="float">
            <text:p>0,00121458333333333000</text:p>
          </table:table-cell>
          <table:table-cell table:formula="of:=[.D320]-[.D31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33" office:value-type="float" office:value="10527" calcext:value-type="float">
            <text:p>10527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21840277777778" calcext:value-type="float">
            <text:p>0,00121840277777778000</text:p>
          </table:table-cell>
          <table:table-cell table:formula="of:=[.D321]-[.D32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33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22222222222222" calcext:value-type="float">
            <text:p>0,00122222222222222000</text:p>
          </table:table-cell>
          <table:table-cell table:formula="of:=[.D322]-[.D32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33" office:value-type="float" office:value="10593" calcext:value-type="float">
            <text:p>10593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22604166666667" calcext:value-type="float">
            <text:p>0,00122604166666667000</text:p>
          </table:table-cell>
          <table:table-cell table:formula="of:=[.D323]-[.D32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33" office:value-type="float" office:value="10626" calcext:value-type="float">
            <text:p>1062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22986111111111" calcext:value-type="float">
            <text:p>0,00122986111111111000</text:p>
          </table:table-cell>
          <table:table-cell table:formula="of:=[.D324]-[.D32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33" office:value-type="float" office:value="10659" calcext:value-type="float">
            <text:p>10659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23368055555556" calcext:value-type="float">
            <text:p>0,00123368055555556000</text:p>
          </table:table-cell>
          <table:table-cell table:formula="of:=[.D325]-[.D32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33" office:value-type="float" office:value="10692" calcext:value-type="float">
            <text:p>1069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2375" calcext:value-type="float">
            <text:p>0,00123750000000000000</text:p>
          </table:table-cell>
          <table:table-cell table:formula="of:=[.D326]-[.D32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33" office:value-type="float" office:value="10725" calcext:value-type="float">
            <text:p>107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24131944444444" calcext:value-type="float">
            <text:p>0,00124131944444444000</text:p>
          </table:table-cell>
          <table:table-cell table:formula="of:=[.D327]-[.D32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33" office:value-type="float" office:value="10758" calcext:value-type="float">
            <text:p>1075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24513888888889" calcext:value-type="float">
            <text:p>0,00124513888888889000</text:p>
          </table:table-cell>
          <table:table-cell table:formula="of:=[.D328]-[.D32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33" office:value-type="float" office:value="10791" calcext:value-type="float">
            <text:p>10791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24895833333333" calcext:value-type="float">
            <text:p>0,00124895833333333000</text:p>
          </table:table-cell>
          <table:table-cell table:formula="of:=[.D329]-[.D32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33" office:value-type="float" office:value="10824" calcext:value-type="float">
            <text:p>1082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25277777777778" calcext:value-type="float">
            <text:p>0,00125277777777778000</text:p>
          </table:table-cell>
          <table:table-cell table:formula="of:=[.D330]-[.D32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33" office:value-type="float" office:value="10857" calcext:value-type="float">
            <text:p>10857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25659722222222" calcext:value-type="float">
            <text:p>0,00125659722222222000</text:p>
          </table:table-cell>
          <table:table-cell table:formula="of:=[.D331]-[.D33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33" office:value-type="float" office:value="10890" calcext:value-type="float">
            <text:p>1089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26041666666667" calcext:value-type="float">
            <text:p>0,00126041666666667000</text:p>
          </table:table-cell>
          <table:table-cell table:formula="of:=[.D332]-[.D33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33" office:value-type="float" office:value="10923" calcext:value-type="float">
            <text:p>10923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26423611111111" calcext:value-type="float">
            <text:p>0,00126423611111111000</text:p>
          </table:table-cell>
          <table:table-cell table:formula="of:=[.D333]-[.D33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33" office:value-type="float" office:value="10956" calcext:value-type="float">
            <text:p>10956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26805555555556" calcext:value-type="float">
            <text:p>0,00126805555555556000</text:p>
          </table:table-cell>
          <table:table-cell table:formula="of:=[.D334]-[.D33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33" office:value-type="float" office:value="10989" calcext:value-type="float">
            <text:p>10989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271875" calcext:value-type="float">
            <text:p>0,00127187500000000000</text:p>
          </table:table-cell>
          <table:table-cell table:formula="of:=[.D335]-[.D33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33" office:value-type="float" office:value="11022" calcext:value-type="float">
            <text:p>11022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27569444444444" calcext:value-type="float">
            <text:p>0,00127569444444444000</text:p>
          </table:table-cell>
          <table:table-cell table:formula="of:=[.D336]-[.D33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33" office:value-type="float" office:value="11055" calcext:value-type="float">
            <text:p>1105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27951388888889" calcext:value-type="float">
            <text:p>0,00127951388888889000</text:p>
          </table:table-cell>
          <table:table-cell table:formula="of:=[.D337]-[.D33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33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28333333333333" calcext:value-type="float">
            <text:p>0,00128333333333333000</text:p>
          </table:table-cell>
          <table:table-cell table:formula="of:=[.D338]-[.D33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33" office:value-type="float" office:value="11121" calcext:value-type="float">
            <text:p>11121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28715277777778" calcext:value-type="float">
            <text:p>0,00128715277777778000</text:p>
          </table:table-cell>
          <table:table-cell table:formula="of:=[.D339]-[.D33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33" office:value-type="float" office:value="11154" calcext:value-type="float">
            <text:p>11154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29097222222222" calcext:value-type="float">
            <text:p>0,00129097222222222000</text:p>
          </table:table-cell>
          <table:table-cell table:formula="of:=[.D340]-[.D33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33" office:value-type="float" office:value="11187" calcext:value-type="float">
            <text:p>11187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29479166666667" calcext:value-type="float">
            <text:p>0,00129479166666667000</text:p>
          </table:table-cell>
          <table:table-cell table:formula="of:=[.D341]-[.D34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33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29861111111111" calcext:value-type="float">
            <text:p>0,00129861111111111000</text:p>
          </table:table-cell>
          <table:table-cell table:formula="of:=[.D342]-[.D34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33" office:value-type="float" office:value="11253" calcext:value-type="float">
            <text:p>11253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30243055555556" calcext:value-type="float">
            <text:p>0,00130243055555556000</text:p>
          </table:table-cell>
          <table:table-cell table:formula="of:=[.D343]-[.D34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33" office:value-type="float" office:value="11286" calcext:value-type="float">
            <text:p>11286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30625" calcext:value-type="float">
            <text:p>0,00130625000000000000</text:p>
          </table:table-cell>
          <table:table-cell table:formula="of:=[.D344]-[.D34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33" office:value-type="float" office:value="11319" calcext:value-type="float">
            <text:p>11319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31006944444444" calcext:value-type="float">
            <text:p>0,00131006944444444000</text:p>
          </table:table-cell>
          <table:table-cell table:formula="of:=[.D345]-[.D34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33" office:value-type="float" office:value="11352" calcext:value-type="float">
            <text:p>11352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31388888888889" calcext:value-type="float">
            <text:p>0,00131388888888889000</text:p>
          </table:table-cell>
          <table:table-cell table:formula="of:=[.D346]-[.D34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33" office:value-type="float" office:value="11385" calcext:value-type="float">
            <text:p>1138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31770833333333" calcext:value-type="float">
            <text:p>0,00131770833333333000</text:p>
          </table:table-cell>
          <table:table-cell table:formula="of:=[.D347]-[.D34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33" office:value-type="float" office:value="11418" calcext:value-type="float">
            <text:p>11418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32152777777778" calcext:value-type="float">
            <text:p>0,00132152777777778000</text:p>
          </table:table-cell>
          <table:table-cell table:formula="of:=[.D348]-[.D34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33" office:value-type="float" office:value="11451" calcext:value-type="float">
            <text:p>11451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32534722222222" calcext:value-type="float">
            <text:p>0,00132534722222222000</text:p>
          </table:table-cell>
          <table:table-cell table:formula="of:=[.D349]-[.D34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33" office:value-type="float" office:value="11484" calcext:value-type="float">
            <text:p>11484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32916666666667" calcext:value-type="float">
            <text:p>0,00132916666666667000</text:p>
          </table:table-cell>
          <table:table-cell table:formula="of:=[.D350]-[.D34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33" office:value-type="float" office:value="11517" calcext:value-type="float">
            <text:p>11517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33298611111111" calcext:value-type="float">
            <text:p>0,00133298611111111000</text:p>
          </table:table-cell>
          <table:table-cell table:formula="of:=[.D351]-[.D35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33" office:value-type="float" office:value="11550" calcext:value-type="float">
            <text:p>115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33680555555556" calcext:value-type="float">
            <text:p>0,00133680555555556000</text:p>
          </table:table-cell>
          <table:table-cell table:formula="of:=[.D352]-[.D35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33" office:value-type="float" office:value="11583" calcext:value-type="float">
            <text:p>11583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340625" calcext:value-type="float">
            <text:p>0,00134062500000000000</text:p>
          </table:table-cell>
          <table:table-cell table:formula="of:=[.D353]-[.D35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33" office:value-type="float" office:value="11616" calcext:value-type="float">
            <text:p>11616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34444444444444" calcext:value-type="float">
            <text:p>0,00134444444444444000</text:p>
          </table:table-cell>
          <table:table-cell table:formula="of:=[.D354]-[.D35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33" office:value-type="float" office:value="11649" calcext:value-type="float">
            <text:p>11649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34826388888889" calcext:value-type="float">
            <text:p>0,00134826388888889000</text:p>
          </table:table-cell>
          <table:table-cell table:formula="of:=[.D355]-[.D35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33" office:value-type="float" office:value="11682" calcext:value-type="float">
            <text:p>11682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35208333333333" calcext:value-type="float">
            <text:p>0,00135208333333333000</text:p>
          </table:table-cell>
          <table:table-cell table:formula="of:=[.D356]-[.D35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33" office:value-type="float" office:value="11715" calcext:value-type="float">
            <text:p>1171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35590277777778" calcext:value-type="float">
            <text:p>0,00135590277777778000</text:p>
          </table:table-cell>
          <table:table-cell table:formula="of:=[.D357]-[.D35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33" office:value-type="float" office:value="11748" calcext:value-type="float">
            <text:p>11748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35972222222222" calcext:value-type="float">
            <text:p>0,00135972222222222000</text:p>
          </table:table-cell>
          <table:table-cell table:formula="of:=[.D358]-[.D35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33" office:value-type="float" office:value="11781" calcext:value-type="float">
            <text:p>11781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36354166666667" calcext:value-type="float">
            <text:p>0,00136354166666667000</text:p>
          </table:table-cell>
          <table:table-cell table:formula="of:=[.D359]-[.D35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33" office:value-type="float" office:value="11814" calcext:value-type="float">
            <text:p>11814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36736111111111" calcext:value-type="float">
            <text:p>0,00136736111111111000</text:p>
          </table:table-cell>
          <table:table-cell table:formula="of:=[.D360]-[.D35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33" office:value-type="float" office:value="11847" calcext:value-type="float">
            <text:p>11847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37118055555556" calcext:value-type="float">
            <text:p>0,00137118055555556000</text:p>
          </table:table-cell>
          <table:table-cell table:formula="of:=[.D361]-[.D36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33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375" calcext:value-type="float">
            <text:p>0,00137500000000000000</text:p>
          </table:table-cell>
          <table:table-cell table:formula="of:=[.D362]-[.D36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33" office:value-type="float" office:value="11913" calcext:value-type="float">
            <text:p>11913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37881944444444" calcext:value-type="float">
            <text:p>0,00137881944444444000</text:p>
          </table:table-cell>
          <table:table-cell table:formula="of:=[.D363]-[.D36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33" office:value-type="float" office:value="11946" calcext:value-type="float">
            <text:p>11946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38263888888889" calcext:value-type="float">
            <text:p>0,00138263888888889000</text:p>
          </table:table-cell>
          <table:table-cell table:formula="of:=[.D364]-[.D36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33" office:value-type="float" office:value="11979" calcext:value-type="float">
            <text:p>11979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38645833333333" calcext:value-type="float">
            <text:p>0,00138645833333333000</text:p>
          </table:table-cell>
          <table:table-cell table:formula="of:=[.D365]-[.D36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33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39027777777778" calcext:value-type="float">
            <text:p>0,00139027777777778000</text:p>
          </table:table-cell>
          <table:table-cell table:formula="of:=[.D366]-[.D36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33" office:value-type="float" office:value="12045" calcext:value-type="float">
            <text:p>1204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39409722222222" calcext:value-type="float">
            <text:p>0,00139409722222222000</text:p>
          </table:table-cell>
          <table:table-cell table:formula="of:=[.D367]-[.D36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33" office:value-type="float" office:value="12078" calcext:value-type="float">
            <text:p>12078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39791666666667" calcext:value-type="float">
            <text:p>0,00139791666666667000</text:p>
          </table:table-cell>
          <table:table-cell table:formula="of:=[.D368]-[.D36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33" office:value-type="float" office:value="12111" calcext:value-type="float">
            <text:p>12111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40173611111111" calcext:value-type="float">
            <text:p>0,00140173611111111000</text:p>
          </table:table-cell>
          <table:table-cell table:formula="of:=[.D369]-[.D36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33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40555555555556" calcext:value-type="float">
            <text:p>0,00140555555555556000</text:p>
          </table:table-cell>
          <table:table-cell table:formula="of:=[.D370]-[.D36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33" office:value-type="float" office:value="12177" calcext:value-type="float">
            <text:p>12177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409375" calcext:value-type="float">
            <text:p>0,00140937500000000000</text:p>
          </table:table-cell>
          <table:table-cell table:formula="of:=[.D371]-[.D37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33" office:value-type="float" office:value="12210" calcext:value-type="float">
            <text:p>1221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41319444444444" calcext:value-type="float">
            <text:p>0,00141319444444444000</text:p>
          </table:table-cell>
          <table:table-cell table:formula="of:=[.D372]-[.D37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33" office:value-type="float" office:value="12243" calcext:value-type="float">
            <text:p>12243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41701388888889" calcext:value-type="float">
            <text:p>0,00141701388888889000</text:p>
          </table:table-cell>
          <table:table-cell table:formula="of:=[.D373]-[.D37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33" office:value-type="float" office:value="12276" calcext:value-type="float">
            <text:p>12276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42083333333333" calcext:value-type="float">
            <text:p>0,00142083333333333000</text:p>
          </table:table-cell>
          <table:table-cell table:formula="of:=[.D374]-[.D37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33" office:value-type="float" office:value="12309" calcext:value-type="float">
            <text:p>12309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42465277777778" calcext:value-type="float">
            <text:p>0,00142465277777778000</text:p>
          </table:table-cell>
          <table:table-cell table:formula="of:=[.D375]-[.D37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33" office:value-type="float" office:value="12342" calcext:value-type="float">
            <text:p>12342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42847222222222" calcext:value-type="float">
            <text:p>0,00142847222222222000</text:p>
          </table:table-cell>
          <table:table-cell table:formula="of:=[.D376]-[.D37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33" office:value-type="float" office:value="12375" calcext:value-type="float">
            <text:p>123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43229166666667" calcext:value-type="float">
            <text:p>0,00143229166666667000</text:p>
          </table:table-cell>
          <table:table-cell table:formula="of:=[.D377]-[.D37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33" office:value-type="float" office:value="12408" calcext:value-type="float">
            <text:p>12408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43611111111111" calcext:value-type="float">
            <text:p>0,00143611111111111000</text:p>
          </table:table-cell>
          <table:table-cell table:formula="of:=[.D378]-[.D37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33" office:value-type="float" office:value="12441" calcext:value-type="float">
            <text:p>12441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43993055555556" calcext:value-type="float">
            <text:p>0,00143993055555556000</text:p>
          </table:table-cell>
          <table:table-cell table:formula="of:=[.D379]-[.D37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33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44375" calcext:value-type="float">
            <text:p>0,00144375000000000000</text:p>
          </table:table-cell>
          <table:table-cell table:formula="of:=[.D380]-[.D37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33" office:value-type="float" office:value="12507" calcext:value-type="float">
            <text:p>12507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44756944444444" calcext:value-type="float">
            <text:p>0,00144756944444444000</text:p>
          </table:table-cell>
          <table:table-cell table:formula="of:=[.D381]-[.D38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33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45138888888889" calcext:value-type="float">
            <text:p>0,00145138888888889000</text:p>
          </table:table-cell>
          <table:table-cell table:formula="of:=[.D382]-[.D38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33" office:value-type="float" office:value="12573" calcext:value-type="float">
            <text:p>12573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45520833333333" calcext:value-type="float">
            <text:p>0,00145520833333333000</text:p>
          </table:table-cell>
          <table:table-cell table:formula="of:=[.D383]-[.D38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33" office:value-type="float" office:value="12606" calcext:value-type="float">
            <text:p>12606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45902777777778" calcext:value-type="float">
            <text:p>0,00145902777777778000</text:p>
          </table:table-cell>
          <table:table-cell table:formula="of:=[.D384]-[.D38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33" office:value-type="float" office:value="12639" calcext:value-type="float">
            <text:p>12639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46284722222222" calcext:value-type="float">
            <text:p>0,00146284722222222000</text:p>
          </table:table-cell>
          <table:table-cell table:formula="of:=[.D385]-[.D38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33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46666666666667" calcext:value-type="float">
            <text:p>0,00146666666666667000</text:p>
          </table:table-cell>
          <table:table-cell table:formula="of:=[.D386]-[.D38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33" office:value-type="float" office:value="12705" calcext:value-type="float">
            <text:p>1270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47048611111111" calcext:value-type="float">
            <text:p>0,00147048611111111000</text:p>
          </table:table-cell>
          <table:table-cell table:formula="of:=[.D387]-[.D38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33" office:value-type="float" office:value="12738" calcext:value-type="float">
            <text:p>12738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47430555555556" calcext:value-type="float">
            <text:p>0,00147430555555556000</text:p>
          </table:table-cell>
          <table:table-cell table:formula="of:=[.D388]-[.D38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33" office:value-type="float" office:value="12771" calcext:value-type="float">
            <text:p>12771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478125" calcext:value-type="float">
            <text:p>0,00147812500000000000</text:p>
          </table:table-cell>
          <table:table-cell table:formula="of:=[.D389]-[.D38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33" office:value-type="float" office:value="12804" calcext:value-type="float">
            <text:p>12804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48194444444444" calcext:value-type="float">
            <text:p>0,00148194444444444000</text:p>
          </table:table-cell>
          <table:table-cell table:formula="of:=[.D390]-[.D38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33" office:value-type="float" office:value="12837" calcext:value-type="float">
            <text:p>12837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48576388888889" calcext:value-type="float">
            <text:p>0,00148576388888889000</text:p>
          </table:table-cell>
          <table:table-cell table:formula="of:=[.D391]-[.D39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33" office:value-type="float" office:value="12870" calcext:value-type="float">
            <text:p>1287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48958333333333" calcext:value-type="float">
            <text:p>0,00148958333333333000</text:p>
          </table:table-cell>
          <table:table-cell table:formula="of:=[.D392]-[.D39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33" office:value-type="float" office:value="12903" calcext:value-type="float">
            <text:p>12903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49340277777778" calcext:value-type="float">
            <text:p>0,00149340277777778000</text:p>
          </table:table-cell>
          <table:table-cell table:formula="of:=[.D393]-[.D39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33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49722222222222" calcext:value-type="float">
            <text:p>0,00149722222222222000</text:p>
          </table:table-cell>
          <table:table-cell table:formula="of:=[.D394]-[.D39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33" office:value-type="float" office:value="12969" calcext:value-type="float">
            <text:p>12969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50104166666667" calcext:value-type="float">
            <text:p>0,00150104166666667000</text:p>
          </table:table-cell>
          <table:table-cell table:formula="of:=[.D395]-[.D39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33" office:value-type="float" office:value="13002" calcext:value-type="float">
            <text:p>13002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50486111111111" calcext:value-type="float">
            <text:p>0,00150486111111111000</text:p>
          </table:table-cell>
          <table:table-cell table:formula="of:=[.D396]-[.D39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33" office:value-type="float" office:value="13035" calcext:value-type="float">
            <text:p>1303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50868055555556" calcext:value-type="float">
            <text:p>0,00150868055555556000</text:p>
          </table:table-cell>
          <table:table-cell table:formula="of:=[.D397]-[.D39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33" office:value-type="float" office:value="13068" calcext:value-type="float">
            <text:p>13068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5125" calcext:value-type="float">
            <text:p>0,00151250000000000000</text:p>
          </table:table-cell>
          <table:table-cell table:formula="of:=[.D398]-[.D39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33" office:value-type="float" office:value="13101" calcext:value-type="float">
            <text:p>13101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51631944444444" calcext:value-type="float">
            <text:p>0,00151631944444444000</text:p>
          </table:table-cell>
          <table:table-cell table:formula="of:=[.D399]-[.D39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33" office:value-type="float" office:value="13134" calcext:value-type="float">
            <text:p>13134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52013888888889" calcext:value-type="float">
            <text:p>0,00152013888888889000</text:p>
          </table:table-cell>
          <table:table-cell table:formula="of:=[.D400]-[.D39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33" office:value-type="float" office:value="13167" calcext:value-type="float">
            <text:p>13167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52395833333333" calcext:value-type="float">
            <text:p>0,00152395833333333000</text:p>
          </table:table-cell>
          <table:table-cell table:formula="of:=[.D401]-[.D40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33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52777777777778" calcext:value-type="float">
            <text:p>0,00152777777777778000</text:p>
          </table:table-cell>
          <table:table-cell table:formula="of:=[.D402]-[.D40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33" office:value-type="float" office:value="13233" calcext:value-type="float">
            <text:p>13233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53159722222222" calcext:value-type="float">
            <text:p>0,00153159722222222000</text:p>
          </table:table-cell>
          <table:table-cell table:formula="of:=[.D403]-[.D40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33" office:value-type="float" office:value="13266" calcext:value-type="float">
            <text:p>13266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53541666666667" calcext:value-type="float">
            <text:p>0,00153541666666667000</text:p>
          </table:table-cell>
          <table:table-cell table:formula="of:=[.D404]-[.D40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33" office:value-type="float" office:value="13299" calcext:value-type="float">
            <text:p>13299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53923611111111" calcext:value-type="float">
            <text:p>0,00153923611111111000</text:p>
          </table:table-cell>
          <table:table-cell table:formula="of:=[.D405]-[.D40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33" office:value-type="float" office:value="13332" calcext:value-type="float">
            <text:p>13332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54305555555556" calcext:value-type="float">
            <text:p>0,00154305555555556000</text:p>
          </table:table-cell>
          <table:table-cell table:formula="of:=[.D406]-[.D40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33" office:value-type="float" office:value="13365" calcext:value-type="float">
            <text:p>1336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546875" calcext:value-type="float">
            <text:p>0,00154687500000000000</text:p>
          </table:table-cell>
          <table:table-cell table:formula="of:=[.D407]-[.D40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33" office:value-type="float" office:value="13398" calcext:value-type="float">
            <text:p>13398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55069444444444" calcext:value-type="float">
            <text:p>0,00155069444444444000</text:p>
          </table:table-cell>
          <table:table-cell table:formula="of:=[.D408]-[.D40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33" office:value-type="float" office:value="13431" calcext:value-type="float">
            <text:p>13431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55451388888889" calcext:value-type="float">
            <text:p>0,00155451388888889000</text:p>
          </table:table-cell>
          <table:table-cell table:formula="of:=[.D409]-[.D40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33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55833333333333" calcext:value-type="float">
            <text:p>0,00155833333333333000</text:p>
          </table:table-cell>
          <table:table-cell table:formula="of:=[.D410]-[.D40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33" office:value-type="float" office:value="13497" calcext:value-type="float">
            <text:p>13497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56215277777778" calcext:value-type="float">
            <text:p>0,00156215277777778000</text:p>
          </table:table-cell>
          <table:table-cell table:formula="of:=[.D411]-[.D41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33" office:value-type="float" office:value="13530" calcext:value-type="float">
            <text:p>1353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56597222222222" calcext:value-type="float">
            <text:p>0,00156597222222222000</text:p>
          </table:table-cell>
          <table:table-cell table:formula="of:=[.D412]-[.D41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33" office:value-type="float" office:value="13563" calcext:value-type="float">
            <text:p>13563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56979166666667" calcext:value-type="float">
            <text:p>0,00156979166666667000</text:p>
          </table:table-cell>
          <table:table-cell table:formula="of:=[.D413]-[.D41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33" office:value-type="float" office:value="13596" calcext:value-type="float">
            <text:p>13596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57361111111111" calcext:value-type="float">
            <text:p>0,00157361111111111000</text:p>
          </table:table-cell>
          <table:table-cell table:formula="of:=[.D414]-[.D41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33" office:value-type="float" office:value="13629" calcext:value-type="float">
            <text:p>13629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57743055555556" calcext:value-type="float">
            <text:p>0,00157743055555556000</text:p>
          </table:table-cell>
          <table:table-cell table:formula="of:=[.D415]-[.D41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33" office:value-type="float" office:value="13662" calcext:value-type="float">
            <text:p>13662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58125" calcext:value-type="float">
            <text:p>0,00158125000000000000</text:p>
          </table:table-cell>
          <table:table-cell table:formula="of:=[.D416]-[.D41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33" office:value-type="float" office:value="13695" calcext:value-type="float">
            <text:p>1369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58506944444444" calcext:value-type="float">
            <text:p>0,00158506944444444000</text:p>
          </table:table-cell>
          <table:table-cell table:formula="of:=[.D417]-[.D41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33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58888888888889" calcext:value-type="float">
            <text:p>0,00158888888888889000</text:p>
          </table:table-cell>
          <table:table-cell table:formula="of:=[.D418]-[.D41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33" office:value-type="float" office:value="13761" calcext:value-type="float">
            <text:p>13761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59270833333333" calcext:value-type="float">
            <text:p>0,00159270833333333000</text:p>
          </table:table-cell>
          <table:table-cell table:formula="of:=[.D419]-[.D41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33" office:value-type="float" office:value="13794" calcext:value-type="float">
            <text:p>13794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59652777777778" calcext:value-type="float">
            <text:p>0,00159652777777778000</text:p>
          </table:table-cell>
          <table:table-cell table:formula="of:=[.D420]-[.D41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33" office:value-type="float" office:value="13827" calcext:value-type="float">
            <text:p>13827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60034722222222" calcext:value-type="float">
            <text:p>0,00160034722222222000</text:p>
          </table:table-cell>
          <table:table-cell table:formula="of:=[.D421]-[.D42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33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60416666666667" calcext:value-type="float">
            <text:p>0,00160416666666667000</text:p>
          </table:table-cell>
          <table:table-cell table:formula="of:=[.D422]-[.D42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33" office:value-type="float" office:value="13893" calcext:value-type="float">
            <text:p>13893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60798611111111" calcext:value-type="float">
            <text:p>0,00160798611111111000</text:p>
          </table:table-cell>
          <table:table-cell table:formula="of:=[.D423]-[.D42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33" office:value-type="float" office:value="13926" calcext:value-type="float">
            <text:p>13926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61180555555556" calcext:value-type="float">
            <text:p>0,00161180555555556000</text:p>
          </table:table-cell>
          <table:table-cell table:formula="of:=[.D424]-[.D42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33" office:value-type="float" office:value="13959" calcext:value-type="float">
            <text:p>13959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615625" calcext:value-type="float">
            <text:p>0,00161562500000000000</text:p>
          </table:table-cell>
          <table:table-cell table:formula="of:=[.D425]-[.D42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33" office:value-type="float" office:value="13992" calcext:value-type="float">
            <text:p>13992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61944444444444" calcext:value-type="float">
            <text:p>0,00161944444444444000</text:p>
          </table:table-cell>
          <table:table-cell table:formula="of:=[.D426]-[.D42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33" office:value-type="float" office:value="14025" calcext:value-type="float">
            <text:p>1402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62326388888889" calcext:value-type="float">
            <text:p>0,00162326388888889000</text:p>
          </table:table-cell>
          <table:table-cell table:formula="of:=[.D427]-[.D42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33" office:value-type="float" office:value="14058" calcext:value-type="float">
            <text:p>14058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62708333333333" calcext:value-type="float">
            <text:p>0,00162708333333333000</text:p>
          </table:table-cell>
          <table:table-cell table:formula="of:=[.D428]-[.D42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33" office:value-type="float" office:value="14091" calcext:value-type="float">
            <text:p>14091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63090277777778" calcext:value-type="float">
            <text:p>0,00163090277777778000</text:p>
          </table:table-cell>
          <table:table-cell table:formula="of:=[.D429]-[.D42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33" office:value-type="float" office:value="14124" calcext:value-type="float">
            <text:p>14124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63472222222222" calcext:value-type="float">
            <text:p>0,00163472222222222000</text:p>
          </table:table-cell>
          <table:table-cell table:formula="of:=[.D430]-[.D42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33" office:value-type="float" office:value="14157" calcext:value-type="float">
            <text:p>14157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63854166666667" calcext:value-type="float">
            <text:p>0,00163854166666667000</text:p>
          </table:table-cell>
          <table:table-cell table:formula="of:=[.D431]-[.D43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33" office:value-type="float" office:value="14190" calcext:value-type="float">
            <text:p>1419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64236111111111" calcext:value-type="float">
            <text:p>0,00164236111111111000</text:p>
          </table:table-cell>
          <table:table-cell table:formula="of:=[.D432]-[.D43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33" office:value-type="float" office:value="14223" calcext:value-type="float">
            <text:p>14223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64618055555556" calcext:value-type="float">
            <text:p>0,00164618055555556000</text:p>
          </table:table-cell>
          <table:table-cell table:formula="of:=[.D433]-[.D43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33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65" calcext:value-type="float">
            <text:p>0,00165000000000000000</text:p>
          </table:table-cell>
          <table:table-cell table:formula="of:=[.D434]-[.D43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33" office:value-type="float" office:value="14289" calcext:value-type="float">
            <text:p>14289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65381944444444" calcext:value-type="float">
            <text:p>0,00165381944444444000</text:p>
          </table:table-cell>
          <table:table-cell table:formula="of:=[.D435]-[.D43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33" office:value-type="float" office:value="14322" calcext:value-type="float">
            <text:p>14322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65763888888889" calcext:value-type="float">
            <text:p>0,00165763888888889000</text:p>
          </table:table-cell>
          <table:table-cell table:formula="of:=[.D436]-[.D43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33" office:value-type="float" office:value="14355" calcext:value-type="float">
            <text:p>1435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66145833333333" calcext:value-type="float">
            <text:p>0,00166145833333333000</text:p>
          </table:table-cell>
          <table:table-cell table:formula="of:=[.D437]-[.D43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33" office:value-type="float" office:value="14388" calcext:value-type="float">
            <text:p>14388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66527777777778" calcext:value-type="float">
            <text:p>0,00166527777777778000</text:p>
          </table:table-cell>
          <table:table-cell table:formula="of:=[.D438]-[.D43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33" office:value-type="float" office:value="14421" calcext:value-type="float">
            <text:p>14421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66909722222222" calcext:value-type="float">
            <text:p>0,00166909722222222000</text:p>
          </table:table-cell>
          <table:table-cell table:formula="of:=[.D439]-[.D43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33" office:value-type="float" office:value="14454" calcext:value-type="float">
            <text:p>14454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67291666666667" calcext:value-type="float">
            <text:p>0,00167291666666667000</text:p>
          </table:table-cell>
          <table:table-cell table:formula="of:=[.D440]-[.D43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33" office:value-type="float" office:value="14487" calcext:value-type="float">
            <text:p>14487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67673611111111" calcext:value-type="float">
            <text:p>0,00167673611111111000</text:p>
          </table:table-cell>
          <table:table-cell table:formula="of:=[.D441]-[.D44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33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68055555555556" calcext:value-type="float">
            <text:p>0,00168055555555556000</text:p>
          </table:table-cell>
          <table:table-cell table:formula="of:=[.D442]-[.D44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33" office:value-type="float" office:value="14553" calcext:value-type="float">
            <text:p>14553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684375" calcext:value-type="float">
            <text:p>0,00168437500000000000</text:p>
          </table:table-cell>
          <table:table-cell table:formula="of:=[.D443]-[.D44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33" office:value-type="float" office:value="14586" calcext:value-type="float">
            <text:p>14586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68819444444444" calcext:value-type="float">
            <text:p>0,00168819444444444000</text:p>
          </table:table-cell>
          <table:table-cell table:formula="of:=[.D444]-[.D44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33" office:value-type="float" office:value="14619" calcext:value-type="float">
            <text:p>14619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69201388888889" calcext:value-type="float">
            <text:p>0,00169201388888889000</text:p>
          </table:table-cell>
          <table:table-cell table:formula="of:=[.D445]-[.D44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33" office:value-type="float" office:value="14652" calcext:value-type="float">
            <text:p>14652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69583333333333" calcext:value-type="float">
            <text:p>0,00169583333333333000</text:p>
          </table:table-cell>
          <table:table-cell table:formula="of:=[.D446]-[.D44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33" office:value-type="float" office:value="14685" calcext:value-type="float">
            <text:p>1468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69965277777778" calcext:value-type="float">
            <text:p>0,00169965277777778000</text:p>
          </table:table-cell>
          <table:table-cell table:formula="of:=[.D447]-[.D44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33" office:value-type="float" office:value="14718" calcext:value-type="float">
            <text:p>14718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70347222222222" calcext:value-type="float">
            <text:p>0,00170347222222222000</text:p>
          </table:table-cell>
          <table:table-cell table:formula="of:=[.D448]-[.D44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33" office:value-type="float" office:value="14751" calcext:value-type="float">
            <text:p>14751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70729166666667" calcext:value-type="float">
            <text:p>0,00170729166666667000</text:p>
          </table:table-cell>
          <table:table-cell table:formula="of:=[.D449]-[.D44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33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71111111111111" calcext:value-type="float">
            <text:p>0,00171111111111111000</text:p>
          </table:table-cell>
          <table:table-cell table:formula="of:=[.D450]-[.D44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33" office:value-type="float" office:value="14817" calcext:value-type="float">
            <text:p>14817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71493055555556" calcext:value-type="float">
            <text:p>0,00171493055555556000</text:p>
          </table:table-cell>
          <table:table-cell table:formula="of:=[.D451]-[.D45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33" office:value-type="float" office:value="14850" calcext:value-type="float">
            <text:p>148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71875" calcext:value-type="float">
            <text:p>0,00171875000000000000</text:p>
          </table:table-cell>
          <table:table-cell table:formula="of:=[.D452]-[.D45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33" office:value-type="float" office:value="14883" calcext:value-type="float">
            <text:p>14883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72256944444444" calcext:value-type="float">
            <text:p>0,00172256944444444000</text:p>
          </table:table-cell>
          <table:table-cell table:formula="of:=[.D453]-[.D45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33" office:value-type="float" office:value="14916" calcext:value-type="float">
            <text:p>14916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72638888888889" calcext:value-type="float">
            <text:p>0,00172638888888889000</text:p>
          </table:table-cell>
          <table:table-cell table:formula="of:=[.D454]-[.D45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33" office:value-type="float" office:value="14949" calcext:value-type="float">
            <text:p>14949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73020833333333" calcext:value-type="float">
            <text:p>0,00173020833333333000</text:p>
          </table:table-cell>
          <table:table-cell table:formula="of:=[.D455]-[.D45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33" office:value-type="float" office:value="14982" calcext:value-type="float">
            <text:p>14982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73402777777778" calcext:value-type="float">
            <text:p>0,00173402777777778000</text:p>
          </table:table-cell>
          <table:table-cell table:formula="of:=[.D456]-[.D45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33" office:value-type="float" office:value="15015" calcext:value-type="float">
            <text:p>1501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73784722222222" calcext:value-type="float">
            <text:p>0,00173784722222222000</text:p>
          </table:table-cell>
          <table:table-cell table:formula="of:=[.D457]-[.D45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33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74166666666667" calcext:value-type="float">
            <text:p>0,00174166666666667000</text:p>
          </table:table-cell>
          <table:table-cell table:formula="of:=[.D458]-[.D45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33" office:value-type="float" office:value="15081" calcext:value-type="float">
            <text:p>15081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74548611111111" calcext:value-type="float">
            <text:p>0,00174548611111111000</text:p>
          </table:table-cell>
          <table:table-cell table:formula="of:=[.D459]-[.D45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33" office:value-type="float" office:value="15114" calcext:value-type="float">
            <text:p>15114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74930555555556" calcext:value-type="float">
            <text:p>0,00174930555555556000</text:p>
          </table:table-cell>
          <table:table-cell table:formula="of:=[.D460]-[.D45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33" office:value-type="float" office:value="15147" calcext:value-type="float">
            <text:p>15147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753125" calcext:value-type="float">
            <text:p>0,00175312500000000000</text:p>
          </table:table-cell>
          <table:table-cell table:formula="of:=[.D461]-[.D46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33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75694444444444" calcext:value-type="float">
            <text:p>0,00175694444444444000</text:p>
          </table:table-cell>
          <table:table-cell table:formula="of:=[.D462]-[.D46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33" office:value-type="float" office:value="15213" calcext:value-type="float">
            <text:p>15213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76076388888889" calcext:value-type="float">
            <text:p>0,00176076388888889000</text:p>
          </table:table-cell>
          <table:table-cell table:formula="of:=[.D463]-[.D46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33" office:value-type="float" office:value="15246" calcext:value-type="float">
            <text:p>15246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76458333333333" calcext:value-type="float">
            <text:p>0,00176458333333333000</text:p>
          </table:table-cell>
          <table:table-cell table:formula="of:=[.D464]-[.D46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33" office:value-type="float" office:value="15279" calcext:value-type="float">
            <text:p>15279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76840277777778" calcext:value-type="float">
            <text:p>0,00176840277777778000</text:p>
          </table:table-cell>
          <table:table-cell table:formula="of:=[.D465]-[.D46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33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77222222222222" calcext:value-type="float">
            <text:p>0,00177222222222222000</text:p>
          </table:table-cell>
          <table:table-cell table:formula="of:=[.D466]-[.D465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33" office:value-type="float" office:value="15345" calcext:value-type="float">
            <text:p>1534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77604166666667" calcext:value-type="float">
            <text:p>0,00177604166666667000</text:p>
          </table:table-cell>
          <table:table-cell table:formula="of:=[.D467]-[.D46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33" office:value-type="float" office:value="15378" calcext:value-type="float">
            <text:p>15378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77986111111111" calcext:value-type="float">
            <text:p>0,00177986111111111000</text:p>
          </table:table-cell>
          <table:table-cell table:formula="of:=[.D468]-[.D46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33" office:value-type="float" office:value="15411" calcext:value-type="float">
            <text:p>15411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78368055555556" calcext:value-type="float">
            <text:p>0,00178368055555556000</text:p>
          </table:table-cell>
          <table:table-cell table:formula="of:=[.D469]-[.D46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33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7875" calcext:value-type="float">
            <text:p>0,00178750000000000000</text:p>
          </table:table-cell>
          <table:table-cell table:formula="of:=[.D470]-[.D46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33" office:value-type="float" office:value="15477" calcext:value-type="float">
            <text:p>15477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79131944444444" calcext:value-type="float">
            <text:p>0,00179131944444444000</text:p>
          </table:table-cell>
          <table:table-cell table:formula="of:=[.D471]-[.D470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33" office:value-type="float" office:value="15510" calcext:value-type="float">
            <text:p>1551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79513888888889" calcext:value-type="float">
            <text:p>0,00179513888888889000</text:p>
          </table:table-cell>
          <table:table-cell table:formula="of:=[.D472]-[.D47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33" office:value-type="float" office:value="15543" calcext:value-type="float">
            <text:p>15543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79895833333333" calcext:value-type="float">
            <text:p>0,00179895833333333000</text:p>
          </table:table-cell>
          <table:table-cell table:formula="of:=[.D473]-[.D47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33" office:value-type="float" office:value="15576" calcext:value-type="float">
            <text:p>15576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80277777777778" calcext:value-type="float">
            <text:p>0,00180277777777778000</text:p>
          </table:table-cell>
          <table:table-cell table:formula="of:=[.D474]-[.D47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33" office:value-type="float" office:value="15609" calcext:value-type="float">
            <text:p>15609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80659722222222" calcext:value-type="float">
            <text:p>0,00180659722222222000</text:p>
          </table:table-cell>
          <table:table-cell table:formula="of:=[.D475]-[.D47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33" office:value-type="float" office:value="15642" calcext:value-type="float">
            <text:p>15642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81041666666667" calcext:value-type="float">
            <text:p>0,00181041666666667000</text:p>
          </table:table-cell>
          <table:table-cell table:formula="of:=[.D476]-[.D47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33" office:value-type="float" office:value="15675" calcext:value-type="float">
            <text:p>1567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81423611111111" calcext:value-type="float">
            <text:p>0,00181423611111111000</text:p>
          </table:table-cell>
          <table:table-cell table:formula="of:=[.D477]-[.D47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33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81805555555556" calcext:value-type="float">
            <text:p>0,00181805555555556000</text:p>
          </table:table-cell>
          <table:table-cell table:formula="of:=[.D478]-[.D47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33" office:value-type="float" office:value="15741" calcext:value-type="float">
            <text:p>15741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821875" calcext:value-type="float">
            <text:p>0,00182187500000000000</text:p>
          </table:table-cell>
          <table:table-cell table:formula="of:=[.D479]-[.D47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33" office:value-type="float" office:value="15774" calcext:value-type="float">
            <text:p>15774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82569444444444" calcext:value-type="float">
            <text:p>0,00182569444444444000</text:p>
          </table:table-cell>
          <table:table-cell table:formula="of:=[.D480]-[.D47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33" office:value-type="float" office:value="15807" calcext:value-type="float">
            <text:p>15807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82951388888889" calcext:value-type="float">
            <text:p>0,00182951388888889000</text:p>
          </table:table-cell>
          <table:table-cell table:formula="of:=[.D481]-[.D48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33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83333333333333" calcext:value-type="float">
            <text:p>0,00183333333333333000</text:p>
          </table:table-cell>
          <table:table-cell table:formula="of:=[.D482]-[.D48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33" office:value-type="float" office:value="15873" calcext:value-type="float">
            <text:p>15873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83715277777778" calcext:value-type="float">
            <text:p>0,00183715277777778000</text:p>
          </table:table-cell>
          <table:table-cell table:formula="of:=[.D483]-[.D48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33" office:value-type="float" office:value="15906" calcext:value-type="float">
            <text:p>15906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84097222222222" calcext:value-type="float">
            <text:p>0,00184097222222222000</text:p>
          </table:table-cell>
          <table:table-cell table:formula="of:=[.D484]-[.D48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33" office:value-type="float" office:value="15939" calcext:value-type="float">
            <text:p>15939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84479166666667" calcext:value-type="float">
            <text:p>0,00184479166666667000</text:p>
          </table:table-cell>
          <table:table-cell table:formula="of:=[.D485]-[.D48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33" office:value-type="float" office:value="15972" calcext:value-type="float">
            <text:p>15972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84861111111111" calcext:value-type="float">
            <text:p>0,00184861111111111000</text:p>
          </table:table-cell>
          <table:table-cell table:formula="of:=[.D486]-[.D48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33" office:value-type="float" office:value="16005" calcext:value-type="float">
            <text:p>1600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85243055555556" calcext:value-type="float">
            <text:p>0,00185243055555556000</text:p>
          </table:table-cell>
          <table:table-cell table:formula="of:=[.D487]-[.D48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33" office:value-type="float" office:value="16038" calcext:value-type="float">
            <text:p>16038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85625" calcext:value-type="float">
            <text:p>0,00185625000000000000</text:p>
          </table:table-cell>
          <table:table-cell table:formula="of:=[.D488]-[.D48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33" office:value-type="float" office:value="16071" calcext:value-type="float">
            <text:p>16071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86006944444444" calcext:value-type="float">
            <text:p>0,00186006944444444000</text:p>
          </table:table-cell>
          <table:table-cell table:formula="of:=[.D489]-[.D48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33" office:value-type="float" office:value="16104" calcext:value-type="float">
            <text:p>16104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86388888888889" calcext:value-type="float">
            <text:p>0,00186388888888889000</text:p>
          </table:table-cell>
          <table:table-cell table:formula="of:=[.D490]-[.D48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33" office:value-type="float" office:value="16137" calcext:value-type="float">
            <text:p>16137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86770833333333" calcext:value-type="float">
            <text:p>0,00186770833333333000</text:p>
          </table:table-cell>
          <table:table-cell table:formula="of:=[.D491]-[.D49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33" office:value-type="float" office:value="16170" calcext:value-type="float">
            <text:p>1617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87152777777778" calcext:value-type="float">
            <text:p>0,00187152777777778000</text:p>
          </table:table-cell>
          <table:table-cell table:formula="of:=[.D492]-[.D49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33" office:value-type="float" office:value="16203" calcext:value-type="float">
            <text:p>16203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87534722222222" calcext:value-type="float">
            <text:p>0,00187534722222222000</text:p>
          </table:table-cell>
          <table:table-cell table:formula="of:=[.D493]-[.D49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33" office:value-type="float" office:value="16236" calcext:value-type="float">
            <text:p>16236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87916666666667" calcext:value-type="float">
            <text:p>0,00187916666666667000</text:p>
          </table:table-cell>
          <table:table-cell table:formula="of:=[.D494]-[.D493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33" office:value-type="float" office:value="16269" calcext:value-type="float">
            <text:p>16269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88298611111111" calcext:value-type="float">
            <text:p>0,00188298611111111000</text:p>
          </table:table-cell>
          <table:table-cell table:formula="of:=[.D495]-[.D49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33" office:value-type="float" office:value="16302" calcext:value-type="float">
            <text:p>16302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88680555555556" calcext:value-type="float">
            <text:p>0,00188680555555556000</text:p>
          </table:table-cell>
          <table:table-cell table:formula="of:=[.D496]-[.D49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33" office:value-type="float" office:value="16335" calcext:value-type="float">
            <text:p>1633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890625" calcext:value-type="float">
            <text:p>0,00189062500000000000</text:p>
          </table:table-cell>
          <table:table-cell table:formula="of:=[.D497]-[.D49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33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89444444444444" calcext:value-type="float">
            <text:p>0,00189444444444444000</text:p>
          </table:table-cell>
          <table:table-cell table:formula="of:=[.D498]-[.D49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33" office:value-type="float" office:value="16401" calcext:value-type="float">
            <text:p>16401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89826388888889" calcext:value-type="float">
            <text:p>0,00189826388888889000</text:p>
          </table:table-cell>
          <table:table-cell table:formula="of:=[.D499]-[.D498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33" office:value-type="float" office:value="16434" calcext:value-type="float">
            <text:p>16434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90208333333333" calcext:value-type="float">
            <text:p>0,00190208333333333000</text:p>
          </table:table-cell>
          <table:table-cell table:formula="of:=[.D500]-[.D49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33" office:value-type="float" office:value="16467" calcext:value-type="float">
            <text:p>16467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90590277777778" calcext:value-type="float">
            <text:p>0,00190590277777778000</text:p>
          </table:table-cell>
          <table:table-cell table:formula="of:=[.D501]-[.D50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33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90972222222222" calcext:value-type="float">
            <text:p>0,00190972222222222000</text:p>
          </table:table-cell>
          <table:table-cell table:formula="of:=[.D502]-[.D50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33" office:value-type="float" office:value="16533" calcext:value-type="float">
            <text:p>16533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91354166666667" calcext:value-type="float">
            <text:p>0,00191354166666667000</text:p>
          </table:table-cell>
          <table:table-cell table:formula="of:=[.D503]-[.D502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33" office:value-type="float" office:value="16566" calcext:value-type="float">
            <text:p>16566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91736111111111" calcext:value-type="float">
            <text:p>0,00191736111111111000</text:p>
          </table:table-cell>
          <table:table-cell table:formula="of:=[.D504]-[.D50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33" office:value-type="float" office:value="16599" calcext:value-type="float">
            <text:p>16599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92118055555556" calcext:value-type="float">
            <text:p>0,00192118055555556000</text:p>
          </table:table-cell>
          <table:table-cell table:formula="of:=[.D505]-[.D504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33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925" calcext:value-type="float">
            <text:p>0,00192500000000000000</text:p>
          </table:table-cell>
          <table:table-cell table:formula="of:=[.D506]-[.D50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33" office:value-type="float" office:value="16665" calcext:value-type="float">
            <text:p>1666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92881944444444" calcext:value-type="float">
            <text:p>0,00192881944444444000</text:p>
          </table:table-cell>
          <table:table-cell table:formula="of:=[.D507]-[.D506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33" office:value-type="float" office:value="16698" calcext:value-type="float">
            <text:p>16698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93263888888889" calcext:value-type="float">
            <text:p>0,00193263888888889000</text:p>
          </table:table-cell>
          <table:table-cell table:formula="of:=[.D508]-[.D507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33" office:value-type="float" office:value="16731" calcext:value-type="float">
            <text:p>16731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93645833333333" calcext:value-type="float">
            <text:p>0,00193645833333333000</text:p>
          </table:table-cell>
          <table:table-cell table:formula="of:=[.D509]-[.D50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33" office:value-type="float" office:value="16764" calcext:value-type="float">
            <text:p>16764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94027777777778" calcext:value-type="float">
            <text:p>0,00194027777777778000</text:p>
          </table:table-cell>
          <table:table-cell table:formula="of:=[.D510]-[.D509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33" office:value-type="float" office:value="16797" calcext:value-type="float">
            <text:p>16797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94409722222222" calcext:value-type="float">
            <text:p>0,00194409722222222000</text:p>
          </table:table-cell>
          <table:table-cell table:formula="of:=[.D511]-[.D51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33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94791666666667" calcext:value-type="float">
            <text:p>0,00194791666666667000</text:p>
          </table:table-cell>
          <table:table-cell table:formula="of:=[.D512]-[.D511]" office:value-type="float" office:value="0.00000381944444444453" calcext:value-type="float">
            <text:p>0,0000038194444444445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33" office:value-type="float" office:value="16863" calcext:value-type="float">
            <text:p>16863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95173611111111" calcext:value-type="float">
            <text:p>0,00195173611111111000</text:p>
          </table:table-cell>
          <table:table-cell table:formula="of:=[.D513]-[.D51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33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95555555555556" calcext:value-type="float">
            <text:p>0,00195555555555556000</text:p>
          </table:table-cell>
          <table:table-cell table:formula="of:=[.D514]-[.D513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33" office:value-type="float" office:value="16929" calcext:value-type="float">
            <text:p>16929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959375" calcext:value-type="float">
            <text:p>0,00195937500000000000</text:p>
          </table:table-cell>
          <table:table-cell table:formula="of:=[.D515]-[.D51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33" office:value-type="float" office:value="16962" calcext:value-type="float">
            <text:p>16962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96319444444444" calcext:value-type="float">
            <text:p>0,00196319444444444000</text:p>
          </table:table-cell>
          <table:table-cell table:formula="of:=[.D516]-[.D51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33" office:value-type="float" office:value="16995" calcext:value-type="float">
            <text:p>1699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96701388888889" calcext:value-type="float">
            <text:p>0,00196701388888889000</text:p>
          </table:table-cell>
          <table:table-cell table:formula="of:=[.D517]-[.D51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33" office:value-type="float" office:value="17028" calcext:value-type="float">
            <text:p>17028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97083333333333" calcext:value-type="float">
            <text:p>0,00197083333333333000</text:p>
          </table:table-cell>
          <table:table-cell table:formula="of:=[.D518]-[.D517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33" office:value-type="float" office:value="17061" calcext:value-type="float">
            <text:p>17061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97465277777778" calcext:value-type="float">
            <text:p>0,00197465277777778000</text:p>
          </table:table-cell>
          <table:table-cell table:formula="of:=[.D519]-[.D51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33" office:value-type="float" office:value="17094" calcext:value-type="float">
            <text:p>17094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97847222222222" calcext:value-type="float">
            <text:p>0,00197847222222222000</text:p>
          </table:table-cell>
          <table:table-cell table:formula="of:=[.D520]-[.D51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33" office:value-type="float" office:value="17127" calcext:value-type="float">
            <text:p>17127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98229166666667" calcext:value-type="float">
            <text:p>0,00198229166666667000</text:p>
          </table:table-cell>
          <table:table-cell table:formula="of:=[.D521]-[.D520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33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98611111111111" calcext:value-type="float">
            <text:p>0,00198611111111111000</text:p>
          </table:table-cell>
          <table:table-cell table:formula="of:=[.D522]-[.D52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33" office:value-type="float" office:value="17193" calcext:value-type="float">
            <text:p>17193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98993055555556" calcext:value-type="float">
            <text:p>0,00198993055555556000</text:p>
          </table:table-cell>
          <table:table-cell table:formula="of:=[.D523]-[.D52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33" office:value-type="float" office:value="17226" calcext:value-type="float">
            <text:p>17226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99375" calcext:value-type="float">
            <text:p>0,00199375000000000000</text:p>
          </table:table-cell>
          <table:table-cell table:formula="of:=[.D524]-[.D523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33" office:value-type="float" office:value="17259" calcext:value-type="float">
            <text:p>17259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99756944444444" calcext:value-type="float">
            <text:p>0,00199756944444444000</text:p>
          </table:table-cell>
          <table:table-cell table:formula="of:=[.D525]-[.D52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33" office:value-type="float" office:value="17292" calcext:value-type="float">
            <text:p>17292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200138888888889" calcext:value-type="float">
            <text:p>0,00200138888888889000</text:p>
          </table:table-cell>
          <table:table-cell table:formula="of:=[.D526]-[.D52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33" office:value-type="float" office:value="17325" calcext:value-type="float">
            <text:p>1732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200520833333333" calcext:value-type="float">
            <text:p>0,00200520833333333000</text:p>
          </table:table-cell>
          <table:table-cell table:formula="of:=[.D527]-[.D526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33" office:value-type="float" office:value="17358" calcext:value-type="float">
            <text:p>17358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200902777777778" calcext:value-type="float">
            <text:p>0,00200902777777778000</text:p>
          </table:table-cell>
          <table:table-cell table:formula="of:=[.D528]-[.D52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33" office:value-type="float" office:value="17391" calcext:value-type="float">
            <text:p>17391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201284722222222" calcext:value-type="float">
            <text:p>0,00201284722222222000</text:p>
          </table:table-cell>
          <table:table-cell table:formula="of:=[.D529]-[.D52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33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201666666666667" calcext:value-type="float">
            <text:p>0,00201666666666667000</text:p>
          </table:table-cell>
          <table:table-cell table:formula="of:=[.D530]-[.D52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33" office:value-type="float" office:value="17457" calcext:value-type="float">
            <text:p>17457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202048611111111" calcext:value-type="float">
            <text:p>0,00202048611111111000</text:p>
          </table:table-cell>
          <table:table-cell table:formula="of:=[.D531]-[.D530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33" office:value-type="float" office:value="17490" calcext:value-type="float">
            <text:p>1749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202430555555556" calcext:value-type="float">
            <text:p>0,00202430555555556000</text:p>
          </table:table-cell>
          <table:table-cell table:formula="of:=[.D532]-[.D53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33" office:value-type="float" office:value="17523" calcext:value-type="float">
            <text:p>17523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2028125" calcext:value-type="float">
            <text:p>0,00202812500000000000</text:p>
          </table:table-cell>
          <table:table-cell table:formula="of:=[.D533]-[.D53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33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203194444444444" calcext:value-type="float">
            <text:p>0,00203194444444444000</text:p>
          </table:table-cell>
          <table:table-cell table:formula="of:=[.D534]-[.D533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33" office:value-type="float" office:value="17589" calcext:value-type="float">
            <text:p>17589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203576388888889" calcext:value-type="float">
            <text:p>0,00203576388888889000</text:p>
          </table:table-cell>
          <table:table-cell table:formula="of:=[.D535]-[.D53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33" office:value-type="float" office:value="17622" calcext:value-type="float">
            <text:p>17622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203958333333333" calcext:value-type="float">
            <text:p>0,00203958333333333000</text:p>
          </table:table-cell>
          <table:table-cell table:formula="of:=[.D536]-[.D53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33" office:value-type="float" office:value="17655" calcext:value-type="float">
            <text:p>1765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204340277777778" calcext:value-type="float">
            <text:p>0,00204340277777778000</text:p>
          </table:table-cell>
          <table:table-cell table:formula="of:=[.D537]-[.D536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33" office:value-type="float" office:value="17688" calcext:value-type="float">
            <text:p>17688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204722222222222" calcext:value-type="float">
            <text:p>0,00204722222222222000</text:p>
          </table:table-cell>
          <table:table-cell table:formula="of:=[.D538]-[.D53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33" office:value-type="float" office:value="17721" calcext:value-type="float">
            <text:p>17721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205104166666667" calcext:value-type="float">
            <text:p>0,00205104166666667000</text:p>
          </table:table-cell>
          <table:table-cell table:formula="of:=[.D539]-[.D53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33" office:value-type="float" office:value="17754" calcext:value-type="float">
            <text:p>17754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205486111111111" calcext:value-type="float">
            <text:p>0,00205486111111111000</text:p>
          </table:table-cell>
          <table:table-cell table:formula="of:=[.D540]-[.D53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33" office:value-type="float" office:value="17787" calcext:value-type="float">
            <text:p>17787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205868055555556" calcext:value-type="float">
            <text:p>0,00205868055555556000</text:p>
          </table:table-cell>
          <table:table-cell table:formula="of:=[.D541]-[.D540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33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20625" calcext:value-type="float">
            <text:p>0,00206250000000000000</text:p>
          </table:table-cell>
          <table:table-cell table:formula="of:=[.D542]-[.D54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33" office:value-type="float" office:value="17853" calcext:value-type="float">
            <text:p>17853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206631944444444" calcext:value-type="float">
            <text:p>0,00206631944444444000</text:p>
          </table:table-cell>
          <table:table-cell table:formula="of:=[.D543]-[.D54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33" office:value-type="float" office:value="17886" calcext:value-type="float">
            <text:p>17886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207013888888889" calcext:value-type="float">
            <text:p>0,00207013888888889000</text:p>
          </table:table-cell>
          <table:table-cell table:formula="of:=[.D544]-[.D543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33" office:value-type="float" office:value="17919" calcext:value-type="float">
            <text:p>17919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207395833333333" calcext:value-type="float">
            <text:p>0,00207395833333333000</text:p>
          </table:table-cell>
          <table:table-cell table:formula="of:=[.D545]-[.D54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33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207777777777778" calcext:value-type="float">
            <text:p>0,00207777777777778000</text:p>
          </table:table-cell>
          <table:table-cell table:formula="of:=[.D546]-[.D54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33" office:value-type="float" office:value="17985" calcext:value-type="float">
            <text:p>1798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208159722222222" calcext:value-type="float">
            <text:p>0,00208159722222222000</text:p>
          </table:table-cell>
          <table:table-cell table:formula="of:=[.D547]-[.D546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33" office:value-type="float" office:value="18018" calcext:value-type="float">
            <text:p>18018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208541666666667" calcext:value-type="float">
            <text:p>0,00208541666666667000</text:p>
          </table:table-cell>
          <table:table-cell table:formula="of:=[.D548]-[.D54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33" office:value-type="float" office:value="18051" calcext:value-type="float">
            <text:p>18051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208923611111111" calcext:value-type="float">
            <text:p>0,00208923611111111000</text:p>
          </table:table-cell>
          <table:table-cell table:formula="of:=[.D549]-[.D54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33" office:value-type="float" office:value="18084" calcext:value-type="float">
            <text:p>18084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209305555555556" calcext:value-type="float">
            <text:p>0,00209305555555556000</text:p>
          </table:table-cell>
          <table:table-cell table:formula="of:=[.D550]-[.D549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33" office:value-type="float" office:value="18117" calcext:value-type="float">
            <text:p>18117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2096875" calcext:value-type="float">
            <text:p>0,00209687500000000000</text:p>
          </table:table-cell>
          <table:table-cell table:formula="of:=[.D551]-[.D55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33" office:value-type="float" office:value="18150" calcext:value-type="float">
            <text:p>181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210069444444444" calcext:value-type="float">
            <text:p>0,00210069444444444000</text:p>
          </table:table-cell>
          <table:table-cell table:formula="of:=[.D552]-[.D55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33" office:value-type="float" office:value="18183" calcext:value-type="float">
            <text:p>18183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210451388888889" calcext:value-type="float">
            <text:p>0,00210451388888889000</text:p>
          </table:table-cell>
          <table:table-cell table:formula="of:=[.D553]-[.D55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33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210833333333333" calcext:value-type="float">
            <text:p>0,00210833333333333000</text:p>
          </table:table-cell>
          <table:table-cell table:formula="of:=[.D554]-[.D553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33" office:value-type="float" office:value="18249" calcext:value-type="float">
            <text:p>18249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211215277777778" calcext:value-type="float">
            <text:p>0,00211215277777778000</text:p>
          </table:table-cell>
          <table:table-cell table:formula="of:=[.D555]-[.D55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33" office:value-type="float" office:value="18282" calcext:value-type="float">
            <text:p>18282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211597222222222" calcext:value-type="float">
            <text:p>0,00211597222222222000</text:p>
          </table:table-cell>
          <table:table-cell table:formula="of:=[.D556]-[.D55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33" office:value-type="float" office:value="18315" calcext:value-type="float">
            <text:p>1831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211979166666667" calcext:value-type="float">
            <text:p>0,00211979166666667000</text:p>
          </table:table-cell>
          <table:table-cell table:formula="of:=[.D557]-[.D556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33" office:value-type="float" office:value="18348" calcext:value-type="float">
            <text:p>18348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212361111111111" calcext:value-type="float">
            <text:p>0,00212361111111111000</text:p>
          </table:table-cell>
          <table:table-cell table:formula="of:=[.D558]-[.D55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33" office:value-type="float" office:value="18381" calcext:value-type="float">
            <text:p>18381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212743055555556" calcext:value-type="float">
            <text:p>0,00212743055555556000</text:p>
          </table:table-cell>
          <table:table-cell table:formula="of:=[.D559]-[.D55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33" office:value-type="float" office:value="18414" calcext:value-type="float">
            <text:p>18414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213125" calcext:value-type="float">
            <text:p>0,00213125000000000000</text:p>
          </table:table-cell>
          <table:table-cell table:formula="of:=[.D560]-[.D559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33" office:value-type="float" office:value="18447" calcext:value-type="float">
            <text:p>18447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213506944444444" calcext:value-type="float">
            <text:p>0,00213506944444444000</text:p>
          </table:table-cell>
          <table:table-cell table:formula="of:=[.D561]-[.D56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33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213888888888889" calcext:value-type="float">
            <text:p>0,00213888888888889000</text:p>
          </table:table-cell>
          <table:table-cell table:formula="of:=[.D562]-[.D56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33" office:value-type="float" office:value="18513" calcext:value-type="float">
            <text:p>18513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214270833333333" calcext:value-type="float">
            <text:p>0,00214270833333333000</text:p>
          </table:table-cell>
          <table:table-cell table:formula="of:=[.D563]-[.D56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33" office:value-type="float" office:value="18546" calcext:value-type="float">
            <text:p>18546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214652777777778" calcext:value-type="float">
            <text:p>0,00214652777777778000</text:p>
          </table:table-cell>
          <table:table-cell table:formula="of:=[.D564]-[.D563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33" office:value-type="float" office:value="18579" calcext:value-type="float">
            <text:p>18579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215034722222222" calcext:value-type="float">
            <text:p>0,00215034722222222000</text:p>
          </table:table-cell>
          <table:table-cell table:formula="of:=[.D565]-[.D56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33" office:value-type="float" office:value="18612" calcext:value-type="float">
            <text:p>18612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215416666666667" calcext:value-type="float">
            <text:p>0,00215416666666667000</text:p>
          </table:table-cell>
          <table:table-cell table:formula="of:=[.D566]-[.D56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33" office:value-type="float" office:value="18645" calcext:value-type="float">
            <text:p>1864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215798611111111" calcext:value-type="float">
            <text:p>0,00215798611111111000</text:p>
          </table:table-cell>
          <table:table-cell table:formula="of:=[.D567]-[.D566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33" office:value-type="float" office:value="18678" calcext:value-type="float">
            <text:p>18678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216180555555556" calcext:value-type="float">
            <text:p>0,00216180555555556000</text:p>
          </table:table-cell>
          <table:table-cell table:formula="of:=[.D568]-[.D56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33" office:value-type="float" office:value="18711" calcext:value-type="float">
            <text:p>18711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2165625" calcext:value-type="float">
            <text:p>0,00216562500000000000</text:p>
          </table:table-cell>
          <table:table-cell table:formula="of:=[.D569]-[.D56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33" office:value-type="float" office:value="18744" calcext:value-type="float">
            <text:p>18744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216944444444444" calcext:value-type="float">
            <text:p>0,00216944444444444000</text:p>
          </table:table-cell>
          <table:table-cell table:formula="of:=[.D570]-[.D569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33" office:value-type="float" office:value="18777" calcext:value-type="float">
            <text:p>18777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217326388888889" calcext:value-type="float">
            <text:p>0,00217326388888889000</text:p>
          </table:table-cell>
          <table:table-cell table:formula="of:=[.D571]-[.D57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33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217708333333333" calcext:value-type="float">
            <text:p>0,00217708333333333000</text:p>
          </table:table-cell>
          <table:table-cell table:formula="of:=[.D572]-[.D57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33" office:value-type="float" office:value="18843" calcext:value-type="float">
            <text:p>18843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218090277777778" calcext:value-type="float">
            <text:p>0,00218090277777778000</text:p>
          </table:table-cell>
          <table:table-cell table:formula="of:=[.D573]-[.D57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33" office:value-type="float" office:value="18876" calcext:value-type="float">
            <text:p>18876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218472222222222" calcext:value-type="float">
            <text:p>0,00218472222222222000</text:p>
          </table:table-cell>
          <table:table-cell table:formula="of:=[.D574]-[.D573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33" office:value-type="float" office:value="18909" calcext:value-type="float">
            <text:p>18909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218854166666667" calcext:value-type="float">
            <text:p>0,00218854166666667000</text:p>
          </table:table-cell>
          <table:table-cell table:formula="of:=[.D575]-[.D57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33" office:value-type="float" office:value="18942" calcext:value-type="float">
            <text:p>18942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219236111111111" calcext:value-type="float">
            <text:p>0,00219236111111111000</text:p>
          </table:table-cell>
          <table:table-cell table:formula="of:=[.D576]-[.D57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33" office:value-type="float" office:value="18975" calcext:value-type="float">
            <text:p>1897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219618055555556" calcext:value-type="float">
            <text:p>0,00219618055555556000</text:p>
          </table:table-cell>
          <table:table-cell table:formula="of:=[.D577]-[.D576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33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22" calcext:value-type="float">
            <text:p>0,00220000000000000000</text:p>
          </table:table-cell>
          <table:table-cell table:formula="of:=[.D578]-[.D57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33" office:value-type="float" office:value="19041" calcext:value-type="float">
            <text:p>19041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220381944444444" calcext:value-type="float">
            <text:p>0,00220381944444444000</text:p>
          </table:table-cell>
          <table:table-cell table:formula="of:=[.D579]-[.D57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33" office:value-type="float" office:value="19074" calcext:value-type="float">
            <text:p>19074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220763888888889" calcext:value-type="float">
            <text:p>0,00220763888888889000</text:p>
          </table:table-cell>
          <table:table-cell table:formula="of:=[.D580]-[.D579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33" office:value-type="float" office:value="19107" calcext:value-type="float">
            <text:p>19107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221145833333333" calcext:value-type="float">
            <text:p>0,00221145833333333000</text:p>
          </table:table-cell>
          <table:table-cell table:formula="of:=[.D581]-[.D58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33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221527777777778" calcext:value-type="float">
            <text:p>0,00221527777777778000</text:p>
          </table:table-cell>
          <table:table-cell table:formula="of:=[.D582]-[.D58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33" office:value-type="float" office:value="19173" calcext:value-type="float">
            <text:p>19173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221909722222222" calcext:value-type="float">
            <text:p>0,00221909722222222000</text:p>
          </table:table-cell>
          <table:table-cell table:formula="of:=[.D583]-[.D582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33" office:value-type="float" office:value="19206" calcext:value-type="float">
            <text:p>19206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222291666666667" calcext:value-type="float">
            <text:p>0,00222291666666667000</text:p>
          </table:table-cell>
          <table:table-cell table:formula="of:=[.D584]-[.D58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33" office:value-type="float" office:value="19239" calcext:value-type="float">
            <text:p>19239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222673611111111" calcext:value-type="float">
            <text:p>0,00222673611111111000</text:p>
          </table:table-cell>
          <table:table-cell table:formula="of:=[.D585]-[.D58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33" office:value-type="float" office:value="19272" calcext:value-type="float">
            <text:p>19272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223055555555556" calcext:value-type="float">
            <text:p>0,00223055555555556000</text:p>
          </table:table-cell>
          <table:table-cell table:formula="of:=[.D586]-[.D58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33" office:value-type="float" office:value="19305" calcext:value-type="float">
            <text:p>1930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2234375" calcext:value-type="float">
            <text:p>0,00223437500000000000</text:p>
          </table:table-cell>
          <table:table-cell table:formula="of:=[.D587]-[.D586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33" office:value-type="float" office:value="19338" calcext:value-type="float">
            <text:p>19338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223819444444444" calcext:value-type="float">
            <text:p>0,00223819444444444000</text:p>
          </table:table-cell>
          <table:table-cell table:formula="of:=[.D588]-[.D58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33" office:value-type="float" office:value="19371" calcext:value-type="float">
            <text:p>19371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224201388888889" calcext:value-type="float">
            <text:p>0,00224201388888889000</text:p>
          </table:table-cell>
          <table:table-cell table:formula="of:=[.D589]-[.D58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33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224583333333333" calcext:value-type="float">
            <text:p>0,00224583333333333000</text:p>
          </table:table-cell>
          <table:table-cell table:formula="of:=[.D590]-[.D589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33" office:value-type="float" office:value="19437" calcext:value-type="float">
            <text:p>19437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224965277777778" calcext:value-type="float">
            <text:p>0,00224965277777778000</text:p>
          </table:table-cell>
          <table:table-cell table:formula="of:=[.D591]-[.D59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33" office:value-type="float" office:value="19470" calcext:value-type="float">
            <text:p>1947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225347222222222" calcext:value-type="float">
            <text:p>0,00225347222222222000</text:p>
          </table:table-cell>
          <table:table-cell table:formula="of:=[.D592]-[.D59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33" office:value-type="float" office:value="19503" calcext:value-type="float">
            <text:p>19503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225729166666667" calcext:value-type="float">
            <text:p>0,00225729166666667000</text:p>
          </table:table-cell>
          <table:table-cell table:formula="of:=[.D593]-[.D592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33" office:value-type="float" office:value="19536" calcext:value-type="float">
            <text:p>19536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226111111111111" calcext:value-type="float">
            <text:p>0,00226111111111111000</text:p>
          </table:table-cell>
          <table:table-cell table:formula="of:=[.D594]-[.D59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33" office:value-type="float" office:value="19569" calcext:value-type="float">
            <text:p>19569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226493055555556" calcext:value-type="float">
            <text:p>0,00226493055555556000</text:p>
          </table:table-cell>
          <table:table-cell table:formula="of:=[.D595]-[.D59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33" office:value-type="float" office:value="19602" calcext:value-type="float">
            <text:p>19602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226875" calcext:value-type="float">
            <text:p>0,00226875000000000000</text:p>
          </table:table-cell>
          <table:table-cell table:formula="of:=[.D596]-[.D59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33" office:value-type="float" office:value="19635" calcext:value-type="float">
            <text:p>1963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227256944444444" calcext:value-type="float">
            <text:p>0,00227256944444444000</text:p>
          </table:table-cell>
          <table:table-cell table:formula="of:=[.D597]-[.D596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33" office:value-type="float" office:value="19668" calcext:value-type="float">
            <text:p>19668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227638888888889" calcext:value-type="float">
            <text:p>0,00227638888888889000</text:p>
          </table:table-cell>
          <table:table-cell table:formula="of:=[.D598]-[.D59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33" office:value-type="float" office:value="19701" calcext:value-type="float">
            <text:p>19701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228020833333333" calcext:value-type="float">
            <text:p>0,00228020833333333000</text:p>
          </table:table-cell>
          <table:table-cell table:formula="of:=[.D599]-[.D59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33" office:value-type="float" office:value="19734" calcext:value-type="float">
            <text:p>19734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228402777777778" calcext:value-type="float">
            <text:p>0,00228402777777778000</text:p>
          </table:table-cell>
          <table:table-cell table:formula="of:=[.D600]-[.D599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33" office:value-type="float" office:value="19767" calcext:value-type="float">
            <text:p>19767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228784722222222" calcext:value-type="float">
            <text:p>0,00228784722222222000</text:p>
          </table:table-cell>
          <table:table-cell table:formula="of:=[.D601]-[.D60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33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229166666666667" calcext:value-type="float">
            <text:p>0,00229166666666667000</text:p>
          </table:table-cell>
          <table:table-cell table:formula="of:=[.D602]-[.D60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33" office:value-type="float" office:value="19833" calcext:value-type="float">
            <text:p>19833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229548611111111" calcext:value-type="float">
            <text:p>0,00229548611111111000</text:p>
          </table:table-cell>
          <table:table-cell table:formula="of:=[.D603]-[.D602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33" office:value-type="float" office:value="19866" calcext:value-type="float">
            <text:p>19866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229930555555556" calcext:value-type="float">
            <text:p>0,00229930555555556000</text:p>
          </table:table-cell>
          <table:table-cell table:formula="of:=[.D604]-[.D60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33" office:value-type="float" office:value="19899" calcext:value-type="float">
            <text:p>19899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2303125" calcext:value-type="float">
            <text:p>0,00230312500000000000</text:p>
          </table:table-cell>
          <table:table-cell table:formula="of:=[.D605]-[.D60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33" office:value-type="float" office:value="19932" calcext:value-type="float">
            <text:p>19932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230694444444444" calcext:value-type="float">
            <text:p>0,00230694444444444000</text:p>
          </table:table-cell>
          <table:table-cell table:formula="of:=[.D606]-[.D60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33" office:value-type="float" office:value="19965" calcext:value-type="float">
            <text:p>1996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231076388888889" calcext:value-type="float">
            <text:p>0,00231076388888889000</text:p>
          </table:table-cell>
          <table:table-cell table:formula="of:=[.D607]-[.D606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33" office:value-type="float" office:value="19998" calcext:value-type="float">
            <text:p>19998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231458333333333" calcext:value-type="float">
            <text:p>0,00231458333333333000</text:p>
          </table:table-cell>
          <table:table-cell table:formula="of:=[.D608]-[.D60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33" office:value-type="float" office:value="20031" calcext:value-type="float">
            <text:p>20031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231840277777778" calcext:value-type="float">
            <text:p>0,00231840277777778000</text:p>
          </table:table-cell>
          <table:table-cell table:formula="of:=[.D609]-[.D60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33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232222222222222" calcext:value-type="float">
            <text:p>0,00232222222222222000</text:p>
          </table:table-cell>
          <table:table-cell table:formula="of:=[.D610]-[.D609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33" office:value-type="float" office:value="20097" calcext:value-type="float">
            <text:p>20097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232604166666667" calcext:value-type="float">
            <text:p>0,00232604166666667000</text:p>
          </table:table-cell>
          <table:table-cell table:formula="of:=[.D611]-[.D61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33" office:value-type="float" office:value="20130" calcext:value-type="float">
            <text:p>2013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232986111111111" calcext:value-type="float">
            <text:p>0,00232986111111111000</text:p>
          </table:table-cell>
          <table:table-cell table:formula="of:=[.D612]-[.D61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33" office:value-type="float" office:value="20163" calcext:value-type="float">
            <text:p>20163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233368055555556" calcext:value-type="float">
            <text:p>0,00233368055555556000</text:p>
          </table:table-cell>
          <table:table-cell table:formula="of:=[.D613]-[.D612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33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23375" calcext:value-type="float">
            <text:p>0,00233750000000000000</text:p>
          </table:table-cell>
          <table:table-cell table:formula="of:=[.D614]-[.D61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33" office:value-type="float" office:value="20229" calcext:value-type="float">
            <text:p>20229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234131944444444" calcext:value-type="float">
            <text:p>0,00234131944444444000</text:p>
          </table:table-cell>
          <table:table-cell table:formula="of:=[.D615]-[.D61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33" office:value-type="float" office:value="20262" calcext:value-type="float">
            <text:p>20262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234513888888889" calcext:value-type="float">
            <text:p>0,00234513888888889000</text:p>
          </table:table-cell>
          <table:table-cell table:formula="of:=[.D616]-[.D615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33" office:value-type="float" office:value="20295" calcext:value-type="float">
            <text:p>2029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234895833333333" calcext:value-type="float">
            <text:p>0,00234895833333333000</text:p>
          </table:table-cell>
          <table:table-cell table:formula="of:=[.D617]-[.D61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33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235277777777778" calcext:value-type="float">
            <text:p>0,00235277777777778000</text:p>
          </table:table-cell>
          <table:table-cell table:formula="of:=[.D618]-[.D61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33" office:value-type="float" office:value="20361" calcext:value-type="float">
            <text:p>20361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235659722222222" calcext:value-type="float">
            <text:p>0,00235659722222222000</text:p>
          </table:table-cell>
          <table:table-cell table:formula="of:=[.D619]-[.D61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33" office:value-type="float" office:value="20394" calcext:value-type="float">
            <text:p>20394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236041666666667" calcext:value-type="float">
            <text:p>0,00236041666666667000</text:p>
          </table:table-cell>
          <table:table-cell table:formula="of:=[.D620]-[.D619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33" office:value-type="float" office:value="20427" calcext:value-type="float">
            <text:p>20427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236423611111111" calcext:value-type="float">
            <text:p>0,00236423611111111000</text:p>
          </table:table-cell>
          <table:table-cell table:formula="of:=[.D621]-[.D62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33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236805555555556" calcext:value-type="float">
            <text:p>0,00236805555555556000</text:p>
          </table:table-cell>
          <table:table-cell table:formula="of:=[.D622]-[.D62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33" office:value-type="float" office:value="20493" calcext:value-type="float">
            <text:p>20493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2371875" calcext:value-type="float">
            <text:p>0,00237187500000000000</text:p>
          </table:table-cell>
          <table:table-cell table:formula="of:=[.D623]-[.D622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33" office:value-type="float" office:value="20526" calcext:value-type="float">
            <text:p>20526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237569444444444" calcext:value-type="float">
            <text:p>0,00237569444444444000</text:p>
          </table:table-cell>
          <table:table-cell table:formula="of:=[.D624]-[.D62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33" office:value-type="float" office:value="20559" calcext:value-type="float">
            <text:p>20559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237951388888889" calcext:value-type="float">
            <text:p>0,00237951388888889000</text:p>
          </table:table-cell>
          <table:table-cell table:formula="of:=[.D625]-[.D62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33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238333333333333" calcext:value-type="float">
            <text:p>0,00238333333333333000</text:p>
          </table:table-cell>
          <table:table-cell table:formula="of:=[.D626]-[.D625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33" office:value-type="float" office:value="20625" calcext:value-type="float">
            <text:p>2062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238715277777778" calcext:value-type="float">
            <text:p>0,00238715277777778000</text:p>
          </table:table-cell>
          <table:table-cell table:formula="of:=[.D627]-[.D62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33" office:value-type="float" office:value="20658" calcext:value-type="float">
            <text:p>20658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239097222222222" calcext:value-type="float">
            <text:p>0,00239097222222222000</text:p>
          </table:table-cell>
          <table:table-cell table:formula="of:=[.D628]-[.D62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33" office:value-type="float" office:value="20691" calcext:value-type="float">
            <text:p>20691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239479166666667" calcext:value-type="float">
            <text:p>0,00239479166666667000</text:p>
          </table:table-cell>
          <table:table-cell table:formula="of:=[.D629]-[.D62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33" office:value-type="float" office:value="20724" calcext:value-type="float">
            <text:p>20724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239861111111111" calcext:value-type="float">
            <text:p>0,00239861111111111000</text:p>
          </table:table-cell>
          <table:table-cell table:formula="of:=[.D630]-[.D629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33" office:value-type="float" office:value="20757" calcext:value-type="float">
            <text:p>20757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240243055555556" calcext:value-type="float">
            <text:p>0,00240243055555556000</text:p>
          </table:table-cell>
          <table:table-cell table:formula="of:=[.D631]-[.D63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33" office:value-type="float" office:value="20790" calcext:value-type="float">
            <text:p>2079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240625" calcext:value-type="float">
            <text:p>0,00240625000000000000</text:p>
          </table:table-cell>
          <table:table-cell table:formula="of:=[.D632]-[.D63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33" office:value-type="float" office:value="20823" calcext:value-type="float">
            <text:p>20823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241006944444444" calcext:value-type="float">
            <text:p>0,00241006944444444000</text:p>
          </table:table-cell>
          <table:table-cell table:formula="of:=[.D633]-[.D632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33" office:value-type="float" office:value="20856" calcext:value-type="float">
            <text:p>20856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241388888888889" calcext:value-type="float">
            <text:p>0,00241388888888889000</text:p>
          </table:table-cell>
          <table:table-cell table:formula="of:=[.D634]-[.D63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33" office:value-type="float" office:value="20889" calcext:value-type="float">
            <text:p>20889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241770833333333" calcext:value-type="float">
            <text:p>0,00241770833333333000</text:p>
          </table:table-cell>
          <table:table-cell table:formula="of:=[.D635]-[.D63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33" office:value-type="float" office:value="20922" calcext:value-type="float">
            <text:p>20922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242152777777778" calcext:value-type="float">
            <text:p>0,00242152777777778000</text:p>
          </table:table-cell>
          <table:table-cell table:formula="of:=[.D636]-[.D635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33" office:value-type="float" office:value="20955" calcext:value-type="float">
            <text:p>2095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242534722222222" calcext:value-type="float">
            <text:p>0,00242534722222222000</text:p>
          </table:table-cell>
          <table:table-cell table:formula="of:=[.D637]-[.D63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33" office:value-type="float" office:value="20988" calcext:value-type="float">
            <text:p>20988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242916666666667" calcext:value-type="float">
            <text:p>0,00242916666666667000</text:p>
          </table:table-cell>
          <table:table-cell table:formula="of:=[.D638]-[.D63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33" office:value-type="float" office:value="21021" calcext:value-type="float">
            <text:p>21021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243298611111111" calcext:value-type="float">
            <text:p>0,00243298611111111000</text:p>
          </table:table-cell>
          <table:table-cell table:formula="of:=[.D639]-[.D638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33" office:value-type="float" office:value="21054" calcext:value-type="float">
            <text:p>21054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243680555555556" calcext:value-type="float">
            <text:p>0,00243680555555556000</text:p>
          </table:table-cell>
          <table:table-cell table:formula="of:=[.D640]-[.D639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33" office:value-type="float" office:value="21087" calcext:value-type="float">
            <text:p>21087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2440625" calcext:value-type="float">
            <text:p>0,00244062500000000000</text:p>
          </table:table-cell>
          <table:table-cell table:formula="of:=[.D641]-[.D64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33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244444444444444" calcext:value-type="float">
            <text:p>0,00244444444444444000</text:p>
          </table:table-cell>
          <table:table-cell table:formula="of:=[.D642]-[.D64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33" office:value-type="float" office:value="21153" calcext:value-type="float">
            <text:p>21153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244826388888889" calcext:value-type="float">
            <text:p>0,00244826388888889000</text:p>
          </table:table-cell>
          <table:table-cell table:formula="of:=[.D643]-[.D642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33" office:value-type="float" office:value="21186" calcext:value-type="float">
            <text:p>21186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245208333333333" calcext:value-type="float">
            <text:p>0,00245208333333333000</text:p>
          </table:table-cell>
          <table:table-cell table:formula="of:=[.D644]-[.D64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33" office:value-type="float" office:value="21219" calcext:value-type="float">
            <text:p>21219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245590277777778" calcext:value-type="float">
            <text:p>0,00245590277777778000</text:p>
          </table:table-cell>
          <table:table-cell table:formula="of:=[.D645]-[.D64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33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245972222222222" calcext:value-type="float">
            <text:p>0,00245972222222222000</text:p>
          </table:table-cell>
          <table:table-cell table:formula="of:=[.D646]-[.D645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33" office:value-type="float" office:value="21285" calcext:value-type="float">
            <text:p>2128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246354166666667" calcext:value-type="float">
            <text:p>0,00246354166666667000</text:p>
          </table:table-cell>
          <table:table-cell table:formula="of:=[.D647]-[.D64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33" office:value-type="float" office:value="21318" calcext:value-type="float">
            <text:p>21318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246736111111111" calcext:value-type="float">
            <text:p>0,00246736111111111000</text:p>
          </table:table-cell>
          <table:table-cell table:formula="of:=[.D648]-[.D64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33" office:value-type="float" office:value="21351" calcext:value-type="float">
            <text:p>21351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247118055555556" calcext:value-type="float">
            <text:p>0,00247118055555556000</text:p>
          </table:table-cell>
          <table:table-cell table:formula="of:=[.D649]-[.D648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33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2475" calcext:value-type="float">
            <text:p>0,00247500000000000000</text:p>
          </table:table-cell>
          <table:table-cell table:formula="of:=[.D650]-[.D64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33" office:value-type="float" office:value="21417" calcext:value-type="float">
            <text:p>21417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247881944444444" calcext:value-type="float">
            <text:p>0,00247881944444444000</text:p>
          </table:table-cell>
          <table:table-cell table:formula="of:=[.D651]-[.D65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33" office:value-type="float" office:value="21450" calcext:value-type="float">
            <text:p>214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248263888888889" calcext:value-type="float">
            <text:p>0,00248263888888889000</text:p>
          </table:table-cell>
          <table:table-cell table:formula="of:=[.D652]-[.D65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33" office:value-type="float" office:value="21483" calcext:value-type="float">
            <text:p>21483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248645833333333" calcext:value-type="float">
            <text:p>0,00248645833333333000</text:p>
          </table:table-cell>
          <table:table-cell table:formula="of:=[.D653]-[.D652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33" office:value-type="float" office:value="21516" calcext:value-type="float">
            <text:p>21516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249027777777778" calcext:value-type="float">
            <text:p>0,00249027777777778000</text:p>
          </table:table-cell>
          <table:table-cell table:formula="of:=[.D654]-[.D65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33" office:value-type="float" office:value="21549" calcext:value-type="float">
            <text:p>21549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249409722222222" calcext:value-type="float">
            <text:p>0,00249409722222222000</text:p>
          </table:table-cell>
          <table:table-cell table:formula="of:=[.D655]-[.D65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33" office:value-type="float" office:value="21582" calcext:value-type="float">
            <text:p>21582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249791666666667" calcext:value-type="float">
            <text:p>0,00249791666666667000</text:p>
          </table:table-cell>
          <table:table-cell table:formula="of:=[.D656]-[.D655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33" office:value-type="float" office:value="21615" calcext:value-type="float">
            <text:p>2161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250173611111111" calcext:value-type="float">
            <text:p>0,00250173611111111000</text:p>
          </table:table-cell>
          <table:table-cell table:formula="of:=[.D657]-[.D65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33" office:value-type="float" office:value="21648" calcext:value-type="float">
            <text:p>21648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250555555555556" calcext:value-type="float">
            <text:p>0,00250555555555556000</text:p>
          </table:table-cell>
          <table:table-cell table:formula="of:=[.D658]-[.D65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33" office:value-type="float" office:value="21681" calcext:value-type="float">
            <text:p>21681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2509375" calcext:value-type="float">
            <text:p>0,00250937500000000000</text:p>
          </table:table-cell>
          <table:table-cell table:formula="of:=[.D659]-[.D658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33" office:value-type="float" office:value="21714" calcext:value-type="float">
            <text:p>21714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251319444444444" calcext:value-type="float">
            <text:p>0,00251319444444444000</text:p>
          </table:table-cell>
          <table:table-cell table:formula="of:=[.D660]-[.D65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33" office:value-type="float" office:value="21747" calcext:value-type="float">
            <text:p>21747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251701388888889" calcext:value-type="float">
            <text:p>0,00251701388888889000</text:p>
          </table:table-cell>
          <table:table-cell table:formula="of:=[.D661]-[.D66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33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252083333333333" calcext:value-type="float">
            <text:p>0,00252083333333333000</text:p>
          </table:table-cell>
          <table:table-cell table:formula="of:=[.D662]-[.D661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33" office:value-type="float" office:value="21813" calcext:value-type="float">
            <text:p>21813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252465277777778" calcext:value-type="float">
            <text:p>0,00252465277777778000</text:p>
          </table:table-cell>
          <table:table-cell table:formula="of:=[.D663]-[.D662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33" office:value-type="float" office:value="21846" calcext:value-type="float">
            <text:p>21846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252847222222222" calcext:value-type="float">
            <text:p>0,00252847222222222000</text:p>
          </table:table-cell>
          <table:table-cell table:formula="of:=[.D664]-[.D66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33" office:value-type="float" office:value="21879" calcext:value-type="float">
            <text:p>21879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253229166666667" calcext:value-type="float">
            <text:p>0,00253229166666667000</text:p>
          </table:table-cell>
          <table:table-cell table:formula="of:=[.D665]-[.D66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33" office:value-type="float" office:value="21912" calcext:value-type="float">
            <text:p>21912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253611111111111" calcext:value-type="float">
            <text:p>0,00253611111111111000</text:p>
          </table:table-cell>
          <table:table-cell table:formula="of:=[.D666]-[.D665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33" office:value-type="float" office:value="21945" calcext:value-type="float">
            <text:p>2194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253993055555556" calcext:value-type="float">
            <text:p>0,00253993055555556000</text:p>
          </table:table-cell>
          <table:table-cell table:formula="of:=[.D667]-[.D66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33" office:value-type="float" office:value="21978" calcext:value-type="float">
            <text:p>21978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254375" calcext:value-type="float">
            <text:p>0,00254375000000000000</text:p>
          </table:table-cell>
          <table:table-cell table:formula="of:=[.D668]-[.D66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33" office:value-type="float" office:value="22011" calcext:value-type="float">
            <text:p>22011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254756944444444" calcext:value-type="float">
            <text:p>0,00254756944444444000</text:p>
          </table:table-cell>
          <table:table-cell table:formula="of:=[.D669]-[.D668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33" office:value-type="float" office:value="22044" calcext:value-type="float">
            <text:p>22044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255138888888889" calcext:value-type="float">
            <text:p>0,00255138888888889000</text:p>
          </table:table-cell>
          <table:table-cell table:formula="of:=[.D670]-[.D66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33" office:value-type="float" office:value="22077" calcext:value-type="float">
            <text:p>22077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255520833333333" calcext:value-type="float">
            <text:p>0,00255520833333333000</text:p>
          </table:table-cell>
          <table:table-cell table:formula="of:=[.D671]-[.D67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33" office:value-type="float" office:value="22110" calcext:value-type="float">
            <text:p>2211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255902777777778" calcext:value-type="float">
            <text:p>0,00255902777777778000</text:p>
          </table:table-cell>
          <table:table-cell table:formula="of:=[.D672]-[.D671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33" office:value-type="float" office:value="22143" calcext:value-type="float">
            <text:p>22143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256284722222222" calcext:value-type="float">
            <text:p>0,00256284722222222000</text:p>
          </table:table-cell>
          <table:table-cell table:formula="of:=[.D673]-[.D67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33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256666666666667" calcext:value-type="float">
            <text:p>0,00256666666666667000</text:p>
          </table:table-cell>
          <table:table-cell table:formula="of:=[.D674]-[.D67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33" office:value-type="float" office:value="22209" calcext:value-type="float">
            <text:p>22209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257048611111111" calcext:value-type="float">
            <text:p>0,00257048611111111000</text:p>
          </table:table-cell>
          <table:table-cell table:formula="of:=[.D675]-[.D67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33" office:value-type="float" office:value="22242" calcext:value-type="float">
            <text:p>22242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257430555555556" calcext:value-type="float">
            <text:p>0,00257430555555556000</text:p>
          </table:table-cell>
          <table:table-cell table:formula="of:=[.D676]-[.D675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33" office:value-type="float" office:value="22275" calcext:value-type="float">
            <text:p>2227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2578125" calcext:value-type="float">
            <text:p>0,00257812500000000000</text:p>
          </table:table-cell>
          <table:table-cell table:formula="of:=[.D677]-[.D67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33" office:value-type="float" office:value="22308" calcext:value-type="float">
            <text:p>22308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258194444444444" calcext:value-type="float">
            <text:p>0,00258194444444444000</text:p>
          </table:table-cell>
          <table:table-cell table:formula="of:=[.D678]-[.D67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33" office:value-type="float" office:value="22341" calcext:value-type="float">
            <text:p>22341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258576388888889" calcext:value-type="float">
            <text:p>0,00258576388888889000</text:p>
          </table:table-cell>
          <table:table-cell table:formula="of:=[.D679]-[.D678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33" office:value-type="float" office:value="22374" calcext:value-type="float">
            <text:p>22374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258958333333333" calcext:value-type="float">
            <text:p>0,00258958333333333000</text:p>
          </table:table-cell>
          <table:table-cell table:formula="of:=[.D680]-[.D67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33" office:value-type="float" office:value="22407" calcext:value-type="float">
            <text:p>22407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259340277777778" calcext:value-type="float">
            <text:p>0,00259340277777778000</text:p>
          </table:table-cell>
          <table:table-cell table:formula="of:=[.D681]-[.D68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33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259722222222222" calcext:value-type="float">
            <text:p>0,00259722222222222000</text:p>
          </table:table-cell>
          <table:table-cell table:formula="of:=[.D682]-[.D681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33" office:value-type="float" office:value="22473" calcext:value-type="float">
            <text:p>22473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260104166666667" calcext:value-type="float">
            <text:p>0,00260104166666667000</text:p>
          </table:table-cell>
          <table:table-cell table:formula="of:=[.D683]-[.D68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33" office:value-type="float" office:value="22506" calcext:value-type="float">
            <text:p>22506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260486111111111" calcext:value-type="float">
            <text:p>0,00260486111111111000</text:p>
          </table:table-cell>
          <table:table-cell table:formula="of:=[.D684]-[.D68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33" office:value-type="float" office:value="22539" calcext:value-type="float">
            <text:p>22539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260868055555556" calcext:value-type="float">
            <text:p>0,00260868055555556000</text:p>
          </table:table-cell>
          <table:table-cell table:formula="of:=[.D685]-[.D68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33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26125" calcext:value-type="float">
            <text:p>0,00261250000000000000</text:p>
          </table:table-cell>
          <table:table-cell table:formula="of:=[.D686]-[.D685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33" office:value-type="float" office:value="22605" calcext:value-type="float">
            <text:p>2260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261631944444444" calcext:value-type="float">
            <text:p>0,00261631944444444000</text:p>
          </table:table-cell>
          <table:table-cell table:formula="of:=[.D687]-[.D68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33" office:value-type="float" office:value="22638" calcext:value-type="float">
            <text:p>22638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262013888888889" calcext:value-type="float">
            <text:p>0,00262013888888889000</text:p>
          </table:table-cell>
          <table:table-cell table:formula="of:=[.D688]-[.D68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33" office:value-type="float" office:value="22671" calcext:value-type="float">
            <text:p>22671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262395833333333" calcext:value-type="float">
            <text:p>0,00262395833333333000</text:p>
          </table:table-cell>
          <table:table-cell table:formula="of:=[.D689]-[.D688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33" office:value-type="float" office:value="22704" calcext:value-type="float">
            <text:p>22704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262777777777778" calcext:value-type="float">
            <text:p>0,00262777777777778000</text:p>
          </table:table-cell>
          <table:table-cell table:formula="of:=[.D690]-[.D68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33" office:value-type="float" office:value="22737" calcext:value-type="float">
            <text:p>22737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263159722222222" calcext:value-type="float">
            <text:p>0,00263159722222222000</text:p>
          </table:table-cell>
          <table:table-cell table:formula="of:=[.D691]-[.D69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33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263541666666667" calcext:value-type="float">
            <text:p>0,00263541666666667000</text:p>
          </table:table-cell>
          <table:table-cell table:formula="of:=[.D692]-[.D691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33" office:value-type="float" office:value="22803" calcext:value-type="float">
            <text:p>22803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263923611111111" calcext:value-type="float">
            <text:p>0,00263923611111111000</text:p>
          </table:table-cell>
          <table:table-cell table:formula="of:=[.D693]-[.D69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33" office:value-type="float" office:value="22836" calcext:value-type="float">
            <text:p>22836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264305555555556" calcext:value-type="float">
            <text:p>0,00264305555555556000</text:p>
          </table:table-cell>
          <table:table-cell table:formula="of:=[.D694]-[.D69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33" office:value-type="float" office:value="22869" calcext:value-type="float">
            <text:p>22869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2646875" calcext:value-type="float">
            <text:p>0,00264687500000000000</text:p>
          </table:table-cell>
          <table:table-cell table:formula="of:=[.D695]-[.D694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33" office:value-type="float" office:value="22902" calcext:value-type="float">
            <text:p>22902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265069444444444" calcext:value-type="float">
            <text:p>0,00265069444444444000</text:p>
          </table:table-cell>
          <table:table-cell table:formula="of:=[.D696]-[.D695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33" office:value-type="float" office:value="22935" calcext:value-type="float">
            <text:p>2293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265451388888889" calcext:value-type="float">
            <text:p>0,00265451388888889000</text:p>
          </table:table-cell>
          <table:table-cell table:formula="of:=[.D697]-[.D69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33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265833333333333" calcext:value-type="float">
            <text:p>0,00265833333333333000</text:p>
          </table:table-cell>
          <table:table-cell table:formula="of:=[.D698]-[.D69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33" office:value-type="float" office:value="23001" calcext:value-type="float">
            <text:p>23001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266215277777778" calcext:value-type="float">
            <text:p>0,00266215277777778000</text:p>
          </table:table-cell>
          <table:table-cell table:formula="of:=[.D699]-[.D698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33" office:value-type="float" office:value="23034" calcext:value-type="float">
            <text:p>23034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266597222222222" calcext:value-type="float">
            <text:p>0,00266597222222222000</text:p>
          </table:table-cell>
          <table:table-cell table:formula="of:=[.D700]-[.D69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33" office:value-type="float" office:value="23067" calcext:value-type="float">
            <text:p>23067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266979166666667" calcext:value-type="float">
            <text:p>0,00266979166666667000</text:p>
          </table:table-cell>
          <table:table-cell table:formula="of:=[.D701]-[.D70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33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267361111111111" calcext:value-type="float">
            <text:p>0,00267361111111111000</text:p>
          </table:table-cell>
          <table:table-cell table:formula="of:=[.D702]-[.D701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33" office:value-type="float" office:value="23133" calcext:value-type="float">
            <text:p>23133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267743055555556" calcext:value-type="float">
            <text:p>0,00267743055555556000</text:p>
          </table:table-cell>
          <table:table-cell table:formula="of:=[.D703]-[.D70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33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268125" calcext:value-type="float">
            <text:p>0,00268125000000000000</text:p>
          </table:table-cell>
          <table:table-cell table:formula="of:=[.D704]-[.D70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33" office:value-type="float" office:value="23199" calcext:value-type="float">
            <text:p>23199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268506944444444" calcext:value-type="float">
            <text:p>0,00268506944444444000</text:p>
          </table:table-cell>
          <table:table-cell table:formula="of:=[.D705]-[.D704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33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268888888888889" calcext:value-type="float">
            <text:p>0,00268888888888889000</text:p>
          </table:table-cell>
          <table:table-cell table:formula="of:=[.D706]-[.D70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33" office:value-type="float" office:value="23265" calcext:value-type="float">
            <text:p>2326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269270833333333" calcext:value-type="float">
            <text:p>0,00269270833333333000</text:p>
          </table:table-cell>
          <table:table-cell table:formula="of:=[.D707]-[.D70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33" office:value-type="float" office:value="23298" calcext:value-type="float">
            <text:p>23298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269652777777778" calcext:value-type="float">
            <text:p>0,00269652777777778000</text:p>
          </table:table-cell>
          <table:table-cell table:formula="of:=[.D708]-[.D70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33" office:value-type="float" office:value="23331" calcext:value-type="float">
            <text:p>23331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270034722222222" calcext:value-type="float">
            <text:p>0,00270034722222222000</text:p>
          </table:table-cell>
          <table:table-cell table:formula="of:=[.D709]-[.D708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33" office:value-type="float" office:value="23364" calcext:value-type="float">
            <text:p>23364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270416666666667" calcext:value-type="float">
            <text:p>0,00270416666666667000</text:p>
          </table:table-cell>
          <table:table-cell table:formula="of:=[.D710]-[.D70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33" office:value-type="float" office:value="23397" calcext:value-type="float">
            <text:p>23397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270798611111111" calcext:value-type="float">
            <text:p>0,00270798611111111000</text:p>
          </table:table-cell>
          <table:table-cell table:formula="of:=[.D711]-[.D71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33" office:value-type="float" office:value="23430" calcext:value-type="float">
            <text:p>2343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271180555555556" calcext:value-type="float">
            <text:p>0,00271180555555556000</text:p>
          </table:table-cell>
          <table:table-cell table:formula="of:=[.D712]-[.D711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33" office:value-type="float" office:value="23463" calcext:value-type="float">
            <text:p>23463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2715625" calcext:value-type="float">
            <text:p>0,00271562500000000000</text:p>
          </table:table-cell>
          <table:table-cell table:formula="of:=[.D713]-[.D71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33" office:value-type="float" office:value="23496" calcext:value-type="float">
            <text:p>23496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271944444444444" calcext:value-type="float">
            <text:p>0,00271944444444444000</text:p>
          </table:table-cell>
          <table:table-cell table:formula="of:=[.D714]-[.D71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33" office:value-type="float" office:value="23529" calcext:value-type="float">
            <text:p>23529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272326388888889" calcext:value-type="float">
            <text:p>0,00272326388888889000</text:p>
          </table:table-cell>
          <table:table-cell table:formula="of:=[.D715]-[.D714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33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272708333333333" calcext:value-type="float">
            <text:p>0,00272708333333333000</text:p>
          </table:table-cell>
          <table:table-cell table:formula="of:=[.D716]-[.D71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33" office:value-type="float" office:value="23595" calcext:value-type="float">
            <text:p>2359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273090277777778" calcext:value-type="float">
            <text:p>0,00273090277777778000</text:p>
          </table:table-cell>
          <table:table-cell table:formula="of:=[.D717]-[.D71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33" office:value-type="float" office:value="23628" calcext:value-type="float">
            <text:p>23628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273472222222222" calcext:value-type="float">
            <text:p>0,00273472222222222000</text:p>
          </table:table-cell>
          <table:table-cell table:formula="of:=[.D718]-[.D71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33" office:value-type="float" office:value="23661" calcext:value-type="float">
            <text:p>23661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273854166666667" calcext:value-type="float">
            <text:p>0,00273854166666667000</text:p>
          </table:table-cell>
          <table:table-cell table:formula="of:=[.D719]-[.D718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33" office:value-type="float" office:value="23694" calcext:value-type="float">
            <text:p>23694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274236111111111" calcext:value-type="float">
            <text:p>0,00274236111111111000</text:p>
          </table:table-cell>
          <table:table-cell table:formula="of:=[.D720]-[.D719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33" office:value-type="float" office:value="23727" calcext:value-type="float">
            <text:p>23727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274618055555556" calcext:value-type="float">
            <text:p>0,00274618055555556000</text:p>
          </table:table-cell>
          <table:table-cell table:formula="of:=[.D721]-[.D720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33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275" calcext:value-type="float">
            <text:p>0,00275000000000000000</text:p>
          </table:table-cell>
          <table:table-cell table:formula="of:=[.D722]-[.D721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33" office:value-type="float" office:value="23793" calcext:value-type="float">
            <text:p>23793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275381944444444" calcext:value-type="float">
            <text:p>0,00275381944444444000</text:p>
          </table:table-cell>
          <table:table-cell table:formula="of:=[.D723]-[.D722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33" office:value-type="float" office:value="23826" calcext:value-type="float">
            <text:p>23826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275763888888889" calcext:value-type="float">
            <text:p>0,00275763888888889000</text:p>
          </table:table-cell>
          <table:table-cell table:formula="of:=[.D724]-[.D723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33" office:value-type="float" office:value="23859" calcext:value-type="float">
            <text:p>23859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276145833333333" calcext:value-type="float">
            <text:p>0,00276145833333333000</text:p>
          </table:table-cell>
          <table:table-cell table:formula="of:=[.D725]-[.D724]" office:value-type="float" office:value="0.00000381944444444475" calcext:value-type="float">
            <text:p>0,0000038194444444447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33" office:value-type="float" office:value="23892" calcext:value-type="float">
            <text:p>23892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276527777777778" calcext:value-type="float">
            <text:p>0,00276527777777778000</text:p>
          </table:table-cell>
          <table:table-cell table:formula="of:=[.D726]-[.D725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33" office:value-type="float" office:value="23925" calcext:value-type="float">
            <text:p>2392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276909722222222" calcext:value-type="float">
            <text:p>0,00276909722222222000</text:p>
          </table:table-cell>
          <table:table-cell table:formula="of:=[.D727]-[.D726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33" office:value-type="float" office:value="23958" calcext:value-type="float">
            <text:p>23958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277291666666667" calcext:value-type="float">
            <text:p>0,00277291666666667000</text:p>
          </table:table-cell>
          <table:table-cell table:formula="of:=[.D728]-[.D727]" office:value-type="float" office:value="0.00000381944444444431" calcext:value-type="float">
            <text:p>0,0000038194444444443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33" office:value-type="float" office:value="23991" calcext:value-type="float">
            <text:p>23991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277673611111111" calcext:value-type="float">
            <text:p>0,00277673611111111000</text:p>
          </table:table-cell>
          <table:table-cell table:formula="of:=#REF!-[.D728]" office:value-type="string" office:string-value="" calcext:value-type="error">
            <text:p>#REF!</text:p>
          </table:table-cell>
        </table:table-row>
        <table:table-row table:style-name="ro1" table:number-rows-repeated="10478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57:28.763366339</meta:creation-date>
    <dc:date>2026-05-17T15:57:37.635046901</dc:date>
    <meta:editing-duration>PT10S</meta:editing-duration>
    <meta:editing-cycles>1</meta:editing-cycles>
    <meta:document-statistic meta:table-count="1" meta:cell-count="3640" meta:object-count="0"/>
    <meta:generator>LibreOffice/24.2.7.2$Linux_X86_64 LibreOffice_project/420$Build-2</meta:generator>
  </office:meta>
</office:document-meta>
</file>