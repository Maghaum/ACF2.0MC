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97685185185185" calcext:value-type="float">
            <text:p>0,00000497685185185185</text:p>
          </table:table-cell>
          <table:table-cell table:formula="of:=[.D3]-[.D2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3" office:value-type="float" office:value="86" calcext:value-type="float">
            <text:p>8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99537037037037" calcext:value-type="float">
            <text:p>0,00000995370370370371</text:p>
          </table:table-cell>
          <table:table-cell table:formula="of:=[.D4]-[.D3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3" office:value-type="float" office:value="129" calcext:value-type="float">
            <text:p>12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49305555555556" calcext:value-type="float">
            <text:p>0,00001493055555555560</text:p>
          </table:table-cell>
          <table:table-cell table:formula="of:=[.D5]-[.D4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3" office:value-type="float" office:value="172" calcext:value-type="float">
            <text:p>17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99074074074074" calcext:value-type="float">
            <text:p>0,00001990740740740740</text:p>
          </table:table-cell>
          <table:table-cell table:formula="of:=[.D6]-[.D5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3" office:value-type="float" office:value="215" calcext:value-type="float">
            <text:p>21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48842592592593" calcext:value-type="float">
            <text:p>0,00002488425925925930</text:p>
          </table:table-cell>
          <table:table-cell table:formula="of:=[.D7]-[.D6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3" office:value-type="float" office:value="258" calcext:value-type="float">
            <text:p>25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98611111111111" calcext:value-type="float">
            <text:p>0,00002986111111111110</text:p>
          </table:table-cell>
          <table:table-cell table:formula="of:=[.D8]-[.D7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3" office:value-type="float" office:value="301" calcext:value-type="float">
            <text:p>30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4837962962963" calcext:value-type="float">
            <text:p>0,00003483796296296300</text:p>
          </table:table-cell>
          <table:table-cell table:formula="of:=[.D9]-[.D8]" office:value-type="float" office:value="0.00000497685185185186" calcext:value-type="float">
            <text:p>0,00000497685185185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3" office:value-type="float" office:value="344" calcext:value-type="float">
            <text:p>34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98148148148148" calcext:value-type="float">
            <text:p>0,00003981481481481480</text:p>
          </table:table-cell>
          <table:table-cell table:formula="of:=[.D10]-[.D9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3" office:value-type="float" office:value="387" calcext:value-type="float">
            <text:p>38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47916666666667" calcext:value-type="float">
            <text:p>0,00004479166666666670</text:p>
          </table:table-cell>
          <table:table-cell table:formula="of:=[.D11]-[.D10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3" office:value-type="float" office:value="430" calcext:value-type="float">
            <text:p>4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97685185185185" calcext:value-type="float">
            <text:p>0,00004976851851851850</text:p>
          </table:table-cell>
          <table:table-cell table:formula="of:=[.D12]-[.D11]" office:value-type="float" office:value="0.00000497685185185186" calcext:value-type="float">
            <text:p>0,00000497685185185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3" office:value-type="float" office:value="473" calcext:value-type="float">
            <text:p>47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47453703703704" calcext:value-type="float">
            <text:p>0,00005474537037037040</text:p>
          </table:table-cell>
          <table:table-cell table:formula="of:=[.D13]-[.D12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3" office:value-type="float" office:value="516" calcext:value-type="float">
            <text:p>51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97222222222222" calcext:value-type="float">
            <text:p>0,00005972222222222220</text:p>
          </table:table-cell>
          <table:table-cell table:formula="of:=[.D14]-[.D13]" office:value-type="float" office:value="0.00000497685185185186" calcext:value-type="float">
            <text:p>0,00000497685185185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3" office:value-type="float" office:value="559" calcext:value-type="float">
            <text:p>55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646990740740741" calcext:value-type="float">
            <text:p>0,00006469907407407410</text:p>
          </table:table-cell>
          <table:table-cell table:formula="of:=[.D15]-[.D14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3" office:value-type="float" office:value="602" calcext:value-type="float">
            <text:p>60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696759259259259" calcext:value-type="float">
            <text:p>0,00006967592592592590</text:p>
          </table:table-cell>
          <table:table-cell table:formula="of:=[.D16]-[.D15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3" office:value-type="float" office:value="645" calcext:value-type="float">
            <text:p>64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746527777777778" calcext:value-type="float">
            <text:p>0,00007465277777777780</text:p>
          </table:table-cell>
          <table:table-cell table:formula="of:=[.D17]-[.D16]" office:value-type="float" office:value="0.00000497685185185186" calcext:value-type="float">
            <text:p>0,00000497685185185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3" office:value-type="float" office:value="688" calcext:value-type="float">
            <text:p>68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796296296296296" calcext:value-type="float">
            <text:p>0,00007962962962962960</text:p>
          </table:table-cell>
          <table:table-cell table:formula="of:=[.D18]-[.D17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3" office:value-type="float" office:value="731" calcext:value-type="float">
            <text:p>73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846064814814815" calcext:value-type="float">
            <text:p>0,00008460648148148150</text:p>
          </table:table-cell>
          <table:table-cell table:formula="of:=[.D19]-[.D18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3" office:value-type="float" office:value="774" calcext:value-type="float">
            <text:p>77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895833333333333" calcext:value-type="float">
            <text:p>0,00008958333333333330</text:p>
          </table:table-cell>
          <table:table-cell table:formula="of:=[.D20]-[.D19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3" office:value-type="float" office:value="817" calcext:value-type="float">
            <text:p>81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945601851851852" calcext:value-type="float">
            <text:p>0,00009456018518518520</text:p>
          </table:table-cell>
          <table:table-cell table:formula="of:=[.D21]-[.D20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3" office:value-type="float" office:value="860" calcext:value-type="float">
            <text:p>8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99537037037037" calcext:value-type="float">
            <text:p>0,00009953703703703700</text:p>
          </table:table-cell>
          <table:table-cell table:formula="of:=[.D22]-[.D21]" office:value-type="float" office:value="0.00000497685185185186" calcext:value-type="float">
            <text:p>0,000004976851851851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3" office:value-type="float" office:value="903" calcext:value-type="float">
            <text:p>90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04513888888889" calcext:value-type="float">
            <text:p>0,00010451388888888900</text:p>
          </table:table-cell>
          <table:table-cell table:formula="of:=[.D23]-[.D22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3" office:value-type="float" office:value="946" calcext:value-type="float">
            <text:p>94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09490740740741" calcext:value-type="float">
            <text:p>0,00010949074074074100</text:p>
          </table:table-cell>
          <table:table-cell table:formula="of:=[.D24]-[.D23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3" office:value-type="float" office:value="989" calcext:value-type="float">
            <text:p>98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14467592592593" calcext:value-type="float">
            <text:p>0,00011446759259259300</text:p>
          </table:table-cell>
          <table:table-cell table:formula="of:=[.D25]-[.D24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3" office:value-type="float" office:value="1032" calcext:value-type="float">
            <text:p>103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19444444444444" calcext:value-type="float">
            <text:p>0,00011944444444444400</text:p>
          </table:table-cell>
          <table:table-cell table:formula="of:=[.D26]-[.D25]" office:value-type="float" office:value="0.00000497685185185186" calcext:value-type="float">
            <text:p>0,000004976851851851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3" office:value-type="float" office:value="1075" calcext:value-type="float">
            <text:p>10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24421296296296" calcext:value-type="float">
            <text:p>0,00012442129629629600</text:p>
          </table:table-cell>
          <table:table-cell table:formula="of:=[.D27]-[.D26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3" office:value-type="float" office:value="1118" calcext:value-type="float">
            <text:p>111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29398148148148" calcext:value-type="float">
            <text:p>0,00012939814814814800</text:p>
          </table:table-cell>
          <table:table-cell table:formula="of:=[.D28]-[.D27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3" office:value-type="float" office:value="1161" calcext:value-type="float">
            <text:p>116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34375" calcext:value-type="float">
            <text:p>0,00013437500000000000</text:p>
          </table:table-cell>
          <table:table-cell table:formula="of:=[.D29]-[.D28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3" office:value-type="float" office:value="1204" calcext:value-type="float">
            <text:p>120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39351851851852" calcext:value-type="float">
            <text:p>0,00013935185185185200</text:p>
          </table:table-cell>
          <table:table-cell table:formula="of:=[.D30]-[.D29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3" office:value-type="float" office:value="1247" calcext:value-type="float">
            <text:p>124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44328703703704" calcext:value-type="float">
            <text:p>0,00014432870370370400</text:p>
          </table:table-cell>
          <table:table-cell table:formula="of:=[.D31]-[.D30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3" office:value-type="float" office:value="1290" calcext:value-type="float">
            <text:p>12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49305555555556" calcext:value-type="float">
            <text:p>0,00014930555555555600</text:p>
          </table:table-cell>
          <table:table-cell table:formula="of:=[.D32]-[.D31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3" office:value-type="float" office:value="1333" calcext:value-type="float">
            <text:p>133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54282407407407" calcext:value-type="float">
            <text:p>0,00015428240740740700</text:p>
          </table:table-cell>
          <table:table-cell table:formula="of:=[.D33]-[.D32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3" office:value-type="float" office:value="1376" calcext:value-type="float">
            <text:p>137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59259259259259" calcext:value-type="float">
            <text:p>0,00015925925925925900</text:p>
          </table:table-cell>
          <table:table-cell table:formula="of:=[.D34]-[.D33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3" office:value-type="float" office:value="1419" calcext:value-type="float">
            <text:p>141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64236111111111" calcext:value-type="float">
            <text:p>0,00016423611111111100</text:p>
          </table:table-cell>
          <table:table-cell table:formula="of:=[.D35]-[.D34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3" office:value-type="float" office:value="1462" calcext:value-type="float">
            <text:p>146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69212962962963" calcext:value-type="float">
            <text:p>0,00016921296296296300</text:p>
          </table:table-cell>
          <table:table-cell table:formula="of:=[.D36]-[.D35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3" office:value-type="float" office:value="1505" calcext:value-type="float">
            <text:p>150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74189814814815" calcext:value-type="float">
            <text:p>0,00017418981481481500</text:p>
          </table:table-cell>
          <table:table-cell table:formula="of:=[.D37]-[.D36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3" office:value-type="float" office:value="1548" calcext:value-type="float">
            <text:p>154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79166666666667" calcext:value-type="float">
            <text:p>0,00017916666666666700</text:p>
          </table:table-cell>
          <table:table-cell table:formula="of:=[.D38]-[.D37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3" office:value-type="float" office:value="1591" calcext:value-type="float">
            <text:p>159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84143518518519" calcext:value-type="float">
            <text:p>0,00018414351851851900</text:p>
          </table:table-cell>
          <table:table-cell table:formula="of:=[.D39]-[.D38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3" office:value-type="float" office:value="1634" calcext:value-type="float">
            <text:p>163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8912037037037" calcext:value-type="float">
            <text:p>0,00018912037037037000</text:p>
          </table:table-cell>
          <table:table-cell table:formula="of:=[.D40]-[.D39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3" office:value-type="float" office:value="1677" calcext:value-type="float">
            <text:p>167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94097222222222" calcext:value-type="float">
            <text:p>0,00019409722222222200</text:p>
          </table:table-cell>
          <table:table-cell table:formula="of:=[.D41]-[.D40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3" office:value-type="float" office:value="1720" calcext:value-type="float">
            <text:p>17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99074074074074" calcext:value-type="float">
            <text:p>0,00019907407407407400</text:p>
          </table:table-cell>
          <table:table-cell table:formula="of:=[.D42]-[.D41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3" office:value-type="float" office:value="1763" calcext:value-type="float">
            <text:p>176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04050925925926" calcext:value-type="float">
            <text:p>0,00020405092592592600</text:p>
          </table:table-cell>
          <table:table-cell table:formula="of:=[.D43]-[.D42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3" office:value-type="float" office:value="1806" calcext:value-type="float">
            <text:p>180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09027777777778" calcext:value-type="float">
            <text:p>0,00020902777777777800</text:p>
          </table:table-cell>
          <table:table-cell table:formula="of:=[.D44]-[.D43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3" office:value-type="float" office:value="1849" calcext:value-type="float">
            <text:p>184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1400462962963" calcext:value-type="float">
            <text:p>0,00021400462962963000</text:p>
          </table:table-cell>
          <table:table-cell table:formula="of:=[.D45]-[.D44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3" office:value-type="float" office:value="1892" calcext:value-type="float">
            <text:p>189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18981481481481" calcext:value-type="float">
            <text:p>0,00021898148148148100</text:p>
          </table:table-cell>
          <table:table-cell table:formula="of:=[.D46]-[.D45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3" office:value-type="float" office:value="1935" calcext:value-type="float">
            <text:p>193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23958333333333" calcext:value-type="float">
            <text:p>0,00022395833333333300</text:p>
          </table:table-cell>
          <table:table-cell table:formula="of:=[.D47]-[.D46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3" office:value-type="float" office:value="1978" calcext:value-type="float">
            <text:p>197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28935185185185" calcext:value-type="float">
            <text:p>0,00022893518518518500</text:p>
          </table:table-cell>
          <table:table-cell table:formula="of:=[.D48]-[.D47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3" office:value-type="float" office:value="2021" calcext:value-type="float">
            <text:p>202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33912037037037" calcext:value-type="float">
            <text:p>0,00023391203703703700</text:p>
          </table:table-cell>
          <table:table-cell table:formula="of:=[.D49]-[.D48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3" office:value-type="float" office:value="2064" calcext:value-type="float">
            <text:p>206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38888888888889" calcext:value-type="float">
            <text:p>0,00023888888888888900</text:p>
          </table:table-cell>
          <table:table-cell table:formula="of:=[.D50]-[.D49]" office:value-type="float" office:value="0.00000497685185185185" calcext:value-type="float">
            <text:p>0,000004976851851851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3" office:value-type="float" office:value="2107" calcext:value-type="float">
            <text:p>210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43865740740741" calcext:value-type="float">
            <text:p>0,00024386574074074100</text:p>
          </table:table-cell>
          <table:table-cell table:formula="of:=[.D51]-[.D50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3" office:value-type="float" office:value="2150" calcext:value-type="float">
            <text:p>21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48842592592593" calcext:value-type="float">
            <text:p>0,00024884259259259300</text:p>
          </table:table-cell>
          <table:table-cell table:formula="of:=[.D52]-[.D5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3" office:value-type="float" office:value="2193" calcext:value-type="float">
            <text:p>219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53819444444444" calcext:value-type="float">
            <text:p>0,00025381944444444400</text:p>
          </table:table-cell>
          <table:table-cell table:formula="of:=[.D53]-[.D52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3" office:value-type="float" office:value="2236" calcext:value-type="float">
            <text:p>223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58796296296296" calcext:value-type="float">
            <text:p>0,00025879629629629600</text:p>
          </table:table-cell>
          <table:table-cell table:formula="of:=[.D54]-[.D5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3" office:value-type="float" office:value="2279" calcext:value-type="float">
            <text:p>227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63773148148148" calcext:value-type="float">
            <text:p>0,00026377314814814800</text:p>
          </table:table-cell>
          <table:table-cell table:formula="of:=[.D55]-[.D54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3" office:value-type="float" office:value="2322" calcext:value-type="float">
            <text:p>232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6875" calcext:value-type="float">
            <text:p>0,00026875000000000000</text:p>
          </table:table-cell>
          <table:table-cell table:formula="of:=[.D56]-[.D55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3" office:value-type="float" office:value="2365" calcext:value-type="float">
            <text:p>236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73726851851852" calcext:value-type="float">
            <text:p>0,00027372685185185200</text:p>
          </table:table-cell>
          <table:table-cell table:formula="of:=[.D57]-[.D5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3" office:value-type="float" office:value="2408" calcext:value-type="float">
            <text:p>240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78703703703704" calcext:value-type="float">
            <text:p>0,00027870370370370400</text:p>
          </table:table-cell>
          <table:table-cell table:formula="of:=[.D58]-[.D57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3" office:value-type="float" office:value="2451" calcext:value-type="float">
            <text:p>245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83680555555556" calcext:value-type="float">
            <text:p>0,00028368055555555600</text:p>
          </table:table-cell>
          <table:table-cell table:formula="of:=[.D59]-[.D5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3" office:value-type="float" office:value="2494" calcext:value-type="float">
            <text:p>249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88657407407407" calcext:value-type="float">
            <text:p>0,00028865740740740700</text:p>
          </table:table-cell>
          <table:table-cell table:formula="of:=[.D60]-[.D59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3" office:value-type="float" office:value="2537" calcext:value-type="float">
            <text:p>253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93634259259259" calcext:value-type="float">
            <text:p>0,00029363425925925900</text:p>
          </table:table-cell>
          <table:table-cell table:formula="of:=[.D61]-[.D6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3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98611111111111" calcext:value-type="float">
            <text:p>0,00029861111111111100</text:p>
          </table:table-cell>
          <table:table-cell table:formula="of:=[.D62]-[.D61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3" office:value-type="float" office:value="2623" calcext:value-type="float">
            <text:p>262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03587962962963" calcext:value-type="float">
            <text:p>0,00030358796296296300</text:p>
          </table:table-cell>
          <table:table-cell table:formula="of:=[.D63]-[.D6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3" office:value-type="float" office:value="2666" calcext:value-type="float">
            <text:p>266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08564814814815" calcext:value-type="float">
            <text:p>0,00030856481481481500</text:p>
          </table:table-cell>
          <table:table-cell table:formula="of:=[.D64]-[.D63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3" office:value-type="float" office:value="2709" calcext:value-type="float">
            <text:p>270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13541666666667" calcext:value-type="float">
            <text:p>0,00031354166666666700</text:p>
          </table:table-cell>
          <table:table-cell table:formula="of:=[.D65]-[.D64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3" office:value-type="float" office:value="2752" calcext:value-type="float">
            <text:p>275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18518518518519" calcext:value-type="float">
            <text:p>0,00031851851851851900</text:p>
          </table:table-cell>
          <table:table-cell table:formula="of:=[.D66]-[.D6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3" office:value-type="float" office:value="2795" calcext:value-type="float">
            <text:p>279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2349537037037" calcext:value-type="float">
            <text:p>0,00032349537037037000</text:p>
          </table:table-cell>
          <table:table-cell table:formula="of:=[.D67]-[.D66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3" office:value-type="float" office:value="2838" calcext:value-type="float">
            <text:p>283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28472222222222" calcext:value-type="float">
            <text:p>0,00032847222222222200</text:p>
          </table:table-cell>
          <table:table-cell table:formula="of:=[.D68]-[.D6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3" office:value-type="float" office:value="2881" calcext:value-type="float">
            <text:p>288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33449074074074" calcext:value-type="float">
            <text:p>0,00033344907407407400</text:p>
          </table:table-cell>
          <table:table-cell table:formula="of:=[.D69]-[.D68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3" office:value-type="float" office:value="2924" calcext:value-type="float">
            <text:p>292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38425925925926" calcext:value-type="float">
            <text:p>0,00033842592592592600</text:p>
          </table:table-cell>
          <table:table-cell table:formula="of:=[.D70]-[.D6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3" office:value-type="float" office:value="2967" calcext:value-type="float">
            <text:p>296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43402777777778" calcext:value-type="float">
            <text:p>0,00034340277777777800</text:p>
          </table:table-cell>
          <table:table-cell table:formula="of:=[.D71]-[.D70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3" office:value-type="float" office:value="3010" calcext:value-type="float">
            <text:p>30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4837962962963" calcext:value-type="float">
            <text:p>0,00034837962962963000</text:p>
          </table:table-cell>
          <table:table-cell table:formula="of:=[.D72]-[.D7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3" office:value-type="float" office:value="3053" calcext:value-type="float">
            <text:p>305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53356481481481" calcext:value-type="float">
            <text:p>0,00035335648148148100</text:p>
          </table:table-cell>
          <table:table-cell table:formula="of:=[.D73]-[.D72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3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58333333333333" calcext:value-type="float">
            <text:p>0,00035833333333333300</text:p>
          </table:table-cell>
          <table:table-cell table:formula="of:=[.D74]-[.D73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3" office:value-type="float" office:value="3139" calcext:value-type="float">
            <text:p>313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63310185185185" calcext:value-type="float">
            <text:p>0,00036331018518518500</text:p>
          </table:table-cell>
          <table:table-cell table:formula="of:=[.D75]-[.D7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3" office:value-type="float" office:value="3182" calcext:value-type="float">
            <text:p>318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68287037037037" calcext:value-type="float">
            <text:p>0,00036828703703703700</text:p>
          </table:table-cell>
          <table:table-cell table:formula="of:=[.D76]-[.D75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3" office:value-type="float" office:value="3225" calcext:value-type="float">
            <text:p>32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73263888888889" calcext:value-type="float">
            <text:p>0,00037326388888888900</text:p>
          </table:table-cell>
          <table:table-cell table:formula="of:=[.D77]-[.D7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3" office:value-type="float" office:value="3268" calcext:value-type="float">
            <text:p>326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78240740740741" calcext:value-type="float">
            <text:p>0,00037824074074074100</text:p>
          </table:table-cell>
          <table:table-cell table:formula="of:=[.D78]-[.D77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3" office:value-type="float" office:value="3311" calcext:value-type="float">
            <text:p>331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83217592592593" calcext:value-type="float">
            <text:p>0,00038321759259259300</text:p>
          </table:table-cell>
          <table:table-cell table:formula="of:=[.D79]-[.D7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3" office:value-type="float" office:value="3354" calcext:value-type="float">
            <text:p>335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88194444444444" calcext:value-type="float">
            <text:p>0,00038819444444444400</text:p>
          </table:table-cell>
          <table:table-cell table:formula="of:=[.D80]-[.D79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3" office:value-type="float" office:value="3397" calcext:value-type="float">
            <text:p>339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93171296296296" calcext:value-type="float">
            <text:p>0,00039317129629629600</text:p>
          </table:table-cell>
          <table:table-cell table:formula="of:=[.D81]-[.D8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3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98148148148148" calcext:value-type="float">
            <text:p>0,00039814814814814800</text:p>
          </table:table-cell>
          <table:table-cell table:formula="of:=[.D82]-[.D81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3" office:value-type="float" office:value="3483" calcext:value-type="float">
            <text:p>348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03125" calcext:value-type="float">
            <text:p>0,00040312500000000000</text:p>
          </table:table-cell>
          <table:table-cell table:formula="of:=[.D83]-[.D82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3" office:value-type="float" office:value="3526" calcext:value-type="float">
            <text:p>352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08101851851852" calcext:value-type="float">
            <text:p>0,00040810185185185200</text:p>
          </table:table-cell>
          <table:table-cell table:formula="of:=[.D84]-[.D8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3" office:value-type="float" office:value="3569" calcext:value-type="float">
            <text:p>356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13078703703704" calcext:value-type="float">
            <text:p>0,00041307870370370400</text:p>
          </table:table-cell>
          <table:table-cell table:formula="of:=[.D85]-[.D84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3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18055555555556" calcext:value-type="float">
            <text:p>0,00041805555555555600</text:p>
          </table:table-cell>
          <table:table-cell table:formula="of:=[.D86]-[.D8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3" office:value-type="float" office:value="3655" calcext:value-type="float">
            <text:p>365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23032407407407" calcext:value-type="float">
            <text:p>0,00042303240740740700</text:p>
          </table:table-cell>
          <table:table-cell table:formula="of:=[.D87]-[.D86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3" office:value-type="float" office:value="3698" calcext:value-type="float">
            <text:p>369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28009259259259" calcext:value-type="float">
            <text:p>0,00042800925925925900</text:p>
          </table:table-cell>
          <table:table-cell table:formula="of:=[.D88]-[.D8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3" office:value-type="float" office:value="3741" calcext:value-type="float">
            <text:p>374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32986111111111" calcext:value-type="float">
            <text:p>0,00043298611111111100</text:p>
          </table:table-cell>
          <table:table-cell table:formula="of:=[.D89]-[.D88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3" office:value-type="float" office:value="3784" calcext:value-type="float">
            <text:p>378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37962962962963" calcext:value-type="float">
            <text:p>0,00043796296296296300</text:p>
          </table:table-cell>
          <table:table-cell table:formula="of:=[.D90]-[.D8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3" office:value-type="float" office:value="3827" calcext:value-type="float">
            <text:p>382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42939814814815" calcext:value-type="float">
            <text:p>0,00044293981481481500</text:p>
          </table:table-cell>
          <table:table-cell table:formula="of:=[.D91]-[.D90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3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47916666666667" calcext:value-type="float">
            <text:p>0,00044791666666666700</text:p>
          </table:table-cell>
          <table:table-cell table:formula="of:=[.D92]-[.D91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3" office:value-type="float" office:value="3913" calcext:value-type="float">
            <text:p>391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52893518518519" calcext:value-type="float">
            <text:p>0,00045289351851851900</text:p>
          </table:table-cell>
          <table:table-cell table:formula="of:=[.D93]-[.D9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3" office:value-type="float" office:value="3956" calcext:value-type="float">
            <text:p>395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5787037037037" calcext:value-type="float">
            <text:p>0,00045787037037037000</text:p>
          </table:table-cell>
          <table:table-cell table:formula="of:=[.D94]-[.D93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3" office:value-type="float" office:value="3999" calcext:value-type="float">
            <text:p>399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62847222222222" calcext:value-type="float">
            <text:p>0,00046284722222222200</text:p>
          </table:table-cell>
          <table:table-cell table:formula="of:=[.D95]-[.D9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3" office:value-type="float" office:value="4042" calcext:value-type="float">
            <text:p>404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67824074074074" calcext:value-type="float">
            <text:p>0,00046782407407407400</text:p>
          </table:table-cell>
          <table:table-cell table:formula="of:=[.D96]-[.D95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3" office:value-type="float" office:value="4085" calcext:value-type="float">
            <text:p>408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72800925925926" calcext:value-type="float">
            <text:p>0,00047280092592592600</text:p>
          </table:table-cell>
          <table:table-cell table:formula="of:=[.D97]-[.D9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3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77777777777778" calcext:value-type="float">
            <text:p>0,00047777777777777800</text:p>
          </table:table-cell>
          <table:table-cell table:formula="of:=[.D98]-[.D97]" office:value-type="float" office:value="0.00000497685185185188" calcext:value-type="float">
            <text:p>0,000004976851851851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3" office:value-type="float" office:value="4171" calcext:value-type="float">
            <text:p>417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8275462962963" calcext:value-type="float">
            <text:p>0,00048275462962963000</text:p>
          </table:table-cell>
          <table:table-cell table:formula="of:=[.D99]-[.D9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3" office:value-type="float" office:value="4214" calcext:value-type="float">
            <text:p>421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87731481481481" calcext:value-type="float">
            <text:p>0,00048773148148148100</text:p>
          </table:table-cell>
          <table:table-cell table:formula="of:=[.D100]-[.D9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3" office:value-type="float" office:value="4257" calcext:value-type="float">
            <text:p>425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92708333333333" calcext:value-type="float">
            <text:p>0,00049270833333333300</text:p>
          </table:table-cell>
          <table:table-cell table:formula="of:=[.D101]-[.D10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3" office:value-type="float" office:value="4300" calcext:value-type="float">
            <text:p>4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97685185185185" calcext:value-type="float">
            <text:p>0,00049768518518518500</text:p>
          </table:table-cell>
          <table:table-cell table:formula="of:=[.D102]-[.D10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3" office:value-type="float" office:value="4343" calcext:value-type="float">
            <text:p>434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02662037037037" calcext:value-type="float">
            <text:p>0,00050266203703703700</text:p>
          </table:table-cell>
          <table:table-cell table:formula="of:=[.D103]-[.D10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3" office:value-type="float" office:value="4386" calcext:value-type="float">
            <text:p>438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07638888888889" calcext:value-type="float">
            <text:p>0,00050763888888888900</text:p>
          </table:table-cell>
          <table:table-cell table:formula="of:=[.D104]-[.D10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3" office:value-type="float" office:value="4429" calcext:value-type="float">
            <text:p>442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12615740740741" calcext:value-type="float">
            <text:p>0,00051261574074074100</text:p>
          </table:table-cell>
          <table:table-cell table:formula="of:=[.D105]-[.D10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3" office:value-type="float" office:value="4472" calcext:value-type="float">
            <text:p>447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17592592592593" calcext:value-type="float">
            <text:p>0,00051759259259259300</text:p>
          </table:table-cell>
          <table:table-cell table:formula="of:=[.D106]-[.D10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3" office:value-type="float" office:value="4515" calcext:value-type="float">
            <text:p>451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22569444444444" calcext:value-type="float">
            <text:p>0,00052256944444444400</text:p>
          </table:table-cell>
          <table:table-cell table:formula="of:=[.D107]-[.D10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3" office:value-type="float" office:value="4558" calcext:value-type="float">
            <text:p>455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27546296296296" calcext:value-type="float">
            <text:p>0,00052754629629629600</text:p>
          </table:table-cell>
          <table:table-cell table:formula="of:=[.D108]-[.D10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3" office:value-type="float" office:value="4601" calcext:value-type="float">
            <text:p>460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32523148148148" calcext:value-type="float">
            <text:p>0,00053252314814814800</text:p>
          </table:table-cell>
          <table:table-cell table:formula="of:=[.D109]-[.D10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3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375" calcext:value-type="float">
            <text:p>0,00053750000000000000</text:p>
          </table:table-cell>
          <table:table-cell table:formula="of:=[.D110]-[.D10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3" office:value-type="float" office:value="4687" calcext:value-type="float">
            <text:p>468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42476851851852" calcext:value-type="float">
            <text:p>0,00054247685185185200</text:p>
          </table:table-cell>
          <table:table-cell table:formula="of:=[.D111]-[.D11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3" office:value-type="float" office:value="4730" calcext:value-type="float">
            <text:p>47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47453703703704" calcext:value-type="float">
            <text:p>0,00054745370370370400</text:p>
          </table:table-cell>
          <table:table-cell table:formula="of:=[.D112]-[.D11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3" office:value-type="float" office:value="4773" calcext:value-type="float">
            <text:p>477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52430555555556" calcext:value-type="float">
            <text:p>0,00055243055555555600</text:p>
          </table:table-cell>
          <table:table-cell table:formula="of:=[.D113]-[.D11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3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57407407407407" calcext:value-type="float">
            <text:p>0,00055740740740740700</text:p>
          </table:table-cell>
          <table:table-cell table:formula="of:=[.D114]-[.D11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3" office:value-type="float" office:value="4859" calcext:value-type="float">
            <text:p>485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562384259259259" calcext:value-type="float">
            <text:p>0,00056238425925925900</text:p>
          </table:table-cell>
          <table:table-cell table:formula="of:=[.D115]-[.D11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3" office:value-type="float" office:value="4902" calcext:value-type="float">
            <text:p>490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67361111111111" calcext:value-type="float">
            <text:p>0,00056736111111111100</text:p>
          </table:table-cell>
          <table:table-cell table:formula="of:=[.D116]-[.D11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3" office:value-type="float" office:value="4945" calcext:value-type="float">
            <text:p>494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72337962962963" calcext:value-type="float">
            <text:p>0,00057233796296296300</text:p>
          </table:table-cell>
          <table:table-cell table:formula="of:=[.D117]-[.D11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3" office:value-type="float" office:value="4988" calcext:value-type="float">
            <text:p>498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577314814814815" calcext:value-type="float">
            <text:p>0,00057731481481481500</text:p>
          </table:table-cell>
          <table:table-cell table:formula="of:=[.D118]-[.D11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3" office:value-type="float" office:value="5031" calcext:value-type="float">
            <text:p>503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82291666666667" calcext:value-type="float">
            <text:p>0,00058229166666666700</text:p>
          </table:table-cell>
          <table:table-cell table:formula="of:=[.D119]-[.D11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3" office:value-type="float" office:value="5074" calcext:value-type="float">
            <text:p>507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587268518518519" calcext:value-type="float">
            <text:p>0,00058726851851851900</text:p>
          </table:table-cell>
          <table:table-cell table:formula="of:=[.D120]-[.D11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3" office:value-type="float" office:value="5117" calcext:value-type="float">
            <text:p>511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59224537037037" calcext:value-type="float">
            <text:p>0,00059224537037037000</text:p>
          </table:table-cell>
          <table:table-cell table:formula="of:=[.D121]-[.D12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3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97222222222222" calcext:value-type="float">
            <text:p>0,00059722222222222200</text:p>
          </table:table-cell>
          <table:table-cell table:formula="of:=[.D122]-[.D12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3" office:value-type="float" office:value="5203" calcext:value-type="float">
            <text:p>520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602199074074074" calcext:value-type="float">
            <text:p>0,00060219907407407400</text:p>
          </table:table-cell>
          <table:table-cell table:formula="of:=[.D123]-[.D12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3" office:value-type="float" office:value="5246" calcext:value-type="float">
            <text:p>524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607175925925926" calcext:value-type="float">
            <text:p>0,00060717592592592600</text:p>
          </table:table-cell>
          <table:table-cell table:formula="of:=[.D124]-[.D12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3" office:value-type="float" office:value="5289" calcext:value-type="float">
            <text:p>528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612152777777778" calcext:value-type="float">
            <text:p>0,00061215277777777800</text:p>
          </table:table-cell>
          <table:table-cell table:formula="of:=[.D125]-[.D12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3" office:value-type="float" office:value="5332" calcext:value-type="float">
            <text:p>533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61712962962963" calcext:value-type="float">
            <text:p>0,00061712962962963000</text:p>
          </table:table-cell>
          <table:table-cell table:formula="of:=[.D126]-[.D12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3" office:value-type="float" office:value="5375" calcext:value-type="float">
            <text:p>5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622106481481482" calcext:value-type="float">
            <text:p>0,00062210648148148200</text:p>
          </table:table-cell>
          <table:table-cell table:formula="of:=[.D127]-[.D12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3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627083333333333" calcext:value-type="float">
            <text:p>0,00062708333333333300</text:p>
          </table:table-cell>
          <table:table-cell table:formula="of:=[.D128]-[.D12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3" office:value-type="float" office:value="5461" calcext:value-type="float">
            <text:p>546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632060185185185" calcext:value-type="float">
            <text:p>0,00063206018518518500</text:p>
          </table:table-cell>
          <table:table-cell table:formula="of:=[.D129]-[.D12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3" office:value-type="float" office:value="5504" calcext:value-type="float">
            <text:p>550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637037037037037" calcext:value-type="float">
            <text:p>0,00063703703703703700</text:p>
          </table:table-cell>
          <table:table-cell table:formula="of:=[.D130]-[.D12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3" office:value-type="float" office:value="5547" calcext:value-type="float">
            <text:p>554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642013888888889" calcext:value-type="float">
            <text:p>0,00064201388888888900</text:p>
          </table:table-cell>
          <table:table-cell table:formula="of:=[.D131]-[.D13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3" office:value-type="float" office:value="5590" calcext:value-type="float">
            <text:p>55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646990740740741" calcext:value-type="float">
            <text:p>0,00064699074074074100</text:p>
          </table:table-cell>
          <table:table-cell table:formula="of:=[.D132]-[.D13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3" office:value-type="float" office:value="5633" calcext:value-type="float">
            <text:p>563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651967592592593" calcext:value-type="float">
            <text:p>0,00065196759259259300</text:p>
          </table:table-cell>
          <table:table-cell table:formula="of:=[.D133]-[.D13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3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656944444444445" calcext:value-type="float">
            <text:p>0,00065694444444444500</text:p>
          </table:table-cell>
          <table:table-cell table:formula="of:=[.D134]-[.D13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3" office:value-type="float" office:value="5719" calcext:value-type="float">
            <text:p>571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661921296296296" calcext:value-type="float">
            <text:p>0,00066192129629629600</text:p>
          </table:table-cell>
          <table:table-cell table:formula="of:=[.D135]-[.D13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3" office:value-type="float" office:value="5762" calcext:value-type="float">
            <text:p>576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666898148148148" calcext:value-type="float">
            <text:p>0,00066689814814814800</text:p>
          </table:table-cell>
          <table:table-cell table:formula="of:=[.D136]-[.D13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3" office:value-type="float" office:value="5805" calcext:value-type="float">
            <text:p>580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671875" calcext:value-type="float">
            <text:p>0,00067187500000000000</text:p>
          </table:table-cell>
          <table:table-cell table:formula="of:=[.D137]-[.D13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3" office:value-type="float" office:value="5848" calcext:value-type="float">
            <text:p>584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676851851851852" calcext:value-type="float">
            <text:p>0,00067685185185185200</text:p>
          </table:table-cell>
          <table:table-cell table:formula="of:=[.D138]-[.D13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3" office:value-type="float" office:value="5891" calcext:value-type="float">
            <text:p>589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681828703703704" calcext:value-type="float">
            <text:p>0,00068182870370370400</text:p>
          </table:table-cell>
          <table:table-cell table:formula="of:=[.D139]-[.D13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3" office:value-type="float" office:value="5934" calcext:value-type="float">
            <text:p>593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686805555555556" calcext:value-type="float">
            <text:p>0,00068680555555555600</text:p>
          </table:table-cell>
          <table:table-cell table:formula="of:=[.D140]-[.D13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3" office:value-type="float" office:value="5977" calcext:value-type="float">
            <text:p>597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691782407407408" calcext:value-type="float">
            <text:p>0,00069178240740740800</text:p>
          </table:table-cell>
          <table:table-cell table:formula="of:=[.D141]-[.D14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3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696759259259259" calcext:value-type="float">
            <text:p>0,00069675925925925900</text:p>
          </table:table-cell>
          <table:table-cell table:formula="of:=[.D142]-[.D14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3" office:value-type="float" office:value="6063" calcext:value-type="float">
            <text:p>606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701736111111111" calcext:value-type="float">
            <text:p>0,00070173611111111100</text:p>
          </table:table-cell>
          <table:table-cell table:formula="of:=[.D143]-[.D14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3" office:value-type="float" office:value="6106" calcext:value-type="float">
            <text:p>610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706712962962963" calcext:value-type="float">
            <text:p>0,00070671296296296300</text:p>
          </table:table-cell>
          <table:table-cell table:formula="of:=[.D144]-[.D14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3" office:value-type="float" office:value="6149" calcext:value-type="float">
            <text:p>614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711689814814815" calcext:value-type="float">
            <text:p>0,00071168981481481500</text:p>
          </table:table-cell>
          <table:table-cell table:formula="of:=[.D145]-[.D14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3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716666666666667" calcext:value-type="float">
            <text:p>0,00071666666666666700</text:p>
          </table:table-cell>
          <table:table-cell table:formula="of:=[.D146]-[.D14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3" office:value-type="float" office:value="6235" calcext:value-type="float">
            <text:p>623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721643518518519" calcext:value-type="float">
            <text:p>0,00072164351851851900</text:p>
          </table:table-cell>
          <table:table-cell table:formula="of:=[.D147]-[.D14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3" office:value-type="float" office:value="6278" calcext:value-type="float">
            <text:p>627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72662037037037" calcext:value-type="float">
            <text:p>0,00072662037037037000</text:p>
          </table:table-cell>
          <table:table-cell table:formula="of:=[.D148]-[.D14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3" office:value-type="float" office:value="6321" calcext:value-type="float">
            <text:p>632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731597222222222" calcext:value-type="float">
            <text:p>0,00073159722222222200</text:p>
          </table:table-cell>
          <table:table-cell table:formula="of:=[.D149]-[.D14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3" office:value-type="float" office:value="6364" calcext:value-type="float">
            <text:p>636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736574074074074" calcext:value-type="float">
            <text:p>0,00073657407407407400</text:p>
          </table:table-cell>
          <table:table-cell table:formula="of:=[.D150]-[.D14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3" office:value-type="float" office:value="6407" calcext:value-type="float">
            <text:p>640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741550925925926" calcext:value-type="float">
            <text:p>0,00074155092592592600</text:p>
          </table:table-cell>
          <table:table-cell table:formula="of:=[.D151]-[.D15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3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746527777777778" calcext:value-type="float">
            <text:p>0,00074652777777777800</text:p>
          </table:table-cell>
          <table:table-cell table:formula="of:=[.D152]-[.D15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3" office:value-type="float" office:value="6493" calcext:value-type="float">
            <text:p>649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75150462962963" calcext:value-type="float">
            <text:p>0,00075150462962963000</text:p>
          </table:table-cell>
          <table:table-cell table:formula="of:=[.D153]-[.D15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3" office:value-type="float" office:value="6536" calcext:value-type="float">
            <text:p>653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756481481481482" calcext:value-type="float">
            <text:p>0,00075648148148148200</text:p>
          </table:table-cell>
          <table:table-cell table:formula="of:=[.D154]-[.D15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3" office:value-type="float" office:value="6579" calcext:value-type="float">
            <text:p>657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761458333333333" calcext:value-type="float">
            <text:p>0,00076145833333333300</text:p>
          </table:table-cell>
          <table:table-cell table:formula="of:=[.D155]-[.D15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3" office:value-type="float" office:value="6622" calcext:value-type="float">
            <text:p>662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766435185185185" calcext:value-type="float">
            <text:p>0,00076643518518518500</text:p>
          </table:table-cell>
          <table:table-cell table:formula="of:=[.D156]-[.D15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3" office:value-type="float" office:value="6665" calcext:value-type="float">
            <text:p>666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771412037037037" calcext:value-type="float">
            <text:p>0,00077141203703703700</text:p>
          </table:table-cell>
          <table:table-cell table:formula="of:=[.D157]-[.D15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3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776388888888889" calcext:value-type="float">
            <text:p>0,00077638888888888900</text:p>
          </table:table-cell>
          <table:table-cell table:formula="of:=[.D158]-[.D15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3" office:value-type="float" office:value="6751" calcext:value-type="float">
            <text:p>675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781365740740741" calcext:value-type="float">
            <text:p>0,00078136574074074100</text:p>
          </table:table-cell>
          <table:table-cell table:formula="of:=[.D159]-[.D15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3" office:value-type="float" office:value="6794" calcext:value-type="float">
            <text:p>679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786342592592593" calcext:value-type="float">
            <text:p>0,00078634259259259300</text:p>
          </table:table-cell>
          <table:table-cell table:formula="of:=[.D160]-[.D15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3" office:value-type="float" office:value="6837" calcext:value-type="float">
            <text:p>683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791319444444444" calcext:value-type="float">
            <text:p>0,00079131944444444400</text:p>
          </table:table-cell>
          <table:table-cell table:formula="of:=[.D161]-[.D16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3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796296296296296" calcext:value-type="float">
            <text:p>0,00079629629629629600</text:p>
          </table:table-cell>
          <table:table-cell table:formula="of:=[.D162]-[.D16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3" office:value-type="float" office:value="6923" calcext:value-type="float">
            <text:p>692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801273148148148" calcext:value-type="float">
            <text:p>0,00080127314814814800</text:p>
          </table:table-cell>
          <table:table-cell table:formula="of:=[.D163]-[.D16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3" office:value-type="float" office:value="6966" calcext:value-type="float">
            <text:p>696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80625" calcext:value-type="float">
            <text:p>0,00080625000000000000</text:p>
          </table:table-cell>
          <table:table-cell table:formula="of:=[.D164]-[.D16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3" office:value-type="float" office:value="7009" calcext:value-type="float">
            <text:p>700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811226851851852" calcext:value-type="float">
            <text:p>0,00081122685185185200</text:p>
          </table:table-cell>
          <table:table-cell table:formula="of:=[.D165]-[.D16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3" office:value-type="float" office:value="7052" calcext:value-type="float">
            <text:p>705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816203703703704" calcext:value-type="float">
            <text:p>0,00081620370370370400</text:p>
          </table:table-cell>
          <table:table-cell table:formula="of:=[.D166]-[.D16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3" office:value-type="float" office:value="7095" calcext:value-type="float">
            <text:p>709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821180555555556" calcext:value-type="float">
            <text:p>0,00082118055555555600</text:p>
          </table:table-cell>
          <table:table-cell table:formula="of:=[.D167]-[.D16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3" office:value-type="float" office:value="7138" calcext:value-type="float">
            <text:p>713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826157407407407" calcext:value-type="float">
            <text:p>0,00082615740740740700</text:p>
          </table:table-cell>
          <table:table-cell table:formula="of:=[.D168]-[.D16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3" office:value-type="float" office:value="7181" calcext:value-type="float">
            <text:p>718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831134259259259" calcext:value-type="float">
            <text:p>0,00083113425925925900</text:p>
          </table:table-cell>
          <table:table-cell table:formula="of:=[.D169]-[.D16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3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836111111111111" calcext:value-type="float">
            <text:p>0,00083611111111111100</text:p>
          </table:table-cell>
          <table:table-cell table:formula="of:=[.D170]-[.D16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3" office:value-type="float" office:value="7267" calcext:value-type="float">
            <text:p>726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841087962962963" calcext:value-type="float">
            <text:p>0,00084108796296296300</text:p>
          </table:table-cell>
          <table:table-cell table:formula="of:=[.D171]-[.D17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3" office:value-type="float" office:value="7310" calcext:value-type="float">
            <text:p>73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846064814814815" calcext:value-type="float">
            <text:p>0,00084606481481481500</text:p>
          </table:table-cell>
          <table:table-cell table:formula="of:=[.D172]-[.D17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3" office:value-type="float" office:value="7353" calcext:value-type="float">
            <text:p>735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851041666666667" calcext:value-type="float">
            <text:p>0,00085104166666666700</text:p>
          </table:table-cell>
          <table:table-cell table:formula="of:=[.D173]-[.D17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3" office:value-type="float" office:value="7396" calcext:value-type="float">
            <text:p>739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856018518518519" calcext:value-type="float">
            <text:p>0,00085601851851851900</text:p>
          </table:table-cell>
          <table:table-cell table:formula="of:=[.D174]-[.D17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3" office:value-type="float" office:value="7439" calcext:value-type="float">
            <text:p>743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86099537037037" calcext:value-type="float">
            <text:p>0,00086099537037037000</text:p>
          </table:table-cell>
          <table:table-cell table:formula="of:=[.D175]-[.D17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3" office:value-type="float" office:value="7482" calcext:value-type="float">
            <text:p>748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865972222222222" calcext:value-type="float">
            <text:p>0,00086597222222222200</text:p>
          </table:table-cell>
          <table:table-cell table:formula="of:=[.D176]-[.D17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3" office:value-type="float" office:value="7525" calcext:value-type="float">
            <text:p>75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870949074074074" calcext:value-type="float">
            <text:p>0,00087094907407407400</text:p>
          </table:table-cell>
          <table:table-cell table:formula="of:=[.D177]-[.D17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3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875925925925926" calcext:value-type="float">
            <text:p>0,00087592592592592600</text:p>
          </table:table-cell>
          <table:table-cell table:formula="of:=[.D178]-[.D17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3" office:value-type="float" office:value="7611" calcext:value-type="float">
            <text:p>761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880902777777778" calcext:value-type="float">
            <text:p>0,00088090277777777800</text:p>
          </table:table-cell>
          <table:table-cell table:formula="of:=[.D179]-[.D17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3" office:value-type="float" office:value="7654" calcext:value-type="float">
            <text:p>765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88587962962963" calcext:value-type="float">
            <text:p>0,00088587962962963000</text:p>
          </table:table-cell>
          <table:table-cell table:formula="of:=[.D180]-[.D17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3" office:value-type="float" office:value="7697" calcext:value-type="float">
            <text:p>769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890856481481482" calcext:value-type="float">
            <text:p>0,00089085648148148100</text:p>
          </table:table-cell>
          <table:table-cell table:formula="of:=[.D181]-[.D180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3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895833333333333" calcext:value-type="float">
            <text:p>0,00089583333333333300</text:p>
          </table:table-cell>
          <table:table-cell table:formula="of:=[.D182]-[.D18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3" office:value-type="float" office:value="7783" calcext:value-type="float">
            <text:p>778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900810185185185" calcext:value-type="float">
            <text:p>0,00090081018518518500</text:p>
          </table:table-cell>
          <table:table-cell table:formula="of:=[.D183]-[.D18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3" office:value-type="float" office:value="7826" calcext:value-type="float">
            <text:p>782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905787037037037" calcext:value-type="float">
            <text:p>0,00090578703703703700</text:p>
          </table:table-cell>
          <table:table-cell table:formula="of:=[.D184]-[.D183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3" office:value-type="float" office:value="7869" calcext:value-type="float">
            <text:p>786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910763888888889" calcext:value-type="float">
            <text:p>0,00091076388888888900</text:p>
          </table:table-cell>
          <table:table-cell table:formula="of:=[.D185]-[.D18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3" office:value-type="float" office:value="7912" calcext:value-type="float">
            <text:p>791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915740740740741" calcext:value-type="float">
            <text:p>0,00091574074074074100</text:p>
          </table:table-cell>
          <table:table-cell table:formula="of:=[.D186]-[.D18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3" office:value-type="float" office:value="7955" calcext:value-type="float">
            <text:p>795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920717592592593" calcext:value-type="float">
            <text:p>0,00092071759259259200</text:p>
          </table:table-cell>
          <table:table-cell table:formula="of:=[.D187]-[.D18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3" office:value-type="float" office:value="7998" calcext:value-type="float">
            <text:p>799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925694444444445" calcext:value-type="float">
            <text:p>0,00092569444444444500</text:p>
          </table:table-cell>
          <table:table-cell table:formula="of:=[.D188]-[.D187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3" office:value-type="float" office:value="8041" calcext:value-type="float">
            <text:p>804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930671296296296" calcext:value-type="float">
            <text:p>0,00093067129629629600</text:p>
          </table:table-cell>
          <table:table-cell table:formula="of:=[.D189]-[.D188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3" office:value-type="float" office:value="8084" calcext:value-type="float">
            <text:p>808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935648148148148" calcext:value-type="float">
            <text:p>0,00093564814814814800</text:p>
          </table:table-cell>
          <table:table-cell table:formula="of:=[.D190]-[.D189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3" office:value-type="float" office:value="8127" calcext:value-type="float">
            <text:p>812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940625" calcext:value-type="float">
            <text:p>0,00094062500000000000</text:p>
          </table:table-cell>
          <table:table-cell table:formula="of:=[.D191]-[.D19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3" office:value-type="float" office:value="8170" calcext:value-type="float">
            <text:p>81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945601851851852" calcext:value-type="float">
            <text:p>0,00094560185185185200</text:p>
          </table:table-cell>
          <table:table-cell table:formula="of:=[.D192]-[.D191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3" office:value-type="float" office:value="8213" calcext:value-type="float">
            <text:p>821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950578703703704" calcext:value-type="float">
            <text:p>0,00095057870370370400</text:p>
          </table:table-cell>
          <table:table-cell table:formula="of:=[.D193]-[.D192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3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955555555555556" calcext:value-type="float">
            <text:p>0,00095555555555555600</text:p>
          </table:table-cell>
          <table:table-cell table:formula="of:=[.D194]-[.D19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3" office:value-type="float" office:value="8299" calcext:value-type="float">
            <text:p>829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960532407407408" calcext:value-type="float">
            <text:p>0,00096053240740740800</text:p>
          </table:table-cell>
          <table:table-cell table:formula="of:=[.D195]-[.D194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3" office:value-type="float" office:value="8342" calcext:value-type="float">
            <text:p>834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965509259259259" calcext:value-type="float">
            <text:p>0,00096550925925925900</text:p>
          </table:table-cell>
          <table:table-cell table:formula="of:=[.D196]-[.D195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3" office:value-type="float" office:value="8385" calcext:value-type="float">
            <text:p>838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970486111111111" calcext:value-type="float">
            <text:p>0,00097048611111111100</text:p>
          </table:table-cell>
          <table:table-cell table:formula="of:=[.D197]-[.D196]" office:value-type="float" office:value="0.00000497685185185182" calcext:value-type="float">
            <text:p>0,000004976851851851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3" office:value-type="float" office:value="8428" calcext:value-type="float">
            <text:p>842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975462962962963" calcext:value-type="float">
            <text:p>0,00097546296296296300</text:p>
          </table:table-cell>
          <table:table-cell table:formula="of:=[.D198]-[.D19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3" office:value-type="float" office:value="8471" calcext:value-type="float">
            <text:p>847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980439814814815" calcext:value-type="float">
            <text:p>0,00098043981481481500</text:p>
          </table:table-cell>
          <table:table-cell table:formula="of:=[.D199]-[.D19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3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985416666666667" calcext:value-type="float">
            <text:p>0,00098541666666666700</text:p>
          </table:table-cell>
          <table:table-cell table:formula="of:=[.D200]-[.D19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3" office:value-type="float" office:value="8557" calcext:value-type="float">
            <text:p>855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990393518518519" calcext:value-type="float">
            <text:p>0,00099039351851851900</text:p>
          </table:table-cell>
          <table:table-cell table:formula="of:=[.D201]-[.D20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3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99537037037037" calcext:value-type="float">
            <text:p>0,00099537037037037000</text:p>
          </table:table-cell>
          <table:table-cell table:formula="of:=[.D202]-[.D201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3" office:value-type="float" office:value="8643" calcext:value-type="float">
            <text:p>864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00034722222222" calcext:value-type="float">
            <text:p>0,00100034722222222000</text:p>
          </table:table-cell>
          <table:table-cell table:formula="of:=[.D203]-[.D20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3" office:value-type="float" office:value="8686" calcext:value-type="float">
            <text:p>868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00532407407407" calcext:value-type="float">
            <text:p>0,00100532407407407000</text:p>
          </table:table-cell>
          <table:table-cell table:formula="of:=[.D204]-[.D20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3" office:value-type="float" office:value="8729" calcext:value-type="float">
            <text:p>872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01030092592593" calcext:value-type="float">
            <text:p>0,00101030092592593000</text:p>
          </table:table-cell>
          <table:table-cell table:formula="of:=[.D205]-[.D20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3" office:value-type="float" office:value="8772" calcext:value-type="float">
            <text:p>877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01527777777778" calcext:value-type="float">
            <text:p>0,00101527777777778000</text:p>
          </table:table-cell>
          <table:table-cell table:formula="of:=[.D206]-[.D20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3" office:value-type="float" office:value="8815" calcext:value-type="float">
            <text:p>881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02025462962963" calcext:value-type="float">
            <text:p>0,00102025462962963000</text:p>
          </table:table-cell>
          <table:table-cell table:formula="of:=[.D207]-[.D20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3" office:value-type="float" office:value="8858" calcext:value-type="float">
            <text:p>885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02523148148148" calcext:value-type="float">
            <text:p>0,00102523148148148000</text:p>
          </table:table-cell>
          <table:table-cell table:formula="of:=[.D208]-[.D207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3" office:value-type="float" office:value="8901" calcext:value-type="float">
            <text:p>890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03020833333333" calcext:value-type="float">
            <text:p>0,00103020833333333000</text:p>
          </table:table-cell>
          <table:table-cell table:formula="of:=[.D209]-[.D20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3" office:value-type="float" office:value="8944" calcext:value-type="float">
            <text:p>894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03518518518519" calcext:value-type="float">
            <text:p>0,00103518518518519000</text:p>
          </table:table-cell>
          <table:table-cell table:formula="of:=[.D210]-[.D20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3" office:value-type="float" office:value="8987" calcext:value-type="float">
            <text:p>898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04016203703704" calcext:value-type="float">
            <text:p>0,00104016203703704000</text:p>
          </table:table-cell>
          <table:table-cell table:formula="of:=[.D211]-[.D21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3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04513888888889" calcext:value-type="float">
            <text:p>0,00104513888888889000</text:p>
          </table:table-cell>
          <table:table-cell table:formula="of:=[.D212]-[.D21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3" office:value-type="float" office:value="9073" calcext:value-type="float">
            <text:p>907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05011574074074" calcext:value-type="float">
            <text:p>0,00105011574074074000</text:p>
          </table:table-cell>
          <table:table-cell table:formula="of:=[.D213]-[.D21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3" office:value-type="float" office:value="9116" calcext:value-type="float">
            <text:p>911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05509259259259" calcext:value-type="float">
            <text:p>0,00105509259259259000</text:p>
          </table:table-cell>
          <table:table-cell table:formula="of:=[.D214]-[.D21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3" office:value-type="float" office:value="9159" calcext:value-type="float">
            <text:p>915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06006944444444" calcext:value-type="float">
            <text:p>0,00106006944444444000</text:p>
          </table:table-cell>
          <table:table-cell table:formula="of:=[.D215]-[.D21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3" office:value-type="float" office:value="9202" calcext:value-type="float">
            <text:p>920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0650462962963" calcext:value-type="float">
            <text:p>0,00106504629629630000</text:p>
          </table:table-cell>
          <table:table-cell table:formula="of:=[.D216]-[.D215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3" office:value-type="float" office:value="9245" calcext:value-type="float">
            <text:p>924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07002314814815" calcext:value-type="float">
            <text:p>0,00107002314814815000</text:p>
          </table:table-cell>
          <table:table-cell table:formula="of:=[.D217]-[.D21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3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075" calcext:value-type="float">
            <text:p>0,00107500000000000000</text:p>
          </table:table-cell>
          <table:table-cell table:formula="of:=[.D218]-[.D21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3" office:value-type="float" office:value="9331" calcext:value-type="float">
            <text:p>933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07997685185185" calcext:value-type="float">
            <text:p>0,00107997685185185000</text:p>
          </table:table-cell>
          <table:table-cell table:formula="of:=[.D219]-[.D21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3" office:value-type="float" office:value="9374" calcext:value-type="float">
            <text:p>937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0849537037037" calcext:value-type="float">
            <text:p>0,00108495370370370000</text:p>
          </table:table-cell>
          <table:table-cell table:formula="of:=[.D220]-[.D21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3" office:value-type="float" office:value="9417" calcext:value-type="float">
            <text:p>941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08993055555556" calcext:value-type="float">
            <text:p>0,00108993055555556000</text:p>
          </table:table-cell>
          <table:table-cell table:formula="of:=[.D221]-[.D22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3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09490740740741" calcext:value-type="float">
            <text:p>0,00109490740740741000</text:p>
          </table:table-cell>
          <table:table-cell table:formula="of:=[.D222]-[.D221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3" office:value-type="float" office:value="9503" calcext:value-type="float">
            <text:p>950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09988425925926" calcext:value-type="float">
            <text:p>0,00109988425925926000</text:p>
          </table:table-cell>
          <table:table-cell table:formula="of:=[.D223]-[.D22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3" office:value-type="float" office:value="9546" calcext:value-type="float">
            <text:p>954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10486111111111" calcext:value-type="float">
            <text:p>0,00110486111111111000</text:p>
          </table:table-cell>
          <table:table-cell table:formula="of:=[.D224]-[.D223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3" office:value-type="float" office:value="9589" calcext:value-type="float">
            <text:p>958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10983796296296" calcext:value-type="float">
            <text:p>0,00110983796296296000</text:p>
          </table:table-cell>
          <table:table-cell table:formula="of:=[.D225]-[.D22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3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11481481481481" calcext:value-type="float">
            <text:p>0,00111481481481481000</text:p>
          </table:table-cell>
          <table:table-cell table:formula="of:=[.D226]-[.D22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3" office:value-type="float" office:value="9675" calcext:value-type="float">
            <text:p>96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11979166666667" calcext:value-type="float">
            <text:p>0,00111979166666667000</text:p>
          </table:table-cell>
          <table:table-cell table:formula="of:=[.D227]-[.D226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3" office:value-type="float" office:value="9718" calcext:value-type="float">
            <text:p>971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12476851851852" calcext:value-type="float">
            <text:p>0,00112476851851852000</text:p>
          </table:table-cell>
          <table:table-cell table:formula="of:=[.D228]-[.D22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3" office:value-type="float" office:value="9761" calcext:value-type="float">
            <text:p>976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12974537037037" calcext:value-type="float">
            <text:p>0,00112974537037037000</text:p>
          </table:table-cell>
          <table:table-cell table:formula="of:=[.D229]-[.D22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3" office:value-type="float" office:value="9804" calcext:value-type="float">
            <text:p>980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13472222222222" calcext:value-type="float">
            <text:p>0,00113472222222222000</text:p>
          </table:table-cell>
          <table:table-cell table:formula="of:=[.D230]-[.D229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3" office:value-type="float" office:value="9847" calcext:value-type="float">
            <text:p>984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13969907407407" calcext:value-type="float">
            <text:p>0,00113969907407407000</text:p>
          </table:table-cell>
          <table:table-cell table:formula="of:=[.D231]-[.D23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3" office:value-type="float" office:value="9890" calcext:value-type="float">
            <text:p>98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14467592592593" calcext:value-type="float">
            <text:p>0,00114467592592593000</text:p>
          </table:table-cell>
          <table:table-cell table:formula="of:=[.D232]-[.D23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3" office:value-type="float" office:value="9933" calcext:value-type="float">
            <text:p>993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14965277777778" calcext:value-type="float">
            <text:p>0,00114965277777778000</text:p>
          </table:table-cell>
          <table:table-cell table:formula="of:=[.D233]-[.D23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3" office:value-type="float" office:value="9976" calcext:value-type="float">
            <text:p>997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15462962962963" calcext:value-type="float">
            <text:p>0,00115462962962963000</text:p>
          </table:table-cell>
          <table:table-cell table:formula="of:=[.D234]-[.D23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3" office:value-type="float" office:value="10019" calcext:value-type="float">
            <text:p>1001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15960648148148" calcext:value-type="float">
            <text:p>0,00115960648148148000</text:p>
          </table:table-cell>
          <table:table-cell table:formula="of:=[.D235]-[.D23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3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16458333333333" calcext:value-type="float">
            <text:p>0,00116458333333333000</text:p>
          </table:table-cell>
          <table:table-cell table:formula="of:=[.D236]-[.D23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3" office:value-type="float" office:value="10105" calcext:value-type="float">
            <text:p>1010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16956018518519" calcext:value-type="float">
            <text:p>0,00116956018518519000</text:p>
          </table:table-cell>
          <table:table-cell table:formula="of:=[.D237]-[.D23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3" office:value-type="float" office:value="10148" calcext:value-type="float">
            <text:p>1014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17453703703704" calcext:value-type="float">
            <text:p>0,00117453703703704000</text:p>
          </table:table-cell>
          <table:table-cell table:formula="of:=[.D238]-[.D237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3" office:value-type="float" office:value="10191" calcext:value-type="float">
            <text:p>1019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17951388888889" calcext:value-type="float">
            <text:p>0,00117951388888889000</text:p>
          </table:table-cell>
          <table:table-cell table:formula="of:=[.D239]-[.D23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3" office:value-type="float" office:value="10234" calcext:value-type="float">
            <text:p>1023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18449074074074" calcext:value-type="float">
            <text:p>0,00118449074074074000</text:p>
          </table:table-cell>
          <table:table-cell table:formula="of:=[.D240]-[.D23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3" office:value-type="float" office:value="10277" calcext:value-type="float">
            <text:p>1027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18946759259259" calcext:value-type="float">
            <text:p>0,00118946759259259000</text:p>
          </table:table-cell>
          <table:table-cell table:formula="of:=[.D241]-[.D24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3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19444444444444" calcext:value-type="float">
            <text:p>0,00119444444444444000</text:p>
          </table:table-cell>
          <table:table-cell table:formula="of:=[.D242]-[.D24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3" office:value-type="float" office:value="10363" calcext:value-type="float">
            <text:p>1036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1994212962963" calcext:value-type="float">
            <text:p>0,00119942129629630000</text:p>
          </table:table-cell>
          <table:table-cell table:formula="of:=[.D243]-[.D24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3" office:value-type="float" office:value="10406" calcext:value-type="float">
            <text:p>1040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20439814814815" calcext:value-type="float">
            <text:p>0,00120439814814815000</text:p>
          </table:table-cell>
          <table:table-cell table:formula="of:=[.D244]-[.D243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3" office:value-type="float" office:value="10449" calcext:value-type="float">
            <text:p>1044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209375" calcext:value-type="float">
            <text:p>0,00120937500000000000</text:p>
          </table:table-cell>
          <table:table-cell table:formula="of:=[.D245]-[.D24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3" office:value-type="float" office:value="10492" calcext:value-type="float">
            <text:p>1049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21435185185185" calcext:value-type="float">
            <text:p>0,00121435185185185000</text:p>
          </table:table-cell>
          <table:table-cell table:formula="of:=[.D246]-[.D24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3" office:value-type="float" office:value="10535" calcext:value-type="float">
            <text:p>1053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2193287037037" calcext:value-type="float">
            <text:p>0,00121932870370370000</text:p>
          </table:table-cell>
          <table:table-cell table:formula="of:=[.D247]-[.D246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3" office:value-type="float" office:value="10578" calcext:value-type="float">
            <text:p>1057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22430555555556" calcext:value-type="float">
            <text:p>0,00122430555555556000</text:p>
          </table:table-cell>
          <table:table-cell table:formula="of:=[.D248]-[.D24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3" office:value-type="float" office:value="10621" calcext:value-type="float">
            <text:p>1062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22928240740741" calcext:value-type="float">
            <text:p>0,00122928240740741000</text:p>
          </table:table-cell>
          <table:table-cell table:formula="of:=[.D249]-[.D24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3" office:value-type="float" office:value="10664" calcext:value-type="float">
            <text:p>1066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23425925925926" calcext:value-type="float">
            <text:p>0,00123425925925926000</text:p>
          </table:table-cell>
          <table:table-cell table:formula="of:=[.D250]-[.D24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3" office:value-type="float" office:value="10707" calcext:value-type="float">
            <text:p>1070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23923611111111" calcext:value-type="float">
            <text:p>0,00123923611111111000</text:p>
          </table:table-cell>
          <table:table-cell table:formula="of:=[.D251]-[.D25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3" office:value-type="float" office:value="10750" calcext:value-type="float">
            <text:p>10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24421296296296" calcext:value-type="float">
            <text:p>0,00124421296296296000</text:p>
          </table:table-cell>
          <table:table-cell table:formula="of:=[.D252]-[.D251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3" office:value-type="float" office:value="10793" calcext:value-type="float">
            <text:p>1079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24918981481481" calcext:value-type="float">
            <text:p>0,00124918981481481000</text:p>
          </table:table-cell>
          <table:table-cell table:formula="of:=[.D253]-[.D25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3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25416666666667" calcext:value-type="float">
            <text:p>0,00125416666666667000</text:p>
          </table:table-cell>
          <table:table-cell table:formula="of:=[.D254]-[.D25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3" office:value-type="float" office:value="10879" calcext:value-type="float">
            <text:p>1087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25914351851852" calcext:value-type="float">
            <text:p>0,00125914351851852000</text:p>
          </table:table-cell>
          <table:table-cell table:formula="of:=[.D255]-[.D25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3" office:value-type="float" office:value="10922" calcext:value-type="float">
            <text:p>1092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26412037037037" calcext:value-type="float">
            <text:p>0,00126412037037037000</text:p>
          </table:table-cell>
          <table:table-cell table:formula="of:=[.D256]-[.D25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3" office:value-type="float" office:value="10965" calcext:value-type="float">
            <text:p>1096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26909722222222" calcext:value-type="float">
            <text:p>0,00126909722222222000</text:p>
          </table:table-cell>
          <table:table-cell table:formula="of:=[.D257]-[.D25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3" office:value-type="float" office:value="11008" calcext:value-type="float">
            <text:p>1100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27407407407407" calcext:value-type="float">
            <text:p>0,00127407407407407000</text:p>
          </table:table-cell>
          <table:table-cell table:formula="of:=[.D258]-[.D257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3" office:value-type="float" office:value="11051" calcext:value-type="float">
            <text:p>1105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27905092592593" calcext:value-type="float">
            <text:p>0,00127905092592593000</text:p>
          </table:table-cell>
          <table:table-cell table:formula="of:=[.D259]-[.D25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3" office:value-type="float" office:value="11094" calcext:value-type="float">
            <text:p>1109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28402777777778" calcext:value-type="float">
            <text:p>0,00128402777777778000</text:p>
          </table:table-cell>
          <table:table-cell table:formula="of:=[.D260]-[.D259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3" office:value-type="float" office:value="11137" calcext:value-type="float">
            <text:p>1113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28900462962963" calcext:value-type="float">
            <text:p>0,00128900462962963000</text:p>
          </table:table-cell>
          <table:table-cell table:formula="of:=[.D261]-[.D26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3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29398148148148" calcext:value-type="float">
            <text:p>0,00129398148148148000</text:p>
          </table:table-cell>
          <table:table-cell table:formula="of:=[.D262]-[.D26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3" office:value-type="float" office:value="11223" calcext:value-type="float">
            <text:p>1122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29895833333333" calcext:value-type="float">
            <text:p>0,00129895833333333000</text:p>
          </table:table-cell>
          <table:table-cell table:formula="of:=[.D263]-[.D26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3" office:value-type="float" office:value="11266" calcext:value-type="float">
            <text:p>1126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30393518518519" calcext:value-type="float">
            <text:p>0,00130393518518519000</text:p>
          </table:table-cell>
          <table:table-cell table:formula="of:=[.D264]-[.D26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3" office:value-type="float" office:value="11309" calcext:value-type="float">
            <text:p>1130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30891203703704" calcext:value-type="float">
            <text:p>0,00130891203703704000</text:p>
          </table:table-cell>
          <table:table-cell table:formula="of:=[.D265]-[.D26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3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31388888888889" calcext:value-type="float">
            <text:p>0,00131388888888889000</text:p>
          </table:table-cell>
          <table:table-cell table:formula="of:=[.D266]-[.D265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3" office:value-type="float" office:value="11395" calcext:value-type="float">
            <text:p>1139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31886574074074" calcext:value-type="float">
            <text:p>0,00131886574074074000</text:p>
          </table:table-cell>
          <table:table-cell table:formula="of:=[.D267]-[.D26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3" office:value-type="float" office:value="11438" calcext:value-type="float">
            <text:p>1143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32384259259259" calcext:value-type="float">
            <text:p>0,00132384259259259000</text:p>
          </table:table-cell>
          <table:table-cell table:formula="of:=[.D268]-[.D26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3" office:value-type="float" office:value="11481" calcext:value-type="float">
            <text:p>1148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32881944444444" calcext:value-type="float">
            <text:p>0,00132881944444444000</text:p>
          </table:table-cell>
          <table:table-cell table:formula="of:=[.D269]-[.D26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3" office:value-type="float" office:value="11524" calcext:value-type="float">
            <text:p>1152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3337962962963" calcext:value-type="float">
            <text:p>0,00133379629629630000</text:p>
          </table:table-cell>
          <table:table-cell table:formula="of:=[.D270]-[.D26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3" office:value-type="float" office:value="11567" calcext:value-type="float">
            <text:p>1156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33877314814815" calcext:value-type="float">
            <text:p>0,00133877314814815000</text:p>
          </table:table-cell>
          <table:table-cell table:formula="of:=[.D271]-[.D27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3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34375" calcext:value-type="float">
            <text:p>0,00134375000000000000</text:p>
          </table:table-cell>
          <table:table-cell table:formula="of:=[.D272]-[.D27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3" office:value-type="float" office:value="11653" calcext:value-type="float">
            <text:p>1165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34872685185185" calcext:value-type="float">
            <text:p>0,00134872685185185000</text:p>
          </table:table-cell>
          <table:table-cell table:formula="of:=[.D273]-[.D27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3" office:value-type="float" office:value="11696" calcext:value-type="float">
            <text:p>1169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3537037037037" calcext:value-type="float">
            <text:p>0,00135370370370370000</text:p>
          </table:table-cell>
          <table:table-cell table:formula="of:=[.D274]-[.D273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3" office:value-type="float" office:value="11739" calcext:value-type="float">
            <text:p>1173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35868055555556" calcext:value-type="float">
            <text:p>0,00135868055555556000</text:p>
          </table:table-cell>
          <table:table-cell table:formula="of:=[.D275]-[.D27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3" office:value-type="float" office:value="11782" calcext:value-type="float">
            <text:p>1178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36365740740741" calcext:value-type="float">
            <text:p>0,00136365740740741000</text:p>
          </table:table-cell>
          <table:table-cell table:formula="of:=[.D276]-[.D27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3" office:value-type="float" office:value="11825" calcext:value-type="float">
            <text:p>118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36863425925926" calcext:value-type="float">
            <text:p>0,00136863425925926000</text:p>
          </table:table-cell>
          <table:table-cell table:formula="of:=[.D277]-[.D276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3" office:value-type="float" office:value="11868" calcext:value-type="float">
            <text:p>1186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37361111111111" calcext:value-type="float">
            <text:p>0,00137361111111111000</text:p>
          </table:table-cell>
          <table:table-cell table:formula="of:=[.D278]-[.D27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3" office:value-type="float" office:value="11911" calcext:value-type="float">
            <text:p>1191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37858796296296" calcext:value-type="float">
            <text:p>0,00137858796296296000</text:p>
          </table:table-cell>
          <table:table-cell table:formula="of:=[.D279]-[.D27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3" office:value-type="float" office:value="11954" calcext:value-type="float">
            <text:p>1195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38356481481482" calcext:value-type="float">
            <text:p>0,00138356481481482000</text:p>
          </table:table-cell>
          <table:table-cell table:formula="of:=[.D280]-[.D279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3" office:value-type="float" office:value="11997" calcext:value-type="float">
            <text:p>1199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38854166666667" calcext:value-type="float">
            <text:p>0,00138854166666667000</text:p>
          </table:table-cell>
          <table:table-cell table:formula="of:=[.D281]-[.D28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3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39351851851852" calcext:value-type="float">
            <text:p>0,00139351851851852000</text:p>
          </table:table-cell>
          <table:table-cell table:formula="of:=[.D282]-[.D28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3" office:value-type="float" office:value="12083" calcext:value-type="float">
            <text:p>1208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39849537037037" calcext:value-type="float">
            <text:p>0,00139849537037037000</text:p>
          </table:table-cell>
          <table:table-cell table:formula="of:=[.D283]-[.D28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3" office:value-type="float" office:value="12126" calcext:value-type="float">
            <text:p>1212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40347222222222" calcext:value-type="float">
            <text:p>0,00140347222222222000</text:p>
          </table:table-cell>
          <table:table-cell table:formula="of:=[.D284]-[.D28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3" office:value-type="float" office:value="12169" calcext:value-type="float">
            <text:p>1216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40844907407407" calcext:value-type="float">
            <text:p>0,00140844907407407000</text:p>
          </table:table-cell>
          <table:table-cell table:formula="of:=[.D285]-[.D28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3" office:value-type="float" office:value="12212" calcext:value-type="float">
            <text:p>1221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41342592592593" calcext:value-type="float">
            <text:p>0,00141342592592593000</text:p>
          </table:table-cell>
          <table:table-cell table:formula="of:=[.D286]-[.D28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3" office:value-type="float" office:value="12255" calcext:value-type="float">
            <text:p>1225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41840277777778" calcext:value-type="float">
            <text:p>0,00141840277777778000</text:p>
          </table:table-cell>
          <table:table-cell table:formula="of:=[.D287]-[.D28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3" office:value-type="float" office:value="12298" calcext:value-type="float">
            <text:p>1229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42337962962963" calcext:value-type="float">
            <text:p>0,00142337962962963000</text:p>
          </table:table-cell>
          <table:table-cell table:formula="of:=[.D288]-[.D287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3" office:value-type="float" office:value="12341" calcext:value-type="float">
            <text:p>1234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42835648148148" calcext:value-type="float">
            <text:p>0,00142835648148148000</text:p>
          </table:table-cell>
          <table:table-cell table:formula="of:=[.D289]-[.D28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3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43333333333333" calcext:value-type="float">
            <text:p>0,00143333333333333000</text:p>
          </table:table-cell>
          <table:table-cell table:formula="of:=[.D290]-[.D28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3" office:value-type="float" office:value="12427" calcext:value-type="float">
            <text:p>1242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43831018518519" calcext:value-type="float">
            <text:p>0,00143831018518519000</text:p>
          </table:table-cell>
          <table:table-cell table:formula="of:=[.D291]-[.D29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3" office:value-type="float" office:value="12470" calcext:value-type="float">
            <text:p>1247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44328703703704" calcext:value-type="float">
            <text:p>0,00144328703703704000</text:p>
          </table:table-cell>
          <table:table-cell table:formula="of:=[.D292]-[.D29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3" office:value-type="float" office:value="12513" calcext:value-type="float">
            <text:p>12513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44826388888889" calcext:value-type="float">
            <text:p>0,00144826388888889000</text:p>
          </table:table-cell>
          <table:table-cell table:formula="of:=[.D293]-[.D29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3" office:value-type="float" office:value="12556" calcext:value-type="float">
            <text:p>1255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45324074074074" calcext:value-type="float">
            <text:p>0,00145324074074074000</text:p>
          </table:table-cell>
          <table:table-cell table:formula="of:=[.D294]-[.D293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3" office:value-type="float" office:value="12599" calcext:value-type="float">
            <text:p>12599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45821759259259" calcext:value-type="float">
            <text:p>0,00145821759259259000</text:p>
          </table:table-cell>
          <table:table-cell table:formula="of:=[.D295]-[.D29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3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46319444444444" calcext:value-type="float">
            <text:p>0,00146319444444444000</text:p>
          </table:table-cell>
          <table:table-cell table:formula="of:=[.D296]-[.D295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3" office:value-type="float" office:value="12685" calcext:value-type="float">
            <text:p>1268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4681712962963" calcext:value-type="float">
            <text:p>0,00146817129629630000</text:p>
          </table:table-cell>
          <table:table-cell table:formula="of:=[.D297]-[.D29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3" office:value-type="float" office:value="12728" calcext:value-type="float">
            <text:p>1272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47314814814815" calcext:value-type="float">
            <text:p>0,00147314814814815000</text:p>
          </table:table-cell>
          <table:table-cell table:formula="of:=[.D298]-[.D29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3" office:value-type="float" office:value="12771" calcext:value-type="float">
            <text:p>12771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478125" calcext:value-type="float">
            <text:p>0,00147812500000000000</text:p>
          </table:table-cell>
          <table:table-cell table:formula="of:=[.D299]-[.D29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3" office:value-type="float" office:value="12814" calcext:value-type="float">
            <text:p>1281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48310185185185" calcext:value-type="float">
            <text:p>0,00148310185185185000</text:p>
          </table:table-cell>
          <table:table-cell table:formula="of:=[.D300]-[.D29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3" office:value-type="float" office:value="12857" calcext:value-type="float">
            <text:p>12857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4880787037037" calcext:value-type="float">
            <text:p>0,00148807870370370000</text:p>
          </table:table-cell>
          <table:table-cell table:formula="of:=[.D301]-[.D30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3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49305555555556" calcext:value-type="float">
            <text:p>0,00149305555555556000</text:p>
          </table:table-cell>
          <table:table-cell table:formula="of:=[.D302]-[.D301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3" office:value-type="float" office:value="12943" calcext:value-type="float">
            <text:p>12943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49803240740741" calcext:value-type="float">
            <text:p>0,00149803240740741000</text:p>
          </table:table-cell>
          <table:table-cell table:formula="of:=[.D303]-[.D30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3" office:value-type="float" office:value="12986" calcext:value-type="float">
            <text:p>1298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50300925925926" calcext:value-type="float">
            <text:p>0,00150300925925926000</text:p>
          </table:table-cell>
          <table:table-cell table:formula="of:=[.D304]-[.D30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3" office:value-type="float" office:value="13029" calcext:value-type="float">
            <text:p>13029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50798611111111" calcext:value-type="float">
            <text:p>0,00150798611111111000</text:p>
          </table:table-cell>
          <table:table-cell table:formula="of:=[.D305]-[.D30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3" office:value-type="float" office:value="13072" calcext:value-type="float">
            <text:p>1307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51296296296296" calcext:value-type="float">
            <text:p>0,00151296296296296000</text:p>
          </table:table-cell>
          <table:table-cell table:formula="of:=[.D306]-[.D30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3" office:value-type="float" office:value="13115" calcext:value-type="float">
            <text:p>1311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51793981481481" calcext:value-type="float">
            <text:p>0,00151793981481481000</text:p>
          </table:table-cell>
          <table:table-cell table:formula="of:=[.D307]-[.D306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3" office:value-type="float" office:value="13158" calcext:value-type="float">
            <text:p>1315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52291666666667" calcext:value-type="float">
            <text:p>0,00152291666666667000</text:p>
          </table:table-cell>
          <table:table-cell table:formula="of:=[.D308]-[.D30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3" office:value-type="float" office:value="13201" calcext:value-type="float">
            <text:p>13201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52789351851852" calcext:value-type="float">
            <text:p>0,00152789351851852000</text:p>
          </table:table-cell>
          <table:table-cell table:formula="of:=[.D309]-[.D30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3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53287037037037" calcext:value-type="float">
            <text:p>0,00153287037037037000</text:p>
          </table:table-cell>
          <table:table-cell table:formula="of:=[.D310]-[.D309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3" office:value-type="float" office:value="13287" calcext:value-type="float">
            <text:p>13287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53784722222222" calcext:value-type="float">
            <text:p>0,00153784722222222000</text:p>
          </table:table-cell>
          <table:table-cell table:formula="of:=[.D311]-[.D31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3" office:value-type="float" office:value="13330" calcext:value-type="float">
            <text:p>1333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54282407407407" calcext:value-type="float">
            <text:p>0,00154282407407407000</text:p>
          </table:table-cell>
          <table:table-cell table:formula="of:=[.D312]-[.D31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3" office:value-type="float" office:value="13373" calcext:value-type="float">
            <text:p>13373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54780092592593" calcext:value-type="float">
            <text:p>0,00154780092592593000</text:p>
          </table:table-cell>
          <table:table-cell table:formula="of:=[.D313]-[.D31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3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55277777777778" calcext:value-type="float">
            <text:p>0,00155277777777778000</text:p>
          </table:table-cell>
          <table:table-cell table:formula="of:=[.D314]-[.D31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3" office:value-type="float" office:value="13459" calcext:value-type="float">
            <text:p>13459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55775462962963" calcext:value-type="float">
            <text:p>0,00155775462962963000</text:p>
          </table:table-cell>
          <table:table-cell table:formula="of:=[.D315]-[.D31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3" office:value-type="float" office:value="13502" calcext:value-type="float">
            <text:p>1350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56273148148148" calcext:value-type="float">
            <text:p>0,00156273148148148000</text:p>
          </table:table-cell>
          <table:table-cell table:formula="of:=[.D316]-[.D315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3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56770833333333" calcext:value-type="float">
            <text:p>0,00156770833333333000</text:p>
          </table:table-cell>
          <table:table-cell table:formula="of:=[.D317]-[.D31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3" office:value-type="float" office:value="13588" calcext:value-type="float">
            <text:p>1358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57268518518519" calcext:value-type="float">
            <text:p>0,00157268518518519000</text:p>
          </table:table-cell>
          <table:table-cell table:formula="of:=[.D318]-[.D31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3" office:value-type="float" office:value="13631" calcext:value-type="float">
            <text:p>13631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57766203703704" calcext:value-type="float">
            <text:p>0,00157766203703704000</text:p>
          </table:table-cell>
          <table:table-cell table:formula="of:=[.D319]-[.D31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3" office:value-type="float" office:value="13674" calcext:value-type="float">
            <text:p>1367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58263888888889" calcext:value-type="float">
            <text:p>0,00158263888888889000</text:p>
          </table:table-cell>
          <table:table-cell table:formula="of:=[.D320]-[.D31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3" office:value-type="float" office:value="13717" calcext:value-type="float">
            <text:p>13717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58761574074074" calcext:value-type="float">
            <text:p>0,00158761574074074000</text:p>
          </table:table-cell>
          <table:table-cell table:formula="of:=[.D321]-[.D32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3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59259259259259" calcext:value-type="float">
            <text:p>0,00159259259259259000</text:p>
          </table:table-cell>
          <table:table-cell table:formula="of:=[.D322]-[.D32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3" office:value-type="float" office:value="13803" calcext:value-type="float">
            <text:p>13803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59756944444444" calcext:value-type="float">
            <text:p>0,00159756944444444000</text:p>
          </table:table-cell>
          <table:table-cell table:formula="of:=[.D323]-[.D32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3" office:value-type="float" office:value="13846" calcext:value-type="float">
            <text:p>1384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6025462962963" calcext:value-type="float">
            <text:p>0,00160254629629630000</text:p>
          </table:table-cell>
          <table:table-cell table:formula="of:=[.D324]-[.D323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3" office:value-type="float" office:value="13889" calcext:value-type="float">
            <text:p>13889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60752314814815" calcext:value-type="float">
            <text:p>0,00160752314814815000</text:p>
          </table:table-cell>
          <table:table-cell table:formula="of:=[.D325]-[.D32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3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6125" calcext:value-type="float">
            <text:p>0,00161250000000000000</text:p>
          </table:table-cell>
          <table:table-cell table:formula="of:=[.D326]-[.D32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3" office:value-type="float" office:value="13975" calcext:value-type="float">
            <text:p>139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61747685185185" calcext:value-type="float">
            <text:p>0,00161747685185185000</text:p>
          </table:table-cell>
          <table:table-cell table:formula="of:=[.D327]-[.D326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3" office:value-type="float" office:value="14018" calcext:value-type="float">
            <text:p>1401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6224537037037" calcext:value-type="float">
            <text:p>0,00162245370370370000</text:p>
          </table:table-cell>
          <table:table-cell table:formula="of:=[.D328]-[.D32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3" office:value-type="float" office:value="14061" calcext:value-type="float">
            <text:p>14061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62743055555556" calcext:value-type="float">
            <text:p>0,00162743055555556000</text:p>
          </table:table-cell>
          <table:table-cell table:formula="of:=[.D329]-[.D32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3" office:value-type="float" office:value="14104" calcext:value-type="float">
            <text:p>1410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63240740740741" calcext:value-type="float">
            <text:p>0,00163240740740741000</text:p>
          </table:table-cell>
          <table:table-cell table:formula="of:=[.D330]-[.D329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3" office:value-type="float" office:value="14147" calcext:value-type="float">
            <text:p>14147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63738425925926" calcext:value-type="float">
            <text:p>0,00163738425925926000</text:p>
          </table:table-cell>
          <table:table-cell table:formula="of:=[.D331]-[.D33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3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64236111111111" calcext:value-type="float">
            <text:p>0,00164236111111111000</text:p>
          </table:table-cell>
          <table:table-cell table:formula="of:=[.D332]-[.D331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3" office:value-type="float" office:value="14233" calcext:value-type="float">
            <text:p>14233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64733796296296" calcext:value-type="float">
            <text:p>0,00164733796296296000</text:p>
          </table:table-cell>
          <table:table-cell table:formula="of:=[.D333]-[.D33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3" office:value-type="float" office:value="14276" calcext:value-type="float">
            <text:p>1427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65231481481481" calcext:value-type="float">
            <text:p>0,00165231481481481000</text:p>
          </table:table-cell>
          <table:table-cell table:formula="of:=[.D334]-[.D33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3" office:value-type="float" office:value="14319" calcext:value-type="float">
            <text:p>14319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65729166666667" calcext:value-type="float">
            <text:p>0,00165729166666667000</text:p>
          </table:table-cell>
          <table:table-cell table:formula="of:=[.D335]-[.D33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3" office:value-type="float" office:value="14362" calcext:value-type="float">
            <text:p>1436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66226851851852" calcext:value-type="float">
            <text:p>0,00166226851851852000</text:p>
          </table:table-cell>
          <table:table-cell table:formula="of:=[.D336]-[.D33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3" office:value-type="float" office:value="14405" calcext:value-type="float">
            <text:p>1440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66724537037037" calcext:value-type="float">
            <text:p>0,00166724537037037000</text:p>
          </table:table-cell>
          <table:table-cell table:formula="of:=[.D337]-[.D33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3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67222222222222" calcext:value-type="float">
            <text:p>0,00167222222222222000</text:p>
          </table:table-cell>
          <table:table-cell table:formula="of:=[.D338]-[.D337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3" office:value-type="float" office:value="14491" calcext:value-type="float">
            <text:p>14491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67719907407407" calcext:value-type="float">
            <text:p>0,00167719907407407000</text:p>
          </table:table-cell>
          <table:table-cell table:formula="of:=[.D339]-[.D33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3" office:value-type="float" office:value="14534" calcext:value-type="float">
            <text:p>1453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68217592592593" calcext:value-type="float">
            <text:p>0,00168217592592593000</text:p>
          </table:table-cell>
          <table:table-cell table:formula="of:=[.D340]-[.D33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3" office:value-type="float" office:value="14577" calcext:value-type="float">
            <text:p>14577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68715277777778" calcext:value-type="float">
            <text:p>0,00168715277777778000</text:p>
          </table:table-cell>
          <table:table-cell table:formula="of:=[.D341]-[.D34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3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69212962962963" calcext:value-type="float">
            <text:p>0,00169212962962963000</text:p>
          </table:table-cell>
          <table:table-cell table:formula="of:=[.D342]-[.D34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3" office:value-type="float" office:value="14663" calcext:value-type="float">
            <text:p>14663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69710648148148" calcext:value-type="float">
            <text:p>0,00169710648148148000</text:p>
          </table:table-cell>
          <table:table-cell table:formula="of:=[.D343]-[.D34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3" office:value-type="float" office:value="14706" calcext:value-type="float">
            <text:p>1470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70208333333333" calcext:value-type="float">
            <text:p>0,00170208333333333000</text:p>
          </table:table-cell>
          <table:table-cell table:formula="of:=[.D344]-[.D34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3" office:value-type="float" office:value="14749" calcext:value-type="float">
            <text:p>14749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70706018518519" calcext:value-type="float">
            <text:p>0,00170706018518519000</text:p>
          </table:table-cell>
          <table:table-cell table:formula="of:=[.D345]-[.D34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3" office:value-type="float" office:value="14792" calcext:value-type="float">
            <text:p>1479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71203703703704" calcext:value-type="float">
            <text:p>0,00171203703703704000</text:p>
          </table:table-cell>
          <table:table-cell table:formula="of:=[.D346]-[.D345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3" office:value-type="float" office:value="14835" calcext:value-type="float">
            <text:p>1483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71701388888889" calcext:value-type="float">
            <text:p>0,00171701388888889000</text:p>
          </table:table-cell>
          <table:table-cell table:formula="of:=[.D347]-[.D34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3" office:value-type="float" office:value="14878" calcext:value-type="float">
            <text:p>1487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72199074074074" calcext:value-type="float">
            <text:p>0,00172199074074074000</text:p>
          </table:table-cell>
          <table:table-cell table:formula="of:=[.D348]-[.D34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3" office:value-type="float" office:value="14921" calcext:value-type="float">
            <text:p>14921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72696759259259" calcext:value-type="float">
            <text:p>0,00172696759259259000</text:p>
          </table:table-cell>
          <table:table-cell table:formula="of:=[.D349]-[.D34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3" office:value-type="float" office:value="14964" calcext:value-type="float">
            <text:p>1496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73194444444444" calcext:value-type="float">
            <text:p>0,00173194444444444000</text:p>
          </table:table-cell>
          <table:table-cell table:formula="of:=[.D350]-[.D34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3" office:value-type="float" office:value="15007" calcext:value-type="float">
            <text:p>15007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7369212962963" calcext:value-type="float">
            <text:p>0,00173692129629630000</text:p>
          </table:table-cell>
          <table:table-cell table:formula="of:=[.D351]-[.D35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3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74189814814815" calcext:value-type="float">
            <text:p>0,00174189814814815000</text:p>
          </table:table-cell>
          <table:table-cell table:formula="of:=[.D352]-[.D351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3" office:value-type="float" office:value="15093" calcext:value-type="float">
            <text:p>15093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746875" calcext:value-type="float">
            <text:p>0,00174687500000000000</text:p>
          </table:table-cell>
          <table:table-cell table:formula="of:=[.D353]-[.D35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3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75185185185185" calcext:value-type="float">
            <text:p>0,00175185185185185000</text:p>
          </table:table-cell>
          <table:table-cell table:formula="of:=[.D354]-[.D35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3" office:value-type="float" office:value="15179" calcext:value-type="float">
            <text:p>15179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7568287037037" calcext:value-type="float">
            <text:p>0,00175682870370370000</text:p>
          </table:table-cell>
          <table:table-cell table:formula="of:=[.D355]-[.D35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3" office:value-type="float" office:value="15222" calcext:value-type="float">
            <text:p>1522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76180555555556" calcext:value-type="float">
            <text:p>0,00176180555555556000</text:p>
          </table:table-cell>
          <table:table-cell table:formula="of:=[.D356]-[.D35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3" office:value-type="float" office:value="15265" calcext:value-type="float">
            <text:p>1526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76678240740741" calcext:value-type="float">
            <text:p>0,00176678240740741000</text:p>
          </table:table-cell>
          <table:table-cell table:formula="of:=[.D357]-[.D356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3" office:value-type="float" office:value="15308" calcext:value-type="float">
            <text:p>1530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77175925925926" calcext:value-type="float">
            <text:p>0,00177175925925926000</text:p>
          </table:table-cell>
          <table:table-cell table:formula="of:=[.D358]-[.D35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3" office:value-type="float" office:value="15351" calcext:value-type="float">
            <text:p>15351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77673611111111" calcext:value-type="float">
            <text:p>0,00177673611111111000</text:p>
          </table:table-cell>
          <table:table-cell table:formula="of:=[.D359]-[.D35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3" office:value-type="float" office:value="15394" calcext:value-type="float">
            <text:p>1539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78171296296296" calcext:value-type="float">
            <text:p>0,00178171296296296000</text:p>
          </table:table-cell>
          <table:table-cell table:formula="of:=[.D360]-[.D359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3" office:value-type="float" office:value="15437" calcext:value-type="float">
            <text:p>15437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78668981481481" calcext:value-type="float">
            <text:p>0,00178668981481481000</text:p>
          </table:table-cell>
          <table:table-cell table:formula="of:=[.D361]-[.D36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3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79166666666667" calcext:value-type="float">
            <text:p>0,00179166666666667000</text:p>
          </table:table-cell>
          <table:table-cell table:formula="of:=[.D362]-[.D36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3" office:value-type="float" office:value="15523" calcext:value-type="float">
            <text:p>15523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79664351851852" calcext:value-type="float">
            <text:p>0,00179664351851852000</text:p>
          </table:table-cell>
          <table:table-cell table:formula="of:=[.D363]-[.D36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3" office:value-type="float" office:value="15566" calcext:value-type="float">
            <text:p>1556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80162037037037" calcext:value-type="float">
            <text:p>0,00180162037037037000</text:p>
          </table:table-cell>
          <table:table-cell table:formula="of:=[.D364]-[.D36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3" office:value-type="float" office:value="15609" calcext:value-type="float">
            <text:p>15609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80659722222222" calcext:value-type="float">
            <text:p>0,00180659722222222000</text:p>
          </table:table-cell>
          <table:table-cell table:formula="of:=[.D365]-[.D36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3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81157407407407" calcext:value-type="float">
            <text:p>0,00181157407407407000</text:p>
          </table:table-cell>
          <table:table-cell table:formula="of:=[.D366]-[.D365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3" office:value-type="float" office:value="15695" calcext:value-type="float">
            <text:p>1569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81655092592593" calcext:value-type="float">
            <text:p>0,00181655092592593000</text:p>
          </table:table-cell>
          <table:table-cell table:formula="of:=[.D367]-[.D36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3" office:value-type="float" office:value="15738" calcext:value-type="float">
            <text:p>1573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82152777777778" calcext:value-type="float">
            <text:p>0,00182152777777778000</text:p>
          </table:table-cell>
          <table:table-cell table:formula="of:=[.D368]-[.D367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3" office:value-type="float" office:value="15781" calcext:value-type="float">
            <text:p>15781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82650462962963" calcext:value-type="float">
            <text:p>0,00182650462962963000</text:p>
          </table:table-cell>
          <table:table-cell table:formula="of:=[.D369]-[.D36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3" office:value-type="float" office:value="15824" calcext:value-type="float">
            <text:p>1582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83148148148148" calcext:value-type="float">
            <text:p>0,00183148148148148000</text:p>
          </table:table-cell>
          <table:table-cell table:formula="of:=[.D370]-[.D36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3" office:value-type="float" office:value="15867" calcext:value-type="float">
            <text:p>15867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83645833333333" calcext:value-type="float">
            <text:p>0,00183645833333333000</text:p>
          </table:table-cell>
          <table:table-cell table:formula="of:=[.D371]-[.D37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3" office:value-type="float" office:value="15910" calcext:value-type="float">
            <text:p>1591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84143518518519" calcext:value-type="float">
            <text:p>0,00184143518518518000</text:p>
          </table:table-cell>
          <table:table-cell table:formula="of:=[.D372]-[.D37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3" office:value-type="float" office:value="15953" calcext:value-type="float">
            <text:p>15953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84641203703704" calcext:value-type="float">
            <text:p>0,00184641203703704000</text:p>
          </table:table-cell>
          <table:table-cell table:formula="of:=[.D373]-[.D37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3" office:value-type="float" office:value="15996" calcext:value-type="float">
            <text:p>1599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85138888888889" calcext:value-type="float">
            <text:p>0,00185138888888889000</text:p>
          </table:table-cell>
          <table:table-cell table:formula="of:=[.D374]-[.D373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3" office:value-type="float" office:value="16039" calcext:value-type="float">
            <text:p>16039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85636574074074" calcext:value-type="float">
            <text:p>0,00185636574074074000</text:p>
          </table:table-cell>
          <table:table-cell table:formula="of:=[.D375]-[.D37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3" office:value-type="float" office:value="16082" calcext:value-type="float">
            <text:p>1608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86134259259259" calcext:value-type="float">
            <text:p>0,00186134259259259000</text:p>
          </table:table-cell>
          <table:table-cell table:formula="of:=[.D376]-[.D37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3" office:value-type="float" office:value="16125" calcext:value-type="float">
            <text:p>161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86631944444444" calcext:value-type="float">
            <text:p>0,00186631944444444000</text:p>
          </table:table-cell>
          <table:table-cell table:formula="of:=[.D377]-[.D376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3" office:value-type="float" office:value="16168" calcext:value-type="float">
            <text:p>1616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8712962962963" calcext:value-type="float">
            <text:p>0,00187129629629630000</text:p>
          </table:table-cell>
          <table:table-cell table:formula="of:=[.D378]-[.D37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3" office:value-type="float" office:value="16211" calcext:value-type="float">
            <text:p>16211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87627314814815" calcext:value-type="float">
            <text:p>0,00187627314814815000</text:p>
          </table:table-cell>
          <table:table-cell table:formula="of:=[.D379]-[.D378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3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88125" calcext:value-type="float">
            <text:p>0,00188125000000000000</text:p>
          </table:table-cell>
          <table:table-cell table:formula="of:=[.D380]-[.D37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3" office:value-type="float" office:value="16297" calcext:value-type="float">
            <text:p>16297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88622685185185" calcext:value-type="float">
            <text:p>0,00188622685185185000</text:p>
          </table:table-cell>
          <table:table-cell table:formula="of:=[.D381]-[.D38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3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8912037037037" calcext:value-type="float">
            <text:p>0,00189120370370370000</text:p>
          </table:table-cell>
          <table:table-cell table:formula="of:=[.D382]-[.D381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3" office:value-type="float" office:value="16383" calcext:value-type="float">
            <text:p>16383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89618055555556" calcext:value-type="float">
            <text:p>0,00189618055555556000</text:p>
          </table:table-cell>
          <table:table-cell table:formula="of:=[.D383]-[.D38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3" office:value-type="float" office:value="16426" calcext:value-type="float">
            <text:p>1642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90115740740741" calcext:value-type="float">
            <text:p>0,00190115740740741000</text:p>
          </table:table-cell>
          <table:table-cell table:formula="of:=[.D384]-[.D38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3" office:value-type="float" office:value="16469" calcext:value-type="float">
            <text:p>16469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90613425925926" calcext:value-type="float">
            <text:p>0,00190613425925926000</text:p>
          </table:table-cell>
          <table:table-cell table:formula="of:=[.D385]-[.D384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3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91111111111111" calcext:value-type="float">
            <text:p>0,00191111111111111000</text:p>
          </table:table-cell>
          <table:table-cell table:formula="of:=[.D386]-[.D38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3" office:value-type="float" office:value="16555" calcext:value-type="float">
            <text:p>1655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91608796296296" calcext:value-type="float">
            <text:p>0,00191608796296296000</text:p>
          </table:table-cell>
          <table:table-cell table:formula="of:=[.D387]-[.D38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3" office:value-type="float" office:value="16598" calcext:value-type="float">
            <text:p>1659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92106481481482" calcext:value-type="float">
            <text:p>0,00192106481481482000</text:p>
          </table:table-cell>
          <table:table-cell table:formula="of:=[.D388]-[.D387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3" office:value-type="float" office:value="16641" calcext:value-type="float">
            <text:p>16641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92604166666667" calcext:value-type="float">
            <text:p>0,00192604166666667000</text:p>
          </table:table-cell>
          <table:table-cell table:formula="of:=[.D389]-[.D38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3" office:value-type="float" office:value="16684" calcext:value-type="float">
            <text:p>1668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93101851851852" calcext:value-type="float">
            <text:p>0,00193101851851852000</text:p>
          </table:table-cell>
          <table:table-cell table:formula="of:=[.D390]-[.D38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3" office:value-type="float" office:value="16727" calcext:value-type="float">
            <text:p>16727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93599537037037" calcext:value-type="float">
            <text:p>0,00193599537037037000</text:p>
          </table:table-cell>
          <table:table-cell table:formula="of:=[.D391]-[.D390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3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94097222222222" calcext:value-type="float">
            <text:p>0,00194097222222222000</text:p>
          </table:table-cell>
          <table:table-cell table:formula="of:=[.D392]-[.D39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3" office:value-type="float" office:value="16813" calcext:value-type="float">
            <text:p>16813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94594907407407" calcext:value-type="float">
            <text:p>0,00194594907407407000</text:p>
          </table:table-cell>
          <table:table-cell table:formula="of:=[.D393]-[.D392]" office:value-type="float" office:value="0.00000497685185185171" calcext:value-type="float">
            <text:p>0,0000049768518518517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3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95092592592593" calcext:value-type="float">
            <text:p>0,00195092592592593000</text:p>
          </table:table-cell>
          <table:table-cell table:formula="of:=[.D394]-[.D39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3" office:value-type="float" office:value="16899" calcext:value-type="float">
            <text:p>16899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95590277777778" calcext:value-type="float">
            <text:p>0,00195590277777778000</text:p>
          </table:table-cell>
          <table:table-cell table:formula="of:=[.D395]-[.D39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3" office:value-type="float" office:value="16942" calcext:value-type="float">
            <text:p>1694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96087962962963" calcext:value-type="float">
            <text:p>0,00196087962962963000</text:p>
          </table:table-cell>
          <table:table-cell table:formula="of:=[.D396]-[.D39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3" office:value-type="float" office:value="16985" calcext:value-type="float">
            <text:p>1698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96585648148148" calcext:value-type="float">
            <text:p>0,00196585648148148000</text:p>
          </table:table-cell>
          <table:table-cell table:formula="of:=[.D397]-[.D396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3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97083333333333" calcext:value-type="float">
            <text:p>0,00197083333333333000</text:p>
          </table:table-cell>
          <table:table-cell table:formula="of:=[.D398]-[.D39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3" office:value-type="float" office:value="17071" calcext:value-type="float">
            <text:p>17071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97581018518519" calcext:value-type="float">
            <text:p>0,00197581018518519000</text:p>
          </table:table-cell>
          <table:table-cell table:formula="of:=[.D399]-[.D39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3" office:value-type="float" office:value="17114" calcext:value-type="float">
            <text:p>1711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98078703703704" calcext:value-type="float">
            <text:p>0,00198078703703704000</text:p>
          </table:table-cell>
          <table:table-cell table:formula="of:=[.D400]-[.D39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3" office:value-type="float" office:value="17157" calcext:value-type="float">
            <text:p>17157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98576388888889" calcext:value-type="float">
            <text:p>0,00198576388888889000</text:p>
          </table:table-cell>
          <table:table-cell table:formula="of:=[.D401]-[.D40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3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99074074074074" calcext:value-type="float">
            <text:p>0,00199074074074074000</text:p>
          </table:table-cell>
          <table:table-cell table:formula="of:=[.D402]-[.D40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3" office:value-type="float" office:value="17243" calcext:value-type="float">
            <text:p>17243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99571759259259" calcext:value-type="float">
            <text:p>0,00199571759259259000</text:p>
          </table:table-cell>
          <table:table-cell table:formula="of:=[.D403]-[.D402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3" office:value-type="float" office:value="17286" calcext:value-type="float">
            <text:p>1728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00069444444444" calcext:value-type="float">
            <text:p>0,00200069444444444000</text:p>
          </table:table-cell>
          <table:table-cell table:formula="of:=[.D404]-[.D40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3" office:value-type="float" office:value="17329" calcext:value-type="float">
            <text:p>17329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0056712962963" calcext:value-type="float">
            <text:p>0,00200567129629630000</text:p>
          </table:table-cell>
          <table:table-cell table:formula="of:=[.D405]-[.D40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3" office:value-type="float" office:value="17372" calcext:value-type="float">
            <text:p>1737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01064814814815" calcext:value-type="float">
            <text:p>0,00201064814814815000</text:p>
          </table:table-cell>
          <table:table-cell table:formula="of:=[.D406]-[.D40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3" office:value-type="float" office:value="17415" calcext:value-type="float">
            <text:p>1741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015625" calcext:value-type="float">
            <text:p>0,00201562500000000000</text:p>
          </table:table-cell>
          <table:table-cell table:formula="of:=[.D407]-[.D40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3" office:value-type="float" office:value="17458" calcext:value-type="float">
            <text:p>1745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02060185185185" calcext:value-type="float">
            <text:p>0,00202060185185185000</text:p>
          </table:table-cell>
          <table:table-cell table:formula="of:=[.D408]-[.D40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3" office:value-type="float" office:value="17501" calcext:value-type="float">
            <text:p>17501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0255787037037" calcext:value-type="float">
            <text:p>0,00202557870370370000</text:p>
          </table:table-cell>
          <table:table-cell table:formula="of:=[.D409]-[.D408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3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03055555555556" calcext:value-type="float">
            <text:p>0,00203055555555556000</text:p>
          </table:table-cell>
          <table:table-cell table:formula="of:=[.D410]-[.D40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3" office:value-type="float" office:value="17587" calcext:value-type="float">
            <text:p>17587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03553240740741" calcext:value-type="float">
            <text:p>0,00203553240740741000</text:p>
          </table:table-cell>
          <table:table-cell table:formula="of:=[.D411]-[.D41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3" office:value-type="float" office:value="17630" calcext:value-type="float">
            <text:p>1763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04050925925926" calcext:value-type="float">
            <text:p>0,00204050925925926000</text:p>
          </table:table-cell>
          <table:table-cell table:formula="of:=[.D412]-[.D41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3" office:value-type="float" office:value="17673" calcext:value-type="float">
            <text:p>17673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04548611111111" calcext:value-type="float">
            <text:p>0,00204548611111111000</text:p>
          </table:table-cell>
          <table:table-cell table:formula="of:=[.D413]-[.D41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3" office:value-type="float" office:value="17716" calcext:value-type="float">
            <text:p>1771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05046296296296" calcext:value-type="float">
            <text:p>0,00205046296296296000</text:p>
          </table:table-cell>
          <table:table-cell table:formula="of:=[.D414]-[.D413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3" office:value-type="float" office:value="17759" calcext:value-type="float">
            <text:p>17759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05543981481481" calcext:value-type="float">
            <text:p>0,00205543981481481000</text:p>
          </table:table-cell>
          <table:table-cell table:formula="of:=[.D415]-[.D41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3" office:value-type="float" office:value="17802" calcext:value-type="float">
            <text:p>1780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06041666666667" calcext:value-type="float">
            <text:p>0,00206041666666667000</text:p>
          </table:table-cell>
          <table:table-cell table:formula="of:=[.D416]-[.D41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3" office:value-type="float" office:value="17845" calcext:value-type="float">
            <text:p>1784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06539351851852" calcext:value-type="float">
            <text:p>0,00206539351851852000</text:p>
          </table:table-cell>
          <table:table-cell table:formula="of:=[.D417]-[.D41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3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07037037037037" calcext:value-type="float">
            <text:p>0,00207037037037037000</text:p>
          </table:table-cell>
          <table:table-cell table:formula="of:=[.D418]-[.D41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3" office:value-type="float" office:value="17931" calcext:value-type="float">
            <text:p>17931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07534722222222" calcext:value-type="float">
            <text:p>0,00207534722222222000</text:p>
          </table:table-cell>
          <table:table-cell table:formula="of:=[.D419]-[.D41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3" office:value-type="float" office:value="17974" calcext:value-type="float">
            <text:p>1797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08032407407407" calcext:value-type="float">
            <text:p>0,00208032407407407000</text:p>
          </table:table-cell>
          <table:table-cell table:formula="of:=[.D420]-[.D419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3" office:value-type="float" office:value="18017" calcext:value-type="float">
            <text:p>18017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08530092592593" calcext:value-type="float">
            <text:p>0,00208530092592593000</text:p>
          </table:table-cell>
          <table:table-cell table:formula="of:=[.D421]-[.D42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3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09027777777778" calcext:value-type="float">
            <text:p>0,00209027777777778000</text:p>
          </table:table-cell>
          <table:table-cell table:formula="of:=[.D422]-[.D42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3" office:value-type="float" office:value="18103" calcext:value-type="float">
            <text:p>18103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09525462962963" calcext:value-type="float">
            <text:p>0,00209525462962963000</text:p>
          </table:table-cell>
          <table:table-cell table:formula="of:=[.D423]-[.D42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3" office:value-type="float" office:value="18146" calcext:value-type="float">
            <text:p>1814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10023148148148" calcext:value-type="float">
            <text:p>0,00210023148148148000</text:p>
          </table:table-cell>
          <table:table-cell table:formula="of:=[.D424]-[.D42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3" office:value-type="float" office:value="18189" calcext:value-type="float">
            <text:p>18189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10520833333333" calcext:value-type="float">
            <text:p>0,00210520833333333000</text:p>
          </table:table-cell>
          <table:table-cell table:formula="of:=[.D425]-[.D424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3" office:value-type="float" office:value="18232" calcext:value-type="float">
            <text:p>1823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11018518518519" calcext:value-type="float">
            <text:p>0,00211018518518519000</text:p>
          </table:table-cell>
          <table:table-cell table:formula="of:=[.D426]-[.D42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3" office:value-type="float" office:value="18275" calcext:value-type="float">
            <text:p>182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11516203703704" calcext:value-type="float">
            <text:p>0,00211516203703704000</text:p>
          </table:table-cell>
          <table:table-cell table:formula="of:=[.D427]-[.D42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3" office:value-type="float" office:value="18318" calcext:value-type="float">
            <text:p>1831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12013888888889" calcext:value-type="float">
            <text:p>0,00212013888888889000</text:p>
          </table:table-cell>
          <table:table-cell table:formula="of:=[.D428]-[.D42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3" office:value-type="float" office:value="18361" calcext:value-type="float">
            <text:p>18361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12511574074074" calcext:value-type="float">
            <text:p>0,00212511574074074000</text:p>
          </table:table-cell>
          <table:table-cell table:formula="of:=[.D429]-[.D42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3" office:value-type="float" office:value="18404" calcext:value-type="float">
            <text:p>1840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13009259259259" calcext:value-type="float">
            <text:p>0,00213009259259259000</text:p>
          </table:table-cell>
          <table:table-cell table:formula="of:=[.D430]-[.D42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3" office:value-type="float" office:value="18447" calcext:value-type="float">
            <text:p>18447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13506944444444" calcext:value-type="float">
            <text:p>0,00213506944444444000</text:p>
          </table:table-cell>
          <table:table-cell table:formula="of:=[.D431]-[.D430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3" office:value-type="float" office:value="18490" calcext:value-type="float">
            <text:p>1849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1400462962963" calcext:value-type="float">
            <text:p>0,00214004629629630000</text:p>
          </table:table-cell>
          <table:table-cell table:formula="of:=[.D432]-[.D43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3" office:value-type="float" office:value="18533" calcext:value-type="float">
            <text:p>18533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14502314814815" calcext:value-type="float">
            <text:p>0,00214502314814815000</text:p>
          </table:table-cell>
          <table:table-cell table:formula="of:=[.D433]-[.D43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3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15" calcext:value-type="float">
            <text:p>0,00215000000000000000</text:p>
          </table:table-cell>
          <table:table-cell table:formula="of:=[.D434]-[.D43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3" office:value-type="float" office:value="18619" calcext:value-type="float">
            <text:p>18619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15497685185185" calcext:value-type="float">
            <text:p>0,00215497685185185000</text:p>
          </table:table-cell>
          <table:table-cell table:formula="of:=[.D435]-[.D43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3" office:value-type="float" office:value="18662" calcext:value-type="float">
            <text:p>1866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1599537037037" calcext:value-type="float">
            <text:p>0,00215995370370370000</text:p>
          </table:table-cell>
          <table:table-cell table:formula="of:=[.D436]-[.D435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3" office:value-type="float" office:value="18705" calcext:value-type="float">
            <text:p>1870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16493055555556" calcext:value-type="float">
            <text:p>0,00216493055555556000</text:p>
          </table:table-cell>
          <table:table-cell table:formula="of:=[.D437]-[.D43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3" office:value-type="float" office:value="18748" calcext:value-type="float">
            <text:p>1874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16990740740741" calcext:value-type="float">
            <text:p>0,00216990740740741000</text:p>
          </table:table-cell>
          <table:table-cell table:formula="of:=[.D438]-[.D43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3" office:value-type="float" office:value="18791" calcext:value-type="float">
            <text:p>18791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17488425925926" calcext:value-type="float">
            <text:p>0,00217488425925926000</text:p>
          </table:table-cell>
          <table:table-cell table:formula="of:=[.D439]-[.D43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3" office:value-type="float" office:value="18834" calcext:value-type="float">
            <text:p>1883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17986111111111" calcext:value-type="float">
            <text:p>0,00217986111111111000</text:p>
          </table:table-cell>
          <table:table-cell table:formula="of:=[.D440]-[.D43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3" office:value-type="float" office:value="18877" calcext:value-type="float">
            <text:p>18877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18483796296296" calcext:value-type="float">
            <text:p>0,00218483796296296000</text:p>
          </table:table-cell>
          <table:table-cell table:formula="of:=[.D441]-[.D44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3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18981481481482" calcext:value-type="float">
            <text:p>0,00218981481481482000</text:p>
          </table:table-cell>
          <table:table-cell table:formula="of:=[.D442]-[.D441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3" office:value-type="float" office:value="18963" calcext:value-type="float">
            <text:p>18963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19479166666667" calcext:value-type="float">
            <text:p>0,00219479166666667000</text:p>
          </table:table-cell>
          <table:table-cell table:formula="of:=[.D443]-[.D44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3" office:value-type="float" office:value="19006" calcext:value-type="float">
            <text:p>1900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19976851851852" calcext:value-type="float">
            <text:p>0,00219976851851852000</text:p>
          </table:table-cell>
          <table:table-cell table:formula="of:=[.D444]-[.D44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3" office:value-type="float" office:value="19049" calcext:value-type="float">
            <text:p>19049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20474537037037" calcext:value-type="float">
            <text:p>0,00220474537037037000</text:p>
          </table:table-cell>
          <table:table-cell table:formula="of:=[.D445]-[.D44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3" office:value-type="float" office:value="19092" calcext:value-type="float">
            <text:p>1909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20972222222222" calcext:value-type="float">
            <text:p>0,00220972222222222000</text:p>
          </table:table-cell>
          <table:table-cell table:formula="of:=[.D446]-[.D44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3" office:value-type="float" office:value="19135" calcext:value-type="float">
            <text:p>1913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21469907407407" calcext:value-type="float">
            <text:p>0,00221469907407407000</text:p>
          </table:table-cell>
          <table:table-cell table:formula="of:=[.D447]-[.D446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3" office:value-type="float" office:value="19178" calcext:value-type="float">
            <text:p>1917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21967592592593" calcext:value-type="float">
            <text:p>0,00221967592592593000</text:p>
          </table:table-cell>
          <table:table-cell table:formula="of:=[.D448]-[.D44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3" office:value-type="float" office:value="19221" calcext:value-type="float">
            <text:p>19221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22465277777778" calcext:value-type="float">
            <text:p>0,00222465277777778000</text:p>
          </table:table-cell>
          <table:table-cell table:formula="of:=[.D449]-[.D44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3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22962962962963" calcext:value-type="float">
            <text:p>0,00222962962962963000</text:p>
          </table:table-cell>
          <table:table-cell table:formula="of:=[.D450]-[.D44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3" office:value-type="float" office:value="19307" calcext:value-type="float">
            <text:p>19307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23460648148148" calcext:value-type="float">
            <text:p>0,00223460648148148000</text:p>
          </table:table-cell>
          <table:table-cell table:formula="of:=[.D451]-[.D45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3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23958333333333" calcext:value-type="float">
            <text:p>0,00223958333333333000</text:p>
          </table:table-cell>
          <table:table-cell table:formula="of:=[.D452]-[.D45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3" office:value-type="float" office:value="19393" calcext:value-type="float">
            <text:p>19393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24456018518519" calcext:value-type="float">
            <text:p>0,00224456018518519000</text:p>
          </table:table-cell>
          <table:table-cell table:formula="of:=[.D453]-[.D452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3" office:value-type="float" office:value="19436" calcext:value-type="float">
            <text:p>1943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24953703703704" calcext:value-type="float">
            <text:p>0,00224953703703704000</text:p>
          </table:table-cell>
          <table:table-cell table:formula="of:=[.D454]-[.D45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3" office:value-type="float" office:value="19479" calcext:value-type="float">
            <text:p>19479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25451388888889" calcext:value-type="float">
            <text:p>0,00225451388888889000</text:p>
          </table:table-cell>
          <table:table-cell table:formula="of:=[.D455]-[.D45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3" office:value-type="float" office:value="19522" calcext:value-type="float">
            <text:p>1952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25949074074074" calcext:value-type="float">
            <text:p>0,00225949074074074000</text:p>
          </table:table-cell>
          <table:table-cell table:formula="of:=[.D456]-[.D45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3" office:value-type="float" office:value="19565" calcext:value-type="float">
            <text:p>1956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26446759259259" calcext:value-type="float">
            <text:p>0,00226446759259259000</text:p>
          </table:table-cell>
          <table:table-cell table:formula="of:=[.D457]-[.D45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3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26944444444444" calcext:value-type="float">
            <text:p>0,00226944444444444000</text:p>
          </table:table-cell>
          <table:table-cell table:formula="of:=[.D458]-[.D457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3" office:value-type="float" office:value="19651" calcext:value-type="float">
            <text:p>19651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2744212962963" calcext:value-type="float">
            <text:p>0,00227442129629630000</text:p>
          </table:table-cell>
          <table:table-cell table:formula="of:=[.D459]-[.D45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3" office:value-type="float" office:value="19694" calcext:value-type="float">
            <text:p>1969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27939814814815" calcext:value-type="float">
            <text:p>0,00227939814814815000</text:p>
          </table:table-cell>
          <table:table-cell table:formula="of:=[.D460]-[.D45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3" office:value-type="float" office:value="19737" calcext:value-type="float">
            <text:p>19737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284375" calcext:value-type="float">
            <text:p>0,00228437500000000000</text:p>
          </table:table-cell>
          <table:table-cell table:formula="of:=[.D461]-[.D46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3" office:value-type="float" office:value="19780" calcext:value-type="float">
            <text:p>197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28935185185185" calcext:value-type="float">
            <text:p>0,00228935185185185000</text:p>
          </table:table-cell>
          <table:table-cell table:formula="of:=[.D462]-[.D46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3" office:value-type="float" office:value="19823" calcext:value-type="float">
            <text:p>19823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2943287037037" calcext:value-type="float">
            <text:p>0,00229432870370370000</text:p>
          </table:table-cell>
          <table:table-cell table:formula="of:=[.D463]-[.D46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3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29930555555556" calcext:value-type="float">
            <text:p>0,00229930555555556000</text:p>
          </table:table-cell>
          <table:table-cell table:formula="of:=[.D464]-[.D463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3" office:value-type="float" office:value="19909" calcext:value-type="float">
            <text:p>19909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30428240740741" calcext:value-type="float">
            <text:p>0,00230428240740741000</text:p>
          </table:table-cell>
          <table:table-cell table:formula="of:=[.D465]-[.D46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3" office:value-type="float" office:value="19952" calcext:value-type="float">
            <text:p>1995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30925925925926" calcext:value-type="float">
            <text:p>0,00230925925925926000</text:p>
          </table:table-cell>
          <table:table-cell table:formula="of:=[.D466]-[.D46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3" office:value-type="float" office:value="19995" calcext:value-type="float">
            <text:p>1999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31423611111111" calcext:value-type="float">
            <text:p>0,00231423611111111000</text:p>
          </table:table-cell>
          <table:table-cell table:formula="of:=[.D467]-[.D46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3" office:value-type="float" office:value="20038" calcext:value-type="float">
            <text:p>2003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31921296296296" calcext:value-type="float">
            <text:p>0,00231921296296296000</text:p>
          </table:table-cell>
          <table:table-cell table:formula="of:=[.D468]-[.D46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3" office:value-type="float" office:value="20081" calcext:value-type="float">
            <text:p>20081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32418981481482" calcext:value-type="float">
            <text:p>0,00232418981481482000</text:p>
          </table:table-cell>
          <table:table-cell table:formula="of:=[.D469]-[.D468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3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32916666666667" calcext:value-type="float">
            <text:p>0,00232916666666667000</text:p>
          </table:table-cell>
          <table:table-cell table:formula="of:=[.D470]-[.D46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3" office:value-type="float" office:value="20167" calcext:value-type="float">
            <text:p>20167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33414351851852" calcext:value-type="float">
            <text:p>0,00233414351851852000</text:p>
          </table:table-cell>
          <table:table-cell table:formula="of:=[.D471]-[.D47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3" office:value-type="float" office:value="20210" calcext:value-type="float">
            <text:p>2021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33912037037037" calcext:value-type="float">
            <text:p>0,00233912037037037000</text:p>
          </table:table-cell>
          <table:table-cell table:formula="of:=[.D472]-[.D47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3" office:value-type="float" office:value="20253" calcext:value-type="float">
            <text:p>20253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34409722222222" calcext:value-type="float">
            <text:p>0,00234409722222222000</text:p>
          </table:table-cell>
          <table:table-cell table:formula="of:=[.D473]-[.D47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3" office:value-type="float" office:value="20296" calcext:value-type="float">
            <text:p>2029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34907407407407" calcext:value-type="float">
            <text:p>0,00234907407407407000</text:p>
          </table:table-cell>
          <table:table-cell table:formula="of:=[.D474]-[.D47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3" office:value-type="float" office:value="20339" calcext:value-type="float">
            <text:p>20339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35405092592593" calcext:value-type="float">
            <text:p>0,00235405092592593000</text:p>
          </table:table-cell>
          <table:table-cell table:formula="of:=[.D475]-[.D474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3" office:value-type="float" office:value="20382" calcext:value-type="float">
            <text:p>2038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35902777777778" calcext:value-type="float">
            <text:p>0,00235902777777778000</text:p>
          </table:table-cell>
          <table:table-cell table:formula="of:=[.D476]-[.D47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3" office:value-type="float" office:value="20425" calcext:value-type="float">
            <text:p>204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36400462962963" calcext:value-type="float">
            <text:p>0,00236400462962963000</text:p>
          </table:table-cell>
          <table:table-cell table:formula="of:=[.D477]-[.D47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3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36898148148148" calcext:value-type="float">
            <text:p>0,00236898148148148000</text:p>
          </table:table-cell>
          <table:table-cell table:formula="of:=[.D478]-[.D47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3" office:value-type="float" office:value="20511" calcext:value-type="float">
            <text:p>20511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37395833333333" calcext:value-type="float">
            <text:p>0,00237395833333333000</text:p>
          </table:table-cell>
          <table:table-cell table:formula="of:=[.D479]-[.D47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3" office:value-type="float" office:value="20554" calcext:value-type="float">
            <text:p>2055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37893518518519" calcext:value-type="float">
            <text:p>0,00237893518518519000</text:p>
          </table:table-cell>
          <table:table-cell table:formula="of:=[.D480]-[.D47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3" office:value-type="float" office:value="20597" calcext:value-type="float">
            <text:p>20597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38391203703704" calcext:value-type="float">
            <text:p>0,00238391203703704000</text:p>
          </table:table-cell>
          <table:table-cell table:formula="of:=[.D481]-[.D480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3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38888888888889" calcext:value-type="float">
            <text:p>0,00238888888888889000</text:p>
          </table:table-cell>
          <table:table-cell table:formula="of:=[.D482]-[.D48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3" office:value-type="float" office:value="20683" calcext:value-type="float">
            <text:p>20683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39386574074074" calcext:value-type="float">
            <text:p>0,00239386574074074000</text:p>
          </table:table-cell>
          <table:table-cell table:formula="of:=[.D483]-[.D48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3" office:value-type="float" office:value="20726" calcext:value-type="float">
            <text:p>2072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39884259259259" calcext:value-type="float">
            <text:p>0,00239884259259259000</text:p>
          </table:table-cell>
          <table:table-cell table:formula="of:=[.D484]-[.D48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3" office:value-type="float" office:value="20769" calcext:value-type="float">
            <text:p>20769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40381944444444" calcext:value-type="float">
            <text:p>0,00240381944444444000</text:p>
          </table:table-cell>
          <table:table-cell table:formula="of:=[.D485]-[.D48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3" office:value-type="float" office:value="20812" calcext:value-type="float">
            <text:p>2081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4087962962963" calcext:value-type="float">
            <text:p>0,00240879629629630000</text:p>
          </table:table-cell>
          <table:table-cell table:formula="of:=[.D486]-[.D485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3" office:value-type="float" office:value="20855" calcext:value-type="float">
            <text:p>2085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41377314814815" calcext:value-type="float">
            <text:p>0,00241377314814815000</text:p>
          </table:table-cell>
          <table:table-cell table:formula="of:=[.D487]-[.D48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3" office:value-type="float" office:value="20898" calcext:value-type="float">
            <text:p>2089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41875" calcext:value-type="float">
            <text:p>0,00241875000000000000</text:p>
          </table:table-cell>
          <table:table-cell table:formula="of:=[.D488]-[.D48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3" office:value-type="float" office:value="20941" calcext:value-type="float">
            <text:p>20941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42372685185185" calcext:value-type="float">
            <text:p>0,00242372685185185000</text:p>
          </table:table-cell>
          <table:table-cell table:formula="of:=[.D489]-[.D48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3" office:value-type="float" office:value="20984" calcext:value-type="float">
            <text:p>2098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4287037037037" calcext:value-type="float">
            <text:p>0,00242870370370370000</text:p>
          </table:table-cell>
          <table:table-cell table:formula="of:=[.D490]-[.D48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3" office:value-type="float" office:value="21027" calcext:value-type="float">
            <text:p>21027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43368055555556" calcext:value-type="float">
            <text:p>0,00243368055555556000</text:p>
          </table:table-cell>
          <table:table-cell table:formula="of:=[.D491]-[.D49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3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43865740740741" calcext:value-type="float">
            <text:p>0,00243865740740741000</text:p>
          </table:table-cell>
          <table:table-cell table:formula="of:=[.D492]-[.D491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3" office:value-type="float" office:value="21113" calcext:value-type="float">
            <text:p>21113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44363425925926" calcext:value-type="float">
            <text:p>0,00244363425925926000</text:p>
          </table:table-cell>
          <table:table-cell table:formula="of:=[.D493]-[.D49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3" office:value-type="float" office:value="21156" calcext:value-type="float">
            <text:p>2115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44861111111111" calcext:value-type="float">
            <text:p>0,00244861111111111000</text:p>
          </table:table-cell>
          <table:table-cell table:formula="of:=[.D494]-[.D49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3" office:value-type="float" office:value="21199" calcext:value-type="float">
            <text:p>21199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45358796296296" calcext:value-type="float">
            <text:p>0,00245358796296296000</text:p>
          </table:table-cell>
          <table:table-cell table:formula="of:=[.D495]-[.D49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3" office:value-type="float" office:value="21242" calcext:value-type="float">
            <text:p>2124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45856481481482" calcext:value-type="float">
            <text:p>0,00245856481481482000</text:p>
          </table:table-cell>
          <table:table-cell table:formula="of:=[.D496]-[.D49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3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46354166666667" calcext:value-type="float">
            <text:p>0,00246354166666667000</text:p>
          </table:table-cell>
          <table:table-cell table:formula="of:=[.D497]-[.D496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3" office:value-type="float" office:value="21328" calcext:value-type="float">
            <text:p>2132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46851851851852" calcext:value-type="float">
            <text:p>0,00246851851851852000</text:p>
          </table:table-cell>
          <table:table-cell table:formula="of:=[.D498]-[.D49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3" office:value-type="float" office:value="21371" calcext:value-type="float">
            <text:p>21371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47349537037037" calcext:value-type="float">
            <text:p>0,00247349537037037000</text:p>
          </table:table-cell>
          <table:table-cell table:formula="of:=[.D499]-[.D49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3" office:value-type="float" office:value="21414" calcext:value-type="float">
            <text:p>2141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47847222222222" calcext:value-type="float">
            <text:p>0,00247847222222222000</text:p>
          </table:table-cell>
          <table:table-cell table:formula="of:=[.D500]-[.D49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3" office:value-type="float" office:value="21457" calcext:value-type="float">
            <text:p>21457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48344907407407" calcext:value-type="float">
            <text:p>0,00248344907407407000</text:p>
          </table:table-cell>
          <table:table-cell table:formula="of:=[.D501]-[.D50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3" office:value-type="float" office:value="21500" calcext:value-type="float">
            <text:p>21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48842592592593" calcext:value-type="float">
            <text:p>0,00248842592592593000</text:p>
          </table:table-cell>
          <table:table-cell table:formula="of:=[.D502]-[.D50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3" office:value-type="float" office:value="21543" calcext:value-type="float">
            <text:p>21543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49340277777778" calcext:value-type="float">
            <text:p>0,00249340277777778000</text:p>
          </table:table-cell>
          <table:table-cell table:formula="of:=[.D503]-[.D502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3" office:value-type="float" office:value="21586" calcext:value-type="float">
            <text:p>2158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49837962962963" calcext:value-type="float">
            <text:p>0,00249837962962963000</text:p>
          </table:table-cell>
          <table:table-cell table:formula="of:=[.D504]-[.D50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3" office:value-type="float" office:value="21629" calcext:value-type="float">
            <text:p>21629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50335648148148" calcext:value-type="float">
            <text:p>0,00250335648148148000</text:p>
          </table:table-cell>
          <table:table-cell table:formula="of:=[.D505]-[.D50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3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50833333333333" calcext:value-type="float">
            <text:p>0,00250833333333333000</text:p>
          </table:table-cell>
          <table:table-cell table:formula="of:=[.D506]-[.D50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3" office:value-type="float" office:value="21715" calcext:value-type="float">
            <text:p>2171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51331018518519" calcext:value-type="float">
            <text:p>0,00251331018518519000</text:p>
          </table:table-cell>
          <table:table-cell table:formula="of:=[.D507]-[.D50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3" office:value-type="float" office:value="21758" calcext:value-type="float">
            <text:p>2175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51828703703704" calcext:value-type="float">
            <text:p>0,00251828703703704000</text:p>
          </table:table-cell>
          <table:table-cell table:formula="of:=[.D508]-[.D507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3" office:value-type="float" office:value="21801" calcext:value-type="float">
            <text:p>21801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52326388888889" calcext:value-type="float">
            <text:p>0,00252326388888889000</text:p>
          </table:table-cell>
          <table:table-cell table:formula="of:=[.D509]-[.D50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3" office:value-type="float" office:value="21844" calcext:value-type="float">
            <text:p>2184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52824074074074" calcext:value-type="float">
            <text:p>0,00252824074074074000</text:p>
          </table:table-cell>
          <table:table-cell table:formula="of:=[.D510]-[.D50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3" office:value-type="float" office:value="21887" calcext:value-type="float">
            <text:p>21887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53321759259259" calcext:value-type="float">
            <text:p>0,00253321759259259000</text:p>
          </table:table-cell>
          <table:table-cell table:formula="of:=[.D511]-[.D51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3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53819444444444" calcext:value-type="float">
            <text:p>0,00253819444444444000</text:p>
          </table:table-cell>
          <table:table-cell table:formula="of:=[.D512]-[.D51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43" office:value-type="float" office:value="21973" calcext:value-type="float">
            <text:p>21973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5431712962963" calcext:value-type="float">
            <text:p>0,00254317129629630000</text:p>
          </table:table-cell>
          <table:table-cell table:formula="of:=[.D513]-[.D51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43" office:value-type="float" office:value="22016" calcext:value-type="float">
            <text:p>2201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54814814814815" calcext:value-type="float">
            <text:p>0,00254814814814815000</text:p>
          </table:table-cell>
          <table:table-cell table:formula="of:=[.D514]-[.D513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43" office:value-type="float" office:value="22059" calcext:value-type="float">
            <text:p>22059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553125" calcext:value-type="float">
            <text:p>0,00255312500000000000</text:p>
          </table:table-cell>
          <table:table-cell table:formula="of:=[.D515]-[.D51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43" office:value-type="float" office:value="22102" calcext:value-type="float">
            <text:p>2210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55810185185185" calcext:value-type="float">
            <text:p>0,00255810185185185000</text:p>
          </table:table-cell>
          <table:table-cell table:formula="of:=[.D516]-[.D51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43" office:value-type="float" office:value="22145" calcext:value-type="float">
            <text:p>2214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5630787037037" calcext:value-type="float">
            <text:p>0,00256307870370370000</text:p>
          </table:table-cell>
          <table:table-cell table:formula="of:=[.D517]-[.D51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43" office:value-type="float" office:value="22188" calcext:value-type="float">
            <text:p>2218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56805555555556" calcext:value-type="float">
            <text:p>0,00256805555555556000</text:p>
          </table:table-cell>
          <table:table-cell table:formula="of:=[.D518]-[.D51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43" office:value-type="float" office:value="22231" calcext:value-type="float">
            <text:p>22231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57303240740741" calcext:value-type="float">
            <text:p>0,00257303240740741000</text:p>
          </table:table-cell>
          <table:table-cell table:formula="of:=[.D519]-[.D518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43" office:value-type="float" office:value="22274" calcext:value-type="float">
            <text:p>2227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57800925925926" calcext:value-type="float">
            <text:p>0,00257800925925926000</text:p>
          </table:table-cell>
          <table:table-cell table:formula="of:=[.D520]-[.D51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43" office:value-type="float" office:value="22317" calcext:value-type="float">
            <text:p>22317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58298611111111" calcext:value-type="float">
            <text:p>0,00258298611111111000</text:p>
          </table:table-cell>
          <table:table-cell table:formula="of:=[.D521]-[.D52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43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58796296296296" calcext:value-type="float">
            <text:p>0,00258796296296296000</text:p>
          </table:table-cell>
          <table:table-cell table:formula="of:=[.D522]-[.D52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43" office:value-type="float" office:value="22403" calcext:value-type="float">
            <text:p>22403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59293981481482" calcext:value-type="float">
            <text:p>0,00259293981481482000</text:p>
          </table:table-cell>
          <table:table-cell table:formula="of:=[.D523]-[.D52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43" office:value-type="float" office:value="22446" calcext:value-type="float">
            <text:p>2244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59791666666667" calcext:value-type="float">
            <text:p>0,00259791666666667000</text:p>
          </table:table-cell>
          <table:table-cell table:formula="of:=[.D524]-[.D52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43" office:value-type="float" office:value="22489" calcext:value-type="float">
            <text:p>22489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60289351851852" calcext:value-type="float">
            <text:p>0,00260289351851852000</text:p>
          </table:table-cell>
          <table:table-cell table:formula="of:=[.D525]-[.D524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43" office:value-type="float" office:value="22532" calcext:value-type="float">
            <text:p>2253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60787037037037" calcext:value-type="float">
            <text:p>0,00260787037037037000</text:p>
          </table:table-cell>
          <table:table-cell table:formula="of:=[.D526]-[.D52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43" office:value-type="float" office:value="22575" calcext:value-type="float">
            <text:p>225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61284722222222" calcext:value-type="float">
            <text:p>0,00261284722222222000</text:p>
          </table:table-cell>
          <table:table-cell table:formula="of:=[.D527]-[.D52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43" office:value-type="float" office:value="22618" calcext:value-type="float">
            <text:p>2261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61782407407407" calcext:value-type="float">
            <text:p>0,00261782407407407000</text:p>
          </table:table-cell>
          <table:table-cell table:formula="of:=[.D528]-[.D52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43" office:value-type="float" office:value="22661" calcext:value-type="float">
            <text:p>22661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62280092592593" calcext:value-type="float">
            <text:p>0,00262280092592593000</text:p>
          </table:table-cell>
          <table:table-cell table:formula="of:=[.D529]-[.D52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43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62777777777778" calcext:value-type="float">
            <text:p>0,00262777777777778000</text:p>
          </table:table-cell>
          <table:table-cell table:formula="of:=[.D530]-[.D529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43" office:value-type="float" office:value="22747" calcext:value-type="float">
            <text:p>22747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63275462962963" calcext:value-type="float">
            <text:p>0,00263275462962963000</text:p>
          </table:table-cell>
          <table:table-cell table:formula="of:=[.D531]-[.D53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43" office:value-type="float" office:value="22790" calcext:value-type="float">
            <text:p>2279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63773148148148" calcext:value-type="float">
            <text:p>0,00263773148148148000</text:p>
          </table:table-cell>
          <table:table-cell table:formula="of:=[.D532]-[.D53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43" office:value-type="float" office:value="22833" calcext:value-type="float">
            <text:p>22833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64270833333333" calcext:value-type="float">
            <text:p>0,00264270833333333000</text:p>
          </table:table-cell>
          <table:table-cell table:formula="of:=[.D533]-[.D53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43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64768518518519" calcext:value-type="float">
            <text:p>0,00264768518518519000</text:p>
          </table:table-cell>
          <table:table-cell table:formula="of:=[.D534]-[.D53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43" office:value-type="float" office:value="22919" calcext:value-type="float">
            <text:p>22919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65266203703704" calcext:value-type="float">
            <text:p>0,00265266203703704000</text:p>
          </table:table-cell>
          <table:table-cell table:formula="of:=[.D535]-[.D53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43" office:value-type="float" office:value="22962" calcext:value-type="float">
            <text:p>2296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65763888888889" calcext:value-type="float">
            <text:p>0,00265763888888889000</text:p>
          </table:table-cell>
          <table:table-cell table:formula="of:=[.D536]-[.D535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43" office:value-type="float" office:value="23005" calcext:value-type="float">
            <text:p>2300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66261574074074" calcext:value-type="float">
            <text:p>0,00266261574074074000</text:p>
          </table:table-cell>
          <table:table-cell table:formula="of:=[.D537]-[.D53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43" office:value-type="float" office:value="23048" calcext:value-type="float">
            <text:p>2304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66759259259259" calcext:value-type="float">
            <text:p>0,00266759259259259000</text:p>
          </table:table-cell>
          <table:table-cell table:formula="of:=[.D538]-[.D53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43" office:value-type="float" office:value="23091" calcext:value-type="float">
            <text:p>23091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67256944444444" calcext:value-type="float">
            <text:p>0,00267256944444444000</text:p>
          </table:table-cell>
          <table:table-cell table:formula="of:=[.D539]-[.D53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43" office:value-type="float" office:value="23134" calcext:value-type="float">
            <text:p>2313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6775462962963" calcext:value-type="float">
            <text:p>0,00267754629629630000</text:p>
          </table:table-cell>
          <table:table-cell table:formula="of:=[.D540]-[.D53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43" office:value-type="float" office:value="23177" calcext:value-type="float">
            <text:p>23177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68252314814815" calcext:value-type="float">
            <text:p>0,00268252314814815000</text:p>
          </table:table-cell>
          <table:table-cell table:formula="of:=[.D541]-[.D540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43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6875" calcext:value-type="float">
            <text:p>0,00268750000000000000</text:p>
          </table:table-cell>
          <table:table-cell table:formula="of:=[.D542]-[.D54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43" office:value-type="float" office:value="23263" calcext:value-type="float">
            <text:p>23263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69247685185185" calcext:value-type="float">
            <text:p>0,00269247685185185000</text:p>
          </table:table-cell>
          <table:table-cell table:formula="of:=[.D543]-[.D542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43" office:value-type="float" office:value="23306" calcext:value-type="float">
            <text:p>2330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6974537037037" calcext:value-type="float">
            <text:p>0,00269745370370370000</text:p>
          </table:table-cell>
          <table:table-cell table:formula="of:=[.D544]-[.D54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43" office:value-type="float" office:value="23349" calcext:value-type="float">
            <text:p>23349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70243055555556" calcext:value-type="float">
            <text:p>0,00270243055555556000</text:p>
          </table:table-cell>
          <table:table-cell table:formula="of:=[.D545]-[.D54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43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70740740740741" calcext:value-type="float">
            <text:p>0,00270740740740741000</text:p>
          </table:table-cell>
          <table:table-cell table:formula="of:=[.D546]-[.D54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43" office:value-type="float" office:value="23435" calcext:value-type="float">
            <text:p>2343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71238425925926" calcext:value-type="float">
            <text:p>0,00271238425925926000</text:p>
          </table:table-cell>
          <table:table-cell table:formula="of:=[.D547]-[.D546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43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71736111111111" calcext:value-type="float">
            <text:p>0,00271736111111111000</text:p>
          </table:table-cell>
          <table:table-cell table:formula="of:=[.D548]-[.D547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43" office:value-type="float" office:value="23521" calcext:value-type="float">
            <text:p>23521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72233796296296" calcext:value-type="float">
            <text:p>0,00272233796296296000</text:p>
          </table:table-cell>
          <table:table-cell table:formula="of:=[.D549]-[.D54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43" office:value-type="float" office:value="23564" calcext:value-type="float">
            <text:p>2356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72731481481482" calcext:value-type="float">
            <text:p>0,00272731481481482000</text:p>
          </table:table-cell>
          <table:table-cell table:formula="of:=[.D550]-[.D549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43" office:value-type="float" office:value="23607" calcext:value-type="float">
            <text:p>23607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73229166666667" calcext:value-type="float">
            <text:p>0,00273229166666667000</text:p>
          </table:table-cell>
          <table:table-cell table:formula="of:=[.D551]-[.D550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43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73726851851852" calcext:value-type="float">
            <text:p>0,00273726851851852000</text:p>
          </table:table-cell>
          <table:table-cell table:formula="of:=[.D552]-[.D551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43" office:value-type="float" office:value="23693" calcext:value-type="float">
            <text:p>23693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74224537037037" calcext:value-type="float">
            <text:p>0,00274224537037037000</text:p>
          </table:table-cell>
          <table:table-cell table:formula="of:=[.D553]-[.D552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43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74722222222222" calcext:value-type="float">
            <text:p>0,00274722222222222000</text:p>
          </table:table-cell>
          <table:table-cell table:formula="of:=[.D554]-[.D553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43" office:value-type="float" office:value="23779" calcext:value-type="float">
            <text:p>23779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75219907407407" calcext:value-type="float">
            <text:p>0,00275219907407407000</text:p>
          </table:table-cell>
          <table:table-cell table:formula="of:=[.D555]-[.D554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43" office:value-type="float" office:value="23822" calcext:value-type="float">
            <text:p>2382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75717592592593" calcext:value-type="float">
            <text:p>0,00275717592592593000</text:p>
          </table:table-cell>
          <table:table-cell table:formula="of:=[.D556]-[.D555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43" office:value-type="float" office:value="23865" calcext:value-type="float">
            <text:p>2386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76215277777778" calcext:value-type="float">
            <text:p>0,00276215277777778000</text:p>
          </table:table-cell>
          <table:table-cell table:formula="of:=[.D557]-[.D556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43" office:value-type="float" office:value="23908" calcext:value-type="float">
            <text:p>2390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76712962962963" calcext:value-type="float">
            <text:p>0,00276712962962963000</text:p>
          </table:table-cell>
          <table:table-cell table:formula="of:=[.D558]-[.D557]" office:value-type="float" office:value="0.0000049768518518515" calcext:value-type="float">
            <text:p>0,0000049768518518515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43" office:value-type="float" office:value="23951" calcext:value-type="float">
            <text:p>23951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77210648148148" calcext:value-type="float">
            <text:p>0,00277210648148148000</text:p>
          </table:table-cell>
          <table:table-cell table:formula="of:=[.D559]-[.D558]" office:value-type="float" office:value="0.00000497685185185193" calcext:value-type="float">
            <text:p>0,0000049768518518519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43" office:value-type="float" office:value="23994" calcext:value-type="float">
            <text:p>2399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77708333333333" calcext:value-type="float">
            <text:p>0,00277708333333333000</text:p>
          </table:table-cell>
          <table:table-cell table:formula="of:=#REF!-[.D559]" office:value-type="string" office:string-value="" calcext:value-type="error">
            <text:p>#REF!</text:p>
          </table:table-cell>
        </table:table-row>
        <table:table-row table:style-name="ro1" table:number-rows-repeated="10480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9:03.364999038</meta:creation-date>
    <dc:date>2026-05-17T17:39:22.376206969</dc:date>
    <meta:editing-duration>PT20S</meta:editing-duration>
    <meta:editing-cycles>1</meta:editing-cycles>
    <meta:document-statistic meta:table-count="1" meta:cell-count="2795" meta:object-count="0"/>
    <meta:generator>LibreOffice/24.2.7.2$Linux_X86_64 LibreOffice_project/420$Build-2</meta:generator>
  </office:meta>
</office:document-meta>
</file>