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32407407407407" calcext:value-type="float">
            <text:p>0,00000532407407407407</text:p>
          </table:table-cell>
          <table:table-cell table:formula="of:=[.D3]-[.D2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6" office:value-type="float" office:value="92" calcext:value-type="float">
            <text:p>9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06481481481481" calcext:value-type="float">
            <text:p>0,00001064814814814820</text:p>
          </table:table-cell>
          <table:table-cell table:formula="of:=[.D4]-[.D3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6" office:value-type="float" office:value="138" calcext:value-type="float">
            <text:p>13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59722222222222" calcext:value-type="float">
            <text:p>0,00001597222222222220</text:p>
          </table:table-cell>
          <table:table-cell table:formula="of:=[.D5]-[.D4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6" office:value-type="float" office:value="184" calcext:value-type="float">
            <text:p>18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12962962962963" calcext:value-type="float">
            <text:p>0,00002129629629629630</text:p>
          </table:table-cell>
          <table:table-cell table:formula="of:=[.D6]-[.D5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6" office:value-type="float" office:value="230" calcext:value-type="float">
            <text:p>23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66203703703704" calcext:value-type="float">
            <text:p>0,00002662037037037040</text:p>
          </table:table-cell>
          <table:table-cell table:formula="of:=[.D7]-[.D6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6" office:value-type="float" office:value="276" calcext:value-type="float">
            <text:p>27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19444444444445" calcext:value-type="float">
            <text:p>0,00003194444444444450</text:p>
          </table:table-cell>
          <table:table-cell table:formula="of:=[.D8]-[.D7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6" office:value-type="float" office:value="322" calcext:value-type="float">
            <text:p>32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72685185185185" calcext:value-type="float">
            <text:p>0,00003726851851851850</text:p>
          </table:table-cell>
          <table:table-cell table:formula="of:=[.D9]-[.D8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6" office:value-type="float" office:value="368" calcext:value-type="float">
            <text:p>36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25925925925926" calcext:value-type="float">
            <text:p>0,00004259259259259260</text:p>
          </table:table-cell>
          <table:table-cell table:formula="of:=[.D10]-[.D9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6" office:value-type="float" office:value="414" calcext:value-type="float">
            <text:p>41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79166666666667" calcext:value-type="float">
            <text:p>0,00004791666666666670</text:p>
          </table:table-cell>
          <table:table-cell table:formula="of:=[.D11]-[.D10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6" office:value-type="float" office:value="460" calcext:value-type="float">
            <text:p>4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32407407407407" calcext:value-type="float">
            <text:p>0,00005324074074074070</text:p>
          </table:table-cell>
          <table:table-cell table:formula="of:=[.D12]-[.D11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6" office:value-type="float" office:value="506" calcext:value-type="float">
            <text:p>50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85648148148148" calcext:value-type="float">
            <text:p>0,00005856481481481480</text:p>
          </table:table-cell>
          <table:table-cell table:formula="of:=[.D13]-[.D12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6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38888888888889" calcext:value-type="float">
            <text:p>0,00006388888888888890</text:p>
          </table:table-cell>
          <table:table-cell table:formula="of:=[.D14]-[.D13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6" office:value-type="float" office:value="598" calcext:value-type="float">
            <text:p>59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9212962962963" calcext:value-type="float">
            <text:p>0,00006921296296296300</text:p>
          </table:table-cell>
          <table:table-cell table:formula="of:=[.D15]-[.D14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6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4537037037037" calcext:value-type="float">
            <text:p>0,00007453703703703700</text:p>
          </table:table-cell>
          <table:table-cell table:formula="of:=[.D16]-[.D15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6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98611111111111" calcext:value-type="float">
            <text:p>0,00007986111111111110</text:p>
          </table:table-cell>
          <table:table-cell table:formula="of:=[.D17]-[.D16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6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851851851851852" calcext:value-type="float">
            <text:p>0,00008518518518518520</text:p>
          </table:table-cell>
          <table:table-cell table:formula="of:=[.D18]-[.D17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6" office:value-type="float" office:value="782" calcext:value-type="float">
            <text:p>78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905092592592593" calcext:value-type="float">
            <text:p>0,00009050925925925930</text:p>
          </table:table-cell>
          <table:table-cell table:formula="of:=[.D19]-[.D18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6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958333333333333" calcext:value-type="float">
            <text:p>0,00009583333333333330</text:p>
          </table:table-cell>
          <table:table-cell table:formula="of:=[.D20]-[.D19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6" office:value-type="float" office:value="874" calcext:value-type="float">
            <text:p>87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01157407407407" calcext:value-type="float">
            <text:p>0,00010115740740740700</text:p>
          </table:table-cell>
          <table:table-cell table:formula="of:=[.D21]-[.D20]" office:value-type="float" office:value="0.00000532407407407408" calcext:value-type="float">
            <text:p>0,00000532407407407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6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06481481481481" calcext:value-type="float">
            <text:p>0,00010648148148148100</text:p>
          </table:table-cell>
          <table:table-cell table:formula="of:=[.D22]-[.D21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6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11805555555556" calcext:value-type="float">
            <text:p>0,00011180555555555600</text:p>
          </table:table-cell>
          <table:table-cell table:formula="of:=[.D23]-[.D22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6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1712962962963" calcext:value-type="float">
            <text:p>0,00011712962962963000</text:p>
          </table:table-cell>
          <table:table-cell table:formula="of:=[.D24]-[.D23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6" office:value-type="float" office:value="1058" calcext:value-type="float">
            <text:p>105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22453703703704" calcext:value-type="float">
            <text:p>0,00012245370370370400</text:p>
          </table:table-cell>
          <table:table-cell table:formula="of:=[.D25]-[.D24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6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27777777777778" calcext:value-type="float">
            <text:p>0,00012777777777777800</text:p>
          </table:table-cell>
          <table:table-cell table:formula="of:=[.D26]-[.D25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6" office:value-type="float" office:value="1150" calcext:value-type="float">
            <text:p>11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33101851851852" calcext:value-type="float">
            <text:p>0,00013310185185185200</text:p>
          </table:table-cell>
          <table:table-cell table:formula="of:=[.D27]-[.D26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6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38425925925926" calcext:value-type="float">
            <text:p>0,00013842592592592600</text:p>
          </table:table-cell>
          <table:table-cell table:formula="of:=[.D28]-[.D27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6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4375" calcext:value-type="float">
            <text:p>0,00014375000000000000</text:p>
          </table:table-cell>
          <table:table-cell table:formula="of:=[.D29]-[.D28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6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49074074074074" calcext:value-type="float">
            <text:p>0,00014907407407407400</text:p>
          </table:table-cell>
          <table:table-cell table:formula="of:=[.D30]-[.D29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6" office:value-type="float" office:value="1334" calcext:value-type="float">
            <text:p>133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54398148148148" calcext:value-type="float">
            <text:p>0,00015439814814814800</text:p>
          </table:table-cell>
          <table:table-cell table:formula="of:=[.D31]-[.D3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6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59722222222222" calcext:value-type="float">
            <text:p>0,00015972222222222200</text:p>
          </table:table-cell>
          <table:table-cell table:formula="of:=[.D32]-[.D31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6" office:value-type="float" office:value="1426" calcext:value-type="float">
            <text:p>142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65046296296296" calcext:value-type="float">
            <text:p>0,00016504629629629600</text:p>
          </table:table-cell>
          <table:table-cell table:formula="of:=[.D33]-[.D32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6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7037037037037" calcext:value-type="float">
            <text:p>0,00017037037037037000</text:p>
          </table:table-cell>
          <table:table-cell table:formula="of:=[.D34]-[.D33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6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75694444444444" calcext:value-type="float">
            <text:p>0,00017569444444444400</text:p>
          </table:table-cell>
          <table:table-cell table:formula="of:=[.D35]-[.D34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6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81018518518519" calcext:value-type="float">
            <text:p>0,00018101851851851900</text:p>
          </table:table-cell>
          <table:table-cell table:formula="of:=[.D36]-[.D35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6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86342592592593" calcext:value-type="float">
            <text:p>0,00018634259259259300</text:p>
          </table:table-cell>
          <table:table-cell table:formula="of:=[.D37]-[.D36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6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91666666666667" calcext:value-type="float">
            <text:p>0,00019166666666666700</text:p>
          </table:table-cell>
          <table:table-cell table:formula="of:=[.D38]-[.D37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6" office:value-type="float" office:value="1702" calcext:value-type="float">
            <text:p>170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96990740740741" calcext:value-type="float">
            <text:p>0,00019699074074074100</text:p>
          </table:table-cell>
          <table:table-cell table:formula="of:=[.D39]-[.D38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6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02314814814815" calcext:value-type="float">
            <text:p>0,00020231481481481500</text:p>
          </table:table-cell>
          <table:table-cell table:formula="of:=[.D40]-[.D39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6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07638888888889" calcext:value-type="float">
            <text:p>0,00020763888888888900</text:p>
          </table:table-cell>
          <table:table-cell table:formula="of:=[.D41]-[.D4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6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12962962962963" calcext:value-type="float">
            <text:p>0,00021296296296296300</text:p>
          </table:table-cell>
          <table:table-cell table:formula="of:=[.D42]-[.D41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6" office:value-type="float" office:value="1886" calcext:value-type="float">
            <text:p>188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18287037037037" calcext:value-type="float">
            <text:p>0,00021828703703703700</text:p>
          </table:table-cell>
          <table:table-cell table:formula="of:=[.D43]-[.D42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6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23611111111111" calcext:value-type="float">
            <text:p>0,00022361111111111100</text:p>
          </table:table-cell>
          <table:table-cell table:formula="of:=[.D44]-[.D43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6" office:value-type="float" office:value="1978" calcext:value-type="float">
            <text:p>197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28935185185185" calcext:value-type="float">
            <text:p>0,00022893518518518500</text:p>
          </table:table-cell>
          <table:table-cell table:formula="of:=[.D45]-[.D44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6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34259259259259" calcext:value-type="float">
            <text:p>0,00023425925925925900</text:p>
          </table:table-cell>
          <table:table-cell table:formula="of:=[.D46]-[.D45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6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39583333333333" calcext:value-type="float">
            <text:p>0,00023958333333333300</text:p>
          </table:table-cell>
          <table:table-cell table:formula="of:=[.D47]-[.D46]" office:value-type="float" office:value="0.00000532407407407407" calcext:value-type="float">
            <text:p>0,000005324074074074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6" office:value-type="float" office:value="2116" calcext:value-type="float">
            <text:p>211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44907407407407" calcext:value-type="float">
            <text:p>0,00024490740740740700</text:p>
          </table:table-cell>
          <table:table-cell table:formula="of:=[.D48]-[.D47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6" office:value-type="float" office:value="2162" calcext:value-type="float">
            <text:p>216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50231481481482" calcext:value-type="float">
            <text:p>0,00025023148148148200</text:p>
          </table:table-cell>
          <table:table-cell table:formula="of:=[.D49]-[.D48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6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55555555555556" calcext:value-type="float">
            <text:p>0,00025555555555555600</text:p>
          </table:table-cell>
          <table:table-cell table:formula="of:=[.D50]-[.D4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6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6087962962963" calcext:value-type="float">
            <text:p>0,00026087962962963000</text:p>
          </table:table-cell>
          <table:table-cell table:formula="of:=[.D51]-[.D5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6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66203703703704" calcext:value-type="float">
            <text:p>0,00026620370370370400</text:p>
          </table:table-cell>
          <table:table-cell table:formula="of:=[.D52]-[.D5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6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71527777777778" calcext:value-type="float">
            <text:p>0,00027152777777777800</text:p>
          </table:table-cell>
          <table:table-cell table:formula="of:=[.D53]-[.D52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6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76851851851852" calcext:value-type="float">
            <text:p>0,00027685185185185200</text:p>
          </table:table-cell>
          <table:table-cell table:formula="of:=[.D54]-[.D5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6" office:value-type="float" office:value="2438" calcext:value-type="float">
            <text:p>243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82175925925926" calcext:value-type="float">
            <text:p>0,00028217592592592600</text:p>
          </table:table-cell>
          <table:table-cell table:formula="of:=[.D55]-[.D54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6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875" calcext:value-type="float">
            <text:p>0,00028750000000000000</text:p>
          </table:table-cell>
          <table:table-cell table:formula="of:=[.D56]-[.D55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6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92824074074074" calcext:value-type="float">
            <text:p>0,00029282407407407400</text:p>
          </table:table-cell>
          <table:table-cell table:formula="of:=[.D57]-[.D5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6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98148148148148" calcext:value-type="float">
            <text:p>0,00029814814814814800</text:p>
          </table:table-cell>
          <table:table-cell table:formula="of:=[.D58]-[.D57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6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03472222222222" calcext:value-type="float">
            <text:p>0,00030347222222222200</text:p>
          </table:table-cell>
          <table:table-cell table:formula="of:=[.D59]-[.D5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6" office:value-type="float" office:value="2668" calcext:value-type="float">
            <text:p>266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08796296296296" calcext:value-type="float">
            <text:p>0,00030879629629629600</text:p>
          </table:table-cell>
          <table:table-cell table:formula="of:=[.D60]-[.D59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6" office:value-type="float" office:value="2714" calcext:value-type="float">
            <text:p>271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1412037037037" calcext:value-type="float">
            <text:p>0,00031412037037037000</text:p>
          </table:table-cell>
          <table:table-cell table:formula="of:=[.D61]-[.D6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6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19444444444444" calcext:value-type="float">
            <text:p>0,00031944444444444400</text:p>
          </table:table-cell>
          <table:table-cell table:formula="of:=[.D62]-[.D6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6" office:value-type="float" office:value="2806" calcext:value-type="float">
            <text:p>280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24768518518519" calcext:value-type="float">
            <text:p>0,00032476851851851900</text:p>
          </table:table-cell>
          <table:table-cell table:formula="of:=[.D63]-[.D62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6" office:value-type="float" office:value="2852" calcext:value-type="float">
            <text:p>285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30092592592593" calcext:value-type="float">
            <text:p>0,00033009259259259300</text:p>
          </table:table-cell>
          <table:table-cell table:formula="of:=[.D64]-[.D6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6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35416666666667" calcext:value-type="float">
            <text:p>0,00033541666666666700</text:p>
          </table:table-cell>
          <table:table-cell table:formula="of:=[.D65]-[.D64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6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40740740740741" calcext:value-type="float">
            <text:p>0,00034074074074074100</text:p>
          </table:table-cell>
          <table:table-cell table:formula="of:=[.D66]-[.D65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6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46064814814815" calcext:value-type="float">
            <text:p>0,00034606481481481500</text:p>
          </table:table-cell>
          <table:table-cell table:formula="of:=[.D67]-[.D6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6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51388888888889" calcext:value-type="float">
            <text:p>0,00035138888888888900</text:p>
          </table:table-cell>
          <table:table-cell table:formula="of:=[.D68]-[.D67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6" office:value-type="float" office:value="3082" calcext:value-type="float">
            <text:p>308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56712962962963" calcext:value-type="float">
            <text:p>0,00035671296296296300</text:p>
          </table:table-cell>
          <table:table-cell table:formula="of:=[.D69]-[.D6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6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62037037037037" calcext:value-type="float">
            <text:p>0,00036203703703703700</text:p>
          </table:table-cell>
          <table:table-cell table:formula="of:=[.D70]-[.D69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6" office:value-type="float" office:value="3174" calcext:value-type="float">
            <text:p>317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67361111111111" calcext:value-type="float">
            <text:p>0,00036736111111111100</text:p>
          </table:table-cell>
          <table:table-cell table:formula="of:=[.D71]-[.D7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6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72685185185185" calcext:value-type="float">
            <text:p>0,00037268518518518500</text:p>
          </table:table-cell>
          <table:table-cell table:formula="of:=[.D72]-[.D7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6" office:value-type="float" office:value="3266" calcext:value-type="float">
            <text:p>326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78009259259259" calcext:value-type="float">
            <text:p>0,00037800925925925900</text:p>
          </table:table-cell>
          <table:table-cell table:formula="of:=[.D73]-[.D72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6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83333333333333" calcext:value-type="float">
            <text:p>0,00038333333333333300</text:p>
          </table:table-cell>
          <table:table-cell table:formula="of:=[.D74]-[.D7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6" office:value-type="float" office:value="3358" calcext:value-type="float">
            <text:p>335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88657407407407" calcext:value-type="float">
            <text:p>0,00038865740740740700</text:p>
          </table:table-cell>
          <table:table-cell table:formula="of:=[.D75]-[.D74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6" office:value-type="float" office:value="3404" calcext:value-type="float">
            <text:p>340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93981481481482" calcext:value-type="float">
            <text:p>0,00039398148148148200</text:p>
          </table:table-cell>
          <table:table-cell table:formula="of:=[.D76]-[.D75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6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99305555555556" calcext:value-type="float">
            <text:p>0,00039930555555555600</text:p>
          </table:table-cell>
          <table:table-cell table:formula="of:=[.D77]-[.D7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6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0462962962963" calcext:value-type="float">
            <text:p>0,00040462962962963000</text:p>
          </table:table-cell>
          <table:table-cell table:formula="of:=[.D78]-[.D77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6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09953703703704" calcext:value-type="float">
            <text:p>0,00040995370370370400</text:p>
          </table:table-cell>
          <table:table-cell table:formula="of:=[.D79]-[.D7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6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15277777777778" calcext:value-type="float">
            <text:p>0,00041527777777777800</text:p>
          </table:table-cell>
          <table:table-cell table:formula="of:=[.D80]-[.D79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6" office:value-type="float" office:value="3634" calcext:value-type="float">
            <text:p>363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20601851851852" calcext:value-type="float">
            <text:p>0,00042060185185185200</text:p>
          </table:table-cell>
          <table:table-cell table:formula="of:=[.D81]-[.D80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6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25925925925926" calcext:value-type="float">
            <text:p>0,00042592592592592600</text:p>
          </table:table-cell>
          <table:table-cell table:formula="of:=[.D82]-[.D8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6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3125" calcext:value-type="float">
            <text:p>0,00043125000000000000</text:p>
          </table:table-cell>
          <table:table-cell table:formula="of:=[.D83]-[.D82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6" office:value-type="float" office:value="3772" calcext:value-type="float">
            <text:p>377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36574074074074" calcext:value-type="float">
            <text:p>0,00043657407407407400</text:p>
          </table:table-cell>
          <table:table-cell table:formula="of:=[.D84]-[.D8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6" office:value-type="float" office:value="3818" calcext:value-type="float">
            <text:p>381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41898148148148" calcext:value-type="float">
            <text:p>0,00044189814814814800</text:p>
          </table:table-cell>
          <table:table-cell table:formula="of:=[.D85]-[.D84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6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47222222222222" calcext:value-type="float">
            <text:p>0,00044722222222222200</text:p>
          </table:table-cell>
          <table:table-cell table:formula="of:=[.D86]-[.D85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6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52546296296296" calcext:value-type="float">
            <text:p>0,00045254629629629600</text:p>
          </table:table-cell>
          <table:table-cell table:formula="of:=[.D87]-[.D8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6" office:value-type="float" office:value="3956" calcext:value-type="float">
            <text:p>395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5787037037037" calcext:value-type="float">
            <text:p>0,00045787037037037000</text:p>
          </table:table-cell>
          <table:table-cell table:formula="of:=[.D88]-[.D87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6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63194444444444" calcext:value-type="float">
            <text:p>0,00046319444444444400</text:p>
          </table:table-cell>
          <table:table-cell table:formula="of:=[.D89]-[.D8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6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68518518518519" calcext:value-type="float">
            <text:p>0,00046851851851851900</text:p>
          </table:table-cell>
          <table:table-cell table:formula="of:=[.D90]-[.D89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6" office:value-type="float" office:value="4094" calcext:value-type="float">
            <text:p>409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73842592592593" calcext:value-type="float">
            <text:p>0,00047384259259259300</text:p>
          </table:table-cell>
          <table:table-cell table:formula="of:=[.D91]-[.D9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6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79166666666667" calcext:value-type="float">
            <text:p>0,00047916666666666700</text:p>
          </table:table-cell>
          <table:table-cell table:formula="of:=[.D92]-[.D91]" office:value-type="float" office:value="0.0000053240740740741" calcext:value-type="float">
            <text:p>0,000005324074074074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6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84490740740741" calcext:value-type="float">
            <text:p>0,00048449074074074100</text:p>
          </table:table-cell>
          <table:table-cell table:formula="of:=[.D93]-[.D9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6" office:value-type="float" office:value="4232" calcext:value-type="float">
            <text:p>423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89814814814815" calcext:value-type="float">
            <text:p>0,00048981481481481500</text:p>
          </table:table-cell>
          <table:table-cell table:formula="of:=[.D94]-[.D93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6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95138888888889" calcext:value-type="float">
            <text:p>0,00049513888888888900</text:p>
          </table:table-cell>
          <table:table-cell table:formula="of:=[.D95]-[.D9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6" office:value-type="float" office:value="4324" calcext:value-type="float">
            <text:p>432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00462962962963" calcext:value-type="float">
            <text:p>0,00050046296296296300</text:p>
          </table:table-cell>
          <table:table-cell table:formula="of:=[.D96]-[.D9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6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05787037037037" calcext:value-type="float">
            <text:p>0,00050578703703703700</text:p>
          </table:table-cell>
          <table:table-cell table:formula="of:=[.D97]-[.D96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6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11111111111111" calcext:value-type="float">
            <text:p>0,00051111111111111100</text:p>
          </table:table-cell>
          <table:table-cell table:formula="of:=[.D98]-[.D9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6" office:value-type="float" office:value="4462" calcext:value-type="float">
            <text:p>446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16435185185185" calcext:value-type="float">
            <text:p>0,00051643518518518500</text:p>
          </table:table-cell>
          <table:table-cell table:formula="of:=[.D99]-[.D9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6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21759259259259" calcext:value-type="float">
            <text:p>0,00052175925925925900</text:p>
          </table:table-cell>
          <table:table-cell table:formula="of:=[.D100]-[.D9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6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27083333333333" calcext:value-type="float">
            <text:p>0,00052708333333333300</text:p>
          </table:table-cell>
          <table:table-cell table:formula="of:=[.D101]-[.D10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6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32407407407407" calcext:value-type="float">
            <text:p>0,00053240740740740700</text:p>
          </table:table-cell>
          <table:table-cell table:formula="of:=[.D102]-[.D10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6" office:value-type="float" office:value="4646" calcext:value-type="float">
            <text:p>464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37731481481482" calcext:value-type="float">
            <text:p>0,00053773148148148200</text:p>
          </table:table-cell>
          <table:table-cell table:formula="of:=[.D103]-[.D10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6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43055555555556" calcext:value-type="float">
            <text:p>0,00054305555555555600</text:p>
          </table:table-cell>
          <table:table-cell table:formula="of:=[.D104]-[.D103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6" office:value-type="float" office:value="4738" calcext:value-type="float">
            <text:p>473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4837962962963" calcext:value-type="float">
            <text:p>0,00054837962962963000</text:p>
          </table:table-cell>
          <table:table-cell table:formula="of:=[.D105]-[.D10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6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53703703703704" calcext:value-type="float">
            <text:p>0,00055370370370370400</text:p>
          </table:table-cell>
          <table:table-cell table:formula="of:=[.D106]-[.D10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6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59027777777778" calcext:value-type="float">
            <text:p>0,00055902777777777800</text:p>
          </table:table-cell>
          <table:table-cell table:formula="of:=[.D107]-[.D10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6" office:value-type="float" office:value="4876" calcext:value-type="float">
            <text:p>487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64351851851852" calcext:value-type="float">
            <text:p>0,00056435185185185200</text:p>
          </table:table-cell>
          <table:table-cell table:formula="of:=[.D108]-[.D10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6" office:value-type="float" office:value="4922" calcext:value-type="float">
            <text:p>492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69675925925926" calcext:value-type="float">
            <text:p>0,00056967592592592600</text:p>
          </table:table-cell>
          <table:table-cell table:formula="of:=[.D109]-[.D10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6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75" calcext:value-type="float">
            <text:p>0,00057500000000000000</text:p>
          </table:table-cell>
          <table:table-cell table:formula="of:=[.D110]-[.D10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6" office:value-type="float" office:value="5014" calcext:value-type="float">
            <text:p>501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80324074074074" calcext:value-type="float">
            <text:p>0,00058032407407407400</text:p>
          </table:table-cell>
          <table:table-cell table:formula="of:=[.D111]-[.D11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6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85648148148148" calcext:value-type="float">
            <text:p>0,00058564814814814800</text:p>
          </table:table-cell>
          <table:table-cell table:formula="of:=[.D112]-[.D11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6" office:value-type="float" office:value="5106" calcext:value-type="float">
            <text:p>510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90972222222222" calcext:value-type="float">
            <text:p>0,00059097222222222200</text:p>
          </table:table-cell>
          <table:table-cell table:formula="of:=[.D113]-[.D11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6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96296296296296" calcext:value-type="float">
            <text:p>0,00059629629629629600</text:p>
          </table:table-cell>
          <table:table-cell table:formula="of:=[.D114]-[.D113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6" office:value-type="float" office:value="5198" calcext:value-type="float">
            <text:p>519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0162037037037" calcext:value-type="float">
            <text:p>0,00060162037037037000</text:p>
          </table:table-cell>
          <table:table-cell table:formula="of:=[.D115]-[.D11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6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06944444444445" calcext:value-type="float">
            <text:p>0,00060694444444444500</text:p>
          </table:table-cell>
          <table:table-cell table:formula="of:=[.D116]-[.D11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6" office:value-type="float" office:value="5290" calcext:value-type="float">
            <text:p>529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12268518518519" calcext:value-type="float">
            <text:p>0,00061226851851851900</text:p>
          </table:table-cell>
          <table:table-cell table:formula="of:=[.D117]-[.D11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6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17592592592593" calcext:value-type="float">
            <text:p>0,00061759259259259300</text:p>
          </table:table-cell>
          <table:table-cell table:formula="of:=[.D118]-[.D11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6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22916666666667" calcext:value-type="float">
            <text:p>0,00062291666666666700</text:p>
          </table:table-cell>
          <table:table-cell table:formula="of:=[.D119]-[.D11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6" office:value-type="float" office:value="5428" calcext:value-type="float">
            <text:p>542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28240740740741" calcext:value-type="float">
            <text:p>0,00062824074074074100</text:p>
          </table:table-cell>
          <table:table-cell table:formula="of:=[.D120]-[.D11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6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33564814814815" calcext:value-type="float">
            <text:p>0,00063356481481481500</text:p>
          </table:table-cell>
          <table:table-cell table:formula="of:=[.D121]-[.D12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6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38888888888889" calcext:value-type="float">
            <text:p>0,00063888888888888900</text:p>
          </table:table-cell>
          <table:table-cell table:formula="of:=[.D122]-[.D12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6" office:value-type="float" office:value="5566" calcext:value-type="float">
            <text:p>556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44212962962963" calcext:value-type="float">
            <text:p>0,00064421296296296300</text:p>
          </table:table-cell>
          <table:table-cell table:formula="of:=[.D123]-[.D12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6" office:value-type="float" office:value="5612" calcext:value-type="float">
            <text:p>561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49537037037037" calcext:value-type="float">
            <text:p>0,00064953703703703700</text:p>
          </table:table-cell>
          <table:table-cell table:formula="of:=[.D124]-[.D123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6" office:value-type="float" office:value="5658" calcext:value-type="float">
            <text:p>565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54861111111111" calcext:value-type="float">
            <text:p>0,00065486111111111100</text:p>
          </table:table-cell>
          <table:table-cell table:formula="of:=[.D125]-[.D12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6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60185185185185" calcext:value-type="float">
            <text:p>0,00066018518518518500</text:p>
          </table:table-cell>
          <table:table-cell table:formula="of:=[.D126]-[.D12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6" office:value-type="float" office:value="5750" calcext:value-type="float">
            <text:p>5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65509259259259" calcext:value-type="float">
            <text:p>0,00066550925925925900</text:p>
          </table:table-cell>
          <table:table-cell table:formula="of:=[.D127]-[.D12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6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70833333333333" calcext:value-type="float">
            <text:p>0,00067083333333333300</text:p>
          </table:table-cell>
          <table:table-cell table:formula="of:=[.D128]-[.D12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6" office:value-type="float" office:value="5842" calcext:value-type="float">
            <text:p>584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76157407407407" calcext:value-type="float">
            <text:p>0,00067615740740740700</text:p>
          </table:table-cell>
          <table:table-cell table:formula="of:=[.D129]-[.D12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6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81481481481482" calcext:value-type="float">
            <text:p>0,00068148148148148200</text:p>
          </table:table-cell>
          <table:table-cell table:formula="of:=[.D130]-[.D12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6" office:value-type="float" office:value="5934" calcext:value-type="float">
            <text:p>593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86805555555556" calcext:value-type="float">
            <text:p>0,00068680555555555600</text:p>
          </table:table-cell>
          <table:table-cell table:formula="of:=[.D131]-[.D13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6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9212962962963" calcext:value-type="float">
            <text:p>0,00069212962962963000</text:p>
          </table:table-cell>
          <table:table-cell table:formula="of:=[.D132]-[.D13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6" office:value-type="float" office:value="6026" calcext:value-type="float">
            <text:p>602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97453703703704" calcext:value-type="float">
            <text:p>0,00069745370370370400</text:p>
          </table:table-cell>
          <table:table-cell table:formula="of:=[.D133]-[.D13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6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02777777777778" calcext:value-type="float">
            <text:p>0,00070277777777777800</text:p>
          </table:table-cell>
          <table:table-cell table:formula="of:=[.D134]-[.D133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6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08101851851852" calcext:value-type="float">
            <text:p>0,00070810185185185200</text:p>
          </table:table-cell>
          <table:table-cell table:formula="of:=[.D135]-[.D13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6" office:value-type="float" office:value="6164" calcext:value-type="float">
            <text:p>616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13425925925926" calcext:value-type="float">
            <text:p>0,00071342592592592600</text:p>
          </table:table-cell>
          <table:table-cell table:formula="of:=[.D136]-[.D13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6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1875" calcext:value-type="float">
            <text:p>0,00071875000000000000</text:p>
          </table:table-cell>
          <table:table-cell table:formula="of:=[.D137]-[.D13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6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24074074074074" calcext:value-type="float">
            <text:p>0,00072407407407407400</text:p>
          </table:table-cell>
          <table:table-cell table:formula="of:=[.D138]-[.D13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6" office:value-type="float" office:value="6302" calcext:value-type="float">
            <text:p>630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29398148148148" calcext:value-type="float">
            <text:p>0,00072939814814814800</text:p>
          </table:table-cell>
          <table:table-cell table:formula="of:=[.D139]-[.D13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6" office:value-type="float" office:value="6348" calcext:value-type="float">
            <text:p>634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34722222222222" calcext:value-type="float">
            <text:p>0,00073472222222222200</text:p>
          </table:table-cell>
          <table:table-cell table:formula="of:=[.D140]-[.D13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6" office:value-type="float" office:value="6394" calcext:value-type="float">
            <text:p>639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40046296296296" calcext:value-type="float">
            <text:p>0,00074004629629629600</text:p>
          </table:table-cell>
          <table:table-cell table:formula="of:=[.D141]-[.D14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6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4537037037037" calcext:value-type="float">
            <text:p>0,00074537037037037000</text:p>
          </table:table-cell>
          <table:table-cell table:formula="of:=[.D142]-[.D14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6" office:value-type="float" office:value="6486" calcext:value-type="float">
            <text:p>648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50694444444445" calcext:value-type="float">
            <text:p>0,00075069444444444500</text:p>
          </table:table-cell>
          <table:table-cell table:formula="of:=[.D143]-[.D14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6" office:value-type="float" office:value="6532" calcext:value-type="float">
            <text:p>653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56018518518519" calcext:value-type="float">
            <text:p>0,00075601851851851900</text:p>
          </table:table-cell>
          <table:table-cell table:formula="of:=[.D144]-[.D14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6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61342592592593" calcext:value-type="float">
            <text:p>0,00076134259259259200</text:p>
          </table:table-cell>
          <table:table-cell table:formula="of:=[.D145]-[.D144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6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66666666666667" calcext:value-type="float">
            <text:p>0,00076666666666666700</text:p>
          </table:table-cell>
          <table:table-cell table:formula="of:=[.D146]-[.D14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6" office:value-type="float" office:value="6670" calcext:value-type="float">
            <text:p>667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71990740740741" calcext:value-type="float">
            <text:p>0,00077199074074074100</text:p>
          </table:table-cell>
          <table:table-cell table:formula="of:=[.D147]-[.D14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6" office:value-type="float" office:value="6716" calcext:value-type="float">
            <text:p>671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77314814814815" calcext:value-type="float">
            <text:p>0,00077731481481481500</text:p>
          </table:table-cell>
          <table:table-cell table:formula="of:=[.D148]-[.D14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6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82638888888889" calcext:value-type="float">
            <text:p>0,00078263888888888900</text:p>
          </table:table-cell>
          <table:table-cell table:formula="of:=[.D149]-[.D14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6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87962962962963" calcext:value-type="float">
            <text:p>0,00078796296296296300</text:p>
          </table:table-cell>
          <table:table-cell table:formula="of:=[.D150]-[.D14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6" office:value-type="float" office:value="6854" calcext:value-type="float">
            <text:p>685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93287037037037" calcext:value-type="float">
            <text:p>0,00079328703703703700</text:p>
          </table:table-cell>
          <table:table-cell table:formula="of:=[.D151]-[.D15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6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98611111111111" calcext:value-type="float">
            <text:p>0,00079861111111111100</text:p>
          </table:table-cell>
          <table:table-cell table:formula="of:=[.D152]-[.D15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6" office:value-type="float" office:value="6946" calcext:value-type="float">
            <text:p>694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03935185185185" calcext:value-type="float">
            <text:p>0,00080393518518518500</text:p>
          </table:table-cell>
          <table:table-cell table:formula="of:=[.D153]-[.D15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6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09259259259259" calcext:value-type="float">
            <text:p>0,00080925925925925900</text:p>
          </table:table-cell>
          <table:table-cell table:formula="of:=[.D154]-[.D15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6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814583333333333" calcext:value-type="float">
            <text:p>0,00081458333333333300</text:p>
          </table:table-cell>
          <table:table-cell table:formula="of:=[.D155]-[.D154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6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19907407407407" calcext:value-type="float">
            <text:p>0,00081990740740740700</text:p>
          </table:table-cell>
          <table:table-cell table:formula="of:=[.D156]-[.D15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6" office:value-type="float" office:value="7130" calcext:value-type="float">
            <text:p>713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25231481481482" calcext:value-type="float">
            <text:p>0,00082523148148148200</text:p>
          </table:table-cell>
          <table:table-cell table:formula="of:=[.D157]-[.D15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6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830555555555556" calcext:value-type="float">
            <text:p>0,00083055555555555600</text:p>
          </table:table-cell>
          <table:table-cell table:formula="of:=[.D158]-[.D15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6" office:value-type="float" office:value="7222" calcext:value-type="float">
            <text:p>722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83587962962963" calcext:value-type="float">
            <text:p>0,00083587962962963000</text:p>
          </table:table-cell>
          <table:table-cell table:formula="of:=[.D159]-[.D15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6" office:value-type="float" office:value="7268" calcext:value-type="float">
            <text:p>726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41203703703704" calcext:value-type="float">
            <text:p>0,00084120370370370400</text:p>
          </table:table-cell>
          <table:table-cell table:formula="of:=[.D160]-[.D15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6" office:value-type="float" office:value="7314" calcext:value-type="float">
            <text:p>731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846527777777778" calcext:value-type="float">
            <text:p>0,00084652777777777800</text:p>
          </table:table-cell>
          <table:table-cell table:formula="of:=[.D161]-[.D16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6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851851851851852" calcext:value-type="float">
            <text:p>0,00085185185185185200</text:p>
          </table:table-cell>
          <table:table-cell table:formula="of:=[.D162]-[.D16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6" office:value-type="float" office:value="7406" calcext:value-type="float">
            <text:p>740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57175925925926" calcext:value-type="float">
            <text:p>0,00085717592592592600</text:p>
          </table:table-cell>
          <table:table-cell table:formula="of:=[.D163]-[.D16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6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8625" calcext:value-type="float">
            <text:p>0,00086250000000000000</text:p>
          </table:table-cell>
          <table:table-cell table:formula="of:=[.D164]-[.D16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6" office:value-type="float" office:value="7498" calcext:value-type="float">
            <text:p>749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867824074074074" calcext:value-type="float">
            <text:p>0,00086782407407407400</text:p>
          </table:table-cell>
          <table:table-cell table:formula="of:=[.D165]-[.D164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6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873148148148148" calcext:value-type="float">
            <text:p>0,00087314814814814800</text:p>
          </table:table-cell>
          <table:table-cell table:formula="of:=[.D166]-[.D16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6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78472222222222" calcext:value-type="float">
            <text:p>0,00087847222222222200</text:p>
          </table:table-cell>
          <table:table-cell table:formula="of:=[.D167]-[.D16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6" office:value-type="float" office:value="7636" calcext:value-type="float">
            <text:p>763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883796296296296" calcext:value-type="float">
            <text:p>0,00088379629629629600</text:p>
          </table:table-cell>
          <table:table-cell table:formula="of:=[.D168]-[.D16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6" office:value-type="float" office:value="7682" calcext:value-type="float">
            <text:p>768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88912037037037" calcext:value-type="float">
            <text:p>0,00088912037037037000</text:p>
          </table:table-cell>
          <table:table-cell table:formula="of:=[.D169]-[.D16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6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894444444444445" calcext:value-type="float">
            <text:p>0,00089444444444444500</text:p>
          </table:table-cell>
          <table:table-cell table:formula="of:=[.D170]-[.D16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6" office:value-type="float" office:value="7774" calcext:value-type="float">
            <text:p>777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99768518518519" calcext:value-type="float">
            <text:p>0,00089976851851851900</text:p>
          </table:table-cell>
          <table:table-cell table:formula="of:=[.D171]-[.D170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6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905092592592593" calcext:value-type="float">
            <text:p>0,00090509259259259300</text:p>
          </table:table-cell>
          <table:table-cell table:formula="of:=[.D172]-[.D17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6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910416666666667" calcext:value-type="float">
            <text:p>0,00091041666666666700</text:p>
          </table:table-cell>
          <table:table-cell table:formula="of:=[.D173]-[.D17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6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915740740740741" calcext:value-type="float">
            <text:p>0,00091574074074074100</text:p>
          </table:table-cell>
          <table:table-cell table:formula="of:=[.D174]-[.D17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6" office:value-type="float" office:value="7958" calcext:value-type="float">
            <text:p>795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921064814814815" calcext:value-type="float">
            <text:p>0,00092106481481481500</text:p>
          </table:table-cell>
          <table:table-cell table:formula="of:=[.D175]-[.D174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6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926388888888889" calcext:value-type="float">
            <text:p>0,00092638888888888900</text:p>
          </table:table-cell>
          <table:table-cell table:formula="of:=[.D176]-[.D17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6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931712962962963" calcext:value-type="float">
            <text:p>0,00093171296296296300</text:p>
          </table:table-cell>
          <table:table-cell table:formula="of:=[.D177]-[.D17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6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937037037037037" calcext:value-type="float">
            <text:p>0,00093703703703703700</text:p>
          </table:table-cell>
          <table:table-cell table:formula="of:=[.D178]-[.D177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6" office:value-type="float" office:value="8142" calcext:value-type="float">
            <text:p>814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942361111111111" calcext:value-type="float">
            <text:p>0,00094236111111111100</text:p>
          </table:table-cell>
          <table:table-cell table:formula="of:=[.D179]-[.D17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6" office:value-type="float" office:value="8188" calcext:value-type="float">
            <text:p>818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947685185185185" calcext:value-type="float">
            <text:p>0,00094768518518518500</text:p>
          </table:table-cell>
          <table:table-cell table:formula="of:=[.D180]-[.D17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6" office:value-type="float" office:value="8234" calcext:value-type="float">
            <text:p>823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953009259259259" calcext:value-type="float">
            <text:p>0,00095300925925925900</text:p>
          </table:table-cell>
          <table:table-cell table:formula="of:=[.D181]-[.D18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6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958333333333333" calcext:value-type="float">
            <text:p>0,00095833333333333300</text:p>
          </table:table-cell>
          <table:table-cell table:formula="of:=[.D182]-[.D181]" office:value-type="float" office:value="0.00000532407407407415" calcext:value-type="float">
            <text:p>0,000005324074074074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6" office:value-type="float" office:value="8326" calcext:value-type="float">
            <text:p>832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963657407407407" calcext:value-type="float">
            <text:p>0,00096365740740740700</text:p>
          </table:table-cell>
          <table:table-cell table:formula="of:=[.D183]-[.D18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6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968981481481482" calcext:value-type="float">
            <text:p>0,00096898148148148200</text:p>
          </table:table-cell>
          <table:table-cell table:formula="of:=[.D184]-[.D18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6" office:value-type="float" office:value="8418" calcext:value-type="float">
            <text:p>841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974305555555556" calcext:value-type="float">
            <text:p>0,00097430555555555600</text:p>
          </table:table-cell>
          <table:table-cell table:formula="of:=[.D185]-[.D18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6" office:value-type="float" office:value="8464" calcext:value-type="float">
            <text:p>846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97962962962963" calcext:value-type="float">
            <text:p>0,00097962962962963000</text:p>
          </table:table-cell>
          <table:table-cell table:formula="of:=[.D186]-[.D18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6" office:value-type="float" office:value="8510" calcext:value-type="float">
            <text:p>851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984953703703704" calcext:value-type="float">
            <text:p>0,00098495370370370400</text:p>
          </table:table-cell>
          <table:table-cell table:formula="of:=[.D187]-[.D18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6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990277777777778" calcext:value-type="float">
            <text:p>0,00099027777777777800</text:p>
          </table:table-cell>
          <table:table-cell table:formula="of:=[.D188]-[.D18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6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995601851851852" calcext:value-type="float">
            <text:p>0,00099560185185185200</text:p>
          </table:table-cell>
          <table:table-cell table:formula="of:=[.D189]-[.D18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6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00092592592593" calcext:value-type="float">
            <text:p>0,00100092592592593000</text:p>
          </table:table-cell>
          <table:table-cell table:formula="of:=[.D190]-[.D18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6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00625" calcext:value-type="float">
            <text:p>0,00100625000000000000</text:p>
          </table:table-cell>
          <table:table-cell table:formula="of:=[.D191]-[.D19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6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01157407407407" calcext:value-type="float">
            <text:p>0,00101157407407407000</text:p>
          </table:table-cell>
          <table:table-cell table:formula="of:=[.D192]-[.D19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6" office:value-type="float" office:value="8786" calcext:value-type="float">
            <text:p>878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01689814814815" calcext:value-type="float">
            <text:p>0,00101689814814815000</text:p>
          </table:table-cell>
          <table:table-cell table:formula="of:=[.D193]-[.D19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6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02222222222222" calcext:value-type="float">
            <text:p>0,00102222222222222000</text:p>
          </table:table-cell>
          <table:table-cell table:formula="of:=[.D194]-[.D19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6" office:value-type="float" office:value="8878" calcext:value-type="float">
            <text:p>887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0275462962963" calcext:value-type="float">
            <text:p>0,00102754629629630000</text:p>
          </table:table-cell>
          <table:table-cell table:formula="of:=[.D195]-[.D19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6" office:value-type="float" office:value="8924" calcext:value-type="float">
            <text:p>892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03287037037037" calcext:value-type="float">
            <text:p>0,00103287037037037000</text:p>
          </table:table-cell>
          <table:table-cell table:formula="of:=[.D196]-[.D19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6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03819444444444" calcext:value-type="float">
            <text:p>0,00103819444444444000</text:p>
          </table:table-cell>
          <table:table-cell table:formula="of:=[.D197]-[.D19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6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04351851851852" calcext:value-type="float">
            <text:p>0,00104351851851852000</text:p>
          </table:table-cell>
          <table:table-cell table:formula="of:=[.D198]-[.D19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6" office:value-type="float" office:value="9062" calcext:value-type="float">
            <text:p>906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04884259259259" calcext:value-type="float">
            <text:p>0,00104884259259259000</text:p>
          </table:table-cell>
          <table:table-cell table:formula="of:=[.D199]-[.D19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6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05416666666667" calcext:value-type="float">
            <text:p>0,00105416666666667000</text:p>
          </table:table-cell>
          <table:table-cell table:formula="of:=[.D200]-[.D19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6" office:value-type="float" office:value="9154" calcext:value-type="float">
            <text:p>915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05949074074074" calcext:value-type="float">
            <text:p>0,00105949074074074000</text:p>
          </table:table-cell>
          <table:table-cell table:formula="of:=[.D201]-[.D20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6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06481481481481" calcext:value-type="float">
            <text:p>0,00106481481481481000</text:p>
          </table:table-cell>
          <table:table-cell table:formula="of:=[.D202]-[.D20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6" office:value-type="float" office:value="9246" calcext:value-type="float">
            <text:p>924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07013888888889" calcext:value-type="float">
            <text:p>0,00107013888888889000</text:p>
          </table:table-cell>
          <table:table-cell table:formula="of:=[.D203]-[.D20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6" office:value-type="float" office:value="9292" calcext:value-type="float">
            <text:p>929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07546296296296" calcext:value-type="float">
            <text:p>0,00107546296296296000</text:p>
          </table:table-cell>
          <table:table-cell table:formula="of:=[.D204]-[.D20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6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08078703703704" calcext:value-type="float">
            <text:p>0,00108078703703704000</text:p>
          </table:table-cell>
          <table:table-cell table:formula="of:=[.D205]-[.D20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6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08611111111111" calcext:value-type="float">
            <text:p>0,00108611111111111000</text:p>
          </table:table-cell>
          <table:table-cell table:formula="of:=[.D206]-[.D20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6" office:value-type="float" office:value="9430" calcext:value-type="float">
            <text:p>943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09143518518519" calcext:value-type="float">
            <text:p>0,00109143518518519000</text:p>
          </table:table-cell>
          <table:table-cell table:formula="of:=[.D207]-[.D20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6" office:value-type="float" office:value="9476" calcext:value-type="float">
            <text:p>947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09675925925926" calcext:value-type="float">
            <text:p>0,00109675925925926000</text:p>
          </table:table-cell>
          <table:table-cell table:formula="of:=[.D208]-[.D20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6" office:value-type="float" office:value="9522" calcext:value-type="float">
            <text:p>952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10208333333333" calcext:value-type="float">
            <text:p>0,00110208333333333000</text:p>
          </table:table-cell>
          <table:table-cell table:formula="of:=[.D209]-[.D20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6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10740740740741" calcext:value-type="float">
            <text:p>0,00110740740740741000</text:p>
          </table:table-cell>
          <table:table-cell table:formula="of:=[.D210]-[.D20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6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11273148148148" calcext:value-type="float">
            <text:p>0,00111273148148148000</text:p>
          </table:table-cell>
          <table:table-cell table:formula="of:=[.D211]-[.D21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6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11805555555556" calcext:value-type="float">
            <text:p>0,00111805555555556000</text:p>
          </table:table-cell>
          <table:table-cell table:formula="of:=[.D212]-[.D21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6" office:value-type="float" office:value="9706" calcext:value-type="float">
            <text:p>970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12337962962963" calcext:value-type="float">
            <text:p>0,00112337962962963000</text:p>
          </table:table-cell>
          <table:table-cell table:formula="of:=[.D213]-[.D21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6" office:value-type="float" office:value="9752" calcext:value-type="float">
            <text:p>975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1287037037037" calcext:value-type="float">
            <text:p>0,00112870370370370000</text:p>
          </table:table-cell>
          <table:table-cell table:formula="of:=[.D214]-[.D21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6" office:value-type="float" office:value="9798" calcext:value-type="float">
            <text:p>979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13402777777778" calcext:value-type="float">
            <text:p>0,00113402777777778000</text:p>
          </table:table-cell>
          <table:table-cell table:formula="of:=[.D215]-[.D21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6" office:value-type="float" office:value="9844" calcext:value-type="float">
            <text:p>984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13935185185185" calcext:value-type="float">
            <text:p>0,00113935185185185000</text:p>
          </table:table-cell>
          <table:table-cell table:formula="of:=[.D216]-[.D21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6" office:value-type="float" office:value="9890" calcext:value-type="float">
            <text:p>989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14467592592593" calcext:value-type="float">
            <text:p>0,00114467592592593000</text:p>
          </table:table-cell>
          <table:table-cell table:formula="of:=[.D217]-[.D21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6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15" calcext:value-type="float">
            <text:p>0,00115000000000000000</text:p>
          </table:table-cell>
          <table:table-cell table:formula="of:=[.D218]-[.D21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6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15532407407407" calcext:value-type="float">
            <text:p>0,00115532407407407000</text:p>
          </table:table-cell>
          <table:table-cell table:formula="of:=[.D219]-[.D21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6" office:value-type="float" office:value="10028" calcext:value-type="float">
            <text:p>1002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16064814814815" calcext:value-type="float">
            <text:p>0,00116064814814815000</text:p>
          </table:table-cell>
          <table:table-cell table:formula="of:=[.D220]-[.D21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6" office:value-type="float" office:value="10074" calcext:value-type="float">
            <text:p>1007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16597222222222" calcext:value-type="float">
            <text:p>0,00116597222222222000</text:p>
          </table:table-cell>
          <table:table-cell table:formula="of:=[.D221]-[.D22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6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1712962962963" calcext:value-type="float">
            <text:p>0,00117129629629630000</text:p>
          </table:table-cell>
          <table:table-cell table:formula="of:=[.D222]-[.D22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6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17662037037037" calcext:value-type="float">
            <text:p>0,00117662037037037000</text:p>
          </table:table-cell>
          <table:table-cell table:formula="of:=[.D223]-[.D22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6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18194444444444" calcext:value-type="float">
            <text:p>0,00118194444444444000</text:p>
          </table:table-cell>
          <table:table-cell table:formula="of:=[.D224]-[.D22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6" office:value-type="float" office:value="10258" calcext:value-type="float">
            <text:p>1025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18726851851852" calcext:value-type="float">
            <text:p>0,00118726851851852000</text:p>
          </table:table-cell>
          <table:table-cell table:formula="of:=[.D225]-[.D22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6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19259259259259" calcext:value-type="float">
            <text:p>0,00119259259259259000</text:p>
          </table:table-cell>
          <table:table-cell table:formula="of:=[.D226]-[.D22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6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19791666666667" calcext:value-type="float">
            <text:p>0,00119791666666667000</text:p>
          </table:table-cell>
          <table:table-cell table:formula="of:=[.D227]-[.D22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6" office:value-type="float" office:value="10396" calcext:value-type="float">
            <text:p>1039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20324074074074" calcext:value-type="float">
            <text:p>0,00120324074074074000</text:p>
          </table:table-cell>
          <table:table-cell table:formula="of:=[.D228]-[.D22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6" office:value-type="float" office:value="10442" calcext:value-type="float">
            <text:p>1044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20856481481481" calcext:value-type="float">
            <text:p>0,00120856481481481000</text:p>
          </table:table-cell>
          <table:table-cell table:formula="of:=[.D229]-[.D22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6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21388888888889" calcext:value-type="float">
            <text:p>0,00121388888888889000</text:p>
          </table:table-cell>
          <table:table-cell table:formula="of:=[.D230]-[.D22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6" office:value-type="float" office:value="10534" calcext:value-type="float">
            <text:p>1053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21921296296296" calcext:value-type="float">
            <text:p>0,00121921296296296000</text:p>
          </table:table-cell>
          <table:table-cell table:formula="of:=[.D231]-[.D23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6" office:value-type="float" office:value="10580" calcext:value-type="float">
            <text:p>105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22453703703704" calcext:value-type="float">
            <text:p>0,00122453703703704000</text:p>
          </table:table-cell>
          <table:table-cell table:formula="of:=[.D232]-[.D23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6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22986111111111" calcext:value-type="float">
            <text:p>0,00122986111111111000</text:p>
          </table:table-cell>
          <table:table-cell table:formula="of:=[.D233]-[.D23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6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23518518518519" calcext:value-type="float">
            <text:p>0,00123518518518519000</text:p>
          </table:table-cell>
          <table:table-cell table:formula="of:=[.D234]-[.D23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6" office:value-type="float" office:value="10718" calcext:value-type="float">
            <text:p>1071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24050925925926" calcext:value-type="float">
            <text:p>0,00124050925925926000</text:p>
          </table:table-cell>
          <table:table-cell table:formula="of:=[.D235]-[.D23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6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24583333333333" calcext:value-type="float">
            <text:p>0,00124583333333333000</text:p>
          </table:table-cell>
          <table:table-cell table:formula="of:=[.D236]-[.D23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6" office:value-type="float" office:value="10810" calcext:value-type="float">
            <text:p>1081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25115740740741" calcext:value-type="float">
            <text:p>0,00125115740740741000</text:p>
          </table:table-cell>
          <table:table-cell table:formula="of:=[.D237]-[.D23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6" office:value-type="float" office:value="10856" calcext:value-type="float">
            <text:p>1085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25648148148148" calcext:value-type="float">
            <text:p>0,00125648148148148000</text:p>
          </table:table-cell>
          <table:table-cell table:formula="of:=[.D238]-[.D23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6" office:value-type="float" office:value="10902" calcext:value-type="float">
            <text:p>1090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26180555555556" calcext:value-type="float">
            <text:p>0,00126180555555556000</text:p>
          </table:table-cell>
          <table:table-cell table:formula="of:=[.D239]-[.D23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6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26712962962963" calcext:value-type="float">
            <text:p>0,00126712962962963000</text:p>
          </table:table-cell>
          <table:table-cell table:formula="of:=[.D240]-[.D23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6" office:value-type="float" office:value="10994" calcext:value-type="float">
            <text:p>1099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2724537037037" calcext:value-type="float">
            <text:p>0,00127245370370370000</text:p>
          </table:table-cell>
          <table:table-cell table:formula="of:=[.D241]-[.D24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6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27777777777778" calcext:value-type="float">
            <text:p>0,00127777777777778000</text:p>
          </table:table-cell>
          <table:table-cell table:formula="of:=[.D242]-[.D24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6" office:value-type="float" office:value="11086" calcext:value-type="float">
            <text:p>1108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28310185185185" calcext:value-type="float">
            <text:p>0,00128310185185185000</text:p>
          </table:table-cell>
          <table:table-cell table:formula="of:=[.D243]-[.D24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6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28842592592593" calcext:value-type="float">
            <text:p>0,00128842592592593000</text:p>
          </table:table-cell>
          <table:table-cell table:formula="of:=[.D244]-[.D24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6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29375" calcext:value-type="float">
            <text:p>0,00129375000000000000</text:p>
          </table:table-cell>
          <table:table-cell table:formula="of:=[.D245]-[.D24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6" office:value-type="float" office:value="11224" calcext:value-type="float">
            <text:p>1122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29907407407407" calcext:value-type="float">
            <text:p>0,00129907407407407000</text:p>
          </table:table-cell>
          <table:table-cell table:formula="of:=[.D246]-[.D24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6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30439814814815" calcext:value-type="float">
            <text:p>0,00130439814814815000</text:p>
          </table:table-cell>
          <table:table-cell table:formula="of:=[.D247]-[.D24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6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30972222222222" calcext:value-type="float">
            <text:p>0,00130972222222222000</text:p>
          </table:table-cell>
          <table:table-cell table:formula="of:=[.D248]-[.D24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6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3150462962963" calcext:value-type="float">
            <text:p>0,00131504629629630000</text:p>
          </table:table-cell>
          <table:table-cell table:formula="of:=[.D249]-[.D24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6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32037037037037" calcext:value-type="float">
            <text:p>0,00132037037037037000</text:p>
          </table:table-cell>
          <table:table-cell table:formula="of:=[.D250]-[.D24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6" office:value-type="float" office:value="11454" calcext:value-type="float">
            <text:p>1145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32569444444444" calcext:value-type="float">
            <text:p>0,00132569444444444000</text:p>
          </table:table-cell>
          <table:table-cell table:formula="of:=[.D251]-[.D25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6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33101851851852" calcext:value-type="float">
            <text:p>0,00133101851851852000</text:p>
          </table:table-cell>
          <table:table-cell table:formula="of:=[.D252]-[.D25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6" office:value-type="float" office:value="11546" calcext:value-type="float">
            <text:p>1154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33634259259259" calcext:value-type="float">
            <text:p>0,00133634259259259000</text:p>
          </table:table-cell>
          <table:table-cell table:formula="of:=[.D253]-[.D25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6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34166666666667" calcext:value-type="float">
            <text:p>0,00134166666666667000</text:p>
          </table:table-cell>
          <table:table-cell table:formula="of:=[.D254]-[.D25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6" office:value-type="float" office:value="11638" calcext:value-type="float">
            <text:p>1163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34699074074074" calcext:value-type="float">
            <text:p>0,00134699074074074000</text:p>
          </table:table-cell>
          <table:table-cell table:formula="of:=[.D255]-[.D25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6" office:value-type="float" office:value="11684" calcext:value-type="float">
            <text:p>1168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35231481481481" calcext:value-type="float">
            <text:p>0,00135231481481481000</text:p>
          </table:table-cell>
          <table:table-cell table:formula="of:=[.D256]-[.D25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6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35763888888889" calcext:value-type="float">
            <text:p>0,00135763888888889000</text:p>
          </table:table-cell>
          <table:table-cell table:formula="of:=[.D257]-[.D25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6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36296296296296" calcext:value-type="float">
            <text:p>0,00136296296296296000</text:p>
          </table:table-cell>
          <table:table-cell table:formula="of:=[.D258]-[.D25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6" office:value-type="float" office:value="11822" calcext:value-type="float">
            <text:p>1182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36828703703704" calcext:value-type="float">
            <text:p>0,00136828703703704000</text:p>
          </table:table-cell>
          <table:table-cell table:formula="of:=[.D259]-[.D25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6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37361111111111" calcext:value-type="float">
            <text:p>0,00137361111111111000</text:p>
          </table:table-cell>
          <table:table-cell table:formula="of:=[.D260]-[.D25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6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37893518518519" calcext:value-type="float">
            <text:p>0,00137893518518519000</text:p>
          </table:table-cell>
          <table:table-cell table:formula="of:=[.D261]-[.D26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6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38425925925926" calcext:value-type="float">
            <text:p>0,00138425925925926000</text:p>
          </table:table-cell>
          <table:table-cell table:formula="of:=[.D262]-[.D26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6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38958333333333" calcext:value-type="float">
            <text:p>0,00138958333333333000</text:p>
          </table:table-cell>
          <table:table-cell table:formula="of:=[.D263]-[.D26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6" office:value-type="float" office:value="12052" calcext:value-type="float">
            <text:p>1205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39490740740741" calcext:value-type="float">
            <text:p>0,00139490740740741000</text:p>
          </table:table-cell>
          <table:table-cell table:formula="of:=[.D264]-[.D26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6" office:value-type="float" office:value="12098" calcext:value-type="float">
            <text:p>1209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40023148148148" calcext:value-type="float">
            <text:p>0,00140023148148148000</text:p>
          </table:table-cell>
          <table:table-cell table:formula="of:=[.D265]-[.D26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6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40555555555556" calcext:value-type="float">
            <text:p>0,00140555555555556000</text:p>
          </table:table-cell>
          <table:table-cell table:formula="of:=[.D266]-[.D26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6" office:value-type="float" office:value="12190" calcext:value-type="float">
            <text:p>1219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41087962962963" calcext:value-type="float">
            <text:p>0,00141087962962963000</text:p>
          </table:table-cell>
          <table:table-cell table:formula="of:=[.D267]-[.D26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6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4162037037037" calcext:value-type="float">
            <text:p>0,00141620370370370000</text:p>
          </table:table-cell>
          <table:table-cell table:formula="of:=[.D268]-[.D26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6" office:value-type="float" office:value="12282" calcext:value-type="float">
            <text:p>1228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42152777777778" calcext:value-type="float">
            <text:p>0,00142152777777778000</text:p>
          </table:table-cell>
          <table:table-cell table:formula="of:=[.D269]-[.D26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6" office:value-type="float" office:value="12328" calcext:value-type="float">
            <text:p>1232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42685185185185" calcext:value-type="float">
            <text:p>0,00142685185185185000</text:p>
          </table:table-cell>
          <table:table-cell table:formula="of:=[.D270]-[.D26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6" office:value-type="float" office:value="12374" calcext:value-type="float">
            <text:p>1237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43217592592593" calcext:value-type="float">
            <text:p>0,00143217592592593000</text:p>
          </table:table-cell>
          <table:table-cell table:formula="of:=[.D271]-[.D27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6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4375" calcext:value-type="float">
            <text:p>0,00143750000000000000</text:p>
          </table:table-cell>
          <table:table-cell table:formula="of:=[.D272]-[.D27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6" office:value-type="float" office:value="12466" calcext:value-type="float">
            <text:p>1246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44282407407407" calcext:value-type="float">
            <text:p>0,00144282407407407000</text:p>
          </table:table-cell>
          <table:table-cell table:formula="of:=[.D273]-[.D27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6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44814814814815" calcext:value-type="float">
            <text:p>0,00144814814814815000</text:p>
          </table:table-cell>
          <table:table-cell table:formula="of:=[.D274]-[.D27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6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45347222222222" calcext:value-type="float">
            <text:p>0,00145347222222222000</text:p>
          </table:table-cell>
          <table:table-cell table:formula="of:=[.D275]-[.D27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6" office:value-type="float" office:value="12604" calcext:value-type="float">
            <text:p>1260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4587962962963" calcext:value-type="float">
            <text:p>0,00145879629629630000</text:p>
          </table:table-cell>
          <table:table-cell table:formula="of:=[.D276]-[.D27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6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46412037037037" calcext:value-type="float">
            <text:p>0,00146412037037037000</text:p>
          </table:table-cell>
          <table:table-cell table:formula="of:=[.D277]-[.D27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6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46944444444444" calcext:value-type="float">
            <text:p>0,00146944444444444000</text:p>
          </table:table-cell>
          <table:table-cell table:formula="of:=[.D278]-[.D27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6" office:value-type="float" office:value="12742" calcext:value-type="float">
            <text:p>1274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47476851851852" calcext:value-type="float">
            <text:p>0,00147476851851852000</text:p>
          </table:table-cell>
          <table:table-cell table:formula="of:=[.D279]-[.D27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6" office:value-type="float" office:value="12788" calcext:value-type="float">
            <text:p>1278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48009259259259" calcext:value-type="float">
            <text:p>0,00148009259259259000</text:p>
          </table:table-cell>
          <table:table-cell table:formula="of:=[.D280]-[.D27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6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48541666666667" calcext:value-type="float">
            <text:p>0,00148541666666667000</text:p>
          </table:table-cell>
          <table:table-cell table:formula="of:=[.D281]-[.D28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6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49074074074074" calcext:value-type="float">
            <text:p>0,00149074074074074000</text:p>
          </table:table-cell>
          <table:table-cell table:formula="of:=[.D282]-[.D28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6" office:value-type="float" office:value="12926" calcext:value-type="float">
            <text:p>1292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49606481481481" calcext:value-type="float">
            <text:p>0,00149606481481481000</text:p>
          </table:table-cell>
          <table:table-cell table:formula="of:=[.D283]-[.D28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6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50138888888889" calcext:value-type="float">
            <text:p>0,00150138888888889000</text:p>
          </table:table-cell>
          <table:table-cell table:formula="of:=[.D284]-[.D28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6" office:value-type="float" office:value="13018" calcext:value-type="float">
            <text:p>1301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50671296296296" calcext:value-type="float">
            <text:p>0,00150671296296296000</text:p>
          </table:table-cell>
          <table:table-cell table:formula="of:=[.D285]-[.D28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6" office:value-type="float" office:value="13064" calcext:value-type="float">
            <text:p>1306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51203703703704" calcext:value-type="float">
            <text:p>0,00151203703703704000</text:p>
          </table:table-cell>
          <table:table-cell table:formula="of:=[.D286]-[.D28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6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51736111111111" calcext:value-type="float">
            <text:p>0,00151736111111111000</text:p>
          </table:table-cell>
          <table:table-cell table:formula="of:=[.D287]-[.D28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6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52268518518519" calcext:value-type="float">
            <text:p>0,00152268518518518000</text:p>
          </table:table-cell>
          <table:table-cell table:formula="of:=[.D288]-[.D28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6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52800925925926" calcext:value-type="float">
            <text:p>0,00152800925925926000</text:p>
          </table:table-cell>
          <table:table-cell table:formula="of:=[.D289]-[.D28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6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53333333333333" calcext:value-type="float">
            <text:p>0,00153333333333333000</text:p>
          </table:table-cell>
          <table:table-cell table:formula="of:=[.D290]-[.D28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6" office:value-type="float" office:value="13294" calcext:value-type="float">
            <text:p>1329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53865740740741" calcext:value-type="float">
            <text:p>0,00153865740740741000</text:p>
          </table:table-cell>
          <table:table-cell table:formula="of:=[.D291]-[.D29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6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54398148148148" calcext:value-type="float">
            <text:p>0,00154398148148148000</text:p>
          </table:table-cell>
          <table:table-cell table:formula="of:=[.D292]-[.D29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6" office:value-type="float" office:value="13386" calcext:value-type="float">
            <text:p>1338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54930555555556" calcext:value-type="float">
            <text:p>0,00154930555555556000</text:p>
          </table:table-cell>
          <table:table-cell table:formula="of:=[.D293]-[.D29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6" office:value-type="float" office:value="13432" calcext:value-type="float">
            <text:p>1343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55462962962963" calcext:value-type="float">
            <text:p>0,00155462962962963000</text:p>
          </table:table-cell>
          <table:table-cell table:formula="of:=[.D294]-[.D29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6" office:value-type="float" office:value="13478" calcext:value-type="float">
            <text:p>1347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5599537037037" calcext:value-type="float">
            <text:p>0,00155995370370370000</text:p>
          </table:table-cell>
          <table:table-cell table:formula="of:=[.D295]-[.D29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6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56527777777778" calcext:value-type="float">
            <text:p>0,00156527777777778000</text:p>
          </table:table-cell>
          <table:table-cell table:formula="of:=[.D296]-[.D29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6" office:value-type="float" office:value="13570" calcext:value-type="float">
            <text:p>1357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57060185185185" calcext:value-type="float">
            <text:p>0,00157060185185185000</text:p>
          </table:table-cell>
          <table:table-cell table:formula="of:=[.D297]-[.D29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6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57592592592593" calcext:value-type="float">
            <text:p>0,00157592592592593000</text:p>
          </table:table-cell>
          <table:table-cell table:formula="of:=[.D298]-[.D29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6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58125" calcext:value-type="float">
            <text:p>0,00158125000000000000</text:p>
          </table:table-cell>
          <table:table-cell table:formula="of:=[.D299]-[.D29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6" office:value-type="float" office:value="13708" calcext:value-type="float">
            <text:p>1370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58657407407407" calcext:value-type="float">
            <text:p>0,00158657407407407000</text:p>
          </table:table-cell>
          <table:table-cell table:formula="of:=[.D300]-[.D29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6" office:value-type="float" office:value="13754" calcext:value-type="float">
            <text:p>1375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59189814814815" calcext:value-type="float">
            <text:p>0,00159189814814815000</text:p>
          </table:table-cell>
          <table:table-cell table:formula="of:=[.D301]-[.D30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6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59722222222222" calcext:value-type="float">
            <text:p>0,00159722222222222000</text:p>
          </table:table-cell>
          <table:table-cell table:formula="of:=[.D302]-[.D30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6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6025462962963" calcext:value-type="float">
            <text:p>0,00160254629629630000</text:p>
          </table:table-cell>
          <table:table-cell table:formula="of:=[.D303]-[.D30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6" office:value-type="float" office:value="13892" calcext:value-type="float">
            <text:p>1389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60787037037037" calcext:value-type="float">
            <text:p>0,00160787037037037000</text:p>
          </table:table-cell>
          <table:table-cell table:formula="of:=[.D304]-[.D30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6" office:value-type="float" office:value="13938" calcext:value-type="float">
            <text:p>1393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61319444444444" calcext:value-type="float">
            <text:p>0,00161319444444444000</text:p>
          </table:table-cell>
          <table:table-cell table:formula="of:=[.D305]-[.D30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6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61851851851852" calcext:value-type="float">
            <text:p>0,00161851851851852000</text:p>
          </table:table-cell>
          <table:table-cell table:formula="of:=[.D306]-[.D30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6" office:value-type="float" office:value="14030" calcext:value-type="float">
            <text:p>1403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62384259259259" calcext:value-type="float">
            <text:p>0,00162384259259259000</text:p>
          </table:table-cell>
          <table:table-cell table:formula="of:=[.D307]-[.D30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6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62916666666667" calcext:value-type="float">
            <text:p>0,00162916666666667000</text:p>
          </table:table-cell>
          <table:table-cell table:formula="of:=[.D308]-[.D30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6" office:value-type="float" office:value="14122" calcext:value-type="float">
            <text:p>1412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63449074074074" calcext:value-type="float">
            <text:p>0,00163449074074074000</text:p>
          </table:table-cell>
          <table:table-cell table:formula="of:=[.D309]-[.D30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6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63981481481481" calcext:value-type="float">
            <text:p>0,00163981481481481000</text:p>
          </table:table-cell>
          <table:table-cell table:formula="of:=[.D310]-[.D30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6" office:value-type="float" office:value="14214" calcext:value-type="float">
            <text:p>1421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64513888888889" calcext:value-type="float">
            <text:p>0,00164513888888889000</text:p>
          </table:table-cell>
          <table:table-cell table:formula="of:=[.D311]-[.D31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6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65046296296296" calcext:value-type="float">
            <text:p>0,00165046296296296000</text:p>
          </table:table-cell>
          <table:table-cell table:formula="of:=[.D312]-[.D31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6" office:value-type="float" office:value="14306" calcext:value-type="float">
            <text:p>1430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65578703703704" calcext:value-type="float">
            <text:p>0,00165578703703704000</text:p>
          </table:table-cell>
          <table:table-cell table:formula="of:=[.D313]-[.D31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6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66111111111111" calcext:value-type="float">
            <text:p>0,00166111111111111000</text:p>
          </table:table-cell>
          <table:table-cell table:formula="of:=[.D314]-[.D31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6" office:value-type="float" office:value="14398" calcext:value-type="float">
            <text:p>1439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66643518518519" calcext:value-type="float">
            <text:p>0,00166643518518519000</text:p>
          </table:table-cell>
          <table:table-cell table:formula="of:=[.D315]-[.D31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6" office:value-type="float" office:value="14444" calcext:value-type="float">
            <text:p>1444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67175925925926" calcext:value-type="float">
            <text:p>0,00167175925925926000</text:p>
          </table:table-cell>
          <table:table-cell table:formula="of:=[.D316]-[.D31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6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67708333333333" calcext:value-type="float">
            <text:p>0,00167708333333333000</text:p>
          </table:table-cell>
          <table:table-cell table:formula="of:=[.D317]-[.D31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6" office:value-type="float" office:value="14536" calcext:value-type="float">
            <text:p>1453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68240740740741" calcext:value-type="float">
            <text:p>0,00168240740740741000</text:p>
          </table:table-cell>
          <table:table-cell table:formula="of:=[.D318]-[.D31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6" office:value-type="float" office:value="14582" calcext:value-type="float">
            <text:p>1458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68773148148148" calcext:value-type="float">
            <text:p>0,00168773148148148000</text:p>
          </table:table-cell>
          <table:table-cell table:formula="of:=[.D319]-[.D31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6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69305555555556" calcext:value-type="float">
            <text:p>0,00169305555555556000</text:p>
          </table:table-cell>
          <table:table-cell table:formula="of:=[.D320]-[.D31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6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69837962962963" calcext:value-type="float">
            <text:p>0,00169837962962963000</text:p>
          </table:table-cell>
          <table:table-cell table:formula="of:=[.D321]-[.D32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6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7037037037037" calcext:value-type="float">
            <text:p>0,00170370370370370000</text:p>
          </table:table-cell>
          <table:table-cell table:formula="of:=[.D322]-[.D32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6" office:value-type="float" office:value="14766" calcext:value-type="float">
            <text:p>1476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70902777777778" calcext:value-type="float">
            <text:p>0,00170902777777778000</text:p>
          </table:table-cell>
          <table:table-cell table:formula="of:=[.D323]-[.D32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6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71435185185185" calcext:value-type="float">
            <text:p>0,00171435185185185000</text:p>
          </table:table-cell>
          <table:table-cell table:formula="of:=[.D324]-[.D32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6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71967592592593" calcext:value-type="float">
            <text:p>0,00171967592592593000</text:p>
          </table:table-cell>
          <table:table-cell table:formula="of:=[.D325]-[.D32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6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725" calcext:value-type="float">
            <text:p>0,00172500000000000000</text:p>
          </table:table-cell>
          <table:table-cell table:formula="of:=[.D326]-[.D32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6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73032407407407" calcext:value-type="float">
            <text:p>0,00173032407407407000</text:p>
          </table:table-cell>
          <table:table-cell table:formula="of:=[.D327]-[.D32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6" office:value-type="float" office:value="14996" calcext:value-type="float">
            <text:p>1499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73564814814815" calcext:value-type="float">
            <text:p>0,00173564814814815000</text:p>
          </table:table-cell>
          <table:table-cell table:formula="of:=[.D328]-[.D32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6" office:value-type="float" office:value="15042" calcext:value-type="float">
            <text:p>1504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74097222222222" calcext:value-type="float">
            <text:p>0,00174097222222222000</text:p>
          </table:table-cell>
          <table:table-cell table:formula="of:=[.D329]-[.D32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6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7462962962963" calcext:value-type="float">
            <text:p>0,00174629629629630000</text:p>
          </table:table-cell>
          <table:table-cell table:formula="of:=[.D330]-[.D32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6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75162037037037" calcext:value-type="float">
            <text:p>0,00175162037037037000</text:p>
          </table:table-cell>
          <table:table-cell table:formula="of:=[.D331]-[.D33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6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75694444444444" calcext:value-type="float">
            <text:p>0,00175694444444444000</text:p>
          </table:table-cell>
          <table:table-cell table:formula="of:=[.D332]-[.D33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6" office:value-type="float" office:value="15226" calcext:value-type="float">
            <text:p>1522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76226851851852" calcext:value-type="float">
            <text:p>0,00176226851851852000</text:p>
          </table:table-cell>
          <table:table-cell table:formula="of:=[.D333]-[.D33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6" office:value-type="float" office:value="15272" calcext:value-type="float">
            <text:p>1527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76759259259259" calcext:value-type="float">
            <text:p>0,00176759259259259000</text:p>
          </table:table-cell>
          <table:table-cell table:formula="of:=[.D334]-[.D33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6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77291666666667" calcext:value-type="float">
            <text:p>0,00177291666666667000</text:p>
          </table:table-cell>
          <table:table-cell table:formula="of:=[.D335]-[.D33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6" office:value-type="float" office:value="15364" calcext:value-type="float">
            <text:p>1536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77824074074074" calcext:value-type="float">
            <text:p>0,00177824074074074000</text:p>
          </table:table-cell>
          <table:table-cell table:formula="of:=[.D336]-[.D33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6" office:value-type="float" office:value="15410" calcext:value-type="float">
            <text:p>1541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78356481481481" calcext:value-type="float">
            <text:p>0,00178356481481481000</text:p>
          </table:table-cell>
          <table:table-cell table:formula="of:=[.D337]-[.D33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6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78888888888889" calcext:value-type="float">
            <text:p>0,00178888888888889000</text:p>
          </table:table-cell>
          <table:table-cell table:formula="of:=[.D338]-[.D33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6" office:value-type="float" office:value="15502" calcext:value-type="float">
            <text:p>1550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79421296296296" calcext:value-type="float">
            <text:p>0,00179421296296296000</text:p>
          </table:table-cell>
          <table:table-cell table:formula="of:=[.D339]-[.D33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6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79953703703704" calcext:value-type="float">
            <text:p>0,00179953703703704000</text:p>
          </table:table-cell>
          <table:table-cell table:formula="of:=[.D340]-[.D33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6" office:value-type="float" office:value="15594" calcext:value-type="float">
            <text:p>1559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80486111111111" calcext:value-type="float">
            <text:p>0,00180486111111111000</text:p>
          </table:table-cell>
          <table:table-cell table:formula="of:=[.D341]-[.D34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6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81018518518519" calcext:value-type="float">
            <text:p>0,00181018518518519000</text:p>
          </table:table-cell>
          <table:table-cell table:formula="of:=[.D342]-[.D34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6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81550925925926" calcext:value-type="float">
            <text:p>0,00181550925925926000</text:p>
          </table:table-cell>
          <table:table-cell table:formula="of:=[.D343]-[.D34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6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82083333333333" calcext:value-type="float">
            <text:p>0,00182083333333333000</text:p>
          </table:table-cell>
          <table:table-cell table:formula="of:=[.D344]-[.D34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6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82615740740741" calcext:value-type="float">
            <text:p>0,00182615740740741000</text:p>
          </table:table-cell>
          <table:table-cell table:formula="of:=[.D345]-[.D34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6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83148148148148" calcext:value-type="float">
            <text:p>0,00183148148148148000</text:p>
          </table:table-cell>
          <table:table-cell table:formula="of:=[.D346]-[.D34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6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83680555555556" calcext:value-type="float">
            <text:p>0,00183680555555556000</text:p>
          </table:table-cell>
          <table:table-cell table:formula="of:=[.D347]-[.D34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6" office:value-type="float" office:value="15916" calcext:value-type="float">
            <text:p>1591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84212962962963" calcext:value-type="float">
            <text:p>0,00184212962962963000</text:p>
          </table:table-cell>
          <table:table-cell table:formula="of:=[.D348]-[.D34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6" office:value-type="float" office:value="15962" calcext:value-type="float">
            <text:p>1596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8474537037037" calcext:value-type="float">
            <text:p>0,00184745370370370000</text:p>
          </table:table-cell>
          <table:table-cell table:formula="of:=[.D349]-[.D34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6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85277777777778" calcext:value-type="float">
            <text:p>0,00185277777777778000</text:p>
          </table:table-cell>
          <table:table-cell table:formula="of:=[.D350]-[.D34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6" office:value-type="float" office:value="16054" calcext:value-type="float">
            <text:p>1605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85810185185185" calcext:value-type="float">
            <text:p>0,00185810185185185000</text:p>
          </table:table-cell>
          <table:table-cell table:formula="of:=[.D351]-[.D35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6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86342592592593" calcext:value-type="float">
            <text:p>0,00186342592592593000</text:p>
          </table:table-cell>
          <table:table-cell table:formula="of:=[.D352]-[.D351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6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86875" calcext:value-type="float">
            <text:p>0,00186875000000000000</text:p>
          </table:table-cell>
          <table:table-cell table:formula="of:=[.D353]-[.D35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6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87407407407407" calcext:value-type="float">
            <text:p>0,00187407407407407000</text:p>
          </table:table-cell>
          <table:table-cell table:formula="of:=[.D354]-[.D35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6" office:value-type="float" office:value="16238" calcext:value-type="float">
            <text:p>1623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87939814814815" calcext:value-type="float">
            <text:p>0,00187939814814815000</text:p>
          </table:table-cell>
          <table:table-cell table:formula="of:=[.D355]-[.D35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6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88472222222222" calcext:value-type="float">
            <text:p>0,00188472222222222000</text:p>
          </table:table-cell>
          <table:table-cell table:formula="of:=[.D356]-[.D35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6" office:value-type="float" office:value="16330" calcext:value-type="float">
            <text:p>1633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8900462962963" calcext:value-type="float">
            <text:p>0,00189004629629630000</text:p>
          </table:table-cell>
          <table:table-cell table:formula="of:=[.D357]-[.D35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6" office:value-type="float" office:value="16376" calcext:value-type="float">
            <text:p>1637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89537037037037" calcext:value-type="float">
            <text:p>0,00189537037037037000</text:p>
          </table:table-cell>
          <table:table-cell table:formula="of:=[.D358]-[.D357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6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90069444444444" calcext:value-type="float">
            <text:p>0,00190069444444444000</text:p>
          </table:table-cell>
          <table:table-cell table:formula="of:=[.D359]-[.D358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6" office:value-type="float" office:value="16468" calcext:value-type="float">
            <text:p>1646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90601851851852" calcext:value-type="float">
            <text:p>0,00190601851851852000</text:p>
          </table:table-cell>
          <table:table-cell table:formula="of:=[.D360]-[.D359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6" office:value-type="float" office:value="16514" calcext:value-type="float">
            <text:p>1651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91134259259259" calcext:value-type="float">
            <text:p>0,00191134259259259000</text:p>
          </table:table-cell>
          <table:table-cell table:formula="of:=[.D361]-[.D360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6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91666666666667" calcext:value-type="float">
            <text:p>0,00191666666666667000</text:p>
          </table:table-cell>
          <table:table-cell table:formula="of:=[.D362]-[.D36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6" office:value-type="float" office:value="16606" calcext:value-type="float">
            <text:p>1660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92199074074074" calcext:value-type="float">
            <text:p>0,00192199074074074000</text:p>
          </table:table-cell>
          <table:table-cell table:formula="of:=[.D363]-[.D362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6" office:value-type="float" office:value="16652" calcext:value-type="float">
            <text:p>1665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92731481481481" calcext:value-type="float">
            <text:p>0,00192731481481481000</text:p>
          </table:table-cell>
          <table:table-cell table:formula="of:=[.D364]-[.D363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6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93263888888889" calcext:value-type="float">
            <text:p>0,00193263888888889000</text:p>
          </table:table-cell>
          <table:table-cell table:formula="of:=[.D365]-[.D364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6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93796296296296" calcext:value-type="float">
            <text:p>0,00193796296296296000</text:p>
          </table:table-cell>
          <table:table-cell table:formula="of:=[.D366]-[.D365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6" office:value-type="float" office:value="16790" calcext:value-type="float">
            <text:p>1679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94328703703704" calcext:value-type="float">
            <text:p>0,00194328703703704000</text:p>
          </table:table-cell>
          <table:table-cell table:formula="of:=[.D367]-[.D366]" office:value-type="float" office:value="0.00000532407407407404" calcext:value-type="float">
            <text:p>0,000005324074074074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6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94861111111111" calcext:value-type="float">
            <text:p>0,00194861111111111000</text:p>
          </table:table-cell>
          <table:table-cell table:formula="of:=[.D368]-[.D36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6" office:value-type="float" office:value="16882" calcext:value-type="float">
            <text:p>16882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95393518518519" calcext:value-type="float">
            <text:p>0,00195393518518519000</text:p>
          </table:table-cell>
          <table:table-cell table:formula="of:=[.D369]-[.D36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6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95925925925926" calcext:value-type="float">
            <text:p>0,00195925925925926000</text:p>
          </table:table-cell>
          <table:table-cell table:formula="of:=[.D370]-[.D36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6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96458333333333" calcext:value-type="float">
            <text:p>0,00196458333333333000</text:p>
          </table:table-cell>
          <table:table-cell table:formula="of:=[.D371]-[.D37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6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96990740740741" calcext:value-type="float">
            <text:p>0,00196990740740741000</text:p>
          </table:table-cell>
          <table:table-cell table:formula="of:=[.D372]-[.D37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6" office:value-type="float" office:value="17066" calcext:value-type="float">
            <text:p>17066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97523148148148" calcext:value-type="float">
            <text:p>0,00197523148148148000</text:p>
          </table:table-cell>
          <table:table-cell table:formula="of:=[.D373]-[.D37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6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98055555555556" calcext:value-type="float">
            <text:p>0,00198055555555556000</text:p>
          </table:table-cell>
          <table:table-cell table:formula="of:=[.D374]-[.D37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6" office:value-type="float" office:value="17158" calcext:value-type="float">
            <text:p>17158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98587962962963" calcext:value-type="float">
            <text:p>0,00198587962962963000</text:p>
          </table:table-cell>
          <table:table-cell table:formula="of:=[.D375]-[.D37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6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9912037037037" calcext:value-type="float">
            <text:p>0,00199120370370370000</text:p>
          </table:table-cell>
          <table:table-cell table:formula="of:=[.D376]-[.D375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6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99652777777778" calcext:value-type="float">
            <text:p>0,00199652777777778000</text:p>
          </table:table-cell>
          <table:table-cell table:formula="of:=[.D377]-[.D37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6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00185185185185" calcext:value-type="float">
            <text:p>0,00200185185185185000</text:p>
          </table:table-cell>
          <table:table-cell table:formula="of:=[.D378]-[.D37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6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00717592592593" calcext:value-type="float">
            <text:p>0,00200717592592593000</text:p>
          </table:table-cell>
          <table:table-cell table:formula="of:=[.D379]-[.D37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6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0125" calcext:value-type="float">
            <text:p>0,00201250000000000000</text:p>
          </table:table-cell>
          <table:table-cell table:formula="of:=[.D380]-[.D37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6" office:value-type="float" office:value="17434" calcext:value-type="float">
            <text:p>17434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01782407407407" calcext:value-type="float">
            <text:p>0,00201782407407407000</text:p>
          </table:table-cell>
          <table:table-cell table:formula="of:=[.D381]-[.D38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6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02314814814815" calcext:value-type="float">
            <text:p>0,00202314814814815000</text:p>
          </table:table-cell>
          <table:table-cell table:formula="of:=[.D382]-[.D38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6" office:value-type="float" office:value="17526" calcext:value-type="float">
            <text:p>17526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02847222222222" calcext:value-type="float">
            <text:p>0,00202847222222222000</text:p>
          </table:table-cell>
          <table:table-cell table:formula="of:=[.D383]-[.D38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6" office:value-type="float" office:value="17572" calcext:value-type="float">
            <text:p>1757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0337962962963" calcext:value-type="float">
            <text:p>0,00203379629629630000</text:p>
          </table:table-cell>
          <table:table-cell table:formula="of:=[.D384]-[.D38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6" office:value-type="float" office:value="17618" calcext:value-type="float">
            <text:p>17618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03912037037037" calcext:value-type="float">
            <text:p>0,00203912037037037000</text:p>
          </table:table-cell>
          <table:table-cell table:formula="of:=[.D385]-[.D38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6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04444444444444" calcext:value-type="float">
            <text:p>0,00204444444444444000</text:p>
          </table:table-cell>
          <table:table-cell table:formula="of:=[.D386]-[.D385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6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04976851851852" calcext:value-type="float">
            <text:p>0,00204976851851852000</text:p>
          </table:table-cell>
          <table:table-cell table:formula="of:=[.D387]-[.D38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6" office:value-type="float" office:value="17756" calcext:value-type="float">
            <text:p>1775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05509259259259" calcext:value-type="float">
            <text:p>0,00205509259259259000</text:p>
          </table:table-cell>
          <table:table-cell table:formula="of:=[.D388]-[.D38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6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06041666666667" calcext:value-type="float">
            <text:p>0,00206041666666667000</text:p>
          </table:table-cell>
          <table:table-cell table:formula="of:=[.D389]-[.D38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6" office:value-type="float" office:value="17848" calcext:value-type="float">
            <text:p>1784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06574074074074" calcext:value-type="float">
            <text:p>0,00206574074074074000</text:p>
          </table:table-cell>
          <table:table-cell table:formula="of:=[.D390]-[.D38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6" office:value-type="float" office:value="17894" calcext:value-type="float">
            <text:p>17894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07106481481481" calcext:value-type="float">
            <text:p>0,00207106481481481000</text:p>
          </table:table-cell>
          <table:table-cell table:formula="of:=[.D391]-[.D39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6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07638888888889" calcext:value-type="float">
            <text:p>0,00207638888888889000</text:p>
          </table:table-cell>
          <table:table-cell table:formula="of:=[.D392]-[.D39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6" office:value-type="float" office:value="17986" calcext:value-type="float">
            <text:p>17986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08171296296296" calcext:value-type="float">
            <text:p>0,00208171296296296000</text:p>
          </table:table-cell>
          <table:table-cell table:formula="of:=[.D393]-[.D39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6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08703703703704" calcext:value-type="float">
            <text:p>0,00208703703703704000</text:p>
          </table:table-cell>
          <table:table-cell table:formula="of:=[.D394]-[.D39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6" office:value-type="float" office:value="18078" calcext:value-type="float">
            <text:p>18078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09236111111111" calcext:value-type="float">
            <text:p>0,00209236111111111000</text:p>
          </table:table-cell>
          <table:table-cell table:formula="of:=[.D395]-[.D39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6" office:value-type="float" office:value="18124" calcext:value-type="float">
            <text:p>1812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09768518518519" calcext:value-type="float">
            <text:p>0,00209768518518519000</text:p>
          </table:table-cell>
          <table:table-cell table:formula="of:=[.D396]-[.D39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6" office:value-type="float" office:value="18170" calcext:value-type="float">
            <text:p>1817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10300925925926" calcext:value-type="float">
            <text:p>0,00210300925925926000</text:p>
          </table:table-cell>
          <table:table-cell table:formula="of:=[.D397]-[.D39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6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10833333333333" calcext:value-type="float">
            <text:p>0,00210833333333333000</text:p>
          </table:table-cell>
          <table:table-cell table:formula="of:=[.D398]-[.D39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6" office:value-type="float" office:value="18262" calcext:value-type="float">
            <text:p>18262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11365740740741" calcext:value-type="float">
            <text:p>0,00211365740740741000</text:p>
          </table:table-cell>
          <table:table-cell table:formula="of:=[.D399]-[.D39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6" office:value-type="float" office:value="18308" calcext:value-type="float">
            <text:p>1830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11898148148148" calcext:value-type="float">
            <text:p>0,00211898148148148000</text:p>
          </table:table-cell>
          <table:table-cell table:formula="of:=[.D400]-[.D39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6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12430555555556" calcext:value-type="float">
            <text:p>0,00212430555555556000</text:p>
          </table:table-cell>
          <table:table-cell table:formula="of:=[.D401]-[.D40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6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12962962962963" calcext:value-type="float">
            <text:p>0,00212962962962963000</text:p>
          </table:table-cell>
          <table:table-cell table:formula="of:=[.D402]-[.D40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6" office:value-type="float" office:value="18446" calcext:value-type="float">
            <text:p>18446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1349537037037" calcext:value-type="float">
            <text:p>0,00213495370370370000</text:p>
          </table:table-cell>
          <table:table-cell table:formula="of:=[.D403]-[.D40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6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14027777777778" calcext:value-type="float">
            <text:p>0,00214027777777778000</text:p>
          </table:table-cell>
          <table:table-cell table:formula="of:=[.D404]-[.D40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6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14560185185185" calcext:value-type="float">
            <text:p>0,00214560185185185000</text:p>
          </table:table-cell>
          <table:table-cell table:formula="of:=[.D405]-[.D40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6" office:value-type="float" office:value="18584" calcext:value-type="float">
            <text:p>1858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15092592592593" calcext:value-type="float">
            <text:p>0,00215092592592593000</text:p>
          </table:table-cell>
          <table:table-cell table:formula="of:=[.D406]-[.D40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6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15625" calcext:value-type="float">
            <text:p>0,00215625000000000000</text:p>
          </table:table-cell>
          <table:table-cell table:formula="of:=[.D407]-[.D40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6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16157407407407" calcext:value-type="float">
            <text:p>0,00216157407407407000</text:p>
          </table:table-cell>
          <table:table-cell table:formula="of:=[.D408]-[.D40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6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16689814814815" calcext:value-type="float">
            <text:p>0,00216689814814815000</text:p>
          </table:table-cell>
          <table:table-cell table:formula="of:=[.D409]-[.D40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6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17222222222222" calcext:value-type="float">
            <text:p>0,00217222222222222000</text:p>
          </table:table-cell>
          <table:table-cell table:formula="of:=[.D410]-[.D40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6" office:value-type="float" office:value="18814" calcext:value-type="float">
            <text:p>18814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1775462962963" calcext:value-type="float">
            <text:p>0,00217754629629630000</text:p>
          </table:table-cell>
          <table:table-cell table:formula="of:=[.D411]-[.D41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6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18287037037037" calcext:value-type="float">
            <text:p>0,00218287037037037000</text:p>
          </table:table-cell>
          <table:table-cell table:formula="of:=[.D412]-[.D41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6" office:value-type="float" office:value="18906" calcext:value-type="float">
            <text:p>18906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18819444444444" calcext:value-type="float">
            <text:p>0,00218819444444444000</text:p>
          </table:table-cell>
          <table:table-cell table:formula="of:=[.D413]-[.D41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6" office:value-type="float" office:value="18952" calcext:value-type="float">
            <text:p>1895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19351851851852" calcext:value-type="float">
            <text:p>0,00219351851851852000</text:p>
          </table:table-cell>
          <table:table-cell table:formula="of:=[.D414]-[.D41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6" office:value-type="float" office:value="18998" calcext:value-type="float">
            <text:p>18998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19884259259259" calcext:value-type="float">
            <text:p>0,00219884259259259000</text:p>
          </table:table-cell>
          <table:table-cell table:formula="of:=[.D415]-[.D41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6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20416666666667" calcext:value-type="float">
            <text:p>0,00220416666666667000</text:p>
          </table:table-cell>
          <table:table-cell table:formula="of:=[.D416]-[.D415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6" office:value-type="float" office:value="19090" calcext:value-type="float">
            <text:p>1909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20949074074074" calcext:value-type="float">
            <text:p>0,00220949074074074000</text:p>
          </table:table-cell>
          <table:table-cell table:formula="of:=[.D417]-[.D41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6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21481481481482" calcext:value-type="float">
            <text:p>0,00221481481481482000</text:p>
          </table:table-cell>
          <table:table-cell table:formula="of:=[.D418]-[.D41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6" office:value-type="float" office:value="19182" calcext:value-type="float">
            <text:p>19182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22013888888889" calcext:value-type="float">
            <text:p>0,00222013888888889000</text:p>
          </table:table-cell>
          <table:table-cell table:formula="of:=[.D419]-[.D41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6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22546296296296" calcext:value-type="float">
            <text:p>0,00222546296296296000</text:p>
          </table:table-cell>
          <table:table-cell table:formula="of:=[.D420]-[.D41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6" office:value-type="float" office:value="19274" calcext:value-type="float">
            <text:p>19274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23078703703704" calcext:value-type="float">
            <text:p>0,00223078703703704000</text:p>
          </table:table-cell>
          <table:table-cell table:formula="of:=[.D421]-[.D42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6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23611111111111" calcext:value-type="float">
            <text:p>0,00223611111111111000</text:p>
          </table:table-cell>
          <table:table-cell table:formula="of:=[.D422]-[.D42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6" office:value-type="float" office:value="19366" calcext:value-type="float">
            <text:p>19366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24143518518519" calcext:value-type="float">
            <text:p>0,00224143518518519000</text:p>
          </table:table-cell>
          <table:table-cell table:formula="of:=[.D423]-[.D42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6" office:value-type="float" office:value="19412" calcext:value-type="float">
            <text:p>1941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24675925925926" calcext:value-type="float">
            <text:p>0,00224675925925926000</text:p>
          </table:table-cell>
          <table:table-cell table:formula="of:=[.D424]-[.D42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6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25208333333333" calcext:value-type="float">
            <text:p>0,00225208333333333000</text:p>
          </table:table-cell>
          <table:table-cell table:formula="of:=[.D425]-[.D42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6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25740740740741" calcext:value-type="float">
            <text:p>0,00225740740740741000</text:p>
          </table:table-cell>
          <table:table-cell table:formula="of:=[.D426]-[.D42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6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26273148148148" calcext:value-type="float">
            <text:p>0,00226273148148148000</text:p>
          </table:table-cell>
          <table:table-cell table:formula="of:=[.D427]-[.D42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6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26805555555556" calcext:value-type="float">
            <text:p>0,00226805555555556000</text:p>
          </table:table-cell>
          <table:table-cell table:formula="of:=[.D428]-[.D42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6" office:value-type="float" office:value="19642" calcext:value-type="float">
            <text:p>19642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27337962962963" calcext:value-type="float">
            <text:p>0,00227337962962963000</text:p>
          </table:table-cell>
          <table:table-cell table:formula="of:=[.D429]-[.D42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6" office:value-type="float" office:value="19688" calcext:value-type="float">
            <text:p>1968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2787037037037" calcext:value-type="float">
            <text:p>0,00227870370370370000</text:p>
          </table:table-cell>
          <table:table-cell table:formula="of:=[.D430]-[.D42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6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28402777777778" calcext:value-type="float">
            <text:p>0,00228402777777778000</text:p>
          </table:table-cell>
          <table:table-cell table:formula="of:=[.D431]-[.D43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6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28935185185185" calcext:value-type="float">
            <text:p>0,00228935185185185000</text:p>
          </table:table-cell>
          <table:table-cell table:formula="of:=[.D432]-[.D43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6" office:value-type="float" office:value="19826" calcext:value-type="float">
            <text:p>19826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29467592592593" calcext:value-type="float">
            <text:p>0,00229467592592593000</text:p>
          </table:table-cell>
          <table:table-cell table:formula="of:=[.D433]-[.D43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6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3" calcext:value-type="float">
            <text:p>0,00230000000000000000</text:p>
          </table:table-cell>
          <table:table-cell table:formula="of:=[.D434]-[.D43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6" office:value-type="float" office:value="19918" calcext:value-type="float">
            <text:p>19918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30532407407407" calcext:value-type="float">
            <text:p>0,00230532407407407000</text:p>
          </table:table-cell>
          <table:table-cell table:formula="of:=[.D435]-[.D43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6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31064814814815" calcext:value-type="float">
            <text:p>0,00231064814814815000</text:p>
          </table:table-cell>
          <table:table-cell table:formula="of:=[.D436]-[.D43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6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31597222222222" calcext:value-type="float">
            <text:p>0,00231597222222222000</text:p>
          </table:table-cell>
          <table:table-cell table:formula="of:=[.D437]-[.D43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6" office:value-type="float" office:value="20056" calcext:value-type="float">
            <text:p>2005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3212962962963" calcext:value-type="float">
            <text:p>0,00232129629629630000</text:p>
          </table:table-cell>
          <table:table-cell table:formula="of:=[.D438]-[.D43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6" office:value-type="float" office:value="20102" calcext:value-type="float">
            <text:p>20102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32662037037037" calcext:value-type="float">
            <text:p>0,00232662037037037000</text:p>
          </table:table-cell>
          <table:table-cell table:formula="of:=[.D439]-[.D43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6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33194444444444" calcext:value-type="float">
            <text:p>0,00233194444444444000</text:p>
          </table:table-cell>
          <table:table-cell table:formula="of:=[.D440]-[.D43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6" office:value-type="float" office:value="20194" calcext:value-type="float">
            <text:p>20194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33726851851852" calcext:value-type="float">
            <text:p>0,00233726851851852000</text:p>
          </table:table-cell>
          <table:table-cell table:formula="of:=[.D441]-[.D44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6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34259259259259" calcext:value-type="float">
            <text:p>0,00234259259259259000</text:p>
          </table:table-cell>
          <table:table-cell table:formula="of:=[.D442]-[.D44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6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34791666666667" calcext:value-type="float">
            <text:p>0,00234791666666667000</text:p>
          </table:table-cell>
          <table:table-cell table:formula="of:=[.D443]-[.D44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6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35324074074074" calcext:value-type="float">
            <text:p>0,00235324074074074000</text:p>
          </table:table-cell>
          <table:table-cell table:formula="of:=[.D444]-[.D44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6" office:value-type="float" office:value="20378" calcext:value-type="float">
            <text:p>20378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35856481481481" calcext:value-type="float">
            <text:p>0,00235856481481481000</text:p>
          </table:table-cell>
          <table:table-cell table:formula="of:=[.D445]-[.D44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6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36388888888889" calcext:value-type="float">
            <text:p>0,00236388888888889000</text:p>
          </table:table-cell>
          <table:table-cell table:formula="of:=[.D446]-[.D44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6" office:value-type="float" office:value="20470" calcext:value-type="float">
            <text:p>2047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36921296296296" calcext:value-type="float">
            <text:p>0,00236921296296296000</text:p>
          </table:table-cell>
          <table:table-cell table:formula="of:=[.D447]-[.D44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6" office:value-type="float" office:value="20516" calcext:value-type="float">
            <text:p>2051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37453703703704" calcext:value-type="float">
            <text:p>0,00237453703703704000</text:p>
          </table:table-cell>
          <table:table-cell table:formula="of:=[.D448]-[.D44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6" office:value-type="float" office:value="20562" calcext:value-type="float">
            <text:p>20562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37986111111111" calcext:value-type="float">
            <text:p>0,00237986111111111000</text:p>
          </table:table-cell>
          <table:table-cell table:formula="of:=[.D449]-[.D44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6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38518518518519" calcext:value-type="float">
            <text:p>0,00238518518518519000</text:p>
          </table:table-cell>
          <table:table-cell table:formula="of:=[.D450]-[.D44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6" office:value-type="float" office:value="20654" calcext:value-type="float">
            <text:p>20654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39050925925926" calcext:value-type="float">
            <text:p>0,00239050925925926000</text:p>
          </table:table-cell>
          <table:table-cell table:formula="of:=[.D451]-[.D45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6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39583333333333" calcext:value-type="float">
            <text:p>0,00239583333333333000</text:p>
          </table:table-cell>
          <table:table-cell table:formula="of:=[.D452]-[.D45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6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40115740740741" calcext:value-type="float">
            <text:p>0,00240115740740741000</text:p>
          </table:table-cell>
          <table:table-cell table:formula="of:=[.D453]-[.D45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6" office:value-type="float" office:value="20792" calcext:value-type="float">
            <text:p>2079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40648148148148" calcext:value-type="float">
            <text:p>0,00240648148148148000</text:p>
          </table:table-cell>
          <table:table-cell table:formula="of:=[.D454]-[.D45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6" office:value-type="float" office:value="20838" calcext:value-type="float">
            <text:p>20838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41180555555556" calcext:value-type="float">
            <text:p>0,00241180555555556000</text:p>
          </table:table-cell>
          <table:table-cell table:formula="of:=[.D455]-[.D45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6" office:value-type="float" office:value="20884" calcext:value-type="float">
            <text:p>2088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41712962962963" calcext:value-type="float">
            <text:p>0,00241712962962963000</text:p>
          </table:table-cell>
          <table:table-cell table:formula="of:=[.D456]-[.D455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6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4224537037037" calcext:value-type="float">
            <text:p>0,00242245370370370000</text:p>
          </table:table-cell>
          <table:table-cell table:formula="of:=[.D457]-[.D45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6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42777777777778" calcext:value-type="float">
            <text:p>0,00242777777777778000</text:p>
          </table:table-cell>
          <table:table-cell table:formula="of:=[.D458]-[.D45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6" office:value-type="float" office:value="21022" calcext:value-type="float">
            <text:p>21022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43310185185185" calcext:value-type="float">
            <text:p>0,00243310185185185000</text:p>
          </table:table-cell>
          <table:table-cell table:formula="of:=[.D459]-[.D45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6" office:value-type="float" office:value="21068" calcext:value-type="float">
            <text:p>2106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43842592592593" calcext:value-type="float">
            <text:p>0,00243842592592593000</text:p>
          </table:table-cell>
          <table:table-cell table:formula="of:=[.D460]-[.D45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6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44375" calcext:value-type="float">
            <text:p>0,00244375000000000000</text:p>
          </table:table-cell>
          <table:table-cell table:formula="of:=[.D461]-[.D46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6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44907407407407" calcext:value-type="float">
            <text:p>0,00244907407407407000</text:p>
          </table:table-cell>
          <table:table-cell table:formula="of:=[.D462]-[.D46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6" office:value-type="float" office:value="21206" calcext:value-type="float">
            <text:p>21206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45439814814815" calcext:value-type="float">
            <text:p>0,00245439814814815000</text:p>
          </table:table-cell>
          <table:table-cell table:formula="of:=[.D463]-[.D46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6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45972222222222" calcext:value-type="float">
            <text:p>0,00245972222222222000</text:p>
          </table:table-cell>
          <table:table-cell table:formula="of:=[.D464]-[.D46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6" office:value-type="float" office:value="21298" calcext:value-type="float">
            <text:p>21298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4650462962963" calcext:value-type="float">
            <text:p>0,00246504629629630000</text:p>
          </table:table-cell>
          <table:table-cell table:formula="of:=[.D465]-[.D46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6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47037037037037" calcext:value-type="float">
            <text:p>0,00247037037037037000</text:p>
          </table:table-cell>
          <table:table-cell table:formula="of:=[.D466]-[.D46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6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47569444444444" calcext:value-type="float">
            <text:p>0,00247569444444444000</text:p>
          </table:table-cell>
          <table:table-cell table:formula="of:=[.D467]-[.D46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6" office:value-type="float" office:value="21436" calcext:value-type="float">
            <text:p>2143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48101851851852" calcext:value-type="float">
            <text:p>0,00248101851851852000</text:p>
          </table:table-cell>
          <table:table-cell table:formula="of:=[.D468]-[.D46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6" office:value-type="float" office:value="21482" calcext:value-type="float">
            <text:p>21482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48634259259259" calcext:value-type="float">
            <text:p>0,00248634259259259000</text:p>
          </table:table-cell>
          <table:table-cell table:formula="of:=[.D469]-[.D46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6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49166666666667" calcext:value-type="float">
            <text:p>0,00249166666666667000</text:p>
          </table:table-cell>
          <table:table-cell table:formula="of:=[.D470]-[.D46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6" office:value-type="float" office:value="21574" calcext:value-type="float">
            <text:p>21574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49699074074074" calcext:value-type="float">
            <text:p>0,00249699074074074000</text:p>
          </table:table-cell>
          <table:table-cell table:formula="of:=[.D471]-[.D47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6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50231481481482" calcext:value-type="float">
            <text:p>0,00250231481481482000</text:p>
          </table:table-cell>
          <table:table-cell table:formula="of:=[.D472]-[.D47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6" office:value-type="float" office:value="21666" calcext:value-type="float">
            <text:p>21666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50763888888889" calcext:value-type="float">
            <text:p>0,00250763888888889000</text:p>
          </table:table-cell>
          <table:table-cell table:formula="of:=[.D473]-[.D47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6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51296296296296" calcext:value-type="float">
            <text:p>0,00251296296296296000</text:p>
          </table:table-cell>
          <table:table-cell table:formula="of:=[.D474]-[.D47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6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51828703703704" calcext:value-type="float">
            <text:p>0,00251828703703704000</text:p>
          </table:table-cell>
          <table:table-cell table:formula="of:=[.D475]-[.D47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6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52361111111111" calcext:value-type="float">
            <text:p>0,00252361111111111000</text:p>
          </table:table-cell>
          <table:table-cell table:formula="of:=[.D476]-[.D47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6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52893518518519" calcext:value-type="float">
            <text:p>0,00252893518518519000</text:p>
          </table:table-cell>
          <table:table-cell table:formula="of:=[.D477]-[.D47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6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53425925925926" calcext:value-type="float">
            <text:p>0,00253425925925926000</text:p>
          </table:table-cell>
          <table:table-cell table:formula="of:=[.D478]-[.D47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6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53958333333333" calcext:value-type="float">
            <text:p>0,00253958333333333000</text:p>
          </table:table-cell>
          <table:table-cell table:formula="of:=[.D479]-[.D47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6" office:value-type="float" office:value="21988" calcext:value-type="float">
            <text:p>2198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54490740740741" calcext:value-type="float">
            <text:p>0,00254490740740741000</text:p>
          </table:table-cell>
          <table:table-cell table:formula="of:=[.D480]-[.D47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6" office:value-type="float" office:value="22034" calcext:value-type="float">
            <text:p>22034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55023148148148" calcext:value-type="float">
            <text:p>0,00255023148148148000</text:p>
          </table:table-cell>
          <table:table-cell table:formula="of:=[.D481]-[.D48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6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55555555555556" calcext:value-type="float">
            <text:p>0,00255555555555556000</text:p>
          </table:table-cell>
          <table:table-cell table:formula="of:=[.D482]-[.D48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6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56087962962963" calcext:value-type="float">
            <text:p>0,00256087962962963000</text:p>
          </table:table-cell>
          <table:table-cell table:formula="of:=[.D483]-[.D48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6" office:value-type="float" office:value="22172" calcext:value-type="float">
            <text:p>2217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5662037037037" calcext:value-type="float">
            <text:p>0,00256620370370370000</text:p>
          </table:table-cell>
          <table:table-cell table:formula="of:=[.D484]-[.D48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6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57152777777778" calcext:value-type="float">
            <text:p>0,00257152777777778000</text:p>
          </table:table-cell>
          <table:table-cell table:formula="of:=[.D485]-[.D48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6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57685185185185" calcext:value-type="float">
            <text:p>0,00257685185185185000</text:p>
          </table:table-cell>
          <table:table-cell table:formula="of:=[.D486]-[.D48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6" office:value-type="float" office:value="22310" calcext:value-type="float">
            <text:p>2231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58217592592593" calcext:value-type="float">
            <text:p>0,00258217592592593000</text:p>
          </table:table-cell>
          <table:table-cell table:formula="of:=[.D487]-[.D48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6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5875" calcext:value-type="float">
            <text:p>0,00258750000000000000</text:p>
          </table:table-cell>
          <table:table-cell table:formula="of:=[.D488]-[.D48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6" office:value-type="float" office:value="22402" calcext:value-type="float">
            <text:p>22402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59282407407407" calcext:value-type="float">
            <text:p>0,00259282407407407000</text:p>
          </table:table-cell>
          <table:table-cell table:formula="of:=[.D489]-[.D48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6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59814814814815" calcext:value-type="float">
            <text:p>0,00259814814814815000</text:p>
          </table:table-cell>
          <table:table-cell table:formula="of:=[.D490]-[.D48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6" office:value-type="float" office:value="22494" calcext:value-type="float">
            <text:p>22494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60347222222222" calcext:value-type="float">
            <text:p>0,00260347222222222000</text:p>
          </table:table-cell>
          <table:table-cell table:formula="of:=[.D491]-[.D49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6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6087962962963" calcext:value-type="float">
            <text:p>0,00260879629629630000</text:p>
          </table:table-cell>
          <table:table-cell table:formula="of:=[.D492]-[.D49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6" office:value-type="float" office:value="22586" calcext:value-type="float">
            <text:p>22586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61412037037037" calcext:value-type="float">
            <text:p>0,00261412037037037000</text:p>
          </table:table-cell>
          <table:table-cell table:formula="of:=[.D493]-[.D49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6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61944444444444" calcext:value-type="float">
            <text:p>0,00261944444444444000</text:p>
          </table:table-cell>
          <table:table-cell table:formula="of:=[.D494]-[.D493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6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62476851851852" calcext:value-type="float">
            <text:p>0,00262476851851852000</text:p>
          </table:table-cell>
          <table:table-cell table:formula="of:=[.D495]-[.D494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6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63009259259259" calcext:value-type="float">
            <text:p>0,00263009259259259000</text:p>
          </table:table-cell>
          <table:table-cell table:formula="of:=[.D496]-[.D495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6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63541666666667" calcext:value-type="float">
            <text:p>0,00263541666666667000</text:p>
          </table:table-cell>
          <table:table-cell table:formula="of:=[.D497]-[.D49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6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64074074074074" calcext:value-type="float">
            <text:p>0,00264074074074074000</text:p>
          </table:table-cell>
          <table:table-cell table:formula="of:=[.D498]-[.D49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6" office:value-type="float" office:value="22862" calcext:value-type="float">
            <text:p>22862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64606481481481" calcext:value-type="float">
            <text:p>0,00264606481481481000</text:p>
          </table:table-cell>
          <table:table-cell table:formula="of:=[.D499]-[.D49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6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65138888888889" calcext:value-type="float">
            <text:p>0,00265138888888889000</text:p>
          </table:table-cell>
          <table:table-cell table:formula="of:=[.D500]-[.D49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6" office:value-type="float" office:value="22954" calcext:value-type="float">
            <text:p>22954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65671296296296" calcext:value-type="float">
            <text:p>0,00265671296296296000</text:p>
          </table:table-cell>
          <table:table-cell table:formula="of:=[.D501]-[.D500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6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66203703703704" calcext:value-type="float">
            <text:p>0,00266203703703704000</text:p>
          </table:table-cell>
          <table:table-cell table:formula="of:=[.D502]-[.D501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6" office:value-type="float" office:value="23046" calcext:value-type="float">
            <text:p>23046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66736111111111" calcext:value-type="float">
            <text:p>0,00266736111111111000</text:p>
          </table:table-cell>
          <table:table-cell table:formula="of:=[.D503]-[.D502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6" office:value-type="float" office:value="23092" calcext:value-type="float">
            <text:p>2309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67268518518519" calcext:value-type="float">
            <text:p>0,00267268518518519000</text:p>
          </table:table-cell>
          <table:table-cell table:formula="of:=[.D504]-[.D50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6" office:value-type="float" office:value="23138" calcext:value-type="float">
            <text:p>23138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67800925925926" calcext:value-type="float">
            <text:p>0,00267800925925926000</text:p>
          </table:table-cell>
          <table:table-cell table:formula="of:=[.D505]-[.D50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6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68333333333333" calcext:value-type="float">
            <text:p>0,00268333333333333000</text:p>
          </table:table-cell>
          <table:table-cell table:formula="of:=[.D506]-[.D50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6" office:value-type="float" office:value="23230" calcext:value-type="float">
            <text:p>2323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68865740740741" calcext:value-type="float">
            <text:p>0,00268865740740741000</text:p>
          </table:table-cell>
          <table:table-cell table:formula="of:=[.D507]-[.D506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6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69398148148148" calcext:value-type="float">
            <text:p>0,00269398148148148000</text:p>
          </table:table-cell>
          <table:table-cell table:formula="of:=[.D508]-[.D507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6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69930555555556" calcext:value-type="float">
            <text:p>0,00269930555555556000</text:p>
          </table:table-cell>
          <table:table-cell table:formula="of:=[.D509]-[.D508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6" office:value-type="float" office:value="23368" calcext:value-type="float">
            <text:p>2336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70462962962963" calcext:value-type="float">
            <text:p>0,00270462962962963000</text:p>
          </table:table-cell>
          <table:table-cell table:formula="of:=[.D510]-[.D509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6" office:value-type="float" office:value="23414" calcext:value-type="float">
            <text:p>23414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7099537037037" calcext:value-type="float">
            <text:p>0,00270995370370370000</text:p>
          </table:table-cell>
          <table:table-cell table:formula="of:=[.D511]-[.D51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6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71527777777778" calcext:value-type="float">
            <text:p>0,00271527777777778000</text:p>
          </table:table-cell>
          <table:table-cell table:formula="of:=[.D512]-[.D51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6" office:value-type="float" office:value="23506" calcext:value-type="float">
            <text:p>23506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72060185185185" calcext:value-type="float">
            <text:p>0,00272060185185185000</text:p>
          </table:table-cell>
          <table:table-cell table:formula="of:=[.D513]-[.D512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6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72592592592593" calcext:value-type="float">
            <text:p>0,00272592592592593000</text:p>
          </table:table-cell>
          <table:table-cell table:formula="of:=[.D514]-[.D513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6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73125" calcext:value-type="float">
            <text:p>0,00273125000000000000</text:p>
          </table:table-cell>
          <table:table-cell table:formula="of:=[.D515]-[.D514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6" office:value-type="float" office:value="23644" calcext:value-type="float">
            <text:p>2364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73657407407407" calcext:value-type="float">
            <text:p>0,00273657407407407000</text:p>
          </table:table-cell>
          <table:table-cell table:formula="of:=[.D516]-[.D515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6" office:value-type="float" office:value="23690" calcext:value-type="float">
            <text:p>2369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74189814814815" calcext:value-type="float">
            <text:p>0,00274189814814815000</text:p>
          </table:table-cell>
          <table:table-cell table:formula="of:=[.D517]-[.D516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6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74722222222222" calcext:value-type="float">
            <text:p>0,00274722222222222000</text:p>
          </table:table-cell>
          <table:table-cell table:formula="of:=[.D518]-[.D517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6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7525462962963" calcext:value-type="float">
            <text:p>0,00275254629629630000</text:p>
          </table:table-cell>
          <table:table-cell table:formula="of:=[.D519]-[.D518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6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75787037037037" calcext:value-type="float">
            <text:p>0,00275787037037037000</text:p>
          </table:table-cell>
          <table:table-cell table:formula="of:=[.D520]-[.D519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6" office:value-type="float" office:value="23874" calcext:value-type="float">
            <text:p>23874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76319444444444" calcext:value-type="float">
            <text:p>0,00276319444444444000</text:p>
          </table:table-cell>
          <table:table-cell table:formula="of:=[.D521]-[.D520]" office:value-type="float" office:value="0.00000532407407407426" calcext:value-type="float">
            <text:p>0,000005324074074074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6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76851851851852" calcext:value-type="float">
            <text:p>0,00276851851851852000</text:p>
          </table:table-cell>
          <table:table-cell table:formula="of:=[.D522]-[.D521]" office:value-type="float" office:value="0.00000532407407407383" calcext:value-type="float">
            <text:p>0,0000053240740740738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6" office:value-type="float" office:value="23966" calcext:value-type="float">
            <text:p>23966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77384259259259" calcext:value-type="float">
            <text:p>0,00277384259259259000</text:p>
          </table:table-cell>
          <table:table-cell table:formula="of:=#REF!-[.D522]" office:value-type="string" office:string-value="" calcext:value-type="error">
            <text:p>#REF!</text:p>
          </table:table-cell>
        </table:table-row>
        <table:table-row table:style-name="ro1" table:number-rows-repeated="10480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1:45.105970579</meta:creation-date>
    <dc:date>2026-05-17T17:42:04.698337864</dc:date>
    <meta:editing-duration>PT21S</meta:editing-duration>
    <meta:editing-cycles>1</meta:editing-cycles>
    <meta:document-statistic meta:table-count="1" meta:cell-count="2610" meta:object-count="0"/>
    <meta:generator>LibreOffice/24.2.7.2$Linux_X86_64 LibreOffice_project/420$Build-2</meta:generator>
  </office:meta>
</office:document-meta>
</file>